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C0000022180CD1462.png" manifest:media-type="image/png"/>
  <manifest:file-entry manifest:full-path="Pictures/10000001000001B0000000A2370564DF.png" manifest:media-type="image/png"/>
  <manifest:file-entry manifest:full-path="Pictures/100000010000010200000225D6430680.png" manifest:media-type="image/png"/>
  <manifest:file-entry manifest:full-path="Pictures/10000001000002C9000001C9241C46E7.png" manifest:media-type="image/png"/>
  <manifest:file-entry manifest:full-path="Pictures/10000000000004E90000029378EBCC7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15.1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7.26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4.494cm"/>
    </style:style>
    <style:style style:name="co11" style:family="table-column">
      <style:table-column-properties fo:break-before="auto" style:column-width="3.362cm"/>
    </style:style>
    <style:style style:name="co12" style:family="table-column">
      <style:table-column-properties fo:break-before="auto" style:column-width="4.517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924cm"/>
    </style:style>
    <style:style style:name="co16" style:family="table-column">
      <style:table-column-properties fo:break-before="auto" style:column-width="5.017cm"/>
    </style:style>
    <style:style style:name="co17" style:family="table-column">
      <style:table-column-properties fo:break-before="auto" style:column-width="2.11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2.556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9cm" fo:break-before="auto" style:use-optimal-row-height="false"/>
    </style:style>
    <style:style style:name="ro7" style:family="table-row">
      <style:table-row-properties style:row-height="1.868cm" fo:break-before="auto" style:use-optimal-row-height="fals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8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3d3d3" fo:wrap-option="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wrap-option="wrap"/>
    </style:style>
    <style:style style:name="ce65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68" style:family="table-cell" style:parent-style-name="Default">
      <style:table-cell-properties style:vertical-align="middle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94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>
      <style:table-cell-properties fo:background-color="transparent" fo:wrap-option="wrap" style:vertical-align="middle"/>
      <style:text-properties style:font-name="Calibri"/>
    </style:style>
    <style:style style:name="ce33" style:family="table-cell" style:parent-style-name="Default">
      <style:text-properties style:font-name="Calibri"/>
    </style:style>
    <style:style style:name="ce3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middle"/>
      <style:text-properties style:font-name="Calibri"/>
    </style:style>
    <style:style style:name="ce36" style:family="table-cell" style:parent-style-name="Default">
      <style:table-cell-properties fo:wrap-option="wrap" style:vertical-align="middle"/>
      <style:text-properties style:font-name="Calibri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8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Calibri" fo:font-weight="bold" style:font-weight-asian="bold" style:font-weight-complex="bold"/>
    </style:style>
    <style:style style:name="ce42" style:family="table-cell" style:parent-style-name="Default" style:data-style-name="N1">
      <style:text-properties style:font-name="Calibri"/>
    </style:style>
    <style:style style:name="ce44" style:family="table-cell" style:parent-style-name="Default" style:data-style-name="N11">
      <style:text-properties style:font-name="Calibri"/>
    </style:style>
    <style:style style:name="ce45" style:family="table-cell" style:parent-style-name="Default" style:data-style-name="N11">
      <style:text-properties style:font-name="Calibri"/>
      <style:map style:condition="cell-content()&lt;0.03" style:apply-style-name="Good" style:base-cell-address="'Annex A Preliminary Check'.C35"/>
      <style:map style:condition="cell-content()&gt;=0.03" style:apply-style-name="Bad" style:base-cell-address="'Annex A Preliminary Check'.C35"/>
    </style:style>
    <style:style style:name="ce78" style:family="table-cell" style:parent-style-name="Default">
      <style:text-properties style:font-name="Calibri" fo:font-weight="bold" style:font-weight-asian="bold" style:font-weight-complex="bold"/>
    </style:style>
    <style:style style:name="ce9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57" style:family="table-cell" style:parent-style-name="Default" style:data-style-name="N158">
      <style:text-properties style:font-name="Calibri"/>
    </style:style>
    <style:style style:name="ce77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102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/>
    </style:style>
    <style:style style:name="ce103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10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/>
    </style:style>
    <style:style style:name="ce79" style:family="table-cell" style:parent-style-name="Default">
      <style:text-properties style:font-name="Calibri"/>
      <style:map style:condition="cell-content()=&quot;&lt;3% = PASS&quot;" style:apply-style-name="Good" style:base-cell-address="'Annex A Preliminary Check'.D35"/>
      <style:map style:condition="cell-content()!=&quot;&lt;3% = PASS&quot;" style:apply-style-name="Bad" style:base-cell-address="'Annex A Preliminary Check'.D35"/>
    </style:style>
    <style:style style:name="ce136" style:family="table-cell" style:parent-style-name="Default" style:data-style-name="N11">
      <style:text-properties style:font-name="Calibri" fo:font-style="italic" style:font-style-asian="italic" style:font-style-complex="italic"/>
    </style:style>
    <style:style style:name="ce80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normal" style:font-weight-asian="normal" style:font-weight-complex="normal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weight="bold" style:font-weight-asian="bold" style:font-weight-complex="bold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83" style:family="table-cell" style:parent-style-name="Default" style:data-style-name="N2">
      <style:table-cell-properties fo:border-bottom="0.74pt solid #000000" fo:background-color="#ccf4c6" style:text-align-source="fix" style:repeat-content="false" fo:border-left="none" fo:border-right="none" fo:border-top="0.74pt solid #000000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84" style:family="table-cell" style:parent-style-name="Default" style:data-style-name="N11">
      <style:table-cell-properties fo:background-color="#ccf4c6" style:text-align-source="fix" style:repeat-content="false"/>
      <style:paragraph-properties fo:text-align="end" fo:margin-left="0cm"/>
      <style:text-properties style:font-name="Calibri"/>
    </style:style>
    <style:style style:name="ce144" style:family="table-cell" style:parent-style-name="Default" style:data-style-name="N1">
      <style:table-cell-properties style:cell-protect="none" style:print-content="true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0ffff" fo:wrap-option="wrap" style:vertical-align="middle"/>
    </style:style>
    <style:style style:name="ce146" style:family="table-cell" style:parent-style-name="Default" style:data-style-name="N49">
      <style:text-properties fo:font-weight="bold" style:font-weight-asian="bold" style:font-weight-complex="bold"/>
    </style:style>
    <style:style style:name="ce32" style:family="table-cell" style:parent-style-name="Default" style:data-style-name="N158"/>
    <style:style style:name="ce53" style:family="table-cell" style:parent-style-name="Default" style:data-style-name="N2"/>
    <style:style style:name="ce126" style:family="table-cell" style:parent-style-name="Default" style:data-style-name="N2">
      <style:text-properties fo:font-weight="bold" style:font-weight-asian="bold" style:font-weight-complex="bold"/>
    </style:style>
    <style:style style:name="ce127" style:family="table-cell" style:parent-style-name="Default" style:data-style-name="N81"/>
    <style:style style:name="ce48" style:family="table-cell" style:parent-style-name="Default">
      <style:table-cell-properties fo:border-bottom="none" fo:background-color="#e0ffff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ffff"/>
    </style:style>
    <style:style style:name="ce131" style:family="table-cell" style:parent-style-name="Default">
      <style:table-cell-properties fo:background-color="#e0ffff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fo:background-color="#e0ffff" fo:border-left="none" fo:border-right="none" fo:border-top="none"/>
    </style:style>
    <style:style style:name="ce130" style:family="table-cell" style:parent-style-name="Default">
      <style:table-cell-properties fo:background-color="#e0ffff" style:vertical-align="middle"/>
    </style:style>
    <style:style style:name="ce58" style:family="table-cell" style:parent-style-name="Default" style:data-style-name="N157">
      <style:table-cell-properties fo:background-color="#e0ffff"/>
    </style:style>
    <style:style style:name="ce135" style:family="table-cell" style:parent-style-name="Default" style:data-style-name="N157">
      <style:table-cell-properties fo:background-color="#e0ffff"/>
      <style:text-properties fo:font-weight="normal" style:font-weight-asian="normal" style:font-weight-complex="normal"/>
    </style:style>
    <style:style style:name="ce60" style:family="table-cell" style:parent-style-name="Default" style:data-style-name="N157">
      <style:table-cell-properties fo:border-bottom="0.74pt solid #000000" fo:background-color="#e0ffff" fo:border-left="none" fo:border-right="none" fo:border-top="none"/>
    </style:style>
    <style:style style:name="ce61" style:family="table-cell" style:parent-style-name="Default" style:data-style-name="N158">
      <style:table-cell-properties fo:background-color="#e0ffff"/>
    </style:style>
    <style:style style:name="ce138" style:family="table-cell" style:parent-style-name="Default" style:data-style-name="N158">
      <style:table-cell-properties fo:background-color="#e0ffff"/>
      <style:text-properties fo:font-weight="normal" style:font-weight-asian="normal" style:font-weight-complex="normal"/>
    </style:style>
    <style:style style:name="ce63" style:family="table-cell" style:parent-style-name="Default" style:data-style-name="N158">
      <style:table-cell-properties fo:border-bottom="0.74pt solid #000000" fo:background-color="#e0ffff" fo:border-left="none" fo:border-right="none" fo:border-top="none"/>
    </style:style>
    <style:style style:name="ce64" style:family="table-cell" style:parent-style-name="Default" style:data-style-name="N1">
      <style:table-cell-properties fo:background-color="#e0ffff"/>
    </style:style>
    <style:style style:name="ce141" style:family="table-cell" style:parent-style-name="Default" style:data-style-name="N1">
      <style:table-cell-properties fo:background-color="#e0ffff"/>
      <style:text-properties fo:font-weight="normal" style:font-weight-asian="normal" style:font-weight-complex="normal"/>
    </style:style>
    <style:style style:name="ce66" style:family="table-cell" style:parent-style-name="Default" style:data-style-name="N1">
      <style:table-cell-properties fo:border-bottom="0.74pt solid #000000" fo:background-color="#e0ffff" fo:border-left="none" fo:border-right="none" fo:border-top="none"/>
    </style:style>
    <style:style style:name="ce20" style:family="table-cell" style:parent-style-name="Default" style:data-style-name="N1"/>
    <style:style style:name="ce51" style:family="table-cell" style:parent-style-name="Default">
      <style:table-cell-properties fo:background-color="#e0ffff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#e0ffff"/>
    </style:style>
    <style:style style:name="ce150" style:family="table-cell" style:parent-style-name="Default" style:data-style-name="N2">
      <style:table-cell-properties fo:background-color="#e0ffff"/>
      <style:text-properties fo:font-weight="normal" style:font-weight-asian="normal" style:font-weight-complex="normal"/>
    </style:style>
    <style:style style:name="ce69" style:family="table-cell" style:parent-style-name="Default" style:data-style-name="N2">
      <style:table-cell-properties fo:border-bottom="0.74pt solid #000000" fo:background-color="#e0ffff" fo:border-left="none" fo:border-right="none" fo:border-top="none"/>
    </style:style>
    <style:style style:name="ce70" style:family="table-cell" style:parent-style-name="Default" style:data-style-name="N11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e0ffff"/>
    </style:style>
    <style:style style:name="ce72" style:family="table-cell" style:parent-style-name="Default">
      <style:table-cell-properties fo:background-color="#e0ffff" style:text-align-source="fix" style:repeat-content="false"/>
      <style:paragraph-properties fo:text-align="start" fo:margin-left="0.706cm"/>
    </style:style>
    <style:style style:name="ce156" style:family="table-cell" style:parent-style-name="Default">
      <style:table-cell-properties fo:background-color="#e0ffff" style:text-align-source="fix" style:repeat-content="false"/>
      <style:paragraph-properties fo:text-align="start" fo:margin-left="0.706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/>
      <style:paragraph-properties fo:text-align="start" fo:margin-left="0.706cm"/>
    </style:style>
    <style:style style:name="ce74" style:family="table-cell" style:parent-style-name="Default">
      <style:table-cell-properties fo:background-color="#e0ffff" style:text-align-source="fix" style:repeat-content="false"/>
      <style:paragraph-properties fo:text-align="start" fo:margin-left="1.411cm"/>
    </style:style>
    <style:style style:name="ce159" style:family="table-cell" style:parent-style-name="Default">
      <style:table-cell-properties fo:background-color="#e0ffff" style:text-align-source="fix" style:repeat-content="false"/>
      <style:paragraph-properties fo:text-align="start" fo:margin-left="1.411cm"/>
      <style:text-properties fo:font-weight="normal" style:font-weight-asian="normal" style:font-weight-complex="normal"/>
    </style:style>
    <style:style style:name="ce149" style:family="table-cell" style:parent-style-name="Default">
      <style:text-properties fo:color="#c9211e" fo:font-size="32pt" fo:font-weight="bold" style:font-size-asian="32pt" style:font-weight-asian="bold" style:font-size-complex="32pt" style:font-weight-complex="bold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62" style:family="table-cell" style:parent-style-name="Default">
      <style:table-cell-properties fo:border-bottom="none" fo:border-left="0.74pt solid #000000" fo:border-right="none" fo:border-top="none"/>
    </style:style>
    <style:style style:name="ce163" style:family="table-cell" style:parent-style-name="Default">
      <style:table-cell-properties fo:border-bottom="0.74pt solid #000000" fo:border-left="0.74pt solid #000000" fo:border-right="none" fo:border-top="none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fo:border-left="none" fo:border-right="none" fo:border-top="0.74pt solid #000000"/>
    </style:style>
    <style:style style:name="ce16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68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7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fo:border-left="none" fo:border-right="0.74pt solid #000000" fo:border-top="none"/>
    </style:style>
    <style:style style:name="ce172" style:family="table-cell" style:parent-style-name="Default">
      <style:table-cell-properties fo:border-bottom="0.74pt solid #000000" fo:background-color="#ccf4c6" fo:border-left="none" fo:border-right="0.74pt solid #000000" fo:border-top="none"/>
    </style:style>
    <style:style style:name="ce173" style:family="table-cell" style:parent-style-name="Default" style:data-style-name="N1">
      <style:text-properties fo:font-weight="normal" style:font-weight-asian="normal" style:font-weight-complex="normal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233" style:family="table-cell" style:parent-style-name="Default" style:data-style-name="N157"/>
    <style:style style:name="ce176" style:family="table-cell" style:parent-style-name="Default" style:data-style-name="N157">
      <style:text-properties fo:font-weight="normal" style:font-weight-asian="normal" style:font-weight-complex="normal"/>
    </style:style>
    <style:style style:name="ce235" style:family="table-cell" style:parent-style-name="Default">
      <style:table-cell-properties style:cell-protect="none" style:print-content="true"/>
    </style:style>
    <style:style style:name="ce236" style:family="table-cell" style:parent-style-name="Default" style:data-style-name="N120">
      <style:table-cell-properties style:cell-protect="none" style:print-content="true"/>
    </style:style>
    <style:style style:name="ce237" style:family="table-cell" style:parent-style-name="Default" style:data-style-name="N0">
      <style:table-cell-properties style:cell-protect="none" style:print-content="true"/>
      <style:text-properties fo:font-weight="bold" style:font-weight-asian="bold" style:font-weight-complex="bold"/>
    </style:style>
    <style:style style:name="ce238" style:family="table-cell" style:parent-style-name="Default" style:data-style-name="N2">
      <style:table-cell-properties style:cell-protect="none" style:print-content="true"/>
    </style:style>
    <style:style style:name="ce239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240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1"/>
    <style:style style:name="ce101" style:family="table-cell" style:parent-style-name="Default">
      <style:map style:condition="cell-content()=&quot;&lt;3% = PASS&quot;" style:apply-style-name="Good" style:base-cell-address="'Clause 6 Sizing Calibration'.K54"/>
      <style:map style:condition="cell-content()!=&quot;&lt;3% = PASS&quot;" style:apply-style-name="Bad" style:base-cell-address="'Clause 6 Sizing Calibration'.K54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0ee90" fo:wrap-option="wrap" style:vertical-align="middle"/>
    </style:style>
    <style:style style:name="ce189" style:family="table-cell" style:parent-style-name="Default">
      <style:table-cell-properties fo:border-bottom="none" fo:border-left="0.74pt solid #000000" fo:border-right="none" fo:border-top="0.74pt solid #000000"/>
      <style:text-properties style:font-name="Calibri"/>
    </style:style>
    <style:style style:name="ce190" style:family="table-cell" style:parent-style-name="Default">
      <style:table-cell-properties fo:border-bottom="none" fo:border-left="0.74pt solid #000000" fo:border-right="none" fo:border-top="none"/>
      <style:text-properties style:font-name="Calibri"/>
    </style:style>
    <style:style style:name="ce191" style:family="table-cell" style:parent-style-name="Default">
      <style:table-cell-properties fo:border-bottom="0.74pt solid #000000" fo:border-left="0.74pt solid #000000" fo:border-right="none" fo:border-top="none"/>
      <style:text-properties style:font-name="Calibri"/>
    </style:style>
    <style:style style:name="ce52" style:family="table-cell" style:parent-style-name="Default" style:data-style-name="N81">
      <style:table-cell-properties style:cell-protect="none" style:print-content="true"/>
    </style:style>
    <style:style style:name="ce12" style:family="table-cell" style:parent-style-name="Default" style:data-style-name="N80">
      <style:table-cell-properties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cell-protect="none" style:print-content="true"/>
    </style:style>
    <style:style style:name="ce195" style:family="table-cell" style:parent-style-name="Default" style:data-style-name="N158"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Calibri"/>
    </style:style>
    <style:style style:name="ce19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Calibri"/>
    </style:style>
    <style:style style:name="ce198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Calibri" fo:font-weight="bold" style:font-weight-asian="bold" style:font-weight-complex="bold"/>
    </style:style>
    <style:style style:name="ce199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Calibri"/>
    </style:style>
    <style:style style:name="ce2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  <style:text-properties style:font-name="Calibri" fo:font-weight="bold" style:font-weight-asian="bold" style:font-weight-complex="bold"/>
    </style:style>
    <style:style style:name="ce54" style:family="table-cell" style:parent-style-name="Default" style:data-style-name="N11">
      <style:table-cell-properties fo:background-color="#90ee90"/>
    </style:style>
    <style:style style:name="ce9" style:family="table-cell" style:parent-style-name="Default">
      <style:table-cell-properties fo:background-color="#90ee90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4" style:family="table-cell" style:parent-style-name="Default">
      <style:table-cell-properties fo:border="none"/>
    </style:style>
    <style:style style:name="ce205" style:family="table-cell" style:parent-style-name="Default">
      <style:text-properties fo:font-weight="bold" style:font-weight-asian="bold" style:font-weight-complex="bold"/>
      <style:map style:condition="cell-content-is-between([.$J$22],[.$K$22])" style:apply-style-name="Good" style:base-cell-address="'Annex E Verify Counting Accuracy_2'.A29"/>
    </style:style>
    <style:style style:name="ce120" style:family="table-cell" style:parent-style-name="Default">
      <style:table-cell-properties fo:border-bottom="0.74pt solid #000000" fo:border-left="none" fo:border-right="none" fo:border-top="0.74pt solid #000000"/>
    </style:style>
    <style:style style:name="ce121" style:family="table-cell" style:parent-style-name="Default">
      <style:text-properties style:text-overline-style="solid" style:text-overline-width="auto" style:text-overline-color="font-color"/>
    </style:style>
    <style:style style:name="ce208" style:family="table-cell" style:parent-style-name="Default" style:data-style-name="N10"/>
    <style:style style:name="ce209" style:family="table-cell" style:parent-style-name="Default">
      <style:text-properties fo:font-weight="bold" style:font-weight-asian="bold" style:font-weight-complex="bold"/>
      <style:map style:condition="cell-content-is-between([.$J$24],[.$K$24])" style:apply-style-name="Good" style:base-cell-address="'Annex E Verify Counting Accuracy_2'.B29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211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Annex E Verify Counting Accuracy_2'.B55"/>
    </style:style>
    <style:style style:name="ce212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2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19" style:family="table-cell" style:parent-style-name="Default">
      <style:table-cell-properties fo:border-bottom="0.74pt solid #000000" fo:border-left="none" fo:border-right="0.74pt solid #000000" fo:border-top="none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5.432cm" loext:decorative="false"/>
      <style:paragraph-properties style:writing-mode="lr-tb"/>
      <style:text-properties style:font-name="Calibri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10.40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libri"/>
    </style:style>
    <style:style style:name="P3" style:family="paragraph">
      <loext:graphic-properties draw:fill="none" draw:fill-color="#ffffff"/>
    </style:style>
    <style:style style:name="T1" style:family="text">
      <style:text-properties style:font-name="Calibri"/>
    </style:style>
    <style:style style:name="T2" style:family="text">
      <style:text-properties style:text-position="-33%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8% 58%"/>
    </style:style>
    <style:style style:name="T7" style:family="text">
      <style:text-properties fo:font-weight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O 11171_2020 Summary" table:style-name="ta1" table:print-ranges="'ISO 11171_2020 Summary'.A1:'ISO 11171_2020 Summary'.C18">
        <table:table-column table:style-name="co1" table:default-cell-style-name="ce62"/>
        <table:table-column table:style-name="co2" table:default-cell-style-name="Default"/>
        <table:table-column table:style-name="co3" table:default-cell-style-name="ce62"/>
        <table:table-column table:style-name="co4" table:number-columns-repeated="1021" table:default-cell-style-name="Default"/>
        <table:table-row table:style-name="ro1">
          <table:table-cell table:style-name="ce28" office:value-type="string" calcext:value-type="string">
            <text:p>ISO 11171:2020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55" office:value-type="string" calcext:value-type="string">
            <text:p>Requirement</text:p>
          </table:table-cell>
          <table:table-cell table:style-name="ce65" office:value-type="string" calcext:value-type="string">
            <text:p>Material</text:p>
          </table:table-cell>
          <table:table-cell table:style-name="ce55" office:value-type="string" calcext:value-type="string">
            <text:p>Reference</text:p>
          </table:table-cell>
          <table:table-cell table:style-name="ce92" table:number-columns-repeated="1021"/>
        </table:table-row>
        <table:table-row table:style-name="ro3">
          <table:table-cell table:style-name="ce59" office:value-type="string" calcext:value-type="string">
            <text:p>&gt;1000 particles per bottle at max certified size</text:p>
            <text:p>Sample Cv per Table C.2</text:p>
          </table:table-cell>
          <table:table-cell table:style-name="ce68" office:value-type="string" calcext:value-type="string">
            <text:p>SRM2806/RM8631x</text:p>
          </table:table-cell>
          <table:table-cell table:style-name="ce59" office:value-type="string" calcext:value-type="string">
            <text:p>Clause 6. Sizing Calibration. 3 separate bottles, 5 sub-samples from each.</text:p>
          </table:table-cell>
          <table:table-cell table:style-name="ce68" table:number-columns-repeated="1021"/>
        </table:table-row>
        <table:table-row table:style-name="ro3">
          <table:table-cell table:style-name="ce59" office:value-type="string" calcext:value-type="string">
            <text:p>Cv<text:span text:style-name="T2">4um</text:span> &lt; 3%</text:p>
          </table:table-cell>
          <table:table-cell table:style-name="ce68" office:value-type="string" calcext:value-type="string">
            <text:p>RM8632x</text:p>
          </table:table-cell>
          <table:table-cell table:style-name="ce59" office:value-type="string" calcext:value-type="string">
            <text:p>Annex A – Preliminary Instrument Check</text:p>
            <text:p/>
            <text:p>Need traceable measurement of volume "actually measured" during a particle counting run. Test-test Cv<text:span text:style-name="T2">COUNTS</text:span> &lt; 3% over 5 sample runs using RM8632 fine dust is required at threshold of 1.5x threshold noise.</text:p>
          </table:table-cell>
          <table:table-cell table:style-name="ce68" table:number-columns-repeated="1021"/>
        </table:table-row>
        <table:table-row table:style-name="ro3">
          <table:table-cell table:style-name="ce59" office:value-type="string" calcext:value-type="string">
            <text:p>Δ<text:span text:style-name="T2">COUNTS_4um</text:span> &lt; 5%</text:p>
          </table:table-cell>
          <table:table-cell table:style-name="ce68" office:value-type="string" calcext:value-type="string">
            <text:p>RM8632x</text:p>
          </table:table-cell>
          <table:table-cell table:style-name="ce59" office:value-type="string" calcext:value-type="string">
            <text:p>Annex B – Coincidence error limit</text:p>
            <text:p>Analyse <text:span text:style-name="T5">15 different concentrations</text:span> 5 times, of 10%...150% of manufacturer recommended coincidence limit. 0-40% regression line of 4um channel used to project results. Error limit when counts cross 95% of this line.</text:p>
          </table:table-cell>
          <table:table-cell table:style-name="ce68" table:number-columns-repeated="1021"/>
        </table:table-row>
        <table:table-row table:style-name="ro3">
          <table:table-cell table:style-name="ce59" office:value-type="string" calcext:value-type="string">
            <text:p>Cv<text:span text:style-name="T2">_4um</text:span> &lt; 3%</text:p>
          </table:table-cell>
          <table:table-cell table:style-name="ce68" office:value-type="string" calcext:value-type="string">
            <text:p>RM8632x</text:p>
          </table:table-cell>
          <table:table-cell table:style-name="ce59" office:value-type="string" calcext:value-type="string">
            <text:p>Annex C – flow rate – <text:span text:style-name="T5">if fixed</text:span> then just need traceable flow measurement and pass annex A. <text:span text:style-name="T5">Otherwise 8 flow rates</text:span> 20..140% are used and the results at each analysed in order to establish a limit.</text:p>
          </table:table-cell>
          <table:table-cell table:style-name="ce68" table:number-columns-repeated="1021"/>
        </table:table-row>
        <table:table-row table:style-name="ro3">
          <table:table-cell table:style-name="ce59" office:value-type="string" calcext:value-type="string">
            <text:p>Cv<text:span text:style-name="T2">DIAM_10</text:span> &lt; +/-15%</text:p>
            <text:p><text:span text:style-name="T3">→ Cv</text:span><text:span text:style-name="T4">SIGNAL_10</text:span><text:span text:style-name="T3"> &lt; +/-32%</text:span></text:p>
            <text:p/>
          </table:table-cell>
          <table:table-cell table:style-name="ce68" office:value-type="string" calcext:value-type="string">
            <text:p>10um spheres</text:p>
          </table:table-cell>
          <table:table-cell table:style-name="ce59" office:value-type="string" calcext:value-type="string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table-cell table:style-name="ce68" table:number-columns-repeated="1021"/>
        </table:table-row>
        <table:table-row table:style-name="ro3">
          <table:table-cell table:style-name="ce59" office:value-type="string" calcext:value-type="string">
            <text:p>Counts per Table A.1</text:p>
            <text:p>Cv &lt; Table C.2</text:p>
            <text:p>6 sizes 5-15um</text:p>
          </table:table-cell>
          <table:table-cell table:style-name="ce68" office:value-type="string" calcext:value-type="string">
            <text:p>RM8632x 1mg/l</text:p>
          </table:table-cell>
          <table:table-cell table:style-name="ce59" office:value-type="string" calcext:value-type="string">
            <text:p>Annex E – particle counting accuracy. Ensure RM8632x counts in permitted range.</text:p>
          </table:table-cell>
          <table:table-cell table:style-name="ce68" table:number-columns-repeated="1021"/>
        </table:table-row>
        <table:table-row table:style-name="ro2">
          <table:table-cell table:style-name="ce59"/>
          <table:table-cell table:style-name="ce68"/>
          <table:table-cell table:style-name="ce59"/>
          <table:table-cell table:style-name="ce68" table:number-columns-repeated="1021"/>
        </table:table-row>
        <table:table-row table:style-name="ro2">
          <table:table-cell table:style-name="ce59"/>
          <table:table-cell/>
          <table:table-cell table:style-name="Default"/>
          <table:table-cell table:style-name="ce68" table:number-columns-repeated="1021"/>
        </table:table-row>
        <table:table-row table:style-name="ro2" table:number-rows-repeated="8">
          <table:table-cell table:style-name="ce59"/>
          <table:table-cell table:style-name="ce68"/>
          <table:table-cell table:style-name="ce59"/>
          <table:table-cell table:style-name="ce68"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A.1" table:style-name="ta1"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Table A.1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μm(c)</text:p>
          </table:table-cell>
          <table:table-cell table:style-name="ce93" office:value-type="string" calcext:value-type="string">
            <text:p>Median</text:p>
          </table:table-cell>
          <table:table-cell table:style-name="ce93" office:value-type="string" calcext:value-type="string">
            <text:p>Minimum</text:p>
          </table:table-cell>
          <table:table-cell table:style-name="ce93" office:value-type="string" calcext:value-type="string">
            <text:p>Maxim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4553" calcext:value-type="float">
            <text:p>4553</text:p>
          </table:table-cell>
          <table:table-cell office:value-type="float" office:value="8713" calcext:value-type="float">
            <text:p>87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1" calcext:value-type="float">
            <text:p>1631</text:p>
          </table:table-cell>
          <table:table-cell office:value-type="float" office:value="938.2" calcext:value-type="float">
            <text:p>938.2</text:p>
          </table:table-cell>
          <table:table-cell office:value-type="float" office:value="2834" calcext:value-type="float">
            <text:p>28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</table:table-row>
        <table:table-row table:style-name="ro2"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88.9" calcext:value-type="float">
            <text:p>88.9</text:p>
          </table:table-cell>
          <table:table-cell table:style-name="ce94" office:value-type="float" office:value="27.89" calcext:value-type="float">
            <text:p>27.89</text:p>
          </table:table-cell>
          <table:table-cell table:style-name="ce94" office:value-type="float" office:value="283.4" calcext:value-type="float">
            <text:p>283.4</text:p>
          </table:table-cell>
        </table:table-row>
      </table:table>
      <table:table table:name="Table C.2" table:style-name="ta1">
        <table:shapes>
          <draw:frame draw:z-index="0" draw:name="Image 2" draw:style-name="gr1" draw:text-style-name="P1" svg:width="20.641cm" svg:height="8.399cm" svg:x="0cm" svg:y="0cm">
            <draw:image xlink:href="Pictures/100000000000050C0000022180CD146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MTD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um</text:p>
          </table:table-cell>
          <table:table-cell office:value-type="string" calcext:value-type="string">
            <text:p>n/mg/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714.29" calcext:value-type="float">
            <text:p>38714.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655.36" calcext:value-type="float">
            <text:p>9655.3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3.21" calcext:value-type="float">
            <text:p>4003.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76.79" calcext:value-type="float">
            <text:p>2176.7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34.64" calcext:value-type="float">
            <text:p>1334.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55.36" calcext:value-type="float">
            <text:p>855.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61.79" calcext:value-type="float">
            <text:p>561.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6.79" calcext:value-type="float">
            <text:p>376.7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9.21" calcext:value-type="float">
            <text:p>259.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3.46" calcext:value-type="float">
            <text:p>183.4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3.79" calcext:value-type="float">
            <text:p>133.7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0.36" calcext:value-type="float">
            <text:p>100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7.29" calcext:value-type="float">
            <text:p>77.2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0.86" calcext:value-type="float">
            <text:p>60.8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.86" calcext:value-type="float">
            <text:p>48.8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2.62" calcext:value-type="float">
            <text:p>32.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.2" calcext:value-type="float">
            <text:p>22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.34" calcext:value-type="float">
            <text:p>18.3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.57" calcext:value-type="float">
            <text:p>8.5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.13" calcext:value-type="float">
            <text:p>7.1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.95" calcext:value-type="float">
            <text:p>5.9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.99" calcext:value-type="float">
            <text:p>4.9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.21" calcext:value-type="float">
            <text:p>4.2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.58" calcext:value-type="float">
            <text:p>3.5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06" calcext:value-type="float">
            <text:p>3.0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.64" calcext:value-type="float">
            <text:p>2.6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.76" calcext:value-type="float">
            <text:p>1.7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.56" calcext:value-type="float">
            <text:p>1.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.39" calcext:value-type="float">
            <text:p>1.3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.24" calcext:value-type="float">
            <text:p>1.2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.12" calcext:value-type="float">
            <text:p>1.1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.01" calcext:value-type="float">
            <text:p>1.0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66" calcext:value-type="float">
            <text:p>0.6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43" calcext:value-type="float">
            <text:p>0.4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SRM2806D" table:style-name="ta1">
        <table:table-column table:style-name="co4" table:default-cell-style-name="Default"/>
        <table:table-row table:style-name="ro2">
          <table:table-cell/>
        </table:table-row>
      </table:table>
      <table:table table:name="Annex A Preliminary Check" table:style-name="ta1">
        <table:shapes>
          <draw:frame draw:z-index="1" draw:name="Text Frame 2" draw:style-name="gr2" draw:text-style-name="P2" svg:width="11.315cm" svg:height="5.432cm" svg:x="36.666cm" svg:y="18.86cm">
            <draw:text-box>
              <text:p><text:span text:style-name="T1">Used microbalance to weigh 10ml sample of fluid, added using precision digital pipette. Added 10x 10ml I total to plastic sample bottle and weighed result (after taring empty bottle weight).</text:span></text:p>
              <text:p><text:span text:style-name="T1"/></text:p>
              <text:p><text:span text:style-name="T1">Used bottle sampler to sample 15ml pumped flush + 40ml pumped sample.</text:span></text:p>
              <text:p><text:span text:style-name="T1"/></text:p>
              <text:p><text:span text:style-name="T1">Measured final weight of bottle+remaining fluid.</text:span></text:p>
              <text:p><text:span text:style-name="T1"/></text:p>
            </draw:text-box>
          </draw:frame>
        </table:shapes>
        <table:table-column table:style-name="co4" table:default-cell-style-name="ce33"/>
        <table:table-column table:style-name="co5" table:default-cell-style-name="ce33"/>
        <table:table-column table:style-name="co4" table:number-columns-repeated="13" table:default-cell-style-name="ce33"/>
        <table:table-column table:style-name="co4" table:default-cell-style-name="Default"/>
        <table:table-column table:style-name="co4" table:number-columns-repeated="2" table:default-cell-style-name="ce33"/>
        <table:table-column table:style-name="co4" table:default-cell-style-name="Default"/>
        <table:table-column table:style-name="co4" table:default-cell-style-name="ce33"/>
        <table:table-column table:style-name="co4" table:number-columns-repeated="4" table:default-cell-style-name="Default"/>
        <table:table-row table:style-name="ro4">
          <table:table-cell table:style-name="ce29" office:value-type="string" calcext:value-type="string">
            <text:p>Cv<text:span text:style-name="T2">4um</text:span> &lt; 3%</text:p>
          </table:table-cell>
          <table:table-cell table:style-name="ce35" office:value-type="string" calcext:value-type="string">
            <text:p>RM8632x</text:p>
          </table:table-cell>
          <table:table-cell table:style-name="ce36" office:value-type="string" calcext:value-type="string" table:number-columns-spanned="8" table:number-rows-spanned="1">
            <text:p>Annex A – Preliminary Instrument Check</text:p>
            <text:p/>
            <text:p>Need traceable measurement of volume "actually measured" during a particle counting run. Test-test Cv<text:span text:style-name="T2">COUNTS</text:span> &lt; 3% over 5 sample runs using RM8632 fine dust is required at threshold of 1.5x threshold noise and a concentration of 25% of coincidence limit.</text:p>
          </table:table-cell>
          <table:covered-table-cell table:number-columns-repeated="7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1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5">
          <table:table-cell table:style-name="ce34" office:value-type="string" calcext:value-type="string">
            <text:p>Analysis using Calibration Rig and RM8632a</text:p>
          </table:table-cell>
          <table:table-cell table:number-columns-repeated="5"/>
          <table:table-cell table:style-name="ce34" office:value-type="string" calcext:value-type="string">
            <text:p>Analysis using Bottle Sampler and MTD</text:p>
          </table:table-cell>
          <table:table-cell table:number-columns-repeated="4"/>
          <table:table-cell table:style-name="ce34" office:value-type="string" calcext:value-type="string">
            <text:p>Analysis using Calibration Rig and NIST Spheres</text:p>
          </table:table-cell>
          <table:table-cell table:number-columns-repeated="4"/>
          <table:table-cell table:style-name="ce34" office:value-type="string" calcext:value-type="string">
            <text:p>Volumetric Sampling Accuracy</text:p>
          </table:table-cell>
          <table:table-cell/>
          <table:table-cell table:style-name="ce33"/>
          <table:table-cell table:number-columns-repeated="2"/>
          <table:table-cell table:style-name="ce92" office:value-type="string" calcext:value-type="string">
            <text:p>Capture Fraction</text:p>
          </table:table-cell>
          <table:table-cell table:number-columns-repeated="2"/>
        </table:table-row>
        <table:table-row table:style-name="ro2">
          <table:table-cell table:number-columns-repeated="18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Calibration Rig</text:p>
          </table:table-cell>
          <table:table-cell table:number-columns-repeated="5"/>
          <table:table-cell table:style-name="ce78" office:value-type="string" calcext:value-type="string">
            <text:p>Bottle Sampler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Calibration Rig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  <table:table-cell table:style-name="ce33"/>
          <table:table-cell table:number-columns-repeated="2"/>
          <table:table-cell table:style-name="ce92" office:value-type="float" office:value="1.507" calcext:value-type="float">
            <text:p>1.5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APC Model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APC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5"/>
          <table:table-cell office:value-type="string" calcext:value-type="string">
            <text:p>APC S/N</text:p>
          </table:table-cell>
          <table:table-cell table:number-columns-repeated="4"/>
          <table:table-cell office:value-type="string" calcext:value-type="string">
            <text:p>APC S/N</text:p>
          </table:table-cell>
          <table:table-cell table:number-columns-repeated="2"/>
          <table:table-cell office:value-type="string" calcext:value-type="string">
            <text:p>11171 00011</text:p>
          </table:table-cell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Sensor Model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Sensor Model</text:p>
          </table:table-cell>
          <table:table-cell table:number-columns-repeated="2"/>
          <table:table-cell table:style-name="ce37" office:value-type="string" calcext:value-type="string">
            <text:p>LPA3-NAVAIR</text:p>
          </table:table-cell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78"/>
          <table:table-cell table:number-columns-repeated="2"/>
          <table:table-cell office:value-type="string" calcext:value-type="string">
            <text:p>Sensor S/N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Sensor S/N</text:p>
          </table:table-cell>
          <table:table-cell table:number-columns-repeated="2"/>
          <table:table-cell office:value-type="string" calcext:value-type="string">
            <text:p>11171 00011</text:p>
          </table:table-cell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96"/>
          <table:table-cell table:number-columns-repeated="2"/>
          <table:table-cell office:value-type="string" calcext:value-type="string">
            <text:p>Date</text:p>
          </table:table-cell>
          <table:table-cell table:number-columns-repeated="2"/>
          <table:table-cell table:style-name="ce46"/>
          <table:table-cell/>
          <table:table-cell office:value-type="string" calcext:value-type="string">
            <text:p>Date</text:p>
          </table:table-cell>
          <table:table-cell table:number-columns-repeated="2"/>
          <table:table-cell table:style-name="ce96" office:value-type="date" office:date-value="2025-05-14" calcext:value-type="date">
            <text:p>2025-05-14</text:p>
          </table:table-cell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46"/>
          <table:table-cell table:number-columns-repeated="2"/>
          <table:table-cell office:value-type="string" calcext:value-type="string">
            <text:p>Operator</text:p>
          </table:table-cell>
          <table:table-cell table:number-columns-repeated="2"/>
          <table:table-cell table:style-name="ce46"/>
          <table:table-cell/>
          <table:table-cell office:value-type="string" calcext:value-type="string">
            <text:p>Operator</text:p>
          </table:table-cell>
          <table:table-cell table:number-columns-repeated="2"/>
          <table:table-cell table:style-name="ce46" office:value-type="string" calcext:value-type="string">
            <text:p>JMD</text:p>
          </table:table-cell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47"/>
          <table:table-cell table:number-columns-repeated="2"/>
          <table:table-cell office:value-type="string" calcext:value-type="string">
            <text:p>Threshold Noise</text:p>
          </table:table-cell>
          <table:table-cell table:number-columns-repeated="2"/>
          <table:table-cell table:style-name="ce47"/>
          <table:table-cell/>
          <table:table-cell office:value-type="string" calcext:value-type="string">
            <text:p>Threshold Noise</text:p>
          </table:table-cell>
          <table:table-cell table:number-columns-repeated="2"/>
          <table:table-cell table:style-name="ce47" office:value-type="float" office:value="38" calcext:value-type="float">
            <text:p>38</text:p>
          </table:table-cell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4"/>
          <table:table-cell table:style-name="ce37"/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4um(c) Coincidence Limit /ml</text:p>
          </table:table-cell>
          <table:table-cell table:number-columns-repeated="2"/>
          <table:table-cell table:style-name="ce37"/>
          <table:table-cell table:number-columns-repeated="5"/>
          <table:table-cell table:style-name="ce37"/>
          <table:table-cell/>
          <table:table-cell office:value-type="string" calcext:value-type="string">
            <text:p>Concentration / ml</text:p>
          </table:table-cell>
          <table:table-cell table:number-columns-repeated="2"/>
          <table:table-cell table:style-name="ce37" office:value-type="float" office:value="2000" calcext:value-type="float">
            <text:p>2000</text:p>
          </table:table-cell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A.1 RM8632 4um count/mg/l</text:p>
          </table:table-cell>
          <table:table-cell table:number-columns-repeated="5"/>
          <table:table-cell office:value-type="string" calcext:value-type="string">
            <text:p>MTD mg/l</text:p>
          </table:table-cell>
          <table:table-cell table:number-columns-repeated="11"/>
          <table:table-cell table:style-name="ce33"/>
          <table:table-cell table:number-columns-repeated="5"/>
        </table:table-row>
        <table:table-row table:style-name="ro2">
          <table:table-cell office:value-type="string" calcext:value-type="string">
            <text:p>RM8632x mg/l at 25% coincidence limit</text:p>
          </table:table-cell>
          <table:table-cell table:number-columns-repeated="2"/>
          <table:table-cell table:style-name="ce57"/>
          <table:table-cell table:number-columns-repeated="5"/>
          <table:table-cell table:style-name="ce57"/>
          <table:table-cell table:number-columns-repeated="4"/>
          <table:table-cell table:style-name="ce57"/>
          <table:table-cell table:number-columns-repeated="3"/>
          <table:table-cell table:style-name="ce33"/>
          <table:table-cell table:number-columns-repeated="5"/>
        </table:table-row>
        <table:table-row table:style-name="ro2">
          <table:table-cell table:number-columns-repeated="18"/>
          <table:table-cell table:style-name="ce33"/>
          <table:table-cell table:number-columns-repeated="5"/>
        </table:table-row>
        <table:table-row table:style-name="ro2">
          <table:table-cell table:number-columns-repeated="9"/>
          <table:table-cell table:style-name="ce78" office:value-type="string" calcext:value-type="string">
            <text:p>10ml samples</text:p>
          </table:table-cell>
          <table:table-cell table:number-columns-repeated="8"/>
          <table:table-cell table:style-name="ce33"/>
          <table:table-cell table:number-columns-repeated="5"/>
        </table:table-row>
        <table:table-row table:style-name="ro2">
          <table:table-cell table:number-columns-repeated="2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4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 table:number-columns-repeated="3"/>
          <table:table-cell table:style-name="ce37" office:value-type="string" calcext:value-type="string">
            <text:p>&gt;4μm(c)/100ml</text:p>
          </table:table-cell>
          <table:table-cell table:style-name="ce37" office:value-type="string" calcext:value-type="string">
            <text:p>Deviation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46"/>
          <table:table-cell table:number-columns-repeated="4"/>
          <table:table-cell table:style-name="ce144"/>
        </table:table-row>
        <table:table-row table:style-name="ro2">
          <table:table-cell table:number-columns-repeated="16"/>
          <table:table-cell office:value-type="string" calcext:value-type="string">
            <text:p>Operator</text:p>
          </table:table-cell>
          <table:table-cell/>
          <table:table-cell table:style-name="ce37" office:value-type="string" calcext:value-type="string">
            <text:p>JM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ortion 1</text:p>
          </table:table-cell>
          <table:table-cell table:style-name="ce38"/>
          <table:table-cell table:style-name="ce44" table:formula="of:=([.C21]-[.$C$27])/[.$C$2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ortion 1</text:p>
          </table:table-cell>
          <table:table-cell table:style-name="ce102"/>
          <table:table-cell table:style-name="ce44" table:formula="of:=([.I21]-[.I$27])/[.I$2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ortion 1</text:p>
          </table:table-cell>
          <table:table-cell table:style-name="Default"/>
          <table:table-cell table:style-name="ce136" table:formula="of:=([.N21]-[.N$27])/[.N$27]" office:value-type="percentage" office:value="-1" calcext:value-type="percentage">
            <text:p>-100.00%</text:p>
          </table:table-cell>
          <table:table-cell/>
          <table:table-cell office:value-type="string" calcext:value-type="string">
            <text:p>Particle Counter</text:p>
          </table:table-cell>
          <table:table-cell/>
          <table:table-cell table:style-name="ce37"/>
          <table:table-cell table:number-columns-repeated="5"/>
        </table:table-row>
        <table:table-row table:style-name="ro2">
          <table:table-cell/>
          <table:table-cell office:value-type="string" calcext:value-type="string">
            <text:p>Portion 2</text:p>
          </table:table-cell>
          <table:table-cell table:style-name="ce40"/>
          <table:table-cell table:style-name="ce44" table:formula="of:=([.C22]-[.$C$27])/[.$C$2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ortion 2</text:p>
          </table:table-cell>
          <table:table-cell table:style-name="ce103"/>
          <table:table-cell table:style-name="ce44" table:formula="of:=([.I22]-[.I$27])/[.I$2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ortion 2</text:p>
          </table:table-cell>
          <table:table-cell table:style-name="Default" office:value-type="float" office:value="197573" calcext:value-type="float">
            <text:p>197573</text:p>
          </table:table-cell>
          <table:table-cell table:style-name="ce136" table:formula="of:=([.N22]-[.N$27])/[.N$27]" office:value-type="percentage" office:value="0.00700437693920068" calcext:value-type="percentage">
            <text:p>0.70%</text:p>
          </table:table-cell>
          <table:table-cell table:number-columns-repeated="3"/>
          <table:table-cell table:style-name="ce37"/>
          <table:table-cell table:number-columns-repeated="5"/>
        </table:table-row>
        <table:table-row table:style-name="ro2">
          <table:table-cell/>
          <table:table-cell office:value-type="string" calcext:value-type="string">
            <text:p>Portion 3</text:p>
          </table:table-cell>
          <table:table-cell table:style-name="ce40"/>
          <table:table-cell table:style-name="ce44" table:formula="of:=([.C23]-[.$C$27])/[.$C$2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ortion 3</text:p>
          </table:table-cell>
          <table:table-cell table:style-name="ce103"/>
          <table:table-cell table:style-name="ce44" table:formula="of:=([.I23]-[.I$27])/[.I$2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ortion 3</text:p>
          </table:table-cell>
          <table:table-cell table:style-name="Default" office:value-type="float" office:value="194705" calcext:value-type="float">
            <text:p>194705</text:p>
          </table:table-cell>
          <table:table-cell table:style-name="ce136" table:formula="of:=([.N23]-[.N$27])/[.N$27]" office:value-type="percentage" office:value="-0.00761345319478335" calcext:value-type="percentage">
            <text:p>-0.76%</text:p>
          </table:table-cell>
          <table:table-cell/>
          <table:table-cell office:value-type="string" calcext:value-type="string">
            <text:p>MIL5606 Fluid</text:p>
          </table:table-cell>
          <table:table-cell/>
          <table:table-cell table:style-name="ce37"/>
          <table:table-cell table:number-columns-repeated="5"/>
        </table:table-row>
        <table:table-row table:style-name="ro2">
          <table:table-cell/>
          <table:table-cell office:value-type="string" calcext:value-type="string">
            <text:p>Portion 4</text:p>
          </table:table-cell>
          <table:table-cell table:style-name="ce40"/>
          <table:table-cell table:style-name="ce44" table:formula="of:=([.C24]-[.$C$27])/[.$C$2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ortion 4</text:p>
          </table:table-cell>
          <table:table-cell table:style-name="ce103"/>
          <table:table-cell table:style-name="ce44" table:formula="of:=([.I24]-[.I$27])/[.I$2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ortion 4</text:p>
          </table:table-cell>
          <table:table-cell table:style-name="Default" office:value-type="float" office:value="195739" calcext:value-type="float">
            <text:p>195739</text:p>
          </table:table-cell>
          <table:table-cell table:style-name="ce136" table:formula="of:=([.N24]-[.N$27])/[.N$27]" office:value-type="percentage" office:value="-0.00234328710045298" calcext:value-type="percentage">
            <text:p>-0.23%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table:style-name="ce37" office:value-type="string" calcext:value-type="string">
            <text:p>40'C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ortion 5</text:p>
          </table:table-cell>
          <table:table-cell table:style-name="ce41"/>
          <table:table-cell table:style-name="ce44" table:formula="of:=([.C25]-[.$C$27])/[.$C$2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ortion 5</text:p>
          </table:table-cell>
          <table:table-cell table:style-name="ce104"/>
          <table:table-cell table:style-name="ce44" table:formula="of:=([.I25]-[.I$27])/[.I$2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ortion 5</text:p>
          </table:table-cell>
          <table:table-cell table:style-name="Default" office:value-type="float" office:value="196778" calcext:value-type="float">
            <text:p>196778</text:p>
          </table:table-cell>
          <table:table-cell table:style-name="ce136" table:formula="of:=([.N25]-[.N$27])/[.N$27]" office:value-type="percentage" office:value="0.00295236335603565" calcext:value-type="percentage">
            <text:p>0.30%</text:p>
          </table:table-cell>
          <table:table-cell/>
          <table:table-cell office:value-type="string" calcext:value-type="string">
            <text:p>10ml Weight</text:p>
          </table:table-cell>
          <table:table-cell/>
          <table:table-cell table:style-name="ce82"/>
          <table:table-cell table:number-columns-repeated="5"/>
        </table:table-row>
        <table:table-row table:style-name="ro2">
          <table:table-cell table:number-columns-repeated="16"/>
          <table:table-cell office:value-type="string" calcext:value-type="string">
            <text:p>After 100ml</text:p>
          </table:table-cell>
          <table:table-cell/>
          <table:table-cell table:style-name="ce8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2" table:formula="of:=AVERAGE([.C21:.C25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style-name="ce42" table:formula="of:=AVERAGE([.I21:.I25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style-name="ce42" table:formula="of:=AVERAGE([.N21:.N25])" office:value-type="float" office:value="196198.75" calcext:value-type="float">
            <text:p>196199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/>
          <table:table-cell table:style-name="ce37"/>
          <table:table-cell office:value-type="string" calcext:value-type="string">
            <text:p>m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mple StdDev</text:p>
          </table:table-cell>
          <table:table-cell table:style-name="ce42" table:formula="of:=STDEVP([.C21:.C25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Sample StdDev</text:p>
          </table:table-cell>
          <table:table-cell table:style-name="ce42" table:formula="of:=STDEVP([.I21:.I25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ample StdDev</text:p>
          </table:table-cell>
          <table:table-cell table:style-name="ce42" table:formula="of:=STDEVP([.N21:.N25])" office:value-type="float" office:value="1080.13341189873" calcext:value-type="float">
            <text:p>1080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/>
          <table:table-cell table:style-name="ce37"/>
          <table:table-cell office:value-type="string" calcext:value-type="string">
            <text:p>ml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2">
            <draw:frame draw:z-index="0" draw:name="Image 3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42"/>
          <table:table-cell table:number-columns-repeated="4"/>
          <table:table-cell table:style-name="ce42">
            <draw:frame draw:z-index="2" draw:name="Image 1" draw:style-name="gr1" draw:text-style-name="P1" svg:width="4.44cm" svg:height="1.664cm" svg:x="0cm" svg:y="0.27cm">
              <draw:image xlink:href="Pictures/10000001000001B0000000A2370564D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Total Fluid</text:p>
          </table:table-cell>
          <table:table-cell/>
          <table:table-cell table:style-name="ce37" table:formula="of:=[.S27]+[.S28]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number-columns-repeated="4"/>
        </table:table-row>
        <table:table-row table:style-name="ro6">
          <table:table-cell table:number-columns-repeated="16"/>
          <table:table-cell office:value-type="string" calcext:value-type="string">
            <text:p>Final Weight</text:p>
          </table:table-cell>
          <table:table-cell/>
          <table:table-cell table:style-name="ce82"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4"/>
          <table:table-cell table:style-name="ce44"/>
          <table:table-cell table:number-columns-repeated="2"/>
          <table:table-cell office:value-type="string" calcext:value-type="string">
            <text:p>Fluid Weight Taken</text:p>
          </table:table-cell>
          <table:table-cell/>
          <table:table-cell table:style-name="ce82" table:formula="of:=[.S26]-[.S30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80" office:value-type="string" calcext:value-type="string">
            <text:p>ml taken</text:p>
          </table:table-cell>
          <table:table-cell table:style-name="ce81"/>
          <table:table-cell table:style-name="ce83" table:formula="of:=[.S31]/[.S25]*10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 table:number-columns-repeated="18"/>
          <table:table-cell table:style-name="ce37"/>
          <table:table-cell table:number-columns-repeated="5"/>
        </table:table-row>
        <table:table-row table:style-name="ro2">
          <table:table-cell table:number-columns-repeated="16"/>
          <table:table-cell office:value-type="string" calcext:value-type="string">
            <text:p>Error</text:p>
          </table:table-cell>
          <table:table-cell/>
          <table:table-cell table:style-name="ce84" table:formula="of:=[.S32]/[.S29]-1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V<text:span text:style-name="T6">VOL</text:span></text:p>
          </table:table-cell>
          <table:table-cell table:style-name="ce45" table:formula="of:=[.C28]/[.C27]" office:value-type="string" office:string-value="" calcext:value-type="error">
            <text:p>#DIV/0!</text:p>
          </table:table-cell>
          <table:table-cell table:style-name="ce77" table:formula="of:=IF([.C35]&lt;0.03;&quot;&lt;3% = PASS&quot;;&quot;&gt;3% = FAIL&quot;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CV<text:span text:style-name="T6">VOL</text:span></text:p>
          </table:table-cell>
          <table:table-cell table:style-name="ce44" table:formula="of:=[.I28]/[.I27]" office:value-type="string" office:string-value="" calcext:value-type="error">
            <text:p>#DIV/0!</text:p>
          </table:table-cell>
          <table:table-cell table:style-name="ce79" table:formula="of:=IF([.I35]&lt;0.03;&quot;&lt;3% = PASS&quot;;&quot;&gt;3% = FAIL&quot;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V<text:span text:style-name="T6">VOL</text:span></text:p>
          </table:table-cell>
          <table:table-cell table:style-name="ce45" table:formula="of:=[.N28]/[.N27]" office:value-type="percentage" office:value="0.00550530220961517" calcext:value-type="percentage">
            <text:p>0.55%</text:p>
          </table:table-cell>
          <table:table-cell table:style-name="ce77" table:formula="of:=IF([.N35]&lt;0.03;&quot;&lt;3% = PASS&quot;;&quot;&gt;3% = FAIL&quot;)" office:value-type="string" office:string-value="&lt;3% = PASS" calcext:value-type="string">
            <text:p>&lt;3% = PASS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1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37" office:value-type="string" calcext:value-type="string">
            <text:p>&gt;4μm(c)/100ml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1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102"/>
          <table:table-cell table:style-name="ce44" table:formula="of:=([.I40]-[.I$27])/[.I$27]" office:value-type="string" office:string-value="" calcext:value-type="error">
            <text:p>#DIV/0!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103"/>
          <table:table-cell table:style-name="ce44" table:formula="of:=([.I41]-[.I$27])/[.I$27]" office:value-type="string" office:string-value="" calcext:value-type="error">
            <text:p>#DIV/0!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103"/>
          <table:table-cell table:style-name="ce44" table:formula="of:=([.I42]-[.I$27])/[.I$27]" office:value-type="string" office:string-value="" calcext:value-type="error">
            <text:p>#DIV/0!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103"/>
          <table:table-cell table:style-name="ce44" table:formula="of:=([.I43]-[.I$27])/[.I$27]" office:value-type="string" office:string-value="" calcext:value-type="error">
            <text:p>#DIV/0!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104"/>
          <table:table-cell table:style-name="ce44" table:formula="of:=([.I44]-[.I$27])/[.I$27]" office:value-type="string" office:string-value="" calcext:value-type="error">
            <text:p>#DIV/0!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1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42" table:formula="of:=AVERAGE([.I40:.I44])" office:value-type="string" office:string-value="" calcext:value-type="error">
            <text:p>#DIV/0!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42" table:formula="of:=STDEVP([.I40:.I44])" office:value-type="string" office:string-value="" calcext:value-type="error">
            <text:p>#DIV/0!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42"/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1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44"/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 table:number-rows-repeated="3">
          <table:table-cell table:number-columns-repeated="1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8"/>
          <table:table-cell table:style-name="ce44" table:formula="of:=[.I47]/[.I46]" office:value-type="string" office:string-value="" calcext:value-type="error">
            <text:p>#DIV/0!</text:p>
          </table:table-cell>
          <table:table-cell table:style-name="ce79" table:formula="of:=IF([.I54]&lt;0.03;&quot;&lt;3% = PASS&quot;;&quot;&gt;3% = FAIL&quot;)" office:value-type="string" office:string-value="" calcext:value-type="error">
            <text:p>#DIV/0!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calcext:conditional-formats>
          <calcext:conditional-format calcext:target-range-address="'Annex A Preliminary Check'.D35:'Annex A Preliminary Check'.D35 'Annex A Preliminary Check'.J35:'Annex A Preliminary Check'.J35 'Annex A Preliminary Check'.J54:'Annex A Preliminary Check'.J54 'Annex A Preliminary Check'.O35:'Annex A Preliminary Check'.O35">
            <calcext:condition calcext:apply-style-name="Good" calcext:value="=&quot;&lt;3% = PASS&quot;" calcext:base-cell-address="'Annex A Preliminary Check'.D35"/>
            <calcext:condition calcext:apply-style-name="Bad" calcext:value="!=&quot;&lt;3% = PASS&quot;" calcext:base-cell-address="'Annex A Preliminary Check'.D35"/>
          </calcext:conditional-format>
          <calcext:conditional-format calcext:target-range-address="'Annex A Preliminary Check'.C35:'Annex A Preliminary Check'.C35 'Annex A Preliminary Check'.J35:'Annex A Preliminary Check'.J35 'Annex A Preliminary Check'.J54:'Annex A Preliminary Check'.J54 'Annex A Preliminary Check'.N35:'Annex A Preliminary Check'.N35">
            <calcext:condition calcext:apply-style-name="Good" calcext:value="&lt;0.03" calcext:base-cell-address="'Annex A Preliminary Check'.C35"/>
            <calcext:condition calcext:apply-style-name="Bad" calcext:value="&gt;=0.03" calcext:base-cell-address="'Annex A Preliminary Check'.C35"/>
          </calcext:conditional-format>
        </calcext:conditional-formats>
      </table:table>
      <table:table table:name="Annex B Coincidence Limit" table:style-name="ta1">
        <table:shapes>
          <draw:frame draw:z-index="0" draw:style-name="gr3" draw:text-style-name="P1" svg:width="23.951cm" svg:height="15.239cm" svg:x="0.186cm" svg:y="18.129cm">
            <draw:object draw:notify-on-update-of-ranges="'Annex B Coincidence Limit'.E22:'Annex B Coincidence Limit'.E37 'Annex B Coincidence Limit'.G22:'Annex B Coincidence Limit'.G37 'Annex B Coincidence Limit'.E22:'Annex B Coincidence Limit'.E37 'Annex B Coincidence Limit'.L21:'Annex B Coincidence Limit'.L21 'Annex B Coincidence Limit'.L22:'Annex B Coincidence Limit'.L37 'Annex B Coincidence Limit'.E22:'Annex B Coincidence Limit'.E37 'Annex B Coincidence Limit'.K21:'Annex B Coincidence Limit'.K21 'Annex B Coincidence Limit'.K22:'Annex B Coincidence Limit'.K37 'Annex B Coincidence Limit'.E22:'Annex B Coincidence Limit'.E37 'Annex B Coincidence Limit'.I21:'Annex B Coincidence Limit'.I21 'Annex B Coincidence Limit'.I22:'Annex B Coincidence Limit'.I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1" svg:width="20.348cm" svg:height="15.238cm" svg:x="24.798cm" svg:y="18.113cm">
            <draw:object draw:notify-on-update-of-ranges="'Annex B Coincidence Limit'.L22:'Annex B Coincidence Limit'.L37 'Annex B Coincidence Limit'.M22:'Annex B Coincidence Limit'.M22 'Annex B Coincidence Limit'.L22:'Annex B Coincidence Limit'.L37 'Annex B Coincidence Limit'.M22:'Annex B Coincidence Limit'.M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Text Frame 1" draw:style-name="gr4" draw:text-style-name="P3" svg:width="19.604cm" svg:height="10.409cm" svg:x="31.597cm" svg:y="7.34cm">
            <draw:text-box>
              <text:p>Procedure</text:p>
              <text:p/>
              <text:p>Make up concentrated suspension of RM8632a such that about 10ml or concentrate increases the tank contamination level by 10% of the estimated coincidence limit. Use the calculator in this worksheet to establish and record mass of dust and fluid volumes.</text:p>
              <text:p/>
              <text:p>Each time another dose is added, start a single online test with 2m flush and 6x 10ml portions. Discard the first portion of each test.</text:p>
              <text:p/>
              <text:p>The results are then imported into this spreadsheet and the portions averaged for each dose level.</text:p>
              <text:p/>
              <text:p>The averages are entered into the table as well as the added ml of concentrate for each dose.</text:p>
              <text:p/>
              <text:p>The counts are plotted in the figure and the first 4 results (10,20,30,40% nominal coincidence limit) used to generate a linear regression line.</text:p>
              <text:p/>
              <text:p>ENSURE UNIT REMAINS ONLINE SO RESULTS ARE LOGGED</text:p>
              <text:p/>
            </draw:text-box>
          </draw:frame>
        </table:shapes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ce20"/>
        <table:table-column table:style-name="co4" table:default-cell-style-name="ce233"/>
        <table:table-column table:style-name="co4" table:number-columns-repeated="16354" table:default-cell-style-name="Default"/>
        <table:table-row table:style-name="ro7">
          <table:table-cell table:style-name="ce108" office:value-type="string" calcext:value-type="string">
            <text:p>Δ<text:span text:style-name="T2">COUNTS_4um</text:span> &lt; 5%</text:p>
          </table:table-cell>
          <table:table-cell table:style-name="ce130" office:value-type="string" calcext:value-type="string">
            <text:p>RM8632x</text:p>
          </table:table-cell>
          <table:table-cell table:style-name="ce108" office:value-type="string" calcext:value-type="string" table:number-columns-spanned="10" table:number-rows-spanned="1">
            <text:p>Annex B – Coincidence error limit</text:p>
            <text:p>Analyse <text:span text:style-name="T5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30"/>
          <table:table-cell table:style-name="ce68"/>
          <table:table-cell table:style-name="ce149" office:value-type="string" calcext:value-type="string">
            <text:p>NAVAIR</text:p>
          </table:table-cell>
          <table:table-cell/>
          <table:table-cell table:style-name="ce68"/>
          <table:table-cell table:number-columns-repeated="12"/>
          <table:table-cell table:style-name="Default" table:number-columns-repeated="2"/>
          <table:table-cell table:number-columns-repeated="114"/>
          <table:table-cell table:style-name="ce68" table:number-columns-repeated="865"/>
          <table:table-cell table:number-columns-repeated="15375"/>
        </table:table-row>
        <table:table-row table:style-name="ro2">
          <table:table-cell table:style-name="ce146" office:value-type="date" office:date-value="2025-05-09" calcext:value-type="date">
            <text:p>2025-05-09</text:p>
          </table:table-cell>
          <table:table-cell table:number-columns-repeated="27"/>
          <table:table-cell table:style-name="Default" table:number-columns-repeated="2"/>
          <table:table-cell table:number-columns-repeated="16354"/>
        </table:table-row>
        <table:table-row table:style-name="ro2">
          <table:table-cell table:number-columns-repeated="13"/>
          <table:table-cell table:style-name="ce115" office:value-type="string" calcext:value-type="string">
            <text:p>APC Model</text:p>
          </table:table-cell>
          <table:table-cell table:style-name="ce117" table:number-columns-repeated="2"/>
          <table:table-cell table:style-name="ce166" office:value-type="string" calcext:value-type="string">
            <text:p>LPA3-NAVAIR</text:p>
          </table:table-cell>
          <table:table-cell table:number-columns-repeated="10"/>
          <table:table-cell table:style-name="ce92" office:value-type="string" calcext:value-type="string">
            <text:p>portion</text:p>
          </table:table-cell>
          <table:table-cell table:style-name="ce92"/>
          <table:table-cell table:style-name="Default"/>
          <table:table-cell table:number-columns-repeated="16354"/>
        </table:table-row>
        <table:table-row table:style-name="ro2">
          <table:table-cell table:number-columns-repeated="13"/>
          <table:table-cell table:style-name="ce162" office:value-type="string" calcext:value-type="string">
            <text:p>APC S/N</text:p>
          </table:table-cell>
          <table:table-cell table:number-columns-repeated="2"/>
          <table:table-cell table:style-name="ce119" office:value-type="string" calcext:value-type="string">
            <text:p>11171-00011</text:p>
          </table:table-cell>
          <table:table-cell table:number-columns-repeated="9"/>
          <table:table-cell office:value-type="string" calcext:value-type="string">
            <text:p>D<text:span text:style-name="T6">Q</text:span></text:p>
          </table:table-cell>
          <table:table-cell table:style-name="ce92" office:value-type="string" calcext:value-type="string">
            <text:p>counts</text:p>
          </table:table-cell>
          <table:table-cell table:style-name="ce92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table:number-columns-repeated="16354"/>
        </table:table-row>
        <table:table-row table:style-name="ro2">
          <table:table-cell table:number-columns-repeated="13"/>
          <table:table-cell table:style-name="ce162" office:value-type="string" calcext:value-type="string">
            <text:p>Sensor S/N</text:p>
          </table:table-cell>
          <table:table-cell table:number-columns-repeated="2"/>
          <table:table-cell table:style-name="ce119" office:value-type="string" calcext:value-type="string">
            <text:p>11171-00011</text:p>
          </table:table-cell>
          <table:table-cell table:number-columns-repeated="10"/>
          <table:table-cell office:value-type="float" office:value="167569" calcext:value-type="float">
            <text:p>167569</text:p>
          </table:table-cell>
          <table:table-cell table:style-name="ce68"/>
          <table:table-cell table:style-name="Default"/>
          <table:table-cell table:number-columns-repeated="16354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RM8632a 4μm particles</text:p>
          </table:table-cell>
          <table:table-cell table:number-columns-repeated="5"/>
          <table:table-cell office:value-type="float" office:value="60000" calcext:value-type="float">
            <text:p>60000</text:p>
          </table:table-cell>
          <table:table-cell table:number-columns-repeated="4"/>
          <table:table-cell table:style-name="ce162" office:value-type="string" calcext:value-type="string">
            <text:p>Date</text:p>
          </table:table-cell>
          <table:table-cell table:number-columns-repeated="2"/>
          <table:table-cell table:style-name="ce168" office:value-type="date" office:date-value="2025-05-14" calcext:value-type="date">
            <text:p>2025-05-14</text:p>
          </table:table-cell>
          <table:table-cell table:number-columns-repeated="10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16354"/>
        </table:table-row>
        <table:table-row table:style-name="ro2">
          <table:table-cell office:value-type="float" office:value="11.68" calcext:value-type="float">
            <text:p>11.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0"/>
          <table:table-cell table:style-name="ce162" office:value-type="string" calcext:value-type="string">
            <text:p>Operator</text:p>
          </table:table-cell>
          <table:table-cell table:number-columns-repeated="2"/>
          <table:table-cell table:style-name="ce169" office:value-type="string" calcext:value-type="string">
            <text:p>JMD</text:p>
          </table:table-cell>
          <table:table-cell table:number-columns-repeated="10"/>
          <table:table-cell office:value-type="float" office:value="169243" calcext:value-type="float">
            <text:p>169243</text:p>
          </table:table-cell>
          <table:table-cell table:formula="of:=SUM([.AB5:.AB7])/3" office:value-type="float" office:value="168739.666666667" calcext:value-type="float">
            <text:p>168740</text:p>
          </table:table-cell>
          <table:table-cell table:formula="of:=(MAX([.AB5:.AB6])-MIN([.AB5:.AB6]))/[.AC7]*100" office:value-type="float" office:value="1.0892518850537" calcext:value-type="float">
            <text:p>1.1</text:p>
          </table:table-cell>
          <table:table-cell table:number-columns-repeated="16354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0"/>
          <table:table-cell table:style-name="ce162" office:value-type="string" calcext:value-type="string">
            <text:p>Threshold Noise</text:p>
          </table:table-cell>
          <table:table-cell table:number-columns-repeated="2"/>
          <table:table-cell table:style-name="ce170" office:value-type="float" office:value="38" calcext:value-type="float">
            <text:p>38</text:p>
          </table:table-cell>
          <table:table-cell table:number-columns-repeated="10"/>
          <table:table-cell office:value-type="float" office:value="292859" calcext:value-type="float">
            <text:p>292859</text:p>
          </table:table-cell>
          <table:table-cell table:number-columns-repeated="16356"/>
        </table:table-row>
        <table:table-row table:style-name="ro2">
          <table:table-cell table:formula="of:=[.A8]/10" office:value-type="float" office:value="2000" calcext:value-type="float">
            <text:p>2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0"/>
          <table:table-cell table:style-name="ce162"/>
          <table:table-cell table:number-columns-repeated="2"/>
          <table:table-cell table:style-name="ce171"/>
          <table:table-cell table:number-columns-repeated="10"/>
          <table:table-cell office:value-type="float" office:value="301110" calcext:value-type="float">
            <text:p>301110</text:p>
          </table:table-cell>
          <table:table-cell table:number-columns-repeated="16356"/>
        </table:table-row>
        <table:table-row table:style-name="ro2">
          <table:table-cell table:style-name="ce32" table:formula="of:=[.A9]/[.A6]*[.A7]" office:value-type="float" office:value="3.70793650793651" calcext:value-type="float">
            <text:p>3.70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tank per 10% estimated coincidence limit</text:p>
          </table:table-cell>
          <table:table-cell table:number-columns-repeated="10"/>
          <table:table-cell table:style-name="ce163" office:value-type="string" calcext:value-type="string">
            <text:p>Coincidence Correction</text:p>
          </table:table-cell>
          <table:table-cell table:style-name="ce94" table:number-columns-repeated="2"/>
          <table:table-cell table:style-name="ce172" office:value-type="string" calcext:value-type="string">
            <text:p>ENABLED</text:p>
          </table:table-cell>
          <table:table-cell table:number-columns-repeated="10"/>
          <table:table-cell office:value-type="float" office:value="299624" calcext:value-type="float">
            <text:p>299624</text:p>
          </table:table-cell>
          <table:table-cell table:number-columns-repeated="16356"/>
        </table:table-row>
        <table:table-row table:style-name="ro2">
          <table:table-cell table:style-name="ce53" table:formula="of:=[.A10]*100" office:value-type="float" office:value="370.793650793651" calcext:value-type="float">
            <text:p>370.79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4"/>
          <table:table-cell office:value-type="float" office:value="285382" calcext:value-type="float">
            <text:p>285382</text:p>
          </table:table-cell>
          <table:table-cell table:formula="of:=SUM([.AB8:.AB11])/4" office:value-type="float" office:value="294743.75" calcext:value-type="float">
            <text:p>294744</text:p>
          </table:table-cell>
          <table:table-cell table:formula="of:=(MAX([.AB8:.AB10])-MIN([.AB8:.AB10]))/[.AC11]*100" office:value-type="float" office:value="2.7993808180835" calcext:value-type="float">
            <text:p>2.8</text:p>
          </table:table-cell>
          <table:table-cell table:number-columns-repeated="1635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4"/>
          <table:table-cell office:value-type="float" office:value="458207" calcext:value-type="float">
            <text:p>458207</text:p>
          </table:table-cell>
          <table:table-cell table:number-columns-repeated="16356"/>
        </table:table-row>
        <table:table-row table:style-name="ro2">
          <table:table-cell table:style-name="ce126" table:formula="of:=[.A11]*[.A12]/1000" office:value-type="float" office:value="74.1587301587302" calcext:value-type="float">
            <text:p>74.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RM8632a to add to fluid used to make up concentrate.</text:p>
          </table:table-cell>
          <table:table-cell table:number-columns-repeated="24"/>
          <table:table-cell office:value-type="float" office:value="465138" calcext:value-type="float">
            <text:p>465138</text:p>
          </table:table-cell>
          <table:table-cell table:number-columns-repeated="16356"/>
        </table:table-row>
        <table:table-row table:style-name="ro2">
          <table:table-cell office:value-type="float" office:value="74.66" calcext:value-type="float">
            <text:p>74.6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4"/>
          <table:table-cell office:value-type="float" office:value="454200" calcext:value-type="float">
            <text:p>454200</text:p>
          </table:table-cell>
          <table:table-cell table:number-columns-repeated="16356"/>
        </table:table-row>
        <table:table-row table:style-name="ro2">
          <table:table-cell table:style-name="ce53" table:formula="of:=[.A11]*[.A14]/[.A13]" office:value-type="float" office:value="373.3" calcext:value-type="float">
            <text:p>373.3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4"/>
          <table:table-cell office:value-type="float" office:value="445750" calcext:value-type="float">
            <text:p>445750</text:p>
          </table:table-cell>
          <table:table-cell table:number-columns-repeated="16356"/>
        </table:table-row>
        <table:table-row table:style-name="ro2">
          <table:table-cell table:style-name="ce53" table:formula="of:=[.A13]/[.A14]*10" office:value-type="float" office:value="9.93285965158454" calcext:value-type="float">
            <text:p>9.9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4"/>
          <table:table-cell office:value-type="float" office:value="443747" calcext:value-type="float">
            <text:p>443747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453143" calcext:value-type="float">
            <text:p>453143</text:p>
          </table:table-cell>
          <table:table-cell table:number-columns-repeated="16356"/>
        </table:table-row>
        <table:table-row table:style-name="ro2">
          <table:table-cell table:style-name="ce127" office:value-type="float" office:value="1000000000" calcext:value-type="float">
            <text:p>1.00E+09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24"/>
          <table:table-cell office:value-type="float" office:value="436276" calcext:value-type="float">
            <text:p>436276</text:p>
          </table:table-cell>
          <table:table-cell table:number-columns-repeated="16356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24"/>
          <table:table-cell office:value-type="float" office:value="454474" calcext:value-type="float">
            <text:p>454474</text:p>
          </table:table-cell>
          <table:table-cell table:number-columns-repeated="16356"/>
        </table:table-row>
        <table:table-row table:style-name="ro2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48" office:value-type="string" calcext:value-type="string">
            <text:p>Expected</text:p>
          </table:table-cell>
          <table:table-cell table:style-name="ce48" office:value-type="string" calcext:value-type="string">
            <text:p>4μm</text:p>
          </table:table-cell>
          <table:table-cell table:style-name="ce48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48" office:value-type="string" calcext:value-type="string">
            <text:p>Relative</text:p>
          </table:table-cell>
          <table:table-cell table:style-name="ce48" table:number-columns-repeated="2"/>
          <table:table-cell table:style-name="ce48" office:value-type="string" calcext:value-type="string">
            <text:p>corrected</text:p>
          </table:table-cell>
          <table:table-cell table:number-columns-repeated="14"/>
          <table:table-cell office:value-type="float" office:value="454993" calcext:value-type="float">
            <text:p>454993</text:p>
          </table:table-cell>
          <table:table-cell table:number-columns-repeated="16356"/>
        </table:table-row>
        <table:table-row table:style-name="ro2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49" office:value-type="string" calcext:value-type="string">
            <text:p>4μm/100ml</text:p>
          </table:table-cell>
          <table:table-cell table:style-name="ce49" office:value-type="string" calcext:value-type="string">
            <text:p>Actual</text:p>
          </table:table-cell>
          <table:table-cell table:style-name="ce49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4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rrected</text:p>
          </table:table-cell>
          <table:table-cell table:style-name="ce49" office:value-type="string" calcext:value-type="string">
            <text:p>fraction</text:p>
          </table:table-cell>
          <table:table-cell table:number-columns-repeated="14"/>
          <table:table-cell office:value-type="float" office:value="462615" calcext:value-type="float">
            <text:p>462615</text:p>
          </table:table-cell>
          <table:table-cell table:formula="of:=SUM([.AB12:.AB21])/(17-8+1)" office:value-type="float" office:value="452854.3" calcext:value-type="float">
            <text:p>452854</text:p>
          </table:table-cell>
          <table:table-cell table:formula="of:=(MAX([.AB12:.AB20])-MIN([.AB12:.AB20]))/[.AC21]*100" office:value-type="float" office:value="6.37335231221168" calcext:value-type="float">
            <text:p>6.4</text:p>
          </table:table-cell>
          <table:table-cell table:number-columns-repeated="16354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/>
          <table:table-cell table:number-columns-repeated="2" table:style-name="ce5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4"/>
          <table:table-cell office:value-type="float" office:value="578672" calcext:value-type="float">
            <text:p>578672</text:p>
          </table:table-cell>
          <table:table-cell table:number-columns-repeated="16356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B23]" office:value-type="float" office:value="9.9" calcext:value-type="float">
            <text:p>9.9</text:p>
          </table:table-cell>
          <table:table-cell table:style-name="ce61" table:formula="of:=[.C23]*[.$A$15]/1000" office:value-type="float" office:value="3.69567" calcext:value-type="float">
            <text:p>3.696</text:p>
          </table:table-cell>
          <table:table-cell table:style-name="ce61" table:formula="of:=[.D23]/([.$A$7]+[.C23]/1000)" office:value-type="float" office:value="0.316142139795892" calcext:value-type="float">
            <text:p>0.316</text:p>
          </table:table-cell>
          <table:table-cell table:style-name="ce64" table:formula="of:=[.$A$6]*[.E23]*100" office:value-type="float" office:value="199169.548071412" calcext:value-type="float">
            <text:p>199170</text:p>
          </table:table-cell>
          <table:table-cell table:style-name="ce50" office:value-type="float" office:value="158573" calcext:value-type="float">
            <text:p>158573</text:p>
          </table:table-cell>
          <table:table-cell table:style-name="ce67" table:formula="of:=[.G23]/[.F23]" office:value-type="float" office:value="0.796170908331548" calcext:value-type="float">
            <text:p>0.80</text:p>
          </table:table-cell>
          <table:table-cell table:style-name="ce64" table:formula="of:=[.E23]*[.$C$99]" office:value-type="float" office:value="156479.435527948" calcext:value-type="float">
            <text:p>156479</text:p>
          </table:table-cell>
          <table:table-cell table:style-name="ce67" table:formula="of:=[.G23]/[.I23]" office:value-type="float" office:value="1.01337916682143" calcext:value-type="float">
            <text:p>1.01</text:p>
          </table:table-cell>
          <table:table-cell table:style-name="ce64" table:formula="of:=[.I23]*0.95" office:value-type="float" office:value="148655.46375155" calcext:value-type="float">
            <text:p>148655</text:p>
          </table:table-cell>
          <table:table-cell table:style-name="ce72" table:formula="of:=IF([.G23]&lt;[.$A$18]; [.G23]; [.G23]*(1+[.G23]/[.$A$18]*[.$A$19]))" office:value-type="float" office:value="158573" calcext:value-type="float">
            <text:p>158573</text:p>
          </table:table-cell>
          <table:table-cell table:style-name="ce74" table:formula="of:=[.L23]/[.I23]" office:value-type="float" office:value="1.01337916682143" calcext:value-type="float">
            <text:p>1.01337916682143</text:p>
          </table:table-cell>
          <table:table-cell table:number-columns-repeated="14"/>
          <table:table-cell office:value-type="float" office:value="581090" calcext:value-type="float">
            <text:p>581090</text:p>
          </table:table-cell>
          <table:table-cell table:number-columns-repeated="16356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3]+[.B24]" office:value-type="float" office:value="19.8" calcext:value-type="float">
            <text:p>19.8</text:p>
          </table:table-cell>
          <table:table-cell table:style-name="ce61" table:formula="of:=[.C24]*[.$A$15]/1000" office:value-type="float" office:value="7.39134" calcext:value-type="float">
            <text:p>7.391</text:p>
          </table:table-cell>
          <table:table-cell table:style-name="ce61" table:formula="of:=[.D24]/([.$A$7]+[.C24]/1000)" office:value-type="float" office:value="0.631749260671123" calcext:value-type="float">
            <text:p>0.632</text:p>
          </table:table-cell>
          <table:table-cell table:style-name="ce64" table:formula="of:=[.$A$6]*[.E24]*100" office:value-type="float" office:value="398002.034222807" calcext:value-type="float">
            <text:p>398002</text:p>
          </table:table-cell>
          <table:table-cell table:style-name="ce50" office:value-type="float" office:value="315866" calcext:value-type="float">
            <text:p>315866</text:p>
          </table:table-cell>
          <table:table-cell table:style-name="ce67" table:formula="of:=[.G24]/[.F24]" office:value-type="float" office:value="0.793629109501419" calcext:value-type="float">
            <text:p>0.79</text:p>
          </table:table-cell>
          <table:table-cell table:style-name="ce64" table:formula="of:=[.E24]*[.$C$99]" office:value-type="float" office:value="312694.055176697" calcext:value-type="float">
            <text:p>312694</text:p>
          </table:table-cell>
          <table:table-cell table:style-name="ce67" table:formula="of:=[.G24]/[.I24]" office:value-type="float" office:value="1.0101439242953" calcext:value-type="float">
            <text:p>1.01</text:p>
          </table:table-cell>
          <table:table-cell table:style-name="ce64" table:formula="of:=[.I24]*0.95" office:value-type="float" office:value="297059.352417862" calcext:value-type="float">
            <text:p>297059</text:p>
          </table:table-cell>
          <table:table-cell table:style-name="ce72" table:formula="of:=IF([.G24]&lt;[.$A$18]; [.G24]; [.G24]*(1+[.G24]/[.$A$18]*[.$A$19]))" office:value-type="float" office:value="315866" calcext:value-type="float">
            <text:p>315866</text:p>
          </table:table-cell>
          <table:table-cell table:style-name="ce74" table:formula="of:=[.L24]/[.I24]" office:value-type="float" office:value="1.0101439242953" calcext:value-type="float">
            <text:p>1.0101439242953</text:p>
          </table:table-cell>
          <table:table-cell table:number-columns-repeated="14"/>
          <table:table-cell office:value-type="float" office:value="592101" calcext:value-type="float">
            <text:p>592101</text:p>
          </table:table-cell>
          <table:table-cell table:number-columns-repeated="16356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4]+[.B25]" office:value-type="float" office:value="29.7" calcext:value-type="float">
            <text:p>29.7</text:p>
          </table:table-cell>
          <table:table-cell table:style-name="ce61" table:formula="of:=[.C25]*[.$A$15]/1000" office:value-type="float" office:value="11.08701" calcext:value-type="float">
            <text:p>11.087</text:p>
          </table:table-cell>
          <table:table-cell table:style-name="ce61" table:formula="of:=[.D25]/([.$A$7]+[.C25]/1000)" office:value-type="float" office:value="0.94682271962561" calcext:value-type="float">
            <text:p>0.947</text:p>
          </table:table-cell>
          <table:table-cell table:style-name="ce64" table:formula="of:=[.$A$6]*[.E25]*100" office:value-type="float" office:value="596498.313364134" calcext:value-type="float">
            <text:p>596498</text:p>
          </table:table-cell>
          <table:table-cell table:style-name="ce50" office:value-type="float" office:value="471092" calcext:value-type="float">
            <text:p>471092</text:p>
          </table:table-cell>
          <table:table-cell table:style-name="ce67" table:formula="of:=[.G25]/[.F25]" office:value-type="float" office:value="0.789762501327344" calcext:value-type="float">
            <text:p>0.79</text:p>
          </table:table-cell>
          <table:table-cell table:style-name="ce64" table:formula="of:=[.E25]*[.$C$99]" office:value-type="float" office:value="468644.530614318" calcext:value-type="float">
            <text:p>468645</text:p>
          </table:table-cell>
          <table:table-cell table:style-name="ce67" table:formula="of:=[.G25]/[.I25]" office:value-type="float" office:value="1.00522244307956" calcext:value-type="float">
            <text:p>1.01</text:p>
          </table:table-cell>
          <table:table-cell table:style-name="ce64" table:formula="of:=[.I25]*0.95" office:value-type="float" office:value="445212.304083602" calcext:value-type="float">
            <text:p>445212</text:p>
          </table:table-cell>
          <table:table-cell table:style-name="ce72" table:formula="of:=IF([.G25]&lt;[.$A$18]; [.G25]; [.G25]*(1+[.G25]/[.$A$18]*[.$A$19]))" office:value-type="float" office:value="471092" calcext:value-type="float">
            <text:p>471092</text:p>
          </table:table-cell>
          <table:table-cell table:style-name="ce74" table:formula="of:=[.L25]/[.I25]" office:value-type="float" office:value="1.00522244307956" calcext:value-type="float">
            <text:p>1.00522244307956</text:p>
          </table:table-cell>
          <table:table-cell table:number-columns-repeated="14"/>
          <table:table-cell office:value-type="float" office:value="600145" calcext:value-type="float">
            <text:p>600145</text:p>
          </table:table-cell>
          <table:table-cell table:number-columns-repeated="16356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5]+[.B26]" office:value-type="float" office:value="39.6" calcext:value-type="float">
            <text:p>39.6</text:p>
          </table:table-cell>
          <table:table-cell table:style-name="ce61" table:formula="of:=[.C26]*[.$A$15]/1000" office:value-type="float" office:value="14.78268" calcext:value-type="float">
            <text:p>14.783</text:p>
          </table:table-cell>
          <table:table-cell table:style-name="ce61" table:formula="of:=[.D26]/([.$A$7]+[.C26]/1000)" office:value-type="float" office:value="1.26136386907403" calcext:value-type="float">
            <text:p>1.261</text:p>
          </table:table-cell>
          <table:table-cell table:style-name="ce64" table:formula="of:=[.$A$6]*[.E26]*100" office:value-type="float" office:value="794659.237516639" calcext:value-type="float">
            <text:p>794659</text:p>
          </table:table-cell>
          <table:table-cell table:style-name="ce50" office:value-type="float" office:value="620381" calcext:value-type="float">
            <text:p>620381</text:p>
          </table:table-cell>
          <table:table-cell table:style-name="ce67" table:formula="of:=[.G26]/[.F26]" office:value-type="float" office:value="0.780688087058209" calcext:value-type="float">
            <text:p>0.78</text:p>
          </table:table-cell>
          <table:table-cell table:style-name="ce64" table:formula="of:=[.E26]*[.$C$99]" office:value-type="float" office:value="624331.531239346" calcext:value-type="float">
            <text:p>624332</text:p>
          </table:table-cell>
          <table:table-cell table:style-name="ce67" table:formula="of:=[.G26]/[.I26]" office:value-type="float" office:value="0.993672382313443" calcext:value-type="float">
            <text:p>0.99</text:p>
          </table:table-cell>
          <table:table-cell table:style-name="ce64" table:formula="of:=[.I26]*0.95" office:value-type="float" office:value="593114.954677378" calcext:value-type="float">
            <text:p>593115</text:p>
          </table:table-cell>
          <table:table-cell table:style-name="ce72" table:formula="of:=IF([.G26]&lt;[.$A$18]; [.G26]; [.G26]*(1+[.G26]/[.$A$18]*[.$A$19]))" office:value-type="float" office:value="620381" calcext:value-type="float">
            <text:p>620381</text:p>
          </table:table-cell>
          <table:table-cell table:style-name="ce74" table:formula="of:=[.L26]/[.I26]" office:value-type="float" office:value="0.993672382313443" calcext:value-type="float">
            <text:p>0.993672382313443</text:p>
          </table:table-cell>
          <table:table-cell table:number-columns-repeated="2"/>
          <table:table-cell table:style-name="ce92" table:number-columns-repeated="2"/>
          <table:table-cell table:number-columns-repeated="10"/>
          <table:table-cell office:value-type="float" office:value="599839" calcext:value-type="float">
            <text:p>599839</text:p>
          </table:table-cell>
          <table:table-cell table:number-columns-repeated="2"/>
          <table:table-cell table:style-name="ce92" table:number-columns-repeated="979"/>
          <table:table-cell table:number-columns-repeated="15375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6]+[.B27]" office:value-type="float" office:value="49.5" calcext:value-type="float">
            <text:p>49.5</text:p>
          </table:table-cell>
          <table:table-cell table:style-name="ce61" table:formula="of:=[.C27]*[.$A$15]/1000" office:value-type="float" office:value="18.47835" calcext:value-type="float">
            <text:p>18.478</text:p>
          </table:table-cell>
          <table:table-cell table:style-name="ce61" table:formula="of:=[.D27]/([.$A$7]+[.C27]/1000)" office:value-type="float" office:value="1.57537405686517" calcext:value-type="float">
            <text:p>1.575</text:p>
          </table:table-cell>
          <table:table-cell table:style-name="ce64" table:formula="of:=[.$A$6]*[.E27]*100" office:value-type="float" office:value="992485.655825056" calcext:value-type="float">
            <text:p>992486</text:p>
          </table:table-cell>
          <table:table-cell table:style-name="ce50" office:value-type="float" office:value="760309" calcext:value-type="float">
            <text:p>760309</text:p>
          </table:table-cell>
          <table:table-cell table:style-name="ce67" table:formula="of:=[.G27]/[.F27]" office:value-type="float" office:value="0.76606547967482" calcext:value-type="float">
            <text:p>0.77</text:p>
          </table:table-cell>
          <table:table-cell table:style-name="ce64" table:formula="of:=[.E27]*[.$C$99]" office:value-type="float" office:value="779755.724190357" calcext:value-type="float">
            <text:p>779756</text:p>
          </table:table-cell>
          <table:table-cell table:style-name="ce67" table:formula="of:=[.G27]/[.I27]" office:value-type="float" office:value="0.975060491911683" calcext:value-type="float">
            <text:p>0.98</text:p>
          </table:table-cell>
          <table:table-cell table:style-name="ce64" table:formula="of:=[.I27]*0.95" office:value-type="float" office:value="740767.937980839" calcext:value-type="float">
            <text:p>740768</text:p>
          </table:table-cell>
          <table:table-cell table:style-name="ce72" table:formula="of:=IF([.G27]&lt;[.$A$18]; [.G27]; [.G27]*(1+[.G27]/[.$A$18]*[.$A$19]))" office:value-type="float" office:value="760309" calcext:value-type="float">
            <text:p>760309</text:p>
          </table:table-cell>
          <table:table-cell table:style-name="ce74" table:formula="of:=[.L27]/[.I27]" office:value-type="float" office:value="0.975060491911683" calcext:value-type="float">
            <text:p>0.975060491911683</text:p>
          </table:table-cell>
          <table:table-cell table:number-columns-repeated="14"/>
          <table:table-cell office:value-type="float" office:value="606849" calcext:value-type="float">
            <text:p>606849</text:p>
          </table:table-cell>
          <table:table-cell table:number-columns-repeated="16356"/>
        </table:table-row>
        <table:table-row table:style-name="ro2">
          <table:table-cell table:style-name="ce131" office:value-type="float" office:value="60" calcext:value-type="float">
            <text:p>60</text:p>
          </table:table-cell>
          <table:table-cell table:style-name="ce50" office:value-type="float" office:value="9.9" calcext:value-type="float">
            <text:p>9.9</text:p>
          </table:table-cell>
          <table:table-cell table:style-name="ce135" table:formula="of:=[.C27]+[.B28]" office:value-type="float" office:value="59.4" calcext:value-type="float">
            <text:p>59.4</text:p>
          </table:table-cell>
          <table:table-cell table:style-name="ce138" table:formula="of:=[.C28]*[.$A$15]/1000" office:value-type="float" office:value="22.17402" calcext:value-type="float">
            <text:p>22.174</text:p>
          </table:table-cell>
          <table:table-cell table:style-name="ce138" table:formula="of:=[.D28]/([.$A$7]+[.C28]/1000)" office:value-type="float" office:value="1.88885462630117" calcext:value-type="float">
            <text:p>1.889</text:p>
          </table:table-cell>
          <table:table-cell table:style-name="ce141" table:formula="of:=[.$A$6]*[.E28]*100" office:value-type="float" office:value="1189978.41456974" calcext:value-type="float">
            <text:p>1189978</text:p>
          </table:table-cell>
          <table:table-cell table:style-name="ce51" office:value-type="float" office:value="922391" calcext:value-type="float">
            <text:p>922391</text:p>
          </table:table-cell>
          <table:table-cell table:style-name="ce150" table:formula="of:=[.G28]/[.F28]" office:value-type="float" office:value="0.775132547537435" calcext:value-type="float">
            <text:p>0.78</text:p>
          </table:table-cell>
          <table:table-cell table:style-name="ce141" table:formula="of:=[.E28]*[.$C$99]" office:value-type="float" office:value="934917.774355497" calcext:value-type="float">
            <text:p>934918</text:p>
          </table:table-cell>
          <table:table-cell table:style-name="ce150" table:formula="of:=[.G28]/[.I28]" office:value-type="float" office:value="0.986601202053161" calcext:value-type="float">
            <text:p>0.99</text:p>
          </table:table-cell>
          <table:table-cell table:style-name="ce141" table:formula="of:=[.I28]*0.95" office:value-type="float" office:value="888171.885637723" calcext:value-type="float">
            <text:p>888172</text:p>
          </table:table-cell>
          <table:table-cell table:style-name="ce156" table:formula="of:=IF([.G28]&lt;[.$A$18]; [.G28]; [.G28]*(1+[.G28]/[.$A$18]*[.$A$19]))" office:value-type="float" office:value="922391" calcext:value-type="float">
            <text:p>922391</text:p>
          </table:table-cell>
          <table:table-cell table:style-name="ce159" table:formula="of:=[.L28]/[.I28]" office:value-type="float" office:value="0.986601202053161" calcext:value-type="float">
            <text:p>0.986601202053161</text:p>
          </table:table-cell>
          <table:table-cell table:style-name="ce164" table:number-columns-repeated="14"/>
          <table:table-cell table:style-name="ce164" office:value-type="float" office:value="607236" calcext:value-type="float">
            <text:p>607236</text:p>
          </table:table-cell>
          <table:table-cell table:style-name="ce173"/>
          <table:table-cell table:style-name="ce176"/>
          <table:table-cell table:style-name="ce164" table:number-columns-repeated="16354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8]+[.B29]" office:value-type="float" office:value="69.3" calcext:value-type="float">
            <text:p>69.3</text:p>
          </table:table-cell>
          <table:table-cell table:style-name="ce61" table:formula="of:=[.C29]*[.$A$15]/1000" office:value-type="float" office:value="25.86969" calcext:value-type="float">
            <text:p>25.870</text:p>
          </table:table-cell>
          <table:table-cell table:style-name="ce61" table:formula="of:=[.D29]/([.$A$7]+[.C29]/1000)" office:value-type="float" office:value="2.20180691615671" calcext:value-type="float">
            <text:p>2.202</text:p>
          </table:table-cell>
          <table:table-cell table:style-name="ce64" table:formula="of:=[.$A$6]*[.E29]*100" office:value-type="float" office:value="1387138.35717873" calcext:value-type="float">
            <text:p>1387138</text:p>
          </table:table-cell>
          <table:table-cell table:style-name="ce50" table:formula="of:=1143045-[.$I$6]" office:value-type="float" office:value="1083045" calcext:value-type="float">
            <text:p>1083045</text:p>
          </table:table-cell>
          <table:table-cell table:style-name="ce67" table:formula="of:=[.G29]/[.F29]" office:value-type="float" office:value="0.780776477267044" calcext:value-type="float">
            <text:p>0.78</text:p>
          </table:table-cell>
          <table:table-cell table:style-name="ce64" table:formula="of:=[.E29]*[.$C$99]" office:value-type="float" office:value="1089818.34438197" calcext:value-type="float">
            <text:p>1089818</text:p>
          </table:table-cell>
          <table:table-cell table:style-name="ce67" table:formula="of:=[.G29]/[.I29]" office:value-type="float" office:value="0.993784886796143" calcext:value-type="float">
            <text:p>0.99</text:p>
          </table:table-cell>
          <table:table-cell table:style-name="ce64" table:formula="of:=[.I29]*0.95" office:value-type="float" office:value="1035327.42716287" calcext:value-type="float">
            <text:p>1035327</text:p>
          </table:table-cell>
          <table:table-cell table:style-name="ce72" table:formula="of:=IF([.G29]&lt;[.$A$18]; [.G29]; [.G29]*(1+[.G29]/[.$A$18]*[.$A$19]))" office:value-type="float" office:value="1083045" calcext:value-type="float">
            <text:p>1083045</text:p>
          </table:table-cell>
          <table:table-cell table:style-name="ce74" table:formula="of:=[.L29]/[.I29]" office:value-type="float" office:value="0.993784886796143" calcext:value-type="float">
            <text:p>0.993784886796143</text:p>
          </table:table-cell>
          <table:table-cell table:number-columns-repeated="14"/>
          <table:table-cell office:value-type="float" office:value="615108" calcext:value-type="float">
            <text:p>615108</text:p>
          </table:table-cell>
          <table:table-cell table:formula="of:=SUM([.AB22:.AB29])/8" office:value-type="float" office:value="597630" calcext:value-type="float">
            <text:p>597630</text:p>
          </table:table-cell>
          <table:table-cell table:formula="of:=(MAX([.AB22:.AB28])-MIN([.AB22:.AB28]))/[.AC29]*100" office:value-type="float" office:value="4.77954587286448" calcext:value-type="float">
            <text:p>4.8</text:p>
          </table:table-cell>
          <table:table-cell table:number-columns-repeated="16354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29]+[.B30]" office:value-type="float" office:value="79.2" calcext:value-type="float">
            <text:p>79.2</text:p>
          </table:table-cell>
          <table:table-cell table:style-name="ce61" table:formula="of:=[.C30]*[.$A$15]/1000" office:value-type="float" office:value="29.56536" calcext:value-type="float">
            <text:p>29.565</text:p>
          </table:table-cell>
          <table:table-cell table:style-name="ce61" table:formula="of:=[.D30]/([.$A$7]+[.C30]/1000)" office:value-type="float" office:value="2.51423226069801" calcext:value-type="float">
            <text:p>2.514</text:p>
          </table:table-cell>
          <table:table-cell table:style-name="ce64" table:formula="of:=[.$A$6]*[.E30]*100" office:value-type="float" office:value="1583966.32423974" calcext:value-type="float">
            <text:p>1583966</text:p>
          </table:table-cell>
          <table:table-cell table:style-name="ce50" table:formula="of:=1304140 -[.$I$6]" office:value-type="float" office:value="1244140" calcext:value-type="float">
            <text:p>1244140</text:p>
          </table:table-cell>
          <table:table-cell table:style-name="ce67" table:formula="of:=[.G30]/[.F30]" office:value-type="float" office:value="0.785458618002595" calcext:value-type="float">
            <text:p>0.79</text:p>
          </table:table-cell>
          <table:table-cell table:style-name="ce64" table:formula="of:=[.E30]*[.$C$99]" office:value-type="float" office:value="1244458.09468546" calcext:value-type="float">
            <text:p>1244458</text:p>
          </table:table-cell>
          <table:table-cell table:style-name="ce67" table:formula="of:=[.G30]/[.I30]" office:value-type="float" office:value="0.999744391002943" calcext:value-type="float">
            <text:p>1.00</text:p>
          </table:table-cell>
          <table:table-cell table:style-name="ce64" table:formula="of:=[.I30]*0.95" office:value-type="float" office:value="1182235.18995119" calcext:value-type="float">
            <text:p>1182235</text:p>
          </table:table-cell>
          <table:table-cell table:style-name="ce72" table:formula="of:=IF([.G30]&lt;[.$A$18]; [.G30]; [.G30]*(1+[.G30]/[.$A$18]*[.$A$19]))" office:value-type="float" office:value="1244140" calcext:value-type="float">
            <text:p>1244140</text:p>
          </table:table-cell>
          <table:table-cell table:style-name="ce74" table:formula="of:=[.L30]/[.I30]" office:value-type="float" office:value="0.999744391002943" calcext:value-type="float">
            <text:p>0.999744391002943</text:p>
          </table:table-cell>
          <table:table-cell table:number-columns-repeated="14"/>
          <table:table-cell table:style-name="ce92" office:value-type="float" office:value="723681" calcext:value-type="float">
            <text:p>723681</text:p>
          </table:table-cell>
          <table:table-cell table:style-name="ce75"/>
          <table:table-cell table:number-columns-repeated="16355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0]+[.B31]" office:value-type="float" office:value="89.1" calcext:value-type="float">
            <text:p>89.1</text:p>
          </table:table-cell>
          <table:table-cell table:style-name="ce61" table:formula="of:=[.C31]*[.$A$15]/1000" office:value-type="float" office:value="33.26103" calcext:value-type="float">
            <text:p>33.261</text:p>
          </table:table-cell>
          <table:table-cell table:style-name="ce61" table:formula="of:=[.D31]/([.$A$7]+[.C31]/1000)" office:value-type="float" office:value="2.82613198970185" calcext:value-type="float">
            <text:p>2.826</text:p>
          </table:table-cell>
          <table:table-cell table:style-name="ce64" table:formula="of:=[.$A$6]*[.E31]*100" office:value-type="float" office:value="1780463.15351216" calcext:value-type="float">
            <text:p>1780463</text:p>
          </table:table-cell>
          <table:table-cell table:style-name="ce50" table:formula="of:=1467530-[.$I$6]" office:value-type="float" office:value="1407530" calcext:value-type="float">
            <text:p>1407530</text:p>
          </table:table-cell>
          <table:table-cell table:style-name="ce67" table:formula="of:=[.G31]/[.F31]" office:value-type="float" office:value="0.790541493219609" calcext:value-type="float">
            <text:p>0.79</text:p>
          </table:table-cell>
          <table:table-cell table:style-name="ce64" table:formula="of:=[.E31]*[.$C$99]" office:value-type="float" office:value="1398837.68345952" calcext:value-type="float">
            <text:p>1398838</text:p>
          </table:table-cell>
          <table:table-cell table:style-name="ce67" table:formula="of:=[.G31]/[.I31]" office:value-type="float" office:value="1.0062139565178" calcext:value-type="float">
            <text:p>1.01</text:p>
          </table:table-cell>
          <table:table-cell table:style-name="ce64" table:formula="of:=[.I31]*0.95" office:value-type="float" office:value="1328895.79928654" calcext:value-type="float">
            <text:p>1328896</text:p>
          </table:table-cell>
          <table:table-cell table:style-name="ce72" table:formula="of:=IF([.G31]&lt;[.$A$18]; [.G31]; [.G31]*(1+[.G31]/[.$A$18]*[.$A$19]))" office:value-type="float" office:value="1407530" calcext:value-type="float">
            <text:p>1407530</text:p>
          </table:table-cell>
          <table:table-cell table:style-name="ce74" table:formula="of:=[.L31]/[.I31]" office:value-type="float" office:value="1.0062139565178" calcext:value-type="float">
            <text:p>1.0062139565178</text:p>
          </table:table-cell>
          <table:table-cell table:number-columns-repeated="14"/>
          <table:table-cell office:value-type="float" office:value="707528" calcext:value-type="float">
            <text:p>707528</text:p>
          </table:table-cell>
          <table:table-cell table:number-columns-repeated="16356"/>
        </table:table-row>
        <table:table-row table:style-name="ro2"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1]+[.B32]" office:value-type="float" office:value="99" calcext:value-type="float">
            <text:p>99.0</text:p>
          </table:table-cell>
          <table:table-cell table:style-name="ce61" table:formula="of:=[.C32]*[.$A$15]/1000" office:value-type="float" office:value="36.9567" calcext:value-type="float">
            <text:p>36.957</text:p>
          </table:table-cell>
          <table:table-cell table:style-name="ce61" table:formula="of:=[.D32]/([.$A$7]+[.C32]/1000)" office:value-type="float" office:value="3.1375074284744" calcext:value-type="float">
            <text:p>3.138</text:p>
          </table:table-cell>
          <table:table-cell table:style-name="ce64" table:formula="of:=[.$A$6]*[.E32]*100" office:value-type="float" office:value="1976629.67993887" calcext:value-type="float">
            <text:p>1976630</text:p>
          </table:table-cell>
          <table:table-cell table:style-name="ce50" table:formula="of:=1622624-[.$I$6]" office:value-type="float" office:value="1562624" calcext:value-type="float">
            <text:p>1562624</text:p>
          </table:table-cell>
          <table:table-cell table:style-name="ce67" table:formula="of:=[.G32]/[.F32]" office:value-type="float" office:value="0.790549699753736" calcext:value-type="float">
            <text:p>0.79</text:p>
          </table:table-cell>
          <table:table-cell table:style-name="ce64" table:formula="of:=[.E32]*[.$C$99]" office:value-type="float" office:value="1552957.76668491" calcext:value-type="float">
            <text:p>1552958</text:p>
          </table:table-cell>
          <table:table-cell table:style-name="ce67" table:formula="of:=[.G32]/[.I32]" office:value-type="float" office:value="1.00622440192673" calcext:value-type="float">
            <text:p>1.01</text:p>
          </table:table-cell>
          <table:table-cell table:style-name="ce64" table:formula="of:=[.I32]*0.95" office:value-type="float" office:value="1475309.87835066" calcext:value-type="float">
            <text:p>1475310</text:p>
          </table:table-cell>
          <table:table-cell table:style-name="ce72" table:formula="of:=IF([.G32]&lt;[.$A$18]; [.G32]; [.G32]*(1+[.G32]/[.$A$18]*[.$A$19]))" office:value-type="float" office:value="1562624" calcext:value-type="float">
            <text:p>1562624</text:p>
          </table:table-cell>
          <table:table-cell table:style-name="ce74" table:formula="of:=[.L32]/[.I32]" office:value-type="float" office:value="1.00622440192673" calcext:value-type="float">
            <text:p>1.00622440192673</text:p>
          </table:table-cell>
          <table:table-cell table:number-columns-repeated="14"/>
          <table:table-cell office:value-type="float" office:value="726643" calcext:value-type="float">
            <text:p>726643</text:p>
          </table:table-cell>
          <table:table-cell table:number-columns-repeated="16356"/>
        </table:table-row>
        <table:table-row table:style-name="ro2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2]+[.B33]" office:value-type="float" office:value="108.9" calcext:value-type="float">
            <text:p>108.9</text:p>
          </table:table-cell>
          <table:table-cell table:style-name="ce61" table:formula="of:=[.C33]*[.$A$15]/1000" office:value-type="float" office:value="40.65237" calcext:value-type="float">
            <text:p>40.652</text:p>
          </table:table-cell>
          <table:table-cell table:style-name="ce61" table:formula="of:=[.D33]/([.$A$7]+[.C33]/1000)" office:value-type="float" office:value="3.44835989787003" calcext:value-type="float">
            <text:p>3.448</text:p>
          </table:table-cell>
          <table:table-cell table:style-name="ce64" table:formula="of:=[.$A$6]*[.E33]*100" office:value-type="float" office:value="2172466.73565812" calcext:value-type="float">
            <text:p>2172467</text:p>
          </table:table-cell>
          <table:table-cell table:style-name="ce50" table:formula="of:=1773393-[.$I$6]" office:value-type="float" office:value="1713393" calcext:value-type="float">
            <text:p>1713393</text:p>
          </table:table-cell>
          <table:table-cell table:style-name="ce67" table:formula="of:=[.G33]/[.F33]" office:value-type="float" office:value="0.788685493718711" calcext:value-type="float">
            <text:p>0.79</text:p>
          </table:table-cell>
          <table:table-cell table:style-name="ce64" table:formula="of:=[.E33]*[.$C$99]" office:value-type="float" office:value="1706818.9981389" calcext:value-type="float">
            <text:p>1706819</text:p>
          </table:table-cell>
          <table:table-cell table:style-name="ce67" table:formula="of:=[.G33]/[.I33]" office:value-type="float" office:value="1.00385161043336" calcext:value-type="float">
            <text:p>1.00</text:p>
          </table:table-cell>
          <table:table-cell table:style-name="ce64" table:formula="of:=[.I33]*0.95" office:value-type="float" office:value="1621478.04823196" calcext:value-type="float">
            <text:p>1621478</text:p>
          </table:table-cell>
          <table:table-cell table:style-name="ce72" table:formula="of:=IF([.G33]&lt;[.$A$18]; [.G33]; [.G33]*(1+[.G33]/[.$A$18]*[.$A$19]))" office:value-type="float" office:value="1713393" calcext:value-type="float">
            <text:p>1713393</text:p>
          </table:table-cell>
          <table:table-cell table:style-name="ce74" table:formula="of:=[.L33]/[.I33]" office:value-type="float" office:value="1.00385161043336" calcext:value-type="float">
            <text:p>1.00385161043336</text:p>
          </table:table-cell>
          <table:table-cell table:number-columns-repeated="14"/>
          <table:table-cell office:value-type="float" office:value="726839" calcext:value-type="float">
            <text:p>726839</text:p>
          </table:table-cell>
          <table:table-cell table:number-columns-repeated="16356"/>
        </table:table-row>
        <table:table-row table:style-name="ro2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3]+[.B34]" office:value-type="float" office:value="118.8" calcext:value-type="float">
            <text:p>118.8</text:p>
          </table:table-cell>
          <table:table-cell table:style-name="ce61" table:formula="of:=[.C34]*[.$A$15]/1000" office:value-type="float" office:value="44.34804" calcext:value-type="float">
            <text:p>44.348</text:p>
          </table:table-cell>
          <table:table-cell table:style-name="ce61" table:formula="of:=[.D34]/([.$A$7]+[.C34]/1000)" office:value-type="float" office:value="3.75869071430993" calcext:value-type="float">
            <text:p>3.759</text:p>
          </table:table-cell>
          <table:table-cell table:style-name="ce64" table:formula="of:=[.$A$6]*[.E34]*100" office:value-type="float" office:value="2367975.15001526" calcext:value-type="float">
            <text:p>2367975</text:p>
          </table:table-cell>
          <table:table-cell table:style-name="ce50" table:formula="of:=1933206-[.$I$6]" office:value-type="float" office:value="1873206" calcext:value-type="float">
            <text:p>1873206</text:p>
          </table:table-cell>
          <table:table-cell table:style-name="ce67" table:formula="of:=[.G34]/[.F34]" office:value-type="float" office:value="0.791058132509512" calcext:value-type="float">
            <text:p>0.79</text:p>
          </table:table-cell>
          <table:table-cell table:style-name="ce64" table:formula="of:=[.E34]*[.$C$99]" office:value-type="float" office:value="1860422.02940451" calcext:value-type="float">
            <text:p>1860422</text:p>
          </table:table-cell>
          <table:table-cell table:style-name="ce67" table:formula="of:=[.G34]/[.I34]" office:value-type="float" office:value="1.00687154333449" calcext:value-type="float">
            <text:p>1.01</text:p>
          </table:table-cell>
          <table:table-cell table:style-name="ce64" table:formula="of:=[.I34]*0.95" office:value-type="float" office:value="1767400.92793428" calcext:value-type="float">
            <text:p>1767401</text:p>
          </table:table-cell>
          <table:table-cell table:style-name="ce72" table:formula="of:=IF([.G34]&lt;[.$A$18]; [.G34]; [.G34]*(1+[.G34]/[.$A$18]*[.$A$19]))" office:value-type="float" office:value="1873206" calcext:value-type="float">
            <text:p>1873206</text:p>
          </table:table-cell>
          <table:table-cell table:style-name="ce74" table:formula="of:=[.L34]/[.I34]" office:value-type="float" office:value="1.00687154333449" calcext:value-type="float">
            <text:p>1.00687154333449</text:p>
          </table:table-cell>
          <table:table-cell table:number-columns-repeated="14"/>
          <table:table-cell office:value-type="float" office:value="732858" calcext:value-type="float">
            <text:p>732858</text:p>
          </table:table-cell>
          <table:table-cell table:number-columns-repeated="16356"/>
        </table:table-row>
        <table:table-row table:style-name="ro2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9.9" calcext:value-type="float">
            <text:p>9.9</text:p>
          </table:table-cell>
          <table:table-cell table:style-name="ce58" table:formula="of:=[.C34]+[.B35]" office:value-type="float" office:value="128.7" calcext:value-type="float">
            <text:p>128.7</text:p>
          </table:table-cell>
          <table:table-cell table:style-name="ce61" table:formula="of:=[.C35]*[.$A$15]/1000" office:value-type="float" office:value="48.04371" calcext:value-type="float">
            <text:p>48.044</text:p>
          </table:table-cell>
          <table:table-cell table:style-name="ce61" table:formula="of:=[.D35]/([.$A$7]+[.C35]/1000)" office:value-type="float" office:value="4.06850118980074" calcext:value-type="float">
            <text:p>4.069</text:p>
          </table:table-cell>
          <table:table-cell table:style-name="ce64" table:formula="of:=[.$A$6]*[.E35]*100" office:value-type="float" office:value="2563155.74957447" calcext:value-type="float">
            <text:p>2563156</text:p>
          </table:table-cell>
          <table:table-cell table:style-name="ce50" table:formula="of:=2089887-[.$I$6]" office:value-type="float" office:value="2029887" calcext:value-type="float">
            <text:p>2029887</text:p>
          </table:table-cell>
          <table:table-cell table:style-name="ce67" table:formula="of:=[.G35]/[.F35]" office:value-type="float" office:value="0.791948363004082" calcext:value-type="float">
            <text:p>0.79</text:p>
          </table:table-cell>
          <table:table-cell table:style-name="ce64" table:formula="of:=[.E35]*[.$C$99]" office:value-type="float" office:value="2013767.50987967" calcext:value-type="float">
            <text:p>2013768</text:p>
          </table:table-cell>
          <table:table-cell table:style-name="ce67" table:formula="of:=[.G35]/[.I35]" office:value-type="float" office:value="1.00800464305897" calcext:value-type="float">
            <text:p>1.01</text:p>
          </table:table-cell>
          <table:table-cell table:style-name="ce64" table:formula="of:=[.I35]*0.95" office:value-type="float" office:value="1913079.13438569" calcext:value-type="float">
            <text:p>1913079</text:p>
          </table:table-cell>
          <table:table-cell table:style-name="ce72" table:formula="of:=IF([.G35]&lt;[.$A$18]; [.G35]; [.G35]*(1+[.G35]/[.$A$18]*[.$A$19]))" office:value-type="float" office:value="2029887" calcext:value-type="float">
            <text:p>2029887</text:p>
          </table:table-cell>
          <table:table-cell table:style-name="ce74" table:formula="of:=[.L35]/[.I35]" office:value-type="float" office:value="1.00800464305897" calcext:value-type="float">
            <text:p>1.00800464305897</text:p>
          </table:table-cell>
          <table:table-cell table:number-columns-repeated="14"/>
          <table:table-cell office:value-type="float" office:value="705786" calcext:value-type="float">
            <text:p>705786</text:p>
          </table:table-cell>
          <table:table-cell table:number-columns-repeated="16356"/>
        </table:table-row>
        <table:table-row table:style-name="ro2">
          <table:table-cell table:style-name="ce56" office:value-type="float" office:value="140" calcext:value-type="float">
            <text:p>140</text:p>
          </table:table-cell>
          <table:table-cell table:style-name="ce50" office:value-type="float" office:value="9.9" calcext:value-type="float">
            <text:p>9.9</text:p>
          </table:table-cell>
          <table:table-cell table:style-name="ce60" table:formula="of:=[.C35]+[.B36]" office:value-type="float" office:value="138.6" calcext:value-type="float">
            <text:p>138.6</text:p>
          </table:table-cell>
          <table:table-cell table:style-name="ce63" table:formula="of:=[.C36]*[.$A$15]/1000" office:value-type="float" office:value="51.73938" calcext:value-type="float">
            <text:p>51.739</text:p>
          </table:table-cell>
          <table:table-cell table:style-name="ce63" table:formula="of:=[.D36]/([.$A$7]+[.C36]/1000)" office:value-type="float" office:value="4.37779263195302" calcext:value-type="float">
            <text:p>4.378</text:p>
          </table:table-cell>
          <table:table-cell table:style-name="ce66" table:formula="of:=[.$A$6]*[.E36]*100" office:value-type="float" office:value="2758009.3581304" calcext:value-type="float">
            <text:p>2758009</text:p>
          </table:table-cell>
          <table:table-cell table:style-name="ce56" table:formula="of:=2257397-[.$I$6]" office:value-type="float" office:value="2197397" calcext:value-type="float">
            <text:p>2197397</text:p>
          </table:table-cell>
          <table:table-cell table:style-name="ce69" table:formula="of:=[.G36]/[.F36]" office:value-type="float" office:value="0.796732974644281" calcext:value-type="float">
            <text:p>0.80</text:p>
          </table:table-cell>
          <table:table-cell table:style-name="ce66" table:formula="of:=[.E36]*[.$C$99]" office:value-type="float" office:value="2166856.08678644" calcext:value-type="float">
            <text:p>2166856</text:p>
          </table:table-cell>
          <table:table-cell table:style-name="ce69" table:formula="of:=[.G36]/[.I36]" office:value-type="float" office:value="1.01409457388509" calcext:value-type="float">
            <text:p>1.01</text:p>
          </table:table-cell>
          <table:table-cell table:style-name="ce66" table:formula="of:=[.I36]*0.95" office:value-type="float" office:value="2058513.28244712" calcext:value-type="float">
            <text:p>2058513</text:p>
          </table:table-cell>
          <table:table-cell table:style-name="ce73" table:formula="of:=IF([.G36]&lt;[.$A$18]; [.G36]; [.G36]*(1+[.G36]/[.$A$18]*[.$A$19]))" office:value-type="float" office:value="2197397" calcext:value-type="float">
            <text:p>2197397</text:p>
          </table:table-cell>
          <table:table-cell table:style-name="ce74" table:formula="of:=[.L36]/[.I36]" office:value-type="float" office:value="1.01409457388509" calcext:value-type="float">
            <text:p>1.01409457388509</text:p>
          </table:table-cell>
          <table:table-cell table:number-columns-repeated="14"/>
          <table:table-cell office:value-type="float" office:value="700985" calcext:value-type="float">
            <text:p>700985</text:p>
          </table:table-cell>
          <table:table-cell table:number-columns-repeated="16356"/>
        </table:table-row>
        <table:table-row table:style-name="ro2">
          <table:table-cell table:style-name="ce56" office:value-type="float" office:value="150" calcext:value-type="float">
            <text:p>150</text:p>
          </table:table-cell>
          <table:table-cell table:style-name="ce50" office:value-type="float" office:value="9.9" calcext:value-type="float">
            <text:p>9.9</text:p>
          </table:table-cell>
          <table:table-cell table:style-name="ce60" table:formula="of:=[.C36]+[.B37]" office:value-type="float" office:value="148.5" calcext:value-type="float">
            <text:p>148.5</text:p>
          </table:table-cell>
          <table:table-cell table:style-name="ce63" table:formula="of:=[.C37]*[.$A$15]/1000" office:value-type="float" office:value="55.43505" calcext:value-type="float">
            <text:p>55.435</text:p>
          </table:table-cell>
          <table:table-cell table:style-name="ce63" table:formula="of:=[.D37]/([.$A$7]+[.C37]/1000)" office:value-type="float" office:value="4.68656634399966" calcext:value-type="float">
            <text:p>4.687</text:p>
          </table:table-cell>
          <table:table-cell table:style-name="ce66" table:formula="of:=[.$A$6]*[.E37]*100" office:value-type="float" office:value="2952536.79671979" calcext:value-type="float">
            <text:p>2952537</text:p>
          </table:table-cell>
          <table:table-cell table:style-name="ce56" table:formula="of:=2386943-[.$I$6]" office:value-type="float" office:value="2326943" calcext:value-type="float">
            <text:p>2326943</text:p>
          </table:table-cell>
          <table:table-cell table:style-name="ce69" table:formula="of:=[.G37]/[.F37]" office:value-type="float" office:value="0.788116511396298" calcext:value-type="float">
            <text:p>0.79</text:p>
          </table:table-cell>
          <table:table-cell table:style-name="ce66" table:formula="of:=[.E37]*[.$C$99]" office:value-type="float" office:value="2319688.40518006" calcext:value-type="float">
            <text:p>2319688</text:p>
          </table:table-cell>
          <table:table-cell table:style-name="ce69" table:formula="of:=[.G37]/[.I37]" office:value-type="float" office:value="1.0031274005611" calcext:value-type="float">
            <text:p>1.00</text:p>
          </table:table-cell>
          <table:table-cell table:style-name="ce66" table:formula="of:=[.I37]*0.95" office:value-type="float" office:value="2203703.98492106" calcext:value-type="float">
            <text:p>2203704</text:p>
          </table:table-cell>
          <table:table-cell table:style-name="ce73" table:formula="of:=IF([.G37]&lt;[.$A$18]; [.G37]; [.G37]*(1+[.G37]/[.$A$18]*[.$A$19]))" office:value-type="float" office:value="2326943" calcext:value-type="float">
            <text:p>2326943</text:p>
          </table:table-cell>
          <table:table-cell table:style-name="ce74" table:formula="of:=[.L37]/[.I37]" office:value-type="float" office:value="1.0031274005611" calcext:value-type="float">
            <text:p>1.0031274005611</text:p>
          </table:table-cell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16356"/>
        </table:table-row>
        <table:table-row table:style-name="ro2">
          <table:table-cell table:number-columns-repeated="5"/>
          <table:table-cell table:style-name="ce20"/>
          <table:table-cell table:number-columns-repeated="21"/>
          <table:table-cell office:value-type="float" office:value="735848" calcext:value-type="float">
            <text:p>735848</text:p>
          </table:table-cell>
          <table:table-cell table:formula="of:=SUM([.AB30:.AB38])/9" office:value-type="float" office:value="720744" calcext:value-type="float">
            <text:p>720744</text:p>
          </table:table-cell>
          <table:table-cell table:formula="of:=(MAX([.AB30:.AB37])-MIN([.AB30:.AB37]))/[.AC38]*100" office:value-type="float" office:value="4.42223591178005" calcext:value-type="float">
            <text:p>4.4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20"/>
          <table:table-cell table:number-columns-repeated="21"/>
          <table:table-cell office:value-type="float" office:value="731747" calcext:value-type="float">
            <text:p>731747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836817" calcext:value-type="float">
            <text:p>836817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827707" calcext:value-type="float">
            <text:p>827707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822322" calcext:value-type="float">
            <text:p>822322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853847" calcext:value-type="float">
            <text:p>853847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848079" calcext:value-type="float">
            <text:p>848079</text:p>
          </table:table-cell>
          <table:table-cell table:formula="of:=SUM([.AB40:.AB44])/5" office:value-type="float" office:value="837754.4" calcext:value-type="float">
            <text:p>837754</text:p>
          </table:table-cell>
          <table:table-cell table:formula="of:=(MAX([.AB40:.AB43])-MIN([.AB40:.AB43]))/[.AC44]*100" office:value-type="float" office:value="3.76303604015688" calcext:value-type="float">
            <text:p>3.8</text:p>
          </table:table-cell>
          <table:table-cell table:number-columns-repeated="16354"/>
        </table:table-row>
        <table:table-row table:style-name="ro2">
          <table:table-cell table:number-columns-repeated="27"/>
          <table:table-cell office:value-type="float" office:value="954372" calcext:value-type="float">
            <text:p>954372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944582" calcext:value-type="float">
            <text:p>944582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968293" calcext:value-type="float">
            <text:p>968293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955723" calcext:value-type="float">
            <text:p>955723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964172" calcext:value-type="float">
            <text:p>964172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920144" calcext:value-type="float">
            <text:p>920144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949327" calcext:value-type="float">
            <text:p>949327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956910" calcext:value-type="float">
            <text:p>956910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951584" calcext:value-type="float">
            <text:p>951584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971636" calcext:value-type="float">
            <text:p>971636</text:p>
          </table:table-cell>
          <table:table-cell table:formula="of:=SUM([.AB45:.AB54])/10" office:value-type="float" office:value="953674.3" calcext:value-type="float">
            <text:p>953674</text:p>
          </table:table-cell>
          <table:table-cell table:formula="of:=(MAX([.AB45:.AB53])-MIN([.AB45:.AB53]))/[.AC54]*100" office:value-type="float" office:value="5.04878866925532" calcext:value-type="float">
            <text:p>5.0</text:p>
          </table:table-cell>
          <table:table-cell table:number-columns-repeated="16354"/>
        </table:table-row>
        <table:table-row table:style-name="ro2">
          <table:table-cell table:number-columns-repeated="27"/>
          <table:table-cell office:value-type="float" office:value="1084905" calcext:value-type="float">
            <text:p>1084905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073791" calcext:value-type="float">
            <text:p>1073791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082662" calcext:value-type="float">
            <text:p>1082662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095580" calcext:value-type="float">
            <text:p>1095580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092684" calcext:value-type="float">
            <text:p>1092684</text:p>
          </table:table-cell>
          <table:table-cell table:formula="of:=SUM([.AB55:.AB59])/5" office:value-type="float" office:value="1085924.4" calcext:value-type="float">
            <text:p>1085924</text:p>
          </table:table-cell>
          <table:table-cell table:formula="of:=(MAX([.AB55:.AB58])-MIN([.AB55:.AB58]))/[.AC59]*100" office:value-type="float" office:value="2.00649326969723" calcext:value-type="float">
            <text:p>2.0</text:p>
          </table:table-cell>
          <table:table-cell table:number-columns-repeated="16354"/>
        </table:table-row>
        <table:table-row table:style-name="ro2">
          <table:table-cell table:number-columns-repeated="27"/>
          <table:table-cell office:value-type="float" office:value="1205750" calcext:value-type="float">
            <text:p>1205750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188471" calcext:value-type="float">
            <text:p>1188471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219844" calcext:value-type="float">
            <text:p>1219844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175662" calcext:value-type="float">
            <text:p>1175662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207639" calcext:value-type="float">
            <text:p>1207639</text:p>
          </table:table-cell>
          <table:table-cell table:formula="of:=SUM([.AB60:.AB64])/5" office:value-type="float" office:value="1199473.2" calcext:value-type="float">
            <text:p>1199473</text:p>
          </table:table-cell>
          <table:table-cell table:formula="of:=(MAX([.AB60:.AB63])-MIN([.AB60:.AB63]))/[.AC64]*100" office:value-type="float" office:value="3.68345036804491" calcext:value-type="float">
            <text:p>3.7</text:p>
          </table:table-cell>
          <table:table-cell table:number-columns-repeated="16354"/>
        </table:table-row>
        <table:table-row table:style-name="ro2">
          <table:table-cell table:number-columns-repeated="27"/>
          <table:table-cell office:value-type="float" office:value="1404845" calcext:value-type="float">
            <text:p>1404845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399177" calcext:value-type="float">
            <text:p>1399177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434430" calcext:value-type="float">
            <text:p>1434430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417323" calcext:value-type="float">
            <text:p>1417323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428968" calcext:value-type="float">
            <text:p>1428968</text:p>
          </table:table-cell>
          <table:table-cell table:formula="of:=SUM([.AB65:.AB69])/5" office:value-type="float" office:value="1416948.6" calcext:value-type="float">
            <text:p>1416949</text:p>
          </table:table-cell>
          <table:table-cell table:formula="of:=(MAX([.AB65:.AB68])-MIN([.AB65:.AB68]))/[.AC69]*100" office:value-type="float" office:value="2.48795192712001" calcext:value-type="float">
            <text:p>2.5</text:p>
          </table:table-cell>
          <table:table-cell table:number-columns-repeated="16354"/>
        </table:table-row>
        <table:table-row table:style-name="ro2">
          <table:table-cell table:number-columns-repeated="27"/>
          <table:table-cell office:value-type="float" office:value="1502457" calcext:value-type="float">
            <text:p>1502457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504837" calcext:value-type="float">
            <text:p>1504837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<text:span text:style-name="T7">Regression</text:span></text:p>
          </table:table-cell>
          <table:table-cell table:number-columns-repeated="6"/>
          <table:table-cell office:value-type="string" calcext:value-type="string">
            <text:p><text:span text:style-name="T7">Regression</text:span></text:p>
          </table:table-cell>
          <table:table-cell table:number-columns-repeated="18"/>
          <table:table-cell office:value-type="float" office:value="1524086" calcext:value-type="float">
            <text:p>1524086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7"/>
          <table:table-cell office:value-type="float" office:value="1554010" calcext:value-type="float">
            <text:p>1554010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549983" calcext:value-type="float">
            <text:p>1549983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8"/>
          <table:table-cell office:value-type="float" office:value="1512338" calcext:value-type="float">
            <text:p>1512338</text:p>
          </table:table-cell>
          <table:table-cell table:number-columns-repeated="16356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float" office:value="494965.44696311" calcext:value-type="float">
            <text:p>494965.4469631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float" office:value="0.000108117508460153" calcext:value-type="float">
            <text:p>0.000108117508460153</text:p>
          </table:table-cell>
          <table:table-cell office:value-type="float" office:value="0.0000832157367309425" calcext:value-type="float">
            <text:p>8.32157367309425E-05</text:p>
          </table:table-cell>
          <table:table-cell table:number-columns-repeated="17"/>
          <table:table-cell office:value-type="float" office:value="1494015" calcext:value-type="float">
            <text:p>1494015</text:p>
          </table:table-cell>
          <table:table-cell table:number-columns-repeated="16356"/>
        </table:table-row>
        <table:table-row table:style-name="ro2">
          <table:table-cell/>
          <table:table-cell office:value-type="float" office:value="1736.93167897315" calcext:value-type="float">
            <text:p>1736.93167897315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  <table:table-cell office:value-type="float" office:value="0.000808915241891663" calcext:value-type="float">
            <text:p>0.000808915241891663</text:p>
          </table:table-cell>
          <table:table-cell office:value-type="float" office:value="0.0107658945847723" calcext:value-type="float">
            <text:p>0.0107658945847723</text:p>
          </table:table-cell>
          <table:table-cell table:number-columns-repeated="17"/>
          <table:table-cell office:value-type="float" office:value="1540956" calcext:value-type="float">
            <text:p>1540956</text:p>
          </table:table-cell>
          <table:table-cell table:number-columns-repeated="16356"/>
        </table:table-row>
        <table:table-row table:style-name="ro2">
          <table:table-cell/>
          <table:table-cell office:value-type="float" office:value="0.999950744548206" calcext:value-type="float">
            <text:p>0.999950744548206</text:p>
          </table:table-cell>
          <table:table-cell office:value-type="float" office:value="3001.70995549266" calcext:value-type="float">
            <text:p>3001.70995549266</text:p>
          </table:table-cell>
          <table:table-cell table:number-columns-repeated="5"/>
          <table:table-cell office:value-type="float" office:value="0.0013722912066915" calcext:value-type="float">
            <text:p>0.0013722912066915</text:p>
          </table:table-cell>
          <table:table-cell office:value-type="float" office:value="0.0109827148939466" calcext:value-type="float">
            <text:p>0.0109827148939466</text:p>
          </table:table-cell>
          <table:table-cell table:number-columns-repeated="17"/>
          <table:table-cell office:value-type="float" office:value="1535685" calcext:value-type="float">
            <text:p>1535685</text:p>
          </table:table-cell>
          <table:table-cell table:number-columns-repeated="16356"/>
        </table:table-row>
        <table:table-row table:style-name="ro2">
          <table:table-cell/>
          <table:table-cell office:value-type="float" office:value="81205.2845429262" calcext:value-type="float">
            <text:p>81205.284542926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.0178643007097672" calcext:value-type="float">
            <text:p>0.0178643007097672</text:p>
          </table:table-cell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543844" calcext:value-type="float">
            <text:p>1543844</text:p>
          </table:table-cell>
          <table:table-cell table:formula="of:=SUM([.AB70:.AB79])/10" office:value-type="float" office:value="1526221.1" calcext:value-type="float">
            <text:p>1526221</text:p>
          </table:table-cell>
          <table:table-cell table:formula="of:=(MAX([.AB70:.AB78])-MIN([.AB70:.AB78]))/[.AC79]*100" office:value-type="float" office:value="3.93095076460416" calcext:value-type="float">
            <text:p>3.9</text:p>
          </table:table-cell>
          <table:table-cell table:number-columns-repeated="16354"/>
        </table:table-row>
        <table:table-row table:style-name="ro2">
          <table:table-cell/>
          <table:table-cell office:value-type="float" office:value="731680942860.372" calcext:value-type="float">
            <text:p>731680942860.372</text:p>
          </table:table-cell>
          <table:table-cell office:value-type="float" office:value="36041050.6276151" calcext:value-type="float">
            <text:p>36041050.6276151</text:p>
          </table:table-cell>
          <table:table-cell table:number-columns-repeated="5"/>
          <table:table-cell office:value-type="float" office:value="0.00000215479242397488" calcext:value-type="float">
            <text:p>2.15479242397488E-06</text:p>
          </table:table-cell>
          <table:table-cell office:value-type="float" office:value="0.0015680603437423" calcext:value-type="float">
            <text:p>0.0015680603437423</text:p>
          </table:table-cell>
          <table:table-cell table:number-columns-repeated="17"/>
          <table:table-cell office:value-type="float" office:value="1665079" calcext:value-type="float">
            <text:p>1665079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647703" calcext:value-type="float">
            <text:p>1647703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8"/>
          <table:table-cell office:value-type="float" office:value="1659088" calcext:value-type="float">
            <text:p>1659088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float" office:value="0.999950744548206" calcext:value-type="float">
            <text:p>0.999950744548206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float" office:value="0.0013722912066915" calcext:value-type="float">
            <text:p>0.0013722912066915</text:p>
          </table:table-cell>
          <table:table-cell table:number-columns-repeated="17"/>
          <table:table-cell office:value-type="float" office:value="1647890" calcext:value-type="float">
            <text:p>1647890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float" office:value="3001.70995549266" calcext:value-type="float">
            <text:p>3001.70995549266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float" office:value="0.0109827148939466" calcext:value-type="float">
            <text:p>0.0109827148939466</text:p>
          </table:table-cell>
          <table:table-cell table:number-columns-repeated="17"/>
          <table:table-cell office:value-type="float" office:value="1649454" calcext:value-type="float">
            <text:p>1649454</text:p>
          </table:table-cell>
          <table:table-cell table:formula="of:=SUM([.AB80:.AB84])/5" office:value-type="float" office:value="1653842.8" calcext:value-type="float">
            <text:p>1653843</text:p>
          </table:table-cell>
          <table:table-cell table:formula="of:=(MAX([.AB80:.AB83])-MIN([.AB80:.AB83]))/[.AC84]*100" office:value-type="float" office:value="1.0506439910734" calcext:value-type="float">
            <text:p>1.1</text:p>
          </table:table-cell>
          <table:table-cell table:number-columns-repeated="16354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  <table:table-cell office:value-type="float" office:value="1793367" calcext:value-type="float">
            <text:p>1793367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7"/>
          <table:table-cell office:value-type="float" office:value="1751541" calcext:value-type="float">
            <text:p>1751541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float" office:value="0.999950744548206" calcext:value-type="float">
            <text:p>0.999950744548206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float" office:value="-0.0754452248543323" calcext:value-type="float">
            <text:p>-0.0754452248543323</text:p>
          </table:table-cell>
          <table:table-cell table:number-columns-repeated="17"/>
          <table:table-cell office:value-type="float" office:value="1770996" calcext:value-type="float">
            <text:p>1770996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775754" calcext:value-type="float">
            <text:p>1775754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8"/>
          <table:table-cell office:value-type="float" office:value="1762332" calcext:value-type="float">
            <text:p>1762332</text:p>
          </table:table-cell>
          <table:table-cell table:formula="of:=SUM([.AB85:.AB89])/5" office:value-type="float" office:value="1770798" calcext:value-type="float">
            <text:p>1770798</text:p>
          </table:table-cell>
          <table:table-cell table:formula="of:=(MAX([.AB85:.AB88])-MIN([.AB85:.AB88]))/[.AC89]*100" office:value-type="float" office:value="2.36198595209617" calcext:value-type="float">
            <text:p>2.4</text:p>
          </table:table-cell>
          <table:table-cell table:number-columns-repeated="16354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3"/>
          <table:table-cell office:value-type="float" office:value="1847092" calcext:value-type="float">
            <text:p>1847092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float" office:value="731680942860.372" calcext:value-type="float">
            <text:p>731680942860.372</text:p>
          </table:table-cell>
          <table:table-cell table:formula="of:=[.$B$80] / [.$C$91]" office:value-type="float" office:value="731680942860.372" calcext:value-type="float">
            <text:p>731680942860.372</text:p>
          </table:table-cell>
          <table:table-cell table:formula="of:=[.$B$79]" office:value-type="float" office:value="81205.2845429262" calcext:value-type="float">
            <text:p>81205.2845429262</text:p>
          </table:table-cell>
          <table:table-cell table:formula="of:=LEGACY.FDIST([.$B$79] ; [.$C$91] ; [.$C$79])" office:value-type="float" office:value="0.000000000909802262015739" calcext:value-type="float">
            <text:p>9.09802262015739E-10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float" office:value="0.00000215479242397488" calcext:value-type="float">
            <text:p>2.15479242397488E-06</text:p>
          </table:table-cell>
          <table:table-cell table:formula="of:=[.$I$80] / [.$J$91]" office:value-type="float" office:value="0.00000215479242397488" calcext:value-type="float">
            <text:p>2.15479242397488E-06</text:p>
          </table:table-cell>
          <table:table-cell table:formula="of:=[.$I$79]" office:value-type="float" office:value="0.0178643007097672" calcext:value-type="float">
            <text:p>0.0178643007097672</text:p>
          </table:table-cell>
          <table:table-cell table:formula="of:=LEGACY.FDIST([.$I$79] ; [.$J$91] ; [.$J$79])" office:value-type="float" office:value="0.895720422494636" calcext:value-type="float">
            <text:p>0.895720422494636</text:p>
          </table:table-cell>
          <table:table-cell table:number-columns-repeated="13"/>
          <table:table-cell office:value-type="float" office:value="1833359" calcext:value-type="float">
            <text:p>1833359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float" office:value="4" calcext:value-type="float">
            <text:p>4</text:p>
          </table:table-cell>
          <table:table-cell table:formula="of:=[.$C$80]" office:value-type="float" office:value="36041050.6276151" calcext:value-type="float">
            <text:p>36041050.6276151</text:p>
          </table:table-cell>
          <table:table-cell table:formula="of:=[.$C$80] / [.$C$79]" office:value-type="float" office:value="9010262.65690377" calcext:value-type="float">
            <text:p>9010262.65690377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float" office:value="0.0015680603437423" calcext:value-type="float">
            <text:p>0.0015680603437423</text:p>
          </table:table-cell>
          <table:table-cell table:formula="of:=[.$J$80] / [.$J$79]" office:value-type="float" office:value="0.000120620026441716" calcext:value-type="float">
            <text:p>0.000120620026441716</text:p>
          </table:table-cell>
          <table:table-cell table:number-columns-repeated="15"/>
          <table:table-cell office:value-type="float" office:value="1903999" calcext:value-type="float">
            <text:p>1903999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float" office:value="5" calcext:value-type="float">
            <text:p>5</text:p>
          </table:table-cell>
          <table:table-cell table:formula="of:=[.$B$80] + [.$C$80]" office:value-type="float" office:value="731716983911" calcext:value-type="float">
            <text:p>731716983911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float" office:value="0.00157021513616628" calcext:value-type="float">
            <text:p>0.00157021513616628</text:p>
          </table:table-cell>
          <table:table-cell table:number-columns-repeated="16"/>
          <table:table-cell office:value-type="float" office:value="1839722" calcext:value-type="float">
            <text:p>1839722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879761" calcext:value-type="float">
            <text:p>1879761</text:p>
          </table:table-cell>
          <table:table-cell table:number-columns-repeated="16356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7"/>
          <table:table-cell office:value-type="float" office:value="1826056" calcext:value-type="float">
            <text:p>1826056</text:p>
          </table:table-cell>
          <table:table-cell table:number-columns-repeated="16356"/>
        </table:table-row>
        <table:table-row table:style-name="ro2">
          <table:table-cell table:number-columns-repeated="27"/>
          <table:table-cell office:value-type="float" office:value="1813477" calcext:value-type="float">
            <text:p>1813477</text:p>
          </table:table-cell>
          <table:table-cell table:number-columns-repeated="16356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12"/>
          <table:table-cell office:value-type="float" office:value="1885554" calcext:value-type="float">
            <text:p>1885554</text:p>
          </table:table-cell>
          <table:table-cell table:number-columns-repeated="16356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#N/A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#N/A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float" office:value="0.0000832157367309425" calcext:value-type="float">
            <text:p>8.32157367309425E-05</text:p>
          </table:table-cell>
          <table:table-cell table:number-matrix-columns-spanned="1" table:number-matrix-rows-spanned="2" table:formula="of:=INDEX([.$I$77:.$J$77]; 1 ; ROW([.$K$99])+1 - ROW())" office:value-type="float" office:value="0.0107658945847723" calcext:value-type="float">
            <text:p>0.0107658945847723</text:p>
          </table:table-cell>
          <table:table-cell table:number-matrix-columns-spanned="1" table:number-matrix-rows-spanned="2" table:formula="of:=[.$J$98:.$J$99] / [.$K$98:.$K$99]" office:value-type="float" office:value="0.00772957008594954" calcext:value-type="float">
            <text:p>0.00772957008594954</text:p>
          </table:table-cell>
          <table:table-cell table:number-matrix-columns-spanned="1" table:number-matrix-rows-spanned="2" table:formula="of:=LEGACY.TDIST(ABS([.$L$98:.$L$99]) ; [.$J$79] ; 2 )" office:value-type="float" office:value="0.993950115190101" calcext:value-type="float">
            <text:p>0.993950115190101</text:p>
          </table:table-cell>
          <table:table-cell table:number-matrix-columns-spanned="1" table:number-matrix-rows-spanned="2" table:formula="of:=[.$J$98:.$J$99] - [.$K$98:.$K$99] * TINV(1 - [.$J$95] ; [.$J$79])" office:value-type="float" office:value="-0.0231750854829937" calcext:value-type="float">
            <text:p>-0.0231750854829937</text:p>
          </table:table-cell>
          <table:table-cell table:number-matrix-columns-spanned="1" table:number-matrix-rows-spanned="2" table:formula="of:=[.$J$98:.$J$99] + [.$K$98:.$K$99] * TINV(1 - [.$J$95] ; [.$J$79])" office:value-type="float" office:value="0.0233415169564556" calcext:value-type="float">
            <text:p>0.0233415169564556</text:p>
          </table:table-cell>
          <table:table-cell table:number-columns-repeated="12"/>
          <table:table-cell office:value-type="float" office:value="1836044" calcext:value-type="float">
            <text:p>1836044</text:p>
          </table:table-cell>
          <table:table-cell table:number-columns-repeated="16356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table:style-name="ce92" office:value-type="float" office:value="494965.44696311" calcext:value-type="float">
            <text:p>494965.44696311</text:p>
          </table:table-cell>
          <table:table-cell office:value-type="float" office:value="1736.93167897315" calcext:value-type="float">
            <text:p>1736.93167897315</text:p>
          </table:table-cell>
          <table:table-cell office:value-type="float" office:value="284.965409379676" calcext:value-type="float">
            <text:p>284.965409379676</text:p>
          </table:table-cell>
          <table:table-cell office:value-type="float" office:value="0.000000000909802262015739" calcext:value-type="float">
            <text:p>9.09802262015739E-10</text:p>
          </table:table-cell>
          <table:table-cell office:value-type="float" office:value="490142.951504962" calcext:value-type="float">
            <text:p>490142.951504962</text:p>
          </table:table-cell>
          <table:table-cell office:value-type="float" office:value="499787.942421258" calcext:value-type="float">
            <text:p>499787.942421258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0.000108117508460153" calcext:value-type="float">
            <text:p>0.000108117508460153</text:p>
          </table:table-cell>
          <table:table-cell office:value-type="float" office:value="0.000808915241891663" calcext:value-type="float">
            <text:p>0.000808915241891663</text:p>
          </table:table-cell>
          <table:table-cell office:value-type="float" office:value="0.133657400505049" calcext:value-type="float">
            <text:p>0.133657400505049</text:p>
          </table:table-cell>
          <table:table-cell office:value-type="float" office:value="0.895720422494636" calcext:value-type="float">
            <text:p>0.895720422494636</text:p>
          </table:table-cell>
          <table:table-cell office:value-type="float" office:value="-0.00163943762585761" calcext:value-type="float">
            <text:p>-0.00163943762585761</text:p>
          </table:table-cell>
          <table:table-cell office:value-type="float" office:value="0.00185567264277792" calcext:value-type="float">
            <text:p>0.00185567264277792</text:p>
          </table:table-cell>
          <table:table-cell table:number-columns-repeated="12"/>
          <table:table-cell office:value-type="float" office:value="1841236" calcext:value-type="float">
            <text:p>1841236</text:p>
          </table:table-cell>
          <table:table-cell table:formula="of:=SUM([.AB90:.AB99])/10" office:value-type="float" office:value="1850630" calcext:value-type="float">
            <text:p>1850630</text:p>
          </table:table-cell>
          <table:table-cell table:formula="of:=(MAX([.AB90:.AB98])-MIN([.AB90:.AB98]))/[.AC99]*100" office:value-type="float" office:value="4.89141535585179" calcext:value-type="float">
            <text:p>4.9</text:p>
          </table:table-cell>
          <table:table-cell table:number-columns-repeated="16354"/>
        </table:table-row>
        <table:table-row table:style-name="ro2">
          <table:table-cell table:number-columns-repeated="28"/>
          <table:table-cell table:style-name="Default" table:number-columns-repeated="2"/>
          <table:table-cell table:number-columns-repeated="16354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23"/>
          <table:table-cell table:style-name="Default" table:number-columns-repeated="2"/>
          <table:table-cell table:number-columns-repeated="16354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float" office:value="0" calcext:value-type="float">
            <text:p>0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float" office:value="1" calcext:value-type="float">
            <text:p>1</text:p>
          </table:table-cell>
          <table:table-cell table:number-columns-repeated="23"/>
          <table:table-cell table:style-name="Default" table:number-columns-repeated="2"/>
          <table:table-cell table:number-columns-repeated="1635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949654.4696311" calcext:value-type="float">
            <text:p>4949654.4696311</text:p>
          </table:table-cell>
          <table:table-cell office:value-type="float" office:value="158573" calcext:value-type="float">
            <text:p>158573</text:p>
          </table:table-cell>
          <table:table-cell office:value-type="float" office:value="-4791081.4696311" calcext:value-type="float">
            <text:p>-4791081.4696311</text:p>
          </table:table-cell>
          <table:table-cell table:number-columns-repeated="23"/>
          <table:table-cell table:style-name="Default" table:number-columns-repeated="2"/>
          <table:table-cell table:number-columns-repeated="1635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9899308.93926221" calcext:value-type="float">
            <text:p>9899308.93926221</text:p>
          </table:table-cell>
          <table:table-cell office:value-type="float" office:value="315866" calcext:value-type="float">
            <text:p>315866</text:p>
          </table:table-cell>
          <table:table-cell office:value-type="float" office:value="-9583442.93926221" calcext:value-type="float">
            <text:p>-9583442.93926221</text:p>
          </table:table-cell>
          <table:table-cell table:number-columns-repeated="23"/>
          <table:table-cell table:style-name="Default" table:number-columns-repeated="2"/>
          <table:table-cell table:number-columns-repeated="1635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4848963.4088933" calcext:value-type="float">
            <text:p>14848963.4088933</text:p>
          </table:table-cell>
          <table:table-cell office:value-type="float" office:value="471092" calcext:value-type="float">
            <text:p>471092</text:p>
          </table:table-cell>
          <table:table-cell office:value-type="float" office:value="-14377871.4088933" calcext:value-type="float">
            <text:p>-14377871.4088933</text:p>
          </table:table-cell>
          <table:table-cell table:number-columns-repeated="23"/>
          <table:table-cell table:style-name="Default" table:number-columns-repeated="2"/>
          <table:table-cell table:number-columns-repeated="1635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9798617.8785244" calcext:value-type="float">
            <text:p>19798617.8785244</text:p>
          </table:table-cell>
          <table:table-cell office:value-type="float" office:value="620381" calcext:value-type="float">
            <text:p>620381</text:p>
          </table:table-cell>
          <table:table-cell office:value-type="float" office:value="-19178236.8785244" calcext:value-type="float">
            <text:p>-19178236.8785244</text:p>
          </table:table-cell>
          <table:table-cell table:number-columns-repeated="23"/>
          <table:table-cell table:style-name="Default" table:number-columns-repeated="2"/>
          <table:table-cell table:number-columns-repeated="16354"/>
        </table:table-row>
      </table:table>
      <table:table table:name="Annex B Coincidence Limit - MTD" table:style-name="ta1">
        <table:shapes>
          <draw:frame draw:z-index="0" draw:style-name="gr3" draw:text-style-name="P1" svg:width="23.951cm" svg:height="15.239cm" svg:x="0.186cm" svg:y="18.129cm">
            <draw:object draw:notify-on-update-of-ranges="'Annex B Coincidence Limit - MTD'.E22:'Annex B Coincidence Limit - MTD'.E37 'Annex B Coincidence Limit - MTD'.G22:'Annex B Coincidence Limit - MTD'.G37 'Annex B Coincidence Limit - MTD'.E22:'Annex B Coincidence Limit - MTD'.E37 'Annex B Coincidence Limit - MTD'.L21:'Annex B Coincidence Limit - MTD'.L21 'Annex B Coincidence Limit - MTD'.L22:'Annex B Coincidence Limit - MTD'.L37 'Annex B Coincidence Limit - MTD'.E22:'Annex B Coincidence Limit - MTD'.E37 'Annex B Coincidence Limit - MTD'.K21:'Annex B Coincidence Limit - MTD'.K21 'Annex B Coincidence Limit - MTD'.K22:'Annex B Coincidence Limit - MTD'.K37 'Annex B Coincidence Limit - MTD'.E22:'Annex B Coincidence Limit - MTD'.E37 'Annex B Coincidence Limit - MTD'.I21:'Annex B Coincidence Limit - MTD'.I21 'Annex B Coincidence Limit - MTD'.I22:'Annex B Coincidence Limit - MTD'.I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1" svg:width="20.348cm" svg:height="15.238cm" svg:x="24.798cm" svg:y="18.113cm">
            <draw:object draw:notify-on-update-of-ranges="'Annex B Coincidence Limit - MTD'.L22:'Annex B Coincidence Limit - MTD'.L37 'Annex B Coincidence Limit - MTD'.M22:'Annex B Coincidence Limit - MTD'.M22 'Annex B Coincidence Limit - MTD'.L22:'Annex B Coincidence Limit - MTD'.L37 'Annex B Coincidence Limit - MTD'.M22:'Annex B Coincidence Limit - MTD'.M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Text Frame 1" draw:style-name="gr4" draw:text-style-name="P3" svg:width="19.604cm" svg:height="10.409cm" svg:x="31.597cm" svg:y="7.34cm">
            <draw:text-box>
              <text:p>Procedure</text:p>
              <text:p/>
              <text:p>Make up concentrated suspension of RM8632a such that about 10ml or concentrate increases the tank contamination level by 10% of the estimated coincidence limit. Use the calculator in this worksheet to establish and record mass of dust and fluid volumes.</text:p>
              <text:p/>
              <text:p>Each time another dose is added, start a single online test with 2m flush and 6x 10ml portions. Discard the first portion of each test.</text:p>
              <text:p/>
              <text:p>The results are then imported into this spreadsheet and the portions averaged for each dose level.</text:p>
              <text:p/>
              <text:p>The averages are entered into the table as well as the added ml of concentrate for each dose.</text:p>
              <text:p/>
              <text:p>The counts are plotted in the figure and the first 4 results (10,20,30,40% nominal coincidence limit) used to generate a linear regression line.</text:p>
              <text:p/>
              <text:p>ENSURE UNIT REMAINS ONLINE SO RESULTS ARE LOGGED</text:p>
              <text:p/>
            </draw:text-box>
          </draw:frame>
        </table:shapes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ce20"/>
        <table:table-column table:style-name="co4" table:default-cell-style-name="ce233"/>
        <table:table-column table:style-name="co4" table:number-columns-repeated="979" table:default-cell-style-name="Default"/>
        <table:table-row table:style-name="ro7">
          <table:table-cell table:style-name="ce108" office:value-type="string" calcext:value-type="string">
            <text:p>Δ<text:span text:style-name="T2">COUNTS_4um</text:span> &lt; 5%</text:p>
          </table:table-cell>
          <table:table-cell table:style-name="ce130" office:value-type="string" calcext:value-type="string">
            <text:p>RM8632x</text:p>
          </table:table-cell>
          <table:table-cell table:style-name="ce108" office:value-type="string" calcext:value-type="string" table:number-columns-spanned="10" table:number-rows-spanned="1">
            <text:p>Annex B – Coincidence error limit</text:p>
            <text:p>Analyse <text:span text:style-name="T5">15 different concentrations</text:span> 5 times, of 10%...150% of manufacturer recommended coincidence limit. 0-40% regression line of 4um channel used to project results. Error limit when counts cross 95% of this line.</text:p>
          </table:table-cell>
          <table:covered-table-cell table:number-columns-repeated="9" table:style-name="ce130"/>
          <table:table-cell table:style-name="ce68"/>
          <table:table-cell table:style-name="ce149" office:value-type="string" calcext:value-type="string">
            <text:p>NAVAIR</text:p>
          </table:table-cell>
          <table:table-cell/>
          <table:table-cell table:style-name="ce68"/>
          <table:table-cell table:number-columns-repeated="12"/>
          <table:table-cell table:style-name="Default" table:number-columns-repeated="2"/>
          <table:table-cell table:number-columns-repeated="114"/>
          <table:table-cell table:style-name="ce68" table:number-columns-repeated="865"/>
        </table:table-row>
        <table:table-row table:style-name="ro2">
          <table:table-cell table:style-name="ce146" office:value-type="date" office:date-value="2025-05-15" calcext:value-type="date">
            <text:p>2025-05-15</text:p>
          </table:table-cell>
          <table:table-cell table:number-columns-repeated="27"/>
          <table:table-cell table:style-name="Default" table:number-columns-repeated="2"/>
          <table:table-cell table:number-columns-repeated="979"/>
        </table:table-row>
        <table:table-row table:style-name="ro2">
          <table:table-cell table:number-columns-repeated="13"/>
          <table:table-cell table:style-name="ce115" office:value-type="string" calcext:value-type="string">
            <text:p>APC Model</text:p>
          </table:table-cell>
          <table:table-cell table:style-name="ce117" table:number-columns-repeated="2"/>
          <table:table-cell table:style-name="ce166" office:value-type="string" calcext:value-type="string">
            <text:p>LPA3-NAVAIR</text:p>
          </table:table-cell>
          <table:table-cell table:number-columns-repeated="10"/>
          <table:table-cell table:style-name="ce92" office:value-type="string" calcext:value-type="string">
            <text:p>portion</text:p>
          </table:table-cell>
          <table:table-cell table:style-name="ce92"/>
          <table:table-cell table:style-name="Default"/>
          <table:table-cell table:number-columns-repeated="979"/>
        </table:table-row>
        <table:table-row table:style-name="ro2">
          <table:table-cell table:number-columns-repeated="13"/>
          <table:table-cell table:style-name="ce162" office:value-type="string" calcext:value-type="string">
            <text:p>APC S/N</text:p>
          </table:table-cell>
          <table:table-cell table:number-columns-repeated="2"/>
          <table:table-cell table:style-name="ce119" office:value-type="string" calcext:value-type="string">
            <text:p>11171-00011</text:p>
          </table:table-cell>
          <table:table-cell table:number-columns-repeated="9"/>
          <table:table-cell office:value-type="string" calcext:value-type="string">
            <text:p>D<text:span text:style-name="T6">Q</text:span></text:p>
          </table:table-cell>
          <table:table-cell table:style-name="ce92" office:value-type="string" calcext:value-type="string">
            <text:p>counts</text:p>
          </table:table-cell>
          <table:table-cell table:style-name="ce92" office:value-type="string" calcext:value-type="string">
            <text:p>Averaged</text:p>
          </table:table-cell>
          <table:table-cell table:style-name="Default" office:value-type="string" calcext:value-type="string">
            <text:p>Dq % (&lt;11%)</text:p>
          </table:table-cell>
          <table:table-cell table:number-columns-repeated="979"/>
        </table:table-row>
        <table:table-row table:style-name="ro2">
          <table:table-cell table:number-columns-repeated="13"/>
          <table:table-cell table:style-name="ce162" office:value-type="string" calcext:value-type="string">
            <text:p>Sensor S/N</text:p>
          </table:table-cell>
          <table:table-cell table:number-columns-repeated="2"/>
          <table:table-cell table:style-name="ce119" office:value-type="string" calcext:value-type="string">
            <text:p>11171-00011</text:p>
          </table:table-cell>
          <table:table-cell table:number-columns-repeated="10"/>
          <table:table-cell office:value-type="float" office:value="167569" calcext:value-type="float">
            <text:p>167569</text:p>
          </table:table-cell>
          <table:table-cell table:style-name="ce68"/>
          <table:table-cell table:style-name="Default"/>
          <table:table-cell table:number-columns-repeated="979"/>
        </table:table-row>
        <table:table-row table:style-name="ro2">
          <table:table-cell table:formula="of:=8073/5" office:value-type="float" office:value="1614.6" calcext:value-type="float">
            <text:p>1614.6</text:p>
          </table:table-cell>
          <table:table-cell office:value-type="string" calcext:value-type="string">
            <text:p>/ml/mg/l</text:p>
          </table:table-cell>
          <table:table-cell office:value-type="string" calcext:value-type="string">
            <text:p>MTD</text:p>
          </table:table-cell>
          <table:table-cell table:number-columns-repeated="5"/>
          <table:table-cell office:value-type="float" office:value="60000" calcext:value-type="float">
            <text:p>60000</text:p>
          </table:table-cell>
          <table:table-cell table:number-columns-repeated="4"/>
          <table:table-cell table:style-name="ce162" office:value-type="string" calcext:value-type="string">
            <text:p>Date</text:p>
          </table:table-cell>
          <table:table-cell table:number-columns-repeated="2"/>
          <table:table-cell table:style-name="ce168" office:value-type="date" office:date-value="2025-05-14" calcext:value-type="date">
            <text:p>2025-05-14</text:p>
          </table:table-cell>
          <table:table-cell table:number-columns-repeated="10"/>
          <table:table-cell office:value-type="float" office:value="169407" calcext:value-type="float">
            <text:p>169407</text:p>
          </table:table-cell>
          <table:table-cell table:style-name="Default" table:number-columns-repeated="2"/>
          <table:table-cell table:number-columns-repeated="979"/>
        </table:table-row>
        <table:table-row table:style-name="ro2">
          <table:table-cell office:value-type="float" office:value="10.33" calcext:value-type="float">
            <text:p>10.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nk fluid volume</text:p>
          </table:table-cell>
          <table:table-cell table:number-columns-repeated="10"/>
          <table:table-cell table:style-name="ce162" office:value-type="string" calcext:value-type="string">
            <text:p>Operator</text:p>
          </table:table-cell>
          <table:table-cell table:number-columns-repeated="2"/>
          <table:table-cell table:style-name="ce169" office:value-type="string" calcext:value-type="string">
            <text:p>JMD</text:p>
          </table:table-cell>
          <table:table-cell table:number-columns-repeated="10"/>
          <table:table-cell office:value-type="float" office:value="169243" calcext:value-type="float">
            <text:p>169243</text:p>
          </table:table-cell>
          <table:table-cell table:formula="of:=SUM([.AB5:.AB7])/3" office:value-type="float" office:value="168739.666666667" calcext:value-type="float">
            <text:p>168740</text:p>
          </table:table-cell>
          <table:table-cell table:formula="of:=(MAX([.AB5:.AB6])-MIN([.AB5:.AB6]))/[.AC7]*100" office:value-type="float" office:value="1.0892518850537" calcext:value-type="float">
            <text:p>1.1</text:p>
          </table:table-cell>
          <table:table-cell table:number-columns-repeated="979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Manufacturer recommended coincidence limit</text:p>
          </table:table-cell>
          <table:table-cell table:number-columns-repeated="10"/>
          <table:table-cell table:style-name="ce162" office:value-type="string" calcext:value-type="string">
            <text:p>Threshold Noise</text:p>
          </table:table-cell>
          <table:table-cell table:number-columns-repeated="2"/>
          <table:table-cell table:style-name="ce170" office:value-type="float" office:value="38" calcext:value-type="float">
            <text:p>38</text:p>
          </table:table-cell>
          <table:table-cell table:number-columns-repeated="10"/>
          <table:table-cell office:value-type="float" office:value="292859" calcext:value-type="float">
            <text:p>292859</text:p>
          </table:table-cell>
          <table:table-cell table:number-columns-repeated="981"/>
        </table:table-row>
        <table:table-row table:style-name="ro2">
          <table:table-cell table:formula="of:=[.A8]/10" office:value-type="float" office:value="2000" calcext:value-type="float">
            <text:p>20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10% of coincidence limit</text:p>
          </table:table-cell>
          <table:table-cell table:number-columns-repeated="10"/>
          <table:table-cell table:style-name="ce162"/>
          <table:table-cell table:number-columns-repeated="2"/>
          <table:table-cell table:style-name="ce171"/>
          <table:table-cell table:number-columns-repeated="10"/>
          <table:table-cell office:value-type="float" office:value="301110" calcext:value-type="float">
            <text:p>301110</text:p>
          </table:table-cell>
          <table:table-cell table:number-columns-repeated="981"/>
        </table:table-row>
        <table:table-row table:style-name="ro2">
          <table:table-cell table:style-name="ce32" table:formula="of:=[.A9]/[.A6]*[.A7]" office:value-type="float" office:value="12.7957388826954" calcext:value-type="float">
            <text:p>12.79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dust to add to tank per 10% estimated coincidence limit</text:p>
          </table:table-cell>
          <table:table-cell table:number-columns-repeated="10"/>
          <table:table-cell table:style-name="ce163" office:value-type="string" calcext:value-type="string">
            <text:p>Coincidence Correction</text:p>
          </table:table-cell>
          <table:table-cell table:style-name="ce94" table:number-columns-repeated="2"/>
          <table:table-cell table:style-name="ce172" office:value-type="string" calcext:value-type="string">
            <text:p>ENABLED</text:p>
          </table:table-cell>
          <table:table-cell table:number-columns-repeated="10"/>
          <table:table-cell office:value-type="float" office:value="299624" calcext:value-type="float">
            <text:p>299624</text:p>
          </table:table-cell>
          <table:table-cell table:number-columns-repeated="981"/>
        </table:table-row>
        <table:table-row table:style-name="ro2">
          <table:table-cell table:style-name="ce53" table:formula="of:=[.A10]*100" office:value-type="float" office:value="1279.57388826954" calcext:value-type="float">
            <text:p>1279.57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Required concentration of concentrate if want this per 10ml of concentrate</text:p>
          </table:table-cell>
          <table:table-cell table:number-columns-repeated="24"/>
          <table:table-cell office:value-type="float" office:value="285382" calcext:value-type="float">
            <text:p>285382</text:p>
          </table:table-cell>
          <table:table-cell table:formula="of:=SUM([.AB8:.AB11])/4" office:value-type="float" office:value="294743.75" calcext:value-type="float">
            <text:p>294744</text:p>
          </table:table-cell>
          <table:table-cell table:formula="of:=(MAX([.AB8:.AB10])-MIN([.AB8:.AB10]))/[.AC11]*100" office:value-type="float" office:value="2.7993808180835" calcext:value-type="float">
            <text:p>2.8</text:p>
          </table:table-cell>
          <table:table-cell table:number-columns-repeated="97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ount of fluid to use to make up concentrate</text:p>
          </table:table-cell>
          <table:table-cell table:number-columns-repeated="24"/>
          <table:table-cell office:value-type="float" office:value="458207" calcext:value-type="float">
            <text:p>458207</text:p>
          </table:table-cell>
          <table:table-cell table:number-columns-repeated="981"/>
        </table:table-row>
        <table:table-row table:style-name="ro2">
          <table:table-cell table:style-name="ce126" table:formula="of:=[.A11]*[.A12]/1000" office:value-type="float" office:value="255.914777653908" calcext:value-type="float">
            <text:p>255.9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mount of dust to add to fluid used to make up concentrate.</text:p>
          </table:table-cell>
          <table:table-cell table:number-columns-repeated="24"/>
          <table:table-cell office:value-type="float" office:value="465138" calcext:value-type="float">
            <text:p>465138</text:p>
          </table:table-cell>
          <table:table-cell table:number-columns-repeated="981"/>
        </table:table-row>
        <table:table-row table:style-name="ro2">
          <table:table-cell office:value-type="float" office:value="256.58" calcext:value-type="float">
            <text:p>256.5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dded</text:p>
          </table:table-cell>
          <table:table-cell table:number-columns-repeated="24"/>
          <table:table-cell office:value-type="float" office:value="454200" calcext:value-type="float">
            <text:p>454200</text:p>
          </table:table-cell>
          <table:table-cell table:number-columns-repeated="981"/>
        </table:table-row>
        <table:table-row table:style-name="ro2">
          <table:table-cell table:style-name="ce53" table:formula="of:=[.A11]*[.A14]/[.A13]" office:value-type="float" office:value="1282.9" calcext:value-type="float">
            <text:p>1282.9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Actual concentration</text:p>
          </table:table-cell>
          <table:table-cell table:number-columns-repeated="24"/>
          <table:table-cell office:value-type="float" office:value="445750" calcext:value-type="float">
            <text:p>445750</text:p>
          </table:table-cell>
          <table:table-cell table:number-columns-repeated="981"/>
        </table:table-row>
        <table:table-row table:style-name="ro2">
          <table:table-cell table:style-name="ce53" table:formula="of:=[.A13]/[.A14]*10" office:value-type="float" office:value="9.97407349185081" calcext:value-type="float">
            <text:p>9.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rrected volume to add to tank</text:p>
          </table:table-cell>
          <table:table-cell table:number-columns-repeated="24"/>
          <table:table-cell office:value-type="float" office:value="443747" calcext:value-type="float">
            <text:p>44374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453143" calcext:value-type="float">
            <text:p>453143</text:p>
          </table:table-cell>
          <table:table-cell table:number-columns-repeated="981"/>
        </table:table-row>
        <table:table-row table:style-name="ro2">
          <table:table-cell table:style-name="ce127" office:value-type="float" office:value="1000000000" calcext:value-type="float">
            <text:p>1.00E+09</text:p>
          </table:table-cell>
          <table:table-cell/>
          <table:table-cell office:value-type="string" calcext:value-type="string">
            <text:p>correction threshold</text:p>
          </table:table-cell>
          <table:table-cell table:number-columns-repeated="24"/>
          <table:table-cell office:value-type="float" office:value="436276" calcext:value-type="float">
            <text:p>436276</text:p>
          </table:table-cell>
          <table:table-cell table:number-columns-repeated="981"/>
        </table:table-row>
        <table:table-row table:style-name="ro2"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orrection factor</text:p>
          </table:table-cell>
          <table:table-cell table:number-columns-repeated="24"/>
          <table:table-cell office:value-type="float" office:value="454474" calcext:value-type="float">
            <text:p>454474</text:p>
          </table:table-cell>
          <table:table-cell table:number-columns-repeated="981"/>
        </table:table-row>
        <table:table-row table:style-name="ro2">
          <table:table-cell table:style-name="ce48" table:number-columns-repeated="2"/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Added</text:p>
          </table:table-cell>
          <table:table-cell table:style-name="ce48" office:value-type="string" calcext:value-type="string">
            <text:p>Tank</text:p>
          </table:table-cell>
          <table:table-cell table:style-name="ce48" office:value-type="string" calcext:value-type="string">
            <text:p>Expected</text:p>
          </table:table-cell>
          <table:table-cell table:style-name="ce48" office:value-type="string" calcext:value-type="string">
            <text:p>4μm</text:p>
          </table:table-cell>
          <table:table-cell table:style-name="ce48" office:value-type="string" calcext:value-type="string">
            <text:p>Ratio</text:p>
          </table:table-cell>
          <table:table-cell table:style-name="ce48" office:value-type="string" calcext:value-type="string">
            <text:p>Regression</text:p>
          </table:table-cell>
          <table:table-cell table:style-name="ce48" office:value-type="string" calcext:value-type="string">
            <text:p>Relative</text:p>
          </table:table-cell>
          <table:table-cell table:style-name="ce48" table:number-columns-repeated="2"/>
          <table:table-cell table:style-name="ce48" office:value-type="string" calcext:value-type="string">
            <text:p>corrected</text:p>
          </table:table-cell>
          <table:table-cell table:number-columns-repeated="14"/>
          <table:table-cell office:value-type="float" office:value="454993" calcext:value-type="float">
            <text:p>454993</text:p>
          </table:table-cell>
          <table:table-cell table:number-columns-repeated="981"/>
        </table:table-row>
        <table:table-row table:style-name="ro2">
          <table:table-cell table:style-name="ce49" office:value-type="string" calcext:value-type="string">
            <text:p>Percent</text:p>
          </table:table-cell>
          <table:table-cell table:style-name="ce49" office:value-type="string" calcext:value-type="string">
            <text:p>Added ml</text:p>
          </table:table-cell>
          <table:table-cell table:style-name="ce49" office:value-type="string" calcext:value-type="string">
            <text:p>added</text:p>
          </table:table-cell>
          <table:table-cell table:style-name="ce49" office:value-type="string" calcext:value-type="string">
            <text:p>Dust mg</text:p>
          </table:table-cell>
          <table:table-cell table:style-name="ce49" office:value-type="string" calcext:value-type="string">
            <text:p>Conc mg/l</text:p>
          </table:table-cell>
          <table:table-cell table:style-name="ce49" office:value-type="string" calcext:value-type="string">
            <text:p>4μm/100ml</text:p>
          </table:table-cell>
          <table:table-cell table:style-name="ce49" office:value-type="string" calcext:value-type="string">
            <text:p>Actual</text:p>
          </table:table-cell>
          <table:table-cell table:style-name="ce49" office:value-type="string" calcext:value-type="string">
            <text:p>RM8632a</text:p>
          </table:table-cell>
          <table:table-cell table:style-name="ce49" office:value-type="string" calcext:value-type="string">
            <text:p>Line 0-40%</text:p>
          </table:table-cell>
          <table:table-cell table:style-name="ce49" office:value-type="string" calcext:value-type="string">
            <text:p>Deviation</text:p>
          </table:table-cell>
          <table:table-cell table:style-name="ce70" table:formula="of:=&quot;95%&quot;" office:value-type="string" office:string-value="95%" calcext:value-type="string">
            <text:p>95%</text:p>
          </table:table-cell>
          <table:table-cell table:style-name="ce49" office:value-type="string" calcext:value-type="string">
            <text:p>corrected</text:p>
          </table:table-cell>
          <table:table-cell table:style-name="ce49" office:value-type="string" calcext:value-type="string">
            <text:p>fraction</text:p>
          </table:table-cell>
          <table:table-cell table:number-columns-repeated="14"/>
          <table:table-cell office:value-type="float" office:value="462615" calcext:value-type="float">
            <text:p>462615</text:p>
          </table:table-cell>
          <table:table-cell table:formula="of:=SUM([.AB12:.AB21])/(17-8+1)" office:value-type="float" office:value="452854.3" calcext:value-type="float">
            <text:p>452854</text:p>
          </table:table-cell>
          <table:table-cell table:formula="of:=(MAX([.AB12:.AB20])-MIN([.AB12:.AB20]))/[.AC21]*100" office:value-type="float" office:value="6.37335231221168" calcext:value-type="float">
            <text:p>6.4</text:p>
          </table:table-cell>
          <table:table-cell table:number-columns-repeated="979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.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/>
          <table:table-cell table:number-columns-repeated="2" table:style-name="ce50" office:value-type="float" office:value="1" calcext:value-type="float">
            <text:p>1</text:p>
          </table:table-cell>
          <table:table-cell table:style-name="ce71" table:formula="of:=[.I22]*0.95" office:value-type="float" office:value="0.95" calcext:value-type="float">
            <text:p>0.95</text:p>
          </table:table-cell>
          <table:table-cell table:style-name="ce72" table:formula="of:=IF([.G22]&lt;[.$A$18]; [.G22]; [.G22]*(1+[.G22]/[.$A$18]*[.$A$19]))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4"/>
          <table:table-cell office:value-type="float" office:value="578672" calcext:value-type="float">
            <text:p>578672</text:p>
          </table:table-cell>
          <table:table-cell table:number-columns-repeated="981"/>
        </table:table-row>
        <table:table-row table:style-name="ro2">
          <table:table-cell table:number-columns-repeated="2" table:style-name="ce50" office:value-type="float" office:value="10" calcext:value-type="float">
            <text:p>10</text:p>
          </table:table-cell>
          <table:table-cell table:style-name="ce58" table:formula="of:=[.B23]" office:value-type="float" office:value="10" calcext:value-type="float">
            <text:p>10.0</text:p>
          </table:table-cell>
          <table:table-cell table:style-name="ce61" table:formula="of:=[.C23]*[.$A$15]/1000" office:value-type="float" office:value="12.829" calcext:value-type="float">
            <text:p>12.829</text:p>
          </table:table-cell>
          <table:table-cell table:style-name="ce61" table:formula="of:=[.D23]/([.$A$7]+[.C23]/1000)" office:value-type="float" office:value="1.24071566731141" calcext:value-type="float">
            <text:p>1.241</text:p>
          </table:table-cell>
          <table:table-cell table:style-name="ce64" table:formula="of:=[.$A$6]*[.E23]*100" office:value-type="float" office:value="200325.951644101" calcext:value-type="float">
            <text:p>200326</text:p>
          </table:table-cell>
          <table:table-cell table:style-name="ce50"/>
          <table:table-cell table:style-name="ce67" table:formula="of:=[.G23]/[.F23]" office:value-type="float" office:value="0" calcext:value-type="float">
            <text:p>0.00</text:p>
          </table:table-cell>
          <table:table-cell table:style-name="ce64" table:formula="of:=[.E23]*[.$C$99]" office:value-type="string" office:string-value="" calcext:value-type="error">
            <text:p>Err:502</text:p>
          </table:table-cell>
          <table:table-cell table:style-name="ce67" table:formula="of:=[.G23]/[.I23]" office:value-type="string" office:string-value="" calcext:value-type="error">
            <text:p>Err:502</text:p>
          </table:table-cell>
          <table:table-cell table:style-name="ce64" table:formula="of:=[.I23]*0.95" office:value-type="string" office:string-value="" calcext:value-type="error">
            <text:p>Err:502</text:p>
          </table:table-cell>
          <table:table-cell table:style-name="ce72" table:formula="of:=IF([.G23]&lt;[.$A$18]; [.G23]; [.G23]*(1+[.G23]/[.$A$18]*[.$A$19]))" office:value-type="float" office:value="0" calcext:value-type="float">
            <text:p>0</text:p>
          </table:table-cell>
          <table:table-cell table:style-name="ce74" table:formula="of:=[.L23]/[.I23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581090" calcext:value-type="float">
            <text:p>581090</text:p>
          </table:table-cell>
          <table:table-cell table:number-columns-repeated="981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3]+[.B24]" office:value-type="float" office:value="20" calcext:value-type="float">
            <text:p>20.0</text:p>
          </table:table-cell>
          <table:table-cell table:style-name="ce61" table:formula="of:=[.C24]*[.$A$15]/1000" office:value-type="float" office:value="25.658" calcext:value-type="float">
            <text:p>25.658</text:p>
          </table:table-cell>
          <table:table-cell table:style-name="ce61" table:formula="of:=[.D24]/([.$A$7]+[.C24]/1000)" office:value-type="float" office:value="2.47903381642512" calcext:value-type="float">
            <text:p>2.479</text:p>
          </table:table-cell>
          <table:table-cell table:style-name="ce64" table:formula="of:=[.$A$6]*[.E24]*100" office:value-type="float" office:value="400264.8" calcext:value-type="float">
            <text:p>400265</text:p>
          </table:table-cell>
          <table:table-cell table:style-name="ce50"/>
          <table:table-cell table:style-name="ce67" table:formula="of:=[.G24]/[.F24]" office:value-type="float" office:value="0" calcext:value-type="float">
            <text:p>0.00</text:p>
          </table:table-cell>
          <table:table-cell table:style-name="ce64" table:formula="of:=[.E24]*[.$C$99]" office:value-type="string" office:string-value="" calcext:value-type="error">
            <text:p>Err:502</text:p>
          </table:table-cell>
          <table:table-cell table:style-name="ce67" table:formula="of:=[.G24]/[.I24]" office:value-type="string" office:string-value="" calcext:value-type="error">
            <text:p>Err:502</text:p>
          </table:table-cell>
          <table:table-cell table:style-name="ce64" table:formula="of:=[.I24]*0.95" office:value-type="string" office:string-value="" calcext:value-type="error">
            <text:p>Err:502</text:p>
          </table:table-cell>
          <table:table-cell table:style-name="ce72" table:formula="of:=IF([.G24]&lt;[.$A$18]; [.G24]; [.G24]*(1+[.G24]/[.$A$18]*[.$A$19]))" office:value-type="float" office:value="0" calcext:value-type="float">
            <text:p>0</text:p>
          </table:table-cell>
          <table:table-cell table:style-name="ce74" table:formula="of:=[.L24]/[.I24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592101" calcext:value-type="float">
            <text:p>592101</text:p>
          </table:table-cell>
          <table:table-cell table:number-columns-repeated="981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4]+[.B25]" office:value-type="float" office:value="30" calcext:value-type="float">
            <text:p>30.0</text:p>
          </table:table-cell>
          <table:table-cell table:style-name="ce61" table:formula="of:=[.C25]*[.$A$15]/1000" office:value-type="float" office:value="38.487" calcext:value-type="float">
            <text:p>38.487</text:p>
          </table:table-cell>
          <table:table-cell table:style-name="ce61" table:formula="of:=[.D25]/([.$A$7]+[.C25]/1000)" office:value-type="float" office:value="3.71496138996139" calcext:value-type="float">
            <text:p>3.715</text:p>
          </table:table-cell>
          <table:table-cell table:style-name="ce64" table:formula="of:=[.$A$6]*[.E25]*100" office:value-type="float" office:value="599817.666023166" calcext:value-type="float">
            <text:p>599818</text:p>
          </table:table-cell>
          <table:table-cell table:style-name="ce50"/>
          <table:table-cell table:style-name="ce67" table:formula="of:=[.G25]/[.F25]" office:value-type="float" office:value="0" calcext:value-type="float">
            <text:p>0.00</text:p>
          </table:table-cell>
          <table:table-cell table:style-name="ce64" table:formula="of:=[.E25]*[.$C$99]" office:value-type="string" office:string-value="" calcext:value-type="error">
            <text:p>Err:502</text:p>
          </table:table-cell>
          <table:table-cell table:style-name="ce67" table:formula="of:=[.G25]/[.I25]" office:value-type="string" office:string-value="" calcext:value-type="error">
            <text:p>Err:502</text:p>
          </table:table-cell>
          <table:table-cell table:style-name="ce64" table:formula="of:=[.I25]*0.95" office:value-type="string" office:string-value="" calcext:value-type="error">
            <text:p>Err:502</text:p>
          </table:table-cell>
          <table:table-cell table:style-name="ce72" table:formula="of:=IF([.G25]&lt;[.$A$18]; [.G25]; [.G25]*(1+[.G25]/[.$A$18]*[.$A$19]))" office:value-type="float" office:value="0" calcext:value-type="float">
            <text:p>0</text:p>
          </table:table-cell>
          <table:table-cell table:style-name="ce74" table:formula="of:=[.L25]/[.I25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600145" calcext:value-type="float">
            <text:p>600145</text:p>
          </table:table-cell>
          <table:table-cell table:number-columns-repeated="981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5]+[.B26]" office:value-type="float" office:value="40" calcext:value-type="float">
            <text:p>40.0</text:p>
          </table:table-cell>
          <table:table-cell table:style-name="ce61" table:formula="of:=[.C26]*[.$A$15]/1000" office:value-type="float" office:value="51.316" calcext:value-type="float">
            <text:p>51.316</text:p>
          </table:table-cell>
          <table:table-cell table:style-name="ce61" table:formula="of:=[.D26]/([.$A$7]+[.C26]/1000)" office:value-type="float" office:value="4.94850530376085" calcext:value-type="float">
            <text:p>4.949</text:p>
          </table:table-cell>
          <table:table-cell table:style-name="ce64" table:formula="of:=[.$A$6]*[.E26]*100" office:value-type="float" office:value="798985.666345227" calcext:value-type="float">
            <text:p>798986</text:p>
          </table:table-cell>
          <table:table-cell table:style-name="ce50"/>
          <table:table-cell table:style-name="ce67" table:formula="of:=[.G26]/[.F26]" office:value-type="float" office:value="0" calcext:value-type="float">
            <text:p>0.00</text:p>
          </table:table-cell>
          <table:table-cell table:style-name="ce64" table:formula="of:=[.E26]*[.$C$99]" office:value-type="string" office:string-value="" calcext:value-type="error">
            <text:p>Err:502</text:p>
          </table:table-cell>
          <table:table-cell table:style-name="ce67" table:formula="of:=[.G26]/[.I26]" office:value-type="string" office:string-value="" calcext:value-type="error">
            <text:p>Err:502</text:p>
          </table:table-cell>
          <table:table-cell table:style-name="ce64" table:formula="of:=[.I26]*0.95" office:value-type="string" office:string-value="" calcext:value-type="error">
            <text:p>Err:502</text:p>
          </table:table-cell>
          <table:table-cell table:style-name="ce72" table:formula="of:=IF([.G26]&lt;[.$A$18]; [.G26]; [.G26]*(1+[.G26]/[.$A$18]*[.$A$19]))" office:value-type="float" office:value="0" calcext:value-type="float">
            <text:p>0</text:p>
          </table:table-cell>
          <table:table-cell table:style-name="ce74" table:formula="of:=[.L26]/[.I26]" office:value-type="string" office:string-value="" calcext:value-type="error">
            <text:p>Err:502</text:p>
          </table:table-cell>
          <table:table-cell table:number-columns-repeated="2"/>
          <table:table-cell table:style-name="ce92" table:number-columns-repeated="2"/>
          <table:table-cell table:number-columns-repeated="10"/>
          <table:table-cell office:value-type="float" office:value="599839" calcext:value-type="float">
            <text:p>599839</text:p>
          </table:table-cell>
          <table:table-cell table:number-columns-repeated="2"/>
          <table:table-cell table:style-name="ce92" table:number-columns-repeated="979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6]+[.B27]" office:value-type="float" office:value="50" calcext:value-type="float">
            <text:p>50.0</text:p>
          </table:table-cell>
          <table:table-cell table:style-name="ce61" table:formula="of:=[.C27]*[.$A$15]/1000" office:value-type="float" office:value="64.145" calcext:value-type="float">
            <text:p>64.145</text:p>
          </table:table-cell>
          <table:table-cell table:style-name="ce61" table:formula="of:=[.D27]/([.$A$7]+[.C27]/1000)" office:value-type="float" office:value="6.17967244701349" calcext:value-type="float">
            <text:p>6.180</text:p>
          </table:table-cell>
          <table:table-cell table:style-name="ce64" table:formula="of:=[.$A$6]*[.E27]*100" office:value-type="float" office:value="997769.913294798" calcext:value-type="float">
            <text:p>997770</text:p>
          </table:table-cell>
          <table:table-cell table:style-name="ce50"/>
          <table:table-cell table:style-name="ce67" table:formula="of:=[.G27]/[.F27]" office:value-type="float" office:value="0" calcext:value-type="float">
            <text:p>0.00</text:p>
          </table:table-cell>
          <table:table-cell table:style-name="ce64" table:formula="of:=[.E27]*[.$C$99]" office:value-type="string" office:string-value="" calcext:value-type="error">
            <text:p>Err:502</text:p>
          </table:table-cell>
          <table:table-cell table:style-name="ce67" table:formula="of:=[.G27]/[.I27]" office:value-type="string" office:string-value="" calcext:value-type="error">
            <text:p>Err:502</text:p>
          </table:table-cell>
          <table:table-cell table:style-name="ce64" table:formula="of:=[.I27]*0.95" office:value-type="string" office:string-value="" calcext:value-type="error">
            <text:p>Err:502</text:p>
          </table:table-cell>
          <table:table-cell table:style-name="ce72" table:formula="of:=IF([.G27]&lt;[.$A$18]; [.G27]; [.G27]*(1+[.G27]/[.$A$18]*[.$A$19]))" office:value-type="float" office:value="0" calcext:value-type="float">
            <text:p>0</text:p>
          </table:table-cell>
          <table:table-cell table:style-name="ce74" table:formula="of:=[.L27]/[.I27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606849" calcext:value-type="float">
            <text:p>606849</text:p>
          </table:table-cell>
          <table:table-cell table:number-columns-repeated="981"/>
        </table:table-row>
        <table:table-row table:style-name="ro2">
          <table:table-cell table:style-name="ce131" office:value-type="float" office:value="60" calcext:value-type="float">
            <text:p>60</text:p>
          </table:table-cell>
          <table:table-cell table:style-name="ce50" office:value-type="float" office:value="10" calcext:value-type="float">
            <text:p>10</text:p>
          </table:table-cell>
          <table:table-cell table:style-name="ce135" table:formula="of:=[.C27]+[.B28]" office:value-type="float" office:value="60" calcext:value-type="float">
            <text:p>60.0</text:p>
          </table:table-cell>
          <table:table-cell table:style-name="ce138" table:formula="of:=[.C28]*[.$A$15]/1000" office:value-type="float" office:value="76.974" calcext:value-type="float">
            <text:p>76.974</text:p>
          </table:table-cell>
          <table:table-cell table:style-name="ce138" table:formula="of:=[.D28]/([.$A$7]+[.C28]/1000)" office:value-type="float" office:value="7.40846968238691" calcext:value-type="float">
            <text:p>7.408</text:p>
          </table:table-cell>
          <table:table-cell table:style-name="ce141" table:formula="of:=[.$A$6]*[.E28]*100" office:value-type="float" office:value="1196171.51491819" calcext:value-type="float">
            <text:p>1196172</text:p>
          </table:table-cell>
          <table:table-cell table:style-name="ce51"/>
          <table:table-cell table:style-name="ce150" table:formula="of:=[.G28]/[.F28]" office:value-type="float" office:value="0" calcext:value-type="float">
            <text:p>0.00</text:p>
          </table:table-cell>
          <table:table-cell table:style-name="ce141" table:formula="of:=[.E28]*[.$C$99]" office:value-type="string" office:string-value="" calcext:value-type="error">
            <text:p>Err:502</text:p>
          </table:table-cell>
          <table:table-cell table:style-name="ce150" table:formula="of:=[.G28]/[.I28]" office:value-type="string" office:string-value="" calcext:value-type="error">
            <text:p>Err:502</text:p>
          </table:table-cell>
          <table:table-cell table:style-name="ce141" table:formula="of:=[.I28]*0.95" office:value-type="string" office:string-value="" calcext:value-type="error">
            <text:p>Err:502</text:p>
          </table:table-cell>
          <table:table-cell table:style-name="ce156" table:formula="of:=IF([.G28]&lt;[.$A$18]; [.G28]; [.G28]*(1+[.G28]/[.$A$18]*[.$A$19]))" office:value-type="float" office:value="0" calcext:value-type="float">
            <text:p>0</text:p>
          </table:table-cell>
          <table:table-cell table:style-name="ce159" table:formula="of:=[.L28]/[.I28]" office:value-type="string" office:string-value="" calcext:value-type="error">
            <text:p>Err:502</text:p>
          </table:table-cell>
          <table:table-cell table:style-name="ce164" table:number-columns-repeated="14"/>
          <table:table-cell table:style-name="ce164" office:value-type="float" office:value="607236" calcext:value-type="float">
            <text:p>607236</text:p>
          </table:table-cell>
          <table:table-cell table:style-name="ce173"/>
          <table:table-cell table:style-name="ce176"/>
          <table:table-cell table:style-name="ce164" table:number-columns-repeated="979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8]+[.B29]" office:value-type="float" office:value="70" calcext:value-type="float">
            <text:p>70.0</text:p>
          </table:table-cell>
          <table:table-cell table:style-name="ce61" table:formula="of:=[.C29]*[.$A$15]/1000" office:value-type="float" office:value="89.803" calcext:value-type="float">
            <text:p>89.803</text:p>
          </table:table-cell>
          <table:table-cell table:style-name="ce61" table:formula="of:=[.D29]/([.$A$7]+[.C29]/1000)" office:value-type="float" office:value="8.63490384615384" calcext:value-type="float">
            <text:p>8.635</text:p>
          </table:table-cell>
          <table:table-cell table:style-name="ce64" table:formula="of:=[.$A$6]*[.E29]*100" office:value-type="float" office:value="1394191.575" calcext:value-type="float">
            <text:p>1394192</text:p>
          </table:table-cell>
          <table:table-cell table:style-name="ce50"/>
          <table:table-cell table:style-name="ce67" table:formula="of:=[.G29]/[.F29]" office:value-type="float" office:value="0" calcext:value-type="float">
            <text:p>0.00</text:p>
          </table:table-cell>
          <table:table-cell table:style-name="ce64" table:formula="of:=[.E29]*[.$C$99]" office:value-type="string" office:string-value="" calcext:value-type="error">
            <text:p>Err:502</text:p>
          </table:table-cell>
          <table:table-cell table:style-name="ce67" table:formula="of:=[.G29]/[.I29]" office:value-type="string" office:string-value="" calcext:value-type="error">
            <text:p>Err:502</text:p>
          </table:table-cell>
          <table:table-cell table:style-name="ce64" table:formula="of:=[.I29]*0.95" office:value-type="string" office:string-value="" calcext:value-type="error">
            <text:p>Err:502</text:p>
          </table:table-cell>
          <table:table-cell table:style-name="ce72" table:formula="of:=IF([.G29]&lt;[.$A$18]; [.G29]; [.G29]*(1+[.G29]/[.$A$18]*[.$A$19]))" office:value-type="float" office:value="0" calcext:value-type="float">
            <text:p>0</text:p>
          </table:table-cell>
          <table:table-cell table:style-name="ce74" table:formula="of:=[.L29]/[.I29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615108" calcext:value-type="float">
            <text:p>615108</text:p>
          </table:table-cell>
          <table:table-cell table:formula="of:=SUM([.AB22:.AB29])/8" office:value-type="float" office:value="597630" calcext:value-type="float">
            <text:p>597630</text:p>
          </table:table-cell>
          <table:table-cell table:formula="of:=(MAX([.AB22:.AB28])-MIN([.AB22:.AB28]))/[.AC29]*100" office:value-type="float" office:value="4.77954587286448" calcext:value-type="float">
            <text:p>4.8</text:p>
          </table:table-cell>
          <table:table-cell table:number-columns-repeated="979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29]+[.B30]" office:value-type="float" office:value="80" calcext:value-type="float">
            <text:p>80.0</text:p>
          </table:table-cell>
          <table:table-cell table:style-name="ce61" table:formula="of:=[.C30]*[.$A$15]/1000" office:value-type="float" office:value="102.632" calcext:value-type="float">
            <text:p>102.632</text:p>
          </table:table-cell>
          <table:table-cell table:style-name="ce61" table:formula="of:=[.D30]/([.$A$7]+[.C30]/1000)" office:value-type="float" office:value="9.85898174831892" calcext:value-type="float">
            <text:p>9.859</text:p>
          </table:table-cell>
          <table:table-cell table:style-name="ce64" table:formula="of:=[.$A$6]*[.E30]*100" office:value-type="float" office:value="1591831.19308357" calcext:value-type="float">
            <text:p>1591831</text:p>
          </table:table-cell>
          <table:table-cell table:style-name="ce50"/>
          <table:table-cell table:style-name="ce67" table:formula="of:=[.G30]/[.F30]" office:value-type="float" office:value="0" calcext:value-type="float">
            <text:p>0.00</text:p>
          </table:table-cell>
          <table:table-cell table:style-name="ce64" table:formula="of:=[.E30]*[.$C$99]" office:value-type="string" office:string-value="" calcext:value-type="error">
            <text:p>Err:502</text:p>
          </table:table-cell>
          <table:table-cell table:style-name="ce67" table:formula="of:=[.G30]/[.I30]" office:value-type="string" office:string-value="" calcext:value-type="error">
            <text:p>Err:502</text:p>
          </table:table-cell>
          <table:table-cell table:style-name="ce64" table:formula="of:=[.I30]*0.95" office:value-type="string" office:string-value="" calcext:value-type="error">
            <text:p>Err:502</text:p>
          </table:table-cell>
          <table:table-cell table:style-name="ce72" table:formula="of:=IF([.G30]&lt;[.$A$18]; [.G30]; [.G30]*(1+[.G30]/[.$A$18]*[.$A$19]))" office:value-type="float" office:value="0" calcext:value-type="float">
            <text:p>0</text:p>
          </table:table-cell>
          <table:table-cell table:style-name="ce74" table:formula="of:=[.L30]/[.I30]" office:value-type="string" office:string-value="" calcext:value-type="error">
            <text:p>Err:502</text:p>
          </table:table-cell>
          <table:table-cell table:number-columns-repeated="14"/>
          <table:table-cell table:style-name="ce92" office:value-type="float" office:value="723681" calcext:value-type="float">
            <text:p>723681</text:p>
          </table:table-cell>
          <table:table-cell table:style-name="ce75"/>
          <table:table-cell table:number-columns-repeated="980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0]+[.B31]" office:value-type="float" office:value="90" calcext:value-type="float">
            <text:p>90.0</text:p>
          </table:table-cell>
          <table:table-cell table:style-name="ce61" table:formula="of:=[.C31]*[.$A$15]/1000" office:value-type="float" office:value="115.461" calcext:value-type="float">
            <text:p>115.461</text:p>
          </table:table-cell>
          <table:table-cell table:style-name="ce61" table:formula="of:=[.D31]/([.$A$7]+[.C31]/1000)" office:value-type="float" office:value="11.0807101727447" calcext:value-type="float">
            <text:p>11.081</text:p>
          </table:table-cell>
          <table:table-cell table:style-name="ce64" table:formula="of:=[.$A$6]*[.E31]*100" office:value-type="float" office:value="1789091.46449136" calcext:value-type="float">
            <text:p>1789091</text:p>
          </table:table-cell>
          <table:table-cell table:style-name="ce50"/>
          <table:table-cell table:style-name="ce67" table:formula="of:=[.G31]/[.F31]" office:value-type="float" office:value="0" calcext:value-type="float">
            <text:p>0.00</text:p>
          </table:table-cell>
          <table:table-cell table:style-name="ce64" table:formula="of:=[.E31]*[.$C$99]" office:value-type="string" office:string-value="" calcext:value-type="error">
            <text:p>Err:502</text:p>
          </table:table-cell>
          <table:table-cell table:style-name="ce67" table:formula="of:=[.G31]/[.I31]" office:value-type="string" office:string-value="" calcext:value-type="error">
            <text:p>Err:502</text:p>
          </table:table-cell>
          <table:table-cell table:style-name="ce64" table:formula="of:=[.I31]*0.95" office:value-type="string" office:string-value="" calcext:value-type="error">
            <text:p>Err:502</text:p>
          </table:table-cell>
          <table:table-cell table:style-name="ce72" table:formula="of:=IF([.G31]&lt;[.$A$18]; [.G31]; [.G31]*(1+[.G31]/[.$A$18]*[.$A$19]))" office:value-type="float" office:value="0" calcext:value-type="float">
            <text:p>0</text:p>
          </table:table-cell>
          <table:table-cell table:style-name="ce74" table:formula="of:=[.L31]/[.I31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707528" calcext:value-type="float">
            <text:p>707528</text:p>
          </table:table-cell>
          <table:table-cell table:number-columns-repeated="981"/>
        </table:table-row>
        <table:table-row table:style-name="ro2"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1]+[.B32]" office:value-type="float" office:value="100" calcext:value-type="float">
            <text:p>100.0</text:p>
          </table:table-cell>
          <table:table-cell table:style-name="ce61" table:formula="of:=[.C32]*[.$A$15]/1000" office:value-type="float" office:value="128.29" calcext:value-type="float">
            <text:p>128.290</text:p>
          </table:table-cell>
          <table:table-cell table:style-name="ce61" table:formula="of:=[.D32]/([.$A$7]+[.C32]/1000)" office:value-type="float" office:value="12.3000958772771" calcext:value-type="float">
            <text:p>12.300</text:p>
          </table:table-cell>
          <table:table-cell table:style-name="ce64" table:formula="of:=[.$A$6]*[.E32]*100" office:value-type="float" office:value="1985973.48034516" calcext:value-type="float">
            <text:p>1985973</text:p>
          </table:table-cell>
          <table:table-cell table:style-name="ce50"/>
          <table:table-cell table:style-name="ce67" table:formula="of:=[.G32]/[.F32]" office:value-type="float" office:value="0" calcext:value-type="float">
            <text:p>0.00</text:p>
          </table:table-cell>
          <table:table-cell table:style-name="ce64" table:formula="of:=[.E32]*[.$C$99]" office:value-type="string" office:string-value="" calcext:value-type="error">
            <text:p>Err:502</text:p>
          </table:table-cell>
          <table:table-cell table:style-name="ce67" table:formula="of:=[.G32]/[.I32]" office:value-type="string" office:string-value="" calcext:value-type="error">
            <text:p>Err:502</text:p>
          </table:table-cell>
          <table:table-cell table:style-name="ce64" table:formula="of:=[.I32]*0.95" office:value-type="string" office:string-value="" calcext:value-type="error">
            <text:p>Err:502</text:p>
          </table:table-cell>
          <table:table-cell table:style-name="ce72" table:formula="of:=IF([.G32]&lt;[.$A$18]; [.G32]; [.G32]*(1+[.G32]/[.$A$18]*[.$A$19]))" office:value-type="float" office:value="0" calcext:value-type="float">
            <text:p>0</text:p>
          </table:table-cell>
          <table:table-cell table:style-name="ce74" table:formula="of:=[.L32]/[.I32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726643" calcext:value-type="float">
            <text:p>726643</text:p>
          </table:table-cell>
          <table:table-cell table:number-columns-repeated="981"/>
        </table:table-row>
        <table:table-row table:style-name="ro2"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2]+[.B33]" office:value-type="float" office:value="110" calcext:value-type="float">
            <text:p>110.0</text:p>
          </table:table-cell>
          <table:table-cell table:style-name="ce61" table:formula="of:=[.C33]*[.$A$15]/1000" office:value-type="float" office:value="141.119" calcext:value-type="float">
            <text:p>141.119</text:p>
          </table:table-cell>
          <table:table-cell table:style-name="ce61" table:formula="of:=[.D33]/([.$A$7]+[.C33]/1000)" office:value-type="float" office:value="13.5171455938697" calcext:value-type="float">
            <text:p>13.517</text:p>
          </table:table-cell>
          <table:table-cell table:style-name="ce64" table:formula="of:=[.$A$6]*[.E33]*100" office:value-type="float" office:value="2182478.32758621" calcext:value-type="float">
            <text:p>2182478</text:p>
          </table:table-cell>
          <table:table-cell table:style-name="ce50"/>
          <table:table-cell table:style-name="ce67" table:formula="of:=[.G33]/[.F33]" office:value-type="float" office:value="0" calcext:value-type="float">
            <text:p>0.00</text:p>
          </table:table-cell>
          <table:table-cell table:style-name="ce64" table:formula="of:=[.E33]*[.$C$99]" office:value-type="string" office:string-value="" calcext:value-type="error">
            <text:p>Err:502</text:p>
          </table:table-cell>
          <table:table-cell table:style-name="ce67" table:formula="of:=[.G33]/[.I33]" office:value-type="string" office:string-value="" calcext:value-type="error">
            <text:p>Err:502</text:p>
          </table:table-cell>
          <table:table-cell table:style-name="ce64" table:formula="of:=[.I33]*0.95" office:value-type="string" office:string-value="" calcext:value-type="error">
            <text:p>Err:502</text:p>
          </table:table-cell>
          <table:table-cell table:style-name="ce72" table:formula="of:=IF([.G33]&lt;[.$A$18]; [.G33]; [.G33]*(1+[.G33]/[.$A$18]*[.$A$19]))" office:value-type="float" office:value="0" calcext:value-type="float">
            <text:p>0</text:p>
          </table:table-cell>
          <table:table-cell table:style-name="ce74" table:formula="of:=[.L33]/[.I33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726839" calcext:value-type="float">
            <text:p>726839</text:p>
          </table:table-cell>
          <table:table-cell table:number-columns-repeated="981"/>
        </table:table-row>
        <table:table-row table:style-name="ro2"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3]+[.B34]" office:value-type="float" office:value="120" calcext:value-type="float">
            <text:p>120.0</text:p>
          </table:table-cell>
          <table:table-cell table:style-name="ce61" table:formula="of:=[.C34]*[.$A$15]/1000" office:value-type="float" office:value="153.948" calcext:value-type="float">
            <text:p>153.948</text:p>
          </table:table-cell>
          <table:table-cell table:style-name="ce61" table:formula="of:=[.D34]/([.$A$7]+[.C34]/1000)" office:value-type="float" office:value="14.7318660287081" calcext:value-type="float">
            <text:p>14.732</text:p>
          </table:table-cell>
          <table:table-cell table:style-name="ce64" table:formula="of:=[.$A$6]*[.E34]*100" office:value-type="float" office:value="2378607.08899522" calcext:value-type="float">
            <text:p>2378607</text:p>
          </table:table-cell>
          <table:table-cell table:style-name="ce50"/>
          <table:table-cell table:style-name="ce67" table:formula="of:=[.G34]/[.F34]" office:value-type="float" office:value="0" calcext:value-type="float">
            <text:p>0.00</text:p>
          </table:table-cell>
          <table:table-cell table:style-name="ce64" table:formula="of:=[.E34]*[.$C$99]" office:value-type="string" office:string-value="" calcext:value-type="error">
            <text:p>Err:502</text:p>
          </table:table-cell>
          <table:table-cell table:style-name="ce67" table:formula="of:=[.G34]/[.I34]" office:value-type="string" office:string-value="" calcext:value-type="error">
            <text:p>Err:502</text:p>
          </table:table-cell>
          <table:table-cell table:style-name="ce64" table:formula="of:=[.I34]*0.95" office:value-type="string" office:string-value="" calcext:value-type="error">
            <text:p>Err:502</text:p>
          </table:table-cell>
          <table:table-cell table:style-name="ce72" table:formula="of:=IF([.G34]&lt;[.$A$18]; [.G34]; [.G34]*(1+[.G34]/[.$A$18]*[.$A$19]))" office:value-type="float" office:value="0" calcext:value-type="float">
            <text:p>0</text:p>
          </table:table-cell>
          <table:table-cell table:style-name="ce74" table:formula="of:=[.L34]/[.I34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732858" calcext:value-type="float">
            <text:p>732858</text:p>
          </table:table-cell>
          <table:table-cell table:number-columns-repeated="981"/>
        </table:table-row>
        <table:table-row table:style-name="ro2"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C34]+[.B35]" office:value-type="float" office:value="130" calcext:value-type="float">
            <text:p>130.0</text:p>
          </table:table-cell>
          <table:table-cell table:style-name="ce61" table:formula="of:=[.C35]*[.$A$15]/1000" office:value-type="float" office:value="166.777" calcext:value-type="float">
            <text:p>166.777</text:p>
          </table:table-cell>
          <table:table-cell table:style-name="ce61" table:formula="of:=[.D35]/([.$A$7]+[.C35]/1000)" office:value-type="float" office:value="15.9442638623327" calcext:value-type="float">
            <text:p>15.944</text:p>
          </table:table-cell>
          <table:table-cell table:style-name="ce64" table:formula="of:=[.$A$6]*[.E35]*100" office:value-type="float" office:value="2574360.84321224" calcext:value-type="float">
            <text:p>2574361</text:p>
          </table:table-cell>
          <table:table-cell table:style-name="ce50"/>
          <table:table-cell table:style-name="ce67" table:formula="of:=[.G35]/[.F35]" office:value-type="float" office:value="0" calcext:value-type="float">
            <text:p>0.00</text:p>
          </table:table-cell>
          <table:table-cell table:style-name="ce64" table:formula="of:=[.E35]*[.$C$99]" office:value-type="string" office:string-value="" calcext:value-type="error">
            <text:p>Err:502</text:p>
          </table:table-cell>
          <table:table-cell table:style-name="ce67" table:formula="of:=[.G35]/[.I35]" office:value-type="string" office:string-value="" calcext:value-type="error">
            <text:p>Err:502</text:p>
          </table:table-cell>
          <table:table-cell table:style-name="ce64" table:formula="of:=[.I35]*0.95" office:value-type="string" office:string-value="" calcext:value-type="error">
            <text:p>Err:502</text:p>
          </table:table-cell>
          <table:table-cell table:style-name="ce72" table:formula="of:=IF([.G35]&lt;[.$A$18]; [.G35]; [.G35]*(1+[.G35]/[.$A$18]*[.$A$19]))" office:value-type="float" office:value="0" calcext:value-type="float">
            <text:p>0</text:p>
          </table:table-cell>
          <table:table-cell table:style-name="ce74" table:formula="of:=[.L35]/[.I35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705786" calcext:value-type="float">
            <text:p>705786</text:p>
          </table:table-cell>
          <table:table-cell table:number-columns-repeated="981"/>
        </table:table-row>
        <table:table-row table:style-name="ro2">
          <table:table-cell table:style-name="ce56" office:value-type="float" office:value="140" calcext:value-type="float">
            <text:p>140</text:p>
          </table:table-cell>
          <table:table-cell table:style-name="ce50" office:value-type="float" office:value="10" calcext:value-type="float">
            <text:p>10</text:p>
          </table:table-cell>
          <table:table-cell table:style-name="ce60" table:formula="of:=[.C35]+[.B36]" office:value-type="float" office:value="140" calcext:value-type="float">
            <text:p>140.0</text:p>
          </table:table-cell>
          <table:table-cell table:style-name="ce63" table:formula="of:=[.C36]*[.$A$15]/1000" office:value-type="float" office:value="179.606" calcext:value-type="float">
            <text:p>179.606</text:p>
          </table:table-cell>
          <table:table-cell table:style-name="ce63" table:formula="of:=[.D36]/([.$A$7]+[.C36]/1000)" office:value-type="float" office:value="17.1543457497612" calcext:value-type="float">
            <text:p>17.154</text:p>
          </table:table-cell>
          <table:table-cell table:style-name="ce66" table:formula="of:=[.$A$6]*[.E36]*100" office:value-type="float" office:value="2769740.66475645" calcext:value-type="float">
            <text:p>2769741</text:p>
          </table:table-cell>
          <table:table-cell table:style-name="ce56"/>
          <table:table-cell table:style-name="ce69" table:formula="of:=[.G36]/[.F36]" office:value-type="float" office:value="0" calcext:value-type="float">
            <text:p>0.00</text:p>
          </table:table-cell>
          <table:table-cell table:style-name="ce66" table:formula="of:=[.E36]*[.$C$99]" office:value-type="string" office:string-value="" calcext:value-type="error">
            <text:p>Err:502</text:p>
          </table:table-cell>
          <table:table-cell table:style-name="ce69" table:formula="of:=[.G36]/[.I36]" office:value-type="string" office:string-value="" calcext:value-type="error">
            <text:p>Err:502</text:p>
          </table:table-cell>
          <table:table-cell table:style-name="ce66" table:formula="of:=[.I36]*0.95" office:value-type="string" office:string-value="" calcext:value-type="error">
            <text:p>Err:502</text:p>
          </table:table-cell>
          <table:table-cell table:style-name="ce73" table:formula="of:=IF([.G36]&lt;[.$A$18]; [.G36]; [.G36]*(1+[.G36]/[.$A$18]*[.$A$19]))" office:value-type="float" office:value="0" calcext:value-type="float">
            <text:p>0</text:p>
          </table:table-cell>
          <table:table-cell table:style-name="ce74" table:formula="of:=[.L36]/[.I36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700985" calcext:value-type="float">
            <text:p>700985</text:p>
          </table:table-cell>
          <table:table-cell table:number-columns-repeated="981"/>
        </table:table-row>
        <table:table-row table:style-name="ro2">
          <table:table-cell table:style-name="ce56" office:value-type="float" office:value="150" calcext:value-type="float">
            <text:p>150</text:p>
          </table:table-cell>
          <table:table-cell table:style-name="ce50" office:value-type="float" office:value="10" calcext:value-type="float">
            <text:p>10</text:p>
          </table:table-cell>
          <table:table-cell table:style-name="ce60" table:formula="of:=[.C36]+[.B37]" office:value-type="float" office:value="150" calcext:value-type="float">
            <text:p>150.0</text:p>
          </table:table-cell>
          <table:table-cell table:style-name="ce63" table:formula="of:=[.C37]*[.$A$15]/1000" office:value-type="float" office:value="192.435" calcext:value-type="float">
            <text:p>192.435</text:p>
          </table:table-cell>
          <table:table-cell table:style-name="ce63" table:formula="of:=[.D37]/([.$A$7]+[.C37]/1000)" office:value-type="float" office:value="18.3621183206107" calcext:value-type="float">
            <text:p>18.362</text:p>
          </table:table-cell>
          <table:table-cell table:style-name="ce66" table:formula="of:=[.$A$6]*[.E37]*100" office:value-type="float" office:value="2964747.6240458" calcext:value-type="float">
            <text:p>2964748</text:p>
          </table:table-cell>
          <table:table-cell table:style-name="ce56"/>
          <table:table-cell table:style-name="ce69" table:formula="of:=[.G37]/[.F37]" office:value-type="float" office:value="0" calcext:value-type="float">
            <text:p>0.00</text:p>
          </table:table-cell>
          <table:table-cell table:style-name="ce66" table:formula="of:=[.E37]*[.$C$99]" office:value-type="string" office:string-value="" calcext:value-type="error">
            <text:p>Err:502</text:p>
          </table:table-cell>
          <table:table-cell table:style-name="ce69" table:formula="of:=[.G37]/[.I37]" office:value-type="string" office:string-value="" calcext:value-type="error">
            <text:p>Err:502</text:p>
          </table:table-cell>
          <table:table-cell table:style-name="ce66" table:formula="of:=[.I37]*0.95" office:value-type="string" office:string-value="" calcext:value-type="error">
            <text:p>Err:502</text:p>
          </table:table-cell>
          <table:table-cell table:style-name="ce73" table:formula="of:=IF([.G37]&lt;[.$A$18]; [.G37]; [.G37]*(1+[.G37]/[.$A$18]*[.$A$19]))" office:value-type="float" office:value="0" calcext:value-type="float">
            <text:p>0</text:p>
          </table:table-cell>
          <table:table-cell table:style-name="ce74" table:formula="of:=[.L37]/[.I37]" office:value-type="string" office:string-value="" calcext:value-type="error">
            <text:p>Err:502</text:p>
          </table:table-cell>
          <table:table-cell table:number-columns-repeated="14"/>
          <table:table-cell office:value-type="float" office:value="726528" calcext:value-type="float">
            <text:p>726528</text:p>
          </table:table-cell>
          <table:table-cell table:number-columns-repeated="981"/>
        </table:table-row>
        <table:table-row table:style-name="ro2">
          <table:table-cell table:number-columns-repeated="5"/>
          <table:table-cell table:style-name="ce20"/>
          <table:table-cell table:number-columns-repeated="21"/>
          <table:table-cell office:value-type="float" office:value="735848" calcext:value-type="float">
            <text:p>735848</text:p>
          </table:table-cell>
          <table:table-cell table:formula="of:=SUM([.AB30:.AB38])/9" office:value-type="float" office:value="720744" calcext:value-type="float">
            <text:p>720744</text:p>
          </table:table-cell>
          <table:table-cell table:formula="of:=(MAX([.AB30:.AB37])-MIN([.AB30:.AB37]))/[.AC38]*100" office:value-type="float" office:value="4.42223591178005" calcext:value-type="float">
            <text:p>4.4</text:p>
          </table:table-cell>
          <table:table-cell table:number-columns-repeated="979"/>
        </table:table-row>
        <table:table-row table:style-name="ro2">
          <table:table-cell table:number-columns-repeated="5"/>
          <table:table-cell table:style-name="ce20"/>
          <table:table-cell table:number-columns-repeated="21"/>
          <table:table-cell office:value-type="float" office:value="731747" calcext:value-type="float">
            <text:p>73174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36817" calcext:value-type="float">
            <text:p>83681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27707" calcext:value-type="float">
            <text:p>82770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22322" calcext:value-type="float">
            <text:p>82232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53847" calcext:value-type="float">
            <text:p>85384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848079" calcext:value-type="float">
            <text:p>848079</text:p>
          </table:table-cell>
          <table:table-cell table:formula="of:=SUM([.AB40:.AB44])/5" office:value-type="float" office:value="837754.4" calcext:value-type="float">
            <text:p>837754</text:p>
          </table:table-cell>
          <table:table-cell table:formula="of:=(MAX([.AB40:.AB43])-MIN([.AB40:.AB43]))/[.AC44]*100" office:value-type="float" office:value="3.76303604015688" calcext:value-type="float">
            <text:p>3.8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954372" calcext:value-type="float">
            <text:p>95437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44582" calcext:value-type="float">
            <text:p>94458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68293" calcext:value-type="float">
            <text:p>968293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55723" calcext:value-type="float">
            <text:p>955723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64172" calcext:value-type="float">
            <text:p>96417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20144" calcext:value-type="float">
            <text:p>920144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49327" calcext:value-type="float">
            <text:p>94932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56910" calcext:value-type="float">
            <text:p>95691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51584" calcext:value-type="float">
            <text:p>951584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971636" calcext:value-type="float">
            <text:p>971636</text:p>
          </table:table-cell>
          <table:table-cell table:formula="of:=SUM([.AB45:.AB54])/10" office:value-type="float" office:value="953674.3" calcext:value-type="float">
            <text:p>953674</text:p>
          </table:table-cell>
          <table:table-cell table:formula="of:=(MAX([.AB45:.AB53])-MIN([.AB45:.AB53]))/[.AC54]*100" office:value-type="float" office:value="5.04878866925532" calcext:value-type="float">
            <text:p>5.0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1084905" calcext:value-type="float">
            <text:p>1084905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073791" calcext:value-type="float">
            <text:p>1073791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082662" calcext:value-type="float">
            <text:p>108266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095580" calcext:value-type="float">
            <text:p>109558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092684" calcext:value-type="float">
            <text:p>1092684</text:p>
          </table:table-cell>
          <table:table-cell table:formula="of:=SUM([.AB55:.AB59])/5" office:value-type="float" office:value="1085924.4" calcext:value-type="float">
            <text:p>1085924</text:p>
          </table:table-cell>
          <table:table-cell table:formula="of:=(MAX([.AB55:.AB58])-MIN([.AB55:.AB58]))/[.AC59]*100" office:value-type="float" office:value="2.00649326969723" calcext:value-type="float">
            <text:p>2.0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1205750" calcext:value-type="float">
            <text:p>120575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188471" calcext:value-type="float">
            <text:p>1188471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219844" calcext:value-type="float">
            <text:p>1219844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175662" calcext:value-type="float">
            <text:p>117566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207639" calcext:value-type="float">
            <text:p>1207639</text:p>
          </table:table-cell>
          <table:table-cell table:formula="of:=SUM([.AB60:.AB64])/5" office:value-type="float" office:value="1199473.2" calcext:value-type="float">
            <text:p>1199473</text:p>
          </table:table-cell>
          <table:table-cell table:formula="of:=(MAX([.AB60:.AB63])-MIN([.AB60:.AB63]))/[.AC64]*100" office:value-type="float" office:value="3.68345036804491" calcext:value-type="float">
            <text:p>3.7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1404845" calcext:value-type="float">
            <text:p>1404845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399177" calcext:value-type="float">
            <text:p>139917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434430" calcext:value-type="float">
            <text:p>143443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417323" calcext:value-type="float">
            <text:p>1417323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428968" calcext:value-type="float">
            <text:p>1428968</text:p>
          </table:table-cell>
          <table:table-cell table:formula="of:=SUM([.AB65:.AB69])/5" office:value-type="float" office:value="1416948.6" calcext:value-type="float">
            <text:p>1416949</text:p>
          </table:table-cell>
          <table:table-cell table:formula="of:=(MAX([.AB65:.AB68])-MIN([.AB65:.AB68]))/[.AC69]*100" office:value-type="float" office:value="2.48795192712001" calcext:value-type="float">
            <text:p>2.5</text:p>
          </table:table-cell>
          <table:table-cell table:number-columns-repeated="979"/>
        </table:table-row>
        <table:table-row table:style-name="ro2">
          <table:table-cell table:number-columns-repeated="27"/>
          <table:table-cell office:value-type="float" office:value="1502457" calcext:value-type="float">
            <text:p>1502457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504837" calcext:value-type="float">
            <text:p>1504837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<text:span text:style-name="T7">Regression</text:span></text:p>
          </table:table-cell>
          <table:table-cell table:number-columns-repeated="6"/>
          <table:table-cell office:value-type="string" calcext:value-type="string">
            <text:p><text:span text:style-name="T7">Regression</text:span></text:p>
          </table:table-cell>
          <table:table-cell table:number-columns-repeated="18"/>
          <table:table-cell office:value-type="float" office:value="1524086" calcext:value-type="float">
            <text:p>1524086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17"/>
          <table:table-cell office:value-type="float" office:value="1554010" calcext:value-type="float">
            <text:p>1554010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549983" calcext:value-type="float">
            <text:p>1549983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18"/>
          <table:table-cell office:value-type="float" office:value="1512338" calcext:value-type="float">
            <text:p>1512338</text:p>
          </table:table-cell>
          <table:table-cell table:number-columns-repeated="981"/>
        </table:table-row>
        <table:table-row table:style-name="ro2">
          <table:table-cell/>
          <table:table-cell table:number-matrix-columns-spanned="2" table:number-matrix-rows-spanned="5" table:formula="of:=LINEST([.$G$22:.$G$26] ; [.$E$22:.$E$26] ; 0 ; 1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5"/>
          <table:table-cell table:number-matrix-columns-spanned="2" table:number-matrix-rows-spanned="5" table:formula="of:=LINEST(LN([.$J$22:.$J$36]) ; LN([.$G$22:.$G$36]) ; 1 ; 1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7"/>
          <table:table-cell office:value-type="float" office:value="1494015" calcext:value-type="float">
            <text:p>1494015</text:p>
          </table:table-cell>
          <table:table-cell table:number-columns-repeated="981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7"/>
          <table:table-cell office:value-type="float" office:value="1540956" calcext:value-type="float">
            <text:p>1540956</text:p>
          </table:table-cell>
          <table:table-cell table:number-columns-repeated="981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7"/>
          <table:table-cell office:value-type="float" office:value="1535685" calcext:value-type="float">
            <text:p>1535685</text:p>
          </table:table-cell>
          <table:table-cell table:number-columns-repeated="981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543844" calcext:value-type="float">
            <text:p>1543844</text:p>
          </table:table-cell>
          <table:table-cell table:formula="of:=SUM([.AB70:.AB79])/10" office:value-type="float" office:value="1526221.1" calcext:value-type="float">
            <text:p>1526221</text:p>
          </table:table-cell>
          <table:table-cell table:formula="of:=(MAX([.AB70:.AB78])-MIN([.AB70:.AB78]))/[.AC79]*100" office:value-type="float" office:value="3.93095076460416" calcext:value-type="float">
            <text:p>3.9</text:p>
          </table:table-cell>
          <table:table-cell table:number-columns-repeated="979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7"/>
          <table:table-cell office:value-type="float" office:value="1665079" calcext:value-type="float">
            <text:p>1665079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647703" calcext:value-type="float">
            <text:p>1647703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18"/>
          <table:table-cell office:value-type="float" office:value="1659088" calcext:value-type="float">
            <text:p>1659088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^2</text:p>
          </table:table-cell>
          <table:table-cell table:formula="of:=[.$B$78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I$78]" office:value-type="string" office:string-value="" calcext:value-type="error">
            <text:p>Err:502</text:p>
          </table:table-cell>
          <table:table-cell table:number-columns-repeated="17"/>
          <table:table-cell office:value-type="float" office:value="1647890" calcext:value-type="float">
            <text:p>164789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Standard Error</text:p>
          </table:table-cell>
          <table:table-cell table:formula="of:=[.$C$78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J$78]" office:value-type="string" office:string-value="" calcext:value-type="error">
            <text:p>Err:502</text:p>
          </table:table-cell>
          <table:table-cell table:number-columns-repeated="17"/>
          <table:table-cell office:value-type="float" office:value="1649454" calcext:value-type="float">
            <text:p>1649454</text:p>
          </table:table-cell>
          <table:table-cell table:formula="of:=SUM([.AB80:.AB84])/5" office:value-type="float" office:value="1653842.8" calcext:value-type="float">
            <text:p>1653843</text:p>
          </table:table-cell>
          <table:table-cell table:formula="of:=(MAX([.AB80:.AB83])-MIN([.AB80:.AB83]))/[.AC84]*100" office:value-type="float" office:value="1.0506439910734" calcext:value-type="float">
            <text:p>1.1</text:p>
          </table:table-cell>
          <table:table-cell table:number-columns-repeated="979"/>
        </table:table-row>
        <table:table-row table:style-name="ro2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  <table:table-cell office:value-type="float" office:value="1793367" calcext:value-type="float">
            <text:p>1793367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17"/>
          <table:table-cell office:value-type="float" office:value="1751541" calcext:value-type="float">
            <text:p>1751541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Adjusted R^2</text:p>
          </table:table-cell>
          <table:table-cell table:formula="of:=1 - (1 - [.$B$78])*([.$C$86] - 1)/([.$C$86] - [.$C$85])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I$78])*([.$J$86] - 1)/([.$J$86] - [.$J$85] - 1)" office:value-type="string" office:string-value="" calcext:value-type="error">
            <text:p>Err:502</text:p>
          </table:table-cell>
          <table:table-cell table:number-columns-repeated="17"/>
          <table:table-cell office:value-type="float" office:value="1770996" calcext:value-type="float">
            <text:p>1770996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775754" calcext:value-type="float">
            <text:p>1775754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18"/>
          <table:table-cell office:value-type="float" office:value="1762332" calcext:value-type="float">
            <text:p>1762332</text:p>
          </table:table-cell>
          <table:table-cell table:formula="of:=SUM([.AB85:.AB89])/5" office:value-type="float" office:value="1770798" calcext:value-type="float">
            <text:p>1770798</text:p>
          </table:table-cell>
          <table:table-cell table:formula="of:=(MAX([.AB85:.AB88])-MIN([.AB85:.AB88]))/[.AC89]*100" office:value-type="float" office:value="2.36198595209617" calcext:value-type="float">
            <text:p>2.4</text:p>
          </table:table-cell>
          <table:table-cell table:number-columns-repeated="979"/>
        </table:table-row>
        <table:table-row table:style-name="ro2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3"/>
          <table:table-cell office:value-type="float" office:value="1847092" calcext:value-type="float">
            <text:p>1847092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 table:formula="of:=[.$C$85]" office:value-type="float" office:value="1" calcext:value-type="float">
            <text:p>1</text:p>
          </table:table-cell>
          <table:table-cell table:formula="of:=[.$B$80]" office:value-type="string" office:string-value="" calcext:value-type="error">
            <text:p>Err:502</text:p>
          </table:table-cell>
          <table:table-cell table:formula="of:=[.$B$80] / [.$C$91]" office:value-type="string" office:string-value="" calcext:value-type="error">
            <text:p>Err:502</text:p>
          </table:table-cell>
          <table:table-cell table:formula="of:=[.$B$79]" office:value-type="string" office:string-value="" calcext:value-type="error">
            <text:p>Err:502</text:p>
          </table:table-cell>
          <table:table-cell table:formula="of:=LEGACY.FDIST([.$B$79] ; [.$C$91] ; [.$C$79]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Regression</text:p>
          </table:table-cell>
          <table:table-cell table:formula="of:=[.$J$85]" office:value-type="float" office:value="1" calcext:value-type="float">
            <text:p>1</text:p>
          </table:table-cell>
          <table:table-cell table:formula="of:=[.$I$80]" office:value-type="string" office:string-value="" calcext:value-type="error">
            <text:p>Err:502</text:p>
          </table:table-cell>
          <table:table-cell table:formula="of:=[.$I$80] / [.$J$91]" office:value-type="string" office:string-value="" calcext:value-type="error">
            <text:p>Err:502</text:p>
          </table:table-cell>
          <table:table-cell table:formula="of:=[.$I$79]" office:value-type="string" office:string-value="" calcext:value-type="error">
            <text:p>Err:502</text:p>
          </table:table-cell>
          <table:table-cell table:formula="of:=LEGACY.FDIST([.$I$79] ; [.$J$91] ; [.$J$79])" office:value-type="string" office:string-value="" calcext:value-type="error">
            <text:p>Err:502</text:p>
          </table:table-cell>
          <table:table-cell table:number-columns-repeated="13"/>
          <table:table-cell office:value-type="float" office:value="1833359" calcext:value-type="float">
            <text:p>1833359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esidual</text:p>
          </table:table-cell>
          <table:table-cell table:formula="of:=[.$C$79]" office:value-type="string" office:string-value="" calcext:value-type="error">
            <text:p>Err:502</text:p>
          </table:table-cell>
          <table:table-cell table:formula="of:=[.$C$80]" office:value-type="string" office:string-value="" calcext:value-type="error">
            <text:p>Err:502</text:p>
          </table:table-cell>
          <table:table-cell table:formula="of:=[.$C$80] / [.$C$79]" office:value-type="string" office:string-value="" calcext:value-type="error">
            <text:p>Err:502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J$79]" office:value-type="float" office:value="13" calcext:value-type="float">
            <text:p>13</text:p>
          </table:table-cell>
          <table:table-cell table:formula="of:=[.$J$80]" office:value-type="string" office:string-value="" calcext:value-type="error">
            <text:p>Err:502</text:p>
          </table:table-cell>
          <table:table-cell table:formula="of:=[.$J$80] / [.$J$79]" office:value-type="string" office:string-value="" calcext:value-type="error">
            <text:p>Err:502</text:p>
          </table:table-cell>
          <table:table-cell table:number-columns-repeated="15"/>
          <table:table-cell office:value-type="float" office:value="1903999" calcext:value-type="float">
            <text:p>1903999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[.$C$91] + [.$C$79]" office:value-type="string" office:string-value="" calcext:value-type="error">
            <text:p>Err:502</text:p>
          </table:table-cell>
          <table:table-cell table:formula="of:=[.$B$80] + [.$C$80]" office:value-type="string" office:string-value="" calcext:value-type="error">
            <text:p>Err:502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J$91] + [.$J$79]" office:value-type="float" office:value="14" calcext:value-type="float">
            <text:p>14</text:p>
          </table:table-cell>
          <table:table-cell table:formula="of:=[.$I$80] + [.$J$80]" office:value-type="string" office:string-value="" calcext:value-type="error">
            <text:p>Err:502</text:p>
          </table:table-cell>
          <table:table-cell table:number-columns-repeated="16"/>
          <table:table-cell office:value-type="float" office:value="1839722" calcext:value-type="float">
            <text:p>1839722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879761" calcext:value-type="float">
            <text:p>1879761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7"/>
          <table:table-cell office:value-type="float" office:value="1826056" calcext:value-type="float">
            <text:p>1826056</text:p>
          </table:table-cell>
          <table:table-cell table:number-columns-repeated="981"/>
        </table:table-row>
        <table:table-row table:style-name="ro2">
          <table:table-cell table:number-columns-repeated="27"/>
          <table:table-cell office:value-type="float" office:value="1813477" calcext:value-type="float">
            <text:p>1813477</text:p>
          </table:table-cell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95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9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95] * 100) ; &quot;%&quot;)" office:value-type="string" office:string-value="Upper 95%" calcext:value-type="string">
            <text:p>Upper 95%</text:p>
          </table:table-cell>
          <table:table-cell table:number-columns-repeated="12"/>
          <table:table-cell office:value-type="float" office:value="1885554" calcext:value-type="float">
            <text:p>1885554</text:p>
          </table:table-cell>
          <table:table-cell table:number-columns-repeated="981"/>
        </table:table-row>
        <table:table-row table:style-name="ro2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76:.$C$76]; 1 ; ROW([.$C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INDEX([.$B$77:.$C$77]; 1 ; ROW([.$D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[.$C$98:.$C$99] / [.$D$98:.$D$99]" office:value-type="string" office:string-value="" calcext:value-type="error">
            <text:p>Err:502</text:p>
          </table:table-cell>
          <table:table-cell table:number-matrix-columns-spanned="1" table:number-matrix-rows-spanned="2" table:formula="of:=LEGACY.TDIST(ABS([.$E$98:.$E$99]) ; [.$C$79] ; 2 )" office:value-type="string" office:string-value="" calcext:value-type="error">
            <text:p>Err:502</text:p>
          </table:table-cell>
          <table:table-cell table:number-matrix-columns-spanned="1" table:number-matrix-rows-spanned="2" table:formula="of:=[.$C$98:.$C$99] - [.$D$98:.$D$99] * TINV(1 - [.$C$95] ; [.$C$79])" office:value-type="string" office:string-value="" calcext:value-type="error">
            <text:p>Err:502</text:p>
          </table:table-cell>
          <table:table-cell table:number-matrix-columns-spanned="1" table:number-matrix-rows-spanned="2" table:formula="of:=[.$C$98:.$C$99] + [.$D$98:.$D$99] * TINV(1 - [.$C$95] ; [.$C$79])" office:value-type="string" office:string-value="" calcext:value-type="error">
            <text:p>Err:502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76:.$J$76]; 1 ; ROW([.$J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INDEX([.$I$77:.$J$77]; 1 ; ROW([.$K$99])+1 - ROW()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/ [.$K$98:.$K$99]" office:value-type="string" office:string-value="" calcext:value-type="error">
            <text:p>Err:502</text:p>
          </table:table-cell>
          <table:table-cell table:number-matrix-columns-spanned="1" table:number-matrix-rows-spanned="2" table:formula="of:=LEGACY.TDIST(ABS([.$L$98:.$L$99]) ; [.$J$79] ; 2 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- [.$K$98:.$K$99] * TINV(1 - [.$J$95] ; [.$J$79])" office:value-type="string" office:string-value="" calcext:value-type="error">
            <text:p>Err:502</text:p>
          </table:table-cell>
          <table:table-cell table:number-matrix-columns-spanned="1" table:number-matrix-rows-spanned="2" table:formula="of:=[.$J$98:.$J$99] + [.$K$98:.$K$99] * TINV(1 - [.$J$95] ; [.$J$79])" office:value-type="string" office:string-value="" calcext:value-type="error">
            <text:p>Err:502</text:p>
          </table:table-cell>
          <table:table-cell table:number-columns-repeated="12"/>
          <table:table-cell office:value-type="float" office:value="1836044" calcext:value-type="float">
            <text:p>1836044</text:p>
          </table:table-cell>
          <table:table-cell table:number-columns-repeated="981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table:style-name="ce92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formula="of:=&quot;LN(X1)&quot;" office:value-type="string" office:string-value="LN(X1)" calcext:value-type="string">
            <text:p>LN(X1)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2"/>
          <table:table-cell office:value-type="float" office:value="1841236" calcext:value-type="float">
            <text:p>1841236</text:p>
          </table:table-cell>
          <table:table-cell table:formula="of:=SUM([.AB90:.AB99])/10" office:value-type="float" office:value="1850630" calcext:value-type="float">
            <text:p>1850630</text:p>
          </table:table-cell>
          <table:table-cell table:formula="of:=(MAX([.AB90:.AB98])-MIN([.AB90:.AB98]))/[.AC99]*100" office:value-type="float" office:value="4.89141535585179" calcext:value-type="float">
            <text:p>4.9</text:p>
          </table:table-cell>
          <table:table-cell table:number-columns-repeated="979"/>
        </table:table-row>
        <table:table-row table:style-name="ro2">
          <table:table-cell table:number-columns-repeated="28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table:number-matrix-columns-spanned="1" table:number-matrix-rows-spanned="5" table:formula="of:=[.$A$22:.$A$26]" office:value-type="float" office:value="0" calcext:value-type="float">
            <text:p>0</text:p>
          </table:table-cell>
          <table:table-cell table:number-matrix-columns-spanned="1" table:number-matrix-rows-spanned="5" table:formula="of:=MMULT([.$B$102:.$B$106] ; [.$C$99]) + [.$C$98]" office:value-type="string" office:string-value="" calcext:value-type="error">
            <text:p>Err:502</text:p>
          </table:table-cell>
          <table:table-cell table:number-matrix-columns-spanned="1" table:number-matrix-rows-spanned="5" table:formula="of:=[.$G$22:.$G$26]" office:value-type="float" office:value="1" calcext:value-type="float">
            <text:p>1</text:p>
          </table:table-cell>
          <table:table-cell table:number-matrix-columns-spanned="1" table:number-matrix-rows-spanned="5" table:formula="of:=[.$D$102:.$D$106] - [.$C$102:.$C$106]" office:value-type="string" office:string-value="" calcext:value-type="error">
            <text:p>Err:502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" calcext:value-type="float">
            <text:p/>
          </table:table-cell>
          <table:table-cell office:value-type="string" office:string-value="" calcext:value-type="error">
            <text:p>Err:502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" calcext:value-type="float">
            <text:p/>
          </table:table-cell>
          <table:table-cell office:value-type="string" office:string-value="" calcext:value-type="error">
            <text:p>Err:502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" calcext:value-type="float">
            <text:p/>
          </table:table-cell>
          <table:table-cell office:value-type="string" office:string-value="" calcext:value-type="error">
            <text:p>Err:502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" calcext:value-type="float">
            <text:p/>
          </table:table-cell>
          <table:table-cell office:value-type="string" office:string-value="" calcext:value-type="error">
            <text:p>Err:502</text:p>
          </table:table-cell>
          <table:table-cell table:number-columns-repeated="23"/>
          <table:table-cell table:style-name="Default" table:number-columns-repeated="2"/>
          <table:table-cell table:number-columns-repeated="979"/>
        </table:table-row>
      </table:table>
      <table:table table:name="Clause 6 - spheres" table:style-name="ta1">
        <table:table-column table:style-name="co7" table:default-cell-style-name="Default"/>
        <table:table-column table:style-name="co4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row table:style-name="ro2" table:number-rows-repeated="2">
          <table:table-cell table:number-columns-repeated="11"/>
        </table:table-row>
        <table:table-row table:style-name="ro2">
          <table:table-cell table:style-name="ce235" office:value-type="string" calcext:value-type="string">
            <text:p>Poly Spheres Concentrate Calculator</text:p>
          </table:table-cell>
          <table:table-cell table:style-name="ce235" table:number-columns-repeated="3"/>
          <table:table-cell table:number-columns-repeated="7"/>
        </table:table-row>
        <table:table-row table:style-name="ro2">
          <table:table-cell table:style-name="ce235" table:number-columns-repeated="4"/>
          <table:table-cell table:number-columns-repeated="7"/>
        </table:table-row>
        <table:table-row table:style-name="ro2">
          <table:table-cell table:style-name="ce235" office:value-type="float" office:value="49.4" calcext:value-type="float">
            <text:p>49.4</text:p>
          </table:table-cell>
          <table:table-cell table:style-name="ce235" office:value-type="string" calcext:value-type="string">
            <text:p>microns</text:p>
          </table:table-cell>
          <table:table-cell table:style-name="ce235" office:value-type="string" calcext:value-type="string">
            <text:p>diameter</text:p>
          </table:table-cell>
          <table:table-cell table:style-name="ce235"/>
          <table:table-cell table:number-columns-repeated="3"/>
          <table:table-cell table:style-name="ce235" office:value-type="float" office:value="69.7" calcext:value-type="float">
            <text:p>69.7</text:p>
          </table:table-cell>
          <table:table-cell table:style-name="ce235" office:value-type="string" calcext:value-type="string">
            <text:p>microns</text:p>
          </table:table-cell>
          <table:table-cell table:style-name="ce235" office:value-type="string" calcext:value-type="string">
            <text:p>diameter</text:p>
          </table:table-cell>
          <table:table-cell/>
        </table:table-row>
        <table:table-row table:style-name="ro2">
          <table:table-cell table:style-name="ce236" table:formula="of:=(4/3)*(3.1415936)*(([.A5]*0.000001/2)^3)" office:value-type="float" office:value="0.000000000000063121832711697" calcext:value-type="float">
            <text:p>6.312E-14</text:p>
          </table:table-cell>
          <table:table-cell table:style-name="ce235" office:value-type="string" calcext:value-type="string">
            <text:p>m^3</text:p>
          </table:table-cell>
          <table:table-cell table:style-name="ce235" office:value-type="string" calcext:value-type="string">
            <text:p>volume of a sphere</text:p>
          </table:table-cell>
          <table:table-cell table:style-name="ce235"/>
          <table:table-cell table:number-columns-repeated="3"/>
          <table:table-cell table:style-name="ce236" table:formula="of:=(4/3)*(3.1415936)*(([.H5]*0.000001/2)^3)" office:value-type="float" office:value="0.000000000000177295244720002" calcext:value-type="float">
            <text:p>1.773E-13</text:p>
          </table:table-cell>
          <table:table-cell table:style-name="ce235" office:value-type="string" calcext:value-type="string">
            <text:p>m^3</text:p>
          </table:table-cell>
          <table:table-cell table:style-name="ce235" office:value-type="string" calcext:value-type="string">
            <text:p>volume of a sphere</text:p>
          </table:table-cell>
          <table:table-cell/>
        </table:table-row>
        <table:table-row table:style-name="ro2">
          <table:table-cell table:style-name="ce236" table:formula="of:=[.A6]*1.05*1000" office:value-type="float" office:value="0.0000000000662779243472819" calcext:value-type="float">
            <text:p>6.628E-11</text:p>
          </table:table-cell>
          <table:table-cell table:style-name="ce235" office:value-type="string" calcext:value-type="string">
            <text:p>kg</text:p>
          </table:table-cell>
          <table:table-cell table:style-name="ce235" office:value-type="string" calcext:value-type="string">
            <text:p>mass of a sphere</text:p>
          </table:table-cell>
          <table:table-cell table:style-name="ce235"/>
          <table:table-cell table:number-columns-repeated="3"/>
          <table:table-cell table:style-name="ce236" table:formula="of:=[.H6]*1.05*1000" office:value-type="float" office:value="0.000000000186160006956002" calcext:value-type="float">
            <text:p>1.862E-10</text:p>
          </table:table-cell>
          <table:table-cell table:style-name="ce235" office:value-type="string" calcext:value-type="string">
            <text:p>kg</text:p>
          </table:table-cell>
          <table:table-cell table:style-name="ce235" office:value-type="string" calcext:value-type="string">
            <text:p>mass of a sphere</text:p>
          </table:table-cell>
          <table:table-cell/>
        </table:table-row>
        <table:table-row table:style-name="ro2">
          <table:table-cell table:style-name="ce236" table:formula="of:=0.000001/[.A7]" office:value-type="float" office:value="15087.980045365" calcext:value-type="float">
            <text:p>1.509E+04</text:p>
          </table:table-cell>
          <table:table-cell table:style-name="ce235" office:value-type="string" calcext:value-type="string">
            <text:p>Number</text:p>
          </table:table-cell>
          <table:table-cell table:style-name="ce235" office:value-type="string" calcext:value-type="string">
            <text:p>spheres per mg</text:p>
          </table:table-cell>
          <table:table-cell table:style-name="ce235"/>
          <table:table-cell table:number-columns-repeated="3"/>
          <table:table-cell table:style-name="ce236" table:formula="of:=0.000001/[.H7]" office:value-type="float" office:value="5371.72304809993" calcext:value-type="float">
            <text:p>5.372E+03</text:p>
          </table:table-cell>
          <table:table-cell table:style-name="ce235" office:value-type="string" calcext:value-type="string">
            <text:p>Number</text:p>
          </table:table-cell>
          <table:table-cell table:style-name="ce235" office:value-type="string" calcext:value-type="string">
            <text:p>spheres per mg</text:p>
          </table:table-cell>
          <table:table-cell/>
        </table:table-row>
        <table:table-row table:style-name="ro2">
          <table:table-cell table:style-name="ce237" office:value-type="float" office:value="5000" calcext:value-type="float">
            <text:p>5000</text:p>
          </table:table-cell>
          <table:table-cell table:style-name="ce235"/>
          <table:table-cell table:style-name="ce235" office:value-type="string" calcext:value-type="string">
            <text:p>Target concentration per ml</text:p>
          </table:table-cell>
          <table:table-cell table:style-name="ce235"/>
          <table:table-cell table:number-columns-repeated="3"/>
          <table:table-cell table:style-name="ce237" office:value-type="float" office:value="2000" calcext:value-type="float">
            <text:p>2000</text:p>
          </table:table-cell>
          <table:table-cell table:style-name="ce235"/>
          <table:table-cell table:style-name="ce235" office:value-type="string" calcext:value-type="string">
            <text:p>Target concentration per ml</text:p>
          </table:table-cell>
          <table:table-cell/>
        </table:table-row>
        <table:table-row table:style-name="ro2">
          <table:table-cell table:style-name="ce238" table:formula="of:=[.A9]/[.A8]*1000" office:value-type="float" office:value="331.38962173641" calcext:value-type="float">
            <text:p>331.39</text:p>
          </table:table-cell>
          <table:table-cell table:style-name="ce235" office:value-type="string" calcext:value-type="string">
            <text:p>mg/l</text:p>
          </table:table-cell>
          <table:table-cell table:style-name="ce235" office:value-type="string" calcext:value-type="string">
            <text:p>spheres to add per liter</text:p>
          </table:table-cell>
          <table:table-cell table:style-name="ce235"/>
          <table:table-cell table:number-columns-repeated="3"/>
          <table:table-cell table:style-name="ce238" table:formula="of:=[.H9]/[.H8]*1000" office:value-type="float" office:value="372.320013912004" calcext:value-type="float">
            <text:p>372.32</text:p>
          </table:table-cell>
          <table:table-cell table:style-name="ce235" office:value-type="string" calcext:value-type="string">
            <text:p>mg/l</text:p>
          </table:table-cell>
          <table:table-cell table:style-name="ce235" office:value-type="string" calcext:value-type="string">
            <text:p>spheres to add per liter</text:p>
          </table:table-cell>
          <table:table-cell/>
        </table:table-row>
        <table:table-row table:style-name="ro2">
          <table:table-cell table:style-name="ce239" office:value-type="float" office:value="0.2028" calcext:value-type="float">
            <text:p>0.2028</text:p>
          </table:table-cell>
          <table:table-cell table:style-name="ce235" office:value-type="string" calcext:value-type="string">
            <text:p>litres</text:p>
          </table:table-cell>
          <table:table-cell table:style-name="ce235" office:value-type="string" calcext:value-type="string">
            <text:p>Bottle / Rig volume (can add more fluid after measuring out spheres)</text:p>
          </table:table-cell>
          <table:table-cell table:style-name="ce235"/>
          <table:table-cell table:number-columns-repeated="3"/>
          <table:table-cell table:style-name="ce239" office:value-type="float" office:value="0.2" calcext:value-type="float">
            <text:p>0.2</text:p>
          </table:table-cell>
          <table:table-cell table:style-name="ce235" office:value-type="string" calcext:value-type="string">
            <text:p>litres</text:p>
          </table:table-cell>
          <table:table-cell table:style-name="ce235" office:value-type="string" calcext:value-type="string">
            <text:p>Bottle / Rig volume (can add more fluid after measuring out spheres)</text:p>
          </table:table-cell>
          <table:table-cell/>
        </table:table-row>
        <table:table-row table:style-name="ro2">
          <table:table-cell table:style-name="ce238" table:formula="of:=[.A11]*[.A10]" office:value-type="float" office:value="67.2058152881439" calcext:value-type="float">
            <text:p>67.21</text:p>
          </table:table-cell>
          <table:table-cell table:style-name="ce235" office:value-type="string" calcext:value-type="string">
            <text:p>mg</text:p>
          </table:table-cell>
          <table:table-cell table:style-name="ce235" office:value-type="string" calcext:value-type="string">
            <text:p>Total mass of spheres to add</text:p>
          </table:table-cell>
          <table:table-cell table:style-name="ce235"/>
          <table:table-cell table:number-columns-repeated="3"/>
          <table:table-cell table:style-name="ce238" table:formula="of:=[.H11]*[.H10]" office:value-type="float" office:value="74.4640027824009" calcext:value-type="float">
            <text:p>74.46</text:p>
          </table:table-cell>
          <table:table-cell table:style-name="ce235" office:value-type="string" calcext:value-type="string">
            <text:p>mg</text:p>
          </table:table-cell>
          <table:table-cell table:style-name="ce235" office:value-type="string" calcext:value-type="string">
            <text:p>Total mass of spheres to add</text:p>
          </table:table-cell>
          <table:table-cell/>
        </table:table-row>
        <table:table-row table:style-name="ro2">
          <table:table-cell table:style-name="ce239" office:value-type="float" office:value="67.2" calcext:value-type="float">
            <text:p>67.2</text:p>
          </table:table-cell>
          <table:table-cell table:style-name="ce235" office:value-type="string" calcext:value-type="string">
            <text:p>mg</text:p>
          </table:table-cell>
          <table:table-cell table:style-name="ce235" office:value-type="string" calcext:value-type="string">
            <text:p>Actual mass added</text:p>
          </table:table-cell>
          <table:table-cell table:style-name="ce235"/>
          <table:table-cell table:number-columns-repeated="3"/>
          <table:table-cell table:style-name="ce239" office:value-type="float" office:value="77.57" calcext:value-type="float">
            <text:p>77.57</text:p>
          </table:table-cell>
          <table:table-cell table:style-name="ce235" office:value-type="string" calcext:value-type="string">
            <text:p>mg</text:p>
          </table:table-cell>
          <table:table-cell table:style-name="ce235" office:value-type="string" calcext:value-type="string">
            <text:p>Actual mass added</text:p>
          </table:table-cell>
          <table:table-cell/>
        </table:table-row>
        <table:table-row table:style-name="ro2">
          <table:table-cell table:style-name="ce144" table:formula="of:=[.A13]/[.A12]*[.A9]" office:value-type="float" office:value="4999.56735231029" calcext:value-type="float">
            <text:p>5000</text:p>
          </table:table-cell>
          <table:table-cell table:style-name="ce235" office:value-type="string" calcext:value-type="string">
            <text:p>N/ml</text:p>
          </table:table-cell>
          <table:table-cell table:style-name="ce235" office:value-type="string" calcext:value-type="string">
            <text:p>Concentration expected</text:p>
          </table:table-cell>
          <table:table-cell table:style-name="ce235"/>
          <table:table-cell table:number-columns-repeated="3"/>
          <table:table-cell table:style-name="ce144" table:formula="of:=[.H13]/[.H12]*[.H9]" office:value-type="float" office:value="2083.42278420556" calcext:value-type="float">
            <text:p>2083</text:p>
          </table:table-cell>
          <table:table-cell table:style-name="ce235" office:value-type="string" calcext:value-type="string">
            <text:p>N/ml</text:p>
          </table:table-cell>
          <table:table-cell table:style-name="ce235" office:value-type="string" calcext:value-type="string">
            <text:p>Concentration expected</text:p>
          </table:table-cell>
          <table:table-cell/>
        </table:table-row>
        <table:table-row table:style-name="ro2">
          <table:table-cell table:number-columns-repeated="7"/>
          <table:table-cell table:style-name="ce233" table:formula="of:=[.H13]*[.H8]" office:value-type="float" office:value="416684.556841111" calcext:value-type="float">
            <text:p>416684.6</text:p>
          </table:table-cell>
          <table:table-cell/>
          <table:table-cell office:value-type="string" calcext:value-type="string">
            <text:p>Spheres added</text:p>
          </table:table-cell>
          <table:table-cell/>
        </table:table-row>
        <table:table-row table:style-name="ro2">
          <table:table-cell office:value-type="string" calcext:value-type="string">
            <text:p>Dilution</text:p>
          </table:table-cell>
          <table:table-cell table:number-columns-repeated="6"/>
          <table:table-cell table:style-name="ce233" table:formula="of:=[.H14]/[.H9]*[.H11]*1000" office:value-type="float" office:value="208.342278420556" calcext:value-type="float">
            <text:p>20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djusted volume required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 table:number-columns-repeated="4"/>
          <table:table-cell table:style-name="ce233" table:formula="of:=[.H16]-[.H11]*1000" office:value-type="float" office:value="8.34227842055566" calcext:value-type="float">
            <text:p>8.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xtra volume to add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 table:number-columns-repeated="8"/>
        </table:table-row>
        <table:table-row table:style-name="ro2">
          <table:table-cell table:formula="of:=[.A17]*[.A18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 table:number-columns-repeated="8"/>
        </table:table-row>
        <table:table-row table:style-name="ro2">
          <table:table-cell table:style-name="ce233" table:formula="of:=[.A19]/[.A14]" office:value-type="float" office:value="6.0005192221557" calcext:value-type="float">
            <text:p>6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 table:number-columns-repeated="4"/>
          <table:table-cell office:value-type="string" calcext:value-type="string">
            <text:p>Dilution</text:p>
          </table:table-cell>
          <table:table-cell table:number-columns-repeated="3"/>
        </table:table-row>
        <table:table-row table:style-name="ro2">
          <table:table-cell table:style-name="ce233" table:formula="of:=[.A17]-[.A20]" office:value-type="float" office:value="93.9994807778443" calcext:value-type="float">
            <text:p>94.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sired fluid quantity</text:p>
          </table:table-cell>
          <table:table-cell/>
        </table:table-row>
        <table:table-row table:style-name="ro2">
          <table:table-cell table:number-columns-repeated="7"/>
          <table:table-cell office:value-type="float" office:value="300" calcext:value-type="float">
            <text:p>300</text:p>
          </table:table-cell>
          <table:table-cell office:value-type="string" calcext:value-type="string">
            <text:p>/ml</text:p>
          </table:table-cell>
          <table:table-cell office:value-type="string" calcext:value-type="string">
            <text:p>Desired final sphere concentration for analysis</text:p>
          </table:table-cell>
          <table:table-cell/>
        </table:table-row>
        <table:table-row table:style-name="ro2">
          <table:table-cell table:number-columns-repeated="7"/>
          <table:table-cell table:formula="of:=[.H21]*[.H22]" office:value-type="float" office:value="30000" calcext:value-type="float">
            <text:p>30000</text:p>
          </table:table-cell>
          <table:table-cell office:value-type="string" calcext:value-type="string">
            <text:p>/bottle</text:p>
          </table:table-cell>
          <table:table-cell office:value-type="string" calcext:value-type="string">
            <text:p>Desired sphere quantity total</text:p>
          </table:table-cell>
          <table:table-cell/>
        </table:table-row>
        <table:table-row table:style-name="ro2">
          <table:table-cell table:number-columns-repeated="7"/>
          <table:table-cell table:style-name="ce233" table:formula="of:=[.H23]/[.H14]" office:value-type="float" office:value="14.399381742117" calcext:value-type="float">
            <text:p>14.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concentrate</text:p>
          </table:table-cell>
          <table:table-cell/>
        </table:table-row>
        <table:table-row table:style-name="ro2">
          <table:table-cell table:number-columns-repeated="7"/>
          <table:table-cell table:style-name="ce233" table:formula="of:=[.H21]-[.H24]" office:value-type="float" office:value="85.600618257883" calcext:value-type="float">
            <text:p>85.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quired amount of diluent</text:p>
          </table:table-cell>
          <table:table-cell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style-name="ce92" office:value-type="string" calcext:value-type="string">
            <text:p>Iterative Calculator for sliding window half-count method of PSL sphere threshold measuremen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Calibrated Channel Size</text:p>
          </table:table-cell>
          <table:table-cell table:style-name="ce92" office:value-type="float" office:value="50" calcext:value-type="float">
            <text:p>50</text:p>
          </table:table-cell>
          <table:table-cell office:value-type="string" calcext:value-type="string">
            <text:p>μm(c)</text:p>
          </table:table-cell>
          <table:table-cell table:number-columns-repeated="2"/>
          <table:table-cell table:style-name="ce92" office:value-type="string" calcext:value-type="string">
            <text:p>70μm(c)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Channel Threshold (LPA-View value)</text:p>
          </table:table-cell>
          <table:table-cell table:formula="of:=0.56*[.C35]" office:value-type="float" office:value="8568" calcext:value-type="float">
            <text:p>8568</text:p>
          </table:table-cell>
          <table:table-cell table:style-name="ce92" office:value-type="float" office:value="15300" calcext:value-type="float">
            <text:p>15300</text:p>
          </table:table-cell>
          <table:table-cell table:formula="of:=1.56*[.C35]" office:value-type="float" office:value="23868" calcext:value-type="float">
            <text:p>23868</text:p>
          </table:table-cell>
          <table:table-cell/>
          <table:table-cell table:formula="of:=0.56*[.G35]" office:value-type="float" office:value="14000" calcext:value-type="float">
            <text:p>14000</text:p>
          </table:table-cell>
          <table:table-cell table:style-name="ce92" office:value-type="float" office:value="25000" calcext:value-type="float">
            <text:p>25000</text:p>
          </table:table-cell>
          <table:table-cell table:formula="of:=1.56*[.G35]" office:value-type="float" office:value="39000" calcext:value-type="float">
            <text:p>39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ulative Counts / 100ml</text:p>
          </table:table-cell>
          <table:table-cell office:value-type="float" office:value="10387" calcext:value-type="float">
            <text:p>10387</text:p>
          </table:table-cell>
          <table:table-cell office:value-type="float" office:value="5232" calcext:value-type="float">
            <text:p>52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63" calcext:value-type="float">
            <text:p>24063</text:p>
          </table:table-cell>
          <table:table-cell office:value-type="float" office:value="12109" calcext:value-type="float">
            <text:p>121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erential Counts / 100ml</text:p>
          </table:table-cell>
          <table:table-cell table:formula="of:=[.B36]-[.C36]" office:value-type="float" office:value="5155" calcext:value-type="float">
            <text:p>5155</text:p>
          </table:table-cell>
          <table:table-cell table:formula="of:=[.C36]-[.D36]" office:value-type="float" office:value="5227" calcext:value-type="float">
            <text:p>5227</text:p>
          </table:table-cell>
          <table:table-cell table:formula="of:=[.D36]-[.E36]" office:value-type="float" office:value="5" calcext:value-type="float">
            <text:p>5</text:p>
          </table:table-cell>
          <table:table-cell/>
          <table:table-cell table:formula="of:=[.F36]-[.G36]" office:value-type="float" office:value="11954" calcext:value-type="float">
            <text:p>11954</text:p>
          </table:table-cell>
          <table:table-cell table:formula="of:=[.G36]-[.H36]" office:value-type="float" office:value="12109" calcext:value-type="float">
            <text:p>12109</text:p>
          </table:table-cell>
          <table:table-cell table:formula="of:=[.H36]-[.I3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D</text:p>
          </table:table-cell>
          <table:table-cell table:style-name="ce240" table:formula="of:=(1-[.B37]/[.C37])" office:value-type="percentage" office:value="0.0137746317199158" calcext:value-type="percentage">
            <text:p>1.38%</text:p>
          </table:table-cell>
          <table:table-cell table:number-columns-repeated="3"/>
          <table:table-cell table:style-name="ce240" table:formula="of:=(1-[.F37]/[.G37])" office:value-type="percentage" office:value="0.0128003963993724" calcext:value-type="percentage">
            <text:p>1.28%</text:p>
          </table:table-cell>
          <table:table-cell table:number-columns-repeated="5"/>
        </table:table-row>
      </table:table>
      <table:table table:name="Clause 6 Sizing Calibration" table:style-name="ta1">
        <table:table-column table:style-name="co10" table:default-cell-style-name="Default"/>
        <table:table-column table:style-name="co11" table:default-cell-style-name="Default"/>
        <table:table-column table:style-name="co4" table:number-columns-repeated="1022" table:default-cell-style-name="Default"/>
        <table:table-row table:style-name="ro3">
          <table:table-cell table:style-name="ce59" office:value-type="string" calcext:value-type="string">
            <text:p>&gt;1000 particles per bottle at max certified size</text:p>
            <text:p>Sample Cv per Table C.2</text:p>
          </table:table-cell>
          <table:table-cell table:style-name="ce68" office:value-type="string" calcext:value-type="string">
            <text:p>SRM2806/RM8631x</text:p>
          </table:table-cell>
          <table:table-cell table:style-name="ce59" office:value-type="string" calcext:value-type="string" table:number-columns-spanned="5" table:number-rows-spanned="1">
            <text:p>Clause 6. Sizing Calibration. 3 separate bottles, 5 sub-samples from each.</text:p>
          </table:table-cell>
          <table:covered-table-cell table:number-columns-repeated="4" table:style-name="ce68"/>
          <table:table-cell table:style-name="ce68" table:number-columns-repeated="1017"/>
        </table:table-row>
        <table:table-row table:style-name="ro2">
          <table:table-cell>
            <draw:frame draw:z-index="0" draw:name="Image 4" draw:style-name="gr1" draw:text-style-name="P1" svg:width="14.684cm" svg:height="5.975cm" svg:x="0.235cm" svg:y="0.067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Analysis using Bottle Sampler and MTD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92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-500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LPA3 Reference Counter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float" office:value="999999" calcext:value-type="float">
            <text:p>999999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Reference Counter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Sensor S/N</text:p>
          </table:table-cell>
          <table:table-cell table:number-columns-repeated="2"/>
          <table:table-cell table:style-name="ce16"/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Date</text:p>
          </table:table-cell>
          <table:table-cell table:number-columns-repeated="2"/>
          <table:table-cell table:style-name="ce30" office:value-type="date" office:date-value="2025-02-24" calcext:value-type="date">
            <text:p>2025-02-24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135" calcext:value-type="float">
            <text:p>135</text:p>
          </table:table-cell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MTD mg/l</text:p>
          </table:table-cell>
          <table:table-cell table:number-columns-repeated="2"/>
          <table:table-cell office:value-type="float" office:value="5.442" calcext:value-type="float">
            <text:p>5.44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>
            <draw:frame draw:z-index="1" draw:name="Image 5" draw:style-name="gr1" draw:text-style-name="P1" svg:width="12.951cm" svg:height="8.301cm" svg:x="0.726cm" svg:y="0.072cm">
              <draw:image xlink:href="Pictures/10000001000002C9000001C9241C46E7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"/>
          <table:table-cell table:style-name="ce92" office:value-type="string" calcext:value-type="string">
            <text:p>5ml sample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6" office:value-type="string" calcext:value-type="string">
            <text:p>&gt;4μm(c)/100ml</text:p>
          </table:table-cell>
          <table:table-cell table:style-name="ce16" office:value-type="string" calcext:value-type="string">
            <text:p>Deviation</text:p>
          </table:table-cell>
          <table:table-cell table:style-name="ce16" office:value-type="string" calcext:value-type="string">
            <text:p>6μm</text:p>
          </table:table-cell>
          <table:table-cell/>
          <table:table-cell table:style-name="ce16" office:value-type="string" calcext:value-type="string">
            <text:p>14um</text:p>
          </table:table-cell>
          <table:table-cell/>
          <table:table-cell table:style-name="ce16" office:value-type="string" calcext:value-type="string">
            <text:p>21μm</text:p>
          </table:table-cell>
          <table:table-cell/>
          <table:table-cell table:style-name="ce16" office:value-type="string" calcext:value-type="string">
            <text:p>25μm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Portion 1</text:p>
          </table:table-cell>
          <table:table-cell office:value-type="float" office:value="1319366" calcext:value-type="float">
            <text:p>1319366</text:p>
          </table:table-cell>
          <table:table-cell table:style-name="ce21" table:formula="of:=([.J40]-[.J$27])/[.J$27]" office:value-type="string" office:string-value="" calcext:value-type="error">
            <text:p>#DIV/0!</text:p>
          </table:table-cell>
          <table:table-cell office:value-type="float" office:value="504590" calcext:value-type="float">
            <text:p>504590</text:p>
          </table:table-cell>
          <table:table-cell table:style-name="ce21" table:formula="of:=([.L40]-[.L$27])/[.L$27]" office:value-type="string" office:string-value="" calcext:value-type="error">
            <text:p>#DIV/0!</text:p>
          </table:table-cell>
          <table:table-cell office:value-type="float" office:value="40101" calcext:value-type="float">
            <text:p>40101</text:p>
          </table:table-cell>
          <table:table-cell table:style-name="ce21" table:formula="of:=([.N40]-[.N$27])/[.N$27]" office:value-type="string" office:string-value="" calcext:value-type="error">
            <text:p>#DIV/0!</text:p>
          </table:table-cell>
          <table:table-cell office:value-type="float" office:value="7960" calcext:value-type="float">
            <text:p>7960</text:p>
          </table:table-cell>
          <table:table-cell table:style-name="ce21" table:formula="of:=([.P40]-[.P$27])/[.P$27]" office:value-type="string" office:string-value="" calcext:value-type="error">
            <text:p>#DIV/0!</text:p>
          </table:table-cell>
          <table:table-cell office:value-type="float" office:value="3907" calcext:value-type="float">
            <text:p>3907</text:p>
          </table:table-cell>
          <table:table-cell table:style-name="ce21" table:formula="of:=([.R40]-[.R$27])/[.R$2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table:number-columns-repeated="8"/>
          <table:table-cell office:value-type="string" calcext:value-type="string">
            <text:p>Portion 2</text:p>
          </table:table-cell>
          <table:table-cell office:value-type="float" office:value="1264547" calcext:value-type="float">
            <text:p>1264547</text:p>
          </table:table-cell>
          <table:table-cell table:style-name="ce21" table:formula="of:=([.J41]-[.J$27])/[.J$27]" office:value-type="string" office:string-value="" calcext:value-type="error">
            <text:p>#DIV/0!</text:p>
          </table:table-cell>
          <table:table-cell office:value-type="float" office:value="496968" calcext:value-type="float">
            <text:p>496968</text:p>
          </table:table-cell>
          <table:table-cell table:style-name="ce21" table:formula="of:=([.L41]-[.L$27])/[.L$27]" office:value-type="string" office:string-value="" calcext:value-type="error">
            <text:p>#DIV/0!</text:p>
          </table:table-cell>
          <table:table-cell office:value-type="float" office:value="41958" calcext:value-type="float">
            <text:p>41958</text:p>
          </table:table-cell>
          <table:table-cell table:style-name="ce21" table:formula="of:=([.N41]-[.N$27])/[.N$27]" office:value-type="string" office:string-value="" calcext:value-type="error">
            <text:p>#DIV/0!</text:p>
          </table:table-cell>
          <table:table-cell office:value-type="float" office:value="9103" calcext:value-type="float">
            <text:p>9103</text:p>
          </table:table-cell>
          <table:table-cell table:style-name="ce21" table:formula="of:=([.P41]-[.P$27])/[.P$27]" office:value-type="string" office:string-value="" calcext:value-type="error">
            <text:p>#DIV/0!</text:p>
          </table:table-cell>
          <table:table-cell office:value-type="float" office:value="4721" calcext:value-type="float">
            <text:p>4721</text:p>
          </table:table-cell>
          <table:table-cell table:style-name="ce21" table:formula="of:=([.R41]-[.R$27])/[.R$2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 &gt;10000 particles <text:span text:style-name="T5">at the smallest threshold setting</text:span><text:span text:style-name="T8"> for each sub-sample / test portion. </text:span></text:p>
          </table:table-cell>
          <table:table-cell table:number-columns-repeated="7"/>
          <table:table-cell office:value-type="string" calcext:value-type="string">
            <text:p>Portion 3</text:p>
          </table:table-cell>
          <table:table-cell office:value-type="float" office:value="1237296" calcext:value-type="float">
            <text:p>1237296</text:p>
          </table:table-cell>
          <table:table-cell table:style-name="ce21" table:formula="of:=([.J42]-[.J$27])/[.J$27]" office:value-type="string" office:string-value="" calcext:value-type="error">
            <text:p>#DIV/0!</text:p>
          </table:table-cell>
          <table:table-cell office:value-type="float" office:value="493550" calcext:value-type="float">
            <text:p>493550</text:p>
          </table:table-cell>
          <table:table-cell table:style-name="ce21" table:formula="of:=([.L42]-[.L$27])/[.L$27]" office:value-type="string" office:string-value="" calcext:value-type="error">
            <text:p>#DIV/0!</text:p>
          </table:table-cell>
          <table:table-cell office:value-type="float" office:value="41992" calcext:value-type="float">
            <text:p>41992</text:p>
          </table:table-cell>
          <table:table-cell table:style-name="ce21" table:formula="of:=([.N42]-[.N$27])/[.N$27]" office:value-type="string" office:string-value="" calcext:value-type="error">
            <text:p>#DIV/0!</text:p>
          </table:table-cell>
          <table:table-cell office:value-type="float" office:value="8518" calcext:value-type="float">
            <text:p>8518</text:p>
          </table:table-cell>
          <table:table-cell table:style-name="ce21" table:formula="of:=([.P42]-[.P$27])/[.P$27]" office:value-type="string" office:string-value="" calcext:value-type="error">
            <text:p>#DIV/0!</text:p>
          </table:table-cell>
          <table:table-cell office:value-type="float" office:value="4153" calcext:value-type="float">
            <text:p>4153</text:p>
          </table:table-cell>
          <table:table-cell table:style-name="ce21" table:formula="of:=([.R42]-[.R$27])/[.R$2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 &gt;1000 particles <text:span text:style-name="T5">counted</text:span> at each calibrated size, for each of the three calibration tests.</text:p>
          </table:table-cell>
          <table:table-cell table:number-columns-repeated="7"/>
          <table:table-cell office:value-type="string" calcext:value-type="string">
            <text:p>Portion 4</text:p>
          </table:table-cell>
          <table:table-cell office:value-type="float" office:value="1282331" calcext:value-type="float">
            <text:p>1282331</text:p>
          </table:table-cell>
          <table:table-cell table:style-name="ce21" table:formula="of:=([.J43]-[.J$27])/[.J$27]" office:value-type="string" office:string-value="" calcext:value-type="error">
            <text:p>#DIV/0!</text:p>
          </table:table-cell>
          <table:table-cell office:value-type="float" office:value="507867" calcext:value-type="float">
            <text:p>507867</text:p>
          </table:table-cell>
          <table:table-cell table:style-name="ce21" table:formula="of:=([.L43]-[.L$27])/[.L$27]" office:value-type="string" office:string-value="" calcext:value-type="error">
            <text:p>#DIV/0!</text:p>
          </table:table-cell>
          <table:table-cell office:value-type="float" office:value="42135" calcext:value-type="float">
            <text:p>42135</text:p>
          </table:table-cell>
          <table:table-cell table:style-name="ce21" table:formula="of:=([.N43]-[.N$27])/[.N$27]" office:value-type="string" office:string-value="" calcext:value-type="error">
            <text:p>#DIV/0!</text:p>
          </table:table-cell>
          <table:table-cell office:value-type="float" office:value="8785" calcext:value-type="float">
            <text:p>8785</text:p>
          </table:table-cell>
          <table:table-cell table:style-name="ce21" table:formula="of:=([.P43]-[.P$27])/[.P$27]" office:value-type="string" office:string-value="" calcext:value-type="error">
            <text:p>#DIV/0!</text:p>
          </table:table-cell>
          <table:table-cell office:value-type="float" office:value="4187" calcext:value-type="float">
            <text:p>4187</text:p>
          </table:table-cell>
          <table:table-cell table:style-name="ce21" table:formula="of:=([.R43]-[.R$27])/[.R$2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RM2806D has 14/ml at 30um</text:p>
          </table:table-cell>
          <table:table-cell table:number-columns-repeated="7"/>
          <table:table-cell office:value-type="string" calcext:value-type="string">
            <text:p>Portion 5</text:p>
          </table:table-cell>
          <table:table-cell office:value-type="float" office:value="1268729" calcext:value-type="float">
            <text:p>1268729</text:p>
          </table:table-cell>
          <table:table-cell table:style-name="ce21" table:formula="of:=([.J44]-[.J$27])/[.J$27]" office:value-type="string" office:string-value="" calcext:value-type="error">
            <text:p>#DIV/0!</text:p>
          </table:table-cell>
          <table:table-cell office:value-type="float" office:value="507168" calcext:value-type="float">
            <text:p>507168</text:p>
          </table:table-cell>
          <table:table-cell table:style-name="ce21" table:formula="of:=([.L44]-[.L$27])/[.L$27]" office:value-type="string" office:string-value="" calcext:value-type="error">
            <text:p>#DIV/0!</text:p>
          </table:table-cell>
          <table:table-cell office:value-type="float" office:value="41633" calcext:value-type="float">
            <text:p>41633</text:p>
          </table:table-cell>
          <table:table-cell table:style-name="ce21" table:formula="of:=([.N44]-[.N$27])/[.N$27]" office:value-type="string" office:string-value="" calcext:value-type="error">
            <text:p>#DIV/0!</text:p>
          </table:table-cell>
          <table:table-cell office:value-type="float" office:value="8777" calcext:value-type="float">
            <text:p>8777</text:p>
          </table:table-cell>
          <table:table-cell table:style-name="ce21" table:formula="of:=([.P44]-[.P$27])/[.P$27]" office:value-type="string" office:string-value="" calcext:value-type="error">
            <text:p>#DIV/0!</text:p>
          </table:table-cell>
          <table:table-cell office:value-type="float" office:value="4252" calcext:value-type="float">
            <text:p>4252</text:p>
          </table:table-cell>
          <table:table-cell table:style-name="ce21" table:formula="of:=([.R44]-[.R$27])/[.R$2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his implies we need at least 1000/14 = 71ml per test.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Mean</text:p>
          </table:table-cell>
          <table:table-cell table:style-name="ce20" table:formula="of:=AVERAGE([.J40:.J44])" office:value-type="float" office:value="1274453.8" calcext:value-type="float">
            <text:p>1274454</text:p>
          </table:table-cell>
          <table:table-cell/>
          <table:table-cell table:style-name="ce20" table:formula="of:=AVERAGE([.L40:.L44])" office:value-type="float" office:value="502028.6" calcext:value-type="float">
            <text:p>502029</text:p>
          </table:table-cell>
          <table:table-cell/>
          <table:table-cell table:style-name="ce20" table:formula="of:=AVERAGE([.N40:.N44])" office:value-type="float" office:value="41563.8" calcext:value-type="float">
            <text:p>41564</text:p>
          </table:table-cell>
          <table:table-cell/>
          <table:table-cell table:style-name="ce20" table:formula="of:=AVERAGE([.P40:.P44])" office:value-type="float" office:value="8628.6" calcext:value-type="float">
            <text:p>8629</text:p>
          </table:table-cell>
          <table:table-cell/>
          <table:table-cell table:style-name="ce20" table:formula="of:=AVERAGE([.R40:.R44])" office:value-type="float" office:value="4244" calcext:value-type="float">
            <text:p>42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t 21um we have 88.64/ml requiring 11.28ml counted volume per test which is more practical. </text:p>
          </table:table-cell>
          <table:table-cell table:number-columns-repeated="7"/>
          <table:table-cell office:value-type="string" calcext:value-type="string">
            <text:p>Sample StdDev</text:p>
          </table:table-cell>
          <table:table-cell table:style-name="ce20" table:formula="of:=STDEVP([.J40:.J44])" office:value-type="float" office:value="26798.4182772043" calcext:value-type="float">
            <text:p>26798</text:p>
          </table:table-cell>
          <table:table-cell/>
          <table:table-cell table:style-name="ce20" table:formula="of:=STDEVP([.L40:.L44])" office:value-type="float" office:value="5736.85361849159" calcext:value-type="float">
            <text:p>5737</text:p>
          </table:table-cell>
          <table:table-cell/>
          <table:table-cell table:style-name="ce20" table:formula="of:=STDEVP([.N40:.N44])" office:value-type="float" office:value="749.612006307263" calcext:value-type="float">
            <text:p>750</text:p>
          </table:table-cell>
          <table:table-cell/>
          <table:table-cell table:style-name="ce20" table:formula="of:=STDEVP([.P40:.P44])" office:value-type="float" office:value="382.308043336784" calcext:value-type="float">
            <text:p>382</text:p>
          </table:table-cell>
          <table:table-cell/>
          <table:table-cell table:style-name="ce20" table:formula="of:=STDEVP([.R40:.R44])" office:value-type="float" office:value="265.590662486466" calcext:value-type="float">
            <text:p>266</text:p>
          </table:table-cell>
          <table:table-cell table:number-columns-repeated="1006"/>
        </table:table-row>
        <table:table-row table:style-name="ro2">
          <table:table-cell table:number-columns-repeated="9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D<text:span text:style-name="T6">Q</text:span></text:p>
          </table:table-cell>
          <table:table-cell table:style-name="ce21" table:formula="of:=(MAX([.J40:.J44])-MIN([.J40:.J44]))/[.J46]" office:value-type="percentage" office:value="0.0643962142841114" calcext:value-type="percentage">
            <text:p>6.44%</text:p>
          </table:table-cell>
          <table:table-cell/>
          <table:table-cell table:style-name="ce21" table:formula="of:=(MAX([.L40:.L44])-MIN([.L40:.L44]))/[.L46]" office:value-type="percentage" office:value="0.0285182955712085" calcext:value-type="percentage">
            <text:p>2.85%</text:p>
          </table:table-cell>
          <table:table-cell/>
          <table:table-cell table:style-name="ce21" table:formula="of:=(MAX([.N40:.N44])-MIN([.N40:.N44]))/[.N46]" office:value-type="percentage" office:value="0.0489368152093889" calcext:value-type="percentage">
            <text:p>4.89%</text:p>
          </table:table-cell>
          <table:table-cell/>
          <table:table-cell table:style-name="ce21" table:formula="of:=(MAX([.P40:.P44])-MIN([.P40:.P44]))/[.P46]" office:value-type="percentage" office:value="0.132466448786593" calcext:value-type="percentage">
            <text:p>13.25%</text:p>
          </table:table-cell>
          <table:table-cell/>
          <table:table-cell table:style-name="ce21" table:formula="of:=(MAX([.R40:.R44])-MIN([.R40:.R44]))/[.R46]" office:value-type="percentage" office:value="0.191800188501414" calcext:value-type="percentage">
            <text:p>19.18%</text:p>
          </table:table-cell>
          <table:table-cell table:number-columns-repeated="1006"/>
        </table:table-row>
        <table:table-row table:style-name="ro2">
          <table:table-cell table:number-columns-repeated="9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CV<text:span text:style-name="T6">VOL</text:span></text:p>
          </table:table-cell>
          <table:table-cell table:style-name="ce21" table:formula="of:=[.J47]/[.J46]" office:value-type="percentage" office:value="0.0210273752388704" calcext:value-type="percentage">
            <text:p>2.10%</text:p>
          </table:table-cell>
          <table:table-cell table:style-name="ce101" table:formula="of:=IF([.J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L47]/[.L46]" office:value-type="percentage" office:value="0.0114273442160299" calcext:value-type="percentage">
            <text:p>1.14%</text:p>
          </table:table-cell>
          <table:table-cell table:style-name="ce101" table:formula="of:=IF([.L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N47]/[.N46]" office:value-type="percentage" office:value="0.0180352134864296" calcext:value-type="percentage">
            <text:p>1.80%</text:p>
          </table:table-cell>
          <table:table-cell table:style-name="ce101" table:formula="of:=IF([.N54]&lt;0.03;&quot;&lt;3% = PASS&quot;;&quot;&gt;3% = FAIL&quot;)" office:value-type="string" office:string-value="&lt;3% = PASS" calcext:value-type="string">
            <text:p>&lt;3% = PASS</text:p>
          </table:table-cell>
          <table:table-cell table:style-name="ce21" table:formula="of:=[.P47]/[.P46]" office:value-type="percentage" office:value="0.0443070768533463" calcext:value-type="percentage">
            <text:p>4.43%</text:p>
          </table:table-cell>
          <table:table-cell table:style-name="ce101"/>
          <table:table-cell table:style-name="ce21" table:formula="of:=[.R47]/[.R46]" office:value-type="percentage" office:value="0.0625802692003926" calcext:value-type="percentage">
            <text:p>6.26%</text:p>
          </table:table-cell>
          <table:table-cell table:style-name="ce101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16" office:value-type="string" calcext:value-type="string">
            <text:p>&gt;4μm(c)/100m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1239489" calcext:value-type="float">
            <text:p>1239489</text:p>
          </table:table-cell>
          <table:table-cell table:style-name="ce21" table:formula="of:=([.J59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5922" calcext:value-type="float">
            <text:p>1235922</text:p>
          </table:table-cell>
          <table:table-cell table:style-name="ce21" table:formula="of:=([.J60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13694" calcext:value-type="float">
            <text:p>1213694</text:p>
          </table:table-cell>
          <table:table-cell table:style-name="ce21" table:formula="of:=([.J61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59898" calcext:value-type="float">
            <text:p>1259898</text:p>
          </table:table-cell>
          <table:table-cell table:style-name="ce21" table:formula="of:=([.J62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237332" calcext:value-type="float">
            <text:p>1237332</text:p>
          </table:table-cell>
          <table:table-cell table:style-name="ce21" table:formula="of:=([.J63]-[.J$27])/[.J$2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0" table:formula="of:=AVERAGE([.J59:.J63])" office:value-type="float" office:value="1237267" calcext:value-type="float">
            <text:p>123726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 table:formula="of:=STDEVP([.J59:.J63])" office:value-type="float" office:value="14660.1434099398" calcext:value-type="float">
            <text:p>1466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21" table:formula="of:=[.J66]/[.J65]" office:value-type="percentage" office:value="0.0118488114610183" calcext:value-type="percentage">
            <text:p>1.18%</text:p>
          </table:table-cell>
          <table:table-cell table:style-name="ce101" table:formula="of:=IF([.J73]&lt;0.03;&quot;&lt;3% = PASS&quot;;&quot;&gt;3% = FAIL&quot;)" office:value-type="string" office:string-value="&lt;3% = PASS" calcext:value-type="string">
            <text:p>&lt;3% = PASS</text:p>
          </table:table-cell>
          <table:table-cell table:number-columns-repeated="1013"/>
        </table:table-row>
        <calcext:conditional-formats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 'Clause 6 Sizing Calibration'.Q54:'Clause 6 Sizing Calibration'.Q54 'Clause 6 Sizing Calibration'.S54:'Clause 6 Sizing Calibration'.S54">
            <calcext:condition calcext:apply-style-name="Good" calcext:value="=&quot;&lt;3% = PASS&quot;" calcext:base-cell-address="'Clause 6 Sizing Calibration'.K54"/>
            <calcext:condition calcext:apply-style-name="Bad" calcext:value="!=&quot;&lt;3% = PASS&quot;" calcext:base-cell-address="'Clause 6 Sizing Calibration'.K54"/>
          </calcext:conditional-format>
          <calcext:conditional-format calcext:target-range-address="'Clause 6 Sizing Calibration'.K54:'Clause 6 Sizing Calibration'.K54 'Clause 6 Sizing Calibration'.K73:'Clause 6 Sizing Calibration'.K73 'Clause 6 Sizing Calibration'.M54:'Clause 6 Sizing Calibration'.M54 'Clause 6 Sizing Calibration'.O54:'Clause 6 Sizing Calibration'.O54 'Clause 6 Sizing Calibration'.Q54:'Clause 6 Sizing Calibration'.Q54 'Clause 6 Sizing Calibration'.S54:'Clause 6 Sizing Calibration'.S54">
            <calcext:condition calcext:apply-style-name="Good" calcext:value="&lt;0.03" calcext:base-cell-address="'Clause 6 Sizing Calibration'.K54"/>
            <calcext:condition calcext:apply-style-name="Bad" calcext:value="&gt;=0.03" calcext:base-cell-address="'Clause 6 Sizing Calibration'.K54"/>
          </calcext:conditional-format>
        </calcext:conditional-formats>
      </table:table>
      <table:table table:name="Annex D Resolution" table:style-name="ta1">
        <table:shapes>
          <draw:frame draw:z-index="0" draw:style-name="gr3" draw:text-style-name="P1" svg:width="19.162cm" svg:height="10.778cm" svg:x="0.394cm" svg:y="15.593cm">
            <draw:object draw:notify-on-update-of-ranges="'Annex D Resolution'.L2:'Annex D Resolution'.L1002 'Annex D Resolution'.M1:'Annex D Resolution'.M1 'Annex D Resolution'.M2:'Annex D Resolution'.M1002 'Annex D Resolution'.L2:'Annex D Resolution'.L1002 'Annex D Resolution'.N1:'Annex D Resolution'.N1 'Annex D Resolution'.N2:'Annex D Resolution'.N10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1" table:default-cell-style-name="Default"/>
        <table:table-row table:style-name="ro8">
          <table:table-cell table:style-name="ce8" office:value-type="string" calcext:value-type="string">
            <text:p>Cv<text:span text:style-name="T2">DIAM_10</text:span> &lt; +/-15%</text:p>
            <text:p><text:span text:style-name="T3">→ Cv</text:span><text:span text:style-name="T4">SIGNAL_10</text:span><text:span text:style-name="T3"> &lt; +/-32%</text:span></text:p>
            <text:p/>
          </table:table-cell>
          <table:table-cell table:style-name="ce68" office:value-type="string" calcext:value-type="string">
            <text:p>10um spheres</text:p>
          </table:table-cell>
          <table:table-cell table:style-name="ce59" office:value-type="string" calcext:value-type="string" table:number-columns-spanned="6" table:number-rows-spanned="1">
            <text:p>Annex D – resolution. Establish threshold corresponding to spheres (equal diff counts for 0.72 and 1.0 relative channel thresholds). Set thresholds corresponding to 0.9, 1.0 and 1.1 times diameter so inferred from cal curve. </text:p>
          </table:table-cell>
          <table:covered-table-cell table:number-columns-repeated="5" table:style-name="ce68"/>
          <table:table-cell table:style-name="ce68"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dsp.height</text:p>
          </table:table-cell>
          <table:table-cell table:style-name="ce68" office:value-type="string" calcext:value-type="string">
            <text:p>Average</text:p>
          </table:table-cell>
          <table:table-cell table:style-name="ce68" office:value-type="string" calcext:value-type="string">
            <text:p>Max/2</text:p>
          </table:table-cell>
          <table:table-cell table:style-name="ce68" table:number-columns-repeated="1009"/>
        </table:table-row>
        <table:table-row table:style-name="ro2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alibration Rig</text:p>
          </table:table-cell>
          <table:table-cell table:style-name="ce196" office:value-type="float" office:value="304" calcext:value-type="float">
            <text:p>304</text:p>
          </table:table-cell>
          <table:table-cell/>
          <table:table-cell office:value-type="string" calcext:value-type="string">
            <text:p>LC10 spheres batch DC-10-03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APC Model</text:p>
          </table:table-cell>
          <table:table-cell table:style-name="ce197" office:value-type="string" calcext:value-type="string">
            <text:p>LPA3-NAVAIR</text:p>
          </table:table-cell>
          <table:table-cell/>
          <table:table-cell table:style-name="ce16" office:value-type="string" calcext:value-type="string">
            <text:p>10.2±0.4</text:p>
          </table:table-cell>
          <table:table-cell office:value-type="string" calcext:value-type="string">
            <text:p>μm certified mean diamater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M2:.M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APC S/N</text:p>
          </table:table-cell>
          <table:table-cell table:style-name="ce197" office:value-type="string" calcext:value-type="string">
            <text:p>11171-00011</text:p>
          </table:table-cell>
          <table:table-cell table:style-name="ce235"/>
          <table:table-cell table:style-name="ce21" office:value-type="percentage" office:value="0.069" calcext:value-type="percentage">
            <text:p>6.90%</text:p>
          </table:table-cell>
          <table:table-cell office:value-type="string" calcext:value-type="string">
            <text:p>CV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M3:.M10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Sensor Model</text:p>
          </table:table-cell>
          <table:table-cell table:style-name="ce197" office:value-type="string" calcext:value-type="string">
            <text:p>LPA3-NAVAIR</text:p>
          </table:table-cell>
          <table:table-cell table:style-name="ce235"/>
          <table:table-cell office:value-type="string" calcext:value-type="string">
            <text:p>NIST TRACEABL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M4:.M1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Sensor S/N</text:p>
          </table:table-cell>
          <table:table-cell table:style-name="ce197" office:value-type="string" calcext:value-type="string">
            <text:p>11171-0001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M5:.M12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Date</text:p>
          </table:table-cell>
          <table:table-cell table:style-name="ce198" office:value-type="date" office:date-value="2025-05-14" calcext:value-type="date">
            <text:p>2025-05-1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M6:.M13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Operator</text:p>
          </table:table-cell>
          <table:table-cell table:style-name="ce199" office:value-type="string" calcext:value-type="string">
            <text:p>JMD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M7:.M14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91" office:value-type="string" calcext:value-type="string">
            <text:p>Threshold Noise</text:p>
          </table:table-cell>
          <table:table-cell table:style-name="ce200" office:value-type="float" office:value="38" calcext:value-type="float">
            <text:p>38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M8:.M1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M9:.M1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235" office:value-type="float" office:value="10.2" calcext:value-type="float">
            <text:p>10.2</text:p>
          </table:table-cell>
          <table:table-cell table:style-name="ce235" office:value-type="string" calcext:value-type="string">
            <text:p>microns</text:p>
          </table:table-cell>
          <table:table-cell table:style-name="ce235" office:value-type="string" calcext:value-type="string">
            <text:p>diameter</text:p>
          </table:table-cell>
          <table:table-cell table:number-columns-repeated="2"/>
          <table:table-cell table:style-name="ce53" table:formula="of:=MAX([.$N$2:.$N$1000])" office:value-type="float" office:value="811" calcext:value-type="float">
            <text:p>811.00</text:p>
          </table:table-cell>
          <table:table-cell office:value-type="string" calcext:value-type="string">
            <text:p>Peak data value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M10:.M1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52" table:formula="of:=(4/3)*(3.1415936)*(([.A13]*0.000001/2)^3)" office:value-type="float" office:value="5.556473768448E-016" calcext:value-type="float">
            <text:p>5.56E-16</text:p>
          </table:table-cell>
          <table:table-cell table:style-name="ce235" office:value-type="string" calcext:value-type="string">
            <text:p>m^3</text:p>
          </table:table-cell>
          <table:table-cell table:style-name="ce235" office:value-type="string" calcext:value-type="string">
            <text:p>volume of a sphere</text:p>
          </table:table-cell>
          <table:table-cell table:number-columns-repeated="2"/>
          <table:table-cell table:style-name="ce53" table:formula="of:=MATCH([.F13]; [.N3:.N1000]; 0)" office:value-type="float" office:value="206" calcext:value-type="float">
            <text:p>206.00</text:p>
          </table:table-cell>
          <table:table-cell office:value-type="string" calcext:value-type="string">
            <text:p>Peak Position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M11:.M1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52" table:formula="of:=[.A14]*1.05*1000" office:value-type="float" office:value="0.00000000000058342974568704" calcext:value-type="float">
            <text:p>5.83E-13</text:p>
          </table:table-cell>
          <table:table-cell table:style-name="ce235" office:value-type="string" calcext:value-type="string">
            <text:p>kg</text:p>
          </table:table-cell>
          <table:table-cell table:style-name="ce235" office:value-type="string" calcext:value-type="string">
            <text:p>mass of a sphere</text:p>
          </table:table-cell>
          <table:table-cell table:number-columns-repeated="2"/>
          <table:table-cell table:style-name="ce53" table:formula="of:=MAX([.$F$13])/2" office:value-type="float" office:value="405.5" calcext:value-type="float">
            <text:p>405.50</text:p>
          </table:table-cell>
          <table:table-cell office:value-type="string" calcext:value-type="string">
            <text:p>half peak valu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M12:.M1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52" table:formula="of:=0.000001/[.A15]" office:value-type="float" office:value="1714002.42684303" calcext:value-type="float">
            <text:p>1.71E+06</text:p>
          </table:table-cell>
          <table:table-cell table:style-name="ce235" office:value-type="string" calcext:value-type="string">
            <text:p>Number</text:p>
          </table:table-cell>
          <table:table-cell table:style-name="ce235" office:value-type="string" calcext:value-type="string">
            <text:p>spheres per mg</text:p>
          </table:table-cell>
          <table:table-cell table:number-columns-repeated="2"/>
          <table:table-cell table:style-name="ce53" table:formula="of:=MATCH([.F15]; [.N2:.N1000]; 1)" office:value-type="float" office:value="181" calcext:value-type="float">
            <text:p>181.00</text:p>
          </table:table-cell>
          <table:table-cell office:value-type="string" calcext:value-type="string">
            <text:p>LHS FWHM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M13:.M20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2" office:value-type="float" office:value="200000" calcext:value-type="float">
            <text:p>2.00E+005</text:p>
          </table:table-cell>
          <table:table-cell table:style-name="ce235"/>
          <table:table-cell table:style-name="ce235" office:value-type="string" calcext:value-type="string">
            <text:p>Target concentration per 100ml</text:p>
          </table:table-cell>
          <table:table-cell table:number-columns-repeated="2"/>
          <table:table-cell table:style-name="ce53" table:formula="of:=INDEX([.L2:.L1000];[.F16])" office:value-type="float" office:value="180" calcext:value-type="float">
            <text:p>180.00</text:p>
          </table:table-cell>
          <table:table-cell office:value-type="string" calcext:value-type="string">
            <text:p>X value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M14:.M2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238" table:formula="of:=[.A17]/[.A16]*10" office:value-type="float" office:value="1.16685949137408" calcext:value-type="float">
            <text:p>1.17</text:p>
          </table:table-cell>
          <table:table-cell table:style-name="ce235" office:value-type="string" calcext:value-type="string">
            <text:p>mg/l</text:p>
          </table:table-cell>
          <table:table-cell table:style-name="ce235" office:value-type="string" calcext:value-type="string">
            <text:p>spheres to add per liter</text:p>
          </table:table-cell>
          <table:table-cell table:number-columns-repeated="2"/>
          <table:table-cell table:style-name="ce53" table:formula="of:=[.F14]-[.F17]" office:value-type="float" office:value="26" calcext:value-type="float">
            <text:p>26.00</text:p>
          </table:table-cell>
          <table:table-cell office:value-type="string" calcext:value-type="string">
            <text:p>½ FWHM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M15:.M22])" office:value-type="float" office:value="17.5" calcext:value-type="float">
            <text:p>17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239" office:value-type="float" office:value="11.8" calcext:value-type="float">
            <text:p>11.8</text:p>
          </table:table-cell>
          <table:table-cell table:style-name="ce235" office:value-type="string" calcext:value-type="string">
            <text:p>litres</text:p>
          </table:table-cell>
          <table:table-cell table:style-name="ce235" office:value-type="string" calcext:value-type="string">
            <text:p>Rig volume</text:p>
          </table:table-cell>
          <table:table-cell table:number-columns-repeated="2"/>
          <table:table-cell table:style-name="ce53" table:formula="of:=[.F18]*2" office:value-type="float" office:value="52" calcext:value-type="float">
            <text:p>52.00</text:p>
          </table:table-cell>
          <table:table-cell office:value-type="string" calcext:value-type="string">
            <text:p>FWHM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M16:.M23])" office:value-type="float" office:value="33.125" calcext:value-type="float">
            <text:p>33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238" table:formula="of:=[.A19]*[.A18]" office:value-type="float" office:value="13.7689419982141" calcext:value-type="float">
            <text:p>13.77</text:p>
          </table:table-cell>
          <table:table-cell table:style-name="ce235" office:value-type="string" calcext:value-type="string">
            <text:p>mg</text:p>
          </table:table-cell>
          <table:table-cell table:style-name="ce235" office:value-type="string" calcext:value-type="string">
            <text:p>Total mass of spheres to add</text:p>
          </table:table-cell>
          <table:table-cell table:number-columns-repeated="2"/>
          <table:table-cell table:style-name="ce53" table:formula="of:=[.F19] / (2 * SQRT(2 * LN(2)))" office:value-type="float" office:value="22.0823668074885" calcext:value-type="float">
            <text:p>22.08</text:p>
          </table:table-cell>
          <table:table-cell office:value-type="string" calcext:value-type="string">
            <text:p>Std.Dev.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M17:.M24])" office:value-type="float" office:value="50.75" calcext:value-type="float">
            <text:p>5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239" office:value-type="float" office:value="13.84" calcext:value-type="float">
            <text:p>13.84</text:p>
          </table:table-cell>
          <table:table-cell table:style-name="ce235" office:value-type="string" calcext:value-type="string">
            <text:p>mg</text:p>
          </table:table-cell>
          <table:table-cell table:style-name="ce235" office:value-type="string" calcext:value-type="string">
            <text:p>Actual mass added</text:p>
          </table:table-cell>
          <table:table-cell table:number-columns-repeated="2"/>
          <table:table-cell table:style-name="ce21" table:formula="of:=[.F20]/[.F14]" office:value-type="percentage" office:value="0.107195955376158" calcext:value-type="percentage">
            <text:p>10.72%</text:p>
          </table:table-cell>
          <table:table-cell office:value-type="string" calcext:value-type="string">
            <text:p>CV<text:span text:style-name="T6">SIGNAL</text:span>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M18:.M25])" office:value-type="float" office:value="67.75" calcext:value-type="float">
            <text:p>67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22" table:formula="of:=[.A21]/[.A20]*[.A17]" office:value-type="float" office:value="201032.149046674" calcext:value-type="float">
            <text:p>201032</text:p>
          </table:table-cell>
          <table:table-cell table:style-name="ce235" office:value-type="string" calcext:value-type="string">
            <text:p>N/100ml</text:p>
          </table:table-cell>
          <table:table-cell table:style-name="ce235" office:value-type="string" calcext:value-type="string">
            <text:p>Concentration expected</text:p>
          </table:table-cell>
          <table:table-cell table:number-columns-repeated="2"/>
          <table:table-cell table:style-name="ce53"/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formula="of:=AVERAGE([.M19:.M26])" office:value-type="float" office:value="78.25" calcext:value-type="float">
            <text:p>78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239" table:formula="of:=SUM([.M:.M])" office:value-type="float" office:value="50583" calcext:value-type="float">
            <text:p>50583</text:p>
          </table:table-cell>
          <table:table-cell table:style-name="ce235" office:value-type="string" calcext:value-type="string">
            <text:p>10μm particles</text:p>
          </table:table-cell>
          <table:table-cell table:style-name="ce235" office:value-type="string" calcext:value-type="string">
            <text:p>Total 10um particles Sized and Plotted</text:p>
          </table:table-cell>
          <table:table-cell table:number-columns-repeated="2"/>
          <table:table-cell table:style-name="ce54" table:formula="of:=[.F21]/2" office:value-type="percentage" office:value="0.0535979776880789" calcext:value-type="percentage">
            <text:p>5.36%</text:p>
          </table:table-cell>
          <table:table-cell table:style-name="ce9" office:value-type="string" calcext:value-type="string">
            <text:p>CV<text:span text:style-name="T6">DIAMETER</text:span>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formula="of:=AVERAGE([.M20:.M27])" office:value-type="float" office:value="92.5" calcext:value-type="float">
            <text:p>9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office:value-type="float" office:value="16.701" calcext:value-type="float">
            <text:p>16.70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nalysed Fluid Volume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table:formula="of:=AVERAGE([.M21:.M28])" office:value-type="float" office:value="106.625" calcext:value-type="float">
            <text:p>106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style-name="ce195" table:formula="of:=[.A23]/[.A22]*100/[.A24]" office:value-type="float" office:value="1.5065952427645" calcext:value-type="float">
            <text:p>1.507</text:p>
          </table:table-cell>
          <table:table-cell/>
          <table:table-cell office:value-type="string" calcext:value-type="string">
            <text:p>Capture Fraction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formula="of:=AVERAGE([.M22:.M29])" office:value-type="float" office:value="119.875" calcext:value-type="float">
            <text:p>119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table:formula="of:=AVERAGE([.M23:.M30])" office:value-type="float" office:value="114.25" calcext:value-type="float">
            <text:p>114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table:formula="of:=AVERAGE([.M24:.M31])" office:value-type="float" office:value="108.25" calcext:value-type="float">
            <text:p>108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table:formula="of:=AVERAGE([.M25:.M32])" office:value-type="float" office:value="100.5" calcext:value-type="float">
            <text:p>100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table:formula="of:=AVERAGE([.M26:.M33])" office:value-type="float" office:value="94.375" calcext:value-type="float">
            <text:p>94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table:formula="of:=AVERAGE([.M27:.M34])" office:value-type="float" office:value="91.625" calcext:value-type="float">
            <text:p>91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AVERAGE([.M28:.M35])" office:value-type="float" office:value="86.125" calcext:value-type="float">
            <text:p>86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formula="of:=AVERAGE([.M29:.M36])" office:value-type="float" office:value="81.875" calcext:value-type="float">
            <text:p>81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formula="of:=AVERAGE([.M30:.M37])" office:value-type="float" office:value="76" calcext:value-type="float">
            <text:p>76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formula="of:=AVERAGE([.M31:.M38])" office:value-type="float" office:value="71.125" calcext:value-type="float">
            <text:p>71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AVERAGE([.M32:.M39])" office:value-type="float" office:value="70.25" calcext:value-type="float">
            <text:p>7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formula="of:=AVERAGE([.M33:.M40])" office:value-type="float" office:value="66.5" calcext:value-type="float">
            <text:p>66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formula="of:=AVERAGE([.M34:.M41])" office:value-type="float" office:value="62" calcext:value-type="float">
            <text:p>6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formula="of:=AVERAGE([.M35:.M42])" office:value-type="float" office:value="59.75" calcext:value-type="float">
            <text:p>59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formula="of:=AVERAGE([.M36:.M43])" office:value-type="float" office:value="57" calcext:value-type="float">
            <text:p>57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AVERAGE([.M37:.M44])" office:value-type="float" office:value="52.625" calcext:value-type="float">
            <text:p>5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AVERAGE([.M38:.M45])" office:value-type="float" office:value="49.625" calcext:value-type="float">
            <text:p>49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AVERAGE([.M39:.M46])" office:value-type="float" office:value="48" calcext:value-type="float">
            <text:p>48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AVERAGE([.M40:.M47])" office:value-type="float" office:value="44.875" calcext:value-type="float">
            <text:p>4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AVERAGE([.M41:.M48])" office:value-type="float" office:value="44.125" calcext:value-type="float">
            <text:p>4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formula="of:=AVERAGE([.M42:.M49])" office:value-type="float" office:value="43.75" calcext:value-type="float">
            <text:p>4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AVERAGE([.M43:.M50])" office:value-type="float" office:value="43.875" calcext:value-type="float">
            <text:p>43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number-columns-repeated="2" office:value-type="float" office:value="45" calcext:value-type="float">
            <text:p>45</text:p>
          </table:table-cell>
          <table:table-cell table:formula="of:=AVERAGE([.M44:.M51])" office:value-type="float" office:value="44.75" calcext:value-type="float">
            <text:p>44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formula="of:=AVERAGE([.M45:.M52])" office:value-type="float" office:value="45.375" calcext:value-type="float">
            <text:p>45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AVERAGE([.M46:.M53])" office:value-type="float" office:value="45.25" calcext:value-type="float">
            <text:p>45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AVERAGE([.M47:.M54])" office:value-type="float" office:value="44.875" calcext:value-type="float">
            <text:p>4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AVERAGE([.M48:.M55])" office:value-type="float" office:value="43.375" calcext:value-type="float">
            <text:p>4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AVERAGE([.M49:.M56])" office:value-type="float" office:value="42.125" calcext:value-type="float">
            <text:p>42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AVERAGE([.M50:.M57])" office:value-type="float" office:value="41.25" calcext:value-type="float">
            <text:p>4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formula="of:=AVERAGE([.M51:.M58])" office:value-type="float" office:value="39.75" calcext:value-type="float">
            <text:p>39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formula="of:=AVERAGE([.M52:.M59])" office:value-type="float" office:value="37.625" calcext:value-type="float">
            <text:p>37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formula="of:=AVERAGE([.M53:.M60])" office:value-type="float" office:value="35.875" calcext:value-type="float">
            <text:p>35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formula="of:=AVERAGE([.M54:.M61])" office:value-type="float" office:value="36.25" calcext:value-type="float">
            <text:p>3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formula="of:=AVERAGE([.M55:.M62])" office:value-type="float" office:value="35.125" calcext:value-type="float">
            <text:p>3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AVERAGE([.M56:.M63])" office:value-type="float" office:value="34.625" calcext:value-type="float">
            <text:p>34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formula="of:=AVERAGE([.M57:.M64])" office:value-type="float" office:value="35.875" calcext:value-type="float">
            <text:p>35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formula="of:=AVERAGE([.M58:.M65])" office:value-type="float" office:value="35.75" calcext:value-type="float">
            <text:p>35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formula="of:=AVERAGE([.M59:.M66])" office:value-type="float" office:value="37.625" calcext:value-type="float">
            <text:p>37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formula="of:=AVERAGE([.M60:.M67])" office:value-type="float" office:value="37.125" calcext:value-type="float">
            <text:p>37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formula="of:=AVERAGE([.M61:.M68])" office:value-type="float" office:value="36.875" calcext:value-type="float">
            <text:p>3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AVERAGE([.M62:.M69])" office:value-type="float" office:value="36.375" calcext:value-type="float">
            <text:p>36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AVERAGE([.M63:.M70])" office:value-type="float" office:value="36.875" calcext:value-type="float">
            <text:p>3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formula="of:=AVERAGE([.M64:.M71])" office:value-type="float" office:value="38.5" calcext:value-type="float">
            <text:p>38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formula="of:=AVERAGE([.M65:.M72])" office:value-type="float" office:value="36.625" calcext:value-type="float">
            <text:p>36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AVERAGE([.M66:.M73])" office:value-type="float" office:value="34.125" calcext:value-type="float">
            <text:p>3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AVERAGE([.M67:.M74])" office:value-type="float" office:value="32.75" calcext:value-type="float">
            <text:p>32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table:formula="of:=AVERAGE([.M68:.M75])" office:value-type="float" office:value="33.25" calcext:value-type="float">
            <text:p>33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formula="of:=AVERAGE([.M69:.M76])" office:value-type="float" office:value="32.5" calcext:value-type="float">
            <text:p>3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formula="of:=AVERAGE([.M70:.M77])" office:value-type="float" office:value="31.75" calcext:value-type="float">
            <text:p>31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formula="of:=AVERAGE([.M71:.M78])" office:value-type="float" office:value="32" calcext:value-type="float">
            <text:p>3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table:formula="of:=AVERAGE([.M72:.M79])" office:value-type="float" office:value="30.125" calcext:value-type="float">
            <text:p>3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formula="of:=AVERAGE([.M73:.M80])" office:value-type="float" office:value="31.25" calcext:value-type="float">
            <text:p>3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AVERAGE([.M74:.M81])" office:value-type="float" office:value="32.125" calcext:value-type="float">
            <text:p>32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formula="of:=AVERAGE([.M75:.M82])" office:value-type="float" office:value="31.25" calcext:value-type="float">
            <text:p>3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AVERAGE([.M76:.M83])" office:value-type="float" office:value="30.75" calcext:value-type="float">
            <text:p>3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table:formula="of:=AVERAGE([.M77:.M84])" office:value-type="float" office:value="32" calcext:value-type="float">
            <text:p>3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formula="of:=AVERAGE([.M78:.M85])" office:value-type="float" office:value="32.625" calcext:value-type="float">
            <text:p>3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AVERAGE([.M79:.M86])" office:value-type="float" office:value="32.25" calcext:value-type="float">
            <text:p>32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formula="of:=AVERAGE([.M80:.M87])" office:value-type="float" office:value="32.75" calcext:value-type="float">
            <text:p>32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formula="of:=AVERAGE([.M81:.M88])" office:value-type="float" office:value="32.375" calcext:value-type="float">
            <text:p>32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table:formula="of:=AVERAGE([.M82:.M89])" office:value-type="float" office:value="33.875" calcext:value-type="float">
            <text:p>33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table:formula="of:=AVERAGE([.M83:.M90])" office:value-type="float" office:value="34.625" calcext:value-type="float">
            <text:p>34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formula="of:=AVERAGE([.M84:.M91])" office:value-type="float" office:value="35.75" calcext:value-type="float">
            <text:p>35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table:formula="of:=AVERAGE([.M85:.M92])" office:value-type="float" office:value="36.625" calcext:value-type="float">
            <text:p>36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table:formula="of:=AVERAGE([.M86:.M93])" office:value-type="float" office:value="36.875" calcext:value-type="float">
            <text:p>3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table:formula="of:=AVERAGE([.M87:.M94])" office:value-type="float" office:value="37.125" calcext:value-type="float">
            <text:p>37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table:formula="of:=AVERAGE([.M88:.M95])" office:value-type="float" office:value="39" calcext:value-type="float">
            <text:p>39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table:formula="of:=AVERAGE([.M89:.M96])" office:value-type="float" office:value="39.125" calcext:value-type="float">
            <text:p>39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AVERAGE([.M90:.M97])" office:value-type="float" office:value="38.5" calcext:value-type="float">
            <text:p>38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formula="of:=AVERAGE([.M91:.M98])" office:value-type="float" office:value="37.625" calcext:value-type="float">
            <text:p>37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table:formula="of:=AVERAGE([.M92:.M99])" office:value-type="float" office:value="36.625" calcext:value-type="float">
            <text:p>36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formula="of:=AVERAGE([.M93:.M100])" office:value-type="float" office:value="35.5" calcext:value-type="float">
            <text:p>35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formula="of:=AVERAGE([.M94:.M101])" office:value-type="float" office:value="36" calcext:value-type="float">
            <text:p>36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table:formula="of:=AVERAGE([.M95:.M102])" office:value-type="float" office:value="37" calcext:value-type="float">
            <text:p>37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formula="of:=AVERAGE([.M96:.M103])" office:value-type="float" office:value="35.5" calcext:value-type="float">
            <text:p>35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formula="of:=AVERAGE([.M97:.M104])" office:value-type="float" office:value="36.125" calcext:value-type="float">
            <text:p>36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table:formula="of:=AVERAGE([.M98:.M105])" office:value-type="float" office:value="37.5" calcext:value-type="float">
            <text:p>37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formula="of:=AVERAGE([.M99:.M106])" office:value-type="float" office:value="38.875" calcext:value-type="float">
            <text:p>38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table:formula="of:=AVERAGE([.M100:.M107])" office:value-type="float" office:value="40.125" calcext:value-type="float">
            <text:p>4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table:formula="of:=AVERAGE([.M101:.M108])" office:value-type="float" office:value="39.625" calcext:value-type="float">
            <text:p>39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table:formula="of:=AVERAGE([.M102:.M109])" office:value-type="float" office:value="39.125" calcext:value-type="float">
            <text:p>39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formula="of:=AVERAGE([.M103:.M110])" office:value-type="float" office:value="37.5" calcext:value-type="float">
            <text:p>37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formula="of:=AVERAGE([.M104:.M111])" office:value-type="float" office:value="37.125" calcext:value-type="float">
            <text:p>37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table:formula="of:=AVERAGE([.M105:.M112])" office:value-type="float" office:value="36.25" calcext:value-type="float">
            <text:p>3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table:formula="of:=AVERAGE([.M106:.M113])" office:value-type="float" office:value="35.125" calcext:value-type="float">
            <text:p>3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table:formula="of:=AVERAGE([.M107:.M114])" office:value-type="float" office:value="33" calcext:value-type="float">
            <text:p>33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table:formula="of:=AVERAGE([.M108:.M115])" office:value-type="float" office:value="31.875" calcext:value-type="float">
            <text:p>31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table:formula="of:=AVERAGE([.M109:.M116])" office:value-type="float" office:value="32.5" calcext:value-type="float">
            <text:p>3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table:formula="of:=AVERAGE([.M110:.M117])" office:value-type="float" office:value="32.875" calcext:value-type="float">
            <text:p>32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table:formula="of:=AVERAGE([.M111:.M118])" office:value-type="float" office:value="32.625" calcext:value-type="float">
            <text:p>3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table:formula="of:=AVERAGE([.M112:.M119])" office:value-type="float" office:value="33.375" calcext:value-type="float">
            <text:p>3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table:formula="of:=AVERAGE([.M113:.M120])" office:value-type="float" office:value="33.75" calcext:value-type="float">
            <text:p>3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AVERAGE([.M114:.M121])" office:value-type="float" office:value="33.375" calcext:value-type="float">
            <text:p>3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table:formula="of:=AVERAGE([.M115:.M122])" office:value-type="float" office:value="34.25" calcext:value-type="float">
            <text:p>34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table:formula="of:=AVERAGE([.M116:.M123])" office:value-type="float" office:value="32.5" calcext:value-type="float">
            <text:p>3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AVERAGE([.M117:.M124])" office:value-type="float" office:value="31" calcext:value-type="float">
            <text:p>31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table:formula="of:=AVERAGE([.M118:.M125])" office:value-type="float" office:value="30" calcext:value-type="float">
            <text:p>3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formula="of:=AVERAGE([.M119:.M126])" office:value-type="float" office:value="31.25" calcext:value-type="float">
            <text:p>3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table:formula="of:=AVERAGE([.M120:.M127])" office:value-type="float" office:value="32.125" calcext:value-type="float">
            <text:p>32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table:formula="of:=AVERAGE([.M121:.M128])" office:value-type="float" office:value="31.125" calcext:value-type="float">
            <text:p>31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table:formula="of:=AVERAGE([.M122:.M129])" office:value-type="float" office:value="29.875" calcext:value-type="float">
            <text:p>29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table:formula="of:=AVERAGE([.M123:.M130])" office:value-type="float" office:value="30.25" calcext:value-type="float">
            <text:p>3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AVERAGE([.M124:.M131])" office:value-type="float" office:value="31.375" calcext:value-type="float">
            <text:p>31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table:formula="of:=AVERAGE([.M125:.M132])" office:value-type="float" office:value="32.25" calcext:value-type="float">
            <text:p>32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table:formula="of:=AVERAGE([.M126:.M133])" office:value-type="float" office:value="32.375" calcext:value-type="float">
            <text:p>32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table:formula="of:=AVERAGE([.M127:.M134])" office:value-type="float" office:value="30.125" calcext:value-type="float">
            <text:p>3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table:formula="of:=AVERAGE([.M128:.M135])" office:value-type="float" office:value="28.75" calcext:value-type="float">
            <text:p>28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table:formula="of:=AVERAGE([.M129:.M136])" office:value-type="float" office:value="30.375" calcext:value-type="float">
            <text:p>3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table:formula="of:=AVERAGE([.M130:.M137])" office:value-type="float" office:value="31.25" calcext:value-type="float">
            <text:p>3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AVERAGE([.M131:.M138])" office:value-type="float" office:value="31.125" calcext:value-type="float">
            <text:p>31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AVERAGE([.M132:.M139])" office:value-type="float" office:value="31.75" calcext:value-type="float">
            <text:p>31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table:formula="of:=AVERAGE([.M133:.M140])" office:value-type="float" office:value="31.5" calcext:value-type="float">
            <text:p>31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formula="of:=AVERAGE([.M134:.M141])" office:value-type="float" office:value="31.875" calcext:value-type="float">
            <text:p>31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table:formula="of:=AVERAGE([.M135:.M142])" office:value-type="float" office:value="34.125" calcext:value-type="float">
            <text:p>3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  <table:table-cell table:formula="of:=AVERAGE([.M136:.M143])" office:value-type="float" office:value="35.875" calcext:value-type="float">
            <text:p>35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table:formula="of:=AVERAGE([.M137:.M144])" office:value-type="float" office:value="34" calcext:value-type="float">
            <text:p>34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39" calcext:value-type="float">
            <text:p>139</text:p>
          </table:table-cell>
          <table:table-cell office:value-type="float" office:value="33" calcext:value-type="float">
            <text:p>33</text:p>
          </table:table-cell>
          <table:table-cell table:formula="of:=AVERAGE([.M138:.M145])" office:value-type="float" office:value="34.625" calcext:value-type="float">
            <text:p>34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  <table:table-cell table:formula="of:=AVERAGE([.M139:.M146])" office:value-type="float" office:value="36.375" calcext:value-type="float">
            <text:p>36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table:formula="of:=AVERAGE([.M140:.M147])" office:value-type="float" office:value="38" calcext:value-type="float">
            <text:p>38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table:formula="of:=AVERAGE([.M141:.M148])" office:value-type="float" office:value="39.625" calcext:value-type="float">
            <text:p>39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formula="of:=AVERAGE([.M142:.M149])" office:value-type="float" office:value="41.375" calcext:value-type="float">
            <text:p>41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formula="of:=AVERAGE([.M143:.M150])" office:value-type="float" office:value="41.125" calcext:value-type="float">
            <text:p>41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table:formula="of:=AVERAGE([.M144:.M151])" office:value-type="float" office:value="41.125" calcext:value-type="float">
            <text:p>41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table:formula="of:=AVERAGE([.M145:.M152])" office:value-type="float" office:value="43.75" calcext:value-type="float">
            <text:p>4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table:formula="of:=AVERAGE([.M146:.M153])" office:value-type="float" office:value="44.125" calcext:value-type="float">
            <text:p>4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table:formula="of:=AVERAGE([.M147:.M154])" office:value-type="float" office:value="43.875" calcext:value-type="float">
            <text:p>43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table:formula="of:=AVERAGE([.M148:.M155])" office:value-type="float" office:value="44.125" calcext:value-type="float">
            <text:p>4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table:formula="of:=AVERAGE([.M149:.M156])" office:value-type="float" office:value="47.125" calcext:value-type="float">
            <text:p>47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table:formula="of:=AVERAGE([.M150:.M157])" office:value-type="float" office:value="49.25" calcext:value-type="float">
            <text:p>49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table:formula="of:=AVERAGE([.M151:.M158])" office:value-type="float" office:value="52.5" calcext:value-type="float">
            <text:p>5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table:formula="of:=AVERAGE([.M152:.M159])" office:value-type="float" office:value="55.375" calcext:value-type="float">
            <text:p>55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4" calcext:value-type="float">
            <text:p>154</text:p>
          </table:table-cell>
          <table:table-cell office:value-type="float" office:value="66" calcext:value-type="float">
            <text:p>66</text:p>
          </table:table-cell>
          <table:table-cell table:formula="of:=AVERAGE([.M153:.M160])" office:value-type="float" office:value="59.5" calcext:value-type="float">
            <text:p>59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table:formula="of:=AVERAGE([.M154:.M161])" office:value-type="float" office:value="64.375" calcext:value-type="float">
            <text:p>64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table:formula="of:=AVERAGE([.M155:.M162])" office:value-type="float" office:value="69.375" calcext:value-type="float">
            <text:p>69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formula="of:=AVERAGE([.M156:.M163])" office:value-type="float" office:value="72.375" calcext:value-type="float">
            <text:p>72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table:formula="of:=AVERAGE([.M157:.M164])" office:value-type="float" office:value="76.25" calcext:value-type="float">
            <text:p>7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59" calcext:value-type="float">
            <text:p>159</text:p>
          </table:table-cell>
          <table:table-cell office:value-type="float" office:value="77" calcext:value-type="float">
            <text:p>77</text:p>
          </table:table-cell>
          <table:table-cell table:formula="of:=AVERAGE([.M158:.M165])" office:value-type="float" office:value="80.875" calcext:value-type="float">
            <text:p>80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table:formula="of:=AVERAGE([.M159:.M166])" office:value-type="float" office:value="87.25" calcext:value-type="float">
            <text:p>87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table:formula="of:=AVERAGE([.M160:.M167])" office:value-type="float" office:value="93.375" calcext:value-type="float">
            <text:p>9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2" calcext:value-type="float">
            <text:p>162</text:p>
          </table:table-cell>
          <table:table-cell office:value-type="float" office:value="97" calcext:value-type="float">
            <text:p>97</text:p>
          </table:table-cell>
          <table:table-cell table:formula="of:=AVERAGE([.M161:.M168])" office:value-type="float" office:value="101.875" calcext:value-type="float">
            <text:p>101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3" calcext:value-type="float">
            <text:p>163</text:p>
          </table:table-cell>
          <table:table-cell office:value-type="float" office:value="101" calcext:value-type="float">
            <text:p>101</text:p>
          </table:table-cell>
          <table:table-cell table:formula="of:=AVERAGE([.M162:.M169])" office:value-type="float" office:value="108.5" calcext:value-type="float">
            <text:p>108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table:formula="of:=AVERAGE([.M163:.M170])" office:value-type="float" office:value="119.125" calcext:value-type="float">
            <text:p>119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table:formula="of:=AVERAGE([.M164:.M171])" office:value-type="float" office:value="132" calcext:value-type="float">
            <text:p>13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table:formula="of:=AVERAGE([.M165:.M172])" office:value-type="float" office:value="144.5" calcext:value-type="float">
            <text:p>144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table:formula="of:=AVERAGE([.M166:.M173])" office:value-type="float" office:value="156.75" calcext:value-type="float">
            <text:p>156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formula="of:=AVERAGE([.M167:.M174])" office:value-type="float" office:value="168" calcext:value-type="float">
            <text:p>168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table:formula="of:=AVERAGE([.M168:.M175])" office:value-type="float" office:value="182.125" calcext:value-type="float">
            <text:p>182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table:formula="of:=AVERAGE([.M169:.M176])" office:value-type="float" office:value="196.875" calcext:value-type="float">
            <text:p>19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table:formula="of:=AVERAGE([.M170:.M177])" office:value-type="float" office:value="215.5" calcext:value-type="float">
            <text:p>215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table:formula="of:=AVERAGE([.M171:.M178])" office:value-type="float" office:value="232" calcext:value-type="float">
            <text:p>23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3" calcext:value-type="float">
            <text:p>173</text:p>
          </table:table-cell>
          <table:table-cell office:value-type="float" office:value="232" calcext:value-type="float">
            <text:p>232</text:p>
          </table:table-cell>
          <table:table-cell table:formula="of:=AVERAGE([.M172:.M179])" office:value-type="float" office:value="250.25" calcext:value-type="float">
            <text:p>25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266" calcext:value-type="float">
            <text:p>266</text:p>
          </table:table-cell>
          <table:table-cell table:formula="of:=AVERAGE([.M173:.M180])" office:value-type="float" office:value="267.375" calcext:value-type="float">
            <text:p>267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279" calcext:value-type="float">
            <text:p>279</text:p>
          </table:table-cell>
          <table:table-cell table:formula="of:=AVERAGE([.M174:.M181])" office:value-type="float" office:value="294.75" calcext:value-type="float">
            <text:p>294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301" calcext:value-type="float">
            <text:p>301</text:p>
          </table:table-cell>
          <table:table-cell table:formula="of:=AVERAGE([.M175:.M182])" office:value-type="float" office:value="316.375" calcext:value-type="float">
            <text:p>316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7" calcext:value-type="float">
            <text:p>177</text:p>
          </table:table-cell>
          <table:table-cell office:value-type="float" office:value="324" calcext:value-type="float">
            <text:p>324</text:p>
          </table:table-cell>
          <table:table-cell table:formula="of:=AVERAGE([.M176:.M183])" office:value-type="float" office:value="336.25" calcext:value-type="float">
            <text:p>33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8" calcext:value-type="float">
            <text:p>178</text:p>
          </table:table-cell>
          <table:table-cell office:value-type="float" office:value="334" calcext:value-type="float">
            <text:p>334</text:p>
          </table:table-cell>
          <table:table-cell table:formula="of:=AVERAGE([.M177:.M184])" office:value-type="float" office:value="353.75" calcext:value-type="float">
            <text:p>35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79" calcext:value-type="float">
            <text:p>179</text:p>
          </table:table-cell>
          <table:table-cell office:value-type="float" office:value="418" calcext:value-type="float">
            <text:p>418</text:p>
          </table:table-cell>
          <table:table-cell table:formula="of:=AVERAGE([.M178:.M185])" office:value-type="float" office:value="381.625" calcext:value-type="float">
            <text:p>381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377" calcext:value-type="float">
            <text:p>377</text:p>
          </table:table-cell>
          <table:table-cell table:formula="of:=AVERAGE([.M179:.M186])" office:value-type="float" office:value="400.375" calcext:value-type="float">
            <text:p>40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1" calcext:value-type="float">
            <text:p>181</text:p>
          </table:table-cell>
          <table:table-cell office:value-type="float" office:value="391" calcext:value-type="float">
            <text:p>391</text:p>
          </table:table-cell>
          <table:table-cell table:formula="of:=AVERAGE([.M180:.M187])" office:value-type="float" office:value="428.125" calcext:value-type="float">
            <text:p>428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2" calcext:value-type="float">
            <text:p>182</text:p>
          </table:table-cell>
          <table:table-cell office:value-type="float" office:value="406" calcext:value-type="float">
            <text:p>406</text:p>
          </table:table-cell>
          <table:table-cell table:formula="of:=AVERAGE([.M181:.M188])" office:value-type="float" office:value="456.25" calcext:value-type="float">
            <text:p>45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3" calcext:value-type="float">
            <text:p>183</text:p>
          </table:table-cell>
          <table:table-cell office:value-type="float" office:value="502" calcext:value-type="float">
            <text:p>502</text:p>
          </table:table-cell>
          <table:table-cell table:formula="of:=AVERAGE([.M182:.M189])" office:value-type="float" office:value="475.75" calcext:value-type="float">
            <text:p>475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4" calcext:value-type="float">
            <text:p>184</text:p>
          </table:table-cell>
          <table:table-cell office:value-type="float" office:value="451" calcext:value-type="float">
            <text:p>451</text:p>
          </table:table-cell>
          <table:table-cell table:formula="of:=AVERAGE([.M183:.M190])" office:value-type="float" office:value="502.375" calcext:value-type="float">
            <text:p>502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546" calcext:value-type="float">
            <text:p>546</text:p>
          </table:table-cell>
          <table:table-cell table:formula="of:=AVERAGE([.M184:.M191])" office:value-type="float" office:value="527.125" calcext:value-type="float">
            <text:p>527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6" calcext:value-type="float">
            <text:p>186</text:p>
          </table:table-cell>
          <table:table-cell office:value-type="float" office:value="559" calcext:value-type="float">
            <text:p>559</text:p>
          </table:table-cell>
          <table:table-cell table:formula="of:=AVERAGE([.M185:.M192])" office:value-type="float" office:value="554.125" calcext:value-type="float">
            <text:p>55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7" calcext:value-type="float">
            <text:p>187</text:p>
          </table:table-cell>
          <table:table-cell office:value-type="float" office:value="574" calcext:value-type="float">
            <text:p>574</text:p>
          </table:table-cell>
          <table:table-cell table:formula="of:=AVERAGE([.M186:.M193])" office:value-type="float" office:value="575.25" calcext:value-type="float">
            <text:p>575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8" calcext:value-type="float">
            <text:p>188</text:p>
          </table:table-cell>
          <table:table-cell office:value-type="float" office:value="590" calcext:value-type="float">
            <text:p>590</text:p>
          </table:table-cell>
          <table:table-cell table:formula="of:=AVERAGE([.M187:.M194])" office:value-type="float" office:value="599.875" calcext:value-type="float">
            <text:p>599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589" calcext:value-type="float">
            <text:p>589</text:p>
          </table:table-cell>
          <table:table-cell table:formula="of:=AVERAGE([.M188:.M195])" office:value-type="float" office:value="624.5" calcext:value-type="float">
            <text:p>624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0" calcext:value-type="float">
            <text:p>190</text:p>
          </table:table-cell>
          <table:table-cell office:value-type="float" office:value="622" calcext:value-type="float">
            <text:p>622</text:p>
          </table:table-cell>
          <table:table-cell table:formula="of:=AVERAGE([.M189:.M196])" office:value-type="float" office:value="643.5" calcext:value-type="float">
            <text:p>643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1" calcext:value-type="float">
            <text:p>191</text:p>
          </table:table-cell>
          <table:table-cell office:value-type="float" office:value="671" calcext:value-type="float">
            <text:p>671</text:p>
          </table:table-cell>
          <table:table-cell table:formula="of:=AVERAGE([.M190:.M197])" office:value-type="float" office:value="665.75" calcext:value-type="float">
            <text:p>665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2" calcext:value-type="float">
            <text:p>192</text:p>
          </table:table-cell>
          <table:table-cell office:value-type="float" office:value="648" calcext:value-type="float">
            <text:p>648</text:p>
          </table:table-cell>
          <table:table-cell table:formula="of:=AVERAGE([.M191:.M198])" office:value-type="float" office:value="690.625" calcext:value-type="float">
            <text:p>690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743" calcext:value-type="float">
            <text:p>743</text:p>
          </table:table-cell>
          <table:table-cell table:formula="of:=AVERAGE([.M192:.M199])" office:value-type="float" office:value="716.25" calcext:value-type="float">
            <text:p>71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4" calcext:value-type="float">
            <text:p>194</text:p>
          </table:table-cell>
          <table:table-cell office:value-type="float" office:value="711" calcext:value-type="float">
            <text:p>711</text:p>
          </table:table-cell>
          <table:table-cell table:formula="of:=AVERAGE([.M193:.M200])" office:value-type="float" office:value="736.625" calcext:value-type="float">
            <text:p>736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5" calcext:value-type="float">
            <text:p>195</text:p>
          </table:table-cell>
          <table:table-cell office:value-type="float" office:value="752" calcext:value-type="float">
            <text:p>752</text:p>
          </table:table-cell>
          <table:table-cell table:formula="of:=AVERAGE([.M194:.M201])" office:value-type="float" office:value="746.125" calcext:value-type="float">
            <text:p>746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789" calcext:value-type="float">
            <text:p>789</text:p>
          </table:table-cell>
          <table:table-cell table:formula="of:=AVERAGE([.M195:.M202])" office:value-type="float" office:value="762.875" calcext:value-type="float">
            <text:p>762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7" calcext:value-type="float">
            <text:p>197</text:p>
          </table:table-cell>
          <table:table-cell office:value-type="float" office:value="794" calcext:value-type="float">
            <text:p>794</text:p>
          </table:table-cell>
          <table:table-cell table:formula="of:=AVERAGE([.M196:.M203])" office:value-type="float" office:value="773" calcext:value-type="float">
            <text:p>773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8" calcext:value-type="float">
            <text:p>198</text:p>
          </table:table-cell>
          <table:table-cell office:value-type="float" office:value="785" calcext:value-type="float">
            <text:p>785</text:p>
          </table:table-cell>
          <table:table-cell table:formula="of:=AVERAGE([.M197:.M204])" office:value-type="float" office:value="782.875" calcext:value-type="float">
            <text:p>782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99" calcext:value-type="float">
            <text:p>199</text:p>
          </table:table-cell>
          <table:table-cell office:value-type="float" office:value="747" calcext:value-type="float">
            <text:p>747</text:p>
          </table:table-cell>
          <table:table-cell table:formula="of:=AVERAGE([.M198:.M205])" office:value-type="float" office:value="793.125" calcext:value-type="float">
            <text:p>793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782" calcext:value-type="float">
            <text:p>782</text:p>
          </table:table-cell>
          <table:table-cell table:formula="of:=AVERAGE([.M199:.M206])" office:value-type="float" office:value="801.25" calcext:value-type="float">
            <text:p>80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1" calcext:value-type="float">
            <text:p>201</text:p>
          </table:table-cell>
          <table:table-cell office:value-type="float" office:value="824" calcext:value-type="float">
            <text:p>824</text:p>
          </table:table-cell>
          <table:table-cell table:formula="of:=AVERAGE([.M200:.M207])" office:value-type="float" office:value="797.75" calcext:value-type="float">
            <text:p>797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2" calcext:value-type="float">
            <text:p>202</text:p>
          </table:table-cell>
          <table:table-cell office:value-type="float" office:value="790" calcext:value-type="float">
            <text:p>790</text:p>
          </table:table-cell>
          <table:table-cell table:formula="of:=AVERAGE([.M201:.M208])" office:value-type="float" office:value="804.25" calcext:value-type="float">
            <text:p>804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834" calcext:value-type="float">
            <text:p>834</text:p>
          </table:table-cell>
          <table:table-cell table:formula="of:=AVERAGE([.M202:.M209])" office:value-type="float" office:value="807.5" calcext:value-type="float">
            <text:p>807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4" calcext:value-type="float">
            <text:p>204</text:p>
          </table:table-cell>
          <table:table-cell office:value-type="float" office:value="854" calcext:value-type="float">
            <text:p>854</text:p>
          </table:table-cell>
          <table:table-cell table:formula="of:=AVERAGE([.M203:.M210])" office:value-type="float" office:value="808.125" calcext:value-type="float">
            <text:p>808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5" calcext:value-type="float">
            <text:p>205</text:p>
          </table:table-cell>
          <table:table-cell office:value-type="float" office:value="766" calcext:value-type="float">
            <text:p>766</text:p>
          </table:table-cell>
          <table:table-cell table:formula="of:=AVERAGE([.M204:.M211])" office:value-type="float" office:value="809.75" calcext:value-type="float">
            <text:p>809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837" calcext:value-type="float">
            <text:p>837</text:p>
          </table:table-cell>
          <table:table-cell table:formula="of:=AVERAGE([.M205:.M212])" office:value-type="float" office:value="811" calcext:value-type="float">
            <text:p>811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7" calcext:value-type="float">
            <text:p>207</text:p>
          </table:table-cell>
          <table:table-cell office:value-type="float" office:value="773" calcext:value-type="float">
            <text:p>773</text:p>
          </table:table-cell>
          <table:table-cell table:formula="of:=AVERAGE([.M206:.M213])" office:value-type="float" office:value="798.25" calcext:value-type="float">
            <text:p>798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8" calcext:value-type="float">
            <text:p>208</text:p>
          </table:table-cell>
          <table:table-cell office:value-type="float" office:value="787" calcext:value-type="float">
            <text:p>787</text:p>
          </table:table-cell>
          <table:table-cell table:formula="of:=AVERAGE([.M207:.M214])" office:value-type="float" office:value="790.875" calcext:value-type="float">
            <text:p>790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09" calcext:value-type="float">
            <text:p>209</text:p>
          </table:table-cell>
          <table:table-cell office:value-type="float" office:value="837" calcext:value-type="float">
            <text:p>837</text:p>
          </table:table-cell>
          <table:table-cell table:formula="of:=AVERAGE([.M208:.M215])" office:value-type="float" office:value="789.25" calcext:value-type="float">
            <text:p>789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0" calcext:value-type="float">
            <text:p>210</text:p>
          </table:table-cell>
          <table:table-cell office:value-type="float" office:value="800" calcext:value-type="float">
            <text:p>800</text:p>
          </table:table-cell>
          <table:table-cell table:formula="of:=AVERAGE([.M209:.M216])" office:value-type="float" office:value="776.875" calcext:value-type="float">
            <text:p>77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1" calcext:value-type="float">
            <text:p>211</text:p>
          </table:table-cell>
          <table:table-cell office:value-type="float" office:value="732" calcext:value-type="float">
            <text:p>732</text:p>
          </table:table-cell>
          <table:table-cell table:formula="of:=AVERAGE([.M210:.M217])" office:value-type="float" office:value="769.625" calcext:value-type="float">
            <text:p>769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2" calcext:value-type="float">
            <text:p>212</text:p>
          </table:table-cell>
          <table:table-cell office:value-type="float" office:value="795" calcext:value-type="float">
            <text:p>795</text:p>
          </table:table-cell>
          <table:table-cell table:formula="of:=AVERAGE([.M211:.M218])" office:value-type="float" office:value="760.75" calcext:value-type="float">
            <text:p>76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3" calcext:value-type="float">
            <text:p>213</text:p>
          </table:table-cell>
          <table:table-cell office:value-type="float" office:value="753" calcext:value-type="float">
            <text:p>753</text:p>
          </table:table-cell>
          <table:table-cell table:formula="of:=AVERAGE([.M212:.M219])" office:value-type="float" office:value="742.5" calcext:value-type="float">
            <text:p>74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4" calcext:value-type="float">
            <text:p>214</text:p>
          </table:table-cell>
          <table:table-cell office:value-type="float" office:value="738" calcext:value-type="float">
            <text:p>738</text:p>
          </table:table-cell>
          <table:table-cell table:formula="of:=AVERAGE([.M213:.M220])" office:value-type="float" office:value="728.875" calcext:value-type="float">
            <text:p>728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5" calcext:value-type="float">
            <text:p>215</text:p>
          </table:table-cell>
          <table:table-cell office:value-type="float" office:value="715" calcext:value-type="float">
            <text:p>715</text:p>
          </table:table-cell>
          <table:table-cell table:formula="of:=AVERAGE([.M214:.M221])" office:value-type="float" office:value="723.625" calcext:value-type="float">
            <text:p>723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6" calcext:value-type="float">
            <text:p>216</text:p>
          </table:table-cell>
          <table:table-cell office:value-type="float" office:value="716" calcext:value-type="float">
            <text:p>716</text:p>
          </table:table-cell>
          <table:table-cell table:formula="of:=AVERAGE([.M215:.M222])" office:value-type="float" office:value="707.25" calcext:value-type="float">
            <text:p>707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7" calcext:value-type="float">
            <text:p>217</text:p>
          </table:table-cell>
          <table:table-cell office:value-type="float" office:value="691" calcext:value-type="float">
            <text:p>691</text:p>
          </table:table-cell>
          <table:table-cell table:formula="of:=AVERAGE([.M216:.M223])" office:value-type="float" office:value="688.125" calcext:value-type="float">
            <text:p>688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8" calcext:value-type="float">
            <text:p>218</text:p>
          </table:table-cell>
          <table:table-cell office:value-type="float" office:value="691" calcext:value-type="float">
            <text:p>691</text:p>
          </table:table-cell>
          <table:table-cell table:formula="of:=AVERAGE([.M217:.M224])" office:value-type="float" office:value="670.75" calcext:value-type="float">
            <text:p>67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690" calcext:value-type="float">
            <text:p>690</text:p>
          </table:table-cell>
          <table:table-cell table:formula="of:=AVERAGE([.M218:.M225])" office:value-type="float" office:value="659.125" calcext:value-type="float">
            <text:p>659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0" calcext:value-type="float">
            <text:p>220</text:p>
          </table:table-cell>
          <table:table-cell office:value-type="float" office:value="664" calcext:value-type="float">
            <text:p>664</text:p>
          </table:table-cell>
          <table:table-cell table:formula="of:=AVERAGE([.M219:.M226])" office:value-type="float" office:value="635.375" calcext:value-type="float">
            <text:p>635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1" calcext:value-type="float">
            <text:p>221</text:p>
          </table:table-cell>
          <table:table-cell office:value-type="float" office:value="600" calcext:value-type="float">
            <text:p>600</text:p>
          </table:table-cell>
          <table:table-cell table:formula="of:=AVERAGE([.M220:.M227])" office:value-type="float" office:value="615.5" calcext:value-type="float">
            <text:p>615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2" calcext:value-type="float">
            <text:p>222</text:p>
          </table:table-cell>
          <table:table-cell office:value-type="float" office:value="599" calcext:value-type="float">
            <text:p>599</text:p>
          </table:table-cell>
          <table:table-cell table:formula="of:=AVERAGE([.M221:.M228])" office:value-type="float" office:value="592.125" calcext:value-type="float">
            <text:p>592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3" calcext:value-type="float">
            <text:p>223</text:p>
          </table:table-cell>
          <table:table-cell office:value-type="float" office:value="622" calcext:value-type="float">
            <text:p>622</text:p>
          </table:table-cell>
          <table:table-cell table:formula="of:=AVERAGE([.M222:.M229])" office:value-type="float" office:value="570.375" calcext:value-type="float">
            <text:p>57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4" calcext:value-type="float">
            <text:p>224</text:p>
          </table:table-cell>
          <table:table-cell office:value-type="float" office:value="526" calcext:value-type="float">
            <text:p>526</text:p>
          </table:table-cell>
          <table:table-cell table:formula="of:=AVERAGE([.M223:.M230])" office:value-type="float" office:value="546" calcext:value-type="float">
            <text:p>546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5" calcext:value-type="float">
            <text:p>225</text:p>
          </table:table-cell>
          <table:table-cell office:value-type="float" office:value="532" calcext:value-type="float">
            <text:p>532</text:p>
          </table:table-cell>
          <table:table-cell table:formula="of:=AVERAGE([.M224:.M231])" office:value-type="float" office:value="527.375" calcext:value-type="float">
            <text:p>527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6" calcext:value-type="float">
            <text:p>226</text:p>
          </table:table-cell>
          <table:table-cell office:value-type="float" office:value="504" calcext:value-type="float">
            <text:p>504</text:p>
          </table:table-cell>
          <table:table-cell table:formula="of:=AVERAGE([.M225:.M232])" office:value-type="float" office:value="506.875" calcext:value-type="float">
            <text:p>50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7" calcext:value-type="float">
            <text:p>227</text:p>
          </table:table-cell>
          <table:table-cell office:value-type="float" office:value="516" calcext:value-type="float">
            <text:p>516</text:p>
          </table:table-cell>
          <table:table-cell table:formula="of:=AVERAGE([.M226:.M233])" office:value-type="float" office:value="480.25" calcext:value-type="float">
            <text:p>48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8" calcext:value-type="float">
            <text:p>228</text:p>
          </table:table-cell>
          <table:table-cell office:value-type="float" office:value="469" calcext:value-type="float">
            <text:p>469</text:p>
          </table:table-cell>
          <table:table-cell table:formula="of:=AVERAGE([.M227:.M234])" office:value-type="float" office:value="460" calcext:value-type="float">
            <text:p>46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29" calcext:value-type="float">
            <text:p>229</text:p>
          </table:table-cell>
          <table:table-cell office:value-type="float" office:value="451" calcext:value-type="float">
            <text:p>451</text:p>
          </table:table-cell>
          <table:table-cell table:formula="of:=AVERAGE([.M228:.M235])" office:value-type="float" office:value="437.625" calcext:value-type="float">
            <text:p>437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30" calcext:value-type="float">
            <text:p>230</text:p>
          </table:table-cell>
          <table:table-cell office:value-type="float" office:value="435" calcext:value-type="float">
            <text:p>435</text:p>
          </table:table-cell>
          <table:table-cell table:formula="of:=AVERAGE([.M229:.M236])" office:value-type="float" office:value="420.125" calcext:value-type="float">
            <text:p>42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31" calcext:value-type="float">
            <text:p>231</text:p>
          </table:table-cell>
          <table:table-cell office:value-type="float" office:value="409" calcext:value-type="float">
            <text:p>409</text:p>
          </table:table-cell>
          <table:table-cell table:formula="of:=AVERAGE([.M230:.M237])" office:value-type="float" office:value="398" calcext:value-type="float">
            <text:p>398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364" calcext:value-type="float">
            <text:p>364</text:p>
          </table:table-cell>
          <table:table-cell table:formula="of:=AVERAGE([.M231:.M238])" office:value-type="float" office:value="379.75" calcext:value-type="float">
            <text:p>379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33" calcext:value-type="float">
            <text:p>233</text:p>
          </table:table-cell>
          <table:table-cell office:value-type="float" office:value="353" calcext:value-type="float">
            <text:p>353</text:p>
          </table:table-cell>
          <table:table-cell table:formula="of:=AVERAGE([.M232:.M239])" office:value-type="float" office:value="359.625" calcext:value-type="float">
            <text:p>359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364" calcext:value-type="float">
            <text:p>364</text:p>
          </table:table-cell>
          <table:table-cell table:formula="of:=AVERAGE([.M233:.M240])" office:value-type="float" office:value="339.625" calcext:value-type="float">
            <text:p>339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35" calcext:value-type="float">
            <text:p>235</text:p>
          </table:table-cell>
          <table:table-cell office:value-type="float" office:value="339" calcext:value-type="float">
            <text:p>339</text:p>
          </table:table-cell>
          <table:table-cell table:formula="of:=AVERAGE([.M234:.M241])" office:value-type="float" office:value="318.375" calcext:value-type="float">
            <text:p>318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36" calcext:value-type="float">
            <text:p>236</text:p>
          </table:table-cell>
          <table:table-cell office:value-type="float" office:value="323" calcext:value-type="float">
            <text:p>323</text:p>
          </table:table-cell>
          <table:table-cell table:formula="of:=AVERAGE([.M235:.M242])" office:value-type="float" office:value="304.875" calcext:value-type="float">
            <text:p>30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37" calcext:value-type="float">
            <text:p>237</text:p>
          </table:table-cell>
          <table:table-cell office:value-type="float" office:value="290" calcext:value-type="float">
            <text:p>290</text:p>
          </table:table-cell>
          <table:table-cell table:formula="of:=AVERAGE([.M236:.M243])" office:value-type="float" office:value="286.75" calcext:value-type="float">
            <text:p>286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table:formula="of:=AVERAGE([.M237:.M244])" office:value-type="float" office:value="266.625" calcext:value-type="float">
            <text:p>266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number-columns-repeated="2" office:value-type="float" office:value="239" calcext:value-type="float">
            <text:p>239</text:p>
          </table:table-cell>
          <table:table-cell table:formula="of:=AVERAGE([.M238:.M245])" office:value-type="float" office:value="247.75" calcext:value-type="float">
            <text:p>247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table:formula="of:=AVERAGE([.M239:.M246])" office:value-type="float" office:value="229.25" calcext:value-type="float">
            <text:p>229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1" calcext:value-type="float">
            <text:p>241</text:p>
          </table:table-cell>
          <table:table-cell office:value-type="float" office:value="208" calcext:value-type="float">
            <text:p>208</text:p>
          </table:table-cell>
          <table:table-cell table:formula="of:=AVERAGE([.M240:.M247])" office:value-type="float" office:value="213.375" calcext:value-type="float">
            <text:p>21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2" calcext:value-type="float">
            <text:p>242</text:p>
          </table:table-cell>
          <table:table-cell office:value-type="float" office:value="203" calcext:value-type="float">
            <text:p>203</text:p>
          </table:table-cell>
          <table:table-cell table:formula="of:=AVERAGE([.M241:.M248])" office:value-type="float" office:value="196.875" calcext:value-type="float">
            <text:p>19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3" calcext:value-type="float">
            <text:p>243</text:p>
          </table:table-cell>
          <table:table-cell office:value-type="float" office:value="188" calcext:value-type="float">
            <text:p>188</text:p>
          </table:table-cell>
          <table:table-cell table:formula="of:=AVERAGE([.M242:.M249])" office:value-type="float" office:value="183.25" calcext:value-type="float">
            <text:p>183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table:formula="of:=AVERAGE([.M243:.M250])" office:value-type="float" office:value="166.25" calcext:value-type="float">
            <text:p>16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table:formula="of:=AVERAGE([.M244:.M251])" office:value-type="float" office:value="155.625" calcext:value-type="float">
            <text:p>155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table:formula="of:=AVERAGE([.M245:.M252])" office:value-type="float" office:value="145.5" calcext:value-type="float">
            <text:p>145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7" calcext:value-type="float">
            <text:p>247</text:p>
          </table:table-cell>
          <table:table-cell office:value-type="float" office:value="130" calcext:value-type="float">
            <text:p>130</text:p>
          </table:table-cell>
          <table:table-cell table:formula="of:=AVERAGE([.M246:.M253])" office:value-type="float" office:value="134.625" calcext:value-type="float">
            <text:p>134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120" calcext:value-type="float">
            <text:p>120</text:p>
          </table:table-cell>
          <table:table-cell table:formula="of:=AVERAGE([.M247:.M254])" office:value-type="float" office:value="123.5" calcext:value-type="float">
            <text:p>123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49" calcext:value-type="float">
            <text:p>249</text:p>
          </table:table-cell>
          <table:table-cell office:value-type="float" office:value="123" calcext:value-type="float">
            <text:p>123</text:p>
          </table:table-cell>
          <table:table-cell table:formula="of:=AVERAGE([.M248:.M255])" office:value-type="float" office:value="113.625" calcext:value-type="float">
            <text:p>113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0" calcext:value-type="float">
            <text:p>250</text:p>
          </table:table-cell>
          <table:table-cell office:value-type="float" office:value="122" calcext:value-type="float">
            <text:p>122</text:p>
          </table:table-cell>
          <table:table-cell table:formula="of:=AVERAGE([.M249:.M256])" office:value-type="float" office:value="106.25" calcext:value-type="float">
            <text:p>10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table:formula="of:=AVERAGE([.M250:.M257])" office:value-type="float" office:value="98.125" calcext:value-type="float">
            <text:p>98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2" calcext:value-type="float">
            <text:p>252</text:p>
          </table:table-cell>
          <table:table-cell office:value-type="float" office:value="86" calcext:value-type="float">
            <text:p>86</text:p>
          </table:table-cell>
          <table:table-cell table:formula="of:=AVERAGE([.M251:.M258])" office:value-type="float" office:value="90.75" calcext:value-type="float">
            <text:p>9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3" calcext:value-type="float">
            <text:p>253</text:p>
          </table:table-cell>
          <table:table-cell office:value-type="float" office:value="84" calcext:value-type="float">
            <text:p>84</text:p>
          </table:table-cell>
          <table:table-cell table:formula="of:=AVERAGE([.M252:.M259])" office:value-type="float" office:value="81" calcext:value-type="float">
            <text:p>81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4" calcext:value-type="float">
            <text:p>254</text:p>
          </table:table-cell>
          <table:table-cell office:value-type="float" office:value="84" calcext:value-type="float">
            <text:p>84</text:p>
          </table:table-cell>
          <table:table-cell table:formula="of:=AVERAGE([.M253:.M260])" office:value-type="float" office:value="71.25" calcext:value-type="float">
            <text:p>7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table:formula="of:=AVERAGE([.M254:.M261])" office:value-type="float" office:value="66.25" calcext:value-type="float">
            <text:p>6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61" calcext:value-type="float">
            <text:p>61</text:p>
          </table:table-cell>
          <table:table-cell table:formula="of:=AVERAGE([.M255:.M262])" office:value-type="float" office:value="61.25" calcext:value-type="float">
            <text:p>6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table:formula="of:=AVERAGE([.M256:.M263])" office:value-type="float" office:value="55.75" calcext:value-type="float">
            <text:p>55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table:formula="of:=AVERAGE([.M257:.M264])" office:value-type="float" office:value="51" calcext:value-type="float">
            <text:p>51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59" calcext:value-type="float">
            <text:p>259</text:p>
          </table:table-cell>
          <table:table-cell office:value-type="float" office:value="61" calcext:value-type="float">
            <text:p>61</text:p>
          </table:table-cell>
          <table:table-cell table:formula="of:=AVERAGE([.M258:.M265])" office:value-type="float" office:value="46.5" calcext:value-type="float">
            <text:p>46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0" calcext:value-type="float">
            <text:p>260</text:p>
          </table:table-cell>
          <table:table-cell office:value-type="float" office:value="46" calcext:value-type="float">
            <text:p>46</text:p>
          </table:table-cell>
          <table:table-cell table:formula="of:=AVERAGE([.M259:.M266])" office:value-type="float" office:value="42.5" calcext:value-type="float">
            <text:p>4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1" calcext:value-type="float">
            <text:p>261</text:p>
          </table:table-cell>
          <table:table-cell office:value-type="float" office:value="40" calcext:value-type="float">
            <text:p>40</text:p>
          </table:table-cell>
          <table:table-cell table:formula="of:=AVERAGE([.M260:.M267])" office:value-type="float" office:value="41.625" calcext:value-type="float">
            <text:p>41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table:formula="of:=AVERAGE([.M261:.M268])" office:value-type="float" office:value="39.5" calcext:value-type="float">
            <text:p>39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table:formula="of:=AVERAGE([.M262:.M269])" office:value-type="float" office:value="34.125" calcext:value-type="float">
            <text:p>3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  <table:table-cell table:formula="of:=AVERAGE([.M263:.M270])" office:value-type="float" office:value="30.75" calcext:value-type="float">
            <text:p>3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5" calcext:value-type="float">
            <text:p>265</text:p>
          </table:table-cell>
          <table:table-cell office:value-type="float" office:value="38" calcext:value-type="float">
            <text:p>38</text:p>
          </table:table-cell>
          <table:table-cell table:formula="of:=AVERAGE([.M264:.M271])" office:value-type="float" office:value="28.125" calcext:value-type="float">
            <text:p>28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table:formula="of:=AVERAGE([.M265:.M272])" office:value-type="float" office:value="24.625" calcext:value-type="float">
            <text:p>24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table:formula="of:=AVERAGE([.M266:.M273])" office:value-type="float" office:value="22.625" calcext:value-type="float">
            <text:p>2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8" calcext:value-type="float">
            <text:p>268</text:p>
          </table:table-cell>
          <table:table-cell office:value-type="float" office:value="19" calcext:value-type="float">
            <text:p>19</text:p>
          </table:table-cell>
          <table:table-cell table:formula="of:=AVERAGE([.M267:.M274])" office:value-type="float" office:value="21.875" calcext:value-type="float">
            <text:p>21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69" calcext:value-type="float">
            <text:p>269</text:p>
          </table:table-cell>
          <table:table-cell office:value-type="float" office:value="19" calcext:value-type="float">
            <text:p>19</text:p>
          </table:table-cell>
          <table:table-cell table:formula="of:=AVERAGE([.M268:.M275])" office:value-type="float" office:value="18.75" calcext:value-type="float">
            <text:p>18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table:formula="of:=AVERAGE([.M269:.M276])" office:value-type="float" office:value="17.375" calcext:value-type="float">
            <text:p>17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1" calcext:value-type="float">
            <text:p>271</text:p>
          </table:table-cell>
          <table:table-cell office:value-type="float" office:value="13" calcext:value-type="float">
            <text:p>13</text:p>
          </table:table-cell>
          <table:table-cell table:formula="of:=AVERAGE([.M270:.M277])" office:value-type="float" office:value="16.25" calcext:value-type="float">
            <text:p>1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2" calcext:value-type="float">
            <text:p>272</text:p>
          </table:table-cell>
          <table:table-cell office:value-type="float" office:value="23" calcext:value-type="float">
            <text:p>23</text:p>
          </table:table-cell>
          <table:table-cell table:formula="of:=AVERAGE([.M271:.M278])" office:value-type="float" office:value="15.625" calcext:value-type="float">
            <text:p>15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table:formula="of:=AVERAGE([.M272:.M279])" office:value-type="float" office:value="15.125" calcext:value-type="float">
            <text:p>1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formula="of:=AVERAGE([.M273:.M280])" office:value-type="float" office:value="13.875" calcext:value-type="float">
            <text:p>13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table:formula="of:=AVERAGE([.M274:.M281])" office:value-type="float" office:value="13" calcext:value-type="float">
            <text:p>13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table:formula="of:=AVERAGE([.M275:.M282])" office:value-type="float" office:value="11.625" calcext:value-type="float">
            <text:p>11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7" calcext:value-type="float">
            <text:p>277</text:p>
          </table:table-cell>
          <table:table-cell office:value-type="float" office:value="15" calcext:value-type="float">
            <text:p>15</text:p>
          </table:table-cell>
          <table:table-cell table:formula="of:=AVERAGE([.M276:.M283])" office:value-type="float" office:value="10.75" calcext:value-type="float">
            <text:p>1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table:formula="of:=AVERAGE([.M277:.M284])" office:value-type="float" office:value="9.75" calcext:value-type="float">
            <text:p>9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table:formula="of:=AVERAGE([.M278:.M285])" office:value-type="float" office:value="9.375" calcext:value-type="float">
            <text:p>9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table:formula="of:=AVERAGE([.M279:.M286])" office:value-type="float" office:value="9" calcext:value-type="float">
            <text:p>9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table:formula="of:=AVERAGE([.M280:.M287])" office:value-type="float" office:value="8.125" calcext:value-type="float">
            <text:p>8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table:formula="of:=AVERAGE([.M281:.M288])" office:value-type="float" office:value="7.875" calcext:value-type="float">
            <text:p>7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table:formula="of:=AVERAGE([.M282:.M289])" office:value-type="float" office:value="8" calcext:value-type="float">
            <text:p>8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  <table:table-cell table:formula="of:=AVERAGE([.M283:.M290])" office:value-type="float" office:value="7.625" calcext:value-type="float">
            <text:p>7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table:formula="of:=AVERAGE([.M284:.M291])" office:value-type="float" office:value="7.375" calcext:value-type="float">
            <text:p>7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table:formula="of:=AVERAGE([.M285:.M292])" office:value-type="float" office:value="6.875" calcext:value-type="float">
            <text:p>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table:formula="of:=AVERAGE([.M286:.M293])" office:value-type="float" office:value="6.875" calcext:value-type="float">
            <text:p>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9" calcext:value-type="float">
            <text:p>9</text:p>
          </table:table-cell>
          <table:table-cell table:formula="of:=AVERAGE([.M287:.M294])" office:value-type="float" office:value="6.125" calcext:value-type="float">
            <text:p>6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formula="of:=AVERAGE([.M288:.M295])" office:value-type="float" office:value="5.25" calcext:value-type="float">
            <text:p>5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AVERAGE([.M289:.M296])" office:value-type="float" office:value="5.5" calcext:value-type="float">
            <text:p>5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table:formula="of:=AVERAGE([.M290:.M297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formula="of:=AVERAGE([.M291:.M298])" office:value-type="float" office:value="4.25" calcext:value-type="float">
            <text:p>4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formula="of:=AVERAGE([.M292:.M299])" office:value-type="float" office:value="4.25" calcext:value-type="float">
            <text:p>4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formula="of:=AVERAGE([.M293:.M300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table:formula="of:=AVERAGE([.M294:.M301])" office:value-type="float" office:value="3.625" calcext:value-type="float">
            <text:p>3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formula="of:=AVERAGE([.M295:.M302])" office:value-type="float" office:value="3.375" calcext:value-type="float">
            <text:p>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formula="of:=AVERAGE([.M296:.M303])" office:value-type="float" office:value="3.5" calcext:value-type="float">
            <text:p>3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AVERAGE([.M297:.M304])" office:value-type="float" office:value="3.25" calcext:value-type="float">
            <text:p>3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formula="of:=AVERAGE([.M298:.M305])" office:value-type="float" office:value="3.25" calcext:value-type="float">
            <text:p>3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AVERAGE([.M299:.M306])" office:value-type="float" office:value="3" calcext:value-type="float">
            <text:p>3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formula="of:=AVERAGE([.M300:.M307])" office:value-type="float" office:value="2.75" calcext:value-type="float">
            <text:p>2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formula="of:=AVERAGE([.M301:.M308])" office:value-type="float" office:value="2.875" calcext:value-type="float">
            <text:p>2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formula="of:=AVERAGE([.M302:.M309])" office:value-type="float" office:value="2.5" calcext:value-type="float">
            <text:p>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table:formula="of:=AVERAGE([.M303:.M310])" office:value-type="float" office:value="2.625" calcext:value-type="float">
            <text:p>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AVERAGE([.M304:.M311])" office:value-type="float" office:value="2.625" calcext:value-type="float">
            <text:p>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formula="of:=AVERAGE([.M305:.M312])" office:value-type="float" office:value="2" calcext:value-type="float">
            <text:p>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table:formula="of:=AVERAGE([.M306:.M313])" office:value-type="float" office:value="2" calcext:value-type="float">
            <text:p>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table:formula="of:=AVERAGE([.M307:.M314])" office:value-type="float" office:value="2" calcext:value-type="float">
            <text:p>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table:formula="of:=AVERAGE([.M308:.M315])" office:value-type="float" office:value="2" calcext:value-type="float">
            <text:p>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AVERAGE([.M309:.M316])" office:value-type="float" office:value="2.375" calcext:value-type="float">
            <text:p>2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formula="of:=AVERAGE([.M310:.M317])" office:value-type="float" office:value="2.5" calcext:value-type="float">
            <text:p>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formula="of:=AVERAGE([.M311:.M318])" office:value-type="float" office:value="2.25" calcext:value-type="float">
            <text:p>2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formula="of:=AVERAGE([.M312:.M319])" office:value-type="float" office:value="2.375" calcext:value-type="float">
            <text:p>2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table:formula="of:=AVERAGE([.M313:.M320])" office:value-type="float" office:value="2.625" calcext:value-type="float">
            <text:p>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table:formula="of:=AVERAGE([.M314:.M321])" office:value-type="float" office:value="3.125" calcext:value-type="float">
            <text:p>3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formula="of:=AVERAGE([.M315:.M322])" office:value-type="float" office:value="3.625" calcext:value-type="float">
            <text:p>3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formula="of:=AVERAGE([.M316:.M323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table:formula="of:=AVERAGE([.M317:.M324])" office:value-type="float" office:value="3.625" calcext:value-type="float">
            <text:p>3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table:formula="of:=AVERAGE([.M318:.M325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table:formula="of:=AVERAGE([.M319:.M326])" office:value-type="float" office:value="3.875" calcext:value-type="float">
            <text:p>3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table:formula="of:=AVERAGE([.M320:.M327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formula="of:=AVERAGE([.M321:.M328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formula="of:=AVERAGE([.M322:.M329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table:formula="of:=AVERAGE([.M323:.M330])" office:value-type="float" office:value="3.375" calcext:value-type="float">
            <text:p>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table:formula="of:=AVERAGE([.M324:.M331])" office:value-type="float" office:value="3.5" calcext:value-type="float">
            <text:p>3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formula="of:=AVERAGE([.M325:.M332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table:formula="of:=AVERAGE([.M326:.M333])" office:value-type="float" office:value="4.125" calcext:value-type="float">
            <text:p>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formula="of:=AVERAGE([.M327:.M334])" office:value-type="float" office:value="4.125" calcext:value-type="float">
            <text:p>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table:formula="of:=AVERAGE([.M328:.M335])" office:value-type="float" office:value="4.75" calcext:value-type="float">
            <text:p>4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formula="of:=AVERAGE([.M329:.M336])" office:value-type="float" office:value="5.125" calcext:value-type="float">
            <text:p>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formula="of:=AVERAGE([.M330:.M337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table:formula="of:=AVERAGE([.M331:.M338])" office:value-type="float" office:value="5" calcext:value-type="float">
            <text:p>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formula="of:=AVERAGE([.M332:.M339])" office:value-type="float" office:value="5.125" calcext:value-type="float">
            <text:p>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table:formula="of:=AVERAGE([.M333:.M340])" office:value-type="float" office:value="4.625" calcext:value-type="float">
            <text:p>4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table:formula="of:=AVERAGE([.M334:.M341])" office:value-type="float" office:value="4.125" calcext:value-type="float">
            <text:p>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table:formula="of:=AVERAGE([.M335:.M342])" office:value-type="float" office:value="4.125" calcext:value-type="float">
            <text:p>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table:formula="of:=AVERAGE([.M336:.M343])" office:value-type="float" office:value="3.375" calcext:value-type="float">
            <text:p>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formula="of:=AVERAGE([.M337:.M344])" office:value-type="float" office:value="2.875" calcext:value-type="float">
            <text:p>2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table:formula="of:=AVERAGE([.M338:.M345])" office:value-type="float" office:value="2.625" calcext:value-type="float">
            <text:p>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table:formula="of:=AVERAGE([.M339:.M346])" office:value-type="float" office:value="3.25" calcext:value-type="float">
            <text:p>3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formula="of:=AVERAGE([.M340:.M347])" office:value-type="float" office:value="3.375" calcext:value-type="float">
            <text:p>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formula="of:=AVERAGE([.M341:.M348])" office:value-type="float" office:value="3.375" calcext:value-type="float">
            <text:p>3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table:formula="of:=AVERAGE([.M342:.M349])" office:value-type="float" office:value="3.625" calcext:value-type="float">
            <text:p>3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table:formula="of:=AVERAGE([.M343:.M350])" office:value-type="float" office:value="3.5" calcext:value-type="float">
            <text:p>3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table:formula="of:=AVERAGE([.M344:.M351])" office:value-type="float" office:value="4" calcext:value-type="float">
            <text:p>4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formula="of:=AVERAGE([.M345:.M352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table:formula="of:=AVERAGE([.M346:.M353])" office:value-type="float" office:value="5" calcext:value-type="float">
            <text:p>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table:formula="of:=AVERAGE([.M347:.M354])" office:value-type="float" office:value="4.375" calcext:value-type="float">
            <text:p>4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table:formula="of:=AVERAGE([.M348:.M355])" office:value-type="float" office:value="4.75" calcext:value-type="float">
            <text:p>4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table:formula="of:=AVERAGE([.M349:.M356])" office:value-type="float" office:value="5" calcext:value-type="float">
            <text:p>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formula="of:=AVERAGE([.M350:.M357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table:formula="of:=AVERAGE([.M351:.M358])" office:value-type="float" office:value="5.375" calcext:value-type="float">
            <text:p>5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table:formula="of:=AVERAGE([.M352:.M359])" office:value-type="float" office:value="5.125" calcext:value-type="float">
            <text:p>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formula="of:=AVERAGE([.M353:.M360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table:formula="of:=AVERAGE([.M354:.M361])" office:value-type="float" office:value="4.75" calcext:value-type="float">
            <text:p>4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table:formula="of:=AVERAGE([.M355:.M362])" office:value-type="float" office:value="5" calcext:value-type="float">
            <text:p>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table:formula="of:=AVERAGE([.M356:.M363])" office:value-type="float" office:value="4" calcext:value-type="float">
            <text:p>4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table:formula="of:=AVERAGE([.M357:.M364])" office:value-type="float" office:value="4.75" calcext:value-type="float">
            <text:p>4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table:formula="of:=AVERAGE([.M358:.M365])" office:value-type="float" office:value="5.125" calcext:value-type="float">
            <text:p>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table:formula="of:=AVERAGE([.M359:.M366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formula="of:=AVERAGE([.M360:.M367])" office:value-type="float" office:value="5.75" calcext:value-type="float">
            <text:p>5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2" calcext:value-type="float">
            <text:p>362</text:p>
          </table:table-cell>
          <table:table-cell office:value-type="float" office:value="9" calcext:value-type="float">
            <text:p>9</text:p>
          </table:table-cell>
          <table:table-cell table:formula="of:=AVERAGE([.M361:.M368])" office:value-type="float" office:value="6.125" calcext:value-type="float">
            <text:p>6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table:formula="of:=AVERAGE([.M362:.M369])" office:value-type="float" office:value="6.875" calcext:value-type="float">
            <text:p>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table:formula="of:=AVERAGE([.M363:.M370])" office:value-type="float" office:value="6.625" calcext:value-type="float">
            <text:p>6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table:formula="of:=AVERAGE([.M364:.M371])" office:value-type="float" office:value="7.375" calcext:value-type="float">
            <text:p>7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table:formula="of:=AVERAGE([.M365:.M372])" office:value-type="float" office:value="6.875" calcext:value-type="float">
            <text:p>6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7" calcext:value-type="float">
            <text:p>367</text:p>
          </table:table-cell>
          <table:table-cell office:value-type="float" office:value="8" calcext:value-type="float">
            <text:p>8</text:p>
          </table:table-cell>
          <table:table-cell table:formula="of:=AVERAGE([.M366:.M373])" office:value-type="float" office:value="6.75" calcext:value-type="float">
            <text:p>6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formula="of:=AVERAGE([.M367:.M374])" office:value-type="float" office:value="6.75" calcext:value-type="float">
            <text:p>6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table:formula="of:=AVERAGE([.M368:.M375])" office:value-type="float" office:value="6.25" calcext:value-type="float">
            <text:p>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table:formula="of:=AVERAGE([.M369:.M376])" office:value-type="float" office:value="6.125" calcext:value-type="float">
            <text:p>6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table:formula="of:=AVERAGE([.M370:.M377])" office:value-type="float" office:value="5.875" calcext:value-type="float">
            <text:p>5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table:formula="of:=AVERAGE([.M371:.M378])" office:value-type="float" office:value="5.375" calcext:value-type="float">
            <text:p>5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table:formula="of:=AVERAGE([.M372:.M379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table:formula="of:=AVERAGE([.M373:.M380])" office:value-type="float" office:value="5.125" calcext:value-type="float">
            <text:p>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table:formula="of:=AVERAGE([.M374:.M381])" office:value-type="float" office:value="4.75" calcext:value-type="float">
            <text:p>4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AVERAGE([.M375:.M382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table:formula="of:=AVERAGE([.M376:.M383])" office:value-type="float" office:value="5" calcext:value-type="float">
            <text:p>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8" calcext:value-type="float">
            <text:p>378</text:p>
          </table:table-cell>
          <table:table-cell office:value-type="float" office:value="7" calcext:value-type="float">
            <text:p>7</text:p>
          </table:table-cell>
          <table:table-cell table:formula="of:=AVERAGE([.M377:.M384])" office:value-type="float" office:value="4.625" calcext:value-type="float">
            <text:p>4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table:formula="of:=AVERAGE([.M378:.M385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table:formula="of:=AVERAGE([.M379:.M386])" office:value-type="float" office:value="5.5" calcext:value-type="float">
            <text:p>5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table:formula="of:=AVERAGE([.M380:.M387])" office:value-type="float" office:value="5.875" calcext:value-type="float">
            <text:p>5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formula="of:=AVERAGE([.M381:.M388])" office:value-type="float" office:value="6" calcext:value-type="float">
            <text:p>6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table:formula="of:=AVERAGE([.M382:.M389])" office:value-type="float" office:value="6.25" calcext:value-type="float">
            <text:p>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table:formula="of:=AVERAGE([.M383:.M390])" office:value-type="float" office:value="5.875" calcext:value-type="float">
            <text:p>5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table:formula="of:=AVERAGE([.M384:.M391])" office:value-type="float" office:value="6.25" calcext:value-type="float">
            <text:p>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  <table:table-cell table:formula="of:=AVERAGE([.M385:.M392])" office:value-type="float" office:value="6.375" calcext:value-type="float">
            <text:p>6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table:formula="of:=AVERAGE([.M386:.M393])" office:value-type="float" office:value="5.625" calcext:value-type="float">
            <text:p>5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table:formula="of:=AVERAGE([.M387:.M394])" office:value-type="float" office:value="5.375" calcext:value-type="float">
            <text:p>5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table:formula="of:=AVERAGE([.M388:.M395])" office:value-type="float" office:value="5.125" calcext:value-type="float">
            <text:p>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table:formula="of:=AVERAGE([.M389:.M396])" office:value-type="float" office:value="4.75" calcext:value-type="float">
            <text:p>4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table:formula="of:=AVERAGE([.M390:.M397])" office:value-type="float" office:value="4.75" calcext:value-type="float">
            <text:p>4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table:formula="of:=AVERAGE([.M391:.M398])" office:value-type="float" office:value="4.875" calcext:value-type="float">
            <text:p>4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table:formula="of:=AVERAGE([.M392:.M399])" office:value-type="float" office:value="4.25" calcext:value-type="float">
            <text:p>4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AVERAGE([.M393:.M400])" office:value-type="float" office:value="3.625" calcext:value-type="float">
            <text:p>3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table:formula="of:=AVERAGE([.M394:.M401])" office:value-type="float" office:value="4.5" calcext:value-type="float">
            <text:p>4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table:formula="of:=AVERAGE([.M395:.M402])" office:value-type="float" office:value="5.125" calcext:value-type="float">
            <text:p>5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formula="of:=AVERAGE([.M396:.M403])" office:value-type="float" office:value="5.25" calcext:value-type="float">
            <text:p>5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table:formula="of:=AVERAGE([.M397:.M404])" office:value-type="float" office:value="5.5" calcext:value-type="float">
            <text:p>5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  <table:table-cell table:formula="of:=AVERAGE([.M398:.M405])" office:value-type="float" office:value="5.75" calcext:value-type="float">
            <text:p>5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formula="of:=AVERAGE([.M399:.M406])" office:value-type="float" office:value="6.125" calcext:value-type="float">
            <text:p>6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table:formula="of:=AVERAGE([.M400:.M407])" office:value-type="float" office:value="6" calcext:value-type="float">
            <text:p>6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table:formula="of:=AVERAGE([.M401:.M408])" office:value-type="float" office:value="6.25" calcext:value-type="float">
            <text:p>6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  <table:table-cell table:formula="of:=AVERAGE([.M402:.M409])" office:value-type="float" office:value="5.75" calcext:value-type="float">
            <text:p>5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table:formula="of:=AVERAGE([.M403:.M410])" office:value-type="float" office:value="5.625" calcext:value-type="float">
            <text:p>5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table:formula="of:=AVERAGE([.M404:.M411])" office:value-type="float" office:value="5.75" calcext:value-type="float">
            <text:p>5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table:formula="of:=AVERAGE([.M405:.M412])" office:value-type="float" office:value="5.375" calcext:value-type="float">
            <text:p>5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table:formula="of:=AVERAGE([.M406:.M413])" office:value-type="float" office:value="5.875" calcext:value-type="float">
            <text:p>5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8" calcext:value-type="float">
            <text:p>408</text:p>
          </table:table-cell>
          <table:table-cell office:value-type="float" office:value="7" calcext:value-type="float">
            <text:p>7</text:p>
          </table:table-cell>
          <table:table-cell table:formula="of:=AVERAGE([.M407:.M414])" office:value-type="float" office:value="5.875" calcext:value-type="float">
            <text:p>5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table:formula="of:=AVERAGE([.M408:.M415])" office:value-type="float" office:value="6" calcext:value-type="float">
            <text:p>6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table:formula="of:=AVERAGE([.M409:.M416])" office:value-type="float" office:value="6" calcext:value-type="float">
            <text:p>6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1" calcext:value-type="float">
            <text:p>411</text:p>
          </table:table-cell>
          <table:table-cell office:value-type="float" office:value="11" calcext:value-type="float">
            <text:p>11</text:p>
          </table:table-cell>
          <table:table-cell table:formula="of:=AVERAGE([.M410:.M417])" office:value-type="float" office:value="6" calcext:value-type="float">
            <text:p>6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table:formula="of:=AVERAGE([.M411:.M418])" office:value-type="float" office:value="5.375" calcext:value-type="float">
            <text:p>5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table:formula="of:=AVERAGE([.M412:.M419])" office:value-type="float" office:value="5.25" calcext:value-type="float">
            <text:p>5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table:formula="of:=AVERAGE([.M413:.M420])" office:value-type="float" office:value="5" calcext:value-type="float">
            <text:p>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  <table:table-cell table:formula="of:=AVERAGE([.M414:.M421])" office:value-type="float" office:value="4" calcext:value-type="float">
            <text:p>4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table:formula="of:=AVERAGE([.M415:.M422])" office:value-type="float" office:value="4.25" calcext:value-type="float">
            <text:p>4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5" calcext:value-type="float">
            <text:p>5</text:p>
          </table:table-cell>
          <table:table-cell table:formula="of:=AVERAGE([.M416:.M423])" office:value-type="float" office:value="4.375" calcext:value-type="float">
            <text:p>4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table:formula="of:=AVERAGE([.M417:.M424])" office:value-type="float" office:value="4.125" calcext:value-type="float">
            <text:p>4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formula="of:=AVERAGE([.M418:.M425])" office:value-type="float" office:value="3.875" calcext:value-type="float">
            <text:p>3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table:formula="of:=AVERAGE([.M419:.M426])" office:value-type="float" office:value="4" calcext:value-type="float">
            <text:p>4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table:formula="of:=AVERAGE([.M420:.M427])" office:value-type="float" office:value="3.625" calcext:value-type="float">
            <text:p>3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table:formula="of:=AVERAGE([.M421:.M428])" office:value-type="float" office:value="4.25" calcext:value-type="float">
            <text:p>4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table:formula="of:=AVERAGE([.M422:.M429])" office:value-type="float" office:value="4.25" calcext:value-type="float">
            <text:p>4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formula="of:=AVERAGE([.M423:.M430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formula="of:=AVERAGE([.M424:.M431])" office:value-type="float" office:value="3.25" calcext:value-type="float">
            <text:p>3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table:formula="of:=AVERAGE([.M425:.M432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table:formula="of:=AVERAGE([.M426:.M433])" office:value-type="float" office:value="4" calcext:value-type="float">
            <text:p>4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table:formula="of:=AVERAGE([.M427:.M434])" office:value-type="float" office:value="3.625" calcext:value-type="float">
            <text:p>3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table:formula="of:=AVERAGE([.M428:.M435])" office:value-type="float" office:value="3.75" calcext:value-type="float">
            <text:p>3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table:formula="of:=AVERAGE([.M429:.M436])" office:value-type="float" office:value="3.25" calcext:value-type="float">
            <text:p>3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table:formula="of:=AVERAGE([.M430:.M437])" office:value-type="float" office:value="2.875" calcext:value-type="float">
            <text:p>2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AVERAGE([.M431:.M438])" office:value-type="float" office:value="2.625" calcext:value-type="float">
            <text:p>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table:formula="of:=AVERAGE([.M432:.M439])" office:value-type="float" office:value="2.5" calcext:value-type="float">
            <text:p>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table:formula="of:=AVERAGE([.M433:.M440])" office:value-type="float" office:value="2.25" calcext:value-type="float">
            <text:p>2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formula="of:=AVERAGE([.M434:.M441])" office:value-type="float" office:value="2.125" calcext:value-type="float">
            <text:p>2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table:formula="of:=AVERAGE([.M435:.M442])" office:value-type="float" office:value="2.625" calcext:value-type="float">
            <text:p>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formula="of:=AVERAGE([.M436:.M443])" office:value-type="float" office:value="2.625" calcext:value-type="float">
            <text:p>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table:formula="of:=AVERAGE([.M437:.M444])" office:value-type="float" office:value="2.5" calcext:value-type="float">
            <text:p>2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table:formula="of:=AVERAGE([.M438:.M445])" office:value-type="float" office:value="2.625" calcext:value-type="float">
            <text:p>2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table:formula="of:=AVERAGE([.M439:.M446])" office:value-type="float" office:value="2.75" calcext:value-type="float">
            <text:p>2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table:formula="of:=AVERAGE([.M440:.M447])" office:value-type="float" office:value="3" calcext:value-type="float">
            <text:p>3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table:formula="of:=AVERAGE([.M441:.M448])" office:value-type="float" office:value="2.75" calcext:value-type="float">
            <text:p>2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formula="of:=AVERAGE([.M442:.M449])" office:value-type="float" office:value="2.75" calcext:value-type="float">
            <text:p>2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table:formula="of:=AVERAGE([.M443:.M450])" office:value-type="float" office:value="2.375" calcext:value-type="float">
            <text:p>2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table:formula="of:=AVERAGE([.M444:.M451])" office:value-type="float" office:value="2" calcext:value-type="float">
            <text:p>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table:formula="of:=AVERAGE([.M445:.M452])" office:value-type="float" office:value="2" calcext:value-type="float">
            <text:p>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table:formula="of:=AVERAGE([.M446:.M453])" office:value-type="float" office:value="1.875" calcext:value-type="float">
            <text:p>1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formula="of:=AVERAGE([.M447:.M454])" office:value-type="float" office:value="1.5" calcext:value-type="float">
            <text:p>1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AVERAGE([.M448:.M455])" office:value-type="float" office:value="1.25" calcext:value-type="float">
            <text:p>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AVERAGE([.M449:.M456])" office:value-type="float" office:value="1.5" calcext:value-type="float">
            <text:p>1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AVERAGE([.M450:.M457])" office:value-type="float" office:value="1.25" calcext:value-type="float">
            <text:p>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AVERAGE([.M451:.M458])" office:value-type="float" office:value="1.625" calcext:value-type="float">
            <text:p>1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formula="of:=AVERAGE([.M452:.M459])" office:value-type="float" office:value="1.75" calcext:value-type="float">
            <text:p>1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table:formula="of:=AVERAGE([.M453:.M460])" office:value-type="float" office:value="1.625" calcext:value-type="float">
            <text:p>1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table:formula="of:=AVERAGE([.M454:.M461])" office:value-type="float" office:value="1.625" calcext:value-type="float">
            <text:p>1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table:formula="of:=AVERAGE([.M455:.M462])" office:value-type="float" office:value="2" calcext:value-type="float">
            <text:p>2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formula="of:=AVERAGE([.M456:.M463])" office:value-type="float" office:value="1.875" calcext:value-type="float">
            <text:p>1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formula="of:=AVERAGE([.M457:.M464])" office:value-type="float" office:value="1.5" calcext:value-type="float">
            <text:p>1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formula="of:=AVERAGE([.M458:.M465])" office:value-type="float" office:value="1.25" calcext:value-type="float">
            <text:p>1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table:formula="of:=AVERAGE([.M459:.M466])" office:value-type="float" office:value="0.875" calcext:value-type="float">
            <text:p>0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AVERAGE([.M460:.M467])" office:value-type="float" office:value="1" calcext:value-type="float">
            <text:p>1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formula="of:=AVERAGE([.M461:.M468])" office:value-type="float" office:value="1.125" calcext:value-type="float">
            <text:p>1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AVERAGE([.M462:.M469])" office:value-type="float" office:value="1.125" calcext:value-type="float">
            <text:p>1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formula="of:=AVERAGE([.M463:.M470])" office:value-type="float" office:value="0.75" calcext:value-type="float">
            <text:p>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formula="of:=AVERAGE([.M464:.M471])" office:value-type="float" office:value="0.75" calcext:value-type="float">
            <text:p>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table:formula="of:=AVERAGE([.M465:.M472])" office:value-type="float" office:value="0.625" calcext:value-type="float">
            <text:p>0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formula="of:=AVERAGE([.M466:.M473])" office:value-type="float" office:value="0.625" calcext:value-type="float">
            <text:p>0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AVERAGE([.M467:.M474])" office:value-type="float" office:value="0.5" calcext:value-type="float">
            <text:p>0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AVERAGE([.M468:.M475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AVERAGE([.M469:.M476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AVERAGE([.M470:.M477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AVERAGE([.M471:.M478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formula="of:=AVERAGE([.M472:.M479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formula="of:=AVERAGE([.M473:.M480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formula="of:=AVERAGE([.M474:.M481])" office:value-type="float" office:value="0.5" calcext:value-type="float">
            <text:p>0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AVERAGE([.M475:.M482])" office:value-type="float" office:value="0.625" calcext:value-type="float">
            <text:p>0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AVERAGE([.M476:.M483])" office:value-type="float" office:value="0.625" calcext:value-type="float">
            <text:p>0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table:formula="of:=AVERAGE([.M477:.M484])" office:value-type="float" office:value="0.5" calcext:value-type="float">
            <text:p>0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formula="of:=AVERAGE([.M478:.M485])" office:value-type="float" office:value="0.625" calcext:value-type="float">
            <text:p>0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formula="of:=AVERAGE([.M479:.M486])" office:value-type="float" office:value="0.75" calcext:value-type="float">
            <text:p>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AVERAGE([.M480:.M487])" office:value-type="float" office:value="0.75" calcext:value-type="float">
            <text:p>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AVERAGE([.M481:.M488])" office:value-type="float" office:value="0.5" calcext:value-type="float">
            <text:p>0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formula="of:=AVERAGE([.M482:.M489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formula="of:=AVERAGE([.M483:.M490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formula="of:=AVERAGE([.M484:.M491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formula="of:=AVERAGE([.M485:.M492])" office:value-type="float" office:value="0.5" calcext:value-type="float">
            <text:p>0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AVERAGE([.M486:.M493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AVERAGE([.M487:.M494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formula="of:=AVERAGE([.M488:.M495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formula="of:=AVERAGE([.M489:.M496])" office:value-type="float" office:value="0.625" calcext:value-type="float">
            <text:p>0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AVERAGE([.M490:.M497])" office:value-type="float" office:value="0.625" calcext:value-type="float">
            <text:p>0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formula="of:=AVERAGE([.M491:.M498])" office:value-type="float" office:value="0.875" calcext:value-type="float">
            <text:p>0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formula="of:=AVERAGE([.M492:.M499])" office:value-type="float" office:value="0.75" calcext:value-type="float">
            <text:p>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table:formula="of:=AVERAGE([.M493:.M500])" office:value-type="float" office:value="0.625" calcext:value-type="float">
            <text:p>0.6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AVERAGE([.M494:.M501])" office:value-type="float" office:value="0.875" calcext:value-type="float">
            <text:p>0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table:formula="of:=AVERAGE([.M495:.M502])" office:value-type="float" office:value="0.875" calcext:value-type="float">
            <text:p>0.8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formula="of:=AVERAGE([.M496:.M503])" office:value-type="float" office:value="0.75" calcext:value-type="float">
            <text:p>0.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AVERAGE([.M497:.M504])" office:value-type="float" office:value="0.5" calcext:value-type="float">
            <text:p>0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table:formula="of:=AVERAGE([.M498:.M505])" office:value-type="float" office:value="0.5" calcext:value-type="float">
            <text:p>0.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AVERAGE([.M499:.M506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AVERAGE([.M500:.M507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AVERAGE([.M501:.M508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AVERAGE([.M502:.M50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formula="of:=AVERAGE([.M503:.M510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AVERAGE([.M504:.M51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AVERAGE([.M505:.M512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AVERAGE([.M506:.M513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AVERAGE([.M507:.M514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formula="of:=AVERAGE([.M508:.M51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AVERAGE([.M509:.M51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AVERAGE([.M510:.M51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AVERAGE([.M511:.M51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formula="of:=AVERAGE([.M512:.M51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AVERAGE([.M513:.M520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formula="of:=AVERAGE([.M514:.M52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formula="of:=AVERAGE([.M515:.M522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AVERAGE([.M516:.M523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AVERAGE([.M517:.M524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AVERAGE([.M518:.M525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AVERAGE([.M519:.M526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1" calcext:value-type="float">
            <text:p>521</text:p>
          </table:table-cell>
          <table:table-cell office:value-type="float" office:value="3" calcext:value-type="float">
            <text:p>3</text:p>
          </table:table-cell>
          <table:table-cell table:formula="of:=AVERAGE([.M520:.M527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AVERAGE([.M521:.M528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AVERAGE([.M522:.M529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AVERAGE([.M523:.M530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AVERAGE([.M524:.M53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AVERAGE([.M525:.M532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AVERAGE([.M526:.M533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formula="of:=AVERAGE([.M527:.M534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AVERAGE([.M528:.M535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formula="of:=AVERAGE([.M529:.M536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AVERAGE([.M530:.M537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AVERAGE([.M531:.M538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formula="of:=AVERAGE([.M532:.M539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AVERAGE([.M533:.M540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AVERAGE([.M534:.M541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AVERAGE([.M535:.M542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AVERAGE([.M536:.M543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AVERAGE([.M537:.M544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AVERAGE([.M538:.M54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AVERAGE([.M539:.M54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AVERAGE([.M540:.M54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formula="of:=AVERAGE([.M541:.M54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formula="of:=AVERAGE([.M542:.M54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formula="of:=AVERAGE([.M543:.M550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AVERAGE([.M544:.M551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formula="of:=AVERAGE([.M545:.M552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AVERAGE([.M546:.M553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formula="of:=AVERAGE([.M547:.M554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formula="of:=AVERAGE([.M548:.M555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AVERAGE([.M549:.M556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formula="of:=AVERAGE([.M550:.M557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formula="of:=AVERAGE([.M551:.M558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formula="of:=AVERAGE([.M552:.M559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formula="of:=AVERAGE([.M553:.M560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formula="of:=AVERAGE([.M554:.M561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AVERAGE([.M555:.M562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formula="of:=AVERAGE([.M556:.M563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formula="of:=AVERAGE([.M557:.M564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formula="of:=AVERAGE([.M558:.M565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formula="of:=AVERAGE([.M559:.M566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formula="of:=AVERAGE([.M560:.M567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M561:.M568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AVERAGE([.M562:.M569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AVERAGE([.M563:.M570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AVERAGE([.M564:.M57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AVERAGE([.M565:.M572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AVERAGE([.M566:.M573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formula="of:=AVERAGE([.M567:.M574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AVERAGE([.M568:.M57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AVERAGE([.M569:.M57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AVERAGE([.M570:.M57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formula="of:=AVERAGE([.M571:.M57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AVERAGE([.M572:.M57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formula="of:=AVERAGE([.M573:.M580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AVERAGE([.M574:.M58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AVERAGE([.M575:.M582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AVERAGE([.M576:.M583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formula="of:=AVERAGE([.M577:.M584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formula="of:=AVERAGE([.M578:.M58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AVERAGE([.M579:.M58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AVERAGE([.M580:.M587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AVERAGE([.M581:.M588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AVERAGE([.M582:.M589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formula="of:=AVERAGE([.M583:.M590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formula="of:=AVERAGE([.M584:.M591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AVERAGE([.M585:.M592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formula="of:=AVERAGE([.M586:.M593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AVERAGE([.M587:.M594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AVERAGE([.M588:.M59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M589:.M59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M590:.M59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formula="of:=AVERAGE([.M591:.M59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AVERAGE([.M592:.M59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formula="of:=AVERAGE([.M593:.M600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formula="of:=AVERAGE([.M594:.M601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AVERAGE([.M595:.M602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AVERAGE([.M596:.M603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AVERAGE([.M597:.M604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formula="of:=AVERAGE([.M598:.M605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AVERAGE([.M599:.M606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AVERAGE([.M600:.M607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AVERAGE([.M601:.M608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M602:.M609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formula="of:=AVERAGE([.M603:.M610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table:formula="of:=AVERAGE([.M604:.M611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formula="of:=AVERAGE([.M605:.M612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AVERAGE([.M606:.M613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AVERAGE([.M607:.M614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AVERAGE([.M608:.M615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formula="of:=AVERAGE([.M609:.M616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M610:.M617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formula="of:=AVERAGE([.M611:.M618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AVERAGE([.M612:.M619])" office:value-type="float" office:value="0.375" calcext:value-type="float">
            <text:p>0.37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AVERAGE([.M613:.M620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formula="of:=AVERAGE([.M614:.M621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AVERAGE([.M615:.M622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AVERAGE([.M616:.M623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formula="of:=AVERAGE([.M617:.M624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formula="of:=AVERAGE([.M618:.M62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formula="of:=AVERAGE([.M619:.M62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formula="of:=AVERAGE([.M620:.M62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AVERAGE([.M621:.M62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formula="of:=AVERAGE([.M622:.M62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AVERAGE([.M623:.M630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AVERAGE([.M624:.M63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AVERAGE([.M625:.M632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AVERAGE([.M626:.M633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AVERAGE([.M627:.M634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AVERAGE([.M628:.M635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AVERAGE([.M629:.M636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table:formula="of:=AVERAGE([.M630:.M637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AVERAGE([.M631:.M638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formula="of:=AVERAGE([.M632:.M639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AVERAGE([.M633:.M640])" office:value-type="float" office:value="0.25" calcext:value-type="float">
            <text:p>0.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formula="of:=AVERAGE([.M634:.M641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AVERAGE([.M635:.M642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formula="of:=AVERAGE([.M636:.M643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AVERAGE([.M637:.M644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AVERAGE([.M638:.M64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AVERAGE([.M639:.M64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AVERAGE([.M640:.M64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AVERAGE([.M641:.M64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AVERAGE([.M642:.M64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AVERAGE([.M643:.M650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formula="of:=AVERAGE([.M644:.M65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AVERAGE([.M645:.M652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AVERAGE([.M646:.M653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formula="of:=AVERAGE([.M647:.M654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formula="of:=AVERAGE([.M648:.M65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AVERAGE([.M649:.M65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formula="of:=AVERAGE([.M650:.M65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formula="of:=AVERAGE([.M651:.M658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formula="of:=AVERAGE([.M652:.M659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formula="of:=AVERAGE([.M653:.M660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AVERAGE([.M654:.M661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table:formula="of:=AVERAGE([.M655:.M662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formula="of:=AVERAGE([.M656:.M663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AVERAGE([.M657:.M664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AVERAGE([.M658:.M665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formula="of:=AVERAGE([.M659:.M66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AVERAGE([.M660:.M66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AVERAGE([.M661:.M66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formula="of:=AVERAGE([.M662:.M669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formula="of:=AVERAGE([.M663:.M670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AVERAGE([.M664:.M671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AVERAGE([.M665:.M672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AVERAGE([.M666:.M673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formula="of:=AVERAGE([.M667:.M674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M668:.M675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AVERAGE([.M669:.M676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AVERAGE([.M670:.M67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AVERAGE([.M671:.M67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AVERAGE([.M672:.M679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formula="of:=AVERAGE([.M673:.M680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AVERAGE([.M674:.M681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AVERAGE([.M675:.M682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formula="of:=AVERAGE([.M676:.M683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formula="of:=AVERAGE([.M677:.M684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formula="of:=AVERAGE([.M678:.M685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formula="of:=AVERAGE([.M679:.M686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formula="of:=AVERAGE([.M680:.M687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M681:.M688])" office:value-type="float" office:value="0" calcext:value-type="float">
            <text:p>0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formula="of:=AVERAGE([.M682:.M689])" office:value-type="float" office:value="0.125" calcext:value-type="float">
            <text:p>0.125</text:p>
          </table:table-cell>
          <table:table-cell table:formula="of:=MAX([.$F$13])/2" office:value-type="float" office:value="405.5" calcext:value-type="float">
            <text:p>405.5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86:.N168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87:.N168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88:.N168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689:.N168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0:.N168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1:.N168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2:.N169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3:.N169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4:.N169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5:.N169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6:.N169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7:.N16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8:.N16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699:.N16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0:.N16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1:.N16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2:.N17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3:.N17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4:.N170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5:.N170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6:.N170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7:.N170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8:.N170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09:.N170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0:.N170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1:.N170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2:.N171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3:.N171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4:.N171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5:.N171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6:.N171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7:.N171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8:.N171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19:.N171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0:.N171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1:.N171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2:.N172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3:.N172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4:.N172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5:.N172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26:.N172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7:.N172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8:.N172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29:.N172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0:.N17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1:.N172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2:.N173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33:.N173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4:.N173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5:.N173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6:.N173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7:.N173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8:.N173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39:.N173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0:.N173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1:.N173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2:.N174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3:.N174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4:.N174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5:.N174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6:.N174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7:.N174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8:.N174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49:.N174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0:.N174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1:.N174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2:.N175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3:.N175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4:.N175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5:.N175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6:.N175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7:.N175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8:.N175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59:.N175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0:.N175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1:.N175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2:.N176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63:.N176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4:.N176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5:.N176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6:.N176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7:.N176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8:.N176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69:.N176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0:.N176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1:.N176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2:.N177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3:.N177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4:.N177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5:.N177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6:.N177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7:.N177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8:.N177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79:.N177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0:.N177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1:.N177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2:.N178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3:.N178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4:.N178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5:.N178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6:.N178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7:.N178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8:.N178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89:.N178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790:.N178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1:.N178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2:.N179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3:.N179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4:.N179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5:.N179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6:.N179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7:.N17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8:.N17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799:.N17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0:.N17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1:.N17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2:.N18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3:.N18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4:.N180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5:.N180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6:.N180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7:.N180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8:.N180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09:.N180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0:.N180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1:.N180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2:.N181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3:.N181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4:.N181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15:.N181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6:.N181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7:.N181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8:.N181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19:.N181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0:.N181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1:.N181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2:.N182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3:.N182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4:.N182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5:.N182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6:.N182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7:.N182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8:.N182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29:.N182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0:.N18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1:.N182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2:.N183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3:.N183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4:.N183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5:.N183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6:.N183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7:.N183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8:.N183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39:.N183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0:.N183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1:.N183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2:.N184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3:.N184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4:.N184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5:.N184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6:.N184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7:.N184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48:.N184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849:.N184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0:.N184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1:.N184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2:.N185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3:.N185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4:.N185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5:.N185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6:.N185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7:.N185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8:.N185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59:.N185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0:.N185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1:.N185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2:.N186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3:.N186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4:.N186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5:.N186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6:.N186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7:.N186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8:.N186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69:.N186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0:.N186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1:.N186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2:.N187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3:.N187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4:.N187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5:.N187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6:.N187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7:.N187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8:.N187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79:.N187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0:.N187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1:.N187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2:.N188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3:.N188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4:.N188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5:.N188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6:.N188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7:.N188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8:.N188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89:.N188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0:.N188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1:.N188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2:.N189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3:.N189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4:.N189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5:.N189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6:.N189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7:.N18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8:.N18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899:.N18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0:.N18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1:.N18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2:.N19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3:.N19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4:.N190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05:.N190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6:.N190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7:.N190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8:.N190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09:.N190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0:.N190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1:.N190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2:.N191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3:.N191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4:.N191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5:.N191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16:.N191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7:.N191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8:.N191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19:.N191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0:.N191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1:.N191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2:.N192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3:.N192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24:.N192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5:.N192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6:.N192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7:.N192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8:.N192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29:.N192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0:.N19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1:.N192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2:.N193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3:.N193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4:.N193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5:.N193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6:.N193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7:.N193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8:.N193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39:.N193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0:.N193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41:.N193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2:.N194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3:.N194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4:.N194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5:.N194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6:.N194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7:.N194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8:.N194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49:.N194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0:.N194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1:.N194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2:.N195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3:.N195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4:.N195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5:.N195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6:.N195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7:.N195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8:.N195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59:.N195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0:.N195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1:.N195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2:.N196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3:.N196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4:.N196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5:.N196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N966:.N196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7:.N196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8:.N196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69:.N196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0:.N196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1:.N196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2:.N197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3:.N197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4:.N197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5:.N197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6:.N197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7:.N197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8:.N197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79:.N197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0:.N197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1:.N197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2:.N198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3:.N198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4:.N198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5:.N198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6:.N198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7:.N198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8:.N198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89:.N198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0:.N198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1:.N198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2:.N199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3:.N199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4:.N199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5:.N199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6:.N199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7:.N19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8:.N19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999:.N19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1000:.N19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1001:.N19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N1002:.N20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</table:table>
      <table:table table:name="Annex C Flow Rate Limits" table:style-name="ta1">
        <table:table-column table:style-name="co4" table:default-cell-style-name="Default"/>
        <table:table-column table:style-name="co4" table:default-cell-style-name="ce68"/>
        <table:table-column table:style-name="co4" table:number-columns-repeated="1022" table:default-cell-style-name="Default"/>
        <table:table-row table:style-name="ro3">
          <table:table-cell table:style-name="ce8" office:value-type="string" calcext:value-type="string">
            <text:p>Cv<text:span text:style-name="T2">_4um</text:span> &lt; 3%</text:p>
          </table:table-cell>
          <table:table-cell office:value-type="string" calcext:value-type="string">
            <text:p>RM8632x</text:p>
          </table:table-cell>
          <table:table-cell table:style-name="ce59" office:value-type="string" calcext:value-type="string" table:number-columns-spanned="6" table:number-rows-spanned="1">
            <text:p>Annex C – flow rate – <text:span text:style-name="T5">if fixed</text:span> then just need traceable flow measurement and pass annex A. <text:span text:style-name="T5">Otherwise 8 flow rates</text:span> 20..140% are used and the results at each analysed in order to establish a limit.</text:p>
          </table:table-cell>
          <table:covered-table-cell table:number-columns-repeated="5" table:style-name="ce68"/>
          <table:table-cell table:style-name="ce68" table:number-columns-repeated="1016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Fixed flow rate <text:s/>PASS</text:p>
          </table:table-cell>
          <table:table-cell table:style-name="ce9"/>
          <table:table-cell>
            <draw:frame draw:z-index="0" draw:name="Image 6" draw:style-name="gr1" draw:text-style-name="P1" svg:width="6.826cm" svg:height="14.526cm" svg:x="0.764cm" svg:y="0.127cm">
              <draw:image xlink:href="Pictures/100000010000010200000225D643068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</table:table>
      <table:table table:name="Annex E Verify Counting Accuracy_2" table:style-name="ta1">
        <table:table-column table:style-name="co16" table:default-cell-style-name="Default"/>
        <table:table-column table:style-name="co17" table:default-cell-style-name="Default"/>
        <table:table-column table:style-name="co4" table:number-columns-repeated="1022" table:default-cell-style-name="Default"/>
        <table:table-row table:style-name="ro9">
          <table:table-cell table:style-name="ce59" office:value-type="string" calcext:value-type="string">
            <text:p>Counts per Table A.1</text:p>
            <text:p>Cv &lt; Table C.2</text:p>
            <text:p>6 sizes 5-15um</text:p>
          </table:table-cell>
          <table:table-cell table:style-name="ce68" office:value-type="string" calcext:value-type="string">
            <text:p>RM8632x</text:p>
            <text:p>1mg/l</text:p>
          </table:table-cell>
          <table:table-cell table:style-name="ce59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68"/>
          <table:table-cell table:number-columns-repeated="4"/>
          <table:table-cell table:style-name="ce68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92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LPA3-NAVA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string" calcext:value-type="string">
            <text:p>11171-000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LPA3-NAVA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16" office:value-type="string" calcext:value-type="string">
            <text:p>11171-000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30" office:value-type="date" office:date-value="2025-05-14" calcext:value-type="date">
            <text:p>2025-05-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table:style-name="ce208" office:value-type="percentage" office:value="0.51" calcext:value-type="percentage">
            <text:p>51%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51" calcext:value-type="float">
            <text:p>0.051</text:p>
          </table:table-cell>
          <table:table-cell table:number-columns-repeated="5"/>
          <table:table-cell office:value-type="string" calcext:value-type="string">
            <text:p>Table A.1</text:p>
          </table:table-cell>
          <table:table-cell table:number-columns-repeated="4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25.5" calcext:value-type="float">
            <text:p>25.5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93" office:value-type="string" calcext:value-type="string">
            <text:p>μm(c)</text:p>
          </table:table-cell>
          <table:table-cell table:style-name="ce93" office:value-type="string" calcext:value-type="string">
            <text:p>Median</text:p>
          </table:table-cell>
          <table:table-cell table:style-name="ce93" office:value-type="string" calcext:value-type="string">
            <text:p>Minimum</text:p>
          </table:table-cell>
          <table:table-cell table:style-name="ce93" office:value-type="string" calcext:value-type="string">
            <text:p>Maximum</text:p>
          </table:table-cell>
          <table:table-cell/>
          <table:table-cell table:style-name="ce115"/>
          <table:table-cell table:style-name="ce214" office:value-type="string" calcext:value-type="string">
            <text:p>Mean counted X</text:p>
          </table:table-cell>
          <table:table-cell table:style-name="ce115"/>
          <table:table-cell table:style-name="ce216" office:value-type="string" calcext:value-type="string">
            <text:p>C<text:span text:style-name="T6">V_MAX</text:span></text:p>
          </table:table-cell>
          <table:table-cell table:style-name="ce117" table:number-columns-repeated="3"/>
          <table:table-cell table:style-name="ce118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5.1" calcext:value-type="float">
            <text:p>5.1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213" office:value-type="string" calcext:value-type="string">
            <text:p>X &gt;=</text:p>
          </table:table-cell>
          <table:table-cell table:style-name="ce215" office:value-type="string" calcext:value-type="string">
            <text:p>X &lt;</text:p>
          </table:table-cell>
          <table:table-cell table:style-name="ce213" office:value-type="string" calcext:value-type="string">
            <text:p>D<text:span text:style-name="T6">QMAX / SAMPLE</text:span></text:p>
          </table:table-cell>
          <table:table-cell table:style-name="ce213" office:value-type="string" calcext:value-type="string">
            <text:p>N=3</text:p>
          </table:table-cell>
          <table:table-cell table:style-name="ce215" office:value-type="string" calcext:value-type="string">
            <text:p>N=6</text:p>
          </table:table-cell>
          <table:table-cell table:style-name="ce215" office:value-type="string" calcext:value-type="string">
            <text:p>N=10</text:p>
          </table:table-cell>
          <table:table-cell table:style-name="ce215" office:value-type="string" calcext:value-type="string">
            <text:p>N=20</text:p>
          </table:table-cell>
          <table:table-cell table:style-name="ce218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162" office:value-type="float" office:value="10000" calcext:value-type="float">
            <text:p>10000</text:p>
          </table:table-cell>
          <table:table-cell/>
          <table:table-cell table:style-name="ce162" office:value-type="float" office:value="11" calcext:value-type="float">
            <text:p>11</text:p>
          </table:table-cell>
          <table:table-cell table:style-name="ce162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1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204" office:value-type="string" calcext:value-type="string">
            <text:p>Source Data</text:p>
          </table:table-cell>
          <table:table-cell table:style-name="ce204" table:number-columns-repeated="4"/>
          <table:table-cell table:number-columns-repeated="2"/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6300" calcext:value-type="float">
            <text:p>6300</text:p>
          </table:table-cell>
          <table:table-cell table:style-name="ce212" office:value-type="float" office:value="4553" calcext:value-type="float">
            <text:p>4553</text:p>
          </table:table-cell>
          <table:table-cell table:style-name="ce212" office:value-type="float" office:value="8713" calcext:value-type="float">
            <text:p>8713</text:p>
          </table:table-cell>
          <table:table-cell/>
          <table:table-cell table:style-name="ce162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162" office:value-type="float" office:value="11.3" calcext:value-type="float">
            <text:p>11.3</text:p>
          </table:table-cell>
          <table:table-cell table:style-name="ce162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171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table:style-name="ce16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162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162" office:value-type="float" office:value="11.9" calcext:value-type="float">
            <text:p>11.9</text:p>
          </table:table-cell>
          <table:table-cell table:style-name="ce162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171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float" office:value="508721" calcext:value-type="float">
            <text:p>508721</text:p>
          </table:table-cell>
          <table:table-cell office:value-type="float" office:value="153040" calcext:value-type="float">
            <text:p>153040</text:p>
          </table:table-cell>
          <table:table-cell office:value-type="float" office:value="789" calcext:value-type="float">
            <text:p>78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style-name="ce16"/>
          <table:table-cell/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1631" calcext:value-type="float">
            <text:p>1631</text:p>
          </table:table-cell>
          <table:table-cell table:style-name="ce212" office:value-type="float" office:value="938.2" calcext:value-type="float">
            <text:p>938.2</text:p>
          </table:table-cell>
          <table:table-cell table:style-name="ce212" office:value-type="float" office:value="2834" calcext:value-type="float">
            <text:p>2834</text:p>
          </table:table-cell>
          <table:table-cell/>
          <table:table-cell table:style-name="ce16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162" office:value-type="float" office:value="13.4" calcext:value-type="float">
            <text:p>13.4</text:p>
          </table:table-cell>
          <table:table-cell table:style-name="ce162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171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float" office:value="506872" calcext:value-type="float">
            <text:p>506872</text:p>
          </table:table-cell>
          <table:table-cell office:value-type="float" office:value="151955" calcext:value-type="float">
            <text:p>151955</text:p>
          </table:table-cell>
          <table:table-cell office:value-type="float" office:value="717" calcext:value-type="float">
            <text:p>717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table:style-name="ce16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162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162" office:value-type="float" office:value="15.6" calcext:value-type="float">
            <text:p>15.6</text:p>
          </table:table-cell>
          <table:table-cell table:style-name="ce162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171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float" office:value="506865" calcext:value-type="float">
            <text:p>506865</text:p>
          </table:table-cell>
          <table:table-cell office:value-type="float" office:value="149527" calcext:value-type="float">
            <text:p>149527</text:p>
          </table:table-cell>
          <table:table-cell office:value-type="float" office:value="736" calcext:value-type="float">
            <text:p>736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table:style-name="ce16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162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162" office:value-type="float" office:value="19.3" calcext:value-type="float">
            <text:p>19.3</text:p>
          </table:table-cell>
          <table:table-cell table:style-name="ce162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171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float" office:value="512459" calcext:value-type="float">
            <text:p>512459</text:p>
          </table:table-cell>
          <table:table-cell office:value-type="float" office:value="153525" calcext:value-type="float">
            <text:p>153525</text:p>
          </table:table-cell>
          <table:table-cell office:value-type="float" office:value="675" calcext:value-type="float">
            <text:p>675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style-name="ce16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/>
          <table:table-cell table:style-name="ce163" office:value-type="float" office:value="100" calcext:value-type="float">
            <text:p>100</text:p>
          </table:table-cell>
          <table:table-cell table:style-name="ce94" office:value-type="float" office:value="200" calcext:value-type="float">
            <text:p>200</text:p>
          </table:table-cell>
          <table:table-cell table:style-name="ce163" office:value-type="float" office:value="27.5" calcext:value-type="float">
            <text:p>27.5</text:p>
          </table:table-cell>
          <table:table-cell table:style-name="ce163" office:value-type="float" office:value="10" calcext:value-type="float">
            <text:p>10</text:p>
          </table:table-cell>
          <table:table-cell table:style-name="ce94" office:value-type="float" office:value="8" calcext:value-type="float">
            <text:p>8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6.1" calcext:value-type="float">
            <text:p>6.1</text:p>
          </table:table-cell>
          <table:table-cell table:style-name="ce219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office:value-type="float" office:value="518357" calcext:value-type="float">
            <text:p>518357</text:p>
          </table:table-cell>
          <table:table-cell office:value-type="float" office:value="156522" calcext:value-type="float">
            <text:p>15652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68" calcext:value-type="float">
            <text:p>68</text:p>
          </table:table-cell>
          <table:table-cell table:style-name="ce16"/>
          <table:table-cell/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88.9" calcext:value-type="float">
            <text:p>88.9</text:p>
          </table:table-cell>
          <table:table-cell table:style-name="ce94" office:value-type="float" office:value="27.89" calcext:value-type="float">
            <text:p>27.89</text:p>
          </table:table-cell>
          <table:table-cell table:style-name="ce94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>
          <table:table-cell table:style-name="ce205" table:formula="of:=SUM([.A24:.A28])/5/100" office:value-type="float" office:value="5106.548" calcext:value-type="float">
            <text:p>5106.548</text:p>
          </table:table-cell>
          <table:table-cell table:style-name="ce209" table:formula="of:=SUM([.B24:.B28])/5/100" office:value-type="float" office:value="1529.138" calcext:value-type="float">
            <text:p>1529.138</text:p>
          </table:table-cell>
          <table:table-cell table:style-name="ce92" table:formula="of:=SUM([.C24:.C28])/5/100" office:value-type="float" office:value="6.86" calcext:value-type="float">
            <text:p>6.86</text:p>
          </table:table-cell>
          <table:table-cell table:style-name="ce92" table:formula="of:=SUM([.D24:.D28])/5/100" office:value-type="float" office:value="0.984" calcext:value-type="float">
            <text:p>0.984</text:p>
          </table:table-cell>
          <table:table-cell table:style-name="ce92" table:formula="of:=SUM([.E24:.E28])/5/100" office:value-type="float" office:value="0.558" calcext:value-type="float">
            <text:p>0.558</text:p>
          </table:table-cell>
          <table:table-cell table:style-name="ce16" office:value-type="string" calcext:value-type="string">
            <text:p>/ml</text:p>
          </table:table-cell>
          <table:table-cell table:number-columns-repeated="1018"/>
        </table:table-row>
        <table:table-row table:style-name="ro2" table:number-rows-repeated="2">
          <table:table-cell table:style-name="ce16" table:number-columns-repeated="6"/>
          <table:table-cell table:number-columns-repeated="1018"/>
        </table:table-row>
        <table:table-row table:style-name="ro2">
          <table:table-cell/>
          <table:table-cell table:style-name="ce92" office:value-type="string" calcext:value-type="string">
            <text:p>~Raw Counts</text:p>
          </table:table-cell>
          <table:table-cell table:style-name="ce92"/>
          <table:table-cell table:number-columns-repeated="1021"/>
        </table:table-row>
        <table:table-row table:style-name="ro2">
          <table:table-cell table:style-name="ce120" office:value-type="string" calcext:value-type="string">
            <text:p>Portion </text:p>
          </table:table-cell>
          <table:table-cell table:style-name="ce122" office:value-type="string" calcext:value-type="string">
            <text:p>&gt;4μm(c)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6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14u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1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5μm</text:p>
          </table:table-cell>
          <table:table-cell table:style-name="ce122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20" table:formula="of:=[.A24]*[.$B$18]" office:value-type="float" office:value="25944.771" calcext:value-type="float">
            <text:p>25945</text:p>
          </table:table-cell>
          <table:table-cell table:style-name="ce21" table:formula="of:=([.B35]-[.B$47])/[.B$47]" office:value-type="percentage" office:value="-0.00378690261993038" calcext:value-type="percentage">
            <text:p>-0.38%</text:p>
          </table:table-cell>
          <table:table-cell table:style-name="ce20" table:formula="of:=[.B24]*[.$B$18]" office:value-type="float" office:value="7805.04" calcext:value-type="float">
            <text:p>7805</text:p>
          </table:table-cell>
          <table:table-cell table:style-name="ce21" table:formula="of:=([.D35]-[.D$47])/[.D$47]" office:value-type="percentage" office:value="0.000825301575135692" calcext:value-type="percentage">
            <text:p>0.08%</text:p>
          </table:table-cell>
          <table:table-cell table:style-name="ce20" table:formula="of:=[.C24]*[.$B$18]" office:value-type="float" office:value="40.239" calcext:value-type="float">
            <text:p>40</text:p>
          </table:table-cell>
          <table:table-cell table:style-name="ce21" table:formula="of:=([.F35]-[.F$47])/[.F$47]" office:value-type="percentage" office:value="0.150145772594752" calcext:value-type="percentage">
            <text:p>15.01%</text:p>
          </table:table-cell>
          <table:table-cell table:style-name="ce20" table:formula="of:=[.D24]*[.$B$18]" office:value-type="float" office:value="4.59" calcext:value-type="float">
            <text:p>5</text:p>
          </table:table-cell>
          <table:table-cell table:style-name="ce21" table:formula="of:=([.H35]-[.H$47])/[.H$47]" office:value-type="percentage" office:value="-0.0853658536585366" calcext:value-type="percentage">
            <text:p>-8.54%</text:p>
          </table:table-cell>
          <table:table-cell table:style-name="ce20" table:formula="of:=[.E24]*[.$B$18]" office:value-type="float" office:value="1.53" calcext:value-type="float">
            <text:p>2</text:p>
          </table:table-cell>
          <table:table-cell table:style-name="ce21" table:formula="of:=([.J35]-[.J$47])/[.J$47]" office:value-type="percentage" office:value="-0.462365591397849" calcext:value-type="percentage">
            <text:p>-46.24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20" table:formula="of:=[.A25]*[.$B$18]" office:value-type="float" office:value="25850.472" calcext:value-type="float">
            <text:p>25850</text:p>
          </table:table-cell>
          <table:table-cell table:style-name="ce21" table:formula="of:=([.B36]-[.B$47])/[.B$47]" office:value-type="percentage" office:value="-0.00740774393974169" calcext:value-type="percentage">
            <text:p>-0.74%</text:p>
          </table:table-cell>
          <table:table-cell table:style-name="ce20" table:formula="of:=[.B25]*[.$B$18]" office:value-type="float" office:value="7749.705" calcext:value-type="float">
            <text:p>7750</text:p>
          </table:table-cell>
          <table:table-cell table:style-name="ce21" table:formula="of:=([.D36]-[.D$47])/[.D$47]" office:value-type="percentage" office:value="-0.0062701992887496" calcext:value-type="percentage">
            <text:p>-0.63%</text:p>
          </table:table-cell>
          <table:table-cell table:style-name="ce20" table:formula="of:=[.C25]*[.$B$18]" office:value-type="float" office:value="36.567" calcext:value-type="float">
            <text:p>37</text:p>
          </table:table-cell>
          <table:table-cell table:style-name="ce21" table:formula="of:=([.F36]-[.F$47])/[.F$47]" office:value-type="percentage" office:value="0.0451895043731779" calcext:value-type="percentage">
            <text:p>4.52%</text:p>
          </table:table-cell>
          <table:table-cell table:style-name="ce20" table:formula="of:=[.D25]*[.$B$18]" office:value-type="float" office:value="6.783" calcext:value-type="float">
            <text:p>7</text:p>
          </table:table-cell>
          <table:table-cell table:style-name="ce21" table:formula="of:=([.H36]-[.H$47])/[.H$47]" office:value-type="percentage" office:value="0.351626016260163" calcext:value-type="percentage">
            <text:p>35.16%</text:p>
          </table:table-cell>
          <table:table-cell table:style-name="ce20" table:formula="of:=[.E25]*[.$B$18]" office:value-type="float" office:value="3.876" calcext:value-type="float">
            <text:p>4</text:p>
          </table:table-cell>
          <table:table-cell table:style-name="ce21" table:formula="of:=([.J36]-[.J$47])/[.J$47]" office:value-type="percentage" office:value="0.362007168458782" calcext:value-type="percentage">
            <text:p>36.20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20" table:formula="of:=[.A26]*[.$B$18]" office:value-type="float" office:value="25850.115" calcext:value-type="float">
            <text:p>25850</text:p>
          </table:table-cell>
          <table:table-cell table:style-name="ce21" table:formula="of:=([.B37]-[.B$47])/[.B$47]" office:value-type="percentage" office:value="-0.0074214518300817" calcext:value-type="percentage">
            <text:p>-0.74%</text:p>
          </table:table-cell>
          <table:table-cell table:style-name="ce20" table:formula="of:=[.B26]*[.$B$18]" office:value-type="float" office:value="7625.877" calcext:value-type="float">
            <text:p>7626</text:p>
          </table:table-cell>
          <table:table-cell table:style-name="ce21" table:formula="of:=([.D37]-[.D$47])/[.D$47]" office:value-type="percentage" office:value="-0.0221484261067347" calcext:value-type="percentage">
            <text:p>-2.21%</text:p>
          </table:table-cell>
          <table:table-cell table:style-name="ce20" table:formula="of:=[.C26]*[.$B$18]" office:value-type="float" office:value="37.536" calcext:value-type="float">
            <text:p>38</text:p>
          </table:table-cell>
          <table:table-cell table:style-name="ce21" table:formula="of:=([.F37]-[.F$47])/[.F$47]" office:value-type="percentage" office:value="0.0728862973760932" calcext:value-type="percentage">
            <text:p>7.29%</text:p>
          </table:table-cell>
          <table:table-cell table:style-name="ce20" table:formula="of:=[.D26]*[.$B$18]" office:value-type="float" office:value="4.386" calcext:value-type="float">
            <text:p>4</text:p>
          </table:table-cell>
          <table:table-cell table:style-name="ce21" table:formula="of:=([.H37]-[.H$47])/[.H$47]" office:value-type="percentage" office:value="-0.126016260162602" calcext:value-type="percentage">
            <text:p>-12.60%</text:p>
          </table:table-cell>
          <table:table-cell table:style-name="ce20" table:formula="of:=[.E26]*[.$B$18]" office:value-type="float" office:value="1.938" calcext:value-type="float">
            <text:p>2</text:p>
          </table:table-cell>
          <table:table-cell table:style-name="ce21" table:formula="of:=([.J37]-[.J$47])/[.J$47]" office:value-type="percentage" office:value="-0.318996415770609" calcext:value-type="percentage">
            <text:p>-31.90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20" table:formula="of:=[.A27]*[.$B$18]" office:value-type="float" office:value="26135.409" calcext:value-type="float">
            <text:p>26135</text:p>
          </table:table-cell>
          <table:table-cell table:style-name="ce21" table:formula="of:=([.B38]-[.B$47])/[.B$47]" office:value-type="percentage" office:value="0.00353311082163534" calcext:value-type="percentage">
            <text:p>0.35%</text:p>
          </table:table-cell>
          <table:table-cell table:style-name="ce20" table:formula="of:=[.B27]*[.$B$18]" office:value-type="float" office:value="7829.775" calcext:value-type="float">
            <text:p>7830</text:p>
          </table:table-cell>
          <table:table-cell table:style-name="ce21" table:formula="of:=([.D38]-[.D$47])/[.D$47]" office:value-type="percentage" office:value="0.00399702315945321" calcext:value-type="percentage">
            <text:p>0.40%</text:p>
          </table:table-cell>
          <table:table-cell table:style-name="ce20" table:formula="of:=[.C27]*[.$B$18]" office:value-type="float" office:value="34.425" calcext:value-type="float">
            <text:p>34</text:p>
          </table:table-cell>
          <table:table-cell table:style-name="ce21" table:formula="of:=([.F38]-[.F$47])/[.F$47]" office:value-type="percentage" office:value="-0.0160349854227405" calcext:value-type="percentage">
            <text:p>-1.60%</text:p>
          </table:table-cell>
          <table:table-cell table:style-name="ce20" table:formula="of:=[.D27]*[.$B$18]" office:value-type="float" office:value="5.865" calcext:value-type="float">
            <text:p>6</text:p>
          </table:table-cell>
          <table:table-cell table:style-name="ce21" table:formula="of:=([.H38]-[.H$47])/[.H$47]" office:value-type="percentage" office:value="0.16869918699187" calcext:value-type="percentage">
            <text:p>16.87%</text:p>
          </table:table-cell>
          <table:table-cell table:style-name="ce20" table:formula="of:=[.E27]*[.$B$18]" office:value-type="float" office:value="3.417" calcext:value-type="float">
            <text:p>3</text:p>
          </table:table-cell>
          <table:table-cell table:style-name="ce21" table:formula="of:=([.J38]-[.J$47])/[.J$47]" office:value-type="percentage" office:value="0.200716845878136" calcext:value-type="percentage">
            <text:p>20.07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20" table:formula="of:=[.A28]*[.$B$18]" office:value-type="float" office:value="26436.207" calcext:value-type="float">
            <text:p>26436</text:p>
          </table:table-cell>
          <table:table-cell table:style-name="ce21" table:formula="of:=([.B39]-[.B$47])/[.B$47]" office:value-type="percentage" office:value="0.0150829875681184" calcext:value-type="percentage">
            <text:p>1.51%</text:p>
          </table:table-cell>
          <table:table-cell table:style-name="ce20" table:formula="of:=[.B28]*[.$B$18]" office:value-type="float" office:value="7982.622" calcext:value-type="float">
            <text:p>7983</text:p>
          </table:table-cell>
          <table:table-cell table:style-name="ce21" table:formula="of:=([.D39]-[.D$47])/[.D$47]" office:value-type="percentage" office:value="0.0235963006608952" calcext:value-type="percentage">
            <text:p>2.36%</text:p>
          </table:table-cell>
          <table:table-cell table:style-name="ce20" table:formula="of:=[.C28]*[.$B$18]" office:value-type="float" office:value="26.163" calcext:value-type="float">
            <text:p>26</text:p>
          </table:table-cell>
          <table:table-cell table:style-name="ce21" table:formula="of:=([.F39]-[.F$47])/[.F$47]" office:value-type="percentage" office:value="-0.252186588921283" calcext:value-type="percentage">
            <text:p>-25.22%</text:p>
          </table:table-cell>
          <table:table-cell table:style-name="ce20" table:formula="of:=[.D28]*[.$B$18]" office:value-type="float" office:value="3.468" calcext:value-type="float">
            <text:p>3</text:p>
          </table:table-cell>
          <table:table-cell table:style-name="ce21" table:formula="of:=([.H39]-[.H$47])/[.H$47]" office:value-type="percentage" office:value="-0.308943089430894" calcext:value-type="percentage">
            <text:p>-30.89%</text:p>
          </table:table-cell>
          <table:table-cell table:style-name="ce20" table:formula="of:=[.E28]*[.$B$18]" office:value-type="float" office:value="3.468" calcext:value-type="float">
            <text:p>3</text:p>
          </table:table-cell>
          <table:table-cell table:style-name="ce21" table:formula="of:=([.J39]-[.J$47])/[.J$47]" office:value-type="percentage" office:value="0.218637992831541" calcext:value-type="percentage">
            <text:p>21.86%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10">
          <table:table-cell table:style-name="ce92" office:value-type="string" calcext:value-type="string">
            <text:p>N<text:span text:style-name="T6">TOTAL</text:span></text:p>
          </table:table-cell>
          <table:table-cell table:style-name="ce20" table:formula="of:=SUM([.B35:.B39])" office:value-type="float" office:value="130216.974" calcext:value-type="float">
            <text:p>130217</text:p>
          </table:table-cell>
          <table:table-cell table:style-name="ce20"/>
          <table:table-cell table:style-name="ce20" table:formula="of:=SUM([.D35:.D39])" office:value-type="float" office:value="38993.019" calcext:value-type="float">
            <text:p>38993</text:p>
          </table:table-cell>
          <table:table-cell table:style-name="ce20"/>
          <table:table-cell table:style-name="ce20" table:formula="of:=SUM([.F35:.F39])" office:value-type="float" office:value="174.93" calcext:value-type="float">
            <text:p>175</text:p>
          </table:table-cell>
          <table:table-cell table:style-name="ce20"/>
          <table:table-cell table:style-name="ce20" table:formula="of:=SUM([.H35:.H39])" office:value-type="float" office:value="25.092" calcext:value-type="float">
            <text:p>25</text:p>
          </table:table-cell>
          <table:table-cell table:style-name="ce20"/>
          <table:table-cell table:style-name="ce20" table:formula="of:=SUM([.J35:.J39])" office:value-type="float" office:value="14.229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121" office:value-type="string" calcext:value-type="string">
            <text:p>X /ml</text:p>
          </table:table-cell>
          <table:table-cell table:style-name="ce20" table:formula="of:=[.B44]/[.$B$19]" office:value-type="float" office:value="5106.548" calcext:value-type="float">
            <text:p>5107</text:p>
          </table:table-cell>
          <table:table-cell table:style-name="ce20"/>
          <table:table-cell table:style-name="ce20" table:formula="of:=[.D44]/[.$B$19]" office:value-type="float" office:value="1529.138" calcext:value-type="float">
            <text:p>1529</text:p>
          </table:table-cell>
          <table:table-cell table:style-name="ce20"/>
          <table:table-cell table:style-name="ce20" table:formula="of:=[.F44]/[.$B$19]" office:value-type="float" office:value="6.86" calcext:value-type="float">
            <text:p>7</text:p>
          </table:table-cell>
          <table:table-cell table:style-name="ce20"/>
          <table:table-cell table:style-name="ce20" table:formula="of:=[.H44]/[.$B$19]" office:value-type="float" office:value="0.984" calcext:value-type="float">
            <text:p>1</text:p>
          </table:table-cell>
          <table:table-cell table:style-name="ce20"/>
          <table:table-cell table:style-name="ce20" table:formula="of:=[.J44]/[.$B$19]" office:value-type="float" office:value="0.558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20" table:formula="of:=AVERAGE([.B35:.B39])" office:value-type="float" office:value="26043.3948" calcext:value-type="float">
            <text:p>26043</text:p>
          </table:table-cell>
          <table:table-cell/>
          <table:table-cell table:style-name="ce20" table:formula="of:=AVERAGE([.D35:.D39])" office:value-type="float" office:value="7798.6038" calcext:value-type="float">
            <text:p>7799</text:p>
          </table:table-cell>
          <table:table-cell/>
          <table:table-cell table:style-name="ce20" table:formula="of:=AVERAGE([.F35:.F39])" office:value-type="float" office:value="34.986" calcext:value-type="float">
            <text:p>35</text:p>
          </table:table-cell>
          <table:table-cell/>
          <table:table-cell table:style-name="ce20" table:formula="of:=AVERAGE([.H35:.H39])" office:value-type="float" office:value="5.0184" calcext:value-type="float">
            <text:p>5</text:p>
          </table:table-cell>
          <table:table-cell/>
          <table:table-cell table:style-name="ce20" table:formula="of:=AVERAGE([.J35:.J39])" office:value-type="float" office:value="2.8458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20" table:formula="of:=STDEVP([.B35:.B39])" office:value-type="float" office:value="222.293040487012" calcext:value-type="float">
            <text:p>222</text:p>
          </table:table-cell>
          <table:table-cell/>
          <table:table-cell table:style-name="ce20" table:formula="of:=STDEVP([.D35:.D39])" office:value-type="float" office:value="115.845937685186" calcext:value-type="float">
            <text:p>116</text:p>
          </table:table-cell>
          <table:table-cell/>
          <table:table-cell table:style-name="ce20" table:formula="of:=STDEVP([.F35:.F39])" office:value-type="float" office:value="4.79074357485349" calcext:value-type="float">
            <text:p>5</text:p>
          </table:table-cell>
          <table:table-cell/>
          <table:table-cell table:style-name="ce20" table:formula="of:=STDEVP([.H35:.H39])" office:value-type="float" office:value="1.16771068334584" calcext:value-type="float">
            <text:p>1</text:p>
          </table:table-cell>
          <table:table-cell/>
          <table:table-cell table:style-name="ce20" table:formula="of:=STDEVP([.J35:.J39])" office:value-type="float" office:value="0.930606769801295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20" table:formula="of:=[.B45]*[.$B$20]" office:value-type="float" office:value="26043.3948" calcext:value-type="float">
            <text:p>26043</text:p>
          </table:table-cell>
          <table:table-cell table:style-name="ce20"/>
          <table:table-cell table:style-name="ce20" table:formula="of:=[.D45]*[.$B$20]" office:value-type="float" office:value="7798.6038" calcext:value-type="float">
            <text:p>7799</text:p>
          </table:table-cell>
          <table:table-cell table:style-name="ce20"/>
          <table:table-cell table:style-name="ce20" table:formula="of:=[.F45]*[.$B$20]" office:value-type="float" office:value="34.986" calcext:value-type="float">
            <text:p>35</text:p>
          </table:table-cell>
          <table:table-cell table:style-name="ce20"/>
          <table:table-cell table:style-name="ce20" table:formula="of:=[.H45]*[.$B$20]" office:value-type="float" office:value="5.0184" calcext:value-type="float">
            <text:p>5</text:p>
          </table:table-cell>
          <table:table-cell table:style-name="ce20"/>
          <table:table-cell table:style-name="ce20" table:formula="of:=[.J45]*[.$B$20]" office:value-type="float" office:value="2.8458" calcext:value-type="float">
            <text:p>3</text:p>
          </table:table-cell>
          <table:table-cell table:number-columns-repeated="1014"/>
        </table:table-row>
        <table:table-row table:style-name="ro10">
          <table:table-cell table:style-name="ce92" office:value-type="string" calcext:value-type="string">
            <text:p>N<text:span text:style-name="T6">TOTAL</text:span></text:p>
          </table:table-cell>
          <table:table-cell table:formula="of:=[.$B$14]*[.B49]" office:value-type="float" office:value="130216.974" calcext:value-type="float">
            <text:p>130216.974</text:p>
          </table:table-cell>
          <table:table-cell/>
          <table:table-cell table:formula="of:=[.$B$14]*[.D49]" office:value-type="float" office:value="38993.019" calcext:value-type="float">
            <text:p>38993.019</text:p>
          </table:table-cell>
          <table:table-cell/>
          <table:table-cell table:formula="of:=[.$B$14]*[.F49]" office:value-type="float" office:value="174.93" calcext:value-type="float">
            <text:p>174.93</text:p>
          </table:table-cell>
          <table:table-cell/>
          <table:table-cell table:formula="of:=[.$B$14]*[.H49]" office:value-type="float" office:value="25.092" calcext:value-type="float">
            <text:p>25.092</text:p>
          </table:table-cell>
          <table:table-cell/>
          <table:table-cell table:formula="of:=[.$B$14]*[.J49]" office:value-type="float" office:value="14.229" calcext:value-type="float">
            <text:p>14.229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21" table:formula="of:=[.B48]/[.B47]" office:value-type="percentage" office:value="0.00853548633709656" calcext:value-type="percentage">
            <text:p>0.85%</text:p>
          </table:table-cell>
          <table:table-cell/>
          <table:table-cell table:style-name="ce21" table:formula="of:=[.D48]/[.D47]" office:value-type="percentage" office:value="0.0148547022846815" calcext:value-type="percentage">
            <text:p>1.49%</text:p>
          </table:table-cell>
          <table:table-cell/>
          <table:table-cell table:style-name="ce21" table:formula="of:=[.F48]/[.F47]" office:value-type="percentage" office:value="0.136933161117404" calcext:value-type="percentage">
            <text:p>13.69%</text:p>
          </table:table-cell>
          <table:table-cell/>
          <table:table-cell table:style-name="ce21" table:formula="of:=[.H48]/[.H47]" office:value-type="percentage" office:value="0.232685852731117" calcext:value-type="percentage">
            <text:p>23.27%</text:p>
          </table:table-cell>
          <table:table-cell/>
          <table:table-cell table:style-name="ce21" table:formula="of:=[.J48]/[.J47]" office:value-type="percentage" office:value="0.327010601518482" calcext:value-type="percentage">
            <text:p>32.70%</text:p>
          </table:table-cell>
          <table:table-cell table:number-columns-repeated="1014"/>
        </table:table-row>
        <table:table-row table:style-name="ro10">
          <table:table-cell table:style-name="ce92" office:value-type="string" calcext:value-type="string">
            <text:p>D<text:span text:style-name="T6">Q</text:span></text:p>
          </table:table-cell>
          <table:table-cell table:style-name="ce211" table:formula="of:=(MAX([.B35:.B39])-MIN([.B35:.B39]))/[.B47]" office:value-type="percentage" office:value="0.0225044393982001" calcext:value-type="percentage">
            <text:p>2.25%</text:p>
          </table:table-cell>
          <table:table-cell/>
          <table:table-cell table:style-name="ce211" table:formula="of:=(MAX([.D35:.D39])-MIN([.D35:.D39]))/[.D47]" office:value-type="percentage" office:value="0.0457447267676299" calcext:value-type="percentage">
            <text:p>4.57%</text:p>
          </table:table-cell>
          <table:table-cell/>
          <table:table-cell table:style-name="ce240" table:formula="of:=(MAX([.F35:.F39])-MIN([.F35:.F39]))/[.F47]" office:value-type="percentage" office:value="0.402332361516035" calcext:value-type="percentage">
            <text:p>40.23%</text:p>
          </table:table-cell>
          <table:table-cell/>
          <table:table-cell table:style-name="ce240" table:formula="of:=(MAX([.H35:.H39])-MIN([.H35:.H39]))/[.H47]" office:value-type="percentage" office:value="0.660569105691057" calcext:value-type="percentage">
            <text:p>66.06%</text:p>
          </table:table-cell>
          <table:table-cell/>
          <table:table-cell table:style-name="ce240" table:formula="of:=(MAX([.J35:.J39])-MIN([.J35:.J39]))/[.J47]" office:value-type="percentage" office:value="0.824372759856631" calcext:value-type="percentage">
            <text:p>82.44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6">QMAX</text:span></text:p>
          </table:table-cell>
          <table:table-cell table:style-name="ce21" office:value-type="percentage" office:value="0.11" calcext:value-type="percentage">
            <text:p>11.00%</text:p>
          </table:table-cell>
          <table:table-cell/>
          <table:table-cell table:style-name="ce21" office:value-type="percentage" office:value="0.113" calcext:value-type="percentage">
            <text:p>11.30%</text:p>
          </table:table-cell>
          <table:table-cell table:number-columns-repeated="6"/>
          <table:table-cell table:style-name="ce31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92"/>
          <table:table-cell table:number-columns-repeated="2"/>
          <table:table-cell table:style-name="ce16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16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calcext:conditional-formats>
          <calcext:conditional-format calcext:target-range-address="'Annex E Verify Counting Accuracy_2'.A29:'Annex E Verify Counting Accuracy_2'.A29">
            <calcext:condition calcext:apply-style-name="Good" calcext:value="between([.$J$22],[.$K$22])" calcext:base-cell-address="'Annex E Verify Counting Accuracy_2'.A29"/>
          </calcext:conditional-format>
          <calcext:conditional-format calcext:target-range-address="'Annex E Verify Counting Accuracy_2'.B29:'Annex E Verify Counting Accuracy_2'.B29">
            <calcext:condition calcext:apply-style-name="Good" calcext:value="between([.$J$24],[.$K$24])" calcext:base-cell-address="'Annex E Verify Counting Accuracy_2'.B29"/>
          </calcext:conditional-format>
          <calcext:conditional-format calcext:target-range-address="'Annex E Verify Counting Accuracy_2'.B55:'Annex E Verify Counting Accuracy_2'.B55 'Annex E Verify Counting Accuracy_2'.D55:'Annex E Verify Counting Accuracy_2'.D55">
            <calcext:condition calcext:apply-style-name="Good" calcext:value="&lt;[.B56]" calcext:base-cell-address="'Annex E Verify Counting Accuracy_2'.B55"/>
          </calcext:conditional-format>
        </calcext:conditional-formats>
      </table:table>
      <table:table table:name="Annex E Verify Counting Accuracy" table:style-name="ta1">
        <table:table-column table:style-name="co16" table:default-cell-style-name="Default"/>
        <table:table-column table:style-name="co17" table:default-cell-style-name="Default"/>
        <table:table-column table:style-name="co4" table:number-columns-repeated="1022" table:default-cell-style-name="Default"/>
        <table:table-row table:style-name="ro9">
          <table:table-cell table:style-name="ce59" office:value-type="string" calcext:value-type="string">
            <text:p>Counts per Table A.1</text:p>
            <text:p>Cv &lt; Table C.2</text:p>
            <text:p>6 sizes 5-15um</text:p>
          </table:table-cell>
          <table:table-cell table:style-name="ce68" office:value-type="string" calcext:value-type="string">
            <text:p>RM8632x</text:p>
            <text:p>1mg/l</text:p>
          </table:table-cell>
          <table:table-cell table:style-name="ce59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68"/>
          <table:table-cell table:number-columns-repeated="4"/>
          <table:table-cell table:style-name="ce68" table:number-columns-repeated="1011"/>
        </table:table-row>
        <table:table-row table:style-name="ro2">
          <table:table-cell table:number-columns-repeated="6"/>
          <table:table-cell>
            <draw:frame draw:z-index="1" draw:name="Image 7" draw:style-name="gr1" draw:text-style-name="P1" svg:width="17.329cm" svg:height="7.051cm" svg:x="1.2cm" svg:y="0.391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64" office:value-type="string" calcext:value-type="string">
            <text:p>Bottle Sampler</text:p>
          </table:table-cell>
          <table:table-cell table:number-columns-repeated="2"/>
          <table:table-cell table:style-name="ce16" office:value-type="string" calcext:value-type="string">
            <text:p>BS-500</text:p>
          </table:table-cell>
          <table:table-cell table:number-columns-repeated="10"/>
          <table:table-cell>
            <draw:frame draw:z-index="0" draw:name="Image 8" draw:style-name="gr1" draw:text-style-name="P1" svg:width="13.492cm" svg:height="6.823cm" svg:x="0.716cm" svg:y="0.027cm">
              <draw:image xlink:href="Pictures/10000000000004E90000029378EBCC71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16" office:value-type="string" calcext:value-type="string">
            <text:p>LPA3-NAVA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16" office:value-type="string" calcext:value-type="string">
            <text:p>11171-000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16" office:value-type="string" calcext:value-type="string">
            <text:p>LPA3-NAVA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16" office:value-type="string" calcext:value-type="string">
            <text:p>11171-000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30" office:value-type="date" office:date-value="2025-05-14" calcext:value-type="date">
            <text:p>2025-05-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30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3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table:style-name="ce208" office:value-type="percentage" office:value="0.51" calcext:value-type="percentage">
            <text:p>51%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51" calcext:value-type="float">
            <text:p>0.051</text:p>
          </table:table-cell>
          <table:table-cell table:number-columns-repeated="1022"/>
        </table:table-row>
        <table:table-row table:style-name="ro2">
          <table:table-cell table:style-name="ce114" office:value-type="string" calcext:value-type="string">
            <text:p>Total scanned</text:p>
          </table:table-cell>
          <table:table-cell table:formula="of:=[.B16]*[.$B$13]" office:value-type="float" office:value="25.5" calcext:value-type="float">
            <text:p>25.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5.1" calcext:value-type="float">
            <text:p>5.1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table:number-columns-repeated="8"/>
          <table:table-cell table:style-name="ce92" office:value-type="string" calcext:value-type="string">
            <text:p>~Raw Counts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115" office:value-type="string" calcext:value-type="string">
            <text:p>Source Data</text:p>
          </table:table-cell>
          <table:table-cell table:style-name="ce117" table:number-columns-repeated="3"/>
          <table:table-cell table:style-name="ce118"/>
          <table:table-cell table:number-columns-repeated="2"/>
          <table:table-cell table:style-name="ce120" office:value-type="string" calcext:value-type="string">
            <text:p>Portion </text:p>
          </table:table-cell>
          <table:table-cell table:style-name="ce122" office:value-type="string" calcext:value-type="string">
            <text:p>&gt;4μm(c)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6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14u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1μm</text:p>
          </table:table-cell>
          <table:table-cell table:style-name="ce122" office:value-type="string" calcext:value-type="string">
            <text:p>Deviation</text:p>
          </table:table-cell>
          <table:table-cell table:style-name="ce122" office:value-type="string" calcext:value-type="string">
            <text:p>25μm</text:p>
          </table:table-cell>
          <table:table-cell table:style-name="ce122" office:value-type="string" calcext:value-type="string">
            <text:p>Deviation</text:p>
          </table:table-cell>
          <table:table-cell table:number-columns-repeated="1006"/>
        </table:table-row>
        <table:table-row table:style-name="ro2">
          <table:table-cell table:style-name="ce116" office:value-type="string" calcext:value-type="string">
            <text:p>TotalCount4</text:p>
          </table:table-cell>
          <table:table-cell table:style-name="ce16" office:value-type="string" calcext:value-type="string">
            <text:p>TotalCount6</text:p>
          </table:table-cell>
          <table:table-cell table:style-name="ce16" office:value-type="string" calcext:value-type="string">
            <text:p>TotalCount14</text:p>
          </table:table-cell>
          <table:table-cell table:style-name="ce16" office:value-type="string" calcext:value-type="string">
            <text:p>TotalCount21</text:p>
          </table:table-cell>
          <table:table-cell table:style-name="ce119" office:value-type="string" calcext:value-type="string">
            <text:p>TotalCount25</text:p>
          </table:table-cell>
          <table:table-cell table:style-name="ce16"/>
          <table:table-cell table:number-columns-repeated="1018"/>
        </table:table-row>
        <table:table-row table:style-name="ro2">
          <table:table-cell office:value-type="float" office:value="493492" calcext:value-type="float">
            <text:p>493492</text:p>
          </table:table-cell>
          <table:table-cell office:value-type="float" office:value="148989" calcext:value-type="float">
            <text:p>148989</text:p>
          </table:table-cell>
          <table:table-cell office:value-type="float" office:value="3833" calcext:value-type="float">
            <text:p>3833</text:p>
          </table:table-cell>
          <table:table-cell office:value-type="float" office:value="1112" calcext:value-type="float">
            <text:p>1112</text:p>
          </table:table-cell>
          <table:table-cell office:value-type="float" office:value="619" calcext:value-type="float">
            <text:p>619</text:p>
          </table:table-cell>
          <table:table-cell table:style-name="ce16"/>
          <table:table-cell/>
          <table:table-cell office:value-type="string" calcext:value-type="string">
            <text:p>Portion 1</text:p>
          </table:table-cell>
          <table:table-cell table:style-name="ce20" table:formula="of:=[.A24]*[.$B$18]" office:value-type="float" office:value="25168.092" calcext:value-type="float">
            <text:p>25168</text:p>
          </table:table-cell>
          <table:table-cell table:style-name="ce21" table:formula="of:=([.I24]-[.I$36])/[.I$36]" office:value-type="percentage" office:value="0.0275851212424341" calcext:value-type="percentage">
            <text:p>2.76%</text:p>
          </table:table-cell>
          <table:table-cell table:style-name="ce20" table:formula="of:=[.B24]*[.$B$18]" office:value-type="float" office:value="7598.439" calcext:value-type="float">
            <text:p>7598</text:p>
          </table:table-cell>
          <table:table-cell table:style-name="ce21" table:formula="of:=([.K24]-[.K$36])/[.K$36]" office:value-type="percentage" office:value="0.0594426777861845" calcext:value-type="percentage">
            <text:p>5.94%</text:p>
          </table:table-cell>
          <table:table-cell table:style-name="ce20" table:formula="of:=[.C24]*[.$B$18]" office:value-type="float" office:value="195.483" calcext:value-type="float">
            <text:p>195</text:p>
          </table:table-cell>
          <table:table-cell table:style-name="ce21" table:formula="of:=([.M24]-[.M$36])/[.M$36]" office:value-type="percentage" office:value="0.299586356547094" calcext:value-type="percentage">
            <text:p>29.96%</text:p>
          </table:table-cell>
          <table:table-cell table:style-name="ce20" table:formula="of:=[.D24]*[.$B$18]" office:value-type="float" office:value="56.712" calcext:value-type="float">
            <text:p>57</text:p>
          </table:table-cell>
          <table:table-cell table:style-name="ce21" table:formula="of:=([.O24]-[.O$36])/[.O$36]" office:value-type="percentage" office:value="0.156887224302955" calcext:value-type="percentage">
            <text:p>15.69%</text:p>
          </table:table-cell>
          <table:table-cell table:style-name="ce20" table:formula="of:=[.E24]*[.$B$18]" office:value-type="float" office:value="31.569" calcext:value-type="float">
            <text:p>32</text:p>
          </table:table-cell>
          <table:table-cell table:style-name="ce21" table:formula="of:=([.Q24]-[.Q$36])/[.Q$36]" office:value-type="percentage" office:value="0.138286134608312" calcext:value-type="percentage">
            <text:p>13.83%</text:p>
          </table:table-cell>
          <table:table-cell table:number-columns-repeated="1006"/>
        </table:table-row>
        <table:table-row table:style-name="ro2">
          <table:table-cell office:value-type="float" office:value="485020" calcext:value-type="float">
            <text:p>485020</text:p>
          </table:table-cell>
          <table:table-cell office:value-type="float" office:value="140780" calcext:value-type="float">
            <text:p>140780</text:p>
          </table:table-cell>
          <table:table-cell office:value-type="float" office:value="3037" calcext:value-type="float">
            <text:p>3037</text:p>
          </table:table-cell>
          <table:table-cell office:value-type="float" office:value="892" calcext:value-type="float">
            <text:p>892</text:p>
          </table:table-cell>
          <table:table-cell office:value-type="float" office:value="466" calcext:value-type="float">
            <text:p>466</text:p>
          </table:table-cell>
          <table:table-cell table:style-name="ce16"/>
          <table:table-cell/>
          <table:table-cell office:value-type="string" calcext:value-type="string">
            <text:p>Portion 2</text:p>
          </table:table-cell>
          <table:table-cell table:style-name="ce20" table:formula="of:=[.A25]*[.$B$18]" office:value-type="float" office:value="24736.02" calcext:value-type="float">
            <text:p>24736</text:p>
          </table:table-cell>
          <table:table-cell table:style-name="ce21" table:formula="of:=([.I25]-[.I$36])/[.I$36]" office:value-type="percentage" office:value="0.00994410346065461" calcext:value-type="percentage">
            <text:p>0.99%</text:p>
          </table:table-cell>
          <table:table-cell table:style-name="ce20" table:formula="of:=[.B25]*[.$B$18]" office:value-type="float" office:value="7179.78" calcext:value-type="float">
            <text:p>7180</text:p>
          </table:table-cell>
          <table:table-cell table:style-name="ce21" table:formula="of:=([.K25]-[.K$36])/[.K$36]" office:value-type="percentage" office:value="0.0010694761273588" calcext:value-type="percentage">
            <text:p>0.11%</text:p>
          </table:table-cell>
          <table:table-cell table:style-name="ce20" table:formula="of:=[.C25]*[.$B$18]" office:value-type="float" office:value="154.887" calcext:value-type="float">
            <text:p>155</text:p>
          </table:table-cell>
          <table:table-cell table:style-name="ce21" table:formula="of:=([.M25]-[.M$36])/[.M$36]" office:value-type="percentage" office:value="0.0297009561266699" calcext:value-type="percentage">
            <text:p>2.97%</text:p>
          </table:table-cell>
          <table:table-cell table:style-name="ce20" table:formula="of:=[.D25]*[.$B$18]" office:value-type="float" office:value="45.492" calcext:value-type="float">
            <text:p>45</text:p>
          </table:table-cell>
          <table:table-cell table:style-name="ce21" table:formula="of:=([.O25]-[.O$36])/[.O$36]" office:value-type="percentage" office:value="-0.0719933416562631" calcext:value-type="percentage">
            <text:p>-7.20%</text:p>
          </table:table-cell>
          <table:table-cell table:style-name="ce20" table:formula="of:=[.E25]*[.$B$18]" office:value-type="float" office:value="23.766" calcext:value-type="float">
            <text:p>24</text:p>
          </table:table-cell>
          <table:table-cell table:style-name="ce21" table:formula="of:=([.Q25]-[.Q$36])/[.Q$36]" office:value-type="percentage" office:value="-0.14306730415594" calcext:value-type="percentage">
            <text:p>-14.31%</text:p>
          </table:table-cell>
          <table:table-cell table:number-columns-repeated="1006"/>
        </table:table-row>
        <table:table-row table:style-name="ro2">
          <table:table-cell office:value-type="float" office:value="480652" calcext:value-type="float">
            <text:p>480652</text:p>
          </table:table-cell>
          <table:table-cell office:value-type="float" office:value="138406" calcext:value-type="float">
            <text:p>138406</text:p>
          </table:table-cell>
          <table:table-cell office:value-type="float" office:value="2930" calcext:value-type="float">
            <text:p>2930</text:p>
          </table:table-cell>
          <table:table-cell office:value-type="float" office:value="1035" calcext:value-type="float">
            <text:p>1035</text:p>
          </table:table-cell>
          <table:table-cell office:value-type="float" office:value="621" calcext:value-type="float">
            <text:p>621</text:p>
          </table:table-cell>
          <table:table-cell table:style-name="ce16"/>
          <table:table-cell/>
          <table:table-cell office:value-type="string" calcext:value-type="string">
            <text:p>Portion 3</text:p>
          </table:table-cell>
          <table:table-cell table:style-name="ce20" table:formula="of:=[.A26]*[.$B$18]" office:value-type="float" office:value="24513.252" calcext:value-type="float">
            <text:p>24513</text:p>
          </table:table-cell>
          <table:table-cell table:style-name="ce21" table:formula="of:=([.I26]-[.I$36])/[.I$36]" office:value-type="percentage" office:value="0.000848734519340555" calcext:value-type="percentage">
            <text:p>0.08%</text:p>
          </table:table-cell>
          <table:table-cell table:style-name="ce20" table:formula="of:=[.B26]*[.$B$18]" office:value-type="float" office:value="7058.706" calcext:value-type="float">
            <text:p>7059</text:p>
          </table:table-cell>
          <table:table-cell table:style-name="ce21" table:formula="of:=([.K26]-[.K$36])/[.K$36]" office:value-type="percentage" office:value="-0.0158117494467736" calcext:value-type="percentage">
            <text:p>-1.58%</text:p>
          </table:table-cell>
          <table:table-cell table:style-name="ce20" table:formula="of:=[.C26]*[.$B$18]" office:value-type="float" office:value="149.43" calcext:value-type="float">
            <text:p>149</text:p>
          </table:table-cell>
          <table:table-cell table:style-name="ce21" table:formula="of:=([.M26]-[.M$36])/[.M$36]" office:value-type="percentage" office:value="-0.00657760900522152" calcext:value-type="percentage">
            <text:p>-0.66%</text:p>
          </table:table-cell>
          <table:table-cell table:style-name="ce20" table:formula="of:=[.D26]*[.$B$18]" office:value-type="float" office:value="52.785" calcext:value-type="float">
            <text:p>53</text:p>
          </table:table-cell>
          <table:table-cell table:style-name="ce21" table:formula="of:=([.O26]-[.O$36])/[.O$36]" office:value-type="percentage" office:value="0.0767790262172284" calcext:value-type="percentage">
            <text:p>7.68%</text:p>
          </table:table-cell>
          <table:table-cell table:style-name="ce20" table:formula="of:=[.E26]*[.$B$18]" office:value-type="float" office:value="31.671" calcext:value-type="float">
            <text:p>32</text:p>
          </table:table-cell>
          <table:table-cell table:style-name="ce21" table:formula="of:=([.Q26]-[.Q$36])/[.Q$36]" office:value-type="percentage" office:value="0.141963957337257" calcext:value-type="percentage">
            <text:p>14.20%</text:p>
          </table:table-cell>
          <table:table-cell table:number-columns-repeated="1006"/>
        </table:table-row>
        <table:table-row table:style-name="ro2">
          <table:table-cell office:value-type="float" office:value="473976" calcext:value-type="float">
            <text:p>473976</text:p>
          </table:table-cell>
          <table:table-cell office:value-type="float" office:value="137633" calcext:value-type="float">
            <text:p>137633</text:p>
          </table:table-cell>
          <table:table-cell office:value-type="float" office:value="2715" calcext:value-type="float">
            <text:p>2715</text:p>
          </table:table-cell>
          <table:table-cell office:value-type="float" office:value="836" calcext:value-type="float">
            <text:p>836</text:p>
          </table:table-cell>
          <table:table-cell office:value-type="float" office:value="548" calcext:value-type="float">
            <text:p>548</text:p>
          </table:table-cell>
          <table:table-cell table:style-name="ce16"/>
          <table:table-cell/>
          <table:table-cell office:value-type="string" calcext:value-type="string">
            <text:p>Portion 4</text:p>
          </table:table-cell>
          <table:table-cell table:style-name="ce20" table:formula="of:=[.A27]*[.$B$18]" office:value-type="float" office:value="24172.776" calcext:value-type="float">
            <text:p>24173</text:p>
          </table:table-cell>
          <table:table-cell table:style-name="ce21" table:formula="of:=([.I27]-[.I$36])/[.I$36]" office:value-type="percentage" office:value="-0.0130525207581806" calcext:value-type="percentage">
            <text:p>-1.31%</text:p>
          </table:table-cell>
          <table:table-cell table:style-name="ce20" table:formula="of:=[.B27]*[.$B$18]" office:value-type="float" office:value="7019.283" calcext:value-type="float">
            <text:p>7019</text:p>
          </table:table-cell>
          <table:table-cell table:style-name="ce21" table:formula="of:=([.K27]-[.K$36])/[.K$36]" office:value-type="percentage" office:value="-0.0213084585322008" calcext:value-type="percentage">
            <text:p>-2.13%</text:p>
          </table:table-cell>
          <table:table-cell table:style-name="ce20" table:formula="of:=[.C27]*[.$B$18]" office:value-type="float" office:value="138.465" calcext:value-type="float">
            <text:p>138</text:p>
          </table:table-cell>
          <table:table-cell table:style-name="ce21" table:formula="of:=([.M27]-[.M$36])/[.M$36]" office:value-type="percentage" office:value="-0.0794737912795822" calcext:value-type="percentage">
            <text:p>-7.95%</text:p>
          </table:table-cell>
          <table:table-cell table:style-name="ce20" table:formula="of:=[.D27]*[.$B$18]" office:value-type="float" office:value="42.636" calcext:value-type="float">
            <text:p>43</text:p>
          </table:table-cell>
          <table:table-cell table:style-name="ce21" table:formula="of:=([.O27]-[.O$36])/[.O$36]" office:value-type="percentage" office:value="-0.130253849354973" calcext:value-type="percentage">
            <text:p>-13.03%</text:p>
          </table:table-cell>
          <table:table-cell table:style-name="ce20" table:formula="of:=[.E27]*[.$B$18]" office:value-type="float" office:value="27.948" calcext:value-type="float">
            <text:p>28</text:p>
          </table:table-cell>
          <table:table-cell table:style-name="ce21" table:formula="of:=([.Q27]-[.Q$36])/[.Q$36]" office:value-type="percentage" office:value="0.00772342773078344" calcext:value-type="percentage">
            <text:p>0.77%</text:p>
          </table:table-cell>
          <table:table-cell table:number-columns-repeated="1006"/>
        </table:table-row>
        <table:table-row table:style-name="ro2">
          <table:table-cell office:value-type="float" office:value="468082" calcext:value-type="float">
            <text:p>468082</text:p>
          </table:table-cell>
          <table:table-cell office:value-type="float" office:value="137340" calcext:value-type="float">
            <text:p>137340</text:p>
          </table:table-cell>
          <table:table-cell office:value-type="float" office:value="2232" calcext:value-type="float">
            <text:p>2232</text:p>
          </table:table-cell>
          <table:table-cell office:value-type="float" office:value="931" calcext:value-type="float">
            <text:p>931</text:p>
          </table:table-cell>
          <table:table-cell office:value-type="float" office:value="465" calcext:value-type="float">
            <text:p>465</text:p>
          </table:table-cell>
          <table:table-cell table:style-name="ce16"/>
          <table:table-cell/>
          <table:table-cell office:value-type="string" calcext:value-type="string">
            <text:p>Portion 5</text:p>
          </table:table-cell>
          <table:table-cell table:style-name="ce20" table:formula="of:=[.A28]*[.$B$18]" office:value-type="float" office:value="23872.182" calcext:value-type="float">
            <text:p>23872</text:p>
          </table:table-cell>
          <table:table-cell table:style-name="ce21" table:formula="of:=([.I28]-[.I$36])/[.I$36]" office:value-type="percentage" office:value="-0.0253254384642486" calcext:value-type="percentage">
            <text:p>-2.53%</text:p>
          </table:table-cell>
          <table:table-cell table:style-name="ce20" table:formula="of:=[.B28]*[.$B$18]" office:value-type="float" office:value="7004.34" calcext:value-type="float">
            <text:p>7004</text:p>
          </table:table-cell>
          <table:table-cell table:style-name="ce21" table:formula="of:=([.K28]-[.K$36])/[.K$36]" office:value-type="percentage" office:value="-0.0233919459345685" calcext:value-type="percentage">
            <text:p>-2.34%</text:p>
          </table:table-cell>
          <table:table-cell table:style-name="ce20" table:formula="of:=[.C28]*[.$B$18]" office:value-type="float" office:value="113.832" calcext:value-type="float">
            <text:p>114</text:p>
          </table:table-cell>
          <table:table-cell table:style-name="ce21" table:formula="of:=([.M28]-[.M$36])/[.M$36]" office:value-type="percentage" office:value="-0.243235912388961" calcext:value-type="percentage">
            <text:p>-24.32%</text:p>
          </table:table-cell>
          <table:table-cell table:style-name="ce20" table:formula="of:=[.D28]*[.$B$18]" office:value-type="float" office:value="47.481" calcext:value-type="float">
            <text:p>47</text:p>
          </table:table-cell>
          <table:table-cell table:style-name="ce21" table:formula="of:=([.O28]-[.O$36])/[.O$36]" office:value-type="percentage" office:value="-0.0314190595089473" calcext:value-type="percentage">
            <text:p>-3.14%</text:p>
          </table:table-cell>
          <table:table-cell table:style-name="ce20" table:formula="of:=[.E28]*[.$B$18]" office:value-type="float" office:value="23.715" calcext:value-type="float">
            <text:p>24</text:p>
          </table:table-cell>
          <table:table-cell table:style-name="ce21" table:formula="of:=([.Q28]-[.Q$36])/[.Q$36]" office:value-type="percentage" office:value="-0.144906215520412" calcext:value-type="percentage">
            <text:p>-14.49%</text:p>
          </table:table-cell>
          <table:table-cell table:number-columns-repeated="1006"/>
        </table:table-row>
        <table:table-row table:style-name="ro2">
          <table:table-cell table:style-name="ce92" table:formula="of:=SUM([.A24:.A28])/5" office:value-type="float" office:value="480244.4" calcext:value-type="float">
            <text:p>480244.4</text:p>
          </table:table-cell>
          <table:table-cell table:style-name="ce92" table:formula="of:=SUM([.B24:.B28])/5" office:value-type="float" office:value="140629.6" calcext:value-type="float">
            <text:p>140629.6</text:p>
          </table:table-cell>
          <table:table-cell table:style-name="ce92" table:formula="of:=SUM([.C24:.C28])/5" office:value-type="float" office:value="2949.4" calcext:value-type="float">
            <text:p>2949.4</text:p>
          </table:table-cell>
          <table:table-cell table:style-name="ce92" table:formula="of:=SUM([.D24:.D28])/5" office:value-type="float" office:value="961.2" calcext:value-type="float">
            <text:p>961.2</text:p>
          </table:table-cell>
          <table:table-cell table:style-name="ce92" table:formula="of:=SUM([.E24:.E28])/5" office:value-type="float" office:value="543.8" calcext:value-type="float">
            <text:p>543.8</text:p>
          </table:table-cell>
          <table:table-cell table:style-name="ce16"/>
          <table:table-cell table:number-columns-repeated="1018"/>
        </table:table-row>
        <table:table-row table:style-name="ro2" table:number-rows-repeated="3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6" table:number-columns-repeated="6"/>
          <table:table-cell/>
          <table:table-cell table:style-name="ce92" office:value-type="string" calcext:value-type="string">
            <text:p>N<text:span text:style-name="T6">TOTAL</text:span></text:p>
          </table:table-cell>
          <table:table-cell table:style-name="ce20" table:formula="of:=SUM([.I24:.I28])" office:value-type="float" office:value="122462.322" calcext:value-type="float">
            <text:p>122462</text:p>
          </table:table-cell>
          <table:table-cell table:style-name="ce20"/>
          <table:table-cell table:style-name="ce20" table:formula="of:=SUM([.K24:.K28])" office:value-type="float" office:value="35860.548" calcext:value-type="float">
            <text:p>35861</text:p>
          </table:table-cell>
          <table:table-cell table:style-name="ce20"/>
          <table:table-cell table:style-name="ce20" table:formula="of:=SUM([.M24:.M28])" office:value-type="float" office:value="752.097" calcext:value-type="float">
            <text:p>752</text:p>
          </table:table-cell>
          <table:table-cell table:style-name="ce20"/>
          <table:table-cell table:style-name="ce20" table:formula="of:=SUM([.O24:.O28])" office:value-type="float" office:value="245.106" calcext:value-type="float">
            <text:p>245</text:p>
          </table:table-cell>
          <table:table-cell table:style-name="ce20"/>
          <table:table-cell table:style-name="ce20" table:formula="of:=SUM([.Q24:.Q28])" office:value-type="float" office:value="138.669" calcext:value-type="float">
            <text:p>139</text:p>
          </table:table-cell>
          <table:table-cell table:number-columns-repeated="1007"/>
        </table:table-row>
        <table:table-row table:style-name="ro2">
          <table:table-cell table:number-columns-repeated="7"/>
          <table:table-cell table:style-name="ce121" office:value-type="string" calcext:value-type="string">
            <text:p>X /ml</text:p>
          </table:table-cell>
          <table:table-cell table:style-name="ce20" table:formula="of:=[.I33]/[.$B$19]" office:value-type="float" office:value="4802.444" calcext:value-type="float">
            <text:p>4802</text:p>
          </table:table-cell>
          <table:table-cell table:style-name="ce20"/>
          <table:table-cell table:style-name="ce20" table:formula="of:=[.K33]/[.$B$19]" office:value-type="float" office:value="1406.296" calcext:value-type="float">
            <text:p>1406</text:p>
          </table:table-cell>
          <table:table-cell table:style-name="ce20"/>
          <table:table-cell table:style-name="ce20" table:formula="of:=[.M33]/[.$B$19]" office:value-type="float" office:value="29.494" calcext:value-type="float">
            <text:p>29</text:p>
          </table:table-cell>
          <table:table-cell table:style-name="ce20"/>
          <table:table-cell table:style-name="ce20" table:formula="of:=[.O33]/[.$B$19]" office:value-type="float" office:value="9.612" calcext:value-type="float">
            <text:p>10</text:p>
          </table:table-cell>
          <table:table-cell table:style-name="ce20"/>
          <table:table-cell table:style-name="ce20" table:formula="of:=[.Q33]/[.$B$19]" office:value-type="float" office:value="5.438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6" table:number-columns-repeated="6"/>
          <table:table-cell/>
          <table:table-cell office:value-type="string" calcext:value-type="string">
            <text:p>X Mean</text:p>
          </table:table-cell>
          <table:table-cell table:style-name="ce20" table:formula="of:=AVERAGE([.I24:.I28])" office:value-type="float" office:value="24492.4644" calcext:value-type="float">
            <text:p>24492</text:p>
          </table:table-cell>
          <table:table-cell/>
          <table:table-cell table:style-name="ce20" table:formula="of:=AVERAGE([.K24:.K28])" office:value-type="float" office:value="7172.1096" calcext:value-type="float">
            <text:p>7172</text:p>
          </table:table-cell>
          <table:table-cell/>
          <table:table-cell table:style-name="ce20" table:formula="of:=AVERAGE([.M24:.M28])" office:value-type="float" office:value="150.4194" calcext:value-type="float">
            <text:p>150</text:p>
          </table:table-cell>
          <table:table-cell/>
          <table:table-cell table:style-name="ce20" table:formula="of:=AVERAGE([.O24:.O28])" office:value-type="float" office:value="49.0212" calcext:value-type="float">
            <text:p>49</text:p>
          </table:table-cell>
          <table:table-cell/>
          <table:table-cell table:style-name="ce20" table:formula="of:=AVERAGE([.Q24:.Q28])" office:value-type="float" office:value="27.7338" calcext:value-type="float">
            <text:p>28</text:p>
          </table:table-cell>
          <table:table-cell table:number-columns-repeated="1007"/>
        </table:table-row>
        <table:table-row table:style-name="ro2">
          <table:table-cell table:style-name="ce16" table:number-columns-repeated="6"/>
          <table:table-cell/>
          <table:table-cell office:value-type="string" calcext:value-type="string">
            <text:p>Std Dev</text:p>
          </table:table-cell>
          <table:table-cell table:style-name="ce20" table:formula="of:=STDEVP([.I24:.I28])" office:value-type="float" office:value="447.922992785858" calcext:value-type="float">
            <text:p>448</text:p>
          </table:table-cell>
          <table:table-cell/>
          <table:table-cell table:style-name="ce20" table:formula="of:=STDEVP([.K24:.K28])" office:value-type="float" office:value="221.891224335349" calcext:value-type="float">
            <text:p>222</text:p>
          </table:table-cell>
          <table:table-cell/>
          <table:table-cell table:style-name="ce20" table:formula="of:=STDEVP([.M24:.M28])" office:value-type="float" office:value="26.5827460026236" calcext:value-type="float">
            <text:p>27</text:p>
          </table:table-cell>
          <table:table-cell/>
          <table:table-cell table:style-name="ce20" table:formula="of:=STDEVP([.O24:.O28])" office:value-type="float" office:value="5.07765384405042" calcext:value-type="float">
            <text:p>5</text:p>
          </table:table-cell>
          <table:table-cell/>
          <table:table-cell table:style-name="ce20" table:formula="of:=STDEVP([.Q24:.Q28])" office:value-type="float" office:value="3.52563114349757" calcext:value-type="float">
            <text:p>4</text:p>
          </table:table-cell>
          <table:table-cell table:number-columns-repeated="1007"/>
        </table:table-row>
        <table:table-row table:style-name="ro2">
          <table:table-cell table:style-name="ce16" table:number-columns-repeated="6"/>
          <table:table-cell/>
          <table:table-cell office:value-type="string" calcext:value-type="string">
            <text:p>X</text:p>
          </table:table-cell>
          <table:table-cell table:style-name="ce20" table:formula="of:=[.I34]*[.$B$20]" office:value-type="float" office:value="24492.4644" calcext:value-type="float">
            <text:p>24492</text:p>
          </table:table-cell>
          <table:table-cell table:style-name="ce20"/>
          <table:table-cell table:style-name="ce20" table:formula="of:=[.K34]*[.$B$20]" office:value-type="float" office:value="7172.1096" calcext:value-type="float">
            <text:p>7172</text:p>
          </table:table-cell>
          <table:table-cell table:style-name="ce20"/>
          <table:table-cell table:style-name="ce20" table:formula="of:=[.M34]*[.$B$20]" office:value-type="float" office:value="150.4194" calcext:value-type="float">
            <text:p>150</text:p>
          </table:table-cell>
          <table:table-cell table:style-name="ce20"/>
          <table:table-cell table:style-name="ce20" table:formula="of:=[.O34]*[.$B$20]" office:value-type="float" office:value="49.0212" calcext:value-type="float">
            <text:p>49</text:p>
          </table:table-cell>
          <table:table-cell table:style-name="ce20"/>
          <table:table-cell table:style-name="ce20" table:formula="of:=[.Q34]*[.$B$20]" office:value-type="float" office:value="27.7338" calcext:value-type="float">
            <text:p>28</text:p>
          </table:table-cell>
          <table:table-cell table:number-columns-repeated="1007"/>
        </table:table-row>
        <table:table-row table:style-name="ro2">
          <table:table-cell table:style-name="ce16" table:number-columns-repeated="6"/>
          <table:table-cell/>
          <table:table-cell table:style-name="ce92" office:value-type="string" calcext:value-type="string">
            <text:p>N<text:span text:style-name="T6">TOTAL</text:span></text:p>
          </table:table-cell>
          <table:table-cell table:formula="of:=[.$B$14]*[.I38]" office:value-type="float" office:value="122462.322" calcext:value-type="float">
            <text:p>122462.322</text:p>
          </table:table-cell>
          <table:table-cell/>
          <table:table-cell table:formula="of:=[.$B$14]*[.K38]" office:value-type="float" office:value="35860.548" calcext:value-type="float">
            <text:p>35860.548</text:p>
          </table:table-cell>
          <table:table-cell/>
          <table:table-cell table:formula="of:=[.$B$14]*[.M38]" office:value-type="float" office:value="752.097" calcext:value-type="float">
            <text:p>752.097</text:p>
          </table:table-cell>
          <table:table-cell/>
          <table:table-cell table:formula="of:=[.$B$14]*[.O38]" office:value-type="float" office:value="245.106" calcext:value-type="float">
            <text:p>245.106</text:p>
          </table:table-cell>
          <table:table-cell/>
          <table:table-cell table:formula="of:=[.$B$14]*[.Q38]" office:value-type="float" office:value="138.669" calcext:value-type="float">
            <text:p>138.669</text:p>
          </table:table-cell>
          <table:table-cell table:number-columns-repeated="1007"/>
        </table:table-row>
        <table:table-row table:style-name="ro2" table:number-rows-repeated="3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6" table:number-columns-repeated="6"/>
          <table:table-cell/>
          <table:table-cell office:value-type="string" calcext:value-type="string">
            <text:p>CV</text:p>
          </table:table-cell>
          <table:table-cell table:style-name="ce21" table:formula="of:=[.I37]/[.I36]" office:value-type="percentage" office:value="0.0182881961353737" calcext:value-type="percentage">
            <text:p>1.83%</text:p>
          </table:table-cell>
          <table:table-cell/>
          <table:table-cell table:style-name="ce21" table:formula="of:=[.K37]/[.K36]" office:value-type="percentage" office:value="0.0309380693701821" calcext:value-type="percentage">
            <text:p>3.09%</text:p>
          </table:table-cell>
          <table:table-cell/>
          <table:table-cell table:style-name="ce21" table:formula="of:=[.M37]/[.M36]" office:value-type="percentage" office:value="0.176724185860491" calcext:value-type="percentage">
            <text:p>17.67%</text:p>
          </table:table-cell>
          <table:table-cell/>
          <table:table-cell table:style-name="ce21" table:formula="of:=[.O37]/[.O36]" office:value-type="percentage" office:value="0.103580774115085" calcext:value-type="percentage">
            <text:p>10.36%</text:p>
          </table:table-cell>
          <table:table-cell/>
          <table:table-cell table:style-name="ce21" table:formula="of:=[.Q37]/[.Q36]" office:value-type="percentage" office:value="0.127123983857155" calcext:value-type="percentage">
            <text:p>12.71%</text:p>
          </table:table-cell>
          <table:table-cell table:number-columns-repeated="1007"/>
        </table:table-row>
        <table:table-row table:style-name="ro2">
          <table:table-cell table:style-name="ce16" table:number-columns-repeated="6"/>
          <table:table-cell/>
          <table:table-cell table:style-name="ce92" office:value-type="string" calcext:value-type="string">
            <text:p>D<text:span text:style-name="T6">Q</text:span></text:p>
          </table:table-cell>
          <table:table-cell table:style-name="ce240" table:formula="of:=(MAX([.I24:.I28])-MIN([.I24:.I28]))/[.I36]" office:value-type="percentage" office:value="0.0529105597066827" calcext:value-type="percentage">
            <text:p>5.29%</text:p>
          </table:table-cell>
          <table:table-cell/>
          <table:table-cell table:style-name="ce240" table:formula="of:=(MAX([.K24:.K28])-MIN([.K24:.K28]))/[.K36]" office:value-type="percentage" office:value="0.082834623720753" calcext:value-type="percentage">
            <text:p>8.28%</text:p>
          </table:table-cell>
          <table:table-cell/>
          <table:table-cell table:style-name="ce240" table:formula="of:=(MAX([.M24:.M28])-MIN([.M24:.M28]))/[.M36]" office:value-type="percentage" office:value="0.542822268936055" calcext:value-type="percentage">
            <text:p>54.28%</text:p>
          </table:table-cell>
          <table:table-cell/>
          <table:table-cell table:style-name="ce240" table:formula="of:=(MAX([.O24:.O28])-MIN([.O24:.O28]))/[.O36]" office:value-type="percentage" office:value="0.287141073657928" calcext:value-type="percentage">
            <text:p>28.71%</text:p>
          </table:table-cell>
          <table:table-cell/>
          <table:table-cell table:style-name="ce240" table:formula="of:=(MAX([.Q24:.Q28])-MIN([.Q24:.Q28]))/[.Q36]" office:value-type="percentage" office:value="0.286870172857668" calcext:value-type="percentage">
            <text:p>28.69%</text:p>
          </table:table-cell>
          <table:table-cell table:number-columns-repeated="1007"/>
        </table:table-row>
        <table:table-row table:style-name="ro2">
          <table:table-cell table:style-name="ce16" table:number-columns-repeated="6"/>
          <table:table-cell table:number-columns-repeated="2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1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table:style-name="ce31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92"/>
          <table:table-cell table:number-columns-repeated="2"/>
          <table:table-cell table:style-name="ce16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16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</table:table>
      <table:named-expressions/>
      <table:database-ranges>
        <table:database-range table:name="__Anonymous_Sheet_DB__6" table:target-range-address="'Annex B Coincidence Limit'.R1:'Annex B Coincidence Limit'.R1"/>
        <table:database-range table:name="__Anonymous_Sheet_DB__7" table:target-range-address="'Annex B Coincidence Limit - MTD'.R1:'Annex B Coincidence Limit - MTD'.R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number-style style:name="N214P0" style:volatile="true">
      <number:text>£</number:text>
      <number:number number:decimal-places="0" number:min-decimal-places="0" number:min-integer-digits="1" number:grouping="true"/>
    </number:number-style>
    <number:number-style style:name="N214">
      <number:text>-£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number:min-decimal-places="2" number:min-integer-digits="1" number:grouping="true"/>
    </number:number-style>
    <number:number-style style:name="N217">
      <number:text>-£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1493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#dcdcdc" style:scale-to="11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ISO11171:2020 Summary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1:43:46.8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4T13:24:09.574000000</meta:creation-date>
    <dc:date>2025-05-16T13:37:59.759000000</dc:date>
    <meta:editing-duration>P4DT3H58M7S</meta:editing-duration>
    <meta:editing-cycles>250</meta:editing-cycles>
    <meta:generator>LibreOffice/7.6.4.1$Windows_X86_64 LibreOffice_project/e19e193f88cd6c0525a17fb7a176ed8e6a3e2aa1</meta:generator>
    <dc:title>ISO111171:2020</dc:title>
    <meta:document-statistic meta:table-count="14" meta:cell-count="6018" meta:object-count="1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B Coincidence Limit - MTD'.E22:'Annex B Coincidence Limit - MTD'.E37 'Annex B Coincidence Limit - MTD'.G22:'Annex B Coincidence Limit - MTD'.G37 'Annex B Coincidence Limit - MTD'.K21:'Annex B Coincidence Limit - MTD'.L37 'Annex B Coincidence Limit - MTD'.I21:'Annex B Coincidence Limit - MTD'.I37" chart:data-source-has-labels="row" svg:x="1.468cm" svg:y="0.304cm" svg:width="22.005cm" svg:height="13.673cm">
          <chart:coordinate-region svg:x="2.203cm" svg:y="0.503cm" svg:width="21.072cm" svg:height="12.83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B Coincidence Limit - MTD'.G22:'Annex B Coincidence Limit - MTD'.G37" chart:class="chart:scatter">
            <chart:domain table:cell-range-address="'Annex B Coincidence Limit - MTD'.E22:'Annex B Coincidence Limit - MTD'.E37"/>
            <chart:data-point chart:repeated="16"/>
          </chart:series>
          <chart:series chart:style-name="ch9" chart:values-cell-range-address="'Annex B Coincidence Limit - MTD'.L22:'Annex B Coincidence Limit - MTD'.L37" chart:label-cell-address="'Annex B Coincidence Limit - MTD'.L21:'Annex B Coincidence Limit - MTD'.L21" chart:class="chart:scatter">
            <chart:data-point chart:repeated="16"/>
          </chart:series>
          <chart:series chart:style-name="ch10" chart:values-cell-range-address="'Annex B Coincidence Limit - MTD'.K22:'Annex B Coincidence Limit - MTD'.K37" chart:label-cell-address="'Annex B Coincidence Limit - MTD'.K21:'Annex B Coincidence Limit - MTD'.K21" chart:class="chart:scatter">
            <chart:data-point chart:repeated="16"/>
          </chart:series>
          <chart:series chart:style-name="ch11" chart:values-cell-range-address="'Annex B Coincidence Limit - MTD'.I22:'Annex B Coincidence Limit - MTD'.I37" chart:label-cell-address="'Annex B Coincidence Limit - MTD'.I21:'Annex B Coincidence Limit - MTD'.I2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rrected</text:p>
                <draw:g>
                  <svg:desc>'Annex B Coincidence Limit - MTD'.L21:'Annex B Coincidence Limit - MTD'.L21</svg:desc>
                </draw:g>
              </table:table-cell>
              <table:table-cell office:value-type="string">
                <text:p>95%</text:p>
                <draw:g>
                  <svg:desc>'Annex B Coincidence Limit - MTD'.K21:'Annex B Coincidence Limit - MTD'.K21</svg:desc>
                </draw:g>
              </table:table-cell>
              <table:table-cell office:value-type="string">
                <text:p>Line 0-40%</text:p>
                <draw:g>
                  <svg:desc>'Annex B Coincidence Limit - MTD'.I21:'Annex B Coincidence Limit - MTD'.I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 - MTD'.E22:'Annex B Coincidence Limit - MTD'.E37</svg:desc>
                </draw:g>
              </table:table-cell>
              <table:table-cell office:value-type="float" office:value="1">
                <text:p>1</text:p>
                <draw:g>
                  <svg:desc>'Annex B Coincidence Limit - MTD'.G22:'Annex B Coincidence Limit - MTD'.G37</svg:desc>
                </draw:g>
              </table:table-cell>
              <table:table-cell office:value-type="float" office:value="1">
                <text:p>1</text:p>
                <draw:g>
                  <svg:desc>'Annex B Coincidence Limit - MTD'.L22:'Annex B Coincidence Limit - MTD'.L37</svg:desc>
                </draw:g>
              </table:table-cell>
              <table:table-cell office:value-type="float" office:value="0.95">
                <text:p>0.95</text:p>
                <draw:g>
                  <svg:desc>'Annex B Coincidence Limit - MTD'.K22:'Annex B Coincidence Limit - MTD'.K37</svg:desc>
                </draw:g>
              </table:table-cell>
              <table:table-cell office:value-type="float" office:value="1">
                <text:p>1</text:p>
                <draw:g>
                  <svg:desc>'Annex B Coincidence Limit - MTD'.I22:'Annex B Coincidence Limit - MTD'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071566731141">
                <text:p>1.240715667311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7903381642512">
                <text:p>2.479033816425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1496138996139">
                <text:p>3.714961389961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4850530376085">
                <text:p>4.948505303760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7967244701349">
                <text:p>6.179672447013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0846968238691">
                <text:p>7.408469682386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63490384615384">
                <text:p>8.634903846153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85898174831892">
                <text:p>9.858981748318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807101727447">
                <text:p>11.08071017274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3000958772771">
                <text:p>12.30009587727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5171455938697">
                <text:p>13.51714559386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7318660287081">
                <text:p>14.73186602870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9442638623327">
                <text:p>15.94426386233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1543457497612">
                <text:p>17.15434574976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3621183206107">
                <text:p>18.36211832061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.8" chart:maximum="1.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05cm" chart:symbol-height="0.0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column-mapping="0 1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B Coincidence Limit - MTD'.L22:'Annex B Coincidence Limit - MTD'.M37" svg:x="1.395cm" svg:y="2.51cm" svg:width="18.548cm" svg:height="11.466cm">
          <chart:coordinate-region svg:x="2.326cm" svg:y="2.709cm" svg:width="17.373cm" svg:height="10.623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B Coincidence Limit - MTD'.M22:'Annex B Coincidence Limit - MTD'.M22" chart:class="chart:scatter">
            <chart:domain table:cell-range-address="'Annex B Coincidence Limit - MTD'.L22:'Annex B Coincidence Limit - MTD'.L37"/>
            <chart:data-point chart:repeated="16"/>
          </chart:series>
          <chart:series chart:style-name="ch13" chart:values-cell-range-address="'Annex B Coincidence Limit - MTD'.M22:'Annex B Coincidence Limit - MTD'.M37" chart:class="chart:scatter">
            <chart:data-point chart:repeated="10"/>
            <chart:data-point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nex B Coincidence Limit - MTD'.L22:'Annex B Coincidence Limit - MTD'.L37</svg:desc>
                </draw:g>
              </table:table-cell>
              <table:table-cell office:value-type="float" office:value="1">
                <text:p>1</text:p>
                <draw:g>
                  <svg:desc>'Annex B Coincidence Limit - MTD'.M22:'Annex B Coincidence Limit - MTD'.M22</svg:desc>
                </draw:g>
              </table:table-cell>
              <table:table-cell office:value-type="float" office:value="1">
                <text:p>1</text:p>
                <draw:g>
                  <svg:desc>'Annex B Coincidence Limit - MTD'.M22:'Annex B Coincidence Limit - MTD'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52cm" svg:height="15.24cm" xlink:href=".." xlink:type="simple" chart:class="chart:scatter" chart:style-name="ch1">
        <chart:legend chart:legend-position="end" loext:overlay="true" svg:x="16.584cm" svg:y="7.4cm" style:legend-expansion="custom" svg:width="5.396cm" svg:height="2.08cm" style:legend-expansion-aspect-ratio="2.59423076923077" chart:style-name="ch2"/>
        <chart:plot-area chart:style-name="ch3" table:cell-range-address="'Annex B Coincidence Limit'.E22:'Annex B Coincidence Limit'.E37 'Annex B Coincidence Limit'.G22:'Annex B Coincidence Limit'.G37 'Annex B Coincidence Limit'.K21:'Annex B Coincidence Limit'.L37 'Annex B Coincidence Limit'.I21:'Annex B Coincidence Limit'.I37" chart:data-source-has-labels="row" svg:x="1.468cm" svg:y="0.304cm" svg:width="22.005cm" svg:height="13.673cm">
          <chart:coordinate-region svg:x="3.095cm" svg:y="0.502cm" svg:width="20.278cm" svg:height="12.831cm"/>
          <chart:axis chart:dimension="x" chart:name="primary-x" chart:style-name="ch4">
            <chart:title svg:x="11.37cm" svg:y="14.281cm" chart:style-name="ch5">
              <text:p>RM8632a mg/l</text:p>
            </chart:title>
          </chart:axis>
          <chart:axis chart:dimension="y" chart:name="primary-y" chart:style-name="ch4">
            <chart:title svg:x="0.451cm" svg:y="8.172cm" chart:style-name="ch6">
              <text:p>count / 100ml</text:p>
            </chart:title>
            <chart:grid chart:style-name="ch7" chart:class="major"/>
          </chart:axis>
          <chart:series chart:style-name="ch8" chart:values-cell-range-address="'Annex B Coincidence Limit'.G22:'Annex B Coincidence Limit'.G37" loext:label-string="count" chart:class="chart:scatter">
            <chart:domain table:cell-range-address="'Annex B Coincidence Limit'.E22:'Annex B Coincidence Limit'.E37"/>
            <chart:data-point chart:repeated="16"/>
          </chart:series>
          <chart:series chart:style-name="ch9" chart:values-cell-range-address="'Annex B Coincidence Limit'.L22:'Annex B Coincidence Limit'.L37" chart:label-cell-address="'Annex B Coincidence Limit'.L21:'Annex B Coincidence Limit'.L21" chart:class="chart:scatter">
            <chart:data-point chart:repeated="16"/>
          </chart:series>
          <chart:series chart:style-name="ch10" chart:values-cell-range-address="'Annex B Coincidence Limit'.K22:'Annex B Coincidence Limit'.K37" chart:label-cell-address="'Annex B Coincidence Limit'.K21:'Annex B Coincidence Limit'.K21" chart:class="chart:scatter">
            <chart:data-point chart:repeated="16"/>
          </chart:series>
          <chart:series chart:style-name="ch11" chart:values-cell-range-address="'Annex B Coincidence Limit'.I22:'Annex B Coincidence Limit'.I37" chart:label-cell-address="'Annex B Coincidence Limit'.I21:'Annex B Coincidence Limit'.I2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unt</text:p>
              </table:table-cell>
              <table:table-cell office:value-type="string">
                <text:p>corrected</text:p>
                <draw:g>
                  <svg:desc>'Annex B Coincidence Limit'.L21:'Annex B Coincidence Limit'.L21</svg:desc>
                </draw:g>
              </table:table-cell>
              <table:table-cell office:value-type="string">
                <text:p>95%</text:p>
                <draw:g>
                  <svg:desc>'Annex B Coincidence Limit'.K21:'Annex B Coincidence Limit'.K21</svg:desc>
                </draw:g>
              </table:table-cell>
              <table:table-cell office:value-type="string">
                <text:p>Line 0-40%</text:p>
                <draw:g>
                  <svg:desc>'Annex B Coincidence Limit'.I21:'Annex B Coincidence Limit'.I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B Coincidence Limit'.E22:'Annex B Coincidence Limit'.E37</svg:desc>
                </draw:g>
              </table:table-cell>
              <table:table-cell office:value-type="float" office:value="1">
                <text:p>1</text:p>
                <draw:g>
                  <svg:desc>'Annex B Coincidence Limit'.G22:'Annex B Coincidence Limit'.G37</svg:desc>
                </draw:g>
              </table:table-cell>
              <table:table-cell office:value-type="float" office:value="1">
                <text:p>1</text:p>
                <draw:g>
                  <svg:desc>'Annex B Coincidence Limit'.L22:'Annex B Coincidence Limit'.L37</svg:desc>
                </draw:g>
              </table:table-cell>
              <table:table-cell office:value-type="float" office:value="0.95">
                <text:p>0.95</text:p>
                <draw:g>
                  <svg:desc>'Annex B Coincidence Limit'.K22:'Annex B Coincidence Limit'.K37</svg:desc>
                </draw:g>
              </table:table-cell>
              <table:table-cell office:value-type="float" office:value="1">
                <text:p>1</text:p>
                <draw:g>
                  <svg:desc>'Annex B Coincidence Limit'.I22:'Annex B Coincidence Limit'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6142139795892">
                <text:p>0.316142139795892</text:p>
              </table:table-cell>
              <table:table-cell office:value-type="float" office:value="158573">
                <text:p>158573</text:p>
              </table:table-cell>
              <table:table-cell office:value-type="float" office:value="158573">
                <text:p>158573</text:p>
              </table:table-cell>
              <table:table-cell office:value-type="float" office:value="148655.46375155">
                <text:p>148655.46375155</text:p>
              </table:table-cell>
              <table:table-cell office:value-type="float" office:value="156479.435527948">
                <text:p>156479.435527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1749260671123">
                <text:p>0.631749260671123</text:p>
              </table:table-cell>
              <table:table-cell office:value-type="float" office:value="315866">
                <text:p>315866</text:p>
              </table:table-cell>
              <table:table-cell office:value-type="float" office:value="315866">
                <text:p>315866</text:p>
              </table:table-cell>
              <table:table-cell office:value-type="float" office:value="297059.352417862">
                <text:p>297059.352417862</text:p>
              </table:table-cell>
              <table:table-cell office:value-type="float" office:value="312694.055176697">
                <text:p>312694.05517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682271962561">
                <text:p>0.94682271962561</text:p>
              </table:table-cell>
              <table:table-cell office:value-type="float" office:value="471092">
                <text:p>471092</text:p>
              </table:table-cell>
              <table:table-cell office:value-type="float" office:value="471092">
                <text:p>471092</text:p>
              </table:table-cell>
              <table:table-cell office:value-type="float" office:value="445212.304083602">
                <text:p>445212.304083602</text:p>
              </table:table-cell>
              <table:table-cell office:value-type="float" office:value="468644.530614318">
                <text:p>468644.530614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136386907403">
                <text:p>1.26136386907403</text:p>
              </table:table-cell>
              <table:table-cell office:value-type="float" office:value="620381">
                <text:p>620381</text:p>
              </table:table-cell>
              <table:table-cell office:value-type="float" office:value="620381">
                <text:p>620381</text:p>
              </table:table-cell>
              <table:table-cell office:value-type="float" office:value="593114.954677378">
                <text:p>593114.954677378</text:p>
              </table:table-cell>
              <table:table-cell office:value-type="float" office:value="624331.531239346">
                <text:p>624331.531239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537405686517">
                <text:p>1.57537405686517</text:p>
              </table:table-cell>
              <table:table-cell office:value-type="float" office:value="760309">
                <text:p>760309</text:p>
              </table:table-cell>
              <table:table-cell office:value-type="float" office:value="760309">
                <text:p>760309</text:p>
              </table:table-cell>
              <table:table-cell office:value-type="float" office:value="740767.937980839">
                <text:p>740767.937980839</text:p>
              </table:table-cell>
              <table:table-cell office:value-type="float" office:value="779755.724190357">
                <text:p>779755.724190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885462630117">
                <text:p>1.88885462630117</text:p>
              </table:table-cell>
              <table:table-cell office:value-type="float" office:value="922391">
                <text:p>922391</text:p>
              </table:table-cell>
              <table:table-cell office:value-type="float" office:value="922391">
                <text:p>922391</text:p>
              </table:table-cell>
              <table:table-cell office:value-type="float" office:value="888171.885637723">
                <text:p>888171.885637723</text:p>
              </table:table-cell>
              <table:table-cell office:value-type="float" office:value="934917.774355497">
                <text:p>934917.774355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0180691615671">
                <text:p>2.20180691615671</text:p>
              </table:table-cell>
              <table:table-cell office:value-type="float" office:value="1083045">
                <text:p>1083045</text:p>
              </table:table-cell>
              <table:table-cell office:value-type="float" office:value="1083045">
                <text:p>1083045</text:p>
              </table:table-cell>
              <table:table-cell office:value-type="float" office:value="1035327.42716287">
                <text:p>1035327.42716287</text:p>
              </table:table-cell>
              <table:table-cell office:value-type="float" office:value="1089818.34438197">
                <text:p>1089818.34438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423226069801">
                <text:p>2.51423226069801</text:p>
              </table:table-cell>
              <table:table-cell office:value-type="float" office:value="1244140">
                <text:p>1244140</text:p>
              </table:table-cell>
              <table:table-cell office:value-type="float" office:value="1244140">
                <text:p>1244140</text:p>
              </table:table-cell>
              <table:table-cell office:value-type="float" office:value="1182235.18995119">
                <text:p>1182235.18995119</text:p>
              </table:table-cell>
              <table:table-cell office:value-type="float" office:value="1244458.09468546">
                <text:p>1244458.09468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2613198970185">
                <text:p>2.82613198970185</text:p>
              </table:table-cell>
              <table:table-cell office:value-type="float" office:value="1407530">
                <text:p>1407530</text:p>
              </table:table-cell>
              <table:table-cell office:value-type="float" office:value="1407530">
                <text:p>1407530</text:p>
              </table:table-cell>
              <table:table-cell office:value-type="float" office:value="1328895.79928654">
                <text:p>1328895.79928654</text:p>
              </table:table-cell>
              <table:table-cell office:value-type="float" office:value="1398837.68345952">
                <text:p>1398837.68345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375074284744">
                <text:p>3.1375074284744</text:p>
              </table:table-cell>
              <table:table-cell office:value-type="float" office:value="1562624">
                <text:p>1562624</text:p>
              </table:table-cell>
              <table:table-cell office:value-type="float" office:value="1562624">
                <text:p>1562624</text:p>
              </table:table-cell>
              <table:table-cell office:value-type="float" office:value="1475309.87835066">
                <text:p>1475309.87835066</text:p>
              </table:table-cell>
              <table:table-cell office:value-type="float" office:value="1552957.76668491">
                <text:p>1552957.76668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4835989787003">
                <text:p>3.44835989787003</text:p>
              </table:table-cell>
              <table:table-cell office:value-type="float" office:value="1713393">
                <text:p>1713393</text:p>
              </table:table-cell>
              <table:table-cell office:value-type="float" office:value="1713393">
                <text:p>1713393</text:p>
              </table:table-cell>
              <table:table-cell office:value-type="float" office:value="1621478.04823196">
                <text:p>1621478.04823196</text:p>
              </table:table-cell>
              <table:table-cell office:value-type="float" office:value="1706818.9981389">
                <text:p>1706818.9981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5869071430993">
                <text:p>3.75869071430993</text:p>
              </table:table-cell>
              <table:table-cell office:value-type="float" office:value="1873206">
                <text:p>1873206</text:p>
              </table:table-cell>
              <table:table-cell office:value-type="float" office:value="1873206">
                <text:p>1873206</text:p>
              </table:table-cell>
              <table:table-cell office:value-type="float" office:value="1767400.92793428">
                <text:p>1767400.92793428</text:p>
              </table:table-cell>
              <table:table-cell office:value-type="float" office:value="1860422.02940451">
                <text:p>1860422.02940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6850118980074">
                <text:p>4.06850118980074</text:p>
              </table:table-cell>
              <table:table-cell office:value-type="float" office:value="2029887">
                <text:p>2029887</text:p>
              </table:table-cell>
              <table:table-cell office:value-type="float" office:value="2029887">
                <text:p>2029887</text:p>
              </table:table-cell>
              <table:table-cell office:value-type="float" office:value="1913079.13438569">
                <text:p>1913079.13438569</text:p>
              </table:table-cell>
              <table:table-cell office:value-type="float" office:value="2013767.50987967">
                <text:p>2013767.50987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7779263195302">
                <text:p>4.37779263195302</text:p>
              </table:table-cell>
              <table:table-cell office:value-type="float" office:value="2197397">
                <text:p>2197397</text:p>
              </table:table-cell>
              <table:table-cell office:value-type="float" office:value="2197397">
                <text:p>2197397</text:p>
              </table:table-cell>
              <table:table-cell office:value-type="float" office:value="2058513.28244712">
                <text:p>2058513.28244712</text:p>
              </table:table-cell>
              <table:table-cell office:value-type="float" office:value="2166856.08678644">
                <text:p>2166856.08678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8656634399966">
                <text:p>4.68656634399966</text:p>
              </table:table-cell>
              <table:table-cell office:value-type="float" office:value="2326943">
                <text:p>2326943</text:p>
              </table:table-cell>
              <table:table-cell office:value-type="float" office:value="2326943">
                <text:p>2326943</text:p>
              </table:table-cell>
              <table:table-cell office:value-type="float" office:value="2203703.98492106">
                <text:p>2203703.98492106</text:p>
              </table:table-cell>
              <table:table-cell office:value-type="float" office:value="2319688.40518006">
                <text:p>2319688.405180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1" chart:axis-label-position="outside-start"/>
      <style:graphic-properties draw:stroke="dash" draw:stroke-dash="Dot" svg:stroke-width="0.05cm" svg:stroke-color="#2e8b57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.8" chart:maximum="1.2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05cm" chart:symbol-height="0.0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9cm" svg:height="15.239cm" xlink:href=".." xlink:type="simple" chart:class="chart:scatter" chart:style-name="ch1">
        <chart:title svg:x="7.218cm" svg:y="0.44cm" chart:style-name="ch2">
          <text:p>Fraction of Expected Counts</text:p>
        </chart:title>
        <chart:subtitle svg:x="5.833cm" svg:y="1.519cm" chart:style-name="ch3">
          <text:p>Based on extrapolating 0-40% linear regression fit</text:p>
        </chart:subtitle>
        <chart:legend chart:legend-position="end" loext:overlay="true" svg:x="14.002cm" svg:y="8.787cm" style:legend-expansion="custom" svg:width="4.596cm" svg:height="1.09cm" style:legend-expansion-aspect-ratio="4.21651376146789" chart:style-name="ch4"/>
        <chart:plot-area chart:style-name="ch5" table:cell-range-address="'Annex B Coincidence Limit'.L22:'Annex B Coincidence Limit'.M37" chart:data-source-has-labels="row" svg:x="1.395cm" svg:y="2.51cm" svg:width="18.548cm" svg:height="11.466cm">
          <chart:coordinate-region svg:x="2.326cm" svg:y="2.709cm" svg:width="16.927cm" svg:height="10.623cm"/>
          <chart:axis chart:dimension="x" chart:name="primary-x" chart:style-name="ch6">
            <chart:title svg:x="10.181cm" svg:y="14.28cm" chart:style-name="ch7">
              <text:p>Count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8.89cm" chart:style-name="ch11">
              <text:p>Fraction</text:p>
            </chart:title>
            <chart:grid chart:style-name="ch8" chart:class="major"/>
          </chart:axis>
          <chart:series chart:style-name="ch12" chart:values-cell-range-address="'Annex B Coincidence Limit'.M22:'Annex B Coincidence Limit'.M22" loext:label-string="reference" chart:class="chart:scatter">
            <chart:domain table:cell-range-address="'Annex B Coincidence Limit'.L22:'Annex B Coincidence Limit'.L37"/>
            <chart:data-point chart:repeated="16"/>
          </chart:series>
          <chart:series chart:style-name="ch13" chart:values-cell-range-address="'Annex B Coincidence Limit'.M22:'Annex B Coincidence Limit'.M37" loext:label-string="fraction" chart:class="chart:scatter">
            <chart:data-point chart:repeated="10"/>
            <chart:data-point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eference</text:p>
              </table:table-cell>
              <table:table-cell office:value-type="string">
                <text:p>fra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nex B Coincidence Limit'.L22:'Annex B Coincidence Limit'.L37</svg:desc>
                </draw:g>
              </table:table-cell>
              <table:table-cell office:value-type="float" office:value="1">
                <text:p>1</text:p>
                <draw:g>
                  <svg:desc>'Annex B Coincidence Limit'.M22:'Annex B Coincidence Limit'.M22</svg:desc>
                </draw:g>
              </table:table-cell>
              <table:table-cell office:value-type="float" office:value="1">
                <text:p>1</text:p>
                <draw:g>
                  <svg:desc>'Annex B Coincidence Limit'.M22:'Annex B Coincidence Limit'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573">
                <text:p>158573</text:p>
              </table:table-cell>
              <table:table-cell office:value-type="float" office:value="NaN">
                <text:p>NaN</text:p>
              </table:table-cell>
              <table:table-cell office:value-type="float" office:value="1.01337916682143">
                <text:p>1.01337916682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866">
                <text:p>315866</text:p>
              </table:table-cell>
              <table:table-cell office:value-type="float" office:value="NaN">
                <text:p>NaN</text:p>
              </table:table-cell>
              <table:table-cell office:value-type="float" office:value="1.0101439242953">
                <text:p>1.0101439242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1092">
                <text:p>471092</text:p>
              </table:table-cell>
              <table:table-cell office:value-type="float" office:value="NaN">
                <text:p>NaN</text:p>
              </table:table-cell>
              <table:table-cell office:value-type="float" office:value="1.00522244307956">
                <text:p>1.00522244307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0381">
                <text:p>620381</text:p>
              </table:table-cell>
              <table:table-cell office:value-type="float" office:value="NaN">
                <text:p>NaN</text:p>
              </table:table-cell>
              <table:table-cell office:value-type="float" office:value="0.993672382313443">
                <text:p>0.993672382313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0309">
                <text:p>760309</text:p>
              </table:table-cell>
              <table:table-cell office:value-type="float" office:value="NaN">
                <text:p>NaN</text:p>
              </table:table-cell>
              <table:table-cell office:value-type="float" office:value="0.975060491911683">
                <text:p>0.975060491911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2391">
                <text:p>922391</text:p>
              </table:table-cell>
              <table:table-cell office:value-type="float" office:value="NaN">
                <text:p>NaN</text:p>
              </table:table-cell>
              <table:table-cell office:value-type="float" office:value="0.986601202053161">
                <text:p>0.986601202053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3045">
                <text:p>1083045</text:p>
              </table:table-cell>
              <table:table-cell office:value-type="float" office:value="NaN">
                <text:p>NaN</text:p>
              </table:table-cell>
              <table:table-cell office:value-type="float" office:value="0.993784886796143">
                <text:p>0.993784886796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4140">
                <text:p>1244140</text:p>
              </table:table-cell>
              <table:table-cell office:value-type="float" office:value="NaN">
                <text:p>NaN</text:p>
              </table:table-cell>
              <table:table-cell office:value-type="float" office:value="0.999744391002943">
                <text:p>0.999744391002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7530">
                <text:p>1407530</text:p>
              </table:table-cell>
              <table:table-cell office:value-type="float" office:value="NaN">
                <text:p>NaN</text:p>
              </table:table-cell>
              <table:table-cell office:value-type="float" office:value="1.0062139565178">
                <text:p>1.0062139565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2624">
                <text:p>1562624</text:p>
              </table:table-cell>
              <table:table-cell office:value-type="float" office:value="NaN">
                <text:p>NaN</text:p>
              </table:table-cell>
              <table:table-cell office:value-type="float" office:value="1.00622440192673">
                <text:p>1.00622440192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3393">
                <text:p>1713393</text:p>
              </table:table-cell>
              <table:table-cell office:value-type="float" office:value="NaN">
                <text:p>NaN</text:p>
              </table:table-cell>
              <table:table-cell office:value-type="float" office:value="1.00385161043336">
                <text:p>1.00385161043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3206">
                <text:p>1873206</text:p>
              </table:table-cell>
              <table:table-cell office:value-type="float" office:value="NaN">
                <text:p>NaN</text:p>
              </table:table-cell>
              <table:table-cell office:value-type="float" office:value="1.00687154333449">
                <text:p>1.00687154333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9887">
                <text:p>2029887</text:p>
              </table:table-cell>
              <table:table-cell office:value-type="float" office:value="NaN">
                <text:p>NaN</text:p>
              </table:table-cell>
              <table:table-cell office:value-type="float" office:value="1.00800464305897">
                <text:p>1.00800464305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7397">
                <text:p>2197397</text:p>
              </table:table-cell>
              <table:table-cell office:value-type="float" office:value="NaN">
                <text:p>NaN</text:p>
              </table:table-cell>
              <table:table-cell office:value-type="float" office:value="1.01409457388509">
                <text:p>1.01409457388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26943">
                <text:p>2326943</text:p>
              </table:table-cell>
              <table:table-cell office:value-type="float" office:value="NaN">
                <text:p>NaN</text:p>
              </table:table-cell>
              <table:table-cell office:value-type="float" office:value="1.0031274005611">
                <text:p>1.00312740056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3cm" svg:height="10.779cm" xlink:href=".." xlink:type="simple" chart:class="chart:scatter" chart:style-name="ch1">
        <chart:legend chart:legend-position="end" svg:x="16.79cm" svg:y="4.844cm" style:legend-expansion="high" chart:style-name="ch2"/>
        <chart:plot-area chart:style-name="ch3" table:cell-range-address="'Annex D Resolution'.L2:'Annex D Resolution'.N1002 'Annex D Resolution'.M1:'Annex D Resolution'.N1" chart:data-source-has-labels="row" svg:x="0.383cm" svg:y="0.215cm" svg:width="16.024cm" svg:height="10.349cm">
          <chart:coordinate-region svg:x="1.224cm" svg:y="0.413cm" svg:width="14.789cm" svg:height="9.5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nex D Resolution'.M2:'Annex D Resolution'.M1002" chart:label-cell-address="'Annex D Resolution'.M1:'Annex D Resolution'.M1" chart:class="chart:scatter">
            <chart:domain table:cell-range-address="'Annex D Resolution'.L2:'Annex D Resolution'.L1002"/>
            <chart:data-point chart:repeated="1001"/>
          </chart:series>
          <chart:series chart:style-name="ch8" chart:values-cell-range-address="'Annex D Resolution'.N2:'Annex D Resolution'.N1002" chart:label-cell-address="'Annex D Resolution'.N1:'Annex D Resolution'.N1" chart:class="chart:scatte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p.height</text:p>
                <draw:g>
                  <svg:desc>'Annex D Resolution'.M1:'Annex D Resolution'.M1</svg:desc>
                </draw:g>
              </table:table-cell>
              <table:table-cell office:value-type="string">
                <text:p>Average</text:p>
                <draw:g>
                  <svg:desc>'Annex D Resolution'.N1:'Annex D Resolution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nnex D Resolution'.L2:'Annex D Resolution'.L1002</svg:desc>
                </draw:g>
              </table:table-cell>
              <table:table-cell office:value-type="float" office:value="0">
                <text:p>0</text:p>
                <draw:g>
                  <svg:desc>'Annex D Resolution'.M2:'Annex D Resolution'.M1002</svg:desc>
                </draw:g>
              </table:table-cell>
              <table:table-cell office:value-type="float" office:value="0">
                <text:p>0</text:p>
                <draw:g>
                  <svg:desc>'Annex D Resolution'.N2:'Annex D Resolution'.N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0">
                <text:p>140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1">
                <text:p>141</text:p>
              </table:table-cell>
              <table:table-cell office:value-type="float" office:value="106.625">
                <text:p>106.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6">
                <text:p>136</text:p>
              </table:table-cell>
              <table:table-cell office:value-type="float" office:value="119.875">
                <text:p>119.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4">
                <text:p>84</text:p>
              </table:table-cell>
              <table:table-cell office:value-type="float" office:value="114.25">
                <text:p>114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108.25">
                <text:p>108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94.375">
                <text:p>94.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91.625">
                <text:p>91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86.125">
                <text:p>86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7">
                <text:p>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71.125">
                <text:p>71.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.875">
                <text:p>43.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2.125">
                <text:p>42.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3">
                <text:p>33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7">
                <text:p>37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36.375">
                <text:p>36.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4">
                <text:p>3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36.625">
                <text:p>36.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34.125">
                <text:p>34.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8">
                <text:p>38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7">
                <text:p>27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7">
                <text:p>27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7">
                <text:p>37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32.625">
                <text:p>32.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4">
                <text:p>34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  <table:table-cell office:value-type="float" office:value="32.375">
                <text:p>32.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2">
                <text:p>32</text:p>
              </table:table-cell>
              <table:table-cell office:value-type="float" office:value="33.875">
                <text:p>33.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4">
                <text:p>34</text:p>
              </table:table-cell>
              <table:table-cell office:value-type="float" office:value="36.625">
                <text:p>36.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9">
                <text:p>39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4">
                <text:p>44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6">
                <text:p>36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36.625">
                <text:p>36.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5">
                <text:p>3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36.125">
                <text:p>36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8.875">
                <text:p>38.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4">
                <text:p>34</text:p>
              </table:table-cell>
              <table:table-cell office:value-type="float" office:value="40.125">
                <text:p>40.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39.625">
                <text:p>39.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5">
                <text:p>45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5">
                <text:p>45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4">
                <text:p>34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1">
                <text:p>31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3">
                <text:p>3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  <table:table-cell office:value-type="float" office:value="32.875">
                <text:p>32.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3">
                <text:p>23</text:p>
              </table:table-cell>
              <table:table-cell office:value-type="float" office:value="32.625">
                <text:p>32.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7">
                <text:p>37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7">
                <text:p>3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4">
                <text:p>24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9">
                <text:p>29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9">
                <text:p>39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  <table:table-cell office:value-type="float" office:value="31.375">
                <text:p>31.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8">
                <text:p>28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3">
                <text:p>23</text:p>
              </table:table-cell>
              <table:table-cell office:value-type="float" office:value="32.375">
                <text:p>32.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3">
                <text:p>33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1">
                <text:p>31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1">
                <text:p>21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1">
                <text:p>4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2">
                <text:p>32</text:p>
              </table:table-cell>
              <table:table-cell office:value-type="float" office:value="34.125">
                <text:p>34.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3">
                <text:p>33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36.375">
                <text:p>36.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6">
                <text:p>26</text:p>
              </table:table-cell>
              <table:table-cell office:value-type="float" office:value="39.625">
                <text:p>39.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5">
                <text:p>35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6">
                <text:p>46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2">
                <text:p>42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  <table:table-cell office:value-type="float" office:value="43.875">
                <text:p>43.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7">
                <text:p>47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7">
                <text:p>47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4">
                <text:p>4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1">
                <text:p>51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66">
                <text:p>66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64">
                <text:p>64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63">
                <text:p>63</text:p>
              </table:table-cell>
              <table:table-cell office:value-type="float" office:value="69.375">
                <text:p>69.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72.375">
                <text:p>72.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0">
                <text:p>80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77">
                <text:p>77</text:p>
              </table:table-cell>
              <table:table-cell office:value-type="float" office:value="80.875">
                <text:p>80.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4">
                <text:p>84</text:p>
              </table:table-cell>
              <table:table-cell office:value-type="float" office:value="87.25">
                <text:p>87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93.375">
                <text:p>93.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97">
                <text:p>97</text:p>
              </table:table-cell>
              <table:table-cell office:value-type="float" office:value="101.875">
                <text:p>101.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1">
                <text:p>101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4">
                <text:p>114</text:p>
              </table:table-cell>
              <table:table-cell office:value-type="float" office:value="119.125">
                <text:p>119.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48">
                <text:p>148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0">
                <text:p>130</text:p>
              </table:table-cell>
              <table:table-cell office:value-type="float" office:value="156.75">
                <text:p>156.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78">
                <text:p>178</text:p>
              </table:table-cell>
              <table:table-cell office:value-type="float" office:value="182.125">
                <text:p>182.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7">
                <text:p>197</text:p>
              </table:table-cell>
              <table:table-cell office:value-type="float" office:value="196.875">
                <text:p>196.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04">
                <text:p>2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32">
                <text:p>232</text:p>
              </table:table-cell>
              <table:table-cell office:value-type="float" office:value="250.25">
                <text:p>250.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66">
                <text:p>266</text:p>
              </table:table-cell>
              <table:table-cell office:value-type="float" office:value="267.375">
                <text:p>267.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79">
                <text:p>279</text:p>
              </table:table-cell>
              <table:table-cell office:value-type="float" office:value="294.75">
                <text:p>294.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01">
                <text:p>301</text:p>
              </table:table-cell>
              <table:table-cell office:value-type="float" office:value="316.375">
                <text:p>316.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24">
                <text:p>324</text:p>
              </table:table-cell>
              <table:table-cell office:value-type="float" office:value="336.25">
                <text:p>336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34">
                <text:p>334</text:p>
              </table:table-cell>
              <table:table-cell office:value-type="float" office:value="353.75">
                <text:p>353.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18">
                <text:p>418</text:p>
              </table:table-cell>
              <table:table-cell office:value-type="float" office:value="381.625">
                <text:p>381.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77">
                <text:p>377</text:p>
              </table:table-cell>
              <table:table-cell office:value-type="float" office:value="400.375">
                <text:p>400.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91">
                <text:p>391</text:p>
              </table:table-cell>
              <table:table-cell office:value-type="float" office:value="428.125">
                <text:p>428.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06">
                <text:p>406</text:p>
              </table:table-cell>
              <table:table-cell office:value-type="float" office:value="456.25">
                <text:p>456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502">
                <text:p>502</text:p>
              </table:table-cell>
              <table:table-cell office:value-type="float" office:value="475.75">
                <text:p>475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51">
                <text:p>451</text:p>
              </table:table-cell>
              <table:table-cell office:value-type="float" office:value="502.375">
                <text:p>502.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546">
                <text:p>546</text:p>
              </table:table-cell>
              <table:table-cell office:value-type="float" office:value="527.125">
                <text:p>527.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559">
                <text:p>559</text:p>
              </table:table-cell>
              <table:table-cell office:value-type="float" office:value="554.125">
                <text:p>554.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74">
                <text:p>574</text:p>
              </table:table-cell>
              <table:table-cell office:value-type="float" office:value="575.25">
                <text:p>575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590">
                <text:p>590</text:p>
              </table:table-cell>
              <table:table-cell office:value-type="float" office:value="599.875">
                <text:p>599.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589">
                <text:p>589</text:p>
              </table:table-cell>
              <table:table-cell office:value-type="float" office:value="624.5">
                <text:p>624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22">
                <text:p>622</text:p>
              </table:table-cell>
              <table:table-cell office:value-type="float" office:value="643.5">
                <text:p>643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671">
                <text:p>671</text:p>
              </table:table-cell>
              <table:table-cell office:value-type="float" office:value="665.75">
                <text:p>665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648">
                <text:p>648</text:p>
              </table:table-cell>
              <table:table-cell office:value-type="float" office:value="690.625">
                <text:p>690.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743">
                <text:p>743</text:p>
              </table:table-cell>
              <table:table-cell office:value-type="float" office:value="716.25">
                <text:p>716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711">
                <text:p>711</text:p>
              </table:table-cell>
              <table:table-cell office:value-type="float" office:value="736.625">
                <text:p>736.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752">
                <text:p>752</text:p>
              </table:table-cell>
              <table:table-cell office:value-type="float" office:value="746.125">
                <text:p>746.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789">
                <text:p>789</text:p>
              </table:table-cell>
              <table:table-cell office:value-type="float" office:value="762.875">
                <text:p>762.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794">
                <text:p>79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785">
                <text:p>785</text:p>
              </table:table-cell>
              <table:table-cell office:value-type="float" office:value="782.875">
                <text:p>782.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747">
                <text:p>747</text:p>
              </table:table-cell>
              <table:table-cell office:value-type="float" office:value="793.125">
                <text:p>793.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782">
                <text:p>782</text:p>
              </table:table-cell>
              <table:table-cell office:value-type="float" office:value="801.25">
                <text:p>801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824">
                <text:p>824</text:p>
              </table:table-cell>
              <table:table-cell office:value-type="float" office:value="797.75">
                <text:p>797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790">
                <text:p>790</text:p>
              </table:table-cell>
              <table:table-cell office:value-type="float" office:value="804.25">
                <text:p>804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834">
                <text:p>834</text:p>
              </table:table-cell>
              <table:table-cell office:value-type="float" office:value="807.5">
                <text:p>80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854">
                <text:p>854</text:p>
              </table:table-cell>
              <table:table-cell office:value-type="float" office:value="808.125">
                <text:p>808.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766">
                <text:p>766</text:p>
              </table:table-cell>
              <table:table-cell office:value-type="float" office:value="809.75">
                <text:p>809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837">
                <text:p>83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773">
                <text:p>773</text:p>
              </table:table-cell>
              <table:table-cell office:value-type="float" office:value="798.25">
                <text:p>798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787">
                <text:p>787</text:p>
              </table:table-cell>
              <table:table-cell office:value-type="float" office:value="790.875">
                <text:p>790.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837">
                <text:p>837</text:p>
              </table:table-cell>
              <table:table-cell office:value-type="float" office:value="789.25">
                <text:p>789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800">
                <text:p>800</text:p>
              </table:table-cell>
              <table:table-cell office:value-type="float" office:value="776.875">
                <text:p>776.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732">
                <text:p>732</text:p>
              </table:table-cell>
              <table:table-cell office:value-type="float" office:value="769.625">
                <text:p>769.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795">
                <text:p>795</text:p>
              </table:table-cell>
              <table:table-cell office:value-type="float" office:value="760.75">
                <text:p>760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753">
                <text:p>753</text:p>
              </table:table-cell>
              <table:table-cell office:value-type="float" office:value="742.5">
                <text:p>742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738">
                <text:p>738</text:p>
              </table:table-cell>
              <table:table-cell office:value-type="float" office:value="728.875">
                <text:p>728.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715">
                <text:p>715</text:p>
              </table:table-cell>
              <table:table-cell office:value-type="float" office:value="723.625">
                <text:p>723.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716">
                <text:p>716</text:p>
              </table:table-cell>
              <table:table-cell office:value-type="float" office:value="707.25">
                <text:p>707.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691">
                <text:p>691</text:p>
              </table:table-cell>
              <table:table-cell office:value-type="float" office:value="688.125">
                <text:p>688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691">
                <text:p>691</text:p>
              </table:table-cell>
              <table:table-cell office:value-type="float" office:value="670.75">
                <text:p>670.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690">
                <text:p>690</text:p>
              </table:table-cell>
              <table:table-cell office:value-type="float" office:value="659.125">
                <text:p>659.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64">
                <text:p>664</text:p>
              </table:table-cell>
              <table:table-cell office:value-type="float" office:value="635.375">
                <text:p>635.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00">
                <text:p>600</text:p>
              </table:table-cell>
              <table:table-cell office:value-type="float" office:value="615.5">
                <text:p>615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599">
                <text:p>599</text:p>
              </table:table-cell>
              <table:table-cell office:value-type="float" office:value="592.125">
                <text:p>592.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22">
                <text:p>622</text:p>
              </table:table-cell>
              <table:table-cell office:value-type="float" office:value="570.375">
                <text:p>570.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32">
                <text:p>532</text:p>
              </table:table-cell>
              <table:table-cell office:value-type="float" office:value="527.375">
                <text:p>527.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504">
                <text:p>504</text:p>
              </table:table-cell>
              <table:table-cell office:value-type="float" office:value="506.875">
                <text:p>506.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516">
                <text:p>516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451">
                <text:p>451</text:p>
              </table:table-cell>
              <table:table-cell office:value-type="float" office:value="437.625">
                <text:p>437.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435">
                <text:p>435</text:p>
              </table:table-cell>
              <table:table-cell office:value-type="float" office:value="420.125">
                <text:p>420.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409">
                <text:p>40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64">
                <text:p>364</text:p>
              </table:table-cell>
              <table:table-cell office:value-type="float" office:value="379.75">
                <text:p>379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53">
                <text:p>353</text:p>
              </table:table-cell>
              <table:table-cell office:value-type="float" office:value="359.625">
                <text:p>359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64">
                <text:p>364</text:p>
              </table:table-cell>
              <table:table-cell office:value-type="float" office:value="339.625">
                <text:p>339.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39">
                <text:p>339</text:p>
              </table:table-cell>
              <table:table-cell office:value-type="float" office:value="318.375">
                <text:p>318.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23">
                <text:p>323</text:p>
              </table:table-cell>
              <table:table-cell office:value-type="float" office:value="304.875">
                <text:p>304.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90">
                <text:p>290</text:p>
              </table:table-cell>
              <table:table-cell office:value-type="float" office:value="286.75">
                <text:p>286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66.625">
                <text:p>266.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08">
                <text:p>208</text:p>
              </table:table-cell>
              <table:table-cell office:value-type="float" office:value="213.375">
                <text:p>213.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03">
                <text:p>203</text:p>
              </table:table-cell>
              <table:table-cell office:value-type="float" office:value="196.875">
                <text:p>196.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88">
                <text:p>188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75">
                <text:p>175</text:p>
              </table:table-cell>
              <table:table-cell office:value-type="float" office:value="166.25">
                <text:p>166.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63">
                <text:p>163</text:p>
              </table:table-cell>
              <table:table-cell office:value-type="float" office:value="155.625">
                <text:p>155.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43">
                <text:p>143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30">
                <text:p>130</text:p>
              </table:table-cell>
              <table:table-cell office:value-type="float" office:value="134.625">
                <text:p>134.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20">
                <text:p>120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23">
                <text:p>123</text:p>
              </table:table-cell>
              <table:table-cell office:value-type="float" office:value="113.625">
                <text:p>113.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01">
                <text:p>101</text:p>
              </table:table-cell>
              <table:table-cell office:value-type="float" office:value="98.125">
                <text:p>98.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86">
                <text:p>86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4">
                <text:p>84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61">
                <text:p>61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45">
                <text:p>45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61">
                <text:p>6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46">
                <text:p>4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40">
                <text:p>40</text:p>
              </table:table-cell>
              <table:table-cell office:value-type="float" office:value="41.625">
                <text:p>41.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46">
                <text:p>46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9">
                <text:p>29</text:p>
              </table:table-cell>
              <table:table-cell office:value-type="float" office:value="34.125">
                <text:p>34.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9">
                <text:p>29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8">
                <text:p>38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7">
                <text:p>27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8">
                <text:p>18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9">
                <text:p>19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9">
                <text:p>1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8">
                <text:p>18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3">
                <text:p>13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3">
                <text:p>23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3">
                <text:p>13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6">
                <text:p>16</text:p>
              </table:table-cell>
              <table:table-cell office:value-type="float" office:value="13.875">
                <text:p>13.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4">
                <text:p>14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5">
                <text:p>1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8">
                <text:p>8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6">
                <text:p>6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6">
                <text:p>6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1">
                <text:p>11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6">
                <text:p>6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9">
                <text:p>9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6">
                <text:p>6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8">
                <text:p>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5">
                <text:p>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">
                <text:p>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6">
                <text:p>6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6">
                <text:p>6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">
                <text:p>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5">
                <text:p>5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7">
                <text:p>7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7">
                <text:p>7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6">
                <text:p>6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9">
                <text:p>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">
                <text:p>3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4">
                <text:p>4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9">
                <text:p>9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">
                <text:p>3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7">
                <text:p>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6">
                <text:p>6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9">
                <text:p>9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7">
                <text:p>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4">
                <text:p>4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0">
                <text:p>10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4">
                <text:p>4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7">
                <text:p>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5">
                <text:p>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6">
                <text:p>6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4">
                <text:p>4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">
                <text:p>6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9">
                <text:p>9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6">
                <text:p>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7">
                <text:p>7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">
                <text:p>3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7">
                <text:p>7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6">
                <text:p>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">
                <text:p>8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5">
                <text:p>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0">
                <text:p>10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">
                <text:p>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">
                <text:p>3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5">
                <text:p>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">
                <text:p>3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9">
                <text:p>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7">
                <text:p>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7">
                <text:p>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">
                <text:p>6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4">
                <text:p>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4">
                <text:p>4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7">
                <text:p>7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6">
                <text:p>6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5">
                <text:p>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">
                <text:p>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7">
                <text:p>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4">
                <text:p>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5">
                <text:p>5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">
                <text:p>4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">
                <text:p>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">
                <text:p>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