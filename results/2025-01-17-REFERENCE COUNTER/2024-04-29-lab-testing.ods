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ext-properties style:text-overline-style="solid" style:text-overline-width="auto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43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43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3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4" style:family="table-cell" style:parent-style-name="Default" style:data-style-name="N143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43"/>
    <style:style style:name="ce26" style:family="table-cell" style:parent-style-name="Default" style:data-style-name="N11"/>
    <style:style style:name="ce27" style:family="table-cell" style:parent-style-name="Default" style:data-style-name="N1"/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 style:data-style-name="N14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Clause 6.6 - Data'.H20"/>
    </style:style>
    <style:style style:name="ce34" style:family="table-cell" style:parent-style-name="Default" style:data-style-name="N11">
      <style:text-properties fo:font-weight="bold" style:font-weight-asian="bold" style:font-weight-complex="bold"/>
    </style:style>
    <style:style style:name="ce35" style:family="table-cell" style:parent-style-name="Default" style:data-style-name="N186"/>
    <style:style style:name="ce36" style:family="table-cell" style:parent-style-name="Default" style:data-style-name="N186"/>
    <style:style style:name="ce37" style:family="table-cell" style:parent-style-name="Default" style:data-style-name="N186">
      <style:map style:condition="cell-content()&lt;[.J20]" style:apply-style-name="Good" style:base-cell-address="'Clause 6.6 - Data'.K20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MTD large sizes fall-off'.H20"/>
    </style:style>
    <style:style style:name="ce39" style:family="table-cell" style:parent-style-name="Default" style:data-style-name="N186"/>
    <style:style style:name="ce40" style:family="table-cell" style:parent-style-name="Default" style:data-style-name="N186">
      <style:map style:condition="cell-content()&lt;[.J20]" style:apply-style-name="Good" style:base-cell-address="'MTD large sizes fall-off'.K20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500ml bottle'.H20"/>
    </style:style>
    <style:style style:name="ce42" style:family="table-cell" style:parent-style-name="Default" style:data-style-name="N186"/>
    <style:style style:name="ce43" style:family="table-cell" style:parent-style-name="Default" style:data-style-name="N186">
      <style:map style:condition="cell-content()&lt;[.J20]" style:apply-style-name="Good" style:base-cell-address="'500ml bottle'.K20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500 ml bottle'.H20"/>
    </style:style>
    <style:style style:name="ce45" style:family="table-cell" style:parent-style-name="Default" style:data-style-name="N186"/>
    <style:style style:name="ce46" style:family="table-cell" style:parent-style-name="Default" style:data-style-name="N186">
      <style:map style:condition="cell-content()&lt;[.J20]" style:apply-style-name="Good" style:base-cell-address="'500 ml bottle'.K20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100ml bottle'.H20"/>
    </style:style>
    <style:style style:name="ce48" style:family="table-cell" style:parent-style-name="Default" style:data-style-name="N186"/>
    <style:style style:name="ce49" style:family="table-cell" style:parent-style-name="Default" style:data-style-name="N186">
      <style:map style:condition="cell-content()&lt;[.J20]" style:apply-style-name="Good" style:base-cell-address="'100ml bottle'.K20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30D-direct'.H20"/>
    </style:style>
    <style:style style:name="ce51" style:family="table-cell" style:parent-style-name="Default" style:data-style-name="N186"/>
    <style:style style:name="ce52" style:family="table-cell" style:parent-style-name="Default" style:data-style-name="N186">
      <style:map style:condition="cell-content()&lt;[.J20]" style:apply-style-name="Good" style:base-cell-address="'30D-direct'.K2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use 6.6 - Data" table:style-name="ta1">
        <table:shapes>
          <draw:frame draw:z-index="0" draw:style-name="gr1" draw:text-style-name="P1" svg:width="15.999cm" svg:height="8.999cm" svg:x="24.937cm" svg:y="7.882cm">
            <draw:object draw:notify-on-update-of-ranges="'Clause 6.6 - Data'.K18:'Clause 6.6 - Data'.K18 'Clause 6.6 - Data'.K19:'Clause 6.6 - Data'.K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9" table:default-cell-style-name="Default"/>
        <table:table-row table:style-name="ro1">
          <table:table-cell table:style-name="ce1" office:value-type="string" calcext:value-type="string">
            <text:p>Partistan 30D showing fall-off in large sizes counts 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243564" calcext:value-type="float">
            <text:p>7.2</text:p>
          </table:table-cell>
          <table:table-cell table:style-name="ce15" office:value-type="float" office:value="7.619165" calcext:value-type="float">
            <text:p>7.6</text:p>
          </table:table-cell>
          <table:table-cell table:style-name="ce15" office:value-type="float" office:value="7.571263" calcext:value-type="float">
            <text:p>7.6</text:p>
          </table:table-cell>
          <table:table-cell table:style-name="ce15" office:value-type="float" office:value="7.639981" calcext:value-type="float">
            <text:p>7.6</text:p>
          </table:table-cell>
          <table:table-cell table:style-name="ce20" office:value-type="float" office:value="7.64247" calcext:value-type="float">
            <text:p>7.6</text:p>
          </table:table-cell>
          <table:table-cell table:style-name="ce24"/>
          <table:table-cell table:style-name="ce32" table:formula="of:=SUM([.B19:.F19])" office:value-type="float" office:value="37.716443" calcext:value-type="float">
            <text:p>37.7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62662.683594" calcext:value-type="float">
            <text:p>62662.683594</text:p>
          </table:table-cell>
          <table:table-cell table:style-name="ce16" office:value-type="float" office:value="63295.109375" calcext:value-type="float">
            <text:p>63295.109375</text:p>
          </table:table-cell>
          <table:table-cell table:style-name="ce16" office:value-type="float" office:value="62755.734375" calcext:value-type="float">
            <text:p>62755.734375</text:p>
          </table:table-cell>
          <table:table-cell table:style-name="ce16" office:value-type="float" office:value="63497.421875" calcext:value-type="float">
            <text:p>63497.421875</text:p>
          </table:table-cell>
          <table:table-cell table:style-name="ce21"/>
          <table:table-cell table:style-name="ce25" table:formula="of:=SUMPRODUCT(([.B20:.F20]&lt;&gt;&quot;&quot;)*([.B20:.F20]/[.B$19:.F$19]) / SUM([.B20:.F20]&lt;&gt;&quot;&quot;))" office:value-type="float" office:value="8389.50986039134" calcext:value-type="float">
            <text:p>8389.5</text:p>
          </table:table-cell>
          <table:table-cell table:style-name="ce33" table:formula="of:=[.G20]*[.H$19]" office:value-type="float" office:value="316422.470447388" calcext:value-type="float">
            <text:p>316422</text:p>
          </table:table-cell>
          <table:table-cell table:style-name="ce35" table:formula="of:=STDEVP([.B20:.F20])/AVERAGE([.B20:.F20])" office:value-type="percentage" office:value="0.00558952458850041" calcext:value-type="percentage">
            <text:p>0.6%</text:p>
          </table:table-cell>
          <table:table-cell table:style-name="ce36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37" table:formula="of:=(MAX([.B20:.F20])-MIN([.B20:.F20]))/[.H20]*5" office:value-type="percentage" office:value="0.0131902497287845" calcext:value-type="percentage">
            <text:p>1.3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41224" calcext:value-type="float">
            <text:p>41224</text:p>
          </table:table-cell>
          <table:table-cell table:style-name="ce16" office:value-type="float" office:value="41713" calcext:value-type="float">
            <text:p>41713</text:p>
          </table:table-cell>
          <table:table-cell table:style-name="ce16" office:value-type="float" office:value="41524" calcext:value-type="float">
            <text:p>41524</text:p>
          </table:table-cell>
          <table:table-cell table:style-name="ce16" office:value-type="float" office:value="41637" calcext:value-type="float">
            <text:p>41637</text:p>
          </table:table-cell>
          <table:table-cell table:style-name="ce21"/>
          <table:table-cell table:style-name="ce25" table:formula="of:=SUMPRODUCT(([.B21:.F21]&lt;&gt;&quot;&quot;)*([.B21:.F21]/[.B$19:.F$19]) / SUM([.B21:.F21]&lt;&gt;&quot;&quot;))" office:value-type="float" office:value="5525.0431247039" calcext:value-type="float">
            <text:p>5525.0</text:p>
          </table:table-cell>
          <table:table-cell table:style-name="ce33" table:formula="of:=[.G21]*[.H$19]" office:value-type="float" office:value="208384.974085437" calcext:value-type="float">
            <text:p>208385</text:p>
          </table:table-cell>
          <table:table-cell table:style-name="ce35" table:formula="of:=STDEVP([.B21:.F21])/AVERAGE([.B21:.F21])" office:value-type="percentage" office:value="0.00448098233900114" calcext:value-type="percentage">
            <text:p>0.4%</text:p>
          </table:table-cell>
          <table:table-cell table:style-name="ce36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37" table:formula="of:=(MAX([.B21:.F21])-MIN([.B21:.F21]))/[.H21]*5" office:value-type="percentage" office:value="0.0117330916527483" calcext:value-type="percentage">
            <text:p>1.2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28543" calcext:value-type="float">
            <text:p>28543</text:p>
          </table:table-cell>
          <table:table-cell table:style-name="ce16" office:value-type="float" office:value="28996" calcext:value-type="float">
            <text:p>28996</text:p>
          </table:table-cell>
          <table:table-cell table:style-name="ce16" office:value-type="float" office:value="28787" calcext:value-type="float">
            <text:p>28787</text:p>
          </table:table-cell>
          <table:table-cell table:style-name="ce16" office:value-type="float" office:value="28752" calcext:value-type="float">
            <text:p>28752</text:p>
          </table:table-cell>
          <table:table-cell table:style-name="ce21"/>
          <table:table-cell table:style-name="ce25" table:formula="of:=SUMPRODUCT(([.B22:.F22]&lt;&gt;&quot;&quot;)*([.B22:.F22]/[.B$19:.F$19]) / SUM([.B22:.F22]&lt;&gt;&quot;&quot;))" office:value-type="float" office:value="3827.90745599327" calcext:value-type="float">
            <text:p>3827.9</text:p>
          </table:table-cell>
          <table:table-cell table:style-name="ce33" table:formula="of:=[.G22]*[.H$19]" office:value-type="float" office:value="144375.053373245" calcext:value-type="float">
            <text:p>144375</text:p>
          </table:table-cell>
          <table:table-cell table:style-name="ce35" table:formula="of:=STDEVP([.B22:.F22])/AVERAGE([.B22:.F22])" office:value-type="percentage" office:value="0.00558358724237278" calcext:value-type="percentage">
            <text:p>0.6%</text:p>
          </table:table-cell>
          <table:table-cell table:style-name="ce36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37" table:formula="of:=(MAX([.B22:.F22])-MIN([.B22:.F22]))/[.H22]*5" office:value-type="percentage" office:value="0.0156883058885832" calcext:value-type="percentage">
            <text:p>1.6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19196" calcext:value-type="float">
            <text:p>19196</text:p>
          </table:table-cell>
          <table:table-cell table:style-name="ce16" office:value-type="float" office:value="19494" calcext:value-type="float">
            <text:p>19494</text:p>
          </table:table-cell>
          <table:table-cell table:style-name="ce16" office:value-type="float" office:value="19301" calcext:value-type="float">
            <text:p>19301</text:p>
          </table:table-cell>
          <table:table-cell table:style-name="ce16" office:value-type="float" office:value="19159" calcext:value-type="float">
            <text:p>19159</text:p>
          </table:table-cell>
          <table:table-cell table:style-name="ce21"/>
          <table:table-cell table:style-name="ce25" table:formula="of:=SUMPRODUCT(([.B23:.F23]&lt;&gt;&quot;&quot;)*([.B23:.F23]/[.B$19:.F$19]) / SUM([.B23:.F23]&lt;&gt;&quot;&quot;))" office:value-type="float" office:value="2566.39948321214" calcext:value-type="float">
            <text:p>2566.4</text:p>
          </table:table-cell>
          <table:table-cell table:style-name="ce33" table:formula="of:=[.G23]*[.H$19]" office:value-type="float" office:value="96795.4598238002" calcext:value-type="float">
            <text:p>96795</text:p>
          </table:table-cell>
          <table:table-cell table:style-name="ce35" table:formula="of:=STDEVP([.B23:.F23])/AVERAGE([.B23:.F23])" office:value-type="percentage" office:value="0.00674554843694994" calcext:value-type="percentage">
            <text:p>0.7%</text:p>
          </table:table-cell>
          <table:table-cell table:style-name="ce36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37" table:formula="of:=(MAX([.B23:.F23])-MIN([.B23:.F23]))/[.H23]*5" office:value-type="percentage" office:value="0.0173045306365511" calcext:value-type="percentage">
            <text:p>1.7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13133" calcext:value-type="float">
            <text:p>13133</text:p>
          </table:table-cell>
          <table:table-cell table:style-name="ce16" office:value-type="float" office:value="13313" calcext:value-type="float">
            <text:p>13313</text:p>
          </table:table-cell>
          <table:table-cell table:style-name="ce16" office:value-type="float" office:value="13215" calcext:value-type="float">
            <text:p>13215</text:p>
          </table:table-cell>
          <table:table-cell table:style-name="ce16" office:value-type="float" office:value="12963" calcext:value-type="float">
            <text:p>12963</text:p>
          </table:table-cell>
          <table:table-cell table:style-name="ce21"/>
          <table:table-cell table:style-name="ce25" table:formula="of:=SUMPRODUCT(([.B24:.F24]&lt;&gt;&quot;&quot;)*([.B24:.F24]/[.B$19:.F$19]) / SUM([.B24:.F24]&lt;&gt;&quot;&quot;))" office:value-type="float" office:value="1750.6273992549" calcext:value-type="float">
            <text:p>1750.6</text:p>
          </table:table-cell>
          <table:table-cell table:style-name="ce33" table:formula="of:=[.G24]*[.H$19]" office:value-type="float" office:value="66027.4385182355" calcext:value-type="float">
            <text:p>66027</text:p>
          </table:table-cell>
          <table:table-cell table:style-name="ce35" table:formula="of:=STDEVP([.B24:.F24])/AVERAGE([.B24:.F24])" office:value-type="percentage" office:value="0.00975697531068517" calcext:value-type="percentage">
            <text:p>1.0%</text:p>
          </table:table-cell>
          <table:table-cell table:style-name="ce36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37" table:formula="of:=(MAX([.B24:.F24])-MIN([.B24:.F24]))/[.H24]*5" office:value-type="percentage" office:value="0.026504132816188" calcext:value-type="percentage">
            <text:p>2.7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9134" calcext:value-type="float">
            <text:p>9134</text:p>
          </table:table-cell>
          <table:table-cell table:style-name="ce16" office:value-type="float" office:value="9457" calcext:value-type="float">
            <text:p>9457</text:p>
          </table:table-cell>
          <table:table-cell table:style-name="ce16" office:value-type="float" office:value="9338" calcext:value-type="float">
            <text:p>9338</text:p>
          </table:table-cell>
          <table:table-cell table:style-name="ce16" office:value-type="float" office:value="8907" calcext:value-type="float">
            <text:p>8907</text:p>
          </table:table-cell>
          <table:table-cell table:style-name="ce21"/>
          <table:table-cell table:style-name="ce25" table:formula="of:=SUMPRODUCT(([.B25:.F25]&lt;&gt;&quot;&quot;)*([.B25:.F25]/[.B$19:.F$19]) / SUM([.B25:.F25]&lt;&gt;&quot;&quot;))" office:value-type="float" office:value="1225.34548034519" calcext:value-type="float">
            <text:p>1225.3</text:p>
          </table:table-cell>
          <table:table-cell table:style-name="ce33" table:formula="of:=[.G25]*[.H$19]" office:value-type="float" office:value="46215.6729647471" calcext:value-type="float">
            <text:p>46216</text:p>
          </table:table-cell>
          <table:table-cell table:style-name="ce35" table:formula="of:=STDEVP([.B25:.F25])/AVERAGE([.B25:.F25])" office:value-type="percentage" office:value="0.0227114201416473" calcext:value-type="percentage">
            <text:p>2.3%</text:p>
          </table:table-cell>
          <table:table-cell table:style-name="ce36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37" table:formula="of:=(MAX([.B25:.F25])-MIN([.B25:.F25]))/[.H25]*5" office:value-type="percentage" office:value="0.059503623415755" calcext:value-type="percentage">
            <text:p>6.0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6618" calcext:value-type="float">
            <text:p>6618</text:p>
          </table:table-cell>
          <table:table-cell table:style-name="ce16" office:value-type="float" office:value="6882" calcext:value-type="float">
            <text:p>6882</text:p>
          </table:table-cell>
          <table:table-cell table:style-name="ce16" office:value-type="float" office:value="6829" calcext:value-type="float">
            <text:p>6829</text:p>
          </table:table-cell>
          <table:table-cell table:style-name="ce16" office:value-type="float" office:value="6346" calcext:value-type="float">
            <text:p>6346</text:p>
          </table:table-cell>
          <table:table-cell table:style-name="ce21"/>
          <table:table-cell table:style-name="ce25" table:formula="of:=SUMPRODUCT(([.B26:.F26]&lt;&gt;&quot;&quot;)*([.B26:.F26]/[.B$19:.F$19]) / SUM([.B26:.F26]&lt;&gt;&quot;&quot;))" office:value-type="float" office:value="887.370171963762" calcext:value-type="float">
            <text:p>887.4</text:p>
          </table:table-cell>
          <table:table-cell table:style-name="ce33" table:formula="of:=[.G26]*[.H$19]" office:value-type="float" office:value="33468.4465107714" calcext:value-type="float">
            <text:p>33468</text:p>
          </table:table-cell>
          <table:table-cell table:style-name="ce35" table:formula="of:=STDEVP([.B26:.F26])/AVERAGE([.B26:.F26])" office:value-type="percentage" office:value="0.0316236515365166" calcext:value-type="percentage">
            <text:p>3.2%</text:p>
          </table:table-cell>
          <table:table-cell table:style-name="ce36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37" table:formula="of:=(MAX([.B26:.F26])-MIN([.B26:.F26]))/[.H26]*5" office:value-type="percentage" office:value="0.0800754226563063" calcext:value-type="percentage">
            <text:p>8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4979" calcext:value-type="float">
            <text:p>4979</text:p>
          </table:table-cell>
          <table:table-cell table:style-name="ce16" office:value-type="float" office:value="5203" calcext:value-type="float">
            <text:p>5203</text:p>
          </table:table-cell>
          <table:table-cell table:style-name="ce16" office:value-type="float" office:value="5111" calcext:value-type="float">
            <text:p>5111</text:p>
          </table:table-cell>
          <table:table-cell table:style-name="ce16" office:value-type="float" office:value="4703" calcext:value-type="float">
            <text:p>4703</text:p>
          </table:table-cell>
          <table:table-cell table:style-name="ce21"/>
          <table:table-cell table:style-name="ce25" table:formula="of:=SUMPRODUCT(([.B27:.F27]&lt;&gt;&quot;&quot;)*([.B27:.F27]/[.B$19:.F$19]) / SUM([.B27:.F27]&lt;&gt;&quot;&quot;))" office:value-type="float" office:value="665.220497217771" calcext:value-type="float">
            <text:p>665.2</text:p>
          </table:table-cell>
          <table:table-cell table:style-name="ce33" table:formula="of:=[.G27]*[.H$19]" office:value-type="float" office:value="25089.7509657457" calcext:value-type="float">
            <text:p>25090</text:p>
          </table:table-cell>
          <table:table-cell table:style-name="ce35" table:formula="of:=STDEVP([.B27:.F27])/AVERAGE([.B27:.F27])" office:value-type="percentage" office:value="0.0377137756616426" calcext:value-type="percentage">
            <text:p>3.8%</text:p>
          </table:table-cell>
          <table:table-cell table:style-name="ce36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37" table:formula="of:=(MAX([.B27:.F27])-MIN([.B27:.F27]))/[.H27]*5" office:value-type="percentage" office:value="0.0996422803643278" calcext:value-type="percentage">
            <text:p>10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3800" calcext:value-type="float">
            <text:p>3800</text:p>
          </table:table-cell>
          <table:table-cell table:style-name="ce16" office:value-type="float" office:value="4019" calcext:value-type="float">
            <text:p>4019</text:p>
          </table:table-cell>
          <table:table-cell table:style-name="ce16" office:value-type="float" office:value="3917" calcext:value-type="float">
            <text:p>3917</text:p>
          </table:table-cell>
          <table:table-cell table:style-name="ce16" office:value-type="float" office:value="3607" calcext:value-type="float">
            <text:p>3607</text:p>
          </table:table-cell>
          <table:table-cell table:style-name="ce21"/>
          <table:table-cell table:style-name="ce25" table:formula="of:=SUMPRODUCT(([.B28:.F28]&lt;&gt;&quot;&quot;)*([.B28:.F28]/[.B$19:.F$19]) / SUM([.B28:.F28]&lt;&gt;&quot;&quot;))" office:value-type="float" office:value="510.390446693358" calcext:value-type="float">
            <text:p>510.4</text:p>
          </table:table-cell>
          <table:table-cell table:style-name="ce33" table:formula="of:=[.G28]*[.H$19]" office:value-type="float" office:value="19250.1121904546" calcext:value-type="float">
            <text:p>19250</text:p>
          </table:table-cell>
          <table:table-cell table:style-name="ce35" table:formula="of:=STDEVP([.B28:.F28])/AVERAGE([.B28:.F28])" office:value-type="percentage" office:value="0.0399199927610667" calcext:value-type="percentage">
            <text:p>4.0%</text:p>
          </table:table-cell>
          <table:table-cell table:style-name="ce36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37" table:formula="of:=(MAX([.B28:.F28])-MIN([.B28:.F28]))/[.H28]*5" office:value-type="percentage" office:value="0.107012363336847" calcext:value-type="percentage">
            <text:p>10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2966" calcext:value-type="float">
            <text:p>2966</text:p>
          </table:table-cell>
          <table:table-cell table:style-name="ce16" office:value-type="float" office:value="3215" calcext:value-type="float">
            <text:p>3215</text:p>
          </table:table-cell>
          <table:table-cell table:style-name="ce16" office:value-type="float" office:value="3081" calcext:value-type="float">
            <text:p>3081</text:p>
          </table:table-cell>
          <table:table-cell table:style-name="ce16" office:value-type="float" office:value="2841" calcext:value-type="float">
            <text:p>2841</text:p>
          </table:table-cell>
          <table:table-cell table:style-name="ce21"/>
          <table:table-cell table:style-name="ce25" table:formula="of:=SUMPRODUCT(([.B29:.F29]&lt;&gt;&quot;&quot;)*([.B29:.F29]/[.B$19:.F$19]) / SUM([.B29:.F29]&lt;&gt;&quot;&quot;))" office:value-type="float" office:value="402.55554543112" calcext:value-type="float">
            <text:p>402.6</text:p>
          </table:table-cell>
          <table:table-cell table:style-name="ce33" table:formula="of:=[.G29]*[.H$19]" office:value-type="float" office:value="15182.9632835867" calcext:value-type="float">
            <text:p>15183</text:p>
          </table:table-cell>
          <table:table-cell table:style-name="ce35" table:formula="of:=STDEVP([.B29:.F29])/AVERAGE([.B29:.F29])" office:value-type="percentage" office:value="0.0457265475904408" calcext:value-type="percentage">
            <text:p>4.6%</text:p>
          </table:table-cell>
          <table:table-cell table:style-name="ce36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37" table:formula="of:=(MAX([.B29:.F29])-MIN([.B29:.F29]))/[.H29]*5" office:value-type="percentage" office:value="0.123164362916001" calcext:value-type="percentage">
            <text:p>12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2405" calcext:value-type="float">
            <text:p>2405</text:p>
          </table:table-cell>
          <table:table-cell table:style-name="ce16" office:value-type="float" office:value="2610" calcext:value-type="float">
            <text:p>2610</text:p>
          </table:table-cell>
          <table:table-cell table:style-name="ce16" office:value-type="float" office:value="2496" calcext:value-type="float">
            <text:p>2496</text:p>
          </table:table-cell>
          <table:table-cell table:style-name="ce16" office:value-type="float" office:value="2276" calcext:value-type="float">
            <text:p>2276</text:p>
          </table:table-cell>
          <table:table-cell table:style-name="ce21"/>
          <table:table-cell table:style-name="ce25" table:formula="of:=SUMPRODUCT(([.B30:.F30]&lt;&gt;&quot;&quot;)*([.B30:.F30]/[.B$19:.F$19]) / SUM([.B30:.F30]&lt;&gt;&quot;&quot;))" office:value-type="float" office:value="325.537547028925" calcext:value-type="float">
            <text:p>325.5</text:p>
          </table:table-cell>
          <table:table-cell table:style-name="ce33" table:formula="of:=[.G30]*[.H$19]" office:value-type="float" office:value="12278.1183368763" calcext:value-type="float">
            <text:p>12278</text:p>
          </table:table-cell>
          <table:table-cell table:style-name="ce35" table:formula="of:=STDEVP([.B30:.F30])/AVERAGE([.B30:.F30])" office:value-type="percentage" office:value="0.0500454536646421" calcext:value-type="percentage">
            <text:p>5.0%</text:p>
          </table:table-cell>
          <table:table-cell table:style-name="ce36" table:formula="of:=IF([.H30]&gt;[.$A$7]; [.$C$7]; IF([.H30]&gt;[.$A$8]; [.$C$8]; IF([.H30]&gt;[.$A$9];[.$C$9];IF([.H30]&gt;[.$A$10];[.$C$10]; IF([.H30]&gt;[.$A$11];[.$C$11];IF([.H30]&gt;[.$A$12];[.$C$12];[.$C$13]))))))/100" office:value-type="percentage" office:value="0.11" calcext:value-type="percentage">
            <text:p>11.0%</text:p>
          </table:table-cell>
          <table:table-cell table:style-name="ce37" table:formula="of:=(MAX([.B30:.F30])-MIN([.B30:.F30]))/[.H30]*5" office:value-type="percentage" office:value="0.136014326803179" calcext:value-type="percentage">
            <text:p>13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1976" calcext:value-type="float">
            <text:p>1976</text:p>
          </table:table-cell>
          <table:table-cell table:style-name="ce16" office:value-type="float" office:value="2104" calcext:value-type="float">
            <text:p>2104</text:p>
          </table:table-cell>
          <table:table-cell table:style-name="ce16" office:value-type="float" office:value="1982" calcext:value-type="float">
            <text:p>1982</text:p>
          </table:table-cell>
          <table:table-cell table:style-name="ce16" office:value-type="float" office:value="1838" calcext:value-type="float">
            <text:p>1838</text:p>
          </table:table-cell>
          <table:table-cell table:style-name="ce21"/>
          <table:table-cell table:style-name="ce25" table:formula="of:=SUMPRODUCT(([.B31:.F31]&lt;&gt;&quot;&quot;)*([.B31:.F31]/[.B$19:.F$19]) / SUM([.B31:.F31]&lt;&gt;&quot;&quot;))" office:value-type="float" office:value="262.823864871708" calcext:value-type="float">
            <text:p>262.8</text:p>
          </table:table-cell>
          <table:table-cell table:style-name="ce33" table:formula="of:=[.G31]*[.H$19]" office:value-type="float" office:value="9912.78131847349" calcext:value-type="float">
            <text:p>9913</text:p>
          </table:table-cell>
          <table:table-cell table:style-name="ce35" table:formula="of:=STDEVP([.B31:.F31])/AVERAGE([.B31:.F31])" office:value-type="percentage" office:value="0.047672976688026" calcext:value-type="percentage">
            <text:p>4.8%</text:p>
          </table:table-cell>
          <table:table-cell table:style-name="ce36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37" table:formula="of:=(MAX([.B31:.F31])-MIN([.B31:.F31]))/[.H31]*5" office:value-type="percentage" office:value="0.134170214924585" calcext:value-type="percentage">
            <text:p>13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1581" calcext:value-type="float">
            <text:p>1581</text:p>
          </table:table-cell>
          <table:table-cell table:style-name="ce16" office:value-type="float" office:value="1722" calcext:value-type="float">
            <text:p>1722</text:p>
          </table:table-cell>
          <table:table-cell table:style-name="ce16" office:value-type="float" office:value="1576" calcext:value-type="float">
            <text:p>1576</text:p>
          </table:table-cell>
          <table:table-cell table:style-name="ce16" office:value-type="float" office:value="1435" calcext:value-type="float">
            <text:p>1435</text:p>
          </table:table-cell>
          <table:table-cell table:style-name="ce21"/>
          <table:table-cell table:style-name="ce25" table:formula="of:=SUMPRODUCT(([.B32:.F32]&lt;&gt;&quot;&quot;)*([.B32:.F32]/[.B$19:.F$19]) / SUM([.B32:.F32]&lt;&gt;&quot;&quot;))" office:value-type="float" office:value="210.063732054901" calcext:value-type="float">
            <text:p>210.1</text:p>
          </table:table-cell>
          <table:table-cell table:style-name="ce33" table:formula="of:=[.G32]*[.H$19]" office:value-type="float" office:value="7922.85677641596" calcext:value-type="float">
            <text:p>7923</text:p>
          </table:table-cell>
          <table:table-cell table:style-name="ce35" table:formula="of:=STDEVP([.B32:.F32])/AVERAGE([.B32:.F32])" office:value-type="percentage" office:value="0.0642921891662107" calcext:value-type="percentage">
            <text:p>6.4%</text:p>
          </table:table-cell>
          <table:table-cell table:style-name="ce36" table:formula="of:=IF([.H32]&gt;[.$A$7]; [.$C$7]; IF([.H32]&gt;[.$A$8]; [.$C$8]; IF([.H32]&gt;[.$A$9];[.$C$9];IF([.H32]&gt;[.$A$10];[.$C$10]; IF([.H32]&gt;[.$A$11];[.$C$11];IF([.H32]&gt;[.$A$12];[.$C$12];[.$C$13]))))))/100" office:value-type="percentage" office:value="0.113" calcext:value-type="percentage">
            <text:p>11.3%</text:p>
          </table:table-cell>
          <table:table-cell table:style-name="ce37" table:formula="of:=(MAX([.B32:.F32])-MIN([.B32:.F32]))/[.H32]*5" office:value-type="percentage" office:value="0.181121537407009" calcext:value-type="percentage">
            <text:p>18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1281" calcext:value-type="float">
            <text:p>1281</text:p>
          </table:table-cell>
          <table:table-cell table:style-name="ce16" office:value-type="float" office:value="1396" calcext:value-type="float">
            <text:p>1396</text:p>
          </table:table-cell>
          <table:table-cell table:style-name="ce16" office:value-type="float" office:value="1279" calcext:value-type="float">
            <text:p>1279</text:p>
          </table:table-cell>
          <table:table-cell table:style-name="ce16" office:value-type="float" office:value="1152" calcext:value-type="float">
            <text:p>1152</text:p>
          </table:table-cell>
          <table:table-cell table:style-name="ce21"/>
          <table:table-cell table:style-name="ce25" table:formula="of:=SUMPRODUCT(([.B33:.F33]&lt;&gt;&quot;&quot;)*([.B33:.F33]/[.B$19:.F$19]) / SUM([.B33:.F33]&lt;&gt;&quot;&quot;))" office:value-type="float" office:value="169.945690289648" calcext:value-type="float">
            <text:p>169.9</text:p>
          </table:table-cell>
          <table:table-cell table:style-name="ce33" table:formula="of:=[.G33]*[.H$19]" office:value-type="float" office:value="6409.74694090516" calcext:value-type="float">
            <text:p>6410</text:p>
          </table:table-cell>
          <table:table-cell table:style-name="ce35" table:formula="of:=STDEVP([.B33:.F33])/AVERAGE([.B33:.F33])" office:value-type="percentage" office:value="0.0675975499902276" calcext:value-type="percentage">
            <text:p>6.8%</text:p>
          </table:table-cell>
          <table:table-cell table:style-name="ce36" table:formula="of:=IF([.H33]&gt;[.$A$7]; [.$C$7]; IF([.H33]&gt;[.$A$8]; [.$C$8]; IF([.H33]&gt;[.$A$9];[.$C$9];IF([.H33]&gt;[.$A$10];[.$C$10]; IF([.H33]&gt;[.$A$11];[.$C$11];IF([.H33]&gt;[.$A$12];[.$C$12];[.$C$13]))))))/100" office:value-type="percentage" office:value="0.113" calcext:value-type="percentage">
            <text:p>11.3%</text:p>
          </table:table-cell>
          <table:table-cell table:style-name="ce37" table:formula="of:=(MAX([.B33:.F33])-MIN([.B33:.F33]))/[.H33]*5" office:value-type="percentage" office:value="0.190335127306557" calcext:value-type="percentage">
            <text:p>19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1064" calcext:value-type="float">
            <text:p>1064</text:p>
          </table:table-cell>
          <table:table-cell table:style-name="ce16" office:value-type="float" office:value="1142" calcext:value-type="float">
            <text:p>1142</text:p>
          </table:table-cell>
          <table:table-cell table:style-name="ce16" office:value-type="float" office:value="1039" calcext:value-type="float">
            <text:p>1039</text:p>
          </table:table-cell>
          <table:table-cell table:style-name="ce16" office:value-type="float" office:value="946" calcext:value-type="float">
            <text:p>946</text:p>
          </table:table-cell>
          <table:table-cell table:style-name="ce21"/>
          <table:table-cell table:style-name="ce25" table:formula="of:=SUMPRODUCT(([.B34:.F34]&lt;&gt;&quot;&quot;)*([.B34:.F34]/[.B$19:.F$19]) / SUM([.B34:.F34]&lt;&gt;&quot;&quot;))" office:value-type="float" office:value="139.456480482037" calcext:value-type="float">
            <text:p>139.5</text:p>
          </table:table-cell>
          <table:table-cell table:style-name="ce33" table:formula="of:=[.G34]*[.H$19]" office:value-type="float" office:value="5259.80239708138" calcext:value-type="float">
            <text:p>5260</text:p>
          </table:table-cell>
          <table:table-cell table:style-name="ce35" table:formula="of:=STDEVP([.B34:.F34])/AVERAGE([.B34:.F34])" office:value-type="percentage" office:value="0.0667701931025286" calcext:value-type="percentage">
            <text:p>6.7%</text:p>
          </table:table-cell>
          <table:table-cell table:style-name="ce36" table:formula="of:=IF([.H34]&gt;[.$A$7]; [.$C$7]; IF([.H34]&gt;[.$A$8]; [.$C$8]; IF([.H34]&gt;[.$A$9];[.$C$9];IF([.H34]&gt;[.$A$10];[.$C$10]; IF([.H34]&gt;[.$A$11];[.$C$11];IF([.H34]&gt;[.$A$12];[.$C$12];[.$C$13]))))))/100" office:value-type="percentage" office:value="0.113" calcext:value-type="percentage">
            <text:p>11.3%</text:p>
          </table:table-cell>
          <table:table-cell table:style-name="ce37" table:formula="of:=(MAX([.B34:.F34])-MIN([.B34:.F34]))/[.H34]*5" office:value-type="percentage" office:value="0.186318786527759" calcext:value-type="percentage">
            <text:p>18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 office:value-type="float" office:value="874" calcext:value-type="float">
            <text:p>874</text:p>
          </table:table-cell>
          <table:table-cell table:style-name="ce16" office:value-type="float" office:value="939" calcext:value-type="float">
            <text:p>939</text:p>
          </table:table-cell>
          <table:table-cell table:style-name="ce16" office:value-type="float" office:value="858" calcext:value-type="float">
            <text:p>858</text:p>
          </table:table-cell>
          <table:table-cell table:style-name="ce16" office:value-type="float" office:value="745" calcext:value-type="float">
            <text:p>745</text:p>
          </table:table-cell>
          <table:table-cell table:style-name="ce21"/>
          <table:table-cell table:style-name="ce25" table:formula="of:=SUMPRODUCT(([.B35:.F35]&lt;&gt;&quot;&quot;)*([.B35:.F35]/[.B$19:.F$19]) / SUM([.B35:.F35]&lt;&gt;&quot;&quot;))" office:value-type="float" office:value="113.684312894335" calcext:value-type="float">
            <text:p>113.7</text:p>
          </table:table-cell>
          <table:table-cell table:style-name="ce33" table:formula="of:=[.G35]*[.H$19]" office:value-type="float" office:value="4287.76790727333" calcext:value-type="float">
            <text:p>4288</text:p>
          </table:table-cell>
          <table:table-cell table:style-name="ce35" table:formula="of:=STDEVP([.B35:.F35])/AVERAGE([.B35:.F35])" office:value-type="percentage" office:value="0.0818039524990838" calcext:value-type="percentage">
            <text:p>8.2%</text:p>
          </table:table-cell>
          <table:table-cell table:style-name="ce36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37" table:formula="of:=(MAX([.B35:.F35])-MIN([.B35:.F35]))/[.H35]*5" office:value-type="percentage" office:value="0.226224931240936" calcext:value-type="percentage">
            <text:p>22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737" calcext:value-type="float">
            <text:p>737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686" calcext:value-type="float">
            <text:p>686</text:p>
          </table:table-cell>
          <table:table-cell table:style-name="ce16" office:value-type="float" office:value="589" calcext:value-type="float">
            <text:p>589</text:p>
          </table:table-cell>
          <table:table-cell table:style-name="ce21"/>
          <table:table-cell table:style-name="ce25" table:formula="of:=SUMPRODUCT(([.B36:.F36]&lt;&gt;&quot;&quot;)*([.B36:.F36]/[.B$19:.F$19]) / SUM([.B36:.F36]&lt;&gt;&quot;&quot;))" office:value-type="float" office:value="92.462596248624" calcext:value-type="float">
            <text:p>92.5</text:p>
          </table:table-cell>
          <table:table-cell table:style-name="ce33" table:formula="of:=[.G36]*[.H$19]" office:value-type="float" office:value="3487.36024104324" calcext:value-type="float">
            <text:p>3487</text:p>
          </table:table-cell>
          <table:table-cell table:style-name="ce35" table:formula="of:=STDEVP([.B36:.F36])/AVERAGE([.B36:.F36])" office:value-type="percentage" office:value="0.0965681391348407" calcext:value-type="percentage">
            <text:p>9.7%</text:p>
          </table:table-cell>
          <table:table-cell table:style-name="ce36" table:formula="of:=IF([.H36]&gt;[.$A$7]; [.$C$7]; IF([.H36]&gt;[.$A$8]; [.$C$8]; IF([.H36]&gt;[.$A$9];[.$C$9];IF([.H36]&gt;[.$A$10];[.$C$10]; IF([.H36]&gt;[.$A$11];[.$C$11];IF([.H36]&gt;[.$A$12];[.$C$12];[.$C$13]))))))/100" office:value-type="percentage" office:value="0.119" calcext:value-type="percentage">
            <text:p>11.9%</text:p>
          </table:table-cell>
          <table:table-cell table:style-name="ce37" table:formula="of:=(MAX([.B36:.F36])-MIN([.B36:.F36]))/[.H36]*5" office:value-type="percentage" office:value="0.25233986143535" calcext:value-type="percentage">
            <text:p>25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613" calcext:value-type="float">
            <text:p>613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578" calcext:value-type="float">
            <text:p>578</text:p>
          </table:table-cell>
          <table:table-cell table:style-name="ce16" office:value-type="float" office:value="482" calcext:value-type="float">
            <text:p>482</text:p>
          </table:table-cell>
          <table:table-cell table:style-name="ce21"/>
          <table:table-cell table:style-name="ce25" table:formula="of:=SUMPRODUCT(([.B37:.F37]&lt;&gt;&quot;&quot;)*([.B37:.F37]/[.B$19:.F$19]) / SUM([.B37:.F37]&lt;&gt;&quot;&quot;))" office:value-type="float" office:value="77.0468143769113" calcext:value-type="float">
            <text:p>77.0</text:p>
          </table:table-cell>
          <table:table-cell table:style-name="ce33" table:formula="of:=[.G37]*[.H$19]" office:value-type="float" office:value="2905.93178277836" calcext:value-type="float">
            <text:p>2906</text:p>
          </table:table-cell>
          <table:table-cell table:style-name="ce35" table:formula="of:=STDEVP([.B37:.F37])/AVERAGE([.B37:.F37])" office:value-type="percentage" office:value="0.103748914557005" calcext:value-type="percentage">
            <text:p>10.4%</text:p>
          </table:table-cell>
          <table:table-cell table:style-name="ce36" table:formula="of:=IF([.H37]&gt;[.$A$7]; [.$C$7]; IF([.H37]&gt;[.$A$8]; [.$C$8]; IF([.H37]&gt;[.$A$9];[.$C$9];IF([.H37]&gt;[.$A$10];[.$C$10]; IF([.H37]&gt;[.$A$11];[.$C$11];IF([.H37]&gt;[.$A$12];[.$C$12];[.$C$13]))))))/100" office:value-type="percentage" office:value="0.119" calcext:value-type="percentage">
            <text:p>11.9%</text:p>
          </table:table-cell>
          <table:table-cell table:style-name="ce37" table:formula="of:=(MAX([.B37:.F37])-MIN([.B37:.F37]))/[.H37]*5" office:value-type="percentage" office:value="0.273578342310535" calcext:value-type="percentage">
            <text:p>27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522" calcext:value-type="float">
            <text:p>522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91" calcext:value-type="float">
            <text:p>391</text:p>
          </table:table-cell>
          <table:table-cell table:style-name="ce21"/>
          <table:table-cell table:style-name="ce25" table:formula="of:=SUMPRODUCT(([.B38:.F38]&lt;&gt;&quot;&quot;)*([.B38:.F38]/[.B$19:.F$19]) / SUM([.B38:.F38]&lt;&gt;&quot;&quot;))" office:value-type="float" office:value="63.886227973417" calcext:value-type="float">
            <text:p>63.9</text:p>
          </table:table-cell>
          <table:table-cell table:style-name="ce33" table:formula="of:=[.G38]*[.H$19]" office:value-type="float" office:value="2409.56127584439" calcext:value-type="float">
            <text:p>2410</text:p>
          </table:table-cell>
          <table:table-cell table:style-name="ce35" table:formula="of:=STDEVP([.B38:.F38])/AVERAGE([.B38:.F38])" office:value-type="percentage" office:value="0.112834340752063" calcext:value-type="percentage">
            <text:p>11.3%</text:p>
          </table:table-cell>
          <table:table-cell table:style-name="ce36" table:formula="of:=IF([.H38]&gt;[.$A$7]; [.$C$7]; IF([.H38]&gt;[.$A$8]; [.$C$8]; IF([.H38]&gt;[.$A$9];[.$C$9];IF([.H38]&gt;[.$A$10];[.$C$10]; IF([.H38]&gt;[.$A$11];[.$C$11];IF([.H38]&gt;[.$A$12];[.$C$12];[.$C$13]))))))/100" office:value-type="percentage" office:value="0.119" calcext:value-type="percentage">
            <text:p>11.9%</text:p>
          </table:table-cell>
          <table:table-cell table:style-name="ce37" table:formula="of:=(MAX([.B38:.F38])-MIN([.B38:.F38]))/[.H38]*5" office:value-type="percentage" office:value="0.278058917495348" calcext:value-type="percentage">
            <text:p>27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435" calcext:value-type="float">
            <text:p>435</text:p>
          </table:table-cell>
          <table:table-cell table:style-name="ce16" office:value-type="float" office:value="438" calcext:value-type="float">
            <text:p>438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330" calcext:value-type="float">
            <text:p>330</text:p>
          </table:table-cell>
          <table:table-cell table:style-name="ce21"/>
          <table:table-cell table:style-name="ce25" table:formula="of:=SUMPRODUCT(([.B39:.F39]&lt;&gt;&quot;&quot;)*([.B39:.F39]/[.B$19:.F$19]) / SUM([.B39:.F39]&lt;&gt;&quot;&quot;))" office:value-type="float" office:value="53.6224105820002" calcext:value-type="float">
            <text:p>53.6</text:p>
          </table:table-cell>
          <table:table-cell table:style-name="ce33" table:formula="of:=[.G39]*[.H$19]" office:value-type="float" office:value="2022.44659223861" calcext:value-type="float">
            <text:p>2022</text:p>
          </table:table-cell>
          <table:table-cell table:style-name="ce35" table:formula="of:=STDEVP([.B39:.F39])/AVERAGE([.B39:.F39])" office:value-type="percentage" office:value="0.108245741451649" calcext:value-type="percentage">
            <text:p>10.8%</text:p>
          </table:table-cell>
          <table:table-cell table:style-name="ce36" table:formula="of:=IF([.H39]&gt;[.$A$7]; [.$C$7]; IF([.H39]&gt;[.$A$8]; [.$C$8]; IF([.H39]&gt;[.$A$9];[.$C$9];IF([.H39]&gt;[.$A$10];[.$C$10]; IF([.H39]&gt;[.$A$11];[.$C$11];IF([.H39]&gt;[.$A$12];[.$C$12];[.$C$13]))))))/100" office:value-type="percentage" office:value="0.119" calcext:value-type="percentage">
            <text:p>11.9%</text:p>
          </table:table-cell>
          <table:table-cell table:style-name="ce37" table:formula="of:=(MAX([.B39:.F39])-MIN([.B39:.F39]))/[.H39]*5" office:value-type="percentage" office:value="0.267003342423141" calcext:value-type="percentage">
            <text:p>26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4</text:p>
          </table:table-cell>
          <table:table-cell table:style-name="ce13" office:value-type="float" office:value="351" calcext:value-type="float">
            <text:p>351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57" calcext:value-type="float">
            <text:p>257</text:p>
          </table:table-cell>
          <table:table-cell table:style-name="ce21"/>
          <table:table-cell table:style-name="ce25" table:formula="of:=SUMPRODUCT(([.B40:.F40]&lt;&gt;&quot;&quot;)*([.B40:.F40]/[.B$19:.F$19]) / SUM([.B40:.F40]&lt;&gt;&quot;&quot;))" office:value-type="float" office:value="43.7597597052858" calcext:value-type="float">
            <text:p>43.8</text:p>
          </table:table-cell>
          <table:table-cell table:style-name="ce33" table:formula="of:=[.G40]*[.H$19]" office:value-type="float" office:value="1650.46248261811" calcext:value-type="float">
            <text:p>1650</text:p>
          </table:table-cell>
          <table:table-cell table:style-name="ce35" table:formula="of:=STDEVP([.B40:.F40])/AVERAGE([.B40:.F40])" office:value-type="percentage" office:value="0.12876568396992" calcext:value-type="percentage">
            <text:p>12.9%</text:p>
          </table:table-cell>
          <table:table-cell table:style-name="ce36" table:formula="of:=IF([.H40]&gt;[.$A$7]; [.$C$7]; IF([.H40]&gt;[.$A$8]; [.$C$8]; IF([.H40]&gt;[.$A$9];[.$C$9];IF([.H40]&gt;[.$A$10];[.$C$10]; IF([.H40]&gt;[.$A$11];[.$C$11];IF([.H40]&gt;[.$A$12];[.$C$12];[.$C$13]))))))/100" office:value-type="percentage" office:value="0.134" calcext:value-type="percentage">
            <text:p>13.4%</text:p>
          </table:table-cell>
          <table:table-cell table:style-name="ce37" table:formula="of:=(MAX([.B40:.F40])-MIN([.B40:.F40]))/[.H40]*5" office:value-type="percentage" office:value="0.330210474784906" calcext:value-type="percentage">
            <text:p>33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 office:value-type="float" office:value="295" calcext:value-type="float">
            <text:p>295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05" calcext:value-type="float">
            <text:p>205</text:p>
          </table:table-cell>
          <table:table-cell table:style-name="ce21"/>
          <table:table-cell table:style-name="ce25" table:formula="of:=SUMPRODUCT(([.B41:.F41]&lt;&gt;&quot;&quot;)*([.B41:.F41]/[.B$19:.F$19]) / SUM([.B41:.F41]&lt;&gt;&quot;&quot;))" office:value-type="float" office:value="35.8139847662168" calcext:value-type="float">
            <text:p>35.8</text:p>
          </table:table-cell>
          <table:table-cell table:style-name="ce33" table:formula="of:=[.G41]*[.H$19]" office:value-type="float" office:value="1350.77611503789" calcext:value-type="float">
            <text:p>1351</text:p>
          </table:table-cell>
          <table:table-cell table:style-name="ce35" table:formula="of:=STDEVP([.B41:.F41])/AVERAGE([.B41:.F41])" office:value-type="percentage" office:value="0.140175274659063" calcext:value-type="percentage">
            <text:p>14.0%</text:p>
          </table:table-cell>
          <table:table-cell table:style-name="ce36" table:formula="of:=IF([.H41]&gt;[.$A$7]; [.$C$7]; IF([.H41]&gt;[.$A$8]; [.$C$8]; IF([.H41]&gt;[.$A$9];[.$C$9];IF([.H41]&gt;[.$A$10];[.$C$10]; IF([.H41]&gt;[.$A$11];[.$C$11];IF([.H41]&gt;[.$A$12];[.$C$12];[.$C$13]))))))/100" office:value-type="percentage" office:value="0.134" calcext:value-type="percentage">
            <text:p>13.4%</text:p>
          </table:table-cell>
          <table:table-cell table:style-name="ce37" table:formula="of:=(MAX([.B41:.F41])-MIN([.B41:.F41]))/[.H41]*5" office:value-type="percentage" office:value="0.344246537100605" calcext:value-type="percentage">
            <text:p>34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 office:value-type="float" office:value="236" calcext:value-type="float">
            <text:p>236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160" calcext:value-type="float">
            <text:p>160</text:p>
          </table:table-cell>
          <table:table-cell table:style-name="ce21"/>
          <table:table-cell table:style-name="ce25" table:formula="of:=SUMPRODUCT(([.B42:.F42]&lt;&gt;&quot;&quot;)*([.B42:.F42]/[.B$19:.F$19]) / SUM([.B42:.F42]&lt;&gt;&quot;&quot;))" office:value-type="float" office:value="28.9816167557073" calcext:value-type="float">
            <text:p>29.0</text:p>
          </table:table-cell>
          <table:table-cell table:style-name="ce33" table:formula="of:=[.G42]*[.H$19]" office:value-type="float" office:value="1093.08349641448" calcext:value-type="float">
            <text:p>1093</text:p>
          </table:table-cell>
          <table:table-cell table:style-name="ce35" table:formula="of:=STDEVP([.B42:.F42])/AVERAGE([.B42:.F42])" office:value-type="percentage" office:value="0.153885682493605" calcext:value-type="percentage">
            <text:p>15.4%</text:p>
          </table:table-cell>
          <table:table-cell table:style-name="ce36" table:formula="of:=IF([.H42]&gt;[.$A$7]; [.$C$7]; IF([.H42]&gt;[.$A$8]; [.$C$8]; IF([.H42]&gt;[.$A$9];[.$C$9];IF([.H42]&gt;[.$A$10];[.$C$10]; IF([.H42]&gt;[.$A$11];[.$C$11];IF([.H42]&gt;[.$A$12];[.$C$12];[.$C$13]))))))/100" office:value-type="percentage" office:value="0.134" calcext:value-type="percentage">
            <text:p>13.4%</text:p>
          </table:table-cell>
          <table:table-cell table:style-name="ce37" table:formula="of:=(MAX([.B42:.F42])-MIN([.B42:.F42]))/[.H42]*5" office:value-type="percentage" office:value="0.379659926585003" calcext:value-type="percentage">
            <text:p>38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202" calcext:value-type="float">
            <text:p>202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26" calcext:value-type="float">
            <text:p>126</text:p>
          </table:table-cell>
          <table:table-cell table:style-name="ce21"/>
          <table:table-cell table:style-name="ce25" table:formula="of:=SUMPRODUCT(([.B43:.F43]&lt;&gt;&quot;&quot;)*([.B43:.F43]/[.B$19:.F$19]) / SUM([.B43:.F43]&lt;&gt;&quot;&quot;))" office:value-type="float" office:value="23.6002630021459" calcext:value-type="float">
            <text:p>23.6</text:p>
          </table:table-cell>
          <table:table-cell table:style-name="ce33" table:formula="of:=[.G43]*[.H$19]" office:value-type="float" office:value="890.117974305446" calcext:value-type="float">
            <text:p>890</text:p>
          </table:table-cell>
          <table:table-cell table:style-name="ce35" table:formula="of:=STDEVP([.B43:.F43])/AVERAGE([.B43:.F43])" office:value-type="percentage" office:value="0.175323397165908" calcext:value-type="percentage">
            <text:p>17.5%</text:p>
          </table:table-cell>
          <table:table-cell table:style-name="ce36" table:formula="of:=IF([.H43]&gt;[.$A$7]; [.$C$7]; IF([.H43]&gt;[.$A$8]; [.$C$8]; IF([.H43]&gt;[.$A$9];[.$C$9];IF([.H43]&gt;[.$A$10];[.$C$10]; IF([.H43]&gt;[.$A$11];[.$C$11];IF([.H43]&gt;[.$A$12];[.$C$12];[.$C$13]))))))/100" office:value-type="percentage" office:value="0.156" calcext:value-type="percentage">
            <text:p>15.6%</text:p>
          </table:table-cell>
          <table:table-cell table:style-name="ce37" table:formula="of:=(MAX([.B43:.F43])-MIN([.B43:.F43]))/[.H43]*5" office:value-type="percentage" office:value="0.426909702948659" calcext:value-type="percentage">
            <text:p>42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8</text:p>
          </table:table-cell>
          <table:table-cell table:style-name="ce13" office:value-type="float" office:value="169" calcext:value-type="float">
            <text:p>169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96" calcext:value-type="float">
            <text:p>96</text:p>
          </table:table-cell>
          <table:table-cell table:style-name="ce21"/>
          <table:table-cell table:style-name="ce25" table:formula="of:=SUMPRODUCT(([.B44:.F44]&lt;&gt;&quot;&quot;)*([.B44:.F44]/[.B$19:.F$19]) / SUM([.B44:.F44]&lt;&gt;&quot;&quot;))" office:value-type="float" office:value="19.0108548513269" calcext:value-type="float">
            <text:p>19.0</text:p>
          </table:table-cell>
          <table:table-cell table:style-name="ce33" table:formula="of:=[.G44]*[.H$19]" office:value-type="float" office:value="717.021823381343" calcext:value-type="float">
            <text:p>717</text:p>
          </table:table-cell>
          <table:table-cell table:style-name="ce35" table:formula="of:=STDEVP([.B44:.F44])/AVERAGE([.B44:.F44])" office:value-type="percentage" office:value="0.203901617203756" calcext:value-type="percentage">
            <text:p>20.4%</text:p>
          </table:table-cell>
          <table:table-cell table:style-name="ce36" table:formula="of:=IF([.H44]&gt;[.$A$7]; [.$C$7]; IF([.H44]&gt;[.$A$8]; [.$C$8]; IF([.H44]&gt;[.$A$9];[.$C$9];IF([.H44]&gt;[.$A$10];[.$C$10]; IF([.H44]&gt;[.$A$11];[.$C$11];IF([.H44]&gt;[.$A$12];[.$C$12];[.$C$13]))))))/100" office:value-type="percentage" office:value="0.156" calcext:value-type="percentage">
            <text:p>15.6%</text:p>
          </table:table-cell>
          <table:table-cell table:style-name="ce37" table:formula="of:=(MAX([.B44:.F44])-MIN([.B44:.F44]))/[.H44]*5" office:value-type="percentage" office:value="0.509050056912811" calcext:value-type="percentage">
            <text:p>50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135" calcext:value-type="float">
            <text:p>135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79" calcext:value-type="float">
            <text:p>79</text:p>
          </table:table-cell>
          <table:table-cell table:style-name="ce21"/>
          <table:table-cell table:style-name="ce25" table:formula="of:=SUMPRODUCT(([.B45:.F45]&lt;&gt;&quot;&quot;)*([.B45:.F45]/[.B$19:.F$19]) / SUM([.B45:.F45]&lt;&gt;&quot;&quot;))" office:value-type="float" office:value="15.6035516184259" calcext:value-type="float">
            <text:p>15.6</text:p>
          </table:table-cell>
          <table:table-cell table:style-name="ce33" table:formula="of:=[.G45]*[.H$19]" office:value-type="float" office:value="588.510465213918" calcext:value-type="float">
            <text:p>589</text:p>
          </table:table-cell>
          <table:table-cell table:style-name="ce35" table:formula="of:=STDEVP([.B45:.F45])/AVERAGE([.B45:.F45])" office:value-type="percentage" office:value="0.194244755168607" calcext:value-type="percentage">
            <text:p>19.4%</text:p>
          </table:table-cell>
          <table:table-cell table:style-name="ce36" table:formula="of:=IF([.H45]&gt;[.$A$7]; [.$C$7]; IF([.H45]&gt;[.$A$8]; [.$C$8]; IF([.H45]&gt;[.$A$9];[.$C$9];IF([.H45]&gt;[.$A$10];[.$C$10]; IF([.H45]&gt;[.$A$11];[.$C$11];IF([.H45]&gt;[.$A$12];[.$C$12];[.$C$13]))))))/100" office:value-type="percentage" office:value="0.156" calcext:value-type="percentage">
            <text:p>15.6%</text:p>
          </table:table-cell>
          <table:table-cell table:style-name="ce37" table:formula="of:=(MAX([.B45:.F45])-MIN([.B45:.F45]))/[.H45]*5" office:value-type="percentage" office:value="0.475777435662461" calcext:value-type="percentage">
            <text:p>47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120" calcext:value-type="float">
            <text:p>120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68" calcext:value-type="float">
            <text:p>68</text:p>
          </table:table-cell>
          <table:table-cell table:style-name="ce21"/>
          <table:table-cell table:style-name="ce25" table:formula="of:=SUMPRODUCT(([.B46:.F46]&lt;&gt;&quot;&quot;)*([.B46:.F46]/[.B$19:.F$19]) / SUM([.B46:.F46]&lt;&gt;&quot;&quot;))" office:value-type="float" office:value="13.4767627831682" calcext:value-type="float">
            <text:p>13.5</text:p>
          </table:table-cell>
          <table:table-cell table:style-name="ce33" table:formula="of:=[.G46]*[.H$19]" office:value-type="float" office:value="508.295555335884" calcext:value-type="float">
            <text:p>508</text:p>
          </table:table-cell>
          <table:table-cell table:style-name="ce35" table:formula="of:=STDEVP([.B46:.F46])/AVERAGE([.B46:.F46])" office:value-type="percentage" office:value="0.194901185000292" calcext:value-type="percentage">
            <text:p>19.5%</text:p>
          </table:table-cell>
          <table:table-cell table:style-name="ce36" table:formula="of:=IF([.H46]&gt;[.$A$7]; [.$C$7]; IF([.H46]&gt;[.$A$8]; [.$C$8]; IF([.H46]&gt;[.$A$9];[.$C$9];IF([.H46]&gt;[.$A$10];[.$C$10]; IF([.H46]&gt;[.$A$11];[.$C$11];IF([.H46]&gt;[.$A$12];[.$C$12];[.$C$13]))))))/100" office:value-type="percentage" office:value="0.156" calcext:value-type="percentage">
            <text:p>15.6%</text:p>
          </table:table-cell>
          <table:table-cell table:style-name="ce37" table:formula="of:=(MAX([.B46:.F46])-MIN([.B46:.F46]))/[.H46]*5" office:value-type="percentage" office:value="0.511513424169509" calcext:value-type="percentage">
            <text:p>51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35" calcext:value-type="float">
            <text:p>35</text:p>
          </table:table-cell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21"/>
          <table:table-cell table:style-name="ce25" table:formula="of:=SUMPRODUCT(([.B47:.F47]&lt;&gt;&quot;&quot;)*([.B47:.F47]/[.B$19:.F$19]) / SUM([.B47:.F47]&lt;&gt;&quot;&quot;))" office:value-type="float" office:value="4.72222392732495" calcext:value-type="float">
            <text:p>4.7</text:p>
          </table:table-cell>
          <table:table-cell table:style-name="ce33" table:formula="of:=[.G47]*[.H$19]" office:value-type="float" office:value="178.105489588187" calcext:value-type="float">
            <text:p>178</text:p>
          </table:table-cell>
          <table:table-cell table:style-name="ce35" table:formula="of:=STDEVP([.B47:.F47])/AVERAGE([.B47:.F47])" office:value-type="percentage" office:value="0.0133416373808783" calcext:value-type="percentage">
            <text:p>1.3%</text:p>
          </table:table-cell>
          <table:table-cell table:style-name="ce36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37" table:formula="of:=(MAX([.B47:.F47])-MIN([.B47:.F47]))/[.H47]*5" office:value-type="percentage" office:value="0.0280732503616869" calcext:value-type="percentage">
            <text:p>2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21"/>
          <table:table-cell table:style-name="ce25" table:formula="of:=SUMPRODUCT(([.B48:.F48]&lt;&gt;&quot;&quot;)*([.B48:.F48]/[.B$19:.F$19]) / SUM([.B48:.F48]&lt;&gt;&quot;&quot;))" office:value-type="float" office:value="0.93054729282648" calcext:value-type="float">
            <text:p>0.9</text:p>
          </table:table-cell>
          <table:table-cell table:style-name="ce33" table:formula="of:=[.G48]*[.H$19]" office:value-type="float" office:value="35.0969339286942" calcext:value-type="float">
            <text:p>35</text:p>
          </table:table-cell>
          <table:table-cell table:style-name="ce35" table:formula="of:=STDEVP([.B48:.F48])/AVERAGE([.B48:.F48])" office:value-type="percentage" office:value="0.308606699924184" calcext:value-type="percentage">
            <text:p>30.9%</text:p>
          </table:table-cell>
          <table:table-cell table:style-name="ce36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37" table:formula="of:=(MAX([.B48:.F48])-MIN([.B48:.F48]))/[.H48]*5" office:value-type="percentage" office:value="0.712312934537018" calcext:value-type="percentage">
            <text:p>71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25" table:formula="of:=SUMPRODUCT(([.B49:.F49]&lt;&gt;&quot;&quot;)*([.B49:.F49]/[.B$19:.F$19]) / SUM([.B49:.F49]&lt;&gt;&quot;&quot;))" office:value-type="float" office:value="0.221726348595682" calcext:value-type="float">
            <text:p>0.2</text:p>
          </table:table-cell>
          <table:table-cell table:style-name="ce33" table:formula="of:=[.G49]*[.H$19]" office:value-type="float" office:value="8.36272918840716" calcext:value-type="float">
            <text:p>8</text:p>
          </table:table-cell>
          <table:table-cell table:style-name="ce35" table:formula="of:=STDEVP([.B49:.F49])/AVERAGE([.B49:.F49])" office:value-type="percentage" office:value="0.565685424949238" calcext:value-type="percentage">
            <text:p>56.6%</text:p>
          </table:table-cell>
          <table:table-cell table:style-name="ce36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37" table:formula="of:=(MAX([.B49:.F49])-MIN([.B49:.F49]))/[.H49]*5" office:value-type="percentage" office:value="1.19578187631168" calcext:value-type="percentage">
            <text:p>119.6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Clause 6.6 - Data'.H20:'Clause 6.6 - Data'.H49">
            <calcext:condition calcext:apply-style-name="Good" calcext:value="&gt;1000" calcext:base-cell-address="'Clause 6.6 - Data'.H20"/>
          </calcext:conditional-format>
          <calcext:conditional-format calcext:target-range-address="'Clause 6.6 - Data'.K20:'Clause 6.6 - Data'.K49">
            <calcext:condition calcext:apply-style-name="Good" calcext:value="&lt;[.J20]" calcext:base-cell-address="'Clause 6.6 - Data'.K20"/>
          </calcext:conditional-format>
        </calcext:conditional-formats>
      </table:table>
      <table:table table:name="MTD large sizes fall-off" table:style-name="ta1">
        <table:shapes>
          <draw:frame draw:z-index="0" draw:style-name="gr1" draw:text-style-name="P1" svg:width="15.999cm" svg:height="8.999cm" svg:x="24.937cm" svg:y="7.88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378666" calcext:value-type="float">
            <text:p>7.4</text:p>
          </table:table-cell>
          <table:table-cell table:style-name="ce15" office:value-type="float" office:value="7.768297" calcext:value-type="float">
            <text:p>7.8</text:p>
          </table:table-cell>
          <table:table-cell table:style-name="ce15" office:value-type="float" office:value="7.706872" calcext:value-type="float">
            <text:p>7.7</text:p>
          </table:table-cell>
          <table:table-cell table:style-name="ce15" office:value-type="float" office:value="7.778096" calcext:value-type="float">
            <text:p>7.8</text:p>
          </table:table-cell>
          <table:table-cell table:style-name="ce20" office:value-type="float" office:value="7.729287" calcext:value-type="float">
            <text:p>7.7</text:p>
          </table:table-cell>
          <table:table-cell table:style-name="ce24"/>
          <table:table-cell table:style-name="ce32" table:formula="of:=SUM([.B19:.F19])" office:value-type="float" office:value="38.361218" calcext:value-type="float">
            <text:p>38.4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39011" calcext:value-type="float">
            <text:p>39011</text:p>
          </table:table-cell>
          <table:table-cell table:style-name="ce16" office:value-type="float" office:value="39599" calcext:value-type="float">
            <text:p>39599</text:p>
          </table:table-cell>
          <table:table-cell table:style-name="ce16" office:value-type="float" office:value="39988" calcext:value-type="float">
            <text:p>39988</text:p>
          </table:table-cell>
          <table:table-cell table:style-name="ce16" office:value-type="float" office:value="38750" calcext:value-type="float">
            <text:p>38750</text:p>
          </table:table-cell>
          <table:table-cell table:style-name="ce21" office:value-type="float" office:value="37751" calcext:value-type="float">
            <text:p>37751</text:p>
          </table:table-cell>
          <table:table-cell table:style-name="ce25" table:formula="of:=SUMPRODUCT(([.B20:.F20]&lt;&gt;&quot;&quot;)*([.B20:.F20]/[.B$19:.F$19]) / SUM([.B20:.F20]&lt;&gt;&quot;&quot;))" office:value-type="float" office:value="5087.84363286632" calcext:value-type="float">
            <text:p>5087.8</text:p>
          </table:table-cell>
          <table:table-cell table:style-name="ce38" table:formula="of:=[.G20]*[.H$19]" office:value-type="float" office:value="195175.878750297" calcext:value-type="float">
            <text:p>195176</text:p>
          </table:table-cell>
          <table:table-cell table:style-name="ce35" table:formula="of:=STDEVP([.B20:.F20])/AVERAGE([.B20:.F20])" office:value-type="percentage" office:value="0.0197039495709305" calcext:value-type="percentage">
            <text:p>2.0%</text:p>
          </table:table-cell>
          <table:table-cell table:style-name="ce39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40" table:formula="of:=(MAX([.B20:.F20])-MIN([.B20:.F20]))/[.H20]*5" office:value-type="percentage" office:value="0.0573072864926604" calcext:value-type="percentage">
            <text:p>5.7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25892" calcext:value-type="float">
            <text:p>25892</text:p>
          </table:table-cell>
          <table:table-cell table:style-name="ce16" office:value-type="float" office:value="26026" calcext:value-type="float">
            <text:p>26026</text:p>
          </table:table-cell>
          <table:table-cell table:style-name="ce16" office:value-type="float" office:value="26101" calcext:value-type="float">
            <text:p>26101</text:p>
          </table:table-cell>
          <table:table-cell table:style-name="ce16" office:value-type="float" office:value="25215" calcext:value-type="float">
            <text:p>25215</text:p>
          </table:table-cell>
          <table:table-cell table:style-name="ce21" office:value-type="float" office:value="24603" calcext:value-type="float">
            <text:p>24603</text:p>
          </table:table-cell>
          <table:table-cell table:style-name="ce25" table:formula="of:=SUMPRODUCT(([.B21:.F21]&lt;&gt;&quot;&quot;)*([.B21:.F21]/[.B$19:.F$19]) / SUM([.B21:.F21]&lt;&gt;&quot;&quot;))" office:value-type="float" office:value="3334.18415898949" calcext:value-type="float">
            <text:p>3334.2</text:p>
          </table:table-cell>
          <table:table-cell table:style-name="ce38" table:formula="of:=[.G21]*[.H$19]" office:value-type="float" office:value="127903.365375143" calcext:value-type="float">
            <text:p>127903</text:p>
          </table:table-cell>
          <table:table-cell table:style-name="ce35" table:formula="of:=STDEVP([.B21:.F21])/AVERAGE([.B21:.F21])" office:value-type="percentage" office:value="0.0225000235917237" calcext:value-type="percentage">
            <text:p>2.3%</text:p>
          </table:table-cell>
          <table:table-cell table:style-name="ce39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40" table:formula="of:=(MAX([.B21:.F21])-MIN([.B21:.F21]))/[.H21]*5" office:value-type="percentage" office:value="0.0585598352164676" calcext:value-type="percentage">
            <text:p>5.9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17279" calcext:value-type="float">
            <text:p>17279</text:p>
          </table:table-cell>
          <table:table-cell table:style-name="ce16" office:value-type="float" office:value="17429" calcext:value-type="float">
            <text:p>17429</text:p>
          </table:table-cell>
          <table:table-cell table:style-name="ce16" office:value-type="float" office:value="17210" calcext:value-type="float">
            <text:p>17210</text:p>
          </table:table-cell>
          <table:table-cell table:style-name="ce16" office:value-type="float" office:value="16502" calcext:value-type="float">
            <text:p>16502</text:p>
          </table:table-cell>
          <table:table-cell table:style-name="ce21" office:value-type="float" office:value="15860" calcext:value-type="float">
            <text:p>15860</text:p>
          </table:table-cell>
          <table:table-cell table:style-name="ce25" table:formula="of:=SUMPRODUCT(([.B22:.F22]&lt;&gt;&quot;&quot;)*([.B22:.F22]/[.B$19:.F$19]) / SUM([.B22:.F22]&lt;&gt;&quot;&quot;))" office:value-type="float" office:value="2198.39282085229" calcext:value-type="float">
            <text:p>2198.4</text:p>
          </table:table-cell>
          <table:table-cell table:style-name="ce38" table:formula="of:=[.G22]*[.H$19]" office:value-type="float" office:value="84333.0262503496" calcext:value-type="float">
            <text:p>84333</text:p>
          </table:table-cell>
          <table:table-cell table:style-name="ce35" table:formula="of:=STDEVP([.B22:.F22])/AVERAGE([.B22:.F22])" office:value-type="percentage" office:value="0.0350968254150808" calcext:value-type="percentage">
            <text:p>3.5%</text:p>
          </table:table-cell>
          <table:table-cell table:style-name="ce39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40" table:formula="of:=(MAX([.B22:.F22])-MIN([.B22:.F22]))/[.H22]*5" office:value-type="percentage" office:value="0.093024054143527" calcext:value-type="percentage">
            <text:p>9.3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11772" calcext:value-type="float">
            <text:p>11772</text:p>
          </table:table-cell>
          <table:table-cell table:style-name="ce16" office:value-type="float" office:value="11726" calcext:value-type="float">
            <text:p>11726</text:p>
          </table:table-cell>
          <table:table-cell table:style-name="ce16" office:value-type="float" office:value="11554" calcext:value-type="float">
            <text:p>11554</text:p>
          </table:table-cell>
          <table:table-cell table:style-name="ce16" office:value-type="float" office:value="11027" calcext:value-type="float">
            <text:p>11027</text:p>
          </table:table-cell>
          <table:table-cell table:style-name="ce21" office:value-type="float" office:value="10481" calcext:value-type="float">
            <text:p>10481</text:p>
          </table:table-cell>
          <table:table-cell table:style-name="ce25" table:formula="of:=SUMPRODUCT(([.B23:.F23]&lt;&gt;&quot;&quot;)*([.B23:.F23]/[.B$19:.F$19]) / SUM([.B23:.F23]&lt;&gt;&quot;&quot;))" office:value-type="float" office:value="1475.55415332607" calcext:value-type="float">
            <text:p>1475.6</text:p>
          </table:table-cell>
          <table:table-cell table:style-name="ce38" table:formula="of:=[.G23]*[.H$19]" office:value-type="float" office:value="56604.0545465466" calcext:value-type="float">
            <text:p>56604</text:p>
          </table:table-cell>
          <table:table-cell table:style-name="ce35" table:formula="of:=STDEVP([.B23:.F23])/AVERAGE([.B23:.F23])" office:value-type="percentage" office:value="0.0435479717737276" calcext:value-type="percentage">
            <text:p>4.4%</text:p>
          </table:table-cell>
          <table:table-cell table:style-name="ce39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40" table:formula="of:=(MAX([.B23:.F23])-MIN([.B23:.F23]))/[.H23]*5" office:value-type="percentage" office:value="0.114037767289125" calcext:value-type="percentage">
            <text:p>11.4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8550" calcext:value-type="float">
            <text:p>8550</text:p>
          </table:table-cell>
          <table:table-cell table:style-name="ce16" office:value-type="float" office:value="8491" calcext:value-type="float">
            <text:p>8491</text:p>
          </table:table-cell>
          <table:table-cell table:style-name="ce16" office:value-type="float" office:value="8226" calcext:value-type="float">
            <text:p>8226</text:p>
          </table:table-cell>
          <table:table-cell table:style-name="ce16" office:value-type="float" office:value="7783" calcext:value-type="float">
            <text:p>7783</text:p>
          </table:table-cell>
          <table:table-cell table:style-name="ce21" office:value-type="float" office:value="7343" calcext:value-type="float">
            <text:p>7343</text:p>
          </table:table-cell>
          <table:table-cell table:style-name="ce25" table:formula="of:=SUMPRODUCT(([.B24:.F24]&lt;&gt;&quot;&quot;)*([.B24:.F24]/[.B$19:.F$19]) / SUM([.B24:.F24]&lt;&gt;&quot;&quot;))" office:value-type="float" office:value="1053.95818743407" calcext:value-type="float">
            <text:p>1054.0</text:p>
          </table:table-cell>
          <table:table-cell table:style-name="ce38" table:formula="of:=[.G24]*[.H$19]" office:value-type="float" office:value="40431.1197910432" calcext:value-type="float">
            <text:p>40431</text:p>
          </table:table-cell>
          <table:table-cell table:style-name="ce35" table:formula="of:=STDEVP([.B24:.F24])/AVERAGE([.B24:.F24])" office:value-type="percentage" office:value="0.0565220633623775" calcext:value-type="percentage">
            <text:p>5.7%</text:p>
          </table:table-cell>
          <table:table-cell table:style-name="ce39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40" table:formula="of:=(MAX([.B24:.F24])-MIN([.B24:.F24]))/[.H24]*5" office:value-type="percentage" office:value="0.149266209572977" calcext:value-type="percentage">
            <text:p>14.9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6457" calcext:value-type="float">
            <text:p>6457</text:p>
          </table:table-cell>
          <table:table-cell table:style-name="ce16" office:value-type="float" office:value="6356" calcext:value-type="float">
            <text:p>6356</text:p>
          </table:table-cell>
          <table:table-cell table:style-name="ce16" office:value-type="float" office:value="6055" calcext:value-type="float">
            <text:p>6055</text:p>
          </table:table-cell>
          <table:table-cell table:style-name="ce16" office:value-type="float" office:value="5747" calcext:value-type="float">
            <text:p>5747</text:p>
          </table:table-cell>
          <table:table-cell table:style-name="ce21" office:value-type="float" office:value="5316" calcext:value-type="float">
            <text:p>5316</text:p>
          </table:table-cell>
          <table:table-cell table:style-name="ce25" table:formula="of:=SUMPRODUCT(([.B25:.F25]&lt;&gt;&quot;&quot;)*([.B25:.F25]/[.B$19:.F$19]) / SUM([.B25:.F25]&lt;&gt;&quot;&quot;))" office:value-type="float" office:value="781.118732747552" calcext:value-type="float">
            <text:p>781.1</text:p>
          </table:table-cell>
          <table:table-cell table:style-name="ce38" table:formula="of:=[.G25]*[.H$19]" office:value-type="float" office:value="29964.6659908126" calcext:value-type="float">
            <text:p>29965</text:p>
          </table:table-cell>
          <table:table-cell table:style-name="ce35" table:formula="of:=STDEVP([.B25:.F25])/AVERAGE([.B25:.F25])" office:value-type="percentage" office:value="0.0696633351135928" calcext:value-type="percentage">
            <text:p>7.0%</text:p>
          </table:table-cell>
          <table:table-cell table:style-name="ce39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40" table:formula="of:=(MAX([.B25:.F25])-MIN([.B25:.F25]))/[.H25]*5" office:value-type="percentage" office:value="0.190390909137756" calcext:value-type="percentage">
            <text:p>19.0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5006" calcext:value-type="float">
            <text:p>5006</text:p>
          </table:table-cell>
          <table:table-cell table:style-name="ce16" office:value-type="float" office:value="4840" calcext:value-type="float">
            <text:p>4840</text:p>
          </table:table-cell>
          <table:table-cell table:style-name="ce16" office:value-type="float" office:value="4631" calcext:value-type="float">
            <text:p>4631</text:p>
          </table:table-cell>
          <table:table-cell table:style-name="ce16" office:value-type="float" office:value="4367" calcext:value-type="float">
            <text:p>4367</text:p>
          </table:table-cell>
          <table:table-cell table:style-name="ce21" office:value-type="float" office:value="3991" calcext:value-type="float">
            <text:p>3991</text:p>
          </table:table-cell>
          <table:table-cell table:style-name="ce25" table:formula="of:=SUMPRODUCT(([.B26:.F26]&lt;&gt;&quot;&quot;)*([.B26:.F26]/[.B$19:.F$19]) / SUM([.B26:.F26]&lt;&gt;&quot;&quot;))" office:value-type="float" office:value="596.035221087971" calcext:value-type="float">
            <text:p>596.0</text:p>
          </table:table-cell>
          <table:table-cell table:style-name="ce38" table:formula="of:=[.G26]*[.H$19]" office:value-type="float" office:value="22864.6370518338" calcext:value-type="float">
            <text:p>22865</text:p>
          </table:table-cell>
          <table:table-cell table:style-name="ce35" table:formula="of:=STDEVP([.B26:.F26])/AVERAGE([.B26:.F26])" office:value-type="percentage" office:value="0.0785291088946428" calcext:value-type="percentage">
            <text:p>7.9%</text:p>
          </table:table-cell>
          <table:table-cell table:style-name="ce39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40" table:formula="of:=(MAX([.B26:.F26])-MIN([.B26:.F26]))/[.H26]*5" office:value-type="percentage" office:value="0.221958476248498" calcext:value-type="percentage">
            <text:p>22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3859" calcext:value-type="float">
            <text:p>3859</text:p>
          </table:table-cell>
          <table:table-cell table:style-name="ce16" office:value-type="float" office:value="3682" calcext:value-type="float">
            <text:p>3682</text:p>
          </table:table-cell>
          <table:table-cell table:style-name="ce16" office:value-type="float" office:value="3548" calcext:value-type="float">
            <text:p>3548</text:p>
          </table:table-cell>
          <table:table-cell table:style-name="ce16" office:value-type="float" office:value="3382" calcext:value-type="float">
            <text:p>3382</text:p>
          </table:table-cell>
          <table:table-cell table:style-name="ce21" office:value-type="float" office:value="3018" calcext:value-type="float">
            <text:p>3018</text:p>
          </table:table-cell>
          <table:table-cell table:style-name="ce25" table:formula="of:=SUMPRODUCT(([.B27:.F27]&lt;&gt;&quot;&quot;)*([.B27:.F27]/[.B$19:.F$19]) / SUM([.B27:.F27]&lt;&gt;&quot;&quot;))" office:value-type="float" office:value="456.522817099475" calcext:value-type="float">
            <text:p>456.5</text:p>
          </table:table-cell>
          <table:table-cell table:style-name="ce38" table:formula="of:=[.G27]*[.H$19]" office:value-type="float" office:value="17512.7713087271" calcext:value-type="float">
            <text:p>17513</text:p>
          </table:table-cell>
          <table:table-cell table:style-name="ce35" table:formula="of:=STDEVP([.B27:.F27])/AVERAGE([.B27:.F27])" office:value-type="percentage" office:value="0.0819207566722396" calcext:value-type="percentage">
            <text:p>8.2%</text:p>
          </table:table-cell>
          <table:table-cell table:style-name="ce39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40" table:formula="of:=(MAX([.B27:.F27])-MIN([.B27:.F27]))/[.H27]*5" office:value-type="percentage" office:value="0.240110484278667" calcext:value-type="percentage">
            <text:p>24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2998" calcext:value-type="float">
            <text:p>2998</text:p>
          </table:table-cell>
          <table:table-cell table:style-name="ce16" office:value-type="float" office:value="2873" calcext:value-type="float">
            <text:p>2873</text:p>
          </table:table-cell>
          <table:table-cell table:style-name="ce16" office:value-type="float" office:value="2706" calcext:value-type="float">
            <text:p>2706</text:p>
          </table:table-cell>
          <table:table-cell table:style-name="ce16" office:value-type="float" office:value="2615" calcext:value-type="float">
            <text:p>2615</text:p>
          </table:table-cell>
          <table:table-cell table:style-name="ce21" office:value-type="float" office:value="2331" calcext:value-type="float">
            <text:p>2331</text:p>
          </table:table-cell>
          <table:table-cell table:style-name="ce25" table:formula="of:=SUMPRODUCT(([.B28:.F28]&lt;&gt;&quot;&quot;)*([.B28:.F28]/[.B$19:.F$19]) / SUM([.B28:.F28]&lt;&gt;&quot;&quot;))" office:value-type="float" office:value="353.007797644861" calcext:value-type="float">
            <text:p>353.0</text:p>
          </table:table-cell>
          <table:table-cell table:style-name="ce38" table:formula="of:=[.G28]*[.H$19]" office:value-type="float" office:value="13541.8090811544" calcext:value-type="float">
            <text:p>13542</text:p>
          </table:table-cell>
          <table:table-cell table:style-name="ce35" table:formula="of:=STDEVP([.B28:.F28])/AVERAGE([.B28:.F28])" office:value-type="percentage" office:value="0.0846454022613519" calcext:value-type="percentage">
            <text:p>8.5%</text:p>
          </table:table-cell>
          <table:table-cell table:style-name="ce39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40" table:formula="of:=(MAX([.B28:.F28])-MIN([.B28:.F28]))/[.H28]*5" office:value-type="percentage" office:value="0.246274333068333" calcext:value-type="percentage">
            <text:p>24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2321" calcext:value-type="float">
            <text:p>2321</text:p>
          </table:table-cell>
          <table:table-cell table:style-name="ce16" office:value-type="float" office:value="2269" calcext:value-type="float">
            <text:p>2269</text:p>
          </table:table-cell>
          <table:table-cell table:style-name="ce16" office:value-type="float" office:value="2111" calcext:value-type="float">
            <text:p>2111</text:p>
          </table:table-cell>
          <table:table-cell table:style-name="ce16" office:value-type="float" office:value="2016" calcext:value-type="float">
            <text:p>2016</text:p>
          </table:table-cell>
          <table:table-cell table:style-name="ce21" office:value-type="float" office:value="1836" calcext:value-type="float">
            <text:p>1836</text:p>
          </table:table-cell>
          <table:table-cell table:style-name="ce25" table:formula="of:=SUMPRODUCT(([.B29:.F29]&lt;&gt;&quot;&quot;)*([.B29:.F29]/[.B$19:.F$19]) / SUM([.B29:.F29]&lt;&gt;&quot;&quot;))" office:value-type="float" office:value="275.455795422069" calcext:value-type="float">
            <text:p>275.5</text:p>
          </table:table-cell>
          <table:table-cell table:style-name="ce38" table:formula="of:=[.G29]*[.H$19]" office:value-type="float" office:value="10566.8198175494" calcext:value-type="float">
            <text:p>10567</text:p>
          </table:table-cell>
          <table:table-cell table:style-name="ce35" table:formula="of:=STDEVP([.B29:.F29])/AVERAGE([.B29:.F29])" office:value-type="percentage" office:value="0.083073908900176" calcext:value-type="percentage">
            <text:p>8.3%</text:p>
          </table:table-cell>
          <table:table-cell table:style-name="ce39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40" table:formula="of:=(MAX([.B29:.F29])-MIN([.B29:.F29]))/[.H29]*5" office:value-type="percentage" office:value="0.229491941934371" calcext:value-type="percentage">
            <text:p>22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1795" calcext:value-type="float">
            <text:p>1795</text:p>
          </table:table-cell>
          <table:table-cell table:style-name="ce16" office:value-type="float" office:value="1754" calcext:value-type="float">
            <text:p>1754</text:p>
          </table:table-cell>
          <table:table-cell table:style-name="ce16" office:value-type="float" office:value="1651" calcext:value-type="float">
            <text:p>1651</text:p>
          </table:table-cell>
          <table:table-cell table:style-name="ce16" office:value-type="float" office:value="1575" calcext:value-type="float">
            <text:p>1575</text:p>
          </table:table-cell>
          <table:table-cell table:style-name="ce21" office:value-type="float" office:value="1429" calcext:value-type="float">
            <text:p>1429</text:p>
          </table:table-cell>
          <table:table-cell table:style-name="ce25" table:formula="of:=SUMPRODUCT(([.B30:.F30]&lt;&gt;&quot;&quot;)*([.B30:.F30]/[.B$19:.F$19]) / SUM([.B30:.F30]&lt;&gt;&quot;&quot;))" office:value-type="float" office:value="214.13114973265" calcext:value-type="float">
            <text:p>214.1</text:p>
          </table:table-cell>
          <table:table-cell table:style-name="ce38" table:formula="of:=[.G30]*[.H$19]" office:value-type="float" office:value="8214.33171548481" calcext:value-type="float">
            <text:p>8214</text:p>
          </table:table-cell>
          <table:table-cell table:style-name="ce35" table:formula="of:=STDEVP([.B30:.F30])/AVERAGE([.B30:.F30])" office:value-type="percentage" office:value="0.0798762200596659" calcext:value-type="percentage">
            <text:p>8.0%</text:p>
          </table:table-cell>
          <table:table-cell table:style-name="ce39" table:formula="of:=IF([.H30]&gt;[.$A$7]; [.$C$7]; IF([.H30]&gt;[.$A$8]; [.$C$8]; IF([.H30]&gt;[.$A$9];[.$C$9];IF([.H30]&gt;[.$A$10];[.$C$10]; IF([.H30]&gt;[.$A$11];[.$C$11];IF([.H30]&gt;[.$A$12];[.$C$12];[.$C$13]))))))/100" office:value-type="percentage" office:value="0.113" calcext:value-type="percentage">
            <text:p>11.3%</text:p>
          </table:table-cell>
          <table:table-cell table:style-name="ce40" table:formula="of:=(MAX([.B30:.F30])-MIN([.B30:.F30]))/[.H30]*5" office:value-type="percentage" office:value="0.222781361087509" calcext:value-type="percentage">
            <text:p>22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1382" calcext:value-type="float">
            <text:p>1382</text:p>
          </table:table-cell>
          <table:table-cell table:style-name="ce16" office:value-type="float" office:value="1322" calcext:value-type="float">
            <text:p>1322</text:p>
          </table:table-cell>
          <table:table-cell table:style-name="ce16" office:value-type="float" office:value="1298" calcext:value-type="float">
            <text:p>1298</text:p>
          </table:table-cell>
          <table:table-cell table:style-name="ce16" office:value-type="float" office:value="1195" calcext:value-type="float">
            <text:p>1195</text:p>
          </table:table-cell>
          <table:table-cell table:style-name="ce21" office:value-type="float" office:value="1126" calcext:value-type="float">
            <text:p>1126</text:p>
          </table:table-cell>
          <table:table-cell table:style-name="ce25" table:formula="of:=SUMPRODUCT(([.B31:.F31]&lt;&gt;&quot;&quot;)*([.B31:.F31]/[.B$19:.F$19]) / SUM([.B31:.F31]&lt;&gt;&quot;&quot;))" office:value-type="float" office:value="165.042591907706" calcext:value-type="float">
            <text:p>165.0</text:p>
          </table:table-cell>
          <table:table-cell table:style-name="ce38" table:formula="of:=[.G31]*[.H$19]" office:value-type="float" office:value="6331.23484745654" calcext:value-type="float">
            <text:p>6331</text:p>
          </table:table-cell>
          <table:table-cell table:style-name="ce35" table:formula="of:=STDEVP([.B31:.F31])/AVERAGE([.B31:.F31])" office:value-type="percentage" office:value="0.0726876763445684" calcext:value-type="percentage">
            <text:p>7.3%</text:p>
          </table:table-cell>
          <table:table-cell table:style-name="ce39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40" table:formula="of:=(MAX([.B31:.F31])-MIN([.B31:.F31]))/[.H31]*5" office:value-type="percentage" office:value="0.202172250886289" calcext:value-type="percentage">
            <text:p>20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1042" calcext:value-type="float">
            <text:p>1042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1018" calcext:value-type="float">
            <text:p>1018</text:p>
          </table:table-cell>
          <table:table-cell table:style-name="ce16" office:value-type="float" office:value="917" calcext:value-type="float">
            <text:p>917</text:p>
          </table:table-cell>
          <table:table-cell table:style-name="ce21" office:value-type="float" office:value="867" calcext:value-type="float">
            <text:p>867</text:p>
          </table:table-cell>
          <table:table-cell table:style-name="ce25" table:formula="of:=SUMPRODUCT(([.B32:.F32]&lt;&gt;&quot;&quot;)*([.B32:.F32]/[.B$19:.F$19]) / SUM([.B32:.F32]&lt;&gt;&quot;&quot;))" office:value-type="float" office:value="127.218540576974" calcext:value-type="float">
            <text:p>127.2</text:p>
          </table:table-cell>
          <table:table-cell table:style-name="ce38" table:formula="of:=[.G32]*[.H$19]" office:value-type="float" office:value="4880.25816871513" calcext:value-type="float">
            <text:p>4880</text:p>
          </table:table-cell>
          <table:table-cell table:style-name="ce35" table:formula="of:=STDEVP([.B32:.F32])/AVERAGE([.B32:.F32])" office:value-type="percentage" office:value="0.0717978021380005" calcext:value-type="percentage">
            <text:p>7.2%</text:p>
          </table:table-cell>
          <table:table-cell table:style-name="ce39" table:formula="of:=IF([.H32]&gt;[.$A$7]; [.$C$7]; IF([.H32]&gt;[.$A$8]; [.$C$8]; IF([.H32]&gt;[.$A$9];[.$C$9];IF([.H32]&gt;[.$A$10];[.$C$10]; IF([.H32]&gt;[.$A$11];[.$C$11];IF([.H32]&gt;[.$A$12];[.$C$12];[.$C$13]))))))/100" office:value-type="percentage" office:value="0.119" calcext:value-type="percentage">
            <text:p>11.9%</text:p>
          </table:table-cell>
          <table:table-cell table:style-name="ce40" table:formula="of:=(MAX([.B32:.F32])-MIN([.B32:.F32]))/[.H32]*5" office:value-type="percentage" office:value="0.179293793432729" calcext:value-type="percentage">
            <text:p>17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804" calcext:value-type="float">
            <text:p>804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804" calcext:value-type="float">
            <text:p>804</text:p>
          </table:table-cell>
          <table:table-cell table:style-name="ce16" office:value-type="float" office:value="722" calcext:value-type="float">
            <text:p>722</text:p>
          </table:table-cell>
          <table:table-cell table:style-name="ce21" office:value-type="float" office:value="673" calcext:value-type="float">
            <text:p>673</text:p>
          </table:table-cell>
          <table:table-cell table:style-name="ce25" table:formula="of:=SUMPRODUCT(([.B33:.F33]&lt;&gt;&quot;&quot;)*([.B33:.F33]/[.B$19:.F$19]) / SUM([.B33:.F33]&lt;&gt;&quot;&quot;))" office:value-type="float" office:value="98.640676419603" calcext:value-type="float">
            <text:p>98.6</text:p>
          </table:table-cell>
          <table:table-cell table:style-name="ce38" table:formula="of:=[.G33]*[.H$19]" office:value-type="float" office:value="3783.97649179985" calcext:value-type="float">
            <text:p>3784</text:p>
          </table:table-cell>
          <table:table-cell table:style-name="ce35" table:formula="of:=STDEVP([.B33:.F33])/AVERAGE([.B33:.F33])" office:value-type="percentage" office:value="0.0676907569520948" calcext:value-type="percentage">
            <text:p>6.8%</text:p>
          </table:table-cell>
          <table:table-cell table:style-name="ce39" table:formula="of:=IF([.H33]&gt;[.$A$7]; [.$C$7]; IF([.H33]&gt;[.$A$8]; [.$C$8]; IF([.H33]&gt;[.$A$9];[.$C$9];IF([.H33]&gt;[.$A$10];[.$C$10]; IF([.H33]&gt;[.$A$11];[.$C$11];IF([.H33]&gt;[.$A$12];[.$C$12];[.$C$13]))))))/100" office:value-type="percentage" office:value="0.119" calcext:value-type="percentage">
            <text:p>11.9%</text:p>
          </table:table-cell>
          <table:table-cell table:style-name="ce40" table:formula="of:=(MAX([.B33:.F33])-MIN([.B33:.F33]))/[.H33]*5" office:value-type="percentage" office:value="0.173098326963561" calcext:value-type="percentage">
            <text:p>17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627" calcext:value-type="float">
            <text:p>627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571" calcext:value-type="float">
            <text:p>571</text:p>
          </table:table-cell>
          <table:table-cell table:style-name="ce21" office:value-type="float" office:value="554" calcext:value-type="float">
            <text:p>554</text:p>
          </table:table-cell>
          <table:table-cell table:style-name="ce25" table:formula="of:=SUMPRODUCT(([.B34:.F34]&lt;&gt;&quot;&quot;)*([.B34:.F34]/[.B$19:.F$19]) / SUM([.B34:.F34]&lt;&gt;&quot;&quot;))" office:value-type="float" office:value="77.7306738527608" calcext:value-type="float">
            <text:p>77.7</text:p>
          </table:table-cell>
          <table:table-cell table:style-name="ce38" table:formula="of:=[.G34]*[.H$19]" office:value-type="float" office:value="2981.84332495266" calcext:value-type="float">
            <text:p>2982</text:p>
          </table:table-cell>
          <table:table-cell table:style-name="ce35" table:formula="of:=STDEVP([.B34:.F34])/AVERAGE([.B34:.F34])" office:value-type="percentage" office:value="0.0490763662988567" calcext:value-type="percentage">
            <text:p>4.9%</text:p>
          </table:table-cell>
          <table:table-cell table:style-name="ce39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40" table:formula="of:=(MAX([.B34:.F34])-MIN([.B34:.F34]))/[.H34]*5" office:value-type="percentage" office:value="0.12240750442708" calcext:value-type="percentage">
            <text:p>12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 office:value-type="float" office:value="504" calcext:value-type="float">
            <text:p>504</text:p>
          </table:table-cell>
          <table:table-cell table:style-name="ce16" office:value-type="float" office:value="474" calcext:value-type="float">
            <text:p>474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440" calcext:value-type="float">
            <text:p>440</text:p>
          </table:table-cell>
          <table:table-cell table:style-name="ce21" office:value-type="float" office:value="447" calcext:value-type="float">
            <text:p>447</text:p>
          </table:table-cell>
          <table:table-cell table:style-name="ce25" table:formula="of:=SUMPRODUCT(([.B35:.F35]&lt;&gt;&quot;&quot;)*([.B35:.F35]/[.B$19:.F$19]) / SUM([.B35:.F35]&lt;&gt;&quot;&quot;))" office:value-type="float" office:value="61.6941543712438" calcext:value-type="float">
            <text:p>61.7</text:p>
          </table:table-cell>
          <table:table-cell table:style-name="ce38" table:formula="of:=[.G35]*[.H$19]" office:value-type="float" office:value="2366.66290516094" calcext:value-type="float">
            <text:p>2367</text:p>
          </table:table-cell>
          <table:table-cell table:style-name="ce35" table:formula="of:=STDEVP([.B35:.F35])/AVERAGE([.B35:.F35])" office:value-type="percentage" office:value="0.0551767024553733" calcext:value-type="percentage">
            <text:p>5.5%</text:p>
          </table:table-cell>
          <table:table-cell table:style-name="ce39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40" table:formula="of:=(MAX([.B35:.F35])-MIN([.B35:.F35]))/[.H35]*5" office:value-type="percentage" office:value="0.135211482506521" calcext:value-type="percentage">
            <text:p>13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417" calcext:value-type="float">
            <text:p>417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351" calcext:value-type="float">
            <text:p>351</text:p>
          </table:table-cell>
          <table:table-cell table:style-name="ce21" office:value-type="float" office:value="370" calcext:value-type="float">
            <text:p>370</text:p>
          </table:table-cell>
          <table:table-cell table:style-name="ce25" table:formula="of:=SUMPRODUCT(([.B36:.F36]&lt;&gt;&quot;&quot;)*([.B36:.F36]/[.B$19:.F$19]) / SUM([.B36:.F36]&lt;&gt;&quot;&quot;))" office:value-type="float" office:value="50.50416833912" calcext:value-type="float">
            <text:p>50.5</text:p>
          </table:table-cell>
          <table:table-cell table:style-name="ce38" table:formula="of:=[.G36]*[.H$19]" office:value-type="float" office:value="1937.40141156568" calcext:value-type="float">
            <text:p>1937</text:p>
          </table:table-cell>
          <table:table-cell table:style-name="ce35" table:formula="of:=STDEVP([.B36:.F36])/AVERAGE([.B36:.F36])" office:value-type="percentage" office:value="0.0610388207287737" calcext:value-type="percentage">
            <text:p>6.1%</text:p>
          </table:table-cell>
          <table:table-cell table:style-name="ce39" table:formula="of:=IF([.H36]&gt;[.$A$7]; [.$C$7]; IF([.H36]&gt;[.$A$8]; [.$C$8]; IF([.H36]&gt;[.$A$9];[.$C$9];IF([.H36]&gt;[.$A$10];[.$C$10]; IF([.H36]&gt;[.$A$11];[.$C$11];IF([.H36]&gt;[.$A$12];[.$C$12];[.$C$13]))))))/100" office:value-type="percentage" office:value="0.134" calcext:value-type="percentage">
            <text:p>13.4%</text:p>
          </table:table-cell>
          <table:table-cell table:style-name="ce40" table:formula="of:=(MAX([.B36:.F36])-MIN([.B36:.F36]))/[.H36]*5" office:value-type="percentage" office:value="0.170331247840537" calcext:value-type="percentage">
            <text:p>17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357" calcext:value-type="float">
            <text:p>357</text:p>
          </table:table-cell>
          <table:table-cell table:number-columns-repeated="2" table:style-name="ce16" office:value-type="float" office:value="328" calcext:value-type="float">
            <text:p>328</text:p>
          </table:table-cell>
          <table:table-cell table:style-name="ce16" office:value-type="float" office:value="276" calcext:value-type="float">
            <text:p>276</text:p>
          </table:table-cell>
          <table:table-cell table:style-name="ce21" office:value-type="float" office:value="299" calcext:value-type="float">
            <text:p>299</text:p>
          </table:table-cell>
          <table:table-cell table:style-name="ce25" table:formula="of:=SUMPRODUCT(([.B37:.F37]&lt;&gt;&quot;&quot;)*([.B37:.F37]/[.B$19:.F$19]) / SUM([.B37:.F37]&lt;&gt;&quot;&quot;))" office:value-type="float" office:value="41.4666683687518" calcext:value-type="float">
            <text:p>41.5</text:p>
          </table:table-cell>
          <table:table-cell table:style-name="ce38" table:formula="of:=[.G37]*[.H$19]" office:value-type="float" office:value="1590.71190502739" calcext:value-type="float">
            <text:p>1591</text:p>
          </table:table-cell>
          <table:table-cell table:style-name="ce35" table:formula="of:=STDEVP([.B37:.F37])/AVERAGE([.B37:.F37])" office:value-type="percentage" office:value="0.0873160278866236" calcext:value-type="percentage">
            <text:p>8.7%</text:p>
          </table:table-cell>
          <table:table-cell table:style-name="ce39" table:formula="of:=IF([.H37]&gt;[.$A$7]; [.$C$7]; IF([.H37]&gt;[.$A$8]; [.$C$8]; IF([.H37]&gt;[.$A$9];[.$C$9];IF([.H37]&gt;[.$A$10];[.$C$10]; IF([.H37]&gt;[.$A$11];[.$C$11];IF([.H37]&gt;[.$A$12];[.$C$12];[.$C$13]))))))/100" office:value-type="percentage" office:value="0.134" calcext:value-type="percentage">
            <text:p>13.4%</text:p>
          </table:table-cell>
          <table:table-cell table:style-name="ce40" table:formula="of:=(MAX([.B37:.F37])-MIN([.B37:.F37]))/[.H37]*5" office:value-type="percentage" office:value="0.254602985443191" calcext:value-type="percentage">
            <text:p>25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09" calcext:value-type="float">
            <text:p>209</text:p>
          </table:table-cell>
          <table:table-cell table:style-name="ce21" office:value-type="float" office:value="244" calcext:value-type="float">
            <text:p>244</text:p>
          </table:table-cell>
          <table:table-cell table:style-name="ce25" table:formula="of:=SUMPRODUCT(([.B38:.F38]&lt;&gt;&quot;&quot;)*([.B38:.F38]/[.B$19:.F$19]) / SUM([.B38:.F38]&lt;&gt;&quot;&quot;))" office:value-type="float" office:value="33.553280303427" calcext:value-type="float">
            <text:p>33.6</text:p>
          </table:table-cell>
          <table:table-cell table:style-name="ce38" table:formula="of:=[.G38]*[.H$19]" office:value-type="float" office:value="1287.14470033487" calcext:value-type="float">
            <text:p>1287</text:p>
          </table:table-cell>
          <table:table-cell table:style-name="ce35" table:formula="of:=STDEVP([.B38:.F38])/AVERAGE([.B38:.F38])" office:value-type="percentage" office:value="0.108587503393349" calcext:value-type="percentage">
            <text:p>10.9%</text:p>
          </table:table-cell>
          <table:table-cell table:style-name="ce39" table:formula="of:=IF([.H38]&gt;[.$A$7]; [.$C$7]; IF([.H38]&gt;[.$A$8]; [.$C$8]; IF([.H38]&gt;[.$A$9];[.$C$9];IF([.H38]&gt;[.$A$10];[.$C$10]; IF([.H38]&gt;[.$A$11];[.$C$11];IF([.H38]&gt;[.$A$12];[.$C$12];[.$C$13]))))))/100" office:value-type="percentage" office:value="0.134" calcext:value-type="percentage">
            <text:p>13.4%</text:p>
          </table:table-cell>
          <table:table-cell table:style-name="ce40" table:formula="of:=(MAX([.B38:.F38])-MIN([.B38:.F38]))/[.H38]*5" office:value-type="percentage" office:value="0.302996236474839" calcext:value-type="percentage">
            <text:p>30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252" calcext:value-type="float">
            <text:p>252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168" calcext:value-type="float">
            <text:p>168</text:p>
          </table:table-cell>
          <table:table-cell table:style-name="ce21" office:value-type="float" office:value="191" calcext:value-type="float">
            <text:p>191</text:p>
          </table:table-cell>
          <table:table-cell table:style-name="ce25" table:formula="of:=SUMPRODUCT(([.B39:.F39]&lt;&gt;&quot;&quot;)*([.B39:.F39]/[.B$19:.F$19]) / SUM([.B39:.F39]&lt;&gt;&quot;&quot;))" office:value-type="float" office:value="28.0326199765663" calcext:value-type="float">
            <text:p>28.0</text:p>
          </table:table-cell>
          <table:table-cell table:style-name="ce38" table:formula="of:=[.G39]*[.H$19]" office:value-type="float" office:value="1075.36544603222" calcext:value-type="float">
            <text:p>1075</text:p>
          </table:table-cell>
          <table:table-cell table:style-name="ce35" table:formula="of:=STDEVP([.B39:.F39])/AVERAGE([.B39:.F39])" office:value-type="percentage" office:value="0.144788119186866" calcext:value-type="percentage">
            <text:p>14.5%</text:p>
          </table:table-cell>
          <table:table-cell table:style-name="ce39" table:formula="of:=IF([.H39]&gt;[.$A$7]; [.$C$7]; IF([.H39]&gt;[.$A$8]; [.$C$8]; IF([.H39]&gt;[.$A$9];[.$C$9];IF([.H39]&gt;[.$A$10];[.$C$10]; IF([.H39]&gt;[.$A$11];[.$C$11];IF([.H39]&gt;[.$A$12];[.$C$12];[.$C$13]))))))/100" office:value-type="percentage" office:value="0.134" calcext:value-type="percentage">
            <text:p>13.4%</text:p>
          </table:table-cell>
          <table:table-cell table:style-name="ce40" table:formula="of:=(MAX([.B39:.F39])-MIN([.B39:.F39]))/[.H39]*5" office:value-type="percentage" office:value="0.390564901959308" calcext:value-type="percentage">
            <text:p>39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4</text:p>
          </table:table-cell>
          <table:table-cell table:style-name="ce13" office:value-type="float" office:value="210" calcext:value-type="float">
            <text:p>21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39" calcext:value-type="float">
            <text:p>139</text:p>
          </table:table-cell>
          <table:table-cell table:style-name="ce21" office:value-type="float" office:value="154" calcext:value-type="float">
            <text:p>154</text:p>
          </table:table-cell>
          <table:table-cell table:style-name="ce25" table:formula="of:=SUMPRODUCT(([.B40:.F40]&lt;&gt;&quot;&quot;)*([.B40:.F40]/[.B$19:.F$19]) / SUM([.B40:.F40]&lt;&gt;&quot;&quot;))" office:value-type="float" office:value="22.762000026993" calcext:value-type="float">
            <text:p>22.8</text:p>
          </table:table-cell>
          <table:table-cell table:style-name="ce38" table:formula="of:=[.G40]*[.H$19]" office:value-type="float" office:value="873.178045151485" calcext:value-type="float">
            <text:p>873</text:p>
          </table:table-cell>
          <table:table-cell table:style-name="ce35" table:formula="of:=STDEVP([.B40:.F40])/AVERAGE([.B40:.F40])" office:value-type="percentage" office:value="0.14506168057026" calcext:value-type="percentage">
            <text:p>14.5%</text:p>
          </table:table-cell>
          <table:table-cell table:style-name="ce39" table:formula="of:=IF([.H40]&gt;[.$A$7]; [.$C$7]; IF([.H40]&gt;[.$A$8]; [.$C$8]; IF([.H40]&gt;[.$A$9];[.$C$9];IF([.H40]&gt;[.$A$10];[.$C$10]; IF([.H40]&gt;[.$A$11];[.$C$11];IF([.H40]&gt;[.$A$12];[.$C$12];[.$C$13]))))))/100" office:value-type="percentage" office:value="0.156" calcext:value-type="percentage">
            <text:p>15.6%</text:p>
          </table:table-cell>
          <table:table-cell table:style-name="ce40" table:formula="of:=(MAX([.B40:.F40])-MIN([.B40:.F40]))/[.H40]*5" office:value-type="percentage" office:value="0.406560840565353" calcext:value-type="percentage">
            <text:p>40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 office:value-type="float" office:value="173" calcext:value-type="float">
            <text:p>173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12" calcext:value-type="float">
            <text:p>112</text:p>
          </table:table-cell>
          <table:table-cell table:style-name="ce21" office:value-type="float" office:value="127" calcext:value-type="float">
            <text:p>127</text:p>
          </table:table-cell>
          <table:table-cell table:style-name="ce25" table:formula="of:=SUMPRODUCT(([.B41:.F41]&lt;&gt;&quot;&quot;)*([.B41:.F41]/[.B$19:.F$19]) / SUM([.B41:.F41]&lt;&gt;&quot;&quot;))" office:value-type="float" office:value="18.6610451531749" calcext:value-type="float">
            <text:p>18.7</text:p>
          </table:table-cell>
          <table:table-cell table:style-name="ce38" table:formula="of:=[.G41]*[.H$19]" office:value-type="float" office:value="715.860421228785" calcext:value-type="float">
            <text:p>716</text:p>
          </table:table-cell>
          <table:table-cell table:style-name="ce35" table:formula="of:=STDEVP([.B41:.F41])/AVERAGE([.B41:.F41])" office:value-type="percentage" office:value="0.148644248307245" calcext:value-type="percentage">
            <text:p>14.9%</text:p>
          </table:table-cell>
          <table:table-cell table:style-name="ce39" table:formula="of:=IF([.H41]&gt;[.$A$7]; [.$C$7]; IF([.H41]&gt;[.$A$8]; [.$C$8]; IF([.H41]&gt;[.$A$9];[.$C$9];IF([.H41]&gt;[.$A$10];[.$C$10]; IF([.H41]&gt;[.$A$11];[.$C$11];IF([.H41]&gt;[.$A$12];[.$C$12];[.$C$13]))))))/100" office:value-type="percentage" office:value="0.156" calcext:value-type="percentage">
            <text:p>15.6%</text:p>
          </table:table-cell>
          <table:table-cell table:style-name="ce40" table:formula="of:=(MAX([.B41:.F41])-MIN([.B41:.F41]))/[.H41]*5" office:value-type="percentage" office:value="0.426060710936447" calcext:value-type="percentage">
            <text:p>42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 office:value-type="float" office:value="155" calcext:value-type="float">
            <text:p>155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91" calcext:value-type="float">
            <text:p>91</text:p>
          </table:table-cell>
          <table:table-cell table:style-name="ce21" office:value-type="float" office:value="106" calcext:value-type="float">
            <text:p>106</text:p>
          </table:table-cell>
          <table:table-cell table:style-name="ce25" table:formula="of:=SUMPRODUCT(([.B42:.F42]&lt;&gt;&quot;&quot;)*([.B42:.F42]/[.B$19:.F$19]) / SUM([.B42:.F42]&lt;&gt;&quot;&quot;))" office:value-type="float" office:value="15.9780031284066" calcext:value-type="float">
            <text:p>16.0</text:p>
          </table:table-cell>
          <table:table-cell table:style-name="ce38" table:formula="of:=[.G42]*[.H$19]" office:value-type="float" office:value="612.935661213489" calcext:value-type="float">
            <text:p>613</text:p>
          </table:table-cell>
          <table:table-cell table:style-name="ce35" table:formula="of:=STDEVP([.B42:.F42])/AVERAGE([.B42:.F42])" office:value-type="percentage" office:value="0.180878833098475" calcext:value-type="percentage">
            <text:p>18.1%</text:p>
          </table:table-cell>
          <table:table-cell table:style-name="ce39" table:formula="of:=IF([.H42]&gt;[.$A$7]; [.$C$7]; IF([.H42]&gt;[.$A$8]; [.$C$8]; IF([.H42]&gt;[.$A$9];[.$C$9];IF([.H42]&gt;[.$A$10];[.$C$10]; IF([.H42]&gt;[.$A$11];[.$C$11];IF([.H42]&gt;[.$A$12];[.$C$12];[.$C$13]))))))/100" office:value-type="percentage" office:value="0.156" calcext:value-type="percentage">
            <text:p>15.6%</text:p>
          </table:table-cell>
          <table:table-cell table:style-name="ce40" table:formula="of:=(MAX([.B42:.F42])-MIN([.B42:.F42]))/[.H42]*5" office:value-type="percentage" office:value="0.522077634325378" calcext:value-type="percentage">
            <text:p>52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129" calcext:value-type="float">
            <text:p>129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76" calcext:value-type="float">
            <text:p>76</text:p>
          </table:table-cell>
          <table:table-cell table:style-name="ce21" office:value-type="float" office:value="80" calcext:value-type="float">
            <text:p>80</text:p>
          </table:table-cell>
          <table:table-cell table:style-name="ce25" table:formula="of:=SUMPRODUCT(([.B43:.F43]&lt;&gt;&quot;&quot;)*([.B43:.F43]/[.B$19:.F$19]) / SUM([.B43:.F43]&lt;&gt;&quot;&quot;))" office:value-type="float" office:value="13.026604884638" calcext:value-type="float">
            <text:p>13.0</text:p>
          </table:table-cell>
          <table:table-cell table:style-name="ce38" table:formula="of:=[.G43]*[.H$19]" office:value-type="float" office:value="499.716429779461" calcext:value-type="float">
            <text:p>500</text:p>
          </table:table-cell>
          <table:table-cell table:style-name="ce35" table:formula="of:=STDEVP([.B43:.F43])/AVERAGE([.B43:.F43])" office:value-type="percentage" office:value="0.19578055811303" calcext:value-type="percentage">
            <text:p>19.6%</text:p>
          </table:table-cell>
          <table:table-cell table:style-name="ce39" table:formula="of:=IF([.H43]&gt;[.$A$7]; [.$C$7]; IF([.H43]&gt;[.$A$8]; [.$C$8]; IF([.H43]&gt;[.$A$9];[.$C$9];IF([.H43]&gt;[.$A$10];[.$C$10]; IF([.H43]&gt;[.$A$11];[.$C$11];IF([.H43]&gt;[.$A$12];[.$C$12];[.$C$13]))))))/100" office:value-type="percentage" office:value="0.193" calcext:value-type="percentage">
            <text:p>19.3%</text:p>
          </table:table-cell>
          <table:table-cell table:style-name="ce40" table:formula="of:=(MAX([.B43:.F43])-MIN([.B43:.F43]))/[.H43]*5" office:value-type="percentage" office:value="0.530300755004097" calcext:value-type="percentage">
            <text:p>53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8</text:p>
          </table:table-cell>
          <table:table-cell table:style-name="ce13" office:value-type="float" office:value="116" calcext:value-type="float">
            <text:p>116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8" calcext:value-type="float">
            <text:p>58</text:p>
          </table:table-cell>
          <table:table-cell table:style-name="ce21" office:value-type="float" office:value="72" calcext:value-type="float">
            <text:p>72</text:p>
          </table:table-cell>
          <table:table-cell table:style-name="ce25" table:formula="of:=SUMPRODUCT(([.B44:.F44]&lt;&gt;&quot;&quot;)*([.B44:.F44]/[.B$19:.F$19]) / SUM([.B44:.F44]&lt;&gt;&quot;&quot;))" office:value-type="float" office:value="11.2812587102784" calcext:value-type="float">
            <text:p>11.3</text:p>
          </table:table-cell>
          <table:table-cell table:style-name="ce38" table:formula="of:=[.G44]*[.H$19]" office:value-type="float" office:value="432.762824699387" calcext:value-type="float">
            <text:p>433</text:p>
          </table:table-cell>
          <table:table-cell table:style-name="ce35" table:formula="of:=STDEVP([.B44:.F44])/AVERAGE([.B44:.F44])" office:value-type="percentage" office:value="0.231367997444416" calcext:value-type="percentage">
            <text:p>23.1%</text:p>
          </table:table-cell>
          <table:table-cell table:style-name="ce39" table:formula="of:=IF([.H44]&gt;[.$A$7]; [.$C$7]; IF([.H44]&gt;[.$A$8]; [.$C$8]; IF([.H44]&gt;[.$A$9];[.$C$9];IF([.H44]&gt;[.$A$10];[.$C$10]; IF([.H44]&gt;[.$A$11];[.$C$11];IF([.H44]&gt;[.$A$12];[.$C$12];[.$C$13]))))))/100" office:value-type="percentage" office:value="0.193" calcext:value-type="percentage">
            <text:p>19.3%</text:p>
          </table:table-cell>
          <table:table-cell table:style-name="ce40" table:formula="of:=(MAX([.B44:.F44])-MIN([.B44:.F44]))/[.H44]*5" office:value-type="percentage" office:value="0.670113012136485" calcext:value-type="percentage">
            <text:p>67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99" calcext:value-type="float">
            <text:p>9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5" calcext:value-type="float">
            <text:p>45</text:p>
          </table:table-cell>
          <table:table-cell table:style-name="ce21" office:value-type="float" office:value="63" calcext:value-type="float">
            <text:p>63</text:p>
          </table:table-cell>
          <table:table-cell table:style-name="ce25" table:formula="of:=SUMPRODUCT(([.B45:.F45]&lt;&gt;&quot;&quot;)*([.B45:.F45]/[.B$19:.F$19]) / SUM([.B45:.F45]&lt;&gt;&quot;&quot;))" office:value-type="float" office:value="9.50258997198839" calcext:value-type="float">
            <text:p>9.5</text:p>
          </table:table-cell>
          <table:table-cell table:style-name="ce38" table:formula="of:=[.G45]*[.H$19]" office:value-type="float" office:value="364.53092548006" calcext:value-type="float">
            <text:p>365</text:p>
          </table:table-cell>
          <table:table-cell table:style-name="ce35" table:formula="of:=STDEVP([.B45:.F45])/AVERAGE([.B45:.F45])" office:value-type="percentage" office:value="0.247719527783651" calcext:value-type="percentage">
            <text:p>24.8%</text:p>
          </table:table-cell>
          <table:table-cell table:style-name="ce39" table:formula="of:=IF([.H45]&gt;[.$A$7]; [.$C$7]; IF([.H45]&gt;[.$A$8]; [.$C$8]; IF([.H45]&gt;[.$A$9];[.$C$9];IF([.H45]&gt;[.$A$10];[.$C$10]; IF([.H45]&gt;[.$A$11];[.$C$11];IF([.H45]&gt;[.$A$12];[.$C$12];[.$C$13]))))))/100" office:value-type="percentage" office:value="0.193" calcext:value-type="percentage">
            <text:p>19.3%</text:p>
          </table:table-cell>
          <table:table-cell table:style-name="ce40" table:formula="of:=(MAX([.B45:.F45])-MIN([.B45:.F45]))/[.H45]*5" office:value-type="percentage" office:value="0.740677898986019" calcext:value-type="percentage">
            <text:p>74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6" office:value-type="float" office:value="68" calcext:value-type="float">
            <text:p>68</text:p>
          </table:table-cell>
          <table:table-cell table:style-name="ce16" office:value-type="float" office:value="35" calcext:value-type="float">
            <text:p>35</text:p>
          </table:table-cell>
          <table:table-cell table:style-name="ce21" office:value-type="float" office:value="49" calcext:value-type="float">
            <text:p>49</text:p>
          </table:table-cell>
          <table:table-cell table:style-name="ce25" table:formula="of:=SUMPRODUCT(([.B46:.F46]&lt;&gt;&quot;&quot;)*([.B46:.F46]/[.B$19:.F$19]) / SUM([.B46:.F46]&lt;&gt;&quot;&quot;))" office:value-type="float" office:value="8.0684873003604" calcext:value-type="float">
            <text:p>8.1</text:p>
          </table:table-cell>
          <table:table-cell table:style-name="ce38" table:formula="of:=[.G46]*[.H$19]" office:value-type="float" office:value="309.517000259357" calcext:value-type="float">
            <text:p>310</text:p>
          </table:table-cell>
          <table:table-cell table:style-name="ce35" table:formula="of:=STDEVP([.B46:.F46])/AVERAGE([.B46:.F46])" office:value-type="percentage" office:value="0.294471749178526" calcext:value-type="percentage">
            <text:p>29.4%</text:p>
          </table:table-cell>
          <table:table-cell table:style-name="ce39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40" table:formula="of:=(MAX([.B46:.F46])-MIN([.B46:.F46]))/[.H46]*5" office:value-type="percentage" office:value="0.856172681235428" calcext:value-type="percentage">
            <text:p>85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table:style-name="ce25" table:formula="of:=SUMPRODUCT(([.B47:.F47]&lt;&gt;&quot;&quot;)*([.B47:.F47]/[.B$19:.F$19]) / SUM([.B47:.F47]&lt;&gt;&quot;&quot;))" office:value-type="float" office:value="2.62130617214153" calcext:value-type="float">
            <text:p>2.6</text:p>
          </table:table-cell>
          <table:table-cell table:style-name="ce38" table:formula="of:=[.G47]*[.H$19]" office:value-type="float" office:value="100.556497514267" calcext:value-type="float">
            <text:p>101</text:p>
          </table:table-cell>
          <table:table-cell table:style-name="ce35" table:formula="of:=STDEVP([.B47:.F47])/AVERAGE([.B47:.F47])" office:value-type="percentage" office:value="0.49295030175465" calcext:value-type="percentage">
            <text:p>49.3%</text:p>
          </table:table-cell>
          <table:table-cell table:style-name="ce39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40" table:formula="of:=(MAX([.B47:.F47])-MIN([.B47:.F47]))/[.H47]*5" office:value-type="percentage" office:value="1.19335898690162" calcext:value-type="percentage">
            <text:p>119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5" table:formula="of:=SUMPRODUCT(([.B48:.F48]&lt;&gt;&quot;&quot;)*([.B48:.F48]/[.B$19:.F$19]) / SUM([.B48:.F48]&lt;&gt;&quot;&quot;))" office:value-type="float" office:value="0.500811495719933" calcext:value-type="float">
            <text:p>0.5</text:p>
          </table:table-cell>
          <table:table-cell table:style-name="ce38" table:formula="of:=[.G48]*[.H$19]" office:value-type="float" office:value="19.2117389642184" calcext:value-type="float">
            <text:p>19</text:p>
          </table:table-cell>
          <table:table-cell table:style-name="ce35" table:formula="of:=STDEVP([.B48:.F48])/AVERAGE([.B48:.F48])" office:value-type="percentage" office:value="0.653140718210045" calcext:value-type="percentage">
            <text:p>65.3%</text:p>
          </table:table-cell>
          <table:table-cell table:style-name="ce39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40" table:formula="of:=(MAX([.B48:.F48])-MIN([.B48:.F48]))/[.H48]*5" office:value-type="percentage" office:value="1.82180280843848" calcext:value-type="percentage">
            <text:p>182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PRODUCT(([.B49:.F49]&lt;&gt;&quot;&quot;)*([.B49:.F49]/[.B$19:.F$19]) / SUM([.B49:.F49]&lt;&gt;&quot;&quot;))" office:value-type="float" office:value="0.131652543832796" calcext:value-type="float">
            <text:p>0.1</text:p>
          </table:table-cell>
          <table:table-cell table:style-name="ce38" table:formula="of:=[.G49]*[.H$19]" office:value-type="float" office:value="5.05035193422443" calcext:value-type="float">
            <text:p>5</text:p>
          </table:table-cell>
          <table:table-cell table:style-name="ce35" table:formula="of:=STDEVP([.B49:.F49])/AVERAGE([.B49:.F49])" office:value-type="percentage" office:value="0.894427190999916" calcext:value-type="percentage">
            <text:p>89.4%</text:p>
          </table:table-cell>
          <table:table-cell table:style-name="ce39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40" table:formula="of:=(MAX([.B49:.F49])-MIN([.B49:.F49]))/[.H49]*5" office:value-type="percentage" office:value="1.98006002952657" calcext:value-type="percentage">
            <text:p>198.0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MTD large sizes fall-off'.H20:'MTD large sizes fall-off'.H49">
            <calcext:condition calcext:apply-style-name="Good" calcext:value="&gt;1000" calcext:base-cell-address="'MTD large sizes fall-off'.H20"/>
          </calcext:conditional-format>
          <calcext:conditional-format calcext:target-range-address="'MTD large sizes fall-off'.K20:'MTD large sizes fall-off'.K49">
            <calcext:condition calcext:apply-style-name="Good" calcext:value="&lt;[.J20]" calcext:base-cell-address="'MTD large sizes fall-off'.K20"/>
          </calcext:conditional-format>
        </calcext:conditional-formats>
      </table:table>
      <table:table table:name="500ml bottle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345023" calcext:value-type="float">
            <text:p>7.3</text:p>
          </table:table-cell>
          <table:table-cell table:style-name="ce15" office:value-type="float" office:value="7.747107" calcext:value-type="float">
            <text:p>7.7</text:p>
          </table:table-cell>
          <table:table-cell table:style-name="ce15" office:value-type="float" office:value="7.688333" calcext:value-type="float">
            <text:p>7.7</text:p>
          </table:table-cell>
          <table:table-cell table:style-name="ce15" office:value-type="float" office:value="7.742381" calcext:value-type="float">
            <text:p>7.7</text:p>
          </table:table-cell>
          <table:table-cell table:style-name="ce20" office:value-type="float" office:value="7.751106" calcext:value-type="float">
            <text:p>7.8</text:p>
          </table:table-cell>
          <table:table-cell table:style-name="ce24"/>
          <table:table-cell table:style-name="ce32" table:formula="of:=SUM([.B19:.F19])" office:value-type="float" office:value="38.27395" calcext:value-type="float">
            <text:p>38.3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41420" calcext:value-type="float">
            <text:p>41420</text:p>
          </table:table-cell>
          <table:table-cell table:style-name="ce16"/>
          <table:table-cell table:style-name="ce16" office:value-type="float" office:value="43732" calcext:value-type="float">
            <text:p>43732</text:p>
          </table:table-cell>
          <table:table-cell table:style-name="ce16" office:value-type="float" office:value="42549" calcext:value-type="float">
            <text:p>42549</text:p>
          </table:table-cell>
          <table:table-cell table:style-name="ce21" office:value-type="float" office:value="43004" calcext:value-type="float">
            <text:p>43004</text:p>
          </table:table-cell>
          <table:table-cell table:style-name="ce25" table:formula="of:=SUMPRODUCT(([.B20:.F20]&lt;&gt;&quot;&quot;)*([.B20:.F20]/[.B$19:.F$19]) / SUM([.B20:.F20]&lt;&gt;&quot;&quot;))" office:value-type="float" office:value="5592.74987358452" calcext:value-type="float">
            <text:p>5592.7</text:p>
          </table:table-cell>
          <table:table-cell table:style-name="ce41" table:formula="of:=[.G20]*[.H$19]" office:value-type="float" office:value="214056.62902408" calcext:value-type="float">
            <text:p>214057</text:p>
          </table:table-cell>
          <table:table-cell table:style-name="ce35" table:formula="of:=STDEVP([.B20:.F20])/AVERAGE([.B20:.F20])" office:value-type="percentage" office:value="0.0196620929924166" calcext:value-type="percentage">
            <text:p>2.0%</text:p>
          </table:table-cell>
          <table:table-cell table:style-name="ce42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43" table:formula="of:=(MAX([.B20:.F20])-MIN([.B20:.F20]))/[.H20]*5" office:value-type="percentage" office:value="0.0540044008573991" calcext:value-type="percentage">
            <text:p>5.4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26226" calcext:value-type="float">
            <text:p>26226</text:p>
          </table:table-cell>
          <table:table-cell table:style-name="ce16"/>
          <table:table-cell table:style-name="ce16" office:value-type="float" office:value="27711" calcext:value-type="float">
            <text:p>27711</text:p>
          </table:table-cell>
          <table:table-cell table:style-name="ce16" office:value-type="float" office:value="27171" calcext:value-type="float">
            <text:p>27171</text:p>
          </table:table-cell>
          <table:table-cell table:style-name="ce21" office:value-type="float" office:value="27423" calcext:value-type="float">
            <text:p>27423</text:p>
          </table:table-cell>
          <table:table-cell table:style-name="ce25" table:formula="of:=SUMPRODUCT(([.B21:.F21]&lt;&gt;&quot;&quot;)*([.B21:.F21]/[.B$19:.F$19]) / SUM([.B21:.F21]&lt;&gt;&quot;&quot;))" office:value-type="float" office:value="3555.55142395787" calcext:value-type="float">
            <text:p>3555.6</text:p>
          </table:table-cell>
          <table:table-cell table:style-name="ce41" table:formula="of:=[.G21]*[.H$19]" office:value-type="float" office:value="136084.997422992" calcext:value-type="float">
            <text:p>136085</text:p>
          </table:table-cell>
          <table:table-cell table:style-name="ce35" table:formula="of:=STDEVP([.B21:.F21])/AVERAGE([.B21:.F21])" office:value-type="percentage" office:value="0.020539287294332" calcext:value-type="percentage">
            <text:p>2.1%</text:p>
          </table:table-cell>
          <table:table-cell table:style-name="ce42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43" table:formula="of:=(MAX([.B21:.F21])-MIN([.B21:.F21]))/[.H21]*5" office:value-type="percentage" office:value="0.0545614883389453" calcext:value-type="percentage">
            <text:p>5.5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16719" calcext:value-type="float">
            <text:p>16719</text:p>
          </table:table-cell>
          <table:table-cell table:style-name="ce16"/>
          <table:table-cell table:style-name="ce16" office:value-type="float" office:value="17622" calcext:value-type="float">
            <text:p>17622</text:p>
          </table:table-cell>
          <table:table-cell table:style-name="ce16" office:value-type="float" office:value="17284" calcext:value-type="float">
            <text:p>17284</text:p>
          </table:table-cell>
          <table:table-cell table:style-name="ce21" office:value-type="float" office:value="17514" calcext:value-type="float">
            <text:p>17514</text:p>
          </table:table-cell>
          <table:table-cell table:style-name="ce25" table:formula="of:=SUMPRODUCT(([.B22:.F22]&lt;&gt;&quot;&quot;)*([.B22:.F22]/[.B$19:.F$19]) / SUM([.B22:.F22]&lt;&gt;&quot;&quot;))" office:value-type="float" office:value="2265.05406162988" calcext:value-type="float">
            <text:p>2265.1</text:p>
          </table:table-cell>
          <table:table-cell table:style-name="ce41" table:formula="of:=[.G22]*[.H$19]" office:value-type="float" office:value="86692.5659021191" calcext:value-type="float">
            <text:p>86693</text:p>
          </table:table-cell>
          <table:table-cell table:style-name="ce35" table:formula="of:=STDEVP([.B22:.F22])/AVERAGE([.B22:.F22])" office:value-type="percentage" office:value="0.0201738524662061" calcext:value-type="percentage">
            <text:p>2.0%</text:p>
          </table:table-cell>
          <table:table-cell table:style-name="ce42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43" table:formula="of:=(MAX([.B22:.F22])-MIN([.B22:.F22]))/[.H22]*5" office:value-type="percentage" office:value="0.0520805902215156" calcext:value-type="percentage">
            <text:p>5.2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10791" calcext:value-type="float">
            <text:p>10791</text:p>
          </table:table-cell>
          <table:table-cell table:style-name="ce16"/>
          <table:table-cell table:style-name="ce16" office:value-type="float" office:value="11273" calcext:value-type="float">
            <text:p>11273</text:p>
          </table:table-cell>
          <table:table-cell table:style-name="ce16" office:value-type="float" office:value="11139" calcext:value-type="float">
            <text:p>11139</text:p>
          </table:table-cell>
          <table:table-cell table:style-name="ce21" office:value-type="float" office:value="11283" calcext:value-type="float">
            <text:p>11283</text:p>
          </table:table-cell>
          <table:table-cell table:style-name="ce25" table:formula="of:=SUMPRODUCT(([.B23:.F23]&lt;&gt;&quot;&quot;)*([.B23:.F23]/[.B$19:.F$19]) / SUM([.B23:.F23]&lt;&gt;&quot;&quot;))" office:value-type="float" office:value="1457.44341476926" calcext:value-type="float">
            <text:p>1457.4</text:p>
          </table:table-cell>
          <table:table-cell table:style-name="ce41" table:formula="of:=[.G23]*[.H$19]" office:value-type="float" office:value="55782.1163847078" calcext:value-type="float">
            <text:p>55782</text:p>
          </table:table-cell>
          <table:table-cell table:style-name="ce35" table:formula="of:=STDEVP([.B23:.F23])/AVERAGE([.B23:.F23])" office:value-type="percentage" office:value="0.0179026994437846" calcext:value-type="percentage">
            <text:p>1.8%</text:p>
          </table:table-cell>
          <table:table-cell table:style-name="ce42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43" table:formula="of:=(MAX([.B23:.F23])-MIN([.B23:.F23]))/[.H23]*5" office:value-type="percentage" office:value="0.0441001553801639" calcext:value-type="percentage">
            <text:p>4.4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7475" calcext:value-type="float">
            <text:p>7475</text:p>
          </table:table-cell>
          <table:table-cell table:style-name="ce16"/>
          <table:table-cell table:style-name="ce16" office:value-type="float" office:value="7690" calcext:value-type="float">
            <text:p>7690</text:p>
          </table:table-cell>
          <table:table-cell table:style-name="ce16" office:value-type="float" office:value="7665" calcext:value-type="float">
            <text:p>7665</text:p>
          </table:table-cell>
          <table:table-cell table:style-name="ce21" office:value-type="float" office:value="7823" calcext:value-type="float">
            <text:p>7823</text:p>
          </table:table-cell>
          <table:table-cell table:style-name="ce25" table:formula="of:=SUMPRODUCT(([.B24:.F24]&lt;&gt;&quot;&quot;)*([.B24:.F24]/[.B$19:.F$19]) / SUM([.B24:.F24]&lt;&gt;&quot;&quot;))" office:value-type="float" office:value="1004.29840026843" calcext:value-type="float">
            <text:p>1004.3</text:p>
          </table:table-cell>
          <table:table-cell table:style-name="ce41" table:formula="of:=[.G24]*[.H$19]" office:value-type="float" office:value="38438.4667569539" calcext:value-type="float">
            <text:p>38438</text:p>
          </table:table-cell>
          <table:table-cell table:style-name="ce35" table:formula="of:=STDEVP([.B24:.F24])/AVERAGE([.B24:.F24])" office:value-type="percentage" office:value="0.0162038327126216" calcext:value-type="percentage">
            <text:p>1.6%</text:p>
          </table:table-cell>
          <table:table-cell table:style-name="ce42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43" table:formula="of:=(MAX([.B24:.F24])-MIN([.B24:.F24]))/[.H24]*5" office:value-type="percentage" office:value="0.0452671541506066" calcext:value-type="percentage">
            <text:p>4.5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5407" calcext:value-type="float">
            <text:p>5407</text:p>
          </table:table-cell>
          <table:table-cell table:style-name="ce16"/>
          <table:table-cell table:style-name="ce16" office:value-type="float" office:value="5532" calcext:value-type="float">
            <text:p>5532</text:p>
          </table:table-cell>
          <table:table-cell table:style-name="ce16" office:value-type="float" office:value="5526" calcext:value-type="float">
            <text:p>5526</text:p>
          </table:table-cell>
          <table:table-cell table:style-name="ce21" office:value-type="float" office:value="5590" calcext:value-type="float">
            <text:p>5590</text:p>
          </table:table-cell>
          <table:table-cell table:style-name="ce25" table:formula="of:=SUMPRODUCT(([.B25:.F25]&lt;&gt;&quot;&quot;)*([.B25:.F25]/[.B$19:.F$19]) / SUM([.B25:.F25]&lt;&gt;&quot;&quot;))" office:value-type="float" office:value="722.649463166983" calcext:value-type="float">
            <text:p>722.6</text:p>
          </table:table-cell>
          <table:table-cell table:style-name="ce41" table:formula="of:=[.G25]*[.H$19]" office:value-type="float" office:value="27658.64942078" calcext:value-type="float">
            <text:p>27659</text:p>
          </table:table-cell>
          <table:table-cell table:style-name="ce35" table:formula="of:=STDEVP([.B25:.F25])/AVERAGE([.B25:.F25])" office:value-type="percentage" office:value="0.0120620355472476" calcext:value-type="percentage">
            <text:p>1.2%</text:p>
          </table:table-cell>
          <table:table-cell table:style-name="ce42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43" table:formula="of:=(MAX([.B25:.F25])-MIN([.B25:.F25]))/[.H25]*5" office:value-type="percentage" office:value="0.0330818756216115" calcext:value-type="percentage">
            <text:p>3.3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4017" calcext:value-type="float">
            <text:p>4017</text:p>
          </table:table-cell>
          <table:table-cell table:style-name="ce16"/>
          <table:table-cell table:style-name="ce16" office:value-type="float" office:value="4145" calcext:value-type="float">
            <text:p>4145</text:p>
          </table:table-cell>
          <table:table-cell table:style-name="ce16" office:value-type="float" office:value="4101" calcext:value-type="float">
            <text:p>4101</text:p>
          </table:table-cell>
          <table:table-cell table:style-name="ce21" office:value-type="float" office:value="4196" calcext:value-type="float">
            <text:p>4196</text:p>
          </table:table-cell>
          <table:table-cell table:style-name="ce25" table:formula="of:=SUMPRODUCT(([.B26:.F26]&lt;&gt;&quot;&quot;)*([.B26:.F26]/[.B$19:.F$19]) / SUM([.B26:.F26]&lt;&gt;&quot;&quot;))" office:value-type="float" office:value="539.263408631404" calcext:value-type="float">
            <text:p>539.3</text:p>
          </table:table-cell>
          <table:table-cell table:style-name="ce41" table:formula="of:=[.G26]*[.H$19]" office:value-type="float" office:value="20639.7407387879" calcext:value-type="float">
            <text:p>20640</text:p>
          </table:table-cell>
          <table:table-cell table:style-name="ce35" table:formula="of:=STDEVP([.B26:.F26])/AVERAGE([.B26:.F26])" office:value-type="percentage" office:value="0.0159645389807742" calcext:value-type="percentage">
            <text:p>1.6%</text:p>
          </table:table-cell>
          <table:table-cell table:style-name="ce42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43" table:formula="of:=(MAX([.B26:.F26])-MIN([.B26:.F26]))/[.H26]*5" office:value-type="percentage" office:value="0.0433629477873257" calcext:value-type="percentage">
            <text:p>4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3115" calcext:value-type="float">
            <text:p>3115</text:p>
          </table:table-cell>
          <table:table-cell table:style-name="ce16"/>
          <table:table-cell table:style-name="ce16" office:value-type="float" office:value="3161" calcext:value-type="float">
            <text:p>3161</text:p>
          </table:table-cell>
          <table:table-cell table:style-name="ce16" office:value-type="float" office:value="3118" calcext:value-type="float">
            <text:p>3118</text:p>
          </table:table-cell>
          <table:table-cell table:style-name="ce21" office:value-type="float" office:value="3281" calcext:value-type="float">
            <text:p>3281</text:p>
          </table:table-cell>
          <table:table-cell table:style-name="ce25" table:formula="of:=SUMPRODUCT(([.B27:.F27]&lt;&gt;&quot;&quot;)*([.B27:.F27]/[.B$19:.F$19]) / SUM([.B27:.F27]&lt;&gt;&quot;&quot;))" office:value-type="float" office:value="415.313015415905" calcext:value-type="float">
            <text:p>415.3</text:p>
          </table:table-cell>
          <table:table-cell table:style-name="ce41" table:formula="of:=[.G27]*[.H$19]" office:value-type="float" office:value="15895.6695863776" calcext:value-type="float">
            <text:p>15896</text:p>
          </table:table-cell>
          <table:table-cell table:style-name="ce35" table:formula="of:=STDEVP([.B27:.F27])/AVERAGE([.B27:.F27])" office:value-type="percentage" office:value="0.0212431071713562" calcext:value-type="percentage">
            <text:p>2.1%</text:p>
          </table:table-cell>
          <table:table-cell table:style-name="ce42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43" table:formula="of:=(MAX([.B27:.F27])-MIN([.B27:.F27]))/[.H27]*5" office:value-type="percentage" office:value="0.0522154789069913" calcext:value-type="percentage">
            <text:p>5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2396" calcext:value-type="float">
            <text:p>2396</text:p>
          </table:table-cell>
          <table:table-cell table:style-name="ce16"/>
          <table:table-cell table:style-name="ce16" office:value-type="float" office:value="2424" calcext:value-type="float">
            <text:p>2424</text:p>
          </table:table-cell>
          <table:table-cell table:style-name="ce16" office:value-type="float" office:value="2350" calcext:value-type="float">
            <text:p>2350</text:p>
          </table:table-cell>
          <table:table-cell table:style-name="ce21" office:value-type="float" office:value="2552" calcext:value-type="float">
            <text:p>2552</text:p>
          </table:table-cell>
          <table:table-cell table:style-name="ce25" table:formula="of:=SUMPRODUCT(([.B28:.F28]&lt;&gt;&quot;&quot;)*([.B28:.F28]/[.B$19:.F$19]) / SUM([.B28:.F28]&lt;&gt;&quot;&quot;))" office:value-type="float" office:value="318.56443245152" calcext:value-type="float">
            <text:p>318.6</text:p>
          </table:table-cell>
          <table:table-cell table:style-name="ce41" table:formula="of:=[.G28]*[.H$19]" office:value-type="float" office:value="12192.7191594278" calcext:value-type="float">
            <text:p>12193</text:p>
          </table:table-cell>
          <table:table-cell table:style-name="ce35" table:formula="of:=STDEVP([.B28:.F28])/AVERAGE([.B28:.F28])" office:value-type="percentage" office:value="0.0308407001657374" calcext:value-type="percentage">
            <text:p>3.1%</text:p>
          </table:table-cell>
          <table:table-cell table:style-name="ce42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43" table:formula="of:=(MAX([.B28:.F28])-MIN([.B28:.F28]))/[.H28]*5" office:value-type="percentage" office:value="0.0828363211514662" calcext:value-type="percentage">
            <text:p>8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1872" calcext:value-type="float">
            <text:p>1872</text:p>
          </table:table-cell>
          <table:table-cell table:style-name="ce16"/>
          <table:table-cell table:style-name="ce16" office:value-type="float" office:value="1870" calcext:value-type="float">
            <text:p>1870</text:p>
          </table:table-cell>
          <table:table-cell table:style-name="ce16" office:value-type="float" office:value="1823" calcext:value-type="float">
            <text:p>1823</text:p>
          </table:table-cell>
          <table:table-cell table:style-name="ce21" office:value-type="float" office:value="2005" calcext:value-type="float">
            <text:p>2005</text:p>
          </table:table-cell>
          <table:table-cell table:style-name="ce25" table:formula="of:=SUMPRODUCT(([.B29:.F29]&lt;&gt;&quot;&quot;)*([.B29:.F29]/[.B$19:.F$19]) / SUM([.B29:.F29]&lt;&gt;&quot;&quot;))" office:value-type="float" office:value="248.055545438301" calcext:value-type="float">
            <text:p>248.1</text:p>
          </table:table-cell>
          <table:table-cell table:style-name="ce41" table:formula="of:=[.G29]*[.H$19]" office:value-type="float" office:value="9494.06554332825" calcext:value-type="float">
            <text:p>9494</text:p>
          </table:table-cell>
          <table:table-cell table:style-name="ce35" table:formula="of:=STDEVP([.B29:.F29])/AVERAGE([.B29:.F29])" office:value-type="percentage" office:value="0.0358505970508203" calcext:value-type="percentage">
            <text:p>3.6%</text:p>
          </table:table-cell>
          <table:table-cell table:style-name="ce42" table:formula="of:=IF([.H29]&gt;[.$A$7]; [.$C$7]; IF([.H29]&gt;[.$A$8]; [.$C$8]; IF([.H29]&gt;[.$A$9];[.$C$9];IF([.H29]&gt;[.$A$10];[.$C$10]; IF([.H29]&gt;[.$A$11];[.$C$11];IF([.H29]&gt;[.$A$12];[.$C$12];[.$C$13]))))))/100" office:value-type="percentage" office:value="0.113" calcext:value-type="percentage">
            <text:p>11.3%</text:p>
          </table:table-cell>
          <table:table-cell table:style-name="ce43" table:formula="of:=(MAX([.B29:.F29])-MIN([.B29:.F29]))/[.H29]*5" office:value-type="percentage" office:value="0.0958493488218525" calcext:value-type="percentage">
            <text:p>9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1484" calcext:value-type="float">
            <text:p>1484</text:p>
          </table:table-cell>
          <table:table-cell table:style-name="ce16"/>
          <table:table-cell table:style-name="ce16" office:value-type="float" office:value="1498" calcext:value-type="float">
            <text:p>1498</text:p>
          </table:table-cell>
          <table:table-cell table:style-name="ce16" office:value-type="float" office:value="1421" calcext:value-type="float">
            <text:p>1421</text:p>
          </table:table-cell>
          <table:table-cell table:style-name="ce21" office:value-type="float" office:value="1541" calcext:value-type="float">
            <text:p>1541</text:p>
          </table:table-cell>
          <table:table-cell table:style-name="ce25" table:formula="of:=SUMPRODUCT(([.B30:.F30]&lt;&gt;&quot;&quot;)*([.B30:.F30]/[.B$19:.F$19]) / SUM([.B30:.F30]&lt;&gt;&quot;&quot;))" office:value-type="float" office:value="194.806964549983" calcext:value-type="float">
            <text:p>194.8</text:p>
          </table:table-cell>
          <table:table-cell table:style-name="ce41" table:formula="of:=[.G30]*[.H$19]" office:value-type="float" office:value="7456.03202083782" calcext:value-type="float">
            <text:p>7456</text:p>
          </table:table-cell>
          <table:table-cell table:style-name="ce35" table:formula="of:=STDEVP([.B30:.F30])/AVERAGE([.B30:.F30])" office:value-type="percentage" office:value="0.0289406551551106" calcext:value-type="percentage">
            <text:p>2.9%</text:p>
          </table:table-cell>
          <table:table-cell table:style-name="ce42" table:formula="of:=IF([.H30]&gt;[.$A$7]; [.$C$7]; IF([.H30]&gt;[.$A$8]; [.$C$8]; IF([.H30]&gt;[.$A$9];[.$C$9];IF([.H30]&gt;[.$A$10];[.$C$10]; IF([.H30]&gt;[.$A$11];[.$C$11];IF([.H30]&gt;[.$A$12];[.$C$12];[.$C$13]))))))/100" office:value-type="percentage" office:value="0.113" calcext:value-type="percentage">
            <text:p>11.3%</text:p>
          </table:table-cell>
          <table:table-cell table:style-name="ce43" table:formula="of:=(MAX([.B30:.F30])-MIN([.B30:.F30]))/[.H30]*5" office:value-type="percentage" office:value="0.0804717574070423" calcext:value-type="percentage">
            <text:p>8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1165" calcext:value-type="float">
            <text:p>1165</text:p>
          </table:table-cell>
          <table:table-cell table:style-name="ce16"/>
          <table:table-cell table:style-name="ce16" office:value-type="float" office:value="1145" calcext:value-type="float">
            <text:p>1145</text:p>
          </table:table-cell>
          <table:table-cell table:style-name="ce16" office:value-type="float" office:value="1119" calcext:value-type="float">
            <text:p>1119</text:p>
          </table:table-cell>
          <table:table-cell table:style-name="ce21" office:value-type="float" office:value="1205" calcext:value-type="float">
            <text:p>1205</text:p>
          </table:table-cell>
          <table:table-cell table:style-name="ce25" table:formula="of:=SUMPRODUCT(([.B31:.F31]&lt;&gt;&quot;&quot;)*([.B31:.F31]/[.B$19:.F$19]) / SUM([.B31:.F31]&lt;&gt;&quot;&quot;))" office:value-type="float" office:value="151.882155901788" calcext:value-type="float">
            <text:p>151.9</text:p>
          </table:table-cell>
          <table:table-cell table:style-name="ce41" table:formula="of:=[.G31]*[.H$19]" office:value-type="float" office:value="5813.13004087725" calcext:value-type="float">
            <text:p>5813</text:p>
          </table:table-cell>
          <table:table-cell table:style-name="ce35" table:formula="of:=STDEVP([.B31:.F31])/AVERAGE([.B31:.F31])" office:value-type="percentage" office:value="0.0271148701760813" calcext:value-type="percentage">
            <text:p>2.7%</text:p>
          </table:table-cell>
          <table:table-cell table:style-name="ce42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43" table:formula="of:=(MAX([.B31:.F31])-MIN([.B31:.F31]))/[.H31]*5" office:value-type="percentage" office:value="0.0739704766582358" calcext:value-type="percentage">
            <text:p>7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883" calcext:value-type="float">
            <text:p>883</text:p>
          </table:table-cell>
          <table:table-cell table:style-name="ce16"/>
          <table:table-cell table:style-name="ce16" office:value-type="float" office:value="894" calcext:value-type="float">
            <text:p>894</text:p>
          </table:table-cell>
          <table:table-cell table:style-name="ce16" office:value-type="float" office:value="862" calcext:value-type="float">
            <text:p>862</text:p>
          </table:table-cell>
          <table:table-cell table:style-name="ce21" office:value-type="float" office:value="939" calcext:value-type="float">
            <text:p>939</text:p>
          </table:table-cell>
          <table:table-cell table:style-name="ce25" table:formula="of:=SUMPRODUCT(([.B32:.F32]&lt;&gt;&quot;&quot;)*([.B32:.F32]/[.B$19:.F$19]) / SUM([.B32:.F32]&lt;&gt;&quot;&quot;))" office:value-type="float" office:value="117.244200896137" calcext:value-type="float">
            <text:p>117.2</text:p>
          </table:table-cell>
          <table:table-cell table:style-name="ce41" table:formula="of:=[.G32]*[.H$19]" office:value-type="float" office:value="4487.39868288872" calcext:value-type="float">
            <text:p>4487</text:p>
          </table:table-cell>
          <table:table-cell table:style-name="ce35" table:formula="of:=STDEVP([.B32:.F32])/AVERAGE([.B32:.F32])" office:value-type="percentage" office:value="0.0314666695249582" calcext:value-type="percentage">
            <text:p>3.1%</text:p>
          </table:table-cell>
          <table:table-cell table:style-name="ce42" table:formula="of:=IF([.H32]&gt;[.$A$7]; [.$C$7]; IF([.H32]&gt;[.$A$8]; [.$C$8]; IF([.H32]&gt;[.$A$9];[.$C$9];IF([.H32]&gt;[.$A$10];[.$C$10]; IF([.H32]&gt;[.$A$11];[.$C$11];IF([.H32]&gt;[.$A$12];[.$C$12];[.$C$13]))))))/100" office:value-type="percentage" office:value="0.119" calcext:value-type="percentage">
            <text:p>11.9%</text:p>
          </table:table-cell>
          <table:table-cell table:style-name="ce43" table:formula="of:=(MAX([.B32:.F32])-MIN([.B32:.F32]))/[.H32]*5" office:value-type="percentage" office:value="0.085795808932261" calcext:value-type="percentage">
            <text:p>8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669" calcext:value-type="float">
            <text:p>669</text:p>
          </table:table-cell>
          <table:table-cell table:style-name="ce16"/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658" calcext:value-type="float">
            <text:p>658</text:p>
          </table:table-cell>
          <table:table-cell table:style-name="ce21" office:value-type="float" office:value="721" calcext:value-type="float">
            <text:p>721</text:p>
          </table:table-cell>
          <table:table-cell table:style-name="ce25" table:formula="of:=SUMPRODUCT(([.B33:.F33]&lt;&gt;&quot;&quot;)*([.B33:.F33]/[.B$19:.F$19]) / SUM([.B33:.F33]&lt;&gt;&quot;&quot;))" office:value-type="float" office:value="90.2288228234129" calcext:value-type="float">
            <text:p>90.2</text:p>
          </table:table-cell>
          <table:table-cell table:style-name="ce41" table:formula="of:=[.G33]*[.H$19]" office:value-type="float" office:value="3453.41345330217" calcext:value-type="float">
            <text:p>3453</text:p>
          </table:table-cell>
          <table:table-cell table:style-name="ce35" table:formula="of:=STDEVP([.B33:.F33])/AVERAGE([.B33:.F33])" office:value-type="percentage" office:value="0.0375461610884839" calcext:value-type="percentage">
            <text:p>3.8%</text:p>
          </table:table-cell>
          <table:table-cell table:style-name="ce42" table:formula="of:=IF([.H33]&gt;[.$A$7]; [.$C$7]; IF([.H33]&gt;[.$A$8]; [.$C$8]; IF([.H33]&gt;[.$A$9];[.$C$9];IF([.H33]&gt;[.$A$10];[.$C$10]; IF([.H33]&gt;[.$A$11];[.$C$11];IF([.H33]&gt;[.$A$12];[.$C$12];[.$C$13]))))))/100" office:value-type="percentage" office:value="0.119" calcext:value-type="percentage">
            <text:p>11.9%</text:p>
          </table:table-cell>
          <table:table-cell table:style-name="ce43" table:formula="of:=(MAX([.B33:.F33])-MIN([.B33:.F33]))/[.H33]*5" office:value-type="percentage" office:value="0.0912140999794844" calcext:value-type="percentage">
            <text:p>9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541" calcext:value-type="float">
            <text:p>541</text:p>
          </table:table-cell>
          <table:table-cell table:style-name="ce16"/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525" calcext:value-type="float">
            <text:p>525</text:p>
          </table:table-cell>
          <table:table-cell table:style-name="ce21" office:value-type="float" office:value="571" calcext:value-type="float">
            <text:p>571</text:p>
          </table:table-cell>
          <table:table-cell table:style-name="ce25" table:formula="of:=SUMPRODUCT(([.B34:.F34]&lt;&gt;&quot;&quot;)*([.B34:.F34]/[.B$19:.F$19]) / SUM([.B34:.F34]&lt;&gt;&quot;&quot;))" office:value-type="float" office:value="70.9190599310031" calcext:value-type="float">
            <text:p>70.9</text:p>
          </table:table-cell>
          <table:table-cell table:style-name="ce41" table:formula="of:=[.G34]*[.H$19]" office:value-type="float" office:value="2714.35255384622" calcext:value-type="float">
            <text:p>2714</text:p>
          </table:table-cell>
          <table:table-cell table:style-name="ce35" table:formula="of:=STDEVP([.B34:.F34])/AVERAGE([.B34:.F34])" office:value-type="percentage" office:value="0.033982950667006" calcext:value-type="percentage">
            <text:p>3.4%</text:p>
          </table:table-cell>
          <table:table-cell table:style-name="ce42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43" table:formula="of:=(MAX([.B34:.F34])-MIN([.B34:.F34]))/[.H34]*5" office:value-type="percentage" office:value="0.0847347555033305" calcext:value-type="percentage">
            <text:p>8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 office:value-type="float" office:value="414" calcext:value-type="float">
            <text:p>414</text:p>
          </table:table-cell>
          <table:table-cell table:style-name="ce16"/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16" calcext:value-type="float">
            <text:p>416</text:p>
          </table:table-cell>
          <table:table-cell table:style-name="ce21" office:value-type="float" office:value="451" calcext:value-type="float">
            <text:p>451</text:p>
          </table:table-cell>
          <table:table-cell table:style-name="ce25" table:formula="of:=SUMPRODUCT(([.B35:.F35]&lt;&gt;&quot;&quot;)*([.B35:.F35]/[.B$19:.F$19]) / SUM([.B35:.F35]&lt;&gt;&quot;&quot;))" office:value-type="float" office:value="55.629552266516" calcext:value-type="float">
            <text:p>55.6</text:p>
          </table:table-cell>
          <table:table-cell table:style-name="ce41" table:formula="of:=[.G35]*[.H$19]" office:value-type="float" office:value="2129.16270197102" calcext:value-type="float">
            <text:p>2129</text:p>
          </table:table-cell>
          <table:table-cell table:style-name="ce35" table:formula="of:=STDEVP([.B35:.F35])/AVERAGE([.B35:.F35])" office:value-type="percentage" office:value="0.0361315939933521" calcext:value-type="percentage">
            <text:p>3.6%</text:p>
          </table:table-cell>
          <table:table-cell table:style-name="ce42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43" table:formula="of:=(MAX([.B35:.F35])-MIN([.B35:.F35]))/[.H35]*5" office:value-type="percentage" office:value="0.0868886158059883" calcext:value-type="percentage">
            <text:p>8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334" calcext:value-type="float">
            <text:p>334</text:p>
          </table:table-cell>
          <table:table-cell table:style-name="ce16"/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37" calcext:value-type="float">
            <text:p>337</text:p>
          </table:table-cell>
          <table:table-cell table:style-name="ce21" office:value-type="float" office:value="365" calcext:value-type="float">
            <text:p>365</text:p>
          </table:table-cell>
          <table:table-cell table:style-name="ce25" table:formula="of:=SUMPRODUCT(([.B36:.F36]&lt;&gt;&quot;&quot;)*([.B36:.F36]/[.B$19:.F$19]) / SUM([.B36:.F36]&lt;&gt;&quot;&quot;))" office:value-type="float" office:value="45.3382681219034" calcext:value-type="float">
            <text:p>45.3</text:p>
          </table:table-cell>
          <table:table-cell table:style-name="ce41" table:formula="of:=[.G36]*[.H$19]" office:value-type="float" office:value="1735.27460718432" calcext:value-type="float">
            <text:p>1735</text:p>
          </table:table-cell>
          <table:table-cell table:style-name="ce35" table:formula="of:=STDEVP([.B36:.F36])/AVERAGE([.B36:.F36])" office:value-type="percentage" office:value="0.0351010341083558" calcext:value-type="percentage">
            <text:p>3.5%</text:p>
          </table:table-cell>
          <table:table-cell table:style-name="ce42" table:formula="of:=IF([.H36]&gt;[.$A$7]; [.$C$7]; IF([.H36]&gt;[.$A$8]; [.$C$8]; IF([.H36]&gt;[.$A$9];[.$C$9];IF([.H36]&gt;[.$A$10];[.$C$10]; IF([.H36]&gt;[.$A$11];[.$C$11];IF([.H36]&gt;[.$A$12];[.$C$12];[.$C$13]))))))/100" office:value-type="percentage" office:value="0.134" calcext:value-type="percentage">
            <text:p>13.4%</text:p>
          </table:table-cell>
          <table:table-cell table:style-name="ce43" table:formula="of:=(MAX([.B36:.F36])-MIN([.B36:.F36]))/[.H36]*5" office:value-type="percentage" office:value="0.0893230381855843" calcext:value-type="percentage">
            <text:p>8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269" calcext:value-type="float">
            <text:p>269</text:p>
          </table:table-cell>
          <table:table-cell table:style-name="ce16"/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83" calcext:value-type="float">
            <text:p>283</text:p>
          </table:table-cell>
          <table:table-cell table:style-name="ce21" office:value-type="float" office:value="294" calcext:value-type="float">
            <text:p>294</text:p>
          </table:table-cell>
          <table:table-cell table:style-name="ce25" table:formula="of:=SUMPRODUCT(([.B37:.F37]&lt;&gt;&quot;&quot;)*([.B37:.F37]/[.B$19:.F$19]) / SUM([.B37:.F37]&lt;&gt;&quot;&quot;))" office:value-type="float" office:value="36.7185137046384" calcext:value-type="float">
            <text:p>36.7</text:p>
          </table:table-cell>
          <table:table-cell table:style-name="ce41" table:formula="of:=[.G37]*[.H$19]" office:value-type="float" office:value="1405.36255760564" calcext:value-type="float">
            <text:p>1405</text:p>
          </table:table-cell>
          <table:table-cell table:style-name="ce35" table:formula="of:=STDEVP([.B37:.F37])/AVERAGE([.B37:.F37])" office:value-type="percentage" office:value="0.0334135964323426" calcext:value-type="percentage">
            <text:p>3.3%</text:p>
          </table:table-cell>
          <table:table-cell table:style-name="ce42" table:formula="of:=IF([.H37]&gt;[.$A$7]; [.$C$7]; IF([.H37]&gt;[.$A$8]; [.$C$8]; IF([.H37]&gt;[.$A$9];[.$C$9];IF([.H37]&gt;[.$A$10];[.$C$10]; IF([.H37]&gt;[.$A$11];[.$C$11];IF([.H37]&gt;[.$A$12];[.$C$12];[.$C$13]))))))/100" office:value-type="percentage" office:value="0.134" calcext:value-type="percentage">
            <text:p>13.4%</text:p>
          </table:table-cell>
          <table:table-cell table:style-name="ce43" table:formula="of:=(MAX([.B37:.F37])-MIN([.B37:.F37]))/[.H37]*5" office:value-type="percentage" office:value="0.0889450194353875" calcext:value-type="percentage">
            <text:p>8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222" calcext:value-type="float">
            <text:p>222</text:p>
          </table:table-cell>
          <table:table-cell table:style-name="ce16"/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9" calcext:value-type="float">
            <text:p>229</text:p>
          </table:table-cell>
          <table:table-cell table:style-name="ce21" office:value-type="float" office:value="236" calcext:value-type="float">
            <text:p>236</text:p>
          </table:table-cell>
          <table:table-cell table:style-name="ce25" table:formula="of:=SUMPRODUCT(([.B38:.F38]&lt;&gt;&quot;&quot;)*([.B38:.F38]/[.B$19:.F$19]) / SUM([.B38:.F38]&lt;&gt;&quot;&quot;))" office:value-type="float" office:value="29.9436340886816" calcext:value-type="float">
            <text:p>29.9</text:p>
          </table:table-cell>
          <table:table-cell table:style-name="ce41" table:formula="of:=[.G38]*[.H$19]" office:value-type="float" office:value="1146.06115392849" calcext:value-type="float">
            <text:p>1146</text:p>
          </table:table-cell>
          <table:table-cell table:style-name="ce35" table:formula="of:=STDEVP([.B38:.F38])/AVERAGE([.B38:.F38])" office:value-type="percentage" office:value="0.021990975100921" calcext:value-type="percentage">
            <text:p>2.2%</text:p>
          </table:table-cell>
          <table:table-cell table:style-name="ce42" table:formula="of:=IF([.H38]&gt;[.$A$7]; [.$C$7]; IF([.H38]&gt;[.$A$8]; [.$C$8]; IF([.H38]&gt;[.$A$9];[.$C$9];IF([.H38]&gt;[.$A$10];[.$C$10]; IF([.H38]&gt;[.$A$11];[.$C$11];IF([.H38]&gt;[.$A$12];[.$C$12];[.$C$13]))))))/100" office:value-type="percentage" office:value="0.134" calcext:value-type="percentage">
            <text:p>13.4%</text:p>
          </table:table-cell>
          <table:table-cell table:style-name="ce43" table:formula="of:=(MAX([.B38:.F38])-MIN([.B38:.F38]))/[.H38]*5" office:value-type="percentage" office:value="0.0610787650903728" calcext:value-type="percentage">
            <text:p>6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195" calcext:value-type="float">
            <text:p>195</text:p>
          </table:table-cell>
          <table:table-cell table:style-name="ce16"/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79" calcext:value-type="float">
            <text:p>179</text:p>
          </table:table-cell>
          <table:table-cell table:style-name="ce21" office:value-type="float" office:value="193" calcext:value-type="float">
            <text:p>193</text:p>
          </table:table-cell>
          <table:table-cell table:style-name="ce25" table:formula="of:=SUMPRODUCT(([.B39:.F39]&lt;&gt;&quot;&quot;)*([.B39:.F39]/[.B$19:.F$19]) / SUM([.B39:.F39]&lt;&gt;&quot;&quot;))" office:value-type="float" office:value="24.755099909525" calcext:value-type="float">
            <text:p>24.8</text:p>
          </table:table-cell>
          <table:table-cell table:style-name="ce41" table:formula="of:=[.G39]*[.H$19]" office:value-type="float" office:value="947.475456182166" calcext:value-type="float">
            <text:p>947</text:p>
          </table:table-cell>
          <table:table-cell table:style-name="ce35" table:formula="of:=STDEVP([.B39:.F39])/AVERAGE([.B39:.F39])" office:value-type="percentage" office:value="0.0327396214418762" calcext:value-type="percentage">
            <text:p>3.3%</text:p>
          </table:table-cell>
          <table:table-cell table:style-name="ce42" table:formula="of:=IF([.H39]&gt;[.$A$7]; [.$C$7]; IF([.H39]&gt;[.$A$8]; [.$C$8]; IF([.H39]&gt;[.$A$9];[.$C$9];IF([.H39]&gt;[.$A$10];[.$C$10]; IF([.H39]&gt;[.$A$11];[.$C$11];IF([.H39]&gt;[.$A$12];[.$C$12];[.$C$13]))))))/100" office:value-type="percentage" office:value="0.156" calcext:value-type="percentage">
            <text:p>15.6%</text:p>
          </table:table-cell>
          <table:table-cell table:style-name="ce43" table:formula="of:=(MAX([.B39:.F39])-MIN([.B39:.F39]))/[.H39]*5" office:value-type="percentage" office:value="0.0844349048600778" calcext:value-type="percentage">
            <text:p>8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4</text:p>
          </table:table-cell>
          <table:table-cell table:style-name="ce13" office:value-type="float" office:value="156" calcext:value-type="float">
            <text:p>156</text:p>
          </table:table-cell>
          <table:table-cell table:style-name="ce16"/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43" calcext:value-type="float">
            <text:p>143</text:p>
          </table:table-cell>
          <table:table-cell table:style-name="ce21" office:value-type="float" office:value="151" calcext:value-type="float">
            <text:p>151</text:p>
          </table:table-cell>
          <table:table-cell table:style-name="ce25" table:formula="of:=SUMPRODUCT(([.B40:.F40]&lt;&gt;&quot;&quot;)*([.B40:.F40]/[.B$19:.F$19]) / SUM([.B40:.F40]&lt;&gt;&quot;&quot;))" office:value-type="float" office:value="19.739987079167" calcext:value-type="float">
            <text:p>19.7</text:p>
          </table:table-cell>
          <table:table-cell table:style-name="ce41" table:formula="of:=[.G40]*[.H$19]" office:value-type="float" office:value="755.527278468685" calcext:value-type="float">
            <text:p>756</text:p>
          </table:table-cell>
          <table:table-cell table:style-name="ce35" table:formula="of:=STDEVP([.B40:.F40])/AVERAGE([.B40:.F40])" office:value-type="percentage" office:value="0.0313421300068326" calcext:value-type="percentage">
            <text:p>3.1%</text:p>
          </table:table-cell>
          <table:table-cell table:style-name="ce42" table:formula="of:=IF([.H40]&gt;[.$A$7]; [.$C$7]; IF([.H40]&gt;[.$A$8]; [.$C$8]; IF([.H40]&gt;[.$A$9];[.$C$9];IF([.H40]&gt;[.$A$10];[.$C$10]; IF([.H40]&gt;[.$A$11];[.$C$11];IF([.H40]&gt;[.$A$12];[.$C$12];[.$C$13]))))))/100" office:value-type="percentage" office:value="0.156" calcext:value-type="percentage">
            <text:p>15.6%</text:p>
          </table:table-cell>
          <table:table-cell table:style-name="ce43" table:formula="of:=(MAX([.B40:.F40])-MIN([.B40:.F40]))/[.H40]*5" office:value-type="percentage" office:value="0.0860326315837902" calcext:value-type="percentage">
            <text:p>8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 office:value-type="float" office:value="121" calcext:value-type="float">
            <text:p>121</text:p>
          </table:table-cell>
          <table:table-cell table:style-name="ce16"/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7" calcext:value-type="float">
            <text:p>127</text:p>
          </table:table-cell>
          <table:table-cell table:style-name="ce21" office:value-type="float" office:value="117" calcext:value-type="float">
            <text:p>117</text:p>
          </table:table-cell>
          <table:table-cell table:style-name="ce25" table:formula="of:=SUMPRODUCT(([.B41:.F41]&lt;&gt;&quot;&quot;)*([.B41:.F41]/[.B$19:.F$19]) / SUM([.B41:.F41]&lt;&gt;&quot;&quot;))" office:value-type="float" office:value="15.9599455353584" calcext:value-type="float">
            <text:p>16.0</text:p>
          </table:table-cell>
          <table:table-cell table:style-name="ce41" table:formula="of:=[.G41]*[.H$19]" office:value-type="float" office:value="610.850157423031" calcext:value-type="float">
            <text:p>611</text:p>
          </table:table-cell>
          <table:table-cell table:style-name="ce35" table:formula="of:=STDEVP([.B41:.F41])/AVERAGE([.B41:.F41])" office:value-type="percentage" office:value="0.0292562768968686" calcext:value-type="percentage">
            <text:p>2.9%</text:p>
          </table:table-cell>
          <table:table-cell table:style-name="ce42" table:formula="of:=IF([.H41]&gt;[.$A$7]; [.$C$7]; IF([.H41]&gt;[.$A$8]; [.$C$8]; IF([.H41]&gt;[.$A$9];[.$C$9];IF([.H41]&gt;[.$A$10];[.$C$10]; IF([.H41]&gt;[.$A$11];[.$C$11];IF([.H41]&gt;[.$A$12];[.$C$12];[.$C$13]))))))/100" office:value-type="percentage" office:value="0.156" calcext:value-type="percentage">
            <text:p>15.6%</text:p>
          </table:table-cell>
          <table:table-cell table:style-name="ce43" table:formula="of:=(MAX([.B41:.F41])-MIN([.B41:.F41]))/[.H41]*5" office:value-type="percentage" office:value="0.0818531343446533" calcext:value-type="percentage">
            <text:p>8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 office:value-type="float" office:value="94" calcext:value-type="float">
            <text:p>94</text:p>
          </table:table-cell>
          <table:table-cell table:style-name="ce16"/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7" calcext:value-type="float">
            <text:p>107</text:p>
          </table:table-cell>
          <table:table-cell table:style-name="ce21" office:value-type="float" office:value="102" calcext:value-type="float">
            <text:p>102</text:p>
          </table:table-cell>
          <table:table-cell table:style-name="ce25" table:formula="of:=SUMPRODUCT(([.B42:.F42]&lt;&gt;&quot;&quot;)*([.B42:.F42]/[.B$19:.F$19]) / SUM([.B42:.F42]&lt;&gt;&quot;&quot;))" office:value-type="float" office:value="13.3585721763104" calcext:value-type="float">
            <text:p>13.4</text:p>
          </table:table-cell>
          <table:table-cell table:style-name="ce41" table:formula="of:=[.G42]*[.H$19]" office:value-type="float" office:value="511.285323547494" calcext:value-type="float">
            <text:p>511</text:p>
          </table:table-cell>
          <table:table-cell table:style-name="ce35" table:formula="of:=STDEVP([.B42:.F42])/AVERAGE([.B42:.F42])" office:value-type="percentage" office:value="0.0485269359637827" calcext:value-type="percentage">
            <text:p>4.9%</text:p>
          </table:table-cell>
          <table:table-cell table:style-name="ce42" table:formula="of:=IF([.H42]&gt;[.$A$7]; [.$C$7]; IF([.H42]&gt;[.$A$8]; [.$C$8]; IF([.H42]&gt;[.$A$9];[.$C$9];IF([.H42]&gt;[.$A$10];[.$C$10]; IF([.H42]&gt;[.$A$11];[.$C$11];IF([.H42]&gt;[.$A$12];[.$C$12];[.$C$13]))))))/100" office:value-type="percentage" office:value="0.156" calcext:value-type="percentage">
            <text:p>15.6%</text:p>
          </table:table-cell>
          <table:table-cell table:style-name="ce43" table:formula="of:=(MAX([.B42:.F42])-MIN([.B42:.F42]))/[.H42]*5" office:value-type="percentage" office:value="0.127130580531835" calcext:value-type="percentage">
            <text:p>12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82" calcext:value-type="float">
            <text:p>82</text:p>
          </table:table-cell>
          <table:table-cell table:style-name="ce16"/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9" calcext:value-type="float">
            <text:p>89</text:p>
          </table:table-cell>
          <table:table-cell table:style-name="ce21" office:value-type="float" office:value="83" calcext:value-type="float">
            <text:p>83</text:p>
          </table:table-cell>
          <table:table-cell table:style-name="ce25" table:formula="of:=SUMPRODUCT(([.B43:.F43]&lt;&gt;&quot;&quot;)*([.B43:.F43]/[.B$19:.F$19]) / SUM([.B43:.F43]&lt;&gt;&quot;&quot;))" office:value-type="float" office:value="11.1382807810351" calcext:value-type="float">
            <text:p>11.1</text:p>
          </table:table-cell>
          <table:table-cell table:style-name="ce41" table:formula="of:=[.G43]*[.H$19]" office:value-type="float" office:value="426.3060016993" calcext:value-type="float">
            <text:p>426</text:p>
          </table:table-cell>
          <table:table-cell table:style-name="ce35" table:formula="of:=STDEVP([.B43:.F43])/AVERAGE([.B43:.F43])" office:value-type="percentage" office:value="0.0322189739708921" calcext:value-type="percentage">
            <text:p>3.2%</text:p>
          </table:table-cell>
          <table:table-cell table:style-name="ce42" table:formula="of:=IF([.H43]&gt;[.$A$7]; [.$C$7]; IF([.H43]&gt;[.$A$8]; [.$C$8]; IF([.H43]&gt;[.$A$9];[.$C$9];IF([.H43]&gt;[.$A$10];[.$C$10]; IF([.H43]&gt;[.$A$11];[.$C$11];IF([.H43]&gt;[.$A$12];[.$C$12];[.$C$13]))))))/100" office:value-type="percentage" office:value="0.193" calcext:value-type="percentage">
            <text:p>19.3%</text:p>
          </table:table-cell>
          <table:table-cell table:style-name="ce43" table:formula="of:=(MAX([.B43:.F43])-MIN([.B43:.F43]))/[.H43]*5" office:value-type="percentage" office:value="0.0821006503790385" calcext:value-type="percentage">
            <text:p>8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8</text:p>
          </table:table-cell>
          <table:table-cell table:style-name="ce13" office:value-type="float" office:value="74" calcext:value-type="float">
            <text:p>74</text:p>
          </table:table-cell>
          <table:table-cell table:style-name="ce16"/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7" calcext:value-type="float">
            <text:p>77</text:p>
          </table:table-cell>
          <table:table-cell table:style-name="ce21" office:value-type="float" office:value="73" calcext:value-type="float">
            <text:p>73</text:p>
          </table:table-cell>
          <table:table-cell table:style-name="ce25" table:formula="of:=SUMPRODUCT(([.B44:.F44]&lt;&gt;&quot;&quot;)*([.B44:.F44]/[.B$19:.F$19]) / SUM([.B44:.F44]&lt;&gt;&quot;&quot;))" office:value-type="float" office:value="9.79829041813945" calcext:value-type="float">
            <text:p>9.8</text:p>
          </table:table-cell>
          <table:table-cell table:style-name="ce41" table:formula="of:=[.G44]*[.H$19]" office:value-type="float" office:value="375.019277549348" calcext:value-type="float">
            <text:p>375</text:p>
          </table:table-cell>
          <table:table-cell table:style-name="ce35" table:formula="of:=STDEVP([.B44:.F44])/AVERAGE([.B44:.F44])" office:value-type="percentage" office:value="0.0197862200103666" calcext:value-type="percentage">
            <text:p>2.0%</text:p>
          </table:table-cell>
          <table:table-cell table:style-name="ce42" table:formula="of:=IF([.H44]&gt;[.$A$7]; [.$C$7]; IF([.H44]&gt;[.$A$8]; [.$C$8]; IF([.H44]&gt;[.$A$9];[.$C$9];IF([.H44]&gt;[.$A$10];[.$C$10]; IF([.H44]&gt;[.$A$11];[.$C$11];IF([.H44]&gt;[.$A$12];[.$C$12];[.$C$13]))))))/100" office:value-type="percentage" office:value="0.193" calcext:value-type="percentage">
            <text:p>19.3%</text:p>
          </table:table-cell>
          <table:table-cell table:style-name="ce43" table:formula="of:=(MAX([.B44:.F44])-MIN([.B44:.F44]))/[.H44]*5" office:value-type="percentage" office:value="0.0533305917783606" calcext:value-type="percentage">
            <text:p>5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61" calcext:value-type="float">
            <text:p>61</text:p>
          </table:table-cell>
          <table:table-cell table:style-name="ce16"/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21" office:value-type="float" office:value="60" calcext:value-type="float">
            <text:p>60</text:p>
          </table:table-cell>
          <table:table-cell table:style-name="ce25" table:formula="of:=SUMPRODUCT(([.B45:.F45]&lt;&gt;&quot;&quot;)*([.B45:.F45]/[.B$19:.F$19]) / SUM([.B45:.F45]&lt;&gt;&quot;&quot;))" office:value-type="float" office:value="8.19090241827728" calcext:value-type="float">
            <text:p>8.2</text:p>
          </table:table-cell>
          <table:table-cell table:style-name="ce41" table:formula="of:=[.G45]*[.H$19]" office:value-type="float" office:value="313.498189612024" calcext:value-type="float">
            <text:p>313</text:p>
          </table:table-cell>
          <table:table-cell table:style-name="ce35" table:formula="of:=STDEVP([.B45:.F45])/AVERAGE([.B45:.F45])" office:value-type="percentage" office:value="0.043081318457076" calcext:value-type="percentage">
            <text:p>4.3%</text:p>
          </table:table-cell>
          <table:table-cell table:style-name="ce42" table:formula="of:=IF([.H45]&gt;[.$A$7]; [.$C$7]; IF([.H45]&gt;[.$A$8]; [.$C$8]; IF([.H45]&gt;[.$A$9];[.$C$9];IF([.H45]&gt;[.$A$10];[.$C$10]; IF([.H45]&gt;[.$A$11];[.$C$11];IF([.H45]&gt;[.$A$12];[.$C$12];[.$C$13]))))))/100" office:value-type="percentage" office:value="0.193" calcext:value-type="percentage">
            <text:p>19.3%</text:p>
          </table:table-cell>
          <table:table-cell table:style-name="ce43" table:formula="of:=(MAX([.B45:.F45])-MIN([.B45:.F45]))/[.H45]*5" office:value-type="percentage" office:value="0.111643387935717" calcext:value-type="percentage">
            <text:p>11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54" calcext:value-type="float">
            <text:p>54</text:p>
          </table:table-cell>
          <table:table-cell table:style-name="ce16"/>
          <table:table-cell table:number-columns-repeated="2" table:style-name="ce16" office:value-type="float" office:value="54" calcext:value-type="float">
            <text:p>54</text:p>
          </table:table-cell>
          <table:table-cell table:style-name="ce21" office:value-type="float" office:value="52" calcext:value-type="float">
            <text:p>52</text:p>
          </table:table-cell>
          <table:table-cell table:style-name="ce25" table:formula="of:=SUMPRODUCT(([.B46:.F46]&lt;&gt;&quot;&quot;)*([.B46:.F46]/[.B$19:.F$19]) / SUM([.B46:.F46]&lt;&gt;&quot;&quot;))" office:value-type="float" office:value="7.01471622851754" calcext:value-type="float">
            <text:p>7.0</text:p>
          </table:table-cell>
          <table:table-cell table:style-name="ce41" table:formula="of:=[.G46]*[.H$19]" office:value-type="float" office:value="268.480898194469" calcext:value-type="float">
            <text:p>268</text:p>
          </table:table-cell>
          <table:table-cell table:style-name="ce35" table:formula="of:=STDEVP([.B46:.F46])/AVERAGE([.B46:.F46])" office:value-type="percentage" office:value="0.0161873907249428" calcext:value-type="percentage">
            <text:p>1.6%</text:p>
          </table:table-cell>
          <table:table-cell table:style-name="ce42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43" table:formula="of:=(MAX([.B46:.F46])-MIN([.B46:.F46]))/[.H46]*5" office:value-type="percentage" office:value="0.0372465976806912" calcext:value-type="percentage">
            <text:p>3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18" calcext:value-type="float">
            <text:p>18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21" office:value-type="float" office:value="14" calcext:value-type="float">
            <text:p>14</text:p>
          </table:table-cell>
          <table:table-cell table:style-name="ce25" table:formula="of:=SUMPRODUCT(([.B47:.F47]&lt;&gt;&quot;&quot;)*([.B47:.F47]/[.B$19:.F$19]) / SUM([.B47:.F47]&lt;&gt;&quot;&quot;))" office:value-type="float" office:value="1.93807598824605" calcext:value-type="float">
            <text:p>1.9</text:p>
          </table:table-cell>
          <table:table-cell table:style-name="ce41" table:formula="of:=[.G47]*[.H$19]" office:value-type="float" office:value="74.1778234703298" calcext:value-type="float">
            <text:p>74</text:p>
          </table:table-cell>
          <table:table-cell table:style-name="ce35" table:formula="of:=STDEVP([.B47:.F47])/AVERAGE([.B47:.F47])" office:value-type="percentage" office:value="0.250824552321165" calcext:value-type="percentage">
            <text:p>25.1%</text:p>
          </table:table-cell>
          <table:table-cell table:style-name="ce42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43" table:formula="of:=(MAX([.B47:.F47])-MIN([.B47:.F47]))/[.H47]*5" office:value-type="percentage" office:value="0.6066503153466" calcext:value-type="percentage">
            <text:p>60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5" table:formula="of:=SUMPRODUCT(([.B48:.F48]&lt;&gt;&quot;&quot;)*([.B48:.F48]/[.B$19:.F$19]) / SUM([.B48:.F48]&lt;&gt;&quot;&quot;))" office:value-type="float" office:value="0.651799289627332" calcext:value-type="float">
            <text:p>0.7</text:p>
          </table:table-cell>
          <table:table-cell table:style-name="ce41" table:formula="of:=[.G48]*[.H$19]" office:value-type="float" office:value="24.946933421232" calcext:value-type="float">
            <text:p>25</text:p>
          </table:table-cell>
          <table:table-cell table:style-name="ce35" table:formula="of:=STDEVP([.B48:.F48])/AVERAGE([.B48:.F48])" office:value-type="percentage" office:value="0.469041575982343" calcext:value-type="percentage">
            <text:p>46.9%</text:p>
          </table:table-cell>
          <table:table-cell table:style-name="ce42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43" table:formula="of:=(MAX([.B48:.F48])-MIN([.B48:.F48]))/[.H48]*5" office:value-type="percentage" office:value="1.2025526141208" calcext:value-type="percentage">
            <text:p>120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0" calcext:value-type="float">
            <text:p>0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5" table:formula="of:=SUMPRODUCT(([.B49:.F49]&lt;&gt;&quot;&quot;)*([.B49:.F49]/[.B$19:.F$19]) / SUM([.B49:.F49]&lt;&gt;&quot;&quot;))" office:value-type="float" office:value="0.193929497482567" calcext:value-type="float">
            <text:p>0.2</text:p>
          </table:table-cell>
          <table:table-cell table:style-name="ce41" table:formula="of:=[.G49]*[.H$19]" office:value-type="float" office:value="7.42244789017291" calcext:value-type="float">
            <text:p>7</text:p>
          </table:table-cell>
          <table:table-cell table:style-name="ce35" table:formula="of:=STDEVP([.B49:.F49])/AVERAGE([.B49:.F49])" office:value-type="percentage" office:value="1" calcext:value-type="percentage">
            <text:p>100.0%</text:p>
          </table:table-cell>
          <table:table-cell table:style-name="ce42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43" table:formula="of:=(MAX([.B49:.F49])-MIN([.B49:.F49]))/[.H49]*5" office:value-type="percentage" office:value="2.69452885300541" calcext:value-type="percentage">
            <text:p>269.5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500ml bottle'.H20:'500ml bottle'.H49">
            <calcext:condition calcext:apply-style-name="Good" calcext:value="&gt;1000" calcext:base-cell-address="'500ml bottle'.H20"/>
          </calcext:conditional-format>
          <calcext:conditional-format calcext:target-range-address="'500ml bottle'.K20:'500ml bottle'.K49">
            <calcext:condition calcext:apply-style-name="Good" calcext:value="&lt;[.J20]" calcext:base-cell-address="'500ml bottle'.K20"/>
          </calcext:conditional-format>
        </calcext:conditional-formats>
      </table:table>
      <table:table table:name="500 ml bottle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385412" calcext:value-type="float">
            <text:p>7.4</text:p>
          </table:table-cell>
          <table:table-cell table:style-name="ce15" office:value-type="float" office:value="7.684801" calcext:value-type="float">
            <text:p>7.7</text:p>
          </table:table-cell>
          <table:table-cell table:style-name="ce15" office:value-type="float" office:value="7.781734" calcext:value-type="float">
            <text:p>7.8</text:p>
          </table:table-cell>
          <table:table-cell table:style-name="ce15" office:value-type="float" office:value="7.76295" calcext:value-type="float">
            <text:p>7.8</text:p>
          </table:table-cell>
          <table:table-cell table:style-name="ce20" office:value-type="float" office:value="7.75356" calcext:value-type="float">
            <text:p>7.8</text:p>
          </table:table-cell>
          <table:table-cell table:style-name="ce24"/>
          <table:table-cell table:style-name="ce32" table:formula="of:=SUM([.B19:.F19])" office:value-type="float" office:value="38.368457" calcext:value-type="float">
            <text:p>38.4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42523" calcext:value-type="float">
            <text:p>42523</text:p>
          </table:table-cell>
          <table:table-cell table:style-name="ce16" office:value-type="float" office:value="42328" calcext:value-type="float">
            <text:p>42328</text:p>
          </table:table-cell>
          <table:table-cell table:style-name="ce16" office:value-type="float" office:value="41813" calcext:value-type="float">
            <text:p>41813</text:p>
          </table:table-cell>
          <table:table-cell table:style-name="ce16" office:value-type="float" office:value="41977" calcext:value-type="float">
            <text:p>41977</text:p>
          </table:table-cell>
          <table:table-cell table:style-name="ce21" office:value-type="float" office:value="39658" calcext:value-type="float">
            <text:p>39658</text:p>
          </table:table-cell>
          <table:table-cell table:style-name="ce25" table:formula="of:=SUMPRODUCT(([.B20:.F20]&lt;&gt;&quot;&quot;)*([.B20:.F20]/[.B$19:.F$19]) / SUM([.B20:.F20]&lt;&gt;&quot;&quot;))" office:value-type="float" office:value="5432.22085777124" calcext:value-type="float">
            <text:p>5432.2</text:p>
          </table:table-cell>
          <table:table-cell table:style-name="ce44" table:formula="of:=[.G20]*[.H$19]" office:value-type="float" office:value="208425.932395899" calcext:value-type="float">
            <text:p>208426</text:p>
          </table:table-cell>
          <table:table-cell table:style-name="ce35" table:formula="of:=STDEVP([.B20:.F20])/AVERAGE([.B20:.F20])" office:value-type="percentage" office:value="0.0247669061616963" calcext:value-type="percentage">
            <text:p>2.5%</text:p>
          </table:table-cell>
          <table:table-cell table:style-name="ce45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46" table:formula="of:=(MAX([.B20:.F20])-MIN([.B20:.F20]))/[.H20]*5" office:value-type="percentage" office:value="0.0687294514426836" calcext:value-type="percentage">
            <text:p>6.9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27085" calcext:value-type="float">
            <text:p>27085</text:p>
          </table:table-cell>
          <table:table-cell table:style-name="ce16" office:value-type="float" office:value="27043" calcext:value-type="float">
            <text:p>27043</text:p>
          </table:table-cell>
          <table:table-cell table:style-name="ce16" office:value-type="float" office:value="26654" calcext:value-type="float">
            <text:p>26654</text:p>
          </table:table-cell>
          <table:table-cell table:style-name="ce16" office:value-type="float" office:value="26736" calcext:value-type="float">
            <text:p>26736</text:p>
          </table:table-cell>
          <table:table-cell table:style-name="ce21" office:value-type="float" office:value="25341" calcext:value-type="float">
            <text:p>25341</text:p>
          </table:table-cell>
          <table:table-cell table:style-name="ce25" table:formula="of:=SUMPRODUCT(([.B21:.F21]&lt;&gt;&quot;&quot;)*([.B21:.F21]/[.B$19:.F$19]) / SUM([.B21:.F21]&lt;&gt;&quot;&quot;))" office:value-type="float" office:value="3464.78924130729" calcext:value-type="float">
            <text:p>3464.8</text:p>
          </table:table-cell>
          <table:table-cell table:style-name="ce44" table:formula="of:=[.G21]*[.H$19]" office:value-type="float" office:value="132938.617019161" calcext:value-type="float">
            <text:p>132939</text:p>
          </table:table-cell>
          <table:table-cell table:style-name="ce35" table:formula="of:=STDEVP([.B21:.F21])/AVERAGE([.B21:.F21])" office:value-type="percentage" office:value="0.0240031652475099" calcext:value-type="percentage">
            <text:p>2.4%</text:p>
          </table:table-cell>
          <table:table-cell table:style-name="ce45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46" table:formula="of:=(MAX([.B21:.F21])-MIN([.B21:.F21]))/[.H21]*5" office:value-type="percentage" office:value="0.0655941832066985" calcext:value-type="percentage">
            <text:p>6.6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17154" calcext:value-type="float">
            <text:p>17154</text:p>
          </table:table-cell>
          <table:table-cell table:style-name="ce16" office:value-type="float" office:value="17336" calcext:value-type="float">
            <text:p>17336</text:p>
          </table:table-cell>
          <table:table-cell table:style-name="ce16" office:value-type="float" office:value="16926" calcext:value-type="float">
            <text:p>16926</text:p>
          </table:table-cell>
          <table:table-cell table:style-name="ce16" office:value-type="float" office:value="17034" calcext:value-type="float">
            <text:p>17034</text:p>
          </table:table-cell>
          <table:table-cell table:style-name="ce21" office:value-type="float" office:value="16323" calcext:value-type="float">
            <text:p>16323</text:p>
          </table:table-cell>
          <table:table-cell table:style-name="ce25" table:formula="of:=SUMPRODUCT(([.B22:.F22]&lt;&gt;&quot;&quot;)*([.B22:.F22]/[.B$19:.F$19]) / SUM([.B22:.F22]&lt;&gt;&quot;&quot;))" office:value-type="float" office:value="2210.63148878852" calcext:value-type="float">
            <text:p>2210.6</text:p>
          </table:table-cell>
          <table:table-cell table:style-name="ce44" table:formula="of:=[.G22]*[.H$19]" office:value-type="float" office:value="84818.5192204283" calcext:value-type="float">
            <text:p>84819</text:p>
          </table:table-cell>
          <table:table-cell table:style-name="ce35" table:formula="of:=STDEVP([.B22:.F22])/AVERAGE([.B22:.F22])" office:value-type="percentage" office:value="0.0202824000013249" calcext:value-type="percentage">
            <text:p>2.0%</text:p>
          </table:table-cell>
          <table:table-cell table:style-name="ce45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46" table:formula="of:=(MAX([.B22:.F22])-MIN([.B22:.F22]))/[.H22]*5" office:value-type="percentage" office:value="0.0597157324432529" calcext:value-type="percentage">
            <text:p>6.0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11073" calcext:value-type="float">
            <text:p>11073</text:p>
          </table:table-cell>
          <table:table-cell table:style-name="ce16" office:value-type="float" office:value="11249" calcext:value-type="float">
            <text:p>11249</text:p>
          </table:table-cell>
          <table:table-cell table:style-name="ce16" office:value-type="float" office:value="11021" calcext:value-type="float">
            <text:p>11021</text:p>
          </table:table-cell>
          <table:table-cell table:style-name="ce16" office:value-type="float" office:value="11023" calcext:value-type="float">
            <text:p>11023</text:p>
          </table:table-cell>
          <table:table-cell table:style-name="ce21" office:value-type="float" office:value="10642" calcext:value-type="float">
            <text:p>10642</text:p>
          </table:table-cell>
          <table:table-cell table:style-name="ce25" table:formula="of:=SUMPRODUCT(([.B23:.F23]&lt;&gt;&quot;&quot;)*([.B23:.F23]/[.B$19:.F$19]) / SUM([.B23:.F23]&lt;&gt;&quot;&quot;))" office:value-type="float" office:value="1434.37030238528" calcext:value-type="float">
            <text:p>1434.4</text:p>
          </table:table-cell>
          <table:table-cell table:style-name="ce44" table:formula="of:=[.G23]*[.H$19]" office:value-type="float" office:value="55034.5752691466" calcext:value-type="float">
            <text:p>55035</text:p>
          </table:table-cell>
          <table:table-cell table:style-name="ce35" table:formula="of:=STDEVP([.B23:.F23])/AVERAGE([.B23:.F23])" office:value-type="percentage" office:value="0.0180171664252262" calcext:value-type="percentage">
            <text:p>1.8%</text:p>
          </table:table-cell>
          <table:table-cell table:style-name="ce45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46" table:formula="of:=(MAX([.B23:.F23])-MIN([.B23:.F23]))/[.H23]*5" office:value-type="percentage" office:value="0.0551471504078542" calcext:value-type="percentage">
            <text:p>5.5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7621" calcext:value-type="float">
            <text:p>7621</text:p>
          </table:table-cell>
          <table:table-cell table:style-name="ce16" office:value-type="float" office:value="7832" calcext:value-type="float">
            <text:p>7832</text:p>
          </table:table-cell>
          <table:table-cell table:style-name="ce16" office:value-type="float" office:value="7644" calcext:value-type="float">
            <text:p>7644</text:p>
          </table:table-cell>
          <table:table-cell table:style-name="ce16" office:value-type="float" office:value="7600" calcext:value-type="float">
            <text:p>7600</text:p>
          </table:table-cell>
          <table:table-cell table:style-name="ce21" office:value-type="float" office:value="7356" calcext:value-type="float">
            <text:p>7356</text:p>
          </table:table-cell>
          <table:table-cell table:style-name="ce25" table:formula="of:=SUMPRODUCT(([.B24:.F24]&lt;&gt;&quot;&quot;)*([.B24:.F24]/[.B$19:.F$19]) / SUM([.B24:.F24]&lt;&gt;&quot;&quot;))" office:value-type="float" office:value="992.217753177827" calcext:value-type="float">
            <text:p>992.2</text:p>
          </table:table-cell>
          <table:table-cell table:style-name="ce44" table:formula="of:=[.G24]*[.H$19]" office:value-type="float" office:value="38069.8641974401" calcext:value-type="float">
            <text:p>38070</text:p>
          </table:table-cell>
          <table:table-cell table:style-name="ce35" table:formula="of:=STDEVP([.B24:.F24])/AVERAGE([.B24:.F24])" office:value-type="percentage" office:value="0.0199423157667049" calcext:value-type="percentage">
            <text:p>2.0%</text:p>
          </table:table-cell>
          <table:table-cell table:style-name="ce45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46" table:formula="of:=(MAX([.B24:.F24])-MIN([.B24:.F24]))/[.H24]*5" office:value-type="percentage" office:value="0.062516640134483" calcext:value-type="percentage">
            <text:p>6.3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5578" calcext:value-type="float">
            <text:p>5578</text:p>
          </table:table-cell>
          <table:table-cell table:style-name="ce16" office:value-type="float" office:value="5687" calcext:value-type="float">
            <text:p>5687</text:p>
          </table:table-cell>
          <table:table-cell table:style-name="ce16" office:value-type="float" office:value="5546" calcext:value-type="float">
            <text:p>5546</text:p>
          </table:table-cell>
          <table:table-cell table:style-name="ce16" office:value-type="float" office:value="5408" calcext:value-type="float">
            <text:p>5408</text:p>
          </table:table-cell>
          <table:table-cell table:style-name="ce21" office:value-type="float" office:value="5342" calcext:value-type="float">
            <text:p>5342</text:p>
          </table:table-cell>
          <table:table-cell table:style-name="ce25" table:formula="of:=SUMPRODUCT(([.B25:.F25]&lt;&gt;&quot;&quot;)*([.B25:.F25]/[.B$19:.F$19]) / SUM([.B25:.F25]&lt;&gt;&quot;&quot;))" office:value-type="float" office:value="718.723143248675" calcext:value-type="float">
            <text:p>718.7</text:p>
          </table:table-cell>
          <table:table-cell table:style-name="ce44" table:formula="of:=[.G25]*[.H$19]" office:value-type="float" office:value="27576.2980166416" calcext:value-type="float">
            <text:p>27576</text:p>
          </table:table-cell>
          <table:table-cell table:style-name="ce35" table:formula="of:=STDEVP([.B25:.F25])/AVERAGE([.B25:.F25])" office:value-type="percentage" office:value="0.0223447674658165" calcext:value-type="percentage">
            <text:p>2.2%</text:p>
          </table:table-cell>
          <table:table-cell table:style-name="ce45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46" table:formula="of:=(MAX([.B25:.F25])-MIN([.B25:.F25]))/[.H25]*5" office:value-type="percentage" office:value="0.062553719101781" calcext:value-type="percentage">
            <text:p>6.3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4148" calcext:value-type="float">
            <text:p>4148</text:p>
          </table:table-cell>
          <table:table-cell table:style-name="ce16" office:value-type="float" office:value="4217" calcext:value-type="float">
            <text:p>4217</text:p>
          </table:table-cell>
          <table:table-cell table:style-name="ce16" office:value-type="float" office:value="4135" calcext:value-type="float">
            <text:p>4135</text:p>
          </table:table-cell>
          <table:table-cell table:style-name="ce16" office:value-type="float" office:value="4056" calcext:value-type="float">
            <text:p>4056</text:p>
          </table:table-cell>
          <table:table-cell table:style-name="ce21" office:value-type="float" office:value="4028" calcext:value-type="float">
            <text:p>4028</text:p>
          </table:table-cell>
          <table:table-cell table:style-name="ce25" table:formula="of:=SUMPRODUCT(([.B26:.F26]&lt;&gt;&quot;&quot;)*([.B26:.F26]/[.B$19:.F$19]) / SUM([.B26:.F26]&lt;&gt;&quot;&quot;))" office:value-type="float" office:value="536.750181634467" calcext:value-type="float">
            <text:p>536.8</text:p>
          </table:table-cell>
          <table:table-cell table:style-name="ce44" table:formula="of:=[.G26]*[.H$19]" office:value-type="float" office:value="20594.2762637842" calcext:value-type="float">
            <text:p>20594</text:p>
          </table:table-cell>
          <table:table-cell table:style-name="ce35" table:formula="of:=STDEVP([.B26:.F26])/AVERAGE([.B26:.F26])" office:value-type="percentage" office:value="0.0164485246574198" calcext:value-type="percentage">
            <text:p>1.6%</text:p>
          </table:table-cell>
          <table:table-cell table:style-name="ce45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46" table:formula="of:=(MAX([.B26:.F26])-MIN([.B26:.F26]))/[.H26]*5" office:value-type="percentage" office:value="0.0458865360402014" calcext:value-type="percentage">
            <text:p>4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3160" calcext:value-type="float">
            <text:p>3160</text:p>
          </table:table-cell>
          <table:table-cell table:style-name="ce16" office:value-type="float" office:value="3214" calcext:value-type="float">
            <text:p>3214</text:p>
          </table:table-cell>
          <table:table-cell table:style-name="ce16" office:value-type="float" office:value="3143" calcext:value-type="float">
            <text:p>3143</text:p>
          </table:table-cell>
          <table:table-cell table:style-name="ce16" office:value-type="float" office:value="3109" calcext:value-type="float">
            <text:p>3109</text:p>
          </table:table-cell>
          <table:table-cell table:style-name="ce21" office:value-type="float" office:value="3081" calcext:value-type="float">
            <text:p>3081</text:p>
          </table:table-cell>
          <table:table-cell table:style-name="ce25" table:formula="of:=SUMPRODUCT(([.B27:.F27]&lt;&gt;&quot;&quot;)*([.B27:.F27]/[.B$19:.F$19]) / SUM([.B27:.F27]&lt;&gt;&quot;&quot;))" office:value-type="float" office:value="409.570227743728" calcext:value-type="float">
            <text:p>409.6</text:p>
          </table:table-cell>
          <table:table-cell table:style-name="ce44" table:formula="of:=[.G27]*[.H$19]" office:value-type="float" office:value="15714.5776716654" calcext:value-type="float">
            <text:p>15715</text:p>
          </table:table-cell>
          <table:table-cell table:style-name="ce35" table:formula="of:=STDEVP([.B27:.F27])/AVERAGE([.B27:.F27])" office:value-type="percentage" office:value="0.0144601461743037" calcext:value-type="percentage">
            <text:p>1.4%</text:p>
          </table:table-cell>
          <table:table-cell table:style-name="ce45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46" table:formula="of:=(MAX([.B27:.F27])-MIN([.B27:.F27]))/[.H27]*5" office:value-type="percentage" office:value="0.0423173955988041" calcext:value-type="percentage">
            <text:p>4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2430" calcext:value-type="float">
            <text:p>2430</text:p>
          </table:table-cell>
          <table:table-cell table:style-name="ce16" office:value-type="float" office:value="2474" calcext:value-type="float">
            <text:p>2474</text:p>
          </table:table-cell>
          <table:table-cell table:style-name="ce16" office:value-type="float" office:value="2416" calcext:value-type="float">
            <text:p>2416</text:p>
          </table:table-cell>
          <table:table-cell table:style-name="ce16" office:value-type="float" office:value="2438" calcext:value-type="float">
            <text:p>2438</text:p>
          </table:table-cell>
          <table:table-cell table:style-name="ce21" office:value-type="float" office:value="2381" calcext:value-type="float">
            <text:p>2381</text:p>
          </table:table-cell>
          <table:table-cell table:style-name="ce25" table:formula="of:=SUMPRODUCT(([.B28:.F28]&lt;&gt;&quot;&quot;)*([.B28:.F28]/[.B$19:.F$19]) / SUM([.B28:.F28]&lt;&gt;&quot;&quot;))" office:value-type="float" office:value="316.514486789294" calcext:value-type="float">
            <text:p>316.5</text:p>
          </table:table-cell>
          <table:table-cell table:style-name="ce44" table:formula="of:=[.G28]*[.H$19]" office:value-type="float" office:value="12144.1724762521" calcext:value-type="float">
            <text:p>12144</text:p>
          </table:table-cell>
          <table:table-cell table:style-name="ce35" table:formula="of:=STDEVP([.B28:.F28])/AVERAGE([.B28:.F28])" office:value-type="percentage" office:value="0.0124564185988538" calcext:value-type="percentage">
            <text:p>1.2%</text:p>
          </table:table-cell>
          <table:table-cell table:style-name="ce45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46" table:formula="of:=(MAX([.B28:.F28])-MIN([.B28:.F28]))/[.H28]*5" office:value-type="percentage" office:value="0.0382899700172496" calcext:value-type="percentage">
            <text:p>3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1878" calcext:value-type="float">
            <text:p>1878</text:p>
          </table:table-cell>
          <table:table-cell table:style-name="ce16" office:value-type="float" office:value="1939" calcext:value-type="float">
            <text:p>1939</text:p>
          </table:table-cell>
          <table:table-cell table:style-name="ce16" office:value-type="float" office:value="1878" calcext:value-type="float">
            <text:p>1878</text:p>
          </table:table-cell>
          <table:table-cell table:style-name="ce16" office:value-type="float" office:value="1917" calcext:value-type="float">
            <text:p>1917</text:p>
          </table:table-cell>
          <table:table-cell table:style-name="ce21" office:value-type="float" office:value="1857" calcext:value-type="float">
            <text:p>1857</text:p>
          </table:table-cell>
          <table:table-cell table:style-name="ce25" table:formula="of:=SUMPRODUCT(([.B29:.F29]&lt;&gt;&quot;&quot;)*([.B29:.F29]/[.B$19:.F$19]) / SUM([.B29:.F29]&lt;&gt;&quot;&quot;))" office:value-type="float" office:value="246.876155179617" calcext:value-type="float">
            <text:p>246.9</text:p>
          </table:table-cell>
          <table:table-cell table:style-name="ce44" table:formula="of:=[.G29]*[.H$19]" office:value-type="float" office:value="9472.25714433446" calcext:value-type="float">
            <text:p>9472</text:p>
          </table:table-cell>
          <table:table-cell table:style-name="ce35" table:formula="of:=STDEVP([.B29:.F29])/AVERAGE([.B29:.F29])" office:value-type="percentage" office:value="0.0157259867366258" calcext:value-type="percentage">
            <text:p>1.6%</text:p>
          </table:table-cell>
          <table:table-cell table:style-name="ce45" table:formula="of:=IF([.H29]&gt;[.$A$7]; [.$C$7]; IF([.H29]&gt;[.$A$8]; [.$C$8]; IF([.H29]&gt;[.$A$9];[.$C$9];IF([.H29]&gt;[.$A$10];[.$C$10]; IF([.H29]&gt;[.$A$11];[.$C$11];IF([.H29]&gt;[.$A$12];[.$C$12];[.$C$13]))))))/100" office:value-type="percentage" office:value="0.113" calcext:value-type="percentage">
            <text:p>11.3%</text:p>
          </table:table-cell>
          <table:table-cell table:style-name="ce46" table:formula="of:=(MAX([.B29:.F29])-MIN([.B29:.F29]))/[.H29]*5" office:value-type="percentage" office:value="0.0432842978978066" calcext:value-type="percentage">
            <text:p>4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1454" calcext:value-type="float">
            <text:p>1454</text:p>
          </table:table-cell>
          <table:table-cell table:style-name="ce16" office:value-type="float" office:value="1531" calcext:value-type="float">
            <text:p>1531</text:p>
          </table:table-cell>
          <table:table-cell table:style-name="ce16" office:value-type="float" office:value="1436" calcext:value-type="float">
            <text:p>1436</text:p>
          </table:table-cell>
          <table:table-cell table:style-name="ce16" office:value-type="float" office:value="1519" calcext:value-type="float">
            <text:p>1519</text:p>
          </table:table-cell>
          <table:table-cell table:style-name="ce21" office:value-type="float" office:value="1461" calcext:value-type="float">
            <text:p>1461</text:p>
          </table:table-cell>
          <table:table-cell table:style-name="ce25" table:formula="of:=SUMPRODUCT(([.B30:.F30]&lt;&gt;&quot;&quot;)*([.B30:.F30]/[.B$19:.F$19]) / SUM([.B30:.F30]&lt;&gt;&quot;&quot;))" office:value-type="float" office:value="192.947265762838" calcext:value-type="float">
            <text:p>192.9</text:p>
          </table:table-cell>
          <table:table-cell table:style-name="ce44" table:formula="of:=[.G30]*[.H$19]" office:value-type="float" office:value="7403.08886968901" calcext:value-type="float">
            <text:p>7403</text:p>
          </table:table-cell>
          <table:table-cell table:style-name="ce35" table:formula="of:=STDEVP([.B30:.F30])/AVERAGE([.B30:.F30])" office:value-type="percentage" office:value="0.0254486457695311" calcext:value-type="percentage">
            <text:p>2.5%</text:p>
          </table:table-cell>
          <table:table-cell table:style-name="ce45" table:formula="of:=IF([.H30]&gt;[.$A$7]; [.$C$7]; IF([.H30]&gt;[.$A$8]; [.$C$8]; IF([.H30]&gt;[.$A$9];[.$C$9];IF([.H30]&gt;[.$A$10];[.$C$10]; IF([.H30]&gt;[.$A$11];[.$C$11];IF([.H30]&gt;[.$A$12];[.$C$12];[.$C$13]))))))/100" office:value-type="percentage" office:value="0.113" calcext:value-type="percentage">
            <text:p>11.3%</text:p>
          </table:table-cell>
          <table:table-cell table:style-name="ce46" table:formula="of:=(MAX([.B30:.F30])-MIN([.B30:.F30]))/[.H30]*5" office:value-type="percentage" office:value="0.0641624068495012" calcext:value-type="percentage">
            <text:p>6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1142" calcext:value-type="float">
            <text:p>1142</text:p>
          </table:table-cell>
          <table:table-cell table:style-name="ce16" office:value-type="float" office:value="1197" calcext:value-type="float">
            <text:p>1197</text:p>
          </table:table-cell>
          <table:table-cell table:style-name="ce16" office:value-type="float" office:value="1120" calcext:value-type="float">
            <text:p>1120</text:p>
          </table:table-cell>
          <table:table-cell table:style-name="ce16" office:value-type="float" office:value="1183" calcext:value-type="float">
            <text:p>1183</text:p>
          </table:table-cell>
          <table:table-cell table:style-name="ce21" office:value-type="float" office:value="1140" calcext:value-type="float">
            <text:p>1140</text:p>
          </table:table-cell>
          <table:table-cell table:style-name="ce25" table:formula="of:=SUMPRODUCT(([.B31:.F31]&lt;&gt;&quot;&quot;)*([.B31:.F31]/[.B$19:.F$19]) / SUM([.B31:.F31]&lt;&gt;&quot;&quot;))" office:value-type="float" office:value="150.747540807387" calcext:value-type="float">
            <text:p>150.7</text:p>
          </table:table-cell>
          <table:table-cell table:style-name="ce44" table:formula="of:=[.G31]*[.H$19]" office:value-type="float" office:value="5783.95053732398" calcext:value-type="float">
            <text:p>5784</text:p>
          </table:table-cell>
          <table:table-cell table:style-name="ce35" table:formula="of:=STDEVP([.B31:.F31])/AVERAGE([.B31:.F31])" office:value-type="percentage" office:value="0.0249348852614112" calcext:value-type="percentage">
            <text:p>2.5%</text:p>
          </table:table-cell>
          <table:table-cell table:style-name="ce45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46" table:formula="of:=(MAX([.B31:.F31])-MIN([.B31:.F31]))/[.H31]*5" office:value-type="percentage" office:value="0.0665635014538222" calcext:value-type="percentage">
            <text:p>6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875" calcext:value-type="float">
            <text:p>875</text:p>
          </table:table-cell>
          <table:table-cell table:style-name="ce16" office:value-type="float" office:value="910" calcext:value-type="float">
            <text:p>910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911" calcext:value-type="float">
            <text:p>911</text:p>
          </table:table-cell>
          <table:table-cell table:style-name="ce21" office:value-type="float" office:value="883" calcext:value-type="float">
            <text:p>883</text:p>
          </table:table-cell>
          <table:table-cell table:style-name="ce25" table:formula="of:=SUMPRODUCT(([.B32:.F32]&lt;&gt;&quot;&quot;)*([.B32:.F32]/[.B$19:.F$19]) / SUM([.B32:.F32]&lt;&gt;&quot;&quot;))" office:value-type="float" office:value="116.34543737055" calcext:value-type="float">
            <text:p>116.3</text:p>
          </table:table-cell>
          <table:table-cell table:style-name="ce44" table:formula="of:=[.G32]*[.H$19]" office:value-type="float" office:value="4463.99491089815" calcext:value-type="float">
            <text:p>4464</text:p>
          </table:table-cell>
          <table:table-cell table:style-name="ce35" table:formula="of:=STDEVP([.B32:.F32])/AVERAGE([.B32:.F32])" office:value-type="percentage" office:value="0.0167464816859106" calcext:value-type="percentage">
            <text:p>1.7%</text:p>
          </table:table-cell>
          <table:table-cell table:style-name="ce45" table:formula="of:=IF([.H32]&gt;[.$A$7]; [.$C$7]; IF([.H32]&gt;[.$A$8]; [.$C$8]; IF([.H32]&gt;[.$A$9];[.$C$9];IF([.H32]&gt;[.$A$10];[.$C$10]; IF([.H32]&gt;[.$A$11];[.$C$11];IF([.H32]&gt;[.$A$12];[.$C$12];[.$C$13]))))))/100" office:value-type="percentage" office:value="0.119" calcext:value-type="percentage">
            <text:p>11.9%</text:p>
          </table:table-cell>
          <table:table-cell table:style-name="ce46" table:formula="of:=(MAX([.B32:.F32])-MIN([.B32:.F32]))/[.H32]*5" office:value-type="percentage" office:value="0.040322626614237" calcext:value-type="percentage">
            <text:p>4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664" calcext:value-type="float">
            <text:p>664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708" calcext:value-type="float">
            <text:p>708</text:p>
          </table:table-cell>
          <table:table-cell table:style-name="ce21" office:value-type="float" office:value="684" calcext:value-type="float">
            <text:p>684</text:p>
          </table:table-cell>
          <table:table-cell table:style-name="ce25" table:formula="of:=SUMPRODUCT(([.B33:.F33]&lt;&gt;&quot;&quot;)*([.B33:.F33]/[.B$19:.F$19]) / SUM([.B33:.F33]&lt;&gt;&quot;&quot;))" office:value-type="float" office:value="89.3732767252117" calcext:value-type="float">
            <text:p>89.4</text:p>
          </table:table-cell>
          <table:table-cell table:style-name="ce44" table:formula="of:=[.G33]*[.H$19]" office:value-type="float" office:value="3429.11472498039" calcext:value-type="float">
            <text:p>3429</text:p>
          </table:table-cell>
          <table:table-cell table:style-name="ce35" table:formula="of:=STDEVP([.B33:.F33])/AVERAGE([.B33:.F33])" office:value-type="percentage" office:value="0.0214779266719416" calcext:value-type="percentage">
            <text:p>2.1%</text:p>
          </table:table-cell>
          <table:table-cell table:style-name="ce45" table:formula="of:=IF([.H33]&gt;[.$A$7]; [.$C$7]; IF([.H33]&gt;[.$A$8]; [.$C$8]; IF([.H33]&gt;[.$A$9];[.$C$9];IF([.H33]&gt;[.$A$10];[.$C$10]; IF([.H33]&gt;[.$A$11];[.$C$11];IF([.H33]&gt;[.$A$12];[.$C$12];[.$C$13]))))))/100" office:value-type="percentage" office:value="0.119" calcext:value-type="percentage">
            <text:p>11.9%</text:p>
          </table:table-cell>
          <table:table-cell table:style-name="ce46" table:formula="of:=(MAX([.B33:.F33])-MIN([.B33:.F33]))/[.H33]*5" office:value-type="percentage" office:value="0.0641565003344291" calcext:value-type="percentage">
            <text:p>6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536" calcext:value-type="float">
            <text:p>536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560" calcext:value-type="float">
            <text:p>560</text:p>
          </table:table-cell>
          <table:table-cell table:style-name="ce21" office:value-type="float" office:value="532" calcext:value-type="float">
            <text:p>532</text:p>
          </table:table-cell>
          <table:table-cell table:style-name="ce25" table:formula="of:=SUMPRODUCT(([.B34:.F34]&lt;&gt;&quot;&quot;)*([.B34:.F34]/[.B$19:.F$19]) / SUM([.B34:.F34]&lt;&gt;&quot;&quot;))" office:value-type="float" office:value="70.2847507830113" calcext:value-type="float">
            <text:p>70.3</text:p>
          </table:table-cell>
          <table:table-cell table:style-name="ce44" table:formula="of:=[.G34]*[.H$19]" office:value-type="float" office:value="2696.71743817369" calcext:value-type="float">
            <text:p>2697</text:p>
          </table:table-cell>
          <table:table-cell table:style-name="ce35" table:formula="of:=STDEVP([.B34:.F34])/AVERAGE([.B34:.F34])" office:value-type="percentage" office:value="0.0215772100478472" calcext:value-type="percentage">
            <text:p>2.2%</text:p>
          </table:table-cell>
          <table:table-cell table:style-name="ce45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46" table:formula="of:=(MAX([.B34:.F34])-MIN([.B34:.F34]))/[.H34]*5" office:value-type="percentage" office:value="0.0630396042216163" calcext:value-type="percentage">
            <text:p>6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 office:value-type="float" office:value="418" calcext:value-type="float">
            <text:p>418</text:p>
          </table:table-cell>
          <table:table-cell table:style-name="ce16"/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450" calcext:value-type="float">
            <text:p>450</text:p>
          </table:table-cell>
          <table:table-cell table:style-name="ce21" office:value-type="float" office:value="431" calcext:value-type="float">
            <text:p>431</text:p>
          </table:table-cell>
          <table:table-cell table:style-name="ce25" table:formula="of:=SUMPRODUCT(([.B35:.F35]&lt;&gt;&quot;&quot;)*([.B35:.F35]/[.B$19:.F$19]) / SUM([.B35:.F35]&lt;&gt;&quot;&quot;))" office:value-type="float" office:value="56.288419770466" calcext:value-type="float">
            <text:p>56.3</text:p>
          </table:table-cell>
          <table:table-cell table:style-name="ce44" table:formula="of:=[.G35]*[.H$19]" office:value-type="float" office:value="2159.69981356108" calcext:value-type="float">
            <text:p>2160</text:p>
          </table:table-cell>
          <table:table-cell table:style-name="ce35" table:formula="of:=STDEVP([.B35:.F35])/AVERAGE([.B35:.F35])" office:value-type="percentage" office:value="0.0268301860757454" calcext:value-type="percentage">
            <text:p>2.7%</text:p>
          </table:table-cell>
          <table:table-cell table:style-name="ce45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46" table:formula="of:=(MAX([.B35:.F35])-MIN([.B35:.F35]))/[.H35]*5" office:value-type="percentage" office:value="0.0740843699644442" calcext:value-type="percentage">
            <text:p>7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345" calcext:value-type="float">
            <text:p>345</text:p>
          </table:table-cell>
          <table:table-cell table:style-name="ce16"/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62" calcext:value-type="float">
            <text:p>362</text:p>
          </table:table-cell>
          <table:table-cell table:style-name="ce21" office:value-type="float" office:value="355" calcext:value-type="float">
            <text:p>355</text:p>
          </table:table-cell>
          <table:table-cell table:style-name="ce25" table:formula="of:=SUMPRODUCT(([.B36:.F36]&lt;&gt;&quot;&quot;)*([.B36:.F36]/[.B$19:.F$19]) / SUM([.B36:.F36]&lt;&gt;&quot;&quot;))" office:value-type="float" office:value="45.6093577801115" calcext:value-type="float">
            <text:p>45.6</text:p>
          </table:table-cell>
          <table:table-cell table:style-name="ce44" table:formula="of:=[.G36]*[.H$19]" office:value-type="float" office:value="1749.96068278382" calcext:value-type="float">
            <text:p>1750</text:p>
          </table:table-cell>
          <table:table-cell table:style-name="ce35" table:formula="of:=STDEVP([.B36:.F36])/AVERAGE([.B36:.F36])" office:value-type="percentage" office:value="0.0272280156608162" calcext:value-type="percentage">
            <text:p>2.7%</text:p>
          </table:table-cell>
          <table:table-cell table:style-name="ce45" table:formula="of:=IF([.H36]&gt;[.$A$7]; [.$C$7]; IF([.H36]&gt;[.$A$8]; [.$C$8]; IF([.H36]&gt;[.$A$9];[.$C$9];IF([.H36]&gt;[.$A$10];[.$C$10]; IF([.H36]&gt;[.$A$11];[.$C$11];IF([.H36]&gt;[.$A$12];[.$C$12];[.$C$13]))))))/100" office:value-type="percentage" office:value="0.134" calcext:value-type="percentage">
            <text:p>13.4%</text:p>
          </table:table-cell>
          <table:table-cell table:style-name="ce46" table:formula="of:=(MAX([.B36:.F36])-MIN([.B36:.F36]))/[.H36]*5" office:value-type="percentage" office:value="0.0714301762489607" calcext:value-type="percentage">
            <text:p>7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291" calcext:value-type="float">
            <text:p>291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4" calcext:value-type="float">
            <text:p>284</text:p>
          </table:table-cell>
          <table:table-cell table:style-name="ce21" office:value-type="float" office:value="284" calcext:value-type="float">
            <text:p>284</text:p>
          </table:table-cell>
          <table:table-cell table:style-name="ce25" table:formula="of:=SUMPRODUCT(([.B37:.F37]&lt;&gt;&quot;&quot;)*([.B37:.F37]/[.B$19:.F$19]) / SUM([.B37:.F37]&lt;&gt;&quot;&quot;))" office:value-type="float" office:value="36.5352733624655" calcext:value-type="float">
            <text:p>36.5</text:p>
          </table:table-cell>
          <table:table-cell table:style-name="ce44" table:formula="of:=[.G37]*[.H$19]" office:value-type="float" office:value="1401.802064991" calcext:value-type="float">
            <text:p>1402</text:p>
          </table:table-cell>
          <table:table-cell table:style-name="ce35" table:formula="of:=STDEVP([.B37:.F37])/AVERAGE([.B37:.F37])" office:value-type="percentage" office:value="0.0476896305167454" calcext:value-type="percentage">
            <text:p>4.8%</text:p>
          </table:table-cell>
          <table:table-cell table:style-name="ce45" table:formula="of:=IF([.H37]&gt;[.$A$7]; [.$C$7]; IF([.H37]&gt;[.$A$8]; [.$C$8]; IF([.H37]&gt;[.$A$9];[.$C$9];IF([.H37]&gt;[.$A$10];[.$C$10]; IF([.H37]&gt;[.$A$11];[.$C$11];IF([.H37]&gt;[.$A$12];[.$C$12];[.$C$13]))))))/100" office:value-type="percentage" office:value="0.134" calcext:value-type="percentage">
            <text:p>13.4%</text:p>
          </table:table-cell>
          <table:table-cell table:style-name="ce46" table:formula="of:=(MAX([.B37:.F37])-MIN([.B37:.F37]))/[.H37]*5" office:value-type="percentage" office:value="0.131972982934069" calcext:value-type="percentage">
            <text:p>13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233" calcext:value-type="float">
            <text:p>233</text:p>
          </table:table-cell>
          <table:table-cell table:style-name="ce16"/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28" calcext:value-type="float">
            <text:p>228</text:p>
          </table:table-cell>
          <table:table-cell table:style-name="ce21" office:value-type="float" office:value="237" calcext:value-type="float">
            <text:p>237</text:p>
          </table:table-cell>
          <table:table-cell table:style-name="ce25" table:formula="of:=SUMPRODUCT(([.B38:.F38]&lt;&gt;&quot;&quot;)*([.B38:.F38]/[.B$19:.F$19]) / SUM([.B38:.F38]&lt;&gt;&quot;&quot;))" office:value-type="float" office:value="30.3889952667863" calcext:value-type="float">
            <text:p>30.4</text:p>
          </table:table-cell>
          <table:table-cell table:style-name="ce44" table:formula="of:=[.G38]*[.H$19]" office:value-type="float" office:value="1165.9788581669" calcext:value-type="float">
            <text:p>1166</text:p>
          </table:table-cell>
          <table:table-cell table:style-name="ce35" table:formula="of:=STDEVP([.B38:.F38])/AVERAGE([.B38:.F38])" office:value-type="percentage" office:value="0.0139071688807036" calcext:value-type="percentage">
            <text:p>1.4%</text:p>
          </table:table-cell>
          <table:table-cell table:style-name="ce45" table:formula="of:=IF([.H38]&gt;[.$A$7]; [.$C$7]; IF([.H38]&gt;[.$A$8]; [.$C$8]; IF([.H38]&gt;[.$A$9];[.$C$9];IF([.H38]&gt;[.$A$10];[.$C$10]; IF([.H38]&gt;[.$A$11];[.$C$11];IF([.H38]&gt;[.$A$12];[.$C$12];[.$C$13]))))))/100" office:value-type="percentage" office:value="0.134" calcext:value-type="percentage">
            <text:p>13.4%</text:p>
          </table:table-cell>
          <table:table-cell table:style-name="ce46" table:formula="of:=(MAX([.B38:.F38])-MIN([.B38:.F38]))/[.H38]*5" office:value-type="percentage" office:value="0.038594181776801" calcext:value-type="percentage">
            <text:p>3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187" calcext:value-type="float">
            <text:p>18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89" calcext:value-type="float">
            <text:p>189</text:p>
          </table:table-cell>
          <table:table-cell table:style-name="ce21" office:value-type="float" office:value="196" calcext:value-type="float">
            <text:p>196</text:p>
          </table:table-cell>
          <table:table-cell table:style-name="ce25" table:formula="of:=SUMPRODUCT(([.B39:.F39]&lt;&gt;&quot;&quot;)*([.B39:.F39]/[.B$19:.F$19]) / SUM([.B39:.F39]&lt;&gt;&quot;&quot;))" office:value-type="float" office:value="24.6339676933131" calcext:value-type="float">
            <text:p>24.6</text:p>
          </table:table-cell>
          <table:table-cell table:style-name="ce44" table:formula="of:=[.G39]*[.H$19]" office:value-type="float" office:value="945.167330180272" calcext:value-type="float">
            <text:p>945</text:p>
          </table:table-cell>
          <table:table-cell table:style-name="ce35" table:formula="of:=STDEVP([.B39:.F39])/AVERAGE([.B39:.F39])" office:value-type="percentage" office:value="0.0289800294976278" calcext:value-type="percentage">
            <text:p>2.9%</text:p>
          </table:table-cell>
          <table:table-cell table:style-name="ce45" table:formula="of:=IF([.H39]&gt;[.$A$7]; [.$C$7]; IF([.H39]&gt;[.$A$8]; [.$C$8]; IF([.H39]&gt;[.$A$9];[.$C$9];IF([.H39]&gt;[.$A$10];[.$C$10]; IF([.H39]&gt;[.$A$11];[.$C$11];IF([.H39]&gt;[.$A$12];[.$C$12];[.$C$13]))))))/100" office:value-type="percentage" office:value="0.156" calcext:value-type="percentage">
            <text:p>15.6%</text:p>
          </table:table-cell>
          <table:table-cell table:style-name="ce46" table:formula="of:=(MAX([.B39:.F39])-MIN([.B39:.F39]))/[.H39]*5" office:value-type="percentage" office:value="0.0846410973438339" calcext:value-type="percentage">
            <text:p>8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4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53" calcext:value-type="float">
            <text:p>153</text:p>
          </table:table-cell>
          <table:table-cell table:style-name="ce21" office:value-type="float" office:value="160" calcext:value-type="float">
            <text:p>160</text:p>
          </table:table-cell>
          <table:table-cell table:style-name="ce25" table:formula="of:=SUMPRODUCT(([.B40:.F40]&lt;&gt;&quot;&quot;)*([.B40:.F40]/[.B$19:.F$19]) / SUM([.B40:.F40]&lt;&gt;&quot;&quot;))" office:value-type="float" office:value="20.1990531413091" calcext:value-type="float">
            <text:p>20.2</text:p>
          </table:table-cell>
          <table:table-cell table:style-name="ce44" table:formula="of:=[.G40]*[.H$19]" office:value-type="float" office:value="775.006501893033" calcext:value-type="float">
            <text:p>775</text:p>
          </table:table-cell>
          <table:table-cell table:style-name="ce35" table:formula="of:=STDEVP([.B40:.F40])/AVERAGE([.B40:.F40])" office:value-type="percentage" office:value="0.0270660347914878" calcext:value-type="percentage">
            <text:p>2.7%</text:p>
          </table:table-cell>
          <table:table-cell table:style-name="ce45" table:formula="of:=IF([.H40]&gt;[.$A$7]; [.$C$7]; IF([.H40]&gt;[.$A$8]; [.$C$8]; IF([.H40]&gt;[.$A$9];[.$C$9];IF([.H40]&gt;[.$A$10];[.$C$10]; IF([.H40]&gt;[.$A$11];[.$C$11];IF([.H40]&gt;[.$A$12];[.$C$12];[.$C$13]))))))/100" office:value-type="percentage" office:value="0.156" calcext:value-type="percentage">
            <text:p>15.6%</text:p>
          </table:table-cell>
          <table:table-cell table:style-name="ce46" table:formula="of:=(MAX([.B40:.F40])-MIN([.B40:.F40]))/[.H40]*5" office:value-type="percentage" office:value="0.0645155877761927" calcext:value-type="percentage">
            <text:p>6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/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6" calcext:value-type="float">
            <text:p>126</text:p>
          </table:table-cell>
          <table:table-cell table:style-name="ce21" office:value-type="float" office:value="136" calcext:value-type="float">
            <text:p>136</text:p>
          </table:table-cell>
          <table:table-cell table:style-name="ce25" table:formula="of:=SUMPRODUCT(([.B41:.F41]&lt;&gt;&quot;&quot;)*([.B41:.F41]/[.B$19:.F$19]) / SUM([.B41:.F41]&lt;&gt;&quot;&quot;))" office:value-type="float" office:value="16.7206967749124" calcext:value-type="float">
            <text:p>16.7</text:p>
          </table:table-cell>
          <table:table-cell table:style-name="ce44" table:formula="of:=[.G41]*[.H$19]" office:value-type="float" office:value="641.547335218266" calcext:value-type="float">
            <text:p>642</text:p>
          </table:table-cell>
          <table:table-cell table:style-name="ce35" table:formula="of:=STDEVP([.B41:.F41])/AVERAGE([.B41:.F41])" office:value-type="percentage" office:value="0.0368316293983377" calcext:value-type="percentage">
            <text:p>3.7%</text:p>
          </table:table-cell>
          <table:table-cell table:style-name="ce45" table:formula="of:=IF([.H41]&gt;[.$A$7]; [.$C$7]; IF([.H41]&gt;[.$A$8]; [.$C$8]; IF([.H41]&gt;[.$A$9];[.$C$9];IF([.H41]&gt;[.$A$10];[.$C$10]; IF([.H41]&gt;[.$A$11];[.$C$11];IF([.H41]&gt;[.$A$12];[.$C$12];[.$C$13]))))))/100" office:value-type="percentage" office:value="0.156" calcext:value-type="percentage">
            <text:p>15.6%</text:p>
          </table:table-cell>
          <table:table-cell table:style-name="ce46" table:formula="of:=(MAX([.B41:.F41])-MIN([.B41:.F41]))/[.H41]*5" office:value-type="percentage" office:value="0.0935238862454115" calcext:value-type="percentage">
            <text:p>9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96" calcext:value-type="float">
            <text:p>96</text:p>
          </table:table-cell>
          <table:table-cell table:style-name="ce21" office:value-type="float" office:value="111" calcext:value-type="float">
            <text:p>111</text:p>
          </table:table-cell>
          <table:table-cell table:style-name="ce25" table:formula="of:=SUMPRODUCT(([.B42:.F42]&lt;&gt;&quot;&quot;)*([.B42:.F42]/[.B$19:.F$19]) / SUM([.B42:.F42]&lt;&gt;&quot;&quot;))" office:value-type="float" office:value="13.3970948024773" calcext:value-type="float">
            <text:p>13.4</text:p>
          </table:table-cell>
          <table:table-cell table:style-name="ce44" table:formula="of:=[.G42]*[.H$19]" office:value-type="float" office:value="514.025855853774" calcext:value-type="float">
            <text:p>514</text:p>
          </table:table-cell>
          <table:table-cell table:style-name="ce35" table:formula="of:=STDEVP([.B42:.F42])/AVERAGE([.B42:.F42])" office:value-type="percentage" office:value="0.061481208781557" calcext:value-type="percentage">
            <text:p>6.1%</text:p>
          </table:table-cell>
          <table:table-cell table:style-name="ce45" table:formula="of:=IF([.H42]&gt;[.$A$7]; [.$C$7]; IF([.H42]&gt;[.$A$8]; [.$C$8]; IF([.H42]&gt;[.$A$9];[.$C$9];IF([.H42]&gt;[.$A$10];[.$C$10]; IF([.H42]&gt;[.$A$11];[.$C$11];IF([.H42]&gt;[.$A$12];[.$C$12];[.$C$13]))))))/100" office:value-type="percentage" office:value="0.156" calcext:value-type="percentage">
            <text:p>15.6%</text:p>
          </table:table-cell>
          <table:table-cell table:style-name="ce46" table:formula="of:=(MAX([.B42:.F42])-MIN([.B42:.F42]))/[.H42]*5" office:value-type="percentage" office:value="0.145907057292728" calcext:value-type="percentage">
            <text:p>14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78" calcext:value-type="float">
            <text:p>78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7" calcext:value-type="float">
            <text:p>87</text:p>
          </table:table-cell>
          <table:table-cell table:style-name="ce21" office:value-type="float" office:value="92" calcext:value-type="float">
            <text:p>92</text:p>
          </table:table-cell>
          <table:table-cell table:style-name="ce25" table:formula="of:=SUMPRODUCT(([.B43:.F43]&lt;&gt;&quot;&quot;)*([.B43:.F43]/[.B$19:.F$19]) / SUM([.B43:.F43]&lt;&gt;&quot;&quot;))" office:value-type="float" office:value="11.2019537751946" calcext:value-type="float">
            <text:p>11.2</text:p>
          </table:table-cell>
          <table:table-cell table:style-name="ce44" table:formula="of:=[.G43]*[.H$19]" office:value-type="float" office:value="429.801681739542" calcext:value-type="float">
            <text:p>430</text:p>
          </table:table-cell>
          <table:table-cell table:style-name="ce35" table:formula="of:=STDEVP([.B43:.F43])/AVERAGE([.B43:.F43])" office:value-type="percentage" office:value="0.055522494820062" calcext:value-type="percentage">
            <text:p>5.6%</text:p>
          </table:table-cell>
          <table:table-cell table:style-name="ce45" table:formula="of:=IF([.H43]&gt;[.$A$7]; [.$C$7]; IF([.H43]&gt;[.$A$8]; [.$C$8]; IF([.H43]&gt;[.$A$9];[.$C$9];IF([.H43]&gt;[.$A$10];[.$C$10]; IF([.H43]&gt;[.$A$11];[.$C$11];IF([.H43]&gt;[.$A$12];[.$C$12];[.$C$13]))))))/100" office:value-type="percentage" office:value="0.193" calcext:value-type="percentage">
            <text:p>19.3%</text:p>
          </table:table-cell>
          <table:table-cell table:style-name="ce46" table:formula="of:=(MAX([.B43:.F43])-MIN([.B43:.F43]))/[.H43]*5" office:value-type="percentage" office:value="0.162865812243191" calcext:value-type="percentage">
            <text:p>16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8</text:p>
          </table:table-cell>
          <table:table-cell table:style-name="ce13"/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68" calcext:value-type="float">
            <text:p>68</text:p>
          </table:table-cell>
          <table:table-cell table:style-name="ce21" office:value-type="float" office:value="81" calcext:value-type="float">
            <text:p>81</text:p>
          </table:table-cell>
          <table:table-cell table:style-name="ce25" table:formula="of:=SUMPRODUCT(([.B44:.F44]&lt;&gt;&quot;&quot;)*([.B44:.F44]/[.B$19:.F$19]) / SUM([.B44:.F44]&lt;&gt;&quot;&quot;))" office:value-type="float" office:value="9.52245630583667" calcext:value-type="float">
            <text:p>9.5</text:p>
          </table:table-cell>
          <table:table-cell table:style-name="ce44" table:formula="of:=[.G44]*[.H$19]" office:value-type="float" office:value="365.361955304873" calcext:value-type="float">
            <text:p>365</text:p>
          </table:table-cell>
          <table:table-cell table:style-name="ce35" table:formula="of:=STDEVP([.B44:.F44])/AVERAGE([.B44:.F44])" office:value-type="percentage" office:value="0.0659929570641755" calcext:value-type="percentage">
            <text:p>6.6%</text:p>
          </table:table-cell>
          <table:table-cell table:style-name="ce45" table:formula="of:=IF([.H44]&gt;[.$A$7]; [.$C$7]; IF([.H44]&gt;[.$A$8]; [.$C$8]; IF([.H44]&gt;[.$A$9];[.$C$9];IF([.H44]&gt;[.$A$10];[.$C$10]; IF([.H44]&gt;[.$A$11];[.$C$11];IF([.H44]&gt;[.$A$12];[.$C$12];[.$C$13]))))))/100" office:value-type="percentage" office:value="0.193" calcext:value-type="percentage">
            <text:p>19.3%</text:p>
          </table:table-cell>
          <table:table-cell table:style-name="ce46" table:formula="of:=(MAX([.B44:.F44])-MIN([.B44:.F44]))/[.H44]*5" office:value-type="percentage" office:value="0.177905770034982" calcext:value-type="percentage">
            <text:p>17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49" calcext:value-type="float">
            <text:p>49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58" calcext:value-type="float">
            <text:p>58</text:p>
          </table:table-cell>
          <table:table-cell table:style-name="ce21"/>
          <table:table-cell table:style-name="ce25" table:formula="of:=SUMPRODUCT(([.B45:.F45]&lt;&gt;&quot;&quot;)*([.B45:.F45]/[.B$19:.F$19]) / SUM([.B45:.F45]&lt;&gt;&quot;&quot;))" office:value-type="float" office:value="7.56786589034475" calcext:value-type="float">
            <text:p>7.6</text:p>
          </table:table-cell>
          <table:table-cell table:style-name="ce44" table:formula="of:=[.G45]*[.H$19]" office:value-type="float" office:value="290.367336995459" calcext:value-type="float">
            <text:p>290</text:p>
          </table:table-cell>
          <table:table-cell table:style-name="ce35" table:formula="of:=STDEVP([.B45:.F45])/AVERAGE([.B45:.F45])" office:value-type="percentage" office:value="0.0952186294585109" calcext:value-type="percentage">
            <text:p>9.5%</text:p>
          </table:table-cell>
          <table:table-cell table:style-name="ce45" table:formula="of:=IF([.H45]&gt;[.$A$7]; [.$C$7]; IF([.H45]&gt;[.$A$8]; [.$C$8]; IF([.H45]&gt;[.$A$9];[.$C$9];IF([.H45]&gt;[.$A$10];[.$C$10]; IF([.H45]&gt;[.$A$11];[.$C$11];IF([.H45]&gt;[.$A$12];[.$C$12];[.$C$13]))))))/100" office:value-type="percentage" office:value="0.193" calcext:value-type="percentage">
            <text:p>19.3%</text:p>
          </table:table-cell>
          <table:table-cell table:style-name="ce46" table:formula="of:=(MAX([.B45:.F45])-MIN([.B45:.F45]))/[.H45]*5" office:value-type="percentage" office:value="0.241073946967715" calcext:value-type="percentage">
            <text:p>24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38" calcext:value-type="float">
            <text:p>3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9" calcext:value-type="float">
            <text:p>49</text:p>
          </table:table-cell>
          <table:table-cell table:style-name="ce21" office:value-type="float" office:value="57" calcext:value-type="float">
            <text:p>57</text:p>
          </table:table-cell>
          <table:table-cell table:style-name="ce25" table:formula="of:=SUMPRODUCT(([.B46:.F46]&lt;&gt;&quot;&quot;)*([.B46:.F46]/[.B$19:.F$19]) / SUM([.B46:.F46]&lt;&gt;&quot;&quot;))" office:value-type="float" office:value="6.50423758659542" calcext:value-type="float">
            <text:p>6.5</text:p>
          </table:table-cell>
          <table:table-cell table:style-name="ce44" table:formula="of:=[.G46]*[.H$19]" office:value-type="float" office:value="249.55756015907" calcext:value-type="float">
            <text:p>250</text:p>
          </table:table-cell>
          <table:table-cell table:style-name="ce35" table:formula="of:=STDEVP([.B46:.F46])/AVERAGE([.B46:.F46])" office:value-type="percentage" office:value="0.135646599662505" calcext:value-type="percentage">
            <text:p>13.6%</text:p>
          </table:table-cell>
          <table:table-cell table:style-name="ce45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46" table:formula="of:=(MAX([.B46:.F46])-MIN([.B46:.F46]))/[.H46]*5" office:value-type="percentage" office:value="0.380673700846595" calcext:value-type="percentage">
            <text:p>38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style-name="ce25" table:formula="of:=SUMPRODUCT(([.B47:.F47]&lt;&gt;&quot;&quot;)*([.B47:.F47]/[.B$19:.F$19]) / SUM([.B47:.F47]&lt;&gt;&quot;&quot;))" office:value-type="float" office:value="1.69023461217648" calcext:value-type="float">
            <text:p>1.7</text:p>
          </table:table-cell>
          <table:table-cell table:style-name="ce44" table:formula="of:=[.G47]*[.H$19]" office:value-type="float" office:value="64.8516940372051" calcext:value-type="float">
            <text:p>65</text:p>
          </table:table-cell>
          <table:table-cell table:style-name="ce35" table:formula="of:=STDEVP([.B47:.F47])/AVERAGE([.B47:.F47])" office:value-type="percentage" office:value="0.386150781477266" calcext:value-type="percentage">
            <text:p>38.6%</text:p>
          </table:table-cell>
          <table:table-cell table:style-name="ce45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46" table:formula="of:=(MAX([.B47:.F47])-MIN([.B47:.F47]))/[.H47]*5" office:value-type="percentage" office:value="1.15648482454403" calcext:value-type="percentage">
            <text:p>115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SUMPRODUCT(([.B48:.F48]&lt;&gt;&quot;&quot;)*([.B48:.F48]/[.B$19:.F$19]) / SUM([.B48:.F48]&lt;&gt;&quot;&quot;))" office:value-type="float" office:value="0.443158900719416" calcext:value-type="float">
            <text:p>0.4</text:p>
          </table:table-cell>
          <table:table-cell table:style-name="ce44" table:formula="of:=[.G48]*[.H$19]" office:value-type="float" office:value="17.0033232264202" calcext:value-type="float">
            <text:p>17</text:p>
          </table:table-cell>
          <table:table-cell table:style-name="ce35" table:formula="of:=STDEVP([.B48:.F48])/AVERAGE([.B48:.F48])" office:value-type="percentage" office:value="0.660292480018931" calcext:value-type="percentage">
            <text:p>66.0%</text:p>
          </table:table-cell>
          <table:table-cell table:style-name="ce45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46" table:formula="of:=(MAX([.B48:.F48])-MIN([.B48:.F48]))/[.H48]*5" office:value-type="percentage" office:value="1.4703008151462" calcext:value-type="percentage">
            <text:p>147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PRODUCT(([.B49:.F49]&lt;&gt;&quot;&quot;)*([.B49:.F49]/[.B$19:.F$19]) / SUM([.B49:.F49]&lt;&gt;&quot;&quot;))" office:value-type="float" office:value="0.0531058094384504" calcext:value-type="float">
            <text:p>0.1</text:p>
          </table:table-cell>
          <table:table-cell table:style-name="ce44" table:formula="of:=[.G49]*[.H$19]" office:value-type="float" office:value="2.03758796588938" calcext:value-type="float">
            <text:p>2</text:p>
          </table:table-cell>
          <table:table-cell table:style-name="ce35" table:formula="of:=STDEVP([.B49:.F49])/AVERAGE([.B49:.F49])" office:value-type="percentage" office:value="1.22474487139159" calcext:value-type="percentage">
            <text:p>122.5%</text:p>
          </table:table-cell>
          <table:table-cell table:style-name="ce45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46" table:formula="of:=(MAX([.B49:.F49])-MIN([.B49:.F49]))/[.H49]*5" office:value-type="percentage" office:value="2.45388178753675" calcext:value-type="percentage">
            <text:p>245.4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500 ml bottle'.H20:'500 ml bottle'.H49">
            <calcext:condition calcext:apply-style-name="Good" calcext:value="&gt;1000" calcext:base-cell-address="'500 ml bottle'.H20"/>
          </calcext:conditional-format>
          <calcext:conditional-format calcext:target-range-address="'500 ml bottle'.K20:'500 ml bottle'.K49">
            <calcext:condition calcext:apply-style-name="Good" calcext:value="&lt;[.J20]" calcext:base-cell-address="'500 ml bottle'.K20"/>
          </calcext:conditional-format>
        </calcext:conditional-formats>
      </table:table>
      <table:table table:name="100ml bottle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352747" calcext:value-type="float">
            <text:p>7.4</text:p>
          </table:table-cell>
          <table:table-cell table:style-name="ce15" office:value-type="float" office:value="7.853802" calcext:value-type="float">
            <text:p>7.9</text:p>
          </table:table-cell>
          <table:table-cell table:style-name="ce15" office:value-type="float" office:value="7.718663" calcext:value-type="float">
            <text:p>7.7</text:p>
          </table:table-cell>
          <table:table-cell table:style-name="ce15" office:value-type="float" office:value="7.774466" calcext:value-type="float">
            <text:p>7.8</text:p>
          </table:table-cell>
          <table:table-cell table:style-name="ce20" office:value-type="float" office:value="7.754998" calcext:value-type="float">
            <text:p>7.8</text:p>
          </table:table-cell>
          <table:table-cell table:style-name="ce24"/>
          <table:table-cell table:style-name="ce32" table:formula="of:=SUM([.B19:.F19])" office:value-type="float" office:value="38.454676" calcext:value-type="float">
            <text:p>38.5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38887" calcext:value-type="float">
            <text:p>38887</text:p>
          </table:table-cell>
          <table:table-cell table:style-name="ce16" office:value-type="float" office:value="40126" calcext:value-type="float">
            <text:p>40126</text:p>
          </table:table-cell>
          <table:table-cell table:style-name="ce16" office:value-type="float" office:value="39697" calcext:value-type="float">
            <text:p>39697</text:p>
          </table:table-cell>
          <table:table-cell table:style-name="ce16" office:value-type="float" office:value="39964" calcext:value-type="float">
            <text:p>39964</text:p>
          </table:table-cell>
          <table:table-cell table:style-name="ce21" office:value-type="float" office:value="38719" calcext:value-type="float">
            <text:p>38719</text:p>
          </table:table-cell>
          <table:table-cell table:style-name="ce25" table:formula="of:=SUMPRODUCT(([.B20:.F20]&lt;&gt;&quot;&quot;)*([.B20:.F20]/[.B$19:.F$19]) / SUM([.B20:.F20]&lt;&gt;&quot;&quot;))" office:value-type="float" office:value="5134.81523209849" calcext:value-type="float">
            <text:p>5134.8</text:p>
          </table:table-cell>
          <table:table-cell table:style-name="ce47" table:formula="of:=[.G20]*[.H$19]" office:value-type="float" office:value="197457.656070212" calcext:value-type="float">
            <text:p>197458</text:p>
          </table:table-cell>
          <table:table-cell table:style-name="ce35" table:formula="of:=STDEVP([.B20:.F20])/AVERAGE([.B20:.F20])" office:value-type="percentage" office:value="0.0144600547016742" calcext:value-type="percentage">
            <text:p>1.4%</text:p>
          </table:table-cell>
          <table:table-cell table:style-name="ce48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49" table:formula="of:=(MAX([.B20:.F20])-MIN([.B20:.F20]))/[.H20]*5" office:value-type="percentage" office:value="0.035627891771887" calcext:value-type="percentage">
            <text:p>3.6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24374" calcext:value-type="float">
            <text:p>24374</text:p>
          </table:table-cell>
          <table:table-cell table:style-name="ce16" office:value-type="float" office:value="25311" calcext:value-type="float">
            <text:p>25311</text:p>
          </table:table-cell>
          <table:table-cell table:style-name="ce16" office:value-type="float" office:value="25162" calcext:value-type="float">
            <text:p>25162</text:p>
          </table:table-cell>
          <table:table-cell table:style-name="ce16" office:value-type="float" office:value="25340" calcext:value-type="float">
            <text:p>25340</text:p>
          </table:table-cell>
          <table:table-cell table:style-name="ce21" office:value-type="float" office:value="24763" calcext:value-type="float">
            <text:p>24763</text:p>
          </table:table-cell>
          <table:table-cell table:style-name="ce25" table:formula="of:=SUMPRODUCT(([.B21:.F21]&lt;&gt;&quot;&quot;)*([.B21:.F21]/[.B$19:.F$19]) / SUM([.B21:.F21]&lt;&gt;&quot;&quot;))" office:value-type="float" office:value="3250.03344553239" calcext:value-type="float">
            <text:p>3250.0</text:p>
          </table:table-cell>
          <table:table-cell table:style-name="ce47" table:formula="of:=[.G21]*[.H$19]" office:value-type="float" office:value="124978.983137112" calcext:value-type="float">
            <text:p>124979</text:p>
          </table:table-cell>
          <table:table-cell table:style-name="ce35" table:formula="of:=STDEVP([.B21:.F21])/AVERAGE([.B21:.F21])" office:value-type="percentage" office:value="0.0148233245124948" calcext:value-type="percentage">
            <text:p>1.5%</text:p>
          </table:table-cell>
          <table:table-cell table:style-name="ce48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49" table:formula="of:=(MAX([.B21:.F21])-MIN([.B21:.F21]))/[.H21]*5" office:value-type="percentage" office:value="0.0386464978251672" calcext:value-type="percentage">
            <text:p>3.9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15467" calcext:value-type="float">
            <text:p>15467</text:p>
          </table:table-cell>
          <table:table-cell table:style-name="ce16" office:value-type="float" office:value="16215" calcext:value-type="float">
            <text:p>16215</text:p>
          </table:table-cell>
          <table:table-cell table:style-name="ce16" office:value-type="float" office:value="15787" calcext:value-type="float">
            <text:p>15787</text:p>
          </table:table-cell>
          <table:table-cell table:style-name="ce16" office:value-type="float" office:value="16037" calcext:value-type="float">
            <text:p>16037</text:p>
          </table:table-cell>
          <table:table-cell table:style-name="ce21" office:value-type="float" office:value="15683" calcext:value-type="float">
            <text:p>15683</text:p>
          </table:table-cell>
          <table:table-cell table:style-name="ce25" table:formula="of:=SUMPRODUCT(([.B22:.F22]&lt;&gt;&quot;&quot;)*([.B22:.F22]/[.B$19:.F$19]) / SUM([.B22:.F22]&lt;&gt;&quot;&quot;))" office:value-type="float" office:value="2059.71242800526" calcext:value-type="float">
            <text:p>2059.7</text:p>
          </table:table-cell>
          <table:table-cell table:style-name="ce47" table:formula="of:=[.G22]*[.H$19]" office:value-type="float" office:value="79205.5740721157" calcext:value-type="float">
            <text:p>79206</text:p>
          </table:table-cell>
          <table:table-cell table:style-name="ce35" table:formula="of:=STDEVP([.B22:.F22])/AVERAGE([.B22:.F22])" office:value-type="percentage" office:value="0.0166094856797681" calcext:value-type="percentage">
            <text:p>1.7%</text:p>
          </table:table-cell>
          <table:table-cell table:style-name="ce48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49" table:formula="of:=(MAX([.B22:.F22])-MIN([.B22:.F22]))/[.H22]*5" office:value-type="percentage" office:value="0.0472188989703525" calcext:value-type="percentage">
            <text:p>4.7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9947" calcext:value-type="float">
            <text:p>9947</text:p>
          </table:table-cell>
          <table:table-cell table:style-name="ce16" office:value-type="float" office:value="10416" calcext:value-type="float">
            <text:p>10416</text:p>
          </table:table-cell>
          <table:table-cell table:style-name="ce16" office:value-type="float" office:value="10119" calcext:value-type="float">
            <text:p>10119</text:p>
          </table:table-cell>
          <table:table-cell table:style-name="ce16" office:value-type="float" office:value="10247" calcext:value-type="float">
            <text:p>10247</text:p>
          </table:table-cell>
          <table:table-cell table:style-name="ce21" office:value-type="float" office:value="10086" calcext:value-type="float">
            <text:p>10086</text:p>
          </table:table-cell>
          <table:table-cell table:style-name="ce25" table:formula="of:=SUMPRODUCT(([.B23:.F23]&lt;&gt;&quot;&quot;)*([.B23:.F23]/[.B$19:.F$19]) / SUM([.B23:.F23]&lt;&gt;&quot;&quot;))" office:value-type="float" office:value="1321.73119215501" calcext:value-type="float">
            <text:p>1321.7</text:p>
          </table:table-cell>
          <table:table-cell table:style-name="ce47" table:formula="of:=[.G23]*[.H$19]" office:value-type="float" office:value="50826.7447534145" calcext:value-type="float">
            <text:p>50827</text:p>
          </table:table-cell>
          <table:table-cell table:style-name="ce35" table:formula="of:=STDEVP([.B23:.F23])/AVERAGE([.B23:.F23])" office:value-type="percentage" office:value="0.0155942210567716" calcext:value-type="percentage">
            <text:p>1.6%</text:p>
          </table:table-cell>
          <table:table-cell table:style-name="ce48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49" table:formula="of:=(MAX([.B23:.F23])-MIN([.B23:.F23]))/[.H23]*5" office:value-type="percentage" office:value="0.0461371274390431" calcext:value-type="percentage">
            <text:p>4.6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6824" calcext:value-type="float">
            <text:p>6824</text:p>
          </table:table-cell>
          <table:table-cell table:style-name="ce16" office:value-type="float" office:value="7054" calcext:value-type="float">
            <text:p>7054</text:p>
          </table:table-cell>
          <table:table-cell table:style-name="ce16" office:value-type="float" office:value="6819" calcext:value-type="float">
            <text:p>6819</text:p>
          </table:table-cell>
          <table:table-cell table:style-name="ce16" office:value-type="float" office:value="6989" calcext:value-type="float">
            <text:p>6989</text:p>
          </table:table-cell>
          <table:table-cell table:style-name="ce21" office:value-type="float" office:value="6757" calcext:value-type="float">
            <text:p>6757</text:p>
          </table:table-cell>
          <table:table-cell table:style-name="ce25" table:formula="of:=SUMPRODUCT(([.B24:.F24]&lt;&gt;&quot;&quot;)*([.B24:.F24]/[.B$19:.F$19]) / SUM([.B24:.F24]&lt;&gt;&quot;&quot;))" office:value-type="float" office:value="895.994587008072" calcext:value-type="float">
            <text:p>896.0</text:p>
          </table:table-cell>
          <table:table-cell table:style-name="ce47" table:formula="of:=[.G24]*[.H$19]" office:value-type="float" office:value="34455.1815411492" calcext:value-type="float">
            <text:p>34455</text:p>
          </table:table-cell>
          <table:table-cell table:style-name="ce35" table:formula="of:=STDEVP([.B24:.F24])/AVERAGE([.B24:.F24])" office:value-type="percentage" office:value="0.0163946872082483" calcext:value-type="percentage">
            <text:p>1.6%</text:p>
          </table:table-cell>
          <table:table-cell table:style-name="ce48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49" table:formula="of:=(MAX([.B24:.F24])-MIN([.B24:.F24]))/[.H24]*5" office:value-type="percentage" office:value="0.0430994681663915" calcext:value-type="percentage">
            <text:p>4.3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4792" calcext:value-type="float">
            <text:p>4792</text:p>
          </table:table-cell>
          <table:table-cell table:style-name="ce16" office:value-type="float" office:value="5023" calcext:value-type="float">
            <text:p>5023</text:p>
          </table:table-cell>
          <table:table-cell table:style-name="ce16" office:value-type="float" office:value="4859" calcext:value-type="float">
            <text:p>4859</text:p>
          </table:table-cell>
          <table:table-cell table:style-name="ce16" office:value-type="float" office:value="4933" calcext:value-type="float">
            <text:p>4933</text:p>
          </table:table-cell>
          <table:table-cell table:style-name="ce21" office:value-type="float" office:value="4764" calcext:value-type="float">
            <text:p>4764</text:p>
          </table:table-cell>
          <table:table-cell table:style-name="ce25" table:formula="of:=SUMPRODUCT(([.B25:.F25]&lt;&gt;&quot;&quot;)*([.B25:.F25]/[.B$19:.F$19]) / SUM([.B25:.F25]&lt;&gt;&quot;&quot;))" office:value-type="float" office:value="633.926353561798" calcext:value-type="float">
            <text:p>633.9</text:p>
          </table:table-cell>
          <table:table-cell table:style-name="ce47" table:formula="of:=[.G25]*[.H$19]" office:value-type="float" office:value="24377.4325340804" calcext:value-type="float">
            <text:p>24377</text:p>
          </table:table-cell>
          <table:table-cell table:style-name="ce35" table:formula="of:=STDEVP([.B25:.F25])/AVERAGE([.B25:.F25])" office:value-type="percentage" office:value="0.0194050597911721" calcext:value-type="percentage">
            <text:p>1.9%</text:p>
          </table:table-cell>
          <table:table-cell table:style-name="ce48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49" table:formula="of:=(MAX([.B25:.F25])-MIN([.B25:.F25]))/[.H25]*5" office:value-type="percentage" office:value="0.0531229036605701" calcext:value-type="percentage">
            <text:p>5.3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3548" calcext:value-type="float">
            <text:p>3548</text:p>
          </table:table-cell>
          <table:table-cell table:style-name="ce16" office:value-type="float" office:value="3729" calcext:value-type="float">
            <text:p>3729</text:p>
          </table:table-cell>
          <table:table-cell table:style-name="ce16" office:value-type="float" office:value="3510" calcext:value-type="float">
            <text:p>3510</text:p>
          </table:table-cell>
          <table:table-cell table:style-name="ce16" office:value-type="float" office:value="3684" calcext:value-type="float">
            <text:p>3684</text:p>
          </table:table-cell>
          <table:table-cell table:style-name="ce21" office:value-type="float" office:value="3485" calcext:value-type="float">
            <text:p>3485</text:p>
          </table:table-cell>
          <table:table-cell table:style-name="ce25" table:formula="of:=SUMPRODUCT(([.B26:.F26]&lt;&gt;&quot;&quot;)*([.B26:.F26]/[.B$19:.F$19]) / SUM([.B26:.F26]&lt;&gt;&quot;&quot;))" office:value-type="float" office:value="467.066223226901" calcext:value-type="float">
            <text:p>467.1</text:p>
          </table:table-cell>
          <table:table-cell table:style-name="ce47" table:formula="of:=[.G26]*[.H$19]" office:value-type="float" office:value="17960.8802847341" calcext:value-type="float">
            <text:p>17961</text:p>
          </table:table-cell>
          <table:table-cell table:style-name="ce35" table:formula="of:=STDEVP([.B26:.F26])/AVERAGE([.B26:.F26])" office:value-type="percentage" office:value="0.0270946801015576" calcext:value-type="percentage">
            <text:p>2.7%</text:p>
          </table:table-cell>
          <table:table-cell table:style-name="ce48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49" table:formula="of:=(MAX([.B26:.F26])-MIN([.B26:.F26]))/[.H26]*5" office:value-type="percentage" office:value="0.0679254012419948" calcext:value-type="percentage">
            <text:p>6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2708" calcext:value-type="float">
            <text:p>2708</text:p>
          </table:table-cell>
          <table:table-cell table:style-name="ce16" office:value-type="float" office:value="2836" calcext:value-type="float">
            <text:p>2836</text:p>
          </table:table-cell>
          <table:table-cell table:style-name="ce16" office:value-type="float" office:value="2597" calcext:value-type="float">
            <text:p>2597</text:p>
          </table:table-cell>
          <table:table-cell table:style-name="ce16" office:value-type="float" office:value="2754" calcext:value-type="float">
            <text:p>2754</text:p>
          </table:table-cell>
          <table:table-cell table:style-name="ce21" office:value-type="float" office:value="2660" calcext:value-type="float">
            <text:p>2660</text:p>
          </table:table-cell>
          <table:table-cell table:style-name="ce25" table:formula="of:=SUMPRODUCT(([.B27:.F27]&lt;&gt;&quot;&quot;)*([.B27:.F27]/[.B$19:.F$19]) / SUM([.B27:.F27]&lt;&gt;&quot;&quot;))" office:value-type="float" office:value="352.619020664058" calcext:value-type="float">
            <text:p>352.6</text:p>
          </table:table-cell>
          <table:table-cell table:style-name="ce47" table:formula="of:=[.G27]*[.H$19]" office:value-type="float" office:value="13559.8501910737" calcext:value-type="float">
            <text:p>13560</text:p>
          </table:table-cell>
          <table:table-cell table:style-name="ce35" table:formula="of:=STDEVP([.B27:.F27])/AVERAGE([.B27:.F27])" office:value-type="percentage" office:value="0.0300032451606975" calcext:value-type="percentage">
            <text:p>3.0%</text:p>
          </table:table-cell>
          <table:table-cell table:style-name="ce48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49" table:formula="of:=(MAX([.B27:.F27])-MIN([.B27:.F27]))/[.H27]*5" office:value-type="percentage" office:value="0.0881278172812453" calcext:value-type="percentage">
            <text:p>8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2075" calcext:value-type="float">
            <text:p>2075</text:p>
          </table:table-cell>
          <table:table-cell table:style-name="ce16" office:value-type="float" office:value="2148" calcext:value-type="float">
            <text:p>2148</text:p>
          </table:table-cell>
          <table:table-cell table:style-name="ce16" office:value-type="float" office:value="1972" calcext:value-type="float">
            <text:p>1972</text:p>
          </table:table-cell>
          <table:table-cell table:style-name="ce16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5" table:formula="of:=SUMPRODUCT(([.B28:.F28]&lt;&gt;&quot;&quot;)*([.B28:.F28]/[.B$19:.F$19]) / SUM([.B28:.F28]&lt;&gt;&quot;&quot;))" office:value-type="float" office:value="266.272738961298" calcext:value-type="float">
            <text:p>266.3</text:p>
          </table:table-cell>
          <table:table-cell table:style-name="ce47" table:formula="of:=[.G28]*[.H$19]" office:value-type="float" office:value="10239.4319043893" calcext:value-type="float">
            <text:p>10239</text:p>
          </table:table-cell>
          <table:table-cell table:style-name="ce35" table:formula="of:=STDEVP([.B28:.F28])/AVERAGE([.B28:.F28])" office:value-type="percentage" office:value="0.0294138747224747" calcext:value-type="percentage">
            <text:p>2.9%</text:p>
          </table:table-cell>
          <table:table-cell table:style-name="ce48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49" table:formula="of:=(MAX([.B28:.F28])-MIN([.B28:.F28]))/[.H28]*5" office:value-type="percentage" office:value="0.0859422679126147" calcext:value-type="percentage">
            <text:p>8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1597" calcext:value-type="float">
            <text:p>1597</text:p>
          </table:table-cell>
          <table:table-cell table:style-name="ce16" office:value-type="float" office:value="1638" calcext:value-type="float">
            <text:p>1638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529" calcext:value-type="float">
            <text:p>1529</text:p>
          </table:table-cell>
          <table:table-cell table:style-name="ce21" office:value-type="float" office:value="1553" calcext:value-type="float">
            <text:p>1553</text:p>
          </table:table-cell>
          <table:table-cell table:style-name="ce25" table:formula="of:=SUMPRODUCT(([.B29:.F29]&lt;&gt;&quot;&quot;)*([.B29:.F29]/[.B$19:.F$19]) / SUM([.B29:.F29]&lt;&gt;&quot;&quot;))" office:value-type="float" office:value="204.077836494534" calcext:value-type="float">
            <text:p>204.1</text:p>
          </table:table-cell>
          <table:table-cell table:style-name="ce47" table:formula="of:=[.G29]*[.H$19]" office:value-type="float" office:value="7847.74708117828" calcext:value-type="float">
            <text:p>7848</text:p>
          </table:table-cell>
          <table:table-cell table:style-name="ce35" table:formula="of:=STDEVP([.B29:.F29])/AVERAGE([.B29:.F29])" office:value-type="percentage" office:value="0.0274192058732475" calcext:value-type="percentage">
            <text:p>2.7%</text:p>
          </table:table-cell>
          <table:table-cell table:style-name="ce48" table:formula="of:=IF([.H29]&gt;[.$A$7]; [.$C$7]; IF([.H29]&gt;[.$A$8]; [.$C$8]; IF([.H29]&gt;[.$A$9];[.$C$9];IF([.H29]&gt;[.$A$10];[.$C$10]; IF([.H29]&gt;[.$A$11];[.$C$11];IF([.H29]&gt;[.$A$12];[.$C$12];[.$C$13]))))))/100" office:value-type="percentage" office:value="0.113" calcext:value-type="percentage">
            <text:p>11.3%</text:p>
          </table:table-cell>
          <table:table-cell table:style-name="ce49" table:formula="of:=(MAX([.B29:.F29])-MIN([.B29:.F29]))/[.H29]*5" office:value-type="percentage" office:value="0.0713580590973786" calcext:value-type="percentage">
            <text:p>7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1199" calcext:value-type="float">
            <text:p>1199</text:p>
          </table:table-cell>
          <table:table-cell table:style-name="ce16"/>
          <table:table-cell table:style-name="ce16" office:value-type="float" office:value="1169" calcext:value-type="float">
            <text:p>1169</text:p>
          </table:table-cell>
          <table:table-cell table:style-name="ce16" office:value-type="float" office:value="1154" calcext:value-type="float">
            <text:p>1154</text:p>
          </table:table-cell>
          <table:table-cell table:style-name="ce21" office:value-type="float" office:value="1212" calcext:value-type="float">
            <text:p>1212</text:p>
          </table:table-cell>
          <table:table-cell table:style-name="ce25" table:formula="of:=SUMPRODUCT(([.B30:.F30]&lt;&gt;&quot;&quot;)*([.B30:.F30]/[.B$19:.F$19]) / SUM([.B30:.F30]&lt;&gt;&quot;&quot;))" office:value-type="float" office:value="154.810086333155" calcext:value-type="float">
            <text:p>154.8</text:p>
          </table:table-cell>
          <table:table-cell table:style-name="ce47" table:formula="of:=[.G30]*[.H$19]" office:value-type="float" office:value="5953.1717114735" calcext:value-type="float">
            <text:p>5953</text:p>
          </table:table-cell>
          <table:table-cell table:style-name="ce35" table:formula="of:=STDEVP([.B30:.F30])/AVERAGE([.B30:.F30])" office:value-type="percentage" office:value="0.0195117925454254" calcext:value-type="percentage">
            <text:p>2.0%</text:p>
          </table:table-cell>
          <table:table-cell table:style-name="ce48" table:formula="of:=IF([.H30]&gt;[.$A$7]; [.$C$7]; IF([.H30]&gt;[.$A$8]; [.$C$8]; IF([.H30]&gt;[.$A$9];[.$C$9];IF([.H30]&gt;[.$A$10];[.$C$10]; IF([.H30]&gt;[.$A$11];[.$C$11];IF([.H30]&gt;[.$A$12];[.$C$12];[.$C$13]))))))/100" office:value-type="percentage" office:value="0.113" calcext:value-type="percentage">
            <text:p>11.3%</text:p>
          </table:table-cell>
          <table:table-cell table:style-name="ce49" table:formula="of:=(MAX([.B30:.F30])-MIN([.B30:.F30]))/[.H30]*5" office:value-type="percentage" office:value="0.0487135285281769" calcext:value-type="percentage">
            <text:p>4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940" calcext:value-type="float">
            <text:p>940</text:p>
          </table:table-cell>
          <table:table-cell table:style-name="ce16"/>
          <table:table-cell table:style-name="ce16" office:value-type="float" office:value="877" calcext:value-type="float">
            <text:p>877</text:p>
          </table:table-cell>
          <table:table-cell table:style-name="ce16" office:value-type="float" office:value="891" calcext:value-type="float">
            <text:p>891</text:p>
          </table:table-cell>
          <table:table-cell table:style-name="ce21" office:value-type="float" office:value="949" calcext:value-type="float">
            <text:p>949</text:p>
          </table:table-cell>
          <table:table-cell table:style-name="ce25" table:formula="of:=SUMPRODUCT(([.B31:.F31]&lt;&gt;&quot;&quot;)*([.B31:.F31]/[.B$19:.F$19]) / SUM([.B31:.F31]&lt;&gt;&quot;&quot;))" office:value-type="float" office:value="119.610681589865" calcext:value-type="float">
            <text:p>119.6</text:p>
          </table:table-cell>
          <table:table-cell table:style-name="ce47" table:formula="of:=[.G31]*[.H$19]" office:value-type="float" office:value="4599.59000667743" calcext:value-type="float">
            <text:p>4600</text:p>
          </table:table-cell>
          <table:table-cell table:style-name="ce35" table:formula="of:=STDEVP([.B31:.F31])/AVERAGE([.B31:.F31])" office:value-type="percentage" office:value="0.0337074106409329" calcext:value-type="percentage">
            <text:p>3.4%</text:p>
          </table:table-cell>
          <table:table-cell table:style-name="ce48" table:formula="of:=IF([.H31]&gt;[.$A$7]; [.$C$7]; IF([.H31]&gt;[.$A$8]; [.$C$8]; IF([.H31]&gt;[.$A$9];[.$C$9];IF([.H31]&gt;[.$A$10];[.$C$10]; IF([.H31]&gt;[.$A$11];[.$C$11];IF([.H31]&gt;[.$A$12];[.$C$12];[.$C$13]))))))/100" office:value-type="percentage" office:value="0.119" calcext:value-type="percentage">
            <text:p>11.9%</text:p>
          </table:table-cell>
          <table:table-cell table:style-name="ce49" table:formula="of:=(MAX([.B31:.F31])-MIN([.B31:.F31]))/[.H31]*5" office:value-type="percentage" office:value="0.0782678454987013" calcext:value-type="percentage">
            <text:p>7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747" calcext:value-type="float">
            <text:p>747</text:p>
          </table:table-cell>
          <table:table-cell table:style-name="ce16"/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69" calcext:value-type="float">
            <text:p>669</text:p>
          </table:table-cell>
          <table:table-cell table:style-name="ce21" office:value-type="float" office:value="728" calcext:value-type="float">
            <text:p>728</text:p>
          </table:table-cell>
          <table:table-cell table:style-name="ce25" table:formula="of:=SUMPRODUCT(([.B32:.F32]&lt;&gt;&quot;&quot;)*([.B32:.F32]/[.B$19:.F$19]) / SUM([.B32:.F32]&lt;&gt;&quot;&quot;))" office:value-type="float" office:value="92.2427327790312" calcext:value-type="float">
            <text:p>92.2</text:p>
          </table:table-cell>
          <table:table-cell table:style-name="ce47" table:formula="of:=[.G32]*[.H$19]" office:value-type="float" office:value="3547.16440237222" calcext:value-type="float">
            <text:p>3547</text:p>
          </table:table-cell>
          <table:table-cell table:style-name="ce35" table:formula="of:=STDEVP([.B32:.F32])/AVERAGE([.B32:.F32])" office:value-type="percentage" office:value="0.0475332630737012" calcext:value-type="percentage">
            <text:p>4.8%</text:p>
          </table:table-cell>
          <table:table-cell table:style-name="ce48" table:formula="of:=IF([.H32]&gt;[.$A$7]; [.$C$7]; IF([.H32]&gt;[.$A$8]; [.$C$8]; IF([.H32]&gt;[.$A$9];[.$C$9];IF([.H32]&gt;[.$A$10];[.$C$10]; IF([.H32]&gt;[.$A$11];[.$C$11];IF([.H32]&gt;[.$A$12];[.$C$12];[.$C$13]))))))/100" office:value-type="percentage" office:value="0.119" calcext:value-type="percentage">
            <text:p>11.9%</text:p>
          </table:table-cell>
          <table:table-cell table:style-name="ce49" table:formula="of:=(MAX([.B32:.F32])-MIN([.B32:.F32]))/[.H32]*5" office:value-type="percentage" office:value="0.109946976164731" calcext:value-type="percentage">
            <text:p>11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581" calcext:value-type="float">
            <text:p>581</text:p>
          </table:table-cell>
          <table:table-cell table:style-name="ce16" office:value-type="float" office:value="612" calcext:value-type="float">
            <text:p>612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491" calcext:value-type="float">
            <text:p>491</text:p>
          </table:table-cell>
          <table:table-cell table:style-name="ce21" office:value-type="float" office:value="556" calcext:value-type="float">
            <text:p>556</text:p>
          </table:table-cell>
          <table:table-cell table:style-name="ce25" table:formula="of:=SUMPRODUCT(([.B33:.F33]&lt;&gt;&quot;&quot;)*([.B33:.F33]/[.B$19:.F$19]) / SUM([.B33:.F33]&lt;&gt;&quot;&quot;))" office:value-type="float" office:value="71.4697371173243" calcext:value-type="float">
            <text:p>71.5</text:p>
          </table:table-cell>
          <table:table-cell table:style-name="ce47" table:formula="of:=[.G33]*[.H$19]" office:value-type="float" office:value="2748.34558465188" calcext:value-type="float">
            <text:p>2748</text:p>
          </table:table-cell>
          <table:table-cell table:style-name="ce35" table:formula="of:=STDEVP([.B33:.F33])/AVERAGE([.B33:.F33])" office:value-type="percentage" office:value="0.0824608992650003" calcext:value-type="percentage">
            <text:p>8.2%</text:p>
          </table:table-cell>
          <table:table-cell table:style-name="ce48" table:formula="of:=IF([.H33]&gt;[.$A$7]; [.$C$7]; IF([.H33]&gt;[.$A$8]; [.$C$8]; IF([.H33]&gt;[.$A$9];[.$C$9];IF([.H33]&gt;[.$A$10];[.$C$10]; IF([.H33]&gt;[.$A$11];[.$C$11];IF([.H33]&gt;[.$A$12];[.$C$12];[.$C$13]))))))/100" office:value-type="percentage" office:value="0.119" calcext:value-type="percentage">
            <text:p>11.9%</text:p>
          </table:table-cell>
          <table:table-cell table:style-name="ce49" table:formula="of:=(MAX([.B33:.F33])-MIN([.B33:.F33]))/[.H33]*5" office:value-type="percentage" office:value="0.220132432900221" calcext:value-type="percentage">
            <text:p>22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441" calcext:value-type="float">
            <text:p>441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369" calcext:value-type="float">
            <text:p>369</text:p>
          </table:table-cell>
          <table:table-cell table:style-name="ce21" office:value-type="float" office:value="433" calcext:value-type="float">
            <text:p>433</text:p>
          </table:table-cell>
          <table:table-cell table:style-name="ce25" table:formula="of:=SUMPRODUCT(([.B34:.F34]&lt;&gt;&quot;&quot;)*([.B34:.F34]/[.B$19:.F$19]) / SUM([.B34:.F34]&lt;&gt;&quot;&quot;))" office:value-type="float" office:value="55.2948130161403" calcext:value-type="float">
            <text:p>55.3</text:p>
          </table:table-cell>
          <table:table-cell table:style-name="ce47" table:formula="of:=[.G34]*[.H$19]" office:value-type="float" office:value="2126.34411901626" calcext:value-type="float">
            <text:p>2126</text:p>
          </table:table-cell>
          <table:table-cell table:style-name="ce35" table:formula="of:=STDEVP([.B34:.F34])/AVERAGE([.B34:.F34])" office:value-type="percentage" office:value="0.0881018598910544" calcext:value-type="percentage">
            <text:p>8.8%</text:p>
          </table:table-cell>
          <table:table-cell table:style-name="ce48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49" table:formula="of:=(MAX([.B34:.F34])-MIN([.B34:.F34]))/[.H34]*5" office:value-type="percentage" office:value="0.261011373952381" calcext:value-type="percentage">
            <text:p>26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 office:value-type="float" office:value="340" calcext:value-type="float">
            <text:p>340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289" calcext:value-type="float">
            <text:p>289</text:p>
          </table:table-cell>
          <table:table-cell table:style-name="ce21" office:value-type="float" office:value="343" calcext:value-type="float">
            <text:p>343</text:p>
          </table:table-cell>
          <table:table-cell table:style-name="ce25" table:formula="of:=SUMPRODUCT(([.B35:.F35]&lt;&gt;&quot;&quot;)*([.B35:.F35]/[.B$19:.F$19]) / SUM([.B35:.F35]&lt;&gt;&quot;&quot;))" office:value-type="float" office:value="43.1831242680696" calcext:value-type="float">
            <text:p>43.2</text:p>
          </table:table-cell>
          <table:table-cell table:style-name="ce47" table:formula="of:=[.G35]*[.H$19]" office:value-type="float" office:value="1660.59305239635" calcext:value-type="float">
            <text:p>1661</text:p>
          </table:table-cell>
          <table:table-cell table:style-name="ce35" table:formula="of:=STDEVP([.B35:.F35])/AVERAGE([.B35:.F35])" office:value-type="percentage" office:value="0.104514166101792" calcext:value-type="percentage">
            <text:p>10.5%</text:p>
          </table:table-cell>
          <table:table-cell table:style-name="ce48" table:formula="of:=IF([.H35]&gt;[.$A$7]; [.$C$7]; IF([.H35]&gt;[.$A$8]; [.$C$8]; IF([.H35]&gt;[.$A$9];[.$C$9];IF([.H35]&gt;[.$A$10];[.$C$10]; IF([.H35]&gt;[.$A$11];[.$C$11];IF([.H35]&gt;[.$A$12];[.$C$12];[.$C$13]))))))/100" office:value-type="percentage" office:value="0.134" calcext:value-type="percentage">
            <text:p>13.4%</text:p>
          </table:table-cell>
          <table:table-cell table:style-name="ce49" table:formula="of:=(MAX([.B35:.F35])-MIN([.B35:.F35]))/[.H35]*5" office:value-type="percentage" office:value="0.29507530414685" calcext:value-type="percentage">
            <text:p>29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5" calcext:value-type="float">
            <text:p>225</text:p>
          </table:table-cell>
          <table:table-cell table:style-name="ce21" office:value-type="float" office:value="267" calcext:value-type="float">
            <text:p>267</text:p>
          </table:table-cell>
          <table:table-cell table:style-name="ce25" table:formula="of:=SUMPRODUCT(([.B36:.F36]&lt;&gt;&quot;&quot;)*([.B36:.F36]/[.B$19:.F$19]) / SUM([.B36:.F36]&lt;&gt;&quot;&quot;))" office:value-type="float" office:value="33.5176007277813" calcext:value-type="float">
            <text:p>33.5</text:p>
          </table:table-cell>
          <table:table-cell table:style-name="ce47" table:formula="of:=[.G36]*[.H$19]" office:value-type="float" office:value="1288.90847628419" calcext:value-type="float">
            <text:p>1289</text:p>
          </table:table-cell>
          <table:table-cell table:style-name="ce35" table:formula="of:=STDEVP([.B36:.F36])/AVERAGE([.B36:.F36])" office:value-type="percentage" office:value="0.122501966448335" calcext:value-type="percentage">
            <text:p>12.3%</text:p>
          </table:table-cell>
          <table:table-cell table:style-name="ce48" table:formula="of:=IF([.H36]&gt;[.$A$7]; [.$C$7]; IF([.H36]&gt;[.$A$8]; [.$C$8]; IF([.H36]&gt;[.$A$9];[.$C$9];IF([.H36]&gt;[.$A$10];[.$C$10]; IF([.H36]&gt;[.$A$11];[.$C$11];IF([.H36]&gt;[.$A$12];[.$C$12];[.$C$13]))))))/100" office:value-type="percentage" office:value="0.134" calcext:value-type="percentage">
            <text:p>13.4%</text:p>
          </table:table-cell>
          <table:table-cell table:style-name="ce49" table:formula="of:=(MAX([.B36:.F36])-MIN([.B36:.F36]))/[.H36]*5" office:value-type="percentage" office:value="0.337494871050942" calcext:value-type="percentage">
            <text:p>33.7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212" calcext:value-type="float">
            <text:p>212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79" calcext:value-type="float">
            <text:p>179</text:p>
          </table:table-cell>
          <table:table-cell table:style-name="ce21" office:value-type="float" office:value="206" calcext:value-type="float">
            <text:p>206</text:p>
          </table:table-cell>
          <table:table-cell table:style-name="ce25" table:formula="of:=SUMPRODUCT(([.B37:.F37]&lt;&gt;&quot;&quot;)*([.B37:.F37]/[.B$19:.F$19]) / SUM([.B37:.F37]&lt;&gt;&quot;&quot;))" office:value-type="float" office:value="27.0982005235382" calcext:value-type="float">
            <text:p>27.1</text:p>
          </table:table-cell>
          <table:table-cell table:style-name="ce47" table:formula="of:=[.G37]*[.H$19]" office:value-type="float" office:value="1042.05252131569" calcext:value-type="float">
            <text:p>1042</text:p>
          </table:table-cell>
          <table:table-cell table:style-name="ce35" table:formula="of:=STDEVP([.B37:.F37])/AVERAGE([.B37:.F37])" office:value-type="percentage" office:value="0.139819054504824" calcext:value-type="percentage">
            <text:p>14.0%</text:p>
          </table:table-cell>
          <table:table-cell table:style-name="ce48" table:formula="of:=IF([.H37]&gt;[.$A$7]; [.$C$7]; IF([.H37]&gt;[.$A$8]; [.$C$8]; IF([.H37]&gt;[.$A$9];[.$C$9];IF([.H37]&gt;[.$A$10];[.$C$10]; IF([.H37]&gt;[.$A$11];[.$C$11];IF([.H37]&gt;[.$A$12];[.$C$12];[.$C$13]))))))/100" office:value-type="percentage" office:value="0.134" calcext:value-type="percentage">
            <text:p>13.4%</text:p>
          </table:table-cell>
          <table:table-cell table:style-name="ce49" table:formula="of:=(MAX([.B37:.F37])-MIN([.B37:.F37]))/[.H37]*5" office:value-type="percentage" office:value="0.393454256492116" calcext:value-type="percentage">
            <text:p>39.3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159" calcext:value-type="float">
            <text:p>159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37" calcext:value-type="float">
            <text:p>137</text:p>
          </table:table-cell>
          <table:table-cell table:style-name="ce21" office:value-type="float" office:value="166" calcext:value-type="float">
            <text:p>166</text:p>
          </table:table-cell>
          <table:table-cell table:style-name="ce25" table:formula="of:=SUMPRODUCT(([.B38:.F38]&lt;&gt;&quot;&quot;)*([.B38:.F38]/[.B$19:.F$19]) / SUM([.B38:.F38]&lt;&gt;&quot;&quot;))" office:value-type="float" office:value="21.416170572841" calcext:value-type="float">
            <text:p>21.4</text:p>
          </table:table-cell>
          <table:table-cell table:style-name="ce47" table:formula="of:=[.G38]*[.H$19]" office:value-type="float" office:value="823.551900539336" calcext:value-type="float">
            <text:p>824</text:p>
          </table:table-cell>
          <table:table-cell table:style-name="ce35" table:formula="of:=STDEVP([.B38:.F38])/AVERAGE([.B38:.F38])" office:value-type="percentage" office:value="0.151888231525845" calcext:value-type="percentage">
            <text:p>15.2%</text:p>
          </table:table-cell>
          <table:table-cell table:style-name="ce48" table:formula="of:=IF([.H38]&gt;[.$A$7]; [.$C$7]; IF([.H38]&gt;[.$A$8]; [.$C$8]; IF([.H38]&gt;[.$A$9];[.$C$9];IF([.H38]&gt;[.$A$10];[.$C$10]; IF([.H38]&gt;[.$A$11];[.$C$11];IF([.H38]&gt;[.$A$12];[.$C$12];[.$C$13]))))))/100" office:value-type="percentage" office:value="0.156" calcext:value-type="percentage">
            <text:p>15.6%</text:p>
          </table:table-cell>
          <table:table-cell table:style-name="ce49" table:formula="of:=(MAX([.B38:.F38])-MIN([.B38:.F38]))/[.H38]*5" office:value-type="percentage" office:value="0.44927344561732" calcext:value-type="percentage">
            <text:p>44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128" calcext:value-type="float">
            <text:p>128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09" calcext:value-type="float">
            <text:p>109</text:p>
          </table:table-cell>
          <table:table-cell table:style-name="ce21" office:value-type="float" office:value="131" calcext:value-type="float">
            <text:p>131</text:p>
          </table:table-cell>
          <table:table-cell table:style-name="ce25" table:formula="of:=SUMPRODUCT(([.B39:.F39]&lt;&gt;&quot;&quot;)*([.B39:.F39]/[.B$19:.F$19]) / SUM([.B39:.F39]&lt;&gt;&quot;&quot;))" office:value-type="float" office:value="16.9503232931221" calcext:value-type="float">
            <text:p>17.0</text:p>
          </table:table-cell>
          <table:table-cell table:style-name="ce47" table:formula="of:=[.G39]*[.H$19]" office:value-type="float" office:value="651.819190332262" calcext:value-type="float">
            <text:p>652</text:p>
          </table:table-cell>
          <table:table-cell table:style-name="ce35" table:formula="of:=STDEVP([.B39:.F39])/AVERAGE([.B39:.F39])" office:value-type="percentage" office:value="0.137832159132889" calcext:value-type="percentage">
            <text:p>13.8%</text:p>
          </table:table-cell>
          <table:table-cell table:style-name="ce48" table:formula="of:=IF([.H39]&gt;[.$A$7]; [.$C$7]; IF([.H39]&gt;[.$A$8]; [.$C$8]; IF([.H39]&gt;[.$A$9];[.$C$9];IF([.H39]&gt;[.$A$10];[.$C$10]; IF([.H39]&gt;[.$A$11];[.$C$11];IF([.H39]&gt;[.$A$12];[.$C$12];[.$C$13]))))))/100" office:value-type="percentage" office:value="0.156" calcext:value-type="percentage">
            <text:p>15.6%</text:p>
          </table:table-cell>
          <table:table-cell table:style-name="ce49" table:formula="of:=(MAX([.B39:.F39])-MIN([.B39:.F39]))/[.H39]*5" office:value-type="percentage" office:value="0.414225300519871" calcext:value-type="percentage">
            <text:p>41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4</text:p>
          </table:table-cell>
          <table:table-cell table:style-name="ce13" office:value-type="float" office:value="105" calcext:value-type="float">
            <text:p>10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88" calcext:value-type="float">
            <text:p>88</text:p>
          </table:table-cell>
          <table:table-cell table:style-name="ce21" office:value-type="float" office:value="105" calcext:value-type="float">
            <text:p>105</text:p>
          </table:table-cell>
          <table:table-cell table:style-name="ce25" table:formula="of:=SUMPRODUCT(([.B40:.F40]&lt;&gt;&quot;&quot;)*([.B40:.F40]/[.B$19:.F$19]) / SUM([.B40:.F40]&lt;&gt;&quot;&quot;))" office:value-type="float" office:value="14.0122426286767" calcext:value-type="float">
            <text:p>14.0</text:p>
          </table:table-cell>
          <table:table-cell table:style-name="ce47" table:formula="of:=[.G40]*[.H$19]" office:value-type="float" office:value="538.836250319152" calcext:value-type="float">
            <text:p>539</text:p>
          </table:table-cell>
          <table:table-cell table:style-name="ce35" table:formula="of:=STDEVP([.B40:.F40])/AVERAGE([.B40:.F40])" office:value-type="percentage" office:value="0.140733070638315" calcext:value-type="percentage">
            <text:p>14.1%</text:p>
          </table:table-cell>
          <table:table-cell table:style-name="ce48" table:formula="of:=IF([.H40]&gt;[.$A$7]; [.$C$7]; IF([.H40]&gt;[.$A$8]; [.$C$8]; IF([.H40]&gt;[.$A$9];[.$C$9];IF([.H40]&gt;[.$A$10];[.$C$10]; IF([.H40]&gt;[.$A$11];[.$C$11];IF([.H40]&gt;[.$A$12];[.$C$12];[.$C$13]))))))/100" office:value-type="percentage" office:value="0.156" calcext:value-type="percentage">
            <text:p>15.6%</text:p>
          </table:table-cell>
          <table:table-cell table:style-name="ce49" table:formula="of:=(MAX([.B40:.F40])-MIN([.B40:.F40]))/[.H40]*5" office:value-type="percentage" office:value="0.436125074845669" calcext:value-type="percentage">
            <text:p>43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 office:value-type="float" office:value="85" calcext:value-type="float">
            <text:p>8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66" calcext:value-type="float">
            <text:p>66</text:p>
          </table:table-cell>
          <table:table-cell table:style-name="ce21" office:value-type="float" office:value="87" calcext:value-type="float">
            <text:p>87</text:p>
          </table:table-cell>
          <table:table-cell table:style-name="ce25" table:formula="of:=SUMPRODUCT(([.B41:.F41]&lt;&gt;&quot;&quot;)*([.B41:.F41]/[.B$19:.F$19]) / SUM([.B41:.F41]&lt;&gt;&quot;&quot;))" office:value-type="float" office:value="11.3578101613379" calcext:value-type="float">
            <text:p>11.4</text:p>
          </table:table-cell>
          <table:table-cell table:style-name="ce47" table:formula="of:=[.G41]*[.H$19]" office:value-type="float" office:value="436.760909823755" calcext:value-type="float">
            <text:p>437</text:p>
          </table:table-cell>
          <table:table-cell table:style-name="ce35" table:formula="of:=STDEVP([.B41:.F41])/AVERAGE([.B41:.F41])" office:value-type="percentage" office:value="0.189337662182495" calcext:value-type="percentage">
            <text:p>18.9%</text:p>
          </table:table-cell>
          <table:table-cell table:style-name="ce48" table:formula="of:=IF([.H41]&gt;[.$A$7]; [.$C$7]; IF([.H41]&gt;[.$A$8]; [.$C$8]; IF([.H41]&gt;[.$A$9];[.$C$9];IF([.H41]&gt;[.$A$10];[.$C$10]; IF([.H41]&gt;[.$A$11];[.$C$11];IF([.H41]&gt;[.$A$12];[.$C$12];[.$C$13]))))))/100" office:value-type="percentage" office:value="0.193" calcext:value-type="percentage">
            <text:p>19.3%</text:p>
          </table:table-cell>
          <table:table-cell table:style-name="ce49" table:formula="of:=(MAX([.B41:.F41])-MIN([.B41:.F41]))/[.H41]*5" office:value-type="percentage" office:value="0.583843458204397" calcext:value-type="percentage">
            <text:p>58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 office:value-type="float" office:value="62" calcext:value-type="float">
            <text:p>62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54" calcext:value-type="float">
            <text:p>54</text:p>
          </table:table-cell>
          <table:table-cell table:style-name="ce21" office:value-type="float" office:value="60" calcext:value-type="float">
            <text:p>60</text:p>
          </table:table-cell>
          <table:table-cell table:style-name="ce25" table:formula="of:=SUMPRODUCT(([.B42:.F42]&lt;&gt;&quot;&quot;)*([.B42:.F42]/[.B$19:.F$19]) / SUM([.B42:.F42]&lt;&gt;&quot;&quot;))" office:value-type="float" office:value="8.87922886643225" calcext:value-type="float">
            <text:p>8.9</text:p>
          </table:table-cell>
          <table:table-cell table:style-name="ce47" table:formula="of:=[.G42]*[.H$19]" office:value-type="float" office:value="341.447869188499" calcext:value-type="float">
            <text:p>341</text:p>
          </table:table-cell>
          <table:table-cell table:style-name="ce35" table:formula="of:=STDEVP([.B42:.F42])/AVERAGE([.B42:.F42])" office:value-type="percentage" office:value="0.244042591986729" calcext:value-type="percentage">
            <text:p>24.4%</text:p>
          </table:table-cell>
          <table:table-cell table:style-name="ce48" table:formula="of:=IF([.H42]&gt;[.$A$7]; [.$C$7]; IF([.H42]&gt;[.$A$8]; [.$C$8]; IF([.H42]&gt;[.$A$9];[.$C$9];IF([.H42]&gt;[.$A$10];[.$C$10]; IF([.H42]&gt;[.$A$11];[.$C$11];IF([.H42]&gt;[.$A$12];[.$C$12];[.$C$13]))))))/100" office:value-type="percentage" office:value="0.193" calcext:value-type="percentage">
            <text:p>19.3%</text:p>
          </table:table-cell>
          <table:table-cell table:style-name="ce49" table:formula="of:=(MAX([.B42:.F42])-MIN([.B42:.F42]))/[.H42]*5" office:value-type="percentage" office:value="0.688245618748513" calcext:value-type="percentage">
            <text:p>68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48" calcext:value-type="float">
            <text:p>48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5" calcext:value-type="float">
            <text:p>35</text:p>
          </table:table-cell>
          <table:table-cell table:style-name="ce21" office:value-type="float" office:value="49" calcext:value-type="float">
            <text:p>49</text:p>
          </table:table-cell>
          <table:table-cell table:style-name="ce25" table:formula="of:=SUMPRODUCT(([.B43:.F43]&lt;&gt;&quot;&quot;)*([.B43:.F43]/[.B$19:.F$19]) / SUM([.B43:.F43]&lt;&gt;&quot;&quot;))" office:value-type="float" office:value="6.93072862076867" calcext:value-type="float">
            <text:p>6.9</text:p>
          </table:table-cell>
          <table:table-cell table:style-name="ce47" table:formula="of:=[.G43]*[.H$19]" office:value-type="float" office:value="266.518923555586" calcext:value-type="float">
            <text:p>267</text:p>
          </table:table-cell>
          <table:table-cell table:style-name="ce35" table:formula="of:=STDEVP([.B43:.F43])/AVERAGE([.B43:.F43])" office:value-type="percentage" office:value="0.297888222099598" calcext:value-type="percentage">
            <text:p>29.8%</text:p>
          </table:table-cell>
          <table:table-cell table:style-name="ce48" table:formula="of:=IF([.H43]&gt;[.$A$7]; [.$C$7]; IF([.H43]&gt;[.$A$8]; [.$C$8]; IF([.H43]&gt;[.$A$9];[.$C$9];IF([.H43]&gt;[.$A$10];[.$C$10]; IF([.H43]&gt;[.$A$11];[.$C$11];IF([.H43]&gt;[.$A$12];[.$C$12];[.$C$13]))))))/100" office:value-type="percentage" office:value="0.193" calcext:value-type="percentage">
            <text:p>19.3%</text:p>
          </table:table-cell>
          <table:table-cell table:style-name="ce49" table:formula="of:=(MAX([.B43:.F43])-MIN([.B43:.F43]))/[.H43]*5" office:value-type="percentage" office:value="0.900498909414005" calcext:value-type="percentage">
            <text:p>90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8</text:p>
          </table:table-cell>
          <table:table-cell table:style-name="ce13" office:value-type="float" office:value="44" calcext:value-type="float">
            <text:p>44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26" calcext:value-type="float">
            <text:p>26</text:p>
          </table:table-cell>
          <table:table-cell table:style-name="ce21" office:value-type="float" office:value="43" calcext:value-type="float">
            <text:p>43</text:p>
          </table:table-cell>
          <table:table-cell table:style-name="ce25" table:formula="of:=SUMPRODUCT(([.B44:.F44]&lt;&gt;&quot;&quot;)*([.B44:.F44]/[.B$19:.F$19]) / SUM([.B44:.F44]&lt;&gt;&quot;&quot;))" office:value-type="float" office:value="5.94825078130802" calcext:value-type="float">
            <text:p>5.9</text:p>
          </table:table-cell>
          <table:table-cell table:style-name="ce47" table:formula="of:=[.G44]*[.H$19]" office:value-type="float" office:value="228.738056561947" calcext:value-type="float">
            <text:p>229</text:p>
          </table:table-cell>
          <table:table-cell table:style-name="ce35" table:formula="of:=STDEVP([.B44:.F44])/AVERAGE([.B44:.F44])" office:value-type="percentage" office:value="0.322789844761159" calcext:value-type="percentage">
            <text:p>32.3%</text:p>
          </table:table-cell>
          <table:table-cell table:style-name="ce48" table:formula="of:=IF([.H44]&gt;[.$A$7]; [.$C$7]; IF([.H44]&gt;[.$A$8]; [.$C$8]; IF([.H44]&gt;[.$A$9];[.$C$9];IF([.H44]&gt;[.$A$10];[.$C$10]; IF([.H44]&gt;[.$A$11];[.$C$11];IF([.H44]&gt;[.$A$12];[.$C$12];[.$C$13]))))))/100" office:value-type="percentage" office:value="0.193" calcext:value-type="percentage">
            <text:p>19.3%</text:p>
          </table:table-cell>
          <table:table-cell table:style-name="ce49" table:formula="of:=(MAX([.B44:.F44])-MIN([.B44:.F44]))/[.H44]*5" office:value-type="percentage" office:value="1.00551698067659" calcext:value-type="percentage">
            <text:p>100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2" calcext:value-type="float">
            <text:p>22</text:p>
          </table:table-cell>
          <table:table-cell table:style-name="ce21" office:value-type="float" office:value="34" calcext:value-type="float">
            <text:p>34</text:p>
          </table:table-cell>
          <table:table-cell table:style-name="ce25" table:formula="of:=SUMPRODUCT(([.B45:.F45]&lt;&gt;&quot;&quot;)*([.B45:.F45]/[.B$19:.F$19]) / SUM([.B45:.F45]&lt;&gt;&quot;&quot;))" office:value-type="float" office:value="4.91516818710358" calcext:value-type="float">
            <text:p>4.9</text:p>
          </table:table-cell>
          <table:table-cell table:style-name="ce47" table:formula="of:=[.G45]*[.H$19]" office:value-type="float" office:value="189.011200120575" calcext:value-type="float">
            <text:p>189</text:p>
          </table:table-cell>
          <table:table-cell table:style-name="ce35" table:formula="of:=STDEVP([.B45:.F45])/AVERAGE([.B45:.F45])" office:value-type="percentage" office:value="0.299491464509734" calcext:value-type="percentage">
            <text:p>29.9%</text:p>
          </table:table-cell>
          <table:table-cell table:style-name="ce48" table:formula="of:=IF([.H45]&gt;[.$A$7]; [.$C$7]; IF([.H45]&gt;[.$A$8]; [.$C$8]; IF([.H45]&gt;[.$A$9];[.$C$9];IF([.H45]&gt;[.$A$10];[.$C$10]; IF([.H45]&gt;[.$A$11];[.$C$11];IF([.H45]&gt;[.$A$12];[.$C$12];[.$C$13]))))))/100" office:value-type="percentage" office:value="0.275" calcext:value-type="percentage">
            <text:p>27.5%</text:p>
          </table:table-cell>
          <table:table-cell table:style-name="ce49" table:formula="of:=(MAX([.B45:.F45])-MIN([.B45:.F45]))/[.H45]*5" office:value-type="percentage" office:value="0.925871058902132" calcext:value-type="percentage">
            <text:p>92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9" calcext:value-type="float">
            <text:p>19</text:p>
          </table:table-cell>
          <table:table-cell table:style-name="ce21" office:value-type="float" office:value="27" calcext:value-type="float">
            <text:p>27</text:p>
          </table:table-cell>
          <table:table-cell table:style-name="ce25" table:formula="of:=SUMPRODUCT(([.B46:.F46]&lt;&gt;&quot;&quot;)*([.B46:.F46]/[.B$19:.F$19]) / SUM([.B46:.F46]&lt;&gt;&quot;&quot;))" office:value-type="float" office:value="4.19076002663208" calcext:value-type="float">
            <text:p>4.2</text:p>
          </table:table-cell>
          <table:table-cell table:style-name="ce47" table:formula="of:=[.G46]*[.H$19]" office:value-type="float" office:value="161.154319017888" calcext:value-type="float">
            <text:p>161</text:p>
          </table:table-cell>
          <table:table-cell table:style-name="ce35" table:formula="of:=STDEVP([.B46:.F46])/AVERAGE([.B46:.F46])" office:value-type="percentage" office:value="0.315733292599723" calcext:value-type="percentage">
            <text:p>31.6%</text:p>
          </table:table-cell>
          <table:table-cell table:style-name="ce48" table:formula="of:=IF([.H46]&gt;[.$A$7]; [.$C$7]; IF([.H46]&gt;[.$A$8]; [.$C$8]; IF([.H46]&gt;[.$A$9];[.$C$9];IF([.H46]&gt;[.$A$10];[.$C$10]; IF([.H46]&gt;[.$A$11];[.$C$11];IF([.H46]&gt;[.$A$12];[.$C$12];[.$C$13]))))))/100" office:value-type="percentage" office:value="0.275" calcext:value-type="percentage">
            <text:p>27.5%</text:p>
          </table:table-cell>
          <table:table-cell table:style-name="ce49" table:formula="of:=(MAX([.B46:.F46])-MIN([.B46:.F46]))/[.H46]*5" office:value-type="percentage" office:value="0.930784858352757" calcext:value-type="percentage">
            <text:p>93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5" table:formula="of:=SUMPRODUCT(([.B47:.F47]&lt;&gt;&quot;&quot;)*([.B47:.F47]/[.B$19:.F$19]) / SUM([.B47:.F47]&lt;&gt;&quot;&quot;))" office:value-type="float" office:value="1.40576612006809" calcext:value-type="float">
            <text:p>1.4</text:p>
          </table:table-cell>
          <table:table-cell table:style-name="ce47" table:formula="of:=[.G47]*[.H$19]" office:value-type="float" office:value="54.0582806789956" calcext:value-type="float">
            <text:p>54</text:p>
          </table:table-cell>
          <table:table-cell table:style-name="ce35" table:formula="of:=STDEVP([.B47:.F47])/AVERAGE([.B47:.F47])" office:value-type="percentage" office:value="0.547472055522018" calcext:value-type="percentage">
            <text:p>54.7%</text:p>
          </table:table-cell>
          <table:table-cell table:style-name="ce48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49" table:formula="of:=(MAX([.B47:.F47])-MIN([.B47:.F47]))/[.H47]*5" office:value-type="percentage" office:value="1.5723770518108" calcext:value-type="percentage">
            <text:p>157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PRODUCT(([.B48:.F48]&lt;&gt;&quot;&quot;)*([.B48:.F48]/[.B$19:.F$19]) / SUM([.B48:.F48]&lt;&gt;&quot;&quot;))" office:value-type="float" office:value="0.237281305902313" calcext:value-type="float">
            <text:p>0.2</text:p>
          </table:table-cell>
          <table:table-cell table:style-name="ce47" table:formula="of:=[.G48]*[.H$19]" office:value-type="float" office:value="9.12457573933033" calcext:value-type="float">
            <text:p>9</text:p>
          </table:table-cell>
          <table:table-cell table:style-name="ce35" table:formula="of:=STDEVP([.B48:.F48])/AVERAGE([.B48:.F48])" office:value-type="percentage" office:value="0.737027731190089" calcext:value-type="percentage">
            <text:p>73.7%</text:p>
          </table:table-cell>
          <table:table-cell table:style-name="ce48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49" table:formula="of:=(MAX([.B48:.F48])-MIN([.B48:.F48]))/[.H48]*5" office:value-type="percentage" office:value="2.19188273201487" calcext:value-type="percentage">
            <text:p>219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PRODUCT(([.B49:.F49]&lt;&gt;&quot;&quot;)*([.B49:.F49]/[.B$19:.F$19]) / SUM([.B49:.F49]&lt;&gt;&quot;&quot;))" office:value-type="float" office:value="0.0254653733312859" calcext:value-type="float">
            <text:p>0.0</text:p>
          </table:table-cell>
          <table:table-cell table:style-name="ce47" table:formula="of:=[.G49]*[.H$19]" office:value-type="float" office:value="0.979262680673641" calcext:value-type="float">
            <text:p>1</text:p>
          </table:table-cell>
          <table:table-cell table:style-name="ce35" table:formula="of:=STDEVP([.B49:.F49])/AVERAGE([.B49:.F49])" office:value-type="percentage" office:value="2" calcext:value-type="percentage">
            <text:p>200.0%</text:p>
          </table:table-cell>
          <table:table-cell table:style-name="ce48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49" table:formula="of:=(MAX([.B49:.F49])-MIN([.B49:.F49]))/[.H49]*5" office:value-type="percentage" office:value="5.10588231194563" calcext:value-type="percentage">
            <text:p>510.6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100ml bottle'.H20:'100ml bottle'.H49">
            <calcext:condition calcext:apply-style-name="Good" calcext:value="&gt;1000" calcext:base-cell-address="'100ml bottle'.H20"/>
          </calcext:conditional-format>
          <calcext:conditional-format calcext:target-range-address="'100ml bottle'.K20:'100ml bottle'.K49">
            <calcext:condition calcext:apply-style-name="Good" calcext:value="&lt;[.J20]" calcext:base-cell-address="'100ml bottle'.K20"/>
          </calcext:conditional-format>
        </calcext:conditional-formats>
      </table:table>
      <table:table table:name="30D-direct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2"/>
          <table:table-cell table:style-name="ce8" office:value-type="string" calcext:value-type="string">
            <text:p>Mean counted X</text:p>
          </table:table-cell>
          <table:table-cell table:style-name="ce2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3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3" office:value-type="string" calcext:value-type="string">
            <text:p>D<text:span text:style-name="T1">QMAX / SAMPLE</text:span></text:p>
          </table:table-cell>
          <table:table-cell table:style-name="ce3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6" table:number-columns-repeated="32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" table:number-columns-repeated="5"/>
          <table:table-cell table:number-columns-repeated="9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Scanned ml</text:p>
          </table:table-cell>
          <table:table-cell table:style-name="ce12" office:value-type="float" office:value="7.191248" calcext:value-type="float">
            <text:p>7.2</text:p>
          </table:table-cell>
          <table:table-cell table:style-name="ce15" office:value-type="float" office:value="7.503596" calcext:value-type="float">
            <text:p>7.5</text:p>
          </table:table-cell>
          <table:table-cell table:style-name="ce15" office:value-type="float" office:value="7.453307" calcext:value-type="float">
            <text:p>7.5</text:p>
          </table:table-cell>
          <table:table-cell table:style-name="ce15" office:value-type="float" office:value="7.513118" calcext:value-type="float">
            <text:p>7.5</text:p>
          </table:table-cell>
          <table:table-cell table:style-name="ce20" office:value-type="float" office:value="7.528851" calcext:value-type="float">
            <text:p>7.5</text:p>
          </table:table-cell>
          <table:table-cell table:style-name="ce24"/>
          <table:table-cell table:style-name="ce32" table:formula="of:=SUM([.B19:.F19])" office:value-type="float" office:value="37.19012" calcext:value-type="float">
            <text:p>37.2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4</text:p>
          </table:table-cell>
          <table:table-cell table:style-name="ce13" office:value-type="float" office:value="67781.726562" calcext:value-type="float">
            <text:p>67781.726562</text:p>
          </table:table-cell>
          <table:table-cell table:style-name="ce16" office:value-type="float" office:value="71733.492188" calcext:value-type="float">
            <text:p>71733.492188</text:p>
          </table:table-cell>
          <table:table-cell table:style-name="ce16" office:value-type="float" office:value="69672.507812" calcext:value-type="float">
            <text:p>69672.507812</text:p>
          </table:table-cell>
          <table:table-cell table:style-name="ce16" office:value-type="float" office:value="69644.945312" calcext:value-type="float">
            <text:p>69644.945312</text:p>
          </table:table-cell>
          <table:table-cell table:style-name="ce21"/>
          <table:table-cell table:style-name="ce25" table:formula="of:=SUMPRODUCT(([.B20:.F20]&lt;&gt;&quot;&quot;)*([.B20:.F20]/[.B$19:.F$19]) / SUM([.B20:.F20]&lt;&gt;&quot;&quot;))" office:value-type="float" office:value="9400.77806561117" calcext:value-type="float">
            <text:p>9400.8</text:p>
          </table:table-cell>
          <table:table-cell table:style-name="ce50" table:formula="of:=[.G20]*[.H$19]" office:value-type="float" office:value="349616.064353447" calcext:value-type="float">
            <text:p>349616</text:p>
          </table:table-cell>
          <table:table-cell table:style-name="ce35" table:formula="of:=STDEVP([.B20:.F20])/AVERAGE([.B20:.F20])" office:value-type="percentage" office:value="0.0200560229643378" calcext:value-type="percentage">
            <text:p>2.0%</text:p>
          </table:table-cell>
          <table:table-cell table:style-name="ce51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52" table:formula="of:=(MAX([.B20:.F20])-MIN([.B20:.F20]))/[.H20]*5" office:value-type="percentage" office:value="0.0565157901612458" calcext:value-type="percentage">
            <text:p>5.7%</text:p>
          </table:table-cell>
          <table:table-cell table:number-columns-repeated="4"/>
          <table:table-cell table:style-name="ce1" table:number-columns-repeated="2"/>
          <table:table-cell table:style-name="ce6" table:number-columns-repeated="32"/>
        </table:table-row>
        <table:table-row table:style-name="ro2">
          <table:table-cell table:style-name="ce6" office:value-type="string" calcext:value-type="string">
            <text:p>count_5</text:p>
          </table:table-cell>
          <table:table-cell table:style-name="ce13" office:value-type="float" office:value="43008" calcext:value-type="float">
            <text:p>43008</text:p>
          </table:table-cell>
          <table:table-cell table:style-name="ce16"/>
          <table:table-cell table:style-name="ce16" office:value-type="float" office:value="44330" calcext:value-type="float">
            <text:p>44330</text:p>
          </table:table-cell>
          <table:table-cell table:style-name="ce16" office:value-type="float" office:value="44470" calcext:value-type="float">
            <text:p>44470</text:p>
          </table:table-cell>
          <table:table-cell table:style-name="ce21" office:value-type="float" office:value="40034" calcext:value-type="float">
            <text:p>40034</text:p>
          </table:table-cell>
          <table:table-cell table:style-name="ce25" table:formula="of:=SUMPRODUCT(([.B21:.F21]&lt;&gt;&quot;&quot;)*([.B21:.F21]/[.B$19:.F$19]) / SUM([.B21:.F21]&lt;&gt;&quot;&quot;))" office:value-type="float" office:value="5791.1727025383" calcext:value-type="float">
            <text:p>5791.2</text:p>
          </table:table-cell>
          <table:table-cell table:style-name="ce50" table:formula="of:=[.G21]*[.H$19]" office:value-type="float" office:value="215374.407748124" calcext:value-type="float">
            <text:p>215374</text:p>
          </table:table-cell>
          <table:table-cell table:style-name="ce35" table:formula="of:=STDEVP([.B21:.F21])/AVERAGE([.B21:.F21])" office:value-type="percentage" office:value="0.0415104585459945" calcext:value-type="percentage">
            <text:p>4.2%</text:p>
          </table:table-cell>
          <table:table-cell table:style-name="ce51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52" table:formula="of:=(MAX([.B21:.F21])-MIN([.B21:.F21]))/[.H21]*5" office:value-type="percentage" office:value="0.102983452081916" calcext:value-type="percentage">
            <text:p>10.3%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2"/>
          <table:table-cell table:style-name="ce6" table:number-columns-repeated="30"/>
        </table:table-row>
        <table:table-row table:style-name="ro2">
          <table:table-cell table:style-name="ce6" office:value-type="string" calcext:value-type="string">
            <text:p>count_6</text:p>
          </table:table-cell>
          <table:table-cell table:style-name="ce13" office:value-type="float" office:value="29065" calcext:value-type="float">
            <text:p>29065</text:p>
          </table:table-cell>
          <table:table-cell table:style-name="ce16"/>
          <table:table-cell table:style-name="ce16" office:value-type="float" office:value="30083" calcext:value-type="float">
            <text:p>30083</text:p>
          </table:table-cell>
          <table:table-cell table:style-name="ce16" office:value-type="float" office:value="30135" calcext:value-type="float">
            <text:p>30135</text:p>
          </table:table-cell>
          <table:table-cell table:style-name="ce21" office:value-type="float" office:value="27325" calcext:value-type="float">
            <text:p>27325</text:p>
          </table:table-cell>
          <table:table-cell table:style-name="ce25" table:formula="of:=SUMPRODUCT(([.B22:.F22]&lt;&gt;&quot;&quot;)*([.B22:.F22]/[.B$19:.F$19]) / SUM([.B22:.F22]&lt;&gt;&quot;&quot;))" office:value-type="float" office:value="3929.56745381961" calcext:value-type="float">
            <text:p>3929.6</text:p>
          </table:table-cell>
          <table:table-cell table:style-name="ce50" table:formula="of:=[.G22]*[.H$19]" office:value-type="float" office:value="146141.085155646" calcext:value-type="float">
            <text:p>146141</text:p>
          </table:table-cell>
          <table:table-cell table:style-name="ce35" table:formula="of:=STDEVP([.B22:.F22])/AVERAGE([.B22:.F22])" office:value-type="percentage" office:value="0.0390306381535512" calcext:value-type="percentage">
            <text:p>3.9%</text:p>
          </table:table-cell>
          <table:table-cell table:style-name="ce51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52" table:formula="of:=(MAX([.B22:.F22])-MIN([.B22:.F22]))/[.H22]*5" office:value-type="percentage" office:value="0.0961399731296385" calcext:value-type="percentage">
            <text:p>9.6%</text:p>
          </table:table-cell>
          <table:table-cell table:number-columns-repeated="3"/>
          <table:table-cell table:style-name="ce23"/>
          <table:table-cell table:style-name="ce6"/>
          <table:table-cell table:number-columns-repeated="3"/>
          <table:table-cell table:style-name="ce25" table:number-columns-repeated="30"/>
        </table:table-row>
        <table:table-row table:style-name="ro2">
          <table:table-cell table:style-name="ce6" office:value-type="string" calcext:value-type="string">
            <text:p>count_7</text:p>
          </table:table-cell>
          <table:table-cell table:style-name="ce13" office:value-type="float" office:value="19026" calcext:value-type="float">
            <text:p>19026</text:p>
          </table:table-cell>
          <table:table-cell table:style-name="ce16"/>
          <table:table-cell table:style-name="ce16" office:value-type="float" office:value="19756" calcext:value-type="float">
            <text:p>19756</text:p>
          </table:table-cell>
          <table:table-cell table:style-name="ce16" office:value-type="float" office:value="19836" calcext:value-type="float">
            <text:p>19836</text:p>
          </table:table-cell>
          <table:table-cell table:style-name="ce21" office:value-type="float" office:value="18058" calcext:value-type="float">
            <text:p>18058</text:p>
          </table:table-cell>
          <table:table-cell table:style-name="ce25" table:formula="of:=SUMPRODUCT(([.B23:.F23]&lt;&gt;&quot;&quot;)*([.B23:.F23]/[.B$19:.F$19]) / SUM([.B23:.F23]&lt;&gt;&quot;&quot;))" office:value-type="float" office:value="2583.76010019216" calcext:value-type="float">
            <text:p>2583.8</text:p>
          </table:table-cell>
          <table:table-cell table:style-name="ce50" table:formula="of:=[.G23]*[.H$19]" office:value-type="float" office:value="96090.3481773583" calcext:value-type="float">
            <text:p>96090</text:p>
          </table:table-cell>
          <table:table-cell table:style-name="ce35" table:formula="of:=STDEVP([.B23:.F23])/AVERAGE([.B23:.F23])" office:value-type="percentage" office:value="0.0372936776998844" calcext:value-type="percentage">
            <text:p>3.7%</text:p>
          </table:table-cell>
          <table:table-cell table:style-name="ce51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52" table:formula="of:=(MAX([.B23:.F23])-MIN([.B23:.F23]))/[.H23]*5" office:value-type="percentage" office:value="0.0925170963434467" calcext:value-type="percentage">
            <text:p>9.3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8</text:p>
          </table:table-cell>
          <table:table-cell table:style-name="ce13" office:value-type="float" office:value="12624" calcext:value-type="float">
            <text:p>12624</text:p>
          </table:table-cell>
          <table:table-cell table:style-name="ce16"/>
          <table:table-cell table:style-name="ce16" office:value-type="float" office:value="13106" calcext:value-type="float">
            <text:p>13106</text:p>
          </table:table-cell>
          <table:table-cell table:style-name="ce16" office:value-type="float" office:value="13318" calcext:value-type="float">
            <text:p>13318</text:p>
          </table:table-cell>
          <table:table-cell table:style-name="ce21" office:value-type="float" office:value="12200" calcext:value-type="float">
            <text:p>12200</text:p>
          </table:table-cell>
          <table:table-cell table:style-name="ce25" table:formula="of:=SUMPRODUCT(([.B24:.F24]&lt;&gt;&quot;&quot;)*([.B24:.F24]/[.B$19:.F$19]) / SUM([.B24:.F24]&lt;&gt;&quot;&quot;))" office:value-type="float" office:value="1726.73683740706" calcext:value-type="float">
            <text:p>1726.7</text:p>
          </table:table-cell>
          <table:table-cell table:style-name="ce50" table:formula="of:=[.G24]*[.H$19]" office:value-type="float" office:value="64217.5501915889" calcext:value-type="float">
            <text:p>64218</text:p>
          </table:table-cell>
          <table:table-cell table:style-name="ce35" table:formula="of:=STDEVP([.B24:.F24])/AVERAGE([.B24:.F24])" office:value-type="percentage" office:value="0.0338505651043087" calcext:value-type="percentage">
            <text:p>3.4%</text:p>
          </table:table-cell>
          <table:table-cell table:style-name="ce51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52" table:formula="of:=(MAX([.B24:.F24])-MIN([.B24:.F24]))/[.H24]*5" office:value-type="percentage" office:value="0.0870478550384217" calcext:value-type="percentage">
            <text:p>8.7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2">
          <table:table-cell table:style-name="ce6" office:value-type="string" calcext:value-type="string">
            <text:p>count_9</text:p>
          </table:table-cell>
          <table:table-cell table:style-name="ce13" office:value-type="float" office:value="8722" calcext:value-type="float">
            <text:p>8722</text:p>
          </table:table-cell>
          <table:table-cell table:style-name="ce16"/>
          <table:table-cell table:style-name="ce16" office:value-type="float" office:value="9032" calcext:value-type="float">
            <text:p>9032</text:p>
          </table:table-cell>
          <table:table-cell table:style-name="ce16" office:value-type="float" office:value="9111" calcext:value-type="float">
            <text:p>9111</text:p>
          </table:table-cell>
          <table:table-cell table:style-name="ce21" office:value-type="float" office:value="8456" calcext:value-type="float">
            <text:p>8456</text:p>
          </table:table-cell>
          <table:table-cell table:style-name="ce25" table:formula="of:=SUMPRODUCT(([.B25:.F25]&lt;&gt;&quot;&quot;)*([.B25:.F25]/[.B$19:.F$19]) / SUM([.B25:.F25]&lt;&gt;&quot;&quot;))" office:value-type="float" office:value="1190.12484063067" calcext:value-type="float">
            <text:p>1190.1</text:p>
          </table:table-cell>
          <table:table-cell table:style-name="ce50" table:formula="of:=[.G25]*[.H$19]" office:value-type="float" office:value="44260.8856380357" calcext:value-type="float">
            <text:p>44261</text:p>
          </table:table-cell>
          <table:table-cell table:style-name="ce35" table:formula="of:=STDEVP([.B25:.F25])/AVERAGE([.B25:.F25])" office:value-type="percentage" office:value="0.0294934585900713" calcext:value-type="percentage">
            <text:p>2.9%</text:p>
          </table:table-cell>
          <table:table-cell table:style-name="ce51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52" table:formula="of:=(MAX([.B25:.F25])-MIN([.B25:.F25]))/[.H25]*5" office:value-type="percentage" office:value="0.0739930969023725" calcext:value-type="percentage">
            <text:p>7.4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2">
          <table:table-cell table:style-name="ce6" office:value-type="string" calcext:value-type="string">
            <text:p>count_10</text:p>
          </table:table-cell>
          <table:table-cell table:style-name="ce13" office:value-type="float" office:value="6249" calcext:value-type="float">
            <text:p>6249</text:p>
          </table:table-cell>
          <table:table-cell table:style-name="ce16"/>
          <table:table-cell table:style-name="ce16" office:value-type="float" office:value="6391" calcext:value-type="float">
            <text:p>6391</text:p>
          </table:table-cell>
          <table:table-cell table:style-name="ce16" office:value-type="float" office:value="6498" calcext:value-type="float">
            <text:p>6498</text:p>
          </table:table-cell>
          <table:table-cell table:style-name="ce21" office:value-type="float" office:value="6095" calcext:value-type="float">
            <text:p>6095</text:p>
          </table:table-cell>
          <table:table-cell table:style-name="ce25" table:formula="of:=SUMPRODUCT(([.B26:.F26]&lt;&gt;&quot;&quot;)*([.B26:.F26]/[.B$19:.F$19]) / SUM([.B26:.F26]&lt;&gt;&quot;&quot;))" office:value-type="float" office:value="850.221102477407" calcext:value-type="float">
            <text:p>850.2</text:p>
          </table:table-cell>
          <table:table-cell table:style-name="ce50" table:formula="of:=[.G26]*[.H$19]" office:value-type="float" office:value="31619.8248276671" calcext:value-type="float">
            <text:p>31620</text:p>
          </table:table-cell>
          <table:table-cell table:style-name="ce35" table:formula="of:=STDEVP([.B26:.F26])/AVERAGE([.B26:.F26])" office:value-type="percentage" office:value="0.0240200601143646" calcext:value-type="percentage">
            <text:p>2.4%</text:p>
          </table:table-cell>
          <table:table-cell table:style-name="ce51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52" table:formula="of:=(MAX([.B26:.F26])-MIN([.B26:.F26]))/[.H26]*5" office:value-type="percentage" office:value="0.0637258432322779" calcext:value-type="percentage">
            <text:p>6.4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1</text:p>
          </table:table-cell>
          <table:table-cell table:style-name="ce13" office:value-type="float" office:value="4638" calcext:value-type="float">
            <text:p>4638</text:p>
          </table:table-cell>
          <table:table-cell table:style-name="ce16"/>
          <table:table-cell table:style-name="ce16" office:value-type="float" office:value="4731" calcext:value-type="float">
            <text:p>4731</text:p>
          </table:table-cell>
          <table:table-cell table:style-name="ce16" office:value-type="float" office:value="4826" calcext:value-type="float">
            <text:p>4826</text:p>
          </table:table-cell>
          <table:table-cell table:style-name="ce21" office:value-type="float" office:value="4517" calcext:value-type="float">
            <text:p>4517</text:p>
          </table:table-cell>
          <table:table-cell table:style-name="ce25" table:formula="of:=SUMPRODUCT(([.B27:.F27]&lt;&gt;&quot;&quot;)*([.B27:.F27]/[.B$19:.F$19]) / SUM([.B27:.F27]&lt;&gt;&quot;&quot;))" office:value-type="float" office:value="630.501086605833" calcext:value-type="float">
            <text:p>630.5</text:p>
          </table:table-cell>
          <table:table-cell table:style-name="ce50" table:formula="of:=[.G27]*[.H$19]" office:value-type="float" office:value="23448.4110710013" calcext:value-type="float">
            <text:p>23448</text:p>
          </table:table-cell>
          <table:table-cell table:style-name="ce35" table:formula="of:=STDEVP([.B27:.F27])/AVERAGE([.B27:.F27])" office:value-type="percentage" office:value="0.0244279166355711" calcext:value-type="percentage">
            <text:p>2.4%</text:p>
          </table:table-cell>
          <table:table-cell table:style-name="ce51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52" table:formula="of:=(MAX([.B27:.F27])-MIN([.B27:.F27]))/[.H27]*5" office:value-type="percentage" office:value="0.0658893259471515" calcext:value-type="percentage">
            <text:p>6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2</text:p>
          </table:table-cell>
          <table:table-cell table:style-name="ce13" office:value-type="float" office:value="3534" calcext:value-type="float">
            <text:p>3534</text:p>
          </table:table-cell>
          <table:table-cell table:style-name="ce16"/>
          <table:table-cell table:style-name="ce16" office:value-type="float" office:value="3560" calcext:value-type="float">
            <text:p>3560</text:p>
          </table:table-cell>
          <table:table-cell table:style-name="ce16" office:value-type="float" office:value="3671" calcext:value-type="float">
            <text:p>3671</text:p>
          </table:table-cell>
          <table:table-cell table:style-name="ce21" office:value-type="float" office:value="3475" calcext:value-type="float">
            <text:p>3475</text:p>
          </table:table-cell>
          <table:table-cell table:style-name="ce25" table:formula="of:=SUMPRODUCT(([.B28:.F28]&lt;&gt;&quot;&quot;)*([.B28:.F28]/[.B$19:.F$19]) / SUM([.B28:.F28]&lt;&gt;&quot;&quot;))" office:value-type="float" office:value="479.810221743957" calcext:value-type="float">
            <text:p>479.8</text:p>
          </table:table-cell>
          <table:table-cell table:style-name="ce50" table:formula="of:=[.G28]*[.H$19]" office:value-type="float" office:value="17844.1997238844" calcext:value-type="float">
            <text:p>17844</text:p>
          </table:table-cell>
          <table:table-cell table:style-name="ce35" table:formula="of:=STDEVP([.B28:.F28])/AVERAGE([.B28:.F28])" office:value-type="percentage" office:value="0.0199724829640186" calcext:value-type="percentage">
            <text:p>2.0%</text:p>
          </table:table-cell>
          <table:table-cell table:style-name="ce51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52" table:formula="of:=(MAX([.B28:.F28])-MIN([.B28:.F28]))/[.H28]*5" office:value-type="percentage" office:value="0.0549198067251106" calcext:value-type="percentage">
            <text:p>5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3</text:p>
          </table:table-cell>
          <table:table-cell table:style-name="ce13" office:value-type="float" office:value="2814" calcext:value-type="float">
            <text:p>2814</text:p>
          </table:table-cell>
          <table:table-cell table:style-name="ce16"/>
          <table:table-cell table:style-name="ce16" office:value-type="float" office:value="2785" calcext:value-type="float">
            <text:p>2785</text:p>
          </table:table-cell>
          <table:table-cell table:style-name="ce16" office:value-type="float" office:value="2857" calcext:value-type="float">
            <text:p>2857</text:p>
          </table:table-cell>
          <table:table-cell table:style-name="ce21" office:value-type="float" office:value="2704" calcext:value-type="float">
            <text:p>2704</text:p>
          </table:table-cell>
          <table:table-cell table:style-name="ce25" table:formula="of:=SUMPRODUCT(([.B29:.F29]&lt;&gt;&quot;&quot;)*([.B29:.F29]/[.B$19:.F$19]) / SUM([.B29:.F29]&lt;&gt;&quot;&quot;))" office:value-type="float" office:value="376.097149251778" calcext:value-type="float">
            <text:p>376.1</text:p>
          </table:table-cell>
          <table:table-cell table:style-name="ce50" table:formula="of:=[.G29]*[.H$19]" office:value-type="float" office:value="13987.0981123315" calcext:value-type="float">
            <text:p>13987</text:p>
          </table:table-cell>
          <table:table-cell table:style-name="ce35" table:formula="of:=STDEVP([.B29:.F29])/AVERAGE([.B29:.F29])" office:value-type="percentage" office:value="0.0200252278550219" calcext:value-type="percentage">
            <text:p>2.0%</text:p>
          </table:table-cell>
          <table:table-cell table:style-name="ce51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52" table:formula="of:=(MAX([.B29:.F29])-MIN([.B29:.F29]))/[.H29]*5" office:value-type="percentage" office:value="0.0546932604501821" calcext:value-type="percentage">
            <text:p>5.5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4</text:p>
          </table:table-cell>
          <table:table-cell table:style-name="ce13" office:value-type="float" office:value="2285" calcext:value-type="float">
            <text:p>2285</text:p>
          </table:table-cell>
          <table:table-cell table:style-name="ce16"/>
          <table:table-cell table:style-name="ce16" office:value-type="float" office:value="2214" calcext:value-type="float">
            <text:p>2214</text:p>
          </table:table-cell>
          <table:table-cell table:style-name="ce16" office:value-type="float" office:value="2271" calcext:value-type="float">
            <text:p>2271</text:p>
          </table:table-cell>
          <table:table-cell table:style-name="ce21" office:value-type="float" office:value="2171" calcext:value-type="float">
            <text:p>2171</text:p>
          </table:table-cell>
          <table:table-cell table:style-name="ce25" table:formula="of:=SUMPRODUCT(([.B30:.F30]&lt;&gt;&quot;&quot;)*([.B30:.F30]/[.B$19:.F$19]) / SUM([.B30:.F30]&lt;&gt;&quot;&quot;))" office:value-type="float" office:value="301.356355352411" calcext:value-type="float">
            <text:p>301.4</text:p>
          </table:table-cell>
          <table:table-cell table:style-name="ce50" table:formula="of:=[.G30]*[.H$19]" office:value-type="float" office:value="11207.4790183188" calcext:value-type="float">
            <text:p>11207</text:p>
          </table:table-cell>
          <table:table-cell table:style-name="ce35" table:formula="of:=STDEVP([.B30:.F30])/AVERAGE([.B30:.F30])" office:value-type="percentage" office:value="0.0204191696260732" calcext:value-type="percentage">
            <text:p>2.0%</text:p>
          </table:table-cell>
          <table:table-cell table:style-name="ce51" table:formula="of:=IF([.H30]&gt;[.$A$7]; [.$C$7]; IF([.H30]&gt;[.$A$8]; [.$C$8]; IF([.H30]&gt;[.$A$9];[.$C$9];IF([.H30]&gt;[.$A$10];[.$C$10]; IF([.H30]&gt;[.$A$11];[.$C$11];IF([.H30]&gt;[.$A$12];[.$C$12];[.$C$13]))))))/100" office:value-type="percentage" office:value="0.11" calcext:value-type="percentage">
            <text:p>11.0%</text:p>
          </table:table-cell>
          <table:table-cell table:style-name="ce52" table:formula="of:=(MAX([.B30:.F30])-MIN([.B30:.F30]))/[.H30]*5" office:value-type="percentage" office:value="0.0508588951242581" calcext:value-type="percentage">
            <text:p>5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5</text:p>
          </table:table-cell>
          <table:table-cell table:style-name="ce13" office:value-type="float" office:value="1858" calcext:value-type="float">
            <text:p>1858</text:p>
          </table:table-cell>
          <table:table-cell table:style-name="ce16" office:value-type="float" office:value="1848" calcext:value-type="float">
            <text:p>1848</text:p>
          </table:table-cell>
          <table:table-cell table:style-name="ce16" office:value-type="float" office:value="1795" calcext:value-type="float">
            <text:p>1795</text:p>
          </table:table-cell>
          <table:table-cell table:style-name="ce16" office:value-type="float" office:value="1814" calcext:value-type="float">
            <text:p>1814</text:p>
          </table:table-cell>
          <table:table-cell table:style-name="ce21" office:value-type="float" office:value="1716" calcext:value-type="float">
            <text:p>1716</text:p>
          </table:table-cell>
          <table:table-cell table:style-name="ce25" table:formula="of:=SUMPRODUCT(([.B31:.F31]&lt;&gt;&quot;&quot;)*([.B31:.F31]/[.B$19:.F$19]) / SUM([.B31:.F31]&lt;&gt;&quot;&quot;))" office:value-type="float" office:value="242.970363397428" calcext:value-type="float">
            <text:p>243.0</text:p>
          </table:table-cell>
          <table:table-cell table:style-name="ce50" table:formula="of:=[.G31]*[.H$19]" office:value-type="float" office:value="9036.09697119394" calcext:value-type="float">
            <text:p>9036</text:p>
          </table:table-cell>
          <table:table-cell table:style-name="ce35" table:formula="of:=STDEVP([.B31:.F31])/AVERAGE([.B31:.F31])" office:value-type="percentage" office:value="0.0279609507328439" calcext:value-type="percentage">
            <text:p>2.8%</text:p>
          </table:table-cell>
          <table:table-cell table:style-name="ce51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52" table:formula="of:=(MAX([.B31:.F31])-MIN([.B31:.F31]))/[.H31]*5" office:value-type="percentage" office:value="0.0785737473007871" calcext:value-type="percentage">
            <text:p>7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6</text:p>
          </table:table-cell>
          <table:table-cell table:style-name="ce13" office:value-type="float" office:value="1496" calcext:value-type="float">
            <text:p>1496</text:p>
          </table:table-cell>
          <table:table-cell table:style-name="ce16" office:value-type="float" office:value="1485" calcext:value-type="float">
            <text:p>1485</text:p>
          </table:table-cell>
          <table:table-cell table:style-name="ce16" office:value-type="float" office:value="1446" calcext:value-type="float">
            <text:p>1446</text:p>
          </table:table-cell>
          <table:table-cell table:style-name="ce16" office:value-type="float" office:value="1461" calcext:value-type="float">
            <text:p>1461</text:p>
          </table:table-cell>
          <table:table-cell table:style-name="ce21" office:value-type="float" office:value="1381" calcext:value-type="float">
            <text:p>1381</text:p>
          </table:table-cell>
          <table:table-cell table:style-name="ce25" table:formula="of:=SUMPRODUCT(([.B32:.F32]&lt;&gt;&quot;&quot;)*([.B32:.F32]/[.B$19:.F$19]) / SUM([.B32:.F32]&lt;&gt;&quot;&quot;))" office:value-type="float" office:value="195.566240609603" calcext:value-type="float">
            <text:p>195.6</text:p>
          </table:table-cell>
          <table:table-cell table:style-name="ce50" table:formula="of:=[.G32]*[.H$19]" office:value-type="float" office:value="7273.13195622" calcext:value-type="float">
            <text:p>7273</text:p>
          </table:table-cell>
          <table:table-cell table:style-name="ce35" table:formula="of:=STDEVP([.B32:.F32])/AVERAGE([.B32:.F32])" office:value-type="percentage" office:value="0.0277994557410695" calcext:value-type="percentage">
            <text:p>2.8%</text:p>
          </table:table-cell>
          <table:table-cell table:style-name="ce51" table:formula="of:=IF([.H32]&gt;[.$A$7]; [.$C$7]; IF([.H32]&gt;[.$A$8]; [.$C$8]; IF([.H32]&gt;[.$A$9];[.$C$9];IF([.H32]&gt;[.$A$10];[.$C$10]; IF([.H32]&gt;[.$A$11];[.$C$11];IF([.H32]&gt;[.$A$12];[.$C$12];[.$C$13]))))))/100" office:value-type="percentage" office:value="0.113" calcext:value-type="percentage">
            <text:p>11.3%</text:p>
          </table:table-cell>
          <table:table-cell table:style-name="ce52" table:formula="of:=(MAX([.B32:.F32])-MIN([.B32:.F32]))/[.H32]*5" office:value-type="percentage" office:value="0.0790581008925954" calcext:value-type="percentage">
            <text:p>7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7</text:p>
          </table:table-cell>
          <table:table-cell table:style-name="ce13" office:value-type="float" office:value="1183" calcext:value-type="float">
            <text:p>1183</text:p>
          </table:table-cell>
          <table:table-cell table:style-name="ce16" office:value-type="float" office:value="1183" calcext:value-type="float">
            <text:p>1183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1176" calcext:value-type="float">
            <text:p>1176</text:p>
          </table:table-cell>
          <table:table-cell table:style-name="ce21" office:value-type="float" office:value="1100" calcext:value-type="float">
            <text:p>1100</text:p>
          </table:table-cell>
          <table:table-cell table:style-name="ce25" table:formula="of:=SUMPRODUCT(([.B33:.F33]&lt;&gt;&quot;&quot;)*([.B33:.F33]/[.B$19:.F$19]) / SUM([.B33:.F33]&lt;&gt;&quot;&quot;))" office:value-type="float" office:value="155.576105582893" calcext:value-type="float">
            <text:p>155.6</text:p>
          </table:table-cell>
          <table:table-cell table:style-name="ce50" table:formula="of:=[.G33]*[.H$19]" office:value-type="float" office:value="5785.89403576048" calcext:value-type="float">
            <text:p>5786</text:p>
          </table:table-cell>
          <table:table-cell table:style-name="ce35" table:formula="of:=STDEVP([.B33:.F33])/AVERAGE([.B33:.F33])" office:value-type="percentage" office:value="0.0279286891734125" calcext:value-type="percentage">
            <text:p>2.8%</text:p>
          </table:table-cell>
          <table:table-cell table:style-name="ce51" table:formula="of:=IF([.H33]&gt;[.$A$7]; [.$C$7]; IF([.H33]&gt;[.$A$8]; [.$C$8]; IF([.H33]&gt;[.$A$9];[.$C$9];IF([.H33]&gt;[.$A$10];[.$C$10]; IF([.H33]&gt;[.$A$11];[.$C$11];IF([.H33]&gt;[.$A$12];[.$C$12];[.$C$13]))))))/100" office:value-type="percentage" office:value="0.113" calcext:value-type="percentage">
            <text:p>11.3%</text:p>
          </table:table-cell>
          <table:table-cell table:style-name="ce52" table:formula="of:=(MAX([.B33:.F33])-MIN([.B33:.F33]))/[.H33]*5" office:value-type="percentage" office:value="0.0717261666796934" calcext:value-type="percentage">
            <text:p>7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8</text:p>
          </table:table-cell>
          <table:table-cell table:style-name="ce13" office:value-type="float" office:value="963" calcext:value-type="float">
            <text:p>963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947" calcext:value-type="float">
            <text:p>947</text:p>
          </table:table-cell>
          <table:table-cell table:style-name="ce21" office:value-type="float" office:value="878" calcext:value-type="float">
            <text:p>878</text:p>
          </table:table-cell>
          <table:table-cell table:style-name="ce25" table:formula="of:=SUMPRODUCT(([.B34:.F34]&lt;&gt;&quot;&quot;)*([.B34:.F34]/[.B$19:.F$19]) / SUM([.B34:.F34]&lt;&gt;&quot;&quot;))" office:value-type="float" office:value="125.59016816083" calcext:value-type="float">
            <text:p>125.6</text:p>
          </table:table-cell>
          <table:table-cell table:style-name="ce50" table:formula="of:=[.G34]*[.H$19]" office:value-type="float" office:value="4670.71342472144" calcext:value-type="float">
            <text:p>4671</text:p>
          </table:table-cell>
          <table:table-cell table:style-name="ce35" table:formula="of:=STDEVP([.B34:.F34])/AVERAGE([.B34:.F34])" office:value-type="percentage" office:value="0.0339300782790386" calcext:value-type="percentage">
            <text:p>3.4%</text:p>
          </table:table-cell>
          <table:table-cell table:style-name="ce51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52" table:formula="of:=(MAX([.B34:.F34])-MIN([.B34:.F34]))/[.H34]*5" office:value-type="percentage" office:value="0.0909925232728975" calcext:value-type="percentage">
            <text:p>9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19</text:p>
          </table:table-cell>
          <table:table-cell table:style-name="ce13"/>
          <table:table-cell table:style-name="ce16" office:value-type="float" office:value="759" calcext:value-type="float">
            <text:p>759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58" calcext:value-type="float">
            <text:p>758</text:p>
          </table:table-cell>
          <table:table-cell table:style-name="ce21" office:value-type="float" office:value="692" calcext:value-type="float">
            <text:p>692</text:p>
          </table:table-cell>
          <table:table-cell table:style-name="ce25" table:formula="of:=SUMPRODUCT(([.B35:.F35]&lt;&gt;&quot;&quot;)*([.B35:.F35]/[.B$19:.F$19]) / SUM([.B35:.F35]&lt;&gt;&quot;&quot;))" office:value-type="float" office:value="98.7459447647832" calcext:value-type="float">
            <text:p>98.7</text:p>
          </table:table-cell>
          <table:table-cell table:style-name="ce50" table:formula="of:=[.G35]*[.H$19]" office:value-type="float" office:value="3672.37353531566" calcext:value-type="float">
            <text:p>3672</text:p>
          </table:table-cell>
          <table:table-cell table:style-name="ce35" table:formula="of:=STDEVP([.B35:.F35])/AVERAGE([.B35:.F35])" office:value-type="percentage" office:value="0.037938681398731" calcext:value-type="percentage">
            <text:p>3.8%</text:p>
          </table:table-cell>
          <table:table-cell table:style-name="ce51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52" table:formula="of:=(MAX([.B35:.F35])-MIN([.B35:.F35]))/[.H35]*5" office:value-type="percentage" office:value="0.0912216572683707" calcext:value-type="percentage">
            <text:p>9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0</text:p>
          </table:table-cell>
          <table:table-cell table:style-name="ce13" office:value-type="float" office:value="635" calcext:value-type="float">
            <text:p>635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float" office:value="614" calcext:value-type="float">
            <text:p>614</text:p>
          </table:table-cell>
          <table:table-cell table:style-name="ce21" office:value-type="float" office:value="571" calcext:value-type="float">
            <text:p>571</text:p>
          </table:table-cell>
          <table:table-cell table:style-name="ce25" table:formula="of:=SUMPRODUCT(([.B36:.F36]&lt;&gt;&quot;&quot;)*([.B36:.F36]/[.B$19:.F$19]) / SUM([.B36:.F36]&lt;&gt;&quot;&quot;))" office:value-type="float" office:value="82.8158683963879" calcext:value-type="float">
            <text:p>82.8</text:p>
          </table:table-cell>
          <table:table-cell table:style-name="ce50" table:formula="of:=[.G36]*[.H$19]" office:value-type="float" office:value="3079.93208356587" calcext:value-type="float">
            <text:p>3080</text:p>
          </table:table-cell>
          <table:table-cell table:style-name="ce35" table:formula="of:=STDEVP([.B36:.F36])/AVERAGE([.B36:.F36])" office:value-type="percentage" office:value="0.0386136615325563" calcext:value-type="percentage">
            <text:p>3.9%</text:p>
          </table:table-cell>
          <table:table-cell table:style-name="ce51" table:formula="of:=IF([.H36]&gt;[.$A$7]; [.$C$7]; IF([.H36]&gt;[.$A$8]; [.$C$8]; IF([.H36]&gt;[.$A$9];[.$C$9];IF([.H36]&gt;[.$A$10];[.$C$10]; IF([.H36]&gt;[.$A$11];[.$C$11];IF([.H36]&gt;[.$A$12];[.$C$12];[.$C$13]))))))/100" office:value-type="percentage" office:value="0.119" calcext:value-type="percentage">
            <text:p>11.9%</text:p>
          </table:table-cell>
          <table:table-cell table:style-name="ce52" table:formula="of:=(MAX([.B36:.F36])-MIN([.B36:.F36]))/[.H36]*5" office:value-type="percentage" office:value="0.105521807358727" calcext:value-type="percentage">
            <text:p>10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1</text:p>
          </table:table-cell>
          <table:table-cell table:style-name="ce13" office:value-type="float" office:value="530" calcext:value-type="float">
            <text:p>530</text:p>
          </table:table-cell>
          <table:table-cell table:style-name="ce16" office:value-type="float" office:value="530" calcext:value-type="float">
            <text:p>530</text:p>
          </table:table-cell>
          <table:table-cell table:number-columns-repeated="2" table:style-name="ce16" office:value-type="float" office:value="510" calcext:value-type="float">
            <text:p>510</text:p>
          </table:table-cell>
          <table:table-cell table:style-name="ce21"/>
          <table:table-cell table:style-name="ce25" table:formula="of:=SUMPRODUCT(([.B37:.F37]&lt;&gt;&quot;&quot;)*([.B37:.F37]/[.B$19:.F$19]) / SUM([.B37:.F37]&lt;&gt;&quot;&quot;))" office:value-type="float" office:value="70.1601930427163" calcext:value-type="float">
            <text:p>70.2</text:p>
          </table:table-cell>
          <table:table-cell table:style-name="ce50" table:formula="of:=[.G37]*[.H$19]" office:value-type="float" office:value="2609.26599848179" calcext:value-type="float">
            <text:p>2609</text:p>
          </table:table-cell>
          <table:table-cell table:style-name="ce35" table:formula="of:=STDEVP([.B37:.F37])/AVERAGE([.B37:.F37])" office:value-type="percentage" office:value="0.0192307692307692" calcext:value-type="percentage">
            <text:p>1.9%</text:p>
          </table:table-cell>
          <table:table-cell table:style-name="ce51" table:formula="of:=IF([.H37]&gt;[.$A$7]; [.$C$7]; IF([.H37]&gt;[.$A$8]; [.$C$8]; IF([.H37]&gt;[.$A$9];[.$C$9];IF([.H37]&gt;[.$A$10];[.$C$10]; IF([.H37]&gt;[.$A$11];[.$C$11];IF([.H37]&gt;[.$A$12];[.$C$12];[.$C$13]))))))/100" office:value-type="percentage" office:value="0.119" calcext:value-type="percentage">
            <text:p>11.9%</text:p>
          </table:table-cell>
          <table:table-cell table:style-name="ce52" table:formula="of:=(MAX([.B37:.F37])-MIN([.B37:.F37]))/[.H37]*5" office:value-type="percentage" office:value="0.0383249542431418" calcext:value-type="percentage">
            <text:p>3.8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2</text:p>
          </table:table-cell>
          <table:table-cell table:style-name="ce13" office:value-type="float" office:value="442" calcext:value-type="float">
            <text:p>442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15" calcext:value-type="float">
            <text:p>415</text:p>
          </table:table-cell>
          <table:table-cell table:style-name="ce21"/>
          <table:table-cell table:style-name="ce25" table:formula="of:=SUMPRODUCT(([.B38:.F38]&lt;&gt;&quot;&quot;)*([.B38:.F38]/[.B$19:.F$19]) / SUM([.B38:.F38]&lt;&gt;&quot;&quot;))" office:value-type="float" office:value="58.154971760159" calcext:value-type="float">
            <text:p>58.2</text:p>
          </table:table-cell>
          <table:table-cell table:style-name="ce50" table:formula="of:=[.G38]*[.H$19]" office:value-type="float" office:value="2162.79037835692" calcext:value-type="float">
            <text:p>2163</text:p>
          </table:table-cell>
          <table:table-cell table:style-name="ce35" table:formula="of:=STDEVP([.B38:.F38])/AVERAGE([.B38:.F38])" office:value-type="percentage" office:value="0.0354540760787381" calcext:value-type="percentage">
            <text:p>3.5%</text:p>
          </table:table-cell>
          <table:table-cell table:style-name="ce51" table:formula="of:=IF([.H38]&gt;[.$A$7]; [.$C$7]; IF([.H38]&gt;[.$A$8]; [.$C$8]; IF([.H38]&gt;[.$A$9];[.$C$9];IF([.H38]&gt;[.$A$10];[.$C$10]; IF([.H38]&gt;[.$A$11];[.$C$11];IF([.H38]&gt;[.$A$12];[.$C$12];[.$C$13]))))))/100" office:value-type="percentage" office:value="0.119" calcext:value-type="percentage">
            <text:p>11.9%</text:p>
          </table:table-cell>
          <table:table-cell table:style-name="ce52" table:formula="of:=(MAX([.B38:.F38])-MIN([.B38:.F38]))/[.H38]*5" office:value-type="percentage" office:value="0.0809139904408803" calcext:value-type="percentage">
            <text:p>8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3</text:p>
          </table:table-cell>
          <table:table-cell table:style-name="ce13" office:value-type="float" office:value="375" calcext:value-type="float">
            <text:p>375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49" calcext:value-type="float">
            <text:p>349</text:p>
          </table:table-cell>
          <table:table-cell table:style-name="ce21"/>
          <table:table-cell table:style-name="ce25" table:formula="of:=SUMPRODUCT(([.B39:.F39]&lt;&gt;&quot;&quot;)*([.B39:.F39]/[.B$19:.F$19]) / SUM([.B39:.F39]&lt;&gt;&quot;&quot;))" office:value-type="float" office:value="48.7835142418842" calcext:value-type="float">
            <text:p>48.8</text:p>
          </table:table-cell>
          <table:table-cell table:style-name="ce50" table:formula="of:=[.G39]*[.H$19]" office:value-type="float" office:value="1814.26474867738" calcext:value-type="float">
            <text:p>1814</text:p>
          </table:table-cell>
          <table:table-cell table:style-name="ce35" table:formula="of:=STDEVP([.B39:.F39])/AVERAGE([.B39:.F39])" office:value-type="percentage" office:value="0.0333387850434134" calcext:value-type="percentage">
            <text:p>3.3%</text:p>
          </table:table-cell>
          <table:table-cell table:style-name="ce51" table:formula="of:=IF([.H39]&gt;[.$A$7]; [.$C$7]; IF([.H39]&gt;[.$A$8]; [.$C$8]; IF([.H39]&gt;[.$A$9];[.$C$9];IF([.H39]&gt;[.$A$10];[.$C$10]; IF([.H39]&gt;[.$A$11];[.$C$11];IF([.H39]&gt;[.$A$12];[.$C$12];[.$C$13]))))))/100" office:value-type="percentage" office:value="0.134" calcext:value-type="percentage">
            <text:p>13.4%</text:p>
          </table:table-cell>
          <table:table-cell table:style-name="ce52" table:formula="of:=(MAX([.B39:.F39])-MIN([.B39:.F39]))/[.H39]*5" office:value-type="percentage" office:value="0.0716543713340467" calcext:value-type="percentage">
            <text:p>7.2%</text:p>
          </table:table-cell>
          <table:table-cell table:number-columns-repeated="38"/>
        </table:table-row>
        <table:table-row table:style-name="ro1">
          <table:table-cell table:style-name="ce6" office:value-type="string" calcext:value-type="string">
            <text:p>count_24</text:p>
          </table:table-cell>
          <table:table-cell table:style-name="ce13" office:value-type="float" office:value="327" calcext:value-type="float">
            <text:p>32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84" calcext:value-type="float">
            <text:p>284</text:p>
          </table:table-cell>
          <table:table-cell table:style-name="ce21" office:value-type="float" office:value="259" calcext:value-type="float">
            <text:p>259</text:p>
          </table:table-cell>
          <table:table-cell table:style-name="ce25" table:formula="of:=SUMPRODUCT(([.B40:.F40]&lt;&gt;&quot;&quot;)*([.B40:.F40]/[.B$19:.F$19]) / SUM([.B40:.F40]&lt;&gt;&quot;&quot;))" office:value-type="float" office:value="39.5795434554668" calcext:value-type="float">
            <text:p>39.6</text:p>
          </table:table-cell>
          <table:table-cell table:style-name="ce50" table:formula="of:=[.G40]*[.H$19]" office:value-type="float" office:value="1471.96797065403" calcext:value-type="float">
            <text:p>1472</text:p>
          </table:table-cell>
          <table:table-cell table:style-name="ce35" table:formula="of:=STDEVP([.B40:.F40])/AVERAGE([.B40:.F40])" office:value-type="percentage" office:value="0.0777714970722601" calcext:value-type="percentage">
            <text:p>7.8%</text:p>
          </table:table-cell>
          <table:table-cell table:style-name="ce51" table:formula="of:=IF([.H40]&gt;[.$A$7]; [.$C$7]; IF([.H40]&gt;[.$A$8]; [.$C$8]; IF([.H40]&gt;[.$A$9];[.$C$9];IF([.H40]&gt;[.$A$10];[.$C$10]; IF([.H40]&gt;[.$A$11];[.$C$11];IF([.H40]&gt;[.$A$12];[.$C$12];[.$C$13]))))))/100" office:value-type="percentage" office:value="0.134" calcext:value-type="percentage">
            <text:p>13.4%</text:p>
          </table:table-cell>
          <table:table-cell table:style-name="ce52" table:formula="of:=(MAX([.B40:.F40])-MIN([.B40:.F40]))/[.H40]*5" office:value-type="percentage" office:value="0.230983286850278" calcext:value-type="percentage">
            <text:p>23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5</text:p>
          </table:table-cell>
          <table:table-cell table:style-name="ce13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number-columns-repeated="2" table:style-name="ce16" office:value-type="float" office:value="238" calcext:value-type="float">
            <text:p>238</text:p>
          </table:table-cell>
          <table:table-cell table:style-name="ce21"/>
          <table:table-cell table:style-name="ce25" table:formula="of:=SUMPRODUCT(([.B41:.F41]&lt;&gt;&quot;&quot;)*([.B41:.F41]/[.B$19:.F$19]) / SUM([.B41:.F41]&lt;&gt;&quot;&quot;))" office:value-type="float" office:value="33.7051925804195" calcext:value-type="float">
            <text:p>33.7</text:p>
          </table:table-cell>
          <table:table-cell table:style-name="ce50" table:formula="of:=[.G41]*[.H$19]" office:value-type="float" office:value="1253.50015668891" calcext:value-type="float">
            <text:p>1254</text:p>
          </table:table-cell>
          <table:table-cell table:style-name="ce35" table:formula="of:=STDEVP([.B41:.F41])/AVERAGE([.B41:.F41])" office:value-type="percentage" office:value="0.0470683401221571" calcext:value-type="percentage">
            <text:p>4.7%</text:p>
          </table:table-cell>
          <table:table-cell table:style-name="ce51" table:formula="of:=IF([.H41]&gt;[.$A$7]; [.$C$7]; IF([.H41]&gt;[.$A$8]; [.$C$8]; IF([.H41]&gt;[.$A$9];[.$C$9];IF([.H41]&gt;[.$A$10];[.$C$10]; IF([.H41]&gt;[.$A$11];[.$C$11];IF([.H41]&gt;[.$A$12];[.$C$12];[.$C$13]))))))/100" office:value-type="percentage" office:value="0.134" calcext:value-type="percentage">
            <text:p>13.4%</text:p>
          </table:table-cell>
          <table:table-cell table:style-name="ce52" table:formula="of:=(MAX([.B41:.F41])-MIN([.B41:.F41]))/[.H41]*5" office:value-type="percentage" office:value="0.0957319385718922" calcext:value-type="percentage">
            <text:p>9.6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6</text:p>
          </table:table-cell>
          <table:table-cell table:style-name="ce13" office:value-type="float" office:value="200" calcext:value-type="float">
            <text:p>200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98" calcext:value-type="float">
            <text:p>198</text:p>
          </table:table-cell>
          <table:table-cell table:style-name="ce21"/>
          <table:table-cell table:style-name="ce25" table:formula="of:=SUMPRODUCT(([.B42:.F42]&lt;&gt;&quot;&quot;)*([.B42:.F42]/[.B$19:.F$19]) / SUM([.B42:.F42]&lt;&gt;&quot;&quot;))" office:value-type="float" office:value="26.9105781292697" calcext:value-type="float">
            <text:p>26.9</text:p>
          </table:table-cell>
          <table:table-cell table:style-name="ce50" table:formula="of:=[.G42]*[.H$19]" office:value-type="float" office:value="1000.80762989691" calcext:value-type="float">
            <text:p>1001</text:p>
          </table:table-cell>
          <table:table-cell table:style-name="ce35" table:formula="of:=STDEVP([.B42:.F42])/AVERAGE([.B42:.F42])" office:value-type="percentage" office:value="0.042753689496822" calcext:value-type="percentage">
            <text:p>4.3%</text:p>
          </table:table-cell>
          <table:table-cell table:style-name="ce51" table:formula="of:=IF([.H42]&gt;[.$A$7]; [.$C$7]; IF([.H42]&gt;[.$A$8]; [.$C$8]; IF([.H42]&gt;[.$A$9];[.$C$9];IF([.H42]&gt;[.$A$10];[.$C$10]; IF([.H42]&gt;[.$A$11];[.$C$11];IF([.H42]&gt;[.$A$12];[.$C$12];[.$C$13]))))))/100" office:value-type="percentage" office:value="0.134" calcext:value-type="percentage">
            <text:p>13.4%</text:p>
          </table:table-cell>
          <table:table-cell table:style-name="ce52" table:formula="of:=(MAX([.B42:.F42])-MIN([.B42:.F42]))/[.H42]*5" office:value-type="percentage" office:value="0.119903162621133" calcext:value-type="percentage">
            <text:p>12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7</text:p>
          </table:table-cell>
          <table:table-cell table:style-name="ce13" office:value-type="float" office:value="166" calcext:value-type="float">
            <text:p>166</text:p>
          </table:table-cell>
          <table:table-cell table:style-name="ce16"/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60" calcext:value-type="float">
            <text:p>160</text:p>
          </table:table-cell>
          <table:table-cell table:style-name="ce21" office:value-type="float" office:value="143" calcext:value-type="float">
            <text:p>143</text:p>
          </table:table-cell>
          <table:table-cell table:style-name="ce25" table:formula="of:=SUMPRODUCT(([.B43:.F43]&lt;&gt;&quot;&quot;)*([.B43:.F43]/[.B$19:.F$19]) / SUM([.B43:.F43]&lt;&gt;&quot;&quot;))" office:value-type="float" office:value="20.6733962601089" calcext:value-type="float">
            <text:p>20.7</text:p>
          </table:table-cell>
          <table:table-cell table:style-name="ce50" table:formula="of:=[.G43]*[.H$19]" office:value-type="float" office:value="768.846087721001" calcext:value-type="float">
            <text:p>769</text:p>
          </table:table-cell>
          <table:table-cell table:style-name="ce35" table:formula="of:=STDEVP([.B43:.F43])/AVERAGE([.B43:.F43])" office:value-type="percentage" office:value="0.0651508174476863" calcext:value-type="percentage">
            <text:p>6.5%</text:p>
          </table:table-cell>
          <table:table-cell table:style-name="ce51" table:formula="of:=IF([.H43]&gt;[.$A$7]; [.$C$7]; IF([.H43]&gt;[.$A$8]; [.$C$8]; IF([.H43]&gt;[.$A$9];[.$C$9];IF([.H43]&gt;[.$A$10];[.$C$10]; IF([.H43]&gt;[.$A$11];[.$C$11];IF([.H43]&gt;[.$A$12];[.$C$12];[.$C$13]))))))/100" office:value-type="percentage" office:value="0.156" calcext:value-type="percentage">
            <text:p>15.6%</text:p>
          </table:table-cell>
          <table:table-cell table:style-name="ce52" table:formula="of:=(MAX([.B43:.F43])-MIN([.B43:.F43]))/[.H43]*5" office:value-type="percentage" office:value="0.149574800257983" calcext:value-type="percentage">
            <text:p>15.0%</text:p>
          </table:table-cell>
          <table:table-cell table:number-columns-repeated="38"/>
        </table:table-row>
        <table:table-row table:style-name="ro1">
          <table:table-cell table:style-name="ce6" office:value-type="string" calcext:value-type="string">
            <text:p>count_28</text:p>
          </table:table-cell>
          <table:table-cell table:style-name="ce13" office:value-type="float" office:value="131" calcext:value-type="float">
            <text:p>131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41" calcext:value-type="float">
            <text:p>141</text:p>
          </table:table-cell>
          <table:table-cell table:style-name="ce21" office:value-type="float" office:value="122" calcext:value-type="float">
            <text:p>122</text:p>
          </table:table-cell>
          <table:table-cell table:style-name="ce25" table:formula="of:=SUMPRODUCT(([.B44:.F44]&lt;&gt;&quot;&quot;)*([.B44:.F44]/[.B$19:.F$19]) / SUM([.B44:.F44]&lt;&gt;&quot;&quot;))" office:value-type="float" office:value="17.802441337647" calcext:value-type="float">
            <text:p>17.8</text:p>
          </table:table-cell>
          <table:table-cell table:style-name="ce50" table:formula="of:=[.G44]*[.H$19]" office:value-type="float" office:value="662.074929640051" calcext:value-type="float">
            <text:p>662</text:p>
          </table:table-cell>
          <table:table-cell table:style-name="ce35" table:formula="of:=STDEVP([.B44:.F44])/AVERAGE([.B44:.F44])" office:value-type="percentage" office:value="0.0814310088939187" calcext:value-type="percentage">
            <text:p>8.1%</text:p>
          </table:table-cell>
          <table:table-cell table:style-name="ce51" table:formula="of:=IF([.H44]&gt;[.$A$7]; [.$C$7]; IF([.H44]&gt;[.$A$8]; [.$C$8]; IF([.H44]&gt;[.$A$9];[.$C$9];IF([.H44]&gt;[.$A$10];[.$C$10]; IF([.H44]&gt;[.$A$11];[.$C$11];IF([.H44]&gt;[.$A$12];[.$C$12];[.$C$13]))))))/100" office:value-type="percentage" office:value="0.156" calcext:value-type="percentage">
            <text:p>15.6%</text:p>
          </table:table-cell>
          <table:table-cell table:style-name="ce52" table:formula="of:=(MAX([.B44:.F44])-MIN([.B44:.F44]))/[.H44]*5" office:value-type="percentage" office:value="0.21145642846817" calcext:value-type="percentage">
            <text:p>21.1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29</text:p>
          </table:table-cell>
          <table:table-cell table:style-name="ce13" office:value-type="float" office:value="106" calcext:value-type="float">
            <text:p>106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1" calcext:value-type="float">
            <text:p>121</text:p>
          </table:table-cell>
          <table:table-cell table:style-name="ce21" office:value-type="float" office:value="106" calcext:value-type="float">
            <text:p>106</text:p>
          </table:table-cell>
          <table:table-cell table:style-name="ce25" table:formula="of:=SUMPRODUCT(([.B45:.F45]&lt;&gt;&quot;&quot;)*([.B45:.F45]/[.B$19:.F$19]) / SUM([.B45:.F45]&lt;&gt;&quot;&quot;))" office:value-type="float" office:value="14.6533236509607" calcext:value-type="float">
            <text:p>14.7</text:p>
          </table:table-cell>
          <table:table-cell table:style-name="ce50" table:formula="of:=[.G45]*[.H$19]" office:value-type="float" office:value="544.958864978065" calcext:value-type="float">
            <text:p>545</text:p>
          </table:table-cell>
          <table:table-cell table:style-name="ce35" table:formula="of:=STDEVP([.B45:.F45])/AVERAGE([.B45:.F45])" office:value-type="percentage" office:value="0.0684086307607606" calcext:value-type="percentage">
            <text:p>6.8%</text:p>
          </table:table-cell>
          <table:table-cell table:style-name="ce51" table:formula="of:=IF([.H45]&gt;[.$A$7]; [.$C$7]; IF([.H45]&gt;[.$A$8]; [.$C$8]; IF([.H45]&gt;[.$A$9];[.$C$9];IF([.H45]&gt;[.$A$10];[.$C$10]; IF([.H45]&gt;[.$A$11];[.$C$11];IF([.H45]&gt;[.$A$12];[.$C$12];[.$C$13]))))))/100" office:value-type="percentage" office:value="0.156" calcext:value-type="percentage">
            <text:p>15.6%</text:p>
          </table:table-cell>
          <table:table-cell table:style-name="ce52" table:formula="of:=(MAX([.B45:.F45])-MIN([.B45:.F45]))/[.H45]*5" office:value-type="percentage" office:value="0.201850097446213" calcext:value-type="percentage">
            <text:p>20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0</text:p>
          </table:table-cell>
          <table:table-cell table:style-name="ce13" office:value-type="float" office:value="96" calcext:value-type="float">
            <text:p>96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110" calcext:value-type="float">
            <text:p>110</text:p>
          </table:table-cell>
          <table:table-cell table:style-name="ce21" office:value-type="float" office:value="94" calcext:value-type="float">
            <text:p>94</text:p>
          </table:table-cell>
          <table:table-cell table:style-name="ce25" table:formula="of:=SUMPRODUCT(([.B46:.F46]&lt;&gt;&quot;&quot;)*([.B46:.F46]/[.B$19:.F$19]) / SUM([.B46:.F46]&lt;&gt;&quot;&quot;))" office:value-type="float" office:value="12.9616583761072" calcext:value-type="float">
            <text:p>13.0</text:p>
          </table:table-cell>
          <table:table-cell table:style-name="ce50" table:formula="of:=[.G46]*[.H$19]" office:value-type="float" office:value="482.045630406432" calcext:value-type="float">
            <text:p>482</text:p>
          </table:table-cell>
          <table:table-cell table:style-name="ce35" table:formula="of:=STDEVP([.B46:.F46])/AVERAGE([.B46:.F46])" office:value-type="percentage" office:value="0.080245143592588" calcext:value-type="percentage">
            <text:p>8.0%</text:p>
          </table:table-cell>
          <table:table-cell table:style-name="ce51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52" table:formula="of:=(MAX([.B46:.F46])-MIN([.B46:.F46]))/[.H46]*5" office:value-type="percentage" office:value="0.248939088813694" calcext:value-type="percentage">
            <text:p>24.9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38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table:style-name="ce25" table:formula="of:=SUMPRODUCT(([.B47:.F47]&lt;&gt;&quot;&quot;)*([.B47:.F47]/[.B$19:.F$19]) / SUM([.B47:.F47]&lt;&gt;&quot;&quot;))" office:value-type="float" office:value="4.49143947585671" calcext:value-type="float">
            <text:p>4.5</text:p>
          </table:table-cell>
          <table:table-cell table:style-name="ce50" table:formula="of:=[.G47]*[.H$19]" office:value-type="float" office:value="167.037173079848" calcext:value-type="float">
            <text:p>167</text:p>
          </table:table-cell>
          <table:table-cell table:style-name="ce35" table:formula="of:=STDEVP([.B47:.F47])/AVERAGE([.B47:.F47])" office:value-type="percentage" office:value="0.0616504798861497" calcext:value-type="percentage">
            <text:p>6.2%</text:p>
          </table:table-cell>
          <table:table-cell table:style-name="ce51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52" table:formula="of:=(MAX([.B47:.F47])-MIN([.B47:.F47]))/[.H47]*5" office:value-type="percentage" office:value="0.179600740642679" calcext:value-type="percentage">
            <text:p>18.0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5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5" table:formula="of:=SUMPRODUCT(([.B48:.F48]&lt;&gt;&quot;&quot;)*([.B48:.F48]/[.B$19:.F$19]) / SUM([.B48:.F48]&lt;&gt;&quot;&quot;))" office:value-type="float" office:value="1.13221074044024" calcext:value-type="float">
            <text:p>1.1</text:p>
          </table:table-cell>
          <table:table-cell table:style-name="ce50" table:formula="of:=[.G48]*[.H$19]" office:value-type="float" office:value="42.1070533022613" calcext:value-type="float">
            <text:p>42</text:p>
          </table:table-cell>
          <table:table-cell table:style-name="ce35" table:formula="of:=STDEVP([.B48:.F48])/AVERAGE([.B48:.F48])" office:value-type="percentage" office:value="0.277664375945014" calcext:value-type="percentage">
            <text:p>27.8%</text:p>
          </table:table-cell>
          <table:table-cell table:style-name="ce51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52" table:formula="of:=(MAX([.B48:.F48])-MIN([.B48:.F48]))/[.H48]*5" office:value-type="percentage" office:value="0.712469708688661" calcext:value-type="percentage">
            <text:p>71.2%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count_7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PRODUCT(([.B49:.F49]&lt;&gt;&quot;&quot;)*([.B49:.F49]/[.B$19:.F$19]) / SUM([.B49:.F49]&lt;&gt;&quot;&quot;))" office:value-type="float" office:value="0.162384775256706" calcext:value-type="float">
            <text:p>0.2</text:p>
          </table:table-cell>
          <table:table-cell table:style-name="ce50" table:formula="of:=[.G49]*[.H$19]" office:value-type="float" office:value="6.03910927796994" calcext:value-type="float">
            <text:p>6</text:p>
          </table:table-cell>
          <table:table-cell table:style-name="ce35" table:formula="of:=STDEVP([.B49:.F49])/AVERAGE([.B49:.F49])" office:value-type="percentage" office:value="0.623609564462324" calcext:value-type="percentage">
            <text:p>62.4%</text:p>
          </table:table-cell>
          <table:table-cell table:style-name="ce51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52" table:formula="of:=(MAX([.B49:.F49])-MIN([.B49:.F49]))/[.H49]*5" office:value-type="percentage" office:value="1.65587333159859" calcext:value-type="percentage">
            <text:p>165.6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1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2">
          <table:table-cell table:style-name="ce1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2">
          <table:table-cell table:style-name="ce1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2">
          <table:table-cell table:number-columns-repeated="10"/>
          <table:table-cell table:style-name="ce1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30D-direct'.H20:'30D-direct'.H49">
            <calcext:condition calcext:apply-style-name="Good" calcext:value="&gt;1000" calcext:base-cell-address="'30D-direct'.H20"/>
          </calcext:conditional-format>
          <calcext:conditional-format calcext:target-range-address="'30D-direct'.K20:'30D-direct'.K49">
            <calcext:condition calcext:apply-style-name="Good" calcext:value="&lt;[.J20]" calcext:base-cell-address="'30D-direct'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4" number:min-decimal-places="4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>
      <number:number number:decimal-places="6" number:min-decimal-places="6" number:min-integer-digits="1" number:grouping="true"/>
    </number:number-style>
    <number:number-style style:name="N159">
      <number:number number:decimal-places="7" number:min-decimal-places="7" number:min-integer-digits="1" number:grouping="true"/>
    </number:number-style>
    <number:number-style style:name="N160">
      <number:number number:decimal-places="8" number:min-decimal-places="8" number:min-integer-digits="1" number:grouping="true"/>
    </number:number-style>
    <number:number-style style:name="N161">
      <number:number number:decimal-places="17" number:min-decimal-places="17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5" number:min-decimal-places="15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7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5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time-style style:name="N179">
      <number:hours/>
      <number:text>:</number:text>
      <number:minutes number:style="long"/>
      <number:text> </number:text>
      <number:am-pm/>
    </number:time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86">
      <number:number number:decimal-places="1" number:min-decimal-places="1" number:min-integer-digits="1"/>
      <number:text>%</number:text>
    </number:percentage-style>
    <number:number-style style:name="N187P0" style:volatile="true">
      <number:text>£</number:text>
      <number:number number:decimal-places="0" number:min-decimal-places="0" number:min-integer-digits="1" number:grouping="true"/>
    </number:number-style>
    <number:number-style style:name="N187">
      <number:text>-£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decimal-places="2" number:min-integer-digits="1" number:grouping="true"/>
    </number:number-style>
    <number:number-style style:name="N189">
      <number:text>-£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1:46:20.574000000</meta:creation-date>
    <dc:date>2025-04-29T13:08:50.743000000</dc:date>
    <meta:editing-duration>PT1H22M27S</meta:editing-duration>
    <meta:editing-cycles>7</meta:editing-cycles>
    <meta:generator>LibreOffice/7.6.4.1$Windows_X86_64 LibreOffice_project/e19e193f88cd6c0525a17fb7a176ed8e6a3e2aa1</meta:generator>
    <meta:document-statistic meta:table-count="6" meta:cell-count="239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86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8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4.202cm" style:legend-expansion="high" chart:style-name="ch2"/>
        <chart:plot-area chart:style-name="ch3" table:cell-range-address="'Clause 6.6 - Data'.K18:'Clause 6.6 - Data'.K46" chart:data-source-has-labels="row" svg:x="0.32cm" svg:y="0.18cm" svg:width="14.076cm" svg:height="8.64cm">
          <chart:coordinate-region svg:x="1.554cm" svg:y="0.379cm" svg:width="12.842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lause 6.6 - Data'.K19:'Clause 6.6 - Data'.K46" chart:label-cell-address="'Clause 6.6 - Data'.K18:'Clause 6.6 - Data'.K18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Q</text:p>
                <draw:g>
                  <svg:desc>'Clause 6.6 - Data'.K18:'Clause 6.6 - Data'.K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lause 6.6 - Data'.K19:'Clause 6.6 - Data'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1902497287845">
                <text:p>0.0131902497287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7330916527483">
                <text:p>0.0117330916527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6883058885832">
                <text:p>0.015688305888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3045306365511">
                <text:p>0.0173045306365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504132816188">
                <text:p>0.026504132816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503623415755">
                <text:p>0.05950362341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754226563063">
                <text:p>0.0800754226563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6422803643278">
                <text:p>0.0996422803643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012363336847">
                <text:p>0.107012363336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3164362916001">
                <text:p>0.123164362916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6014326803179">
                <text:p>0.136014326803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170214924585">
                <text:p>0.134170214924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1121537407009">
                <text:p>0.181121537407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0335127306557">
                <text:p>0.190335127306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6318786527759">
                <text:p>0.18631878652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224931240936">
                <text:p>0.226224931240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233986143535">
                <text:p>0.25233986143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578342310535">
                <text:p>0.273578342310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8058917495348">
                <text:p>0.278058917495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7003342423141">
                <text:p>0.267003342423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0210474784906">
                <text:p>0.33021047478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4246537100605">
                <text:p>0.344246537100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659926585003">
                <text:p>0.379659926585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6909702948659">
                <text:p>0.426909702948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9050056912811">
                <text:p>0.509050056912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5777435662461">
                <text:p>0.475777435662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1513424169509">
                <text:p>0.511513424169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86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8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5.154cm" svg:y="4.202cm" style:legend-expansion="high" chart:style-name="ch2"/>
        <chart:plot-area chart:style-name="ch3" chart:data-source-has-labels="both" svg:x="0.32cm" svg:y="0.18cm" svg:width="14.514cm" svg:height="8.64cm">
          <chart:coordinate-region svg:x="1.947cm" svg:y="0.378cm" svg:width="12.887cm" svg:height="7.798cm"/>
          <chart:axis chart:dimension="x" chart:name="primary-x" chart:style-name="ch4" chartooo:axis-type="text">
            <chart:categories table:cell-range-address="local-table.$A$2:.$A$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