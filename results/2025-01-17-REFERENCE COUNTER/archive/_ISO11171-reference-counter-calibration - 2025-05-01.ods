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Pictures/100000010000010200000225D6430680.png" manifest:media-type="image/png"/>
  <manifest:file-entry manifest:full-path="Pictures/100000000000050C0000022180CD1462.png" manifest:media-type="image/png"/>
  <manifest:file-entry manifest:full-path="Pictures/2000007D000045B400002921584DA5A7.svm" manifest:media-type="image/x-svm"/>
  <manifest:file-entry manifest:full-path="Pictures/100000010000049D000002B90C97F7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5.1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5.017cm"/>
    </style:style>
    <style:style style:name="co16" style:family="table-column">
      <style:table-column-properties fo:break-before="auto" style:column-width="2.11cm"/>
    </style:style>
    <style:style style:name="co17" style:family="table-column">
      <style:table-column-properties fo:break-before="auto" style:column-width="5.413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556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192cm" fo:break-before="auto" style:use-optimal-row-height="false"/>
    </style:style>
    <style:style style:name="ro11" style:family="table-row">
      <style:table-row-properties style:row-height="1.748cm" fo:break-before="auto" style:use-optimal-row-height="true"/>
    </style:style>
    <style:style style:name="ro12" style:family="table-row">
      <style:table-row-properties style:row-height="0.933cm" fo:break-before="auto" style:use-optimal-row-height="true"/>
    </style:style>
    <style:style style:name="ro13" style:family="table-row">
      <style:table-row-properties style:row-height="3.7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 style:vertical-align="middle"/>
      <style:text-properties style:font-name="Calibri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middle"/>
      <style:text-properties style:font-name="Calibri"/>
    </style:style>
    <style:style style:name="ce36" style:family="table-cell" style:parent-style-name="Default">
      <style:table-cell-properties fo:wrap-option="wrap" style:vertical-align="middle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5"/>
      <style:map style:condition="cell-content()&gt;=0.03" style:apply-style-name="Bad" style:base-cell-address="'Annex A Preliminary Check'.C35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79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3" style:family="table-cell" style:parent-style-name="Default" style:data-style-name="N2">
      <style:table-cell-properties fo:border-bottom="0.74pt solid #000000" fo:background-color="#ccf4c6" style:text-align-source="fix" style:repeat-content="false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97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06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1" style:family="table-cell" style:parent-style-name="Default" style:data-style-name="N1">
      <style:table-cell-properties fo:background-color="#e0ffff"/>
      <style:text-properties fo:color="#e0ffff"/>
    </style:style>
    <style:style style:name="ce132" style:family="table-cell" style:parent-style-name="Default" style:data-style-name="N1">
      <style:table-cell-properties fo:background-color="#e0ffff"/>
      <style:text-properties fo:color="#e0ffff" fo:font-weight="bold" style:font-weight-asian="bold" style:font-weight-complex="bold"/>
    </style:style>
    <style:style style:name="ce13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fo:color="#e0ffff"/>
    </style:style>
    <style:style style:name="ce20" style:family="table-cell" style:parent-style-name="Default" style:data-style-name="N1"/>
    <style:style style:name="ce13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normal" style:font-weight-asian="normal" style:font-weight-complex="normal"/>
    </style:style>
    <style:style style:name="ce13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normal" style:font-weight-asian="normal" style:font-weight-complex="normal"/>
    </style:style>
    <style:style style:name="ce137" style:family="table-cell" style:parent-style-name="Default">
      <style:table-cell-properties fo:background-color="#e0ffff"/>
      <style:text-properties fo:color="#e0ffff" fo:font-weight="normal" style:font-weight-asian="normal" style:font-weight-complex="normal"/>
    </style:style>
    <style:style style:name="ce138" style:family="table-cell" style:parent-style-name="Default">
      <style:table-cell-properties fo:border-bottom="0.74pt solid #000000" fo:background-color="#e0ffff" fo:border-left="none" fo:border-right="none" fo:border-top="none"/>
      <style:text-properties fo:color="#e0ffff" fo:font-weight="normal" style:font-weight-asian="normal" style:font-weight-complex="normal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1" style:family="table-cell" style:parent-style-name="Default">
      <style:text-properties style:text-overline-style="solid" style:text-overline-width="auto" style:text-overline-color="font-color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 style:data-style-name="N11"/>
    <style:style style:name="ce203" style:family="table-cell" style:parent-style-name="Default" style:data-style-name="N212"/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4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.H20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205" style:family="table-cell" style:parent-style-name="Default" style:data-style-name="N212">
      <style:map style:condition="cell-content()&lt;[.J20]" style:apply-style-name="Good" style:base-cell-address="DATA.K20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153" style:family="table-cell" style:parent-style-name="Default" style:data-style-name="N11">
      <style:table-cell-properties fo:background-color="#ccf4c6"/>
      <style:map style:condition="cell-content()&lt;[.J50]" style:apply-style-name="Accent" style:base-cell-address="'Clause 6 Sizing Calibration'.J49"/>
    </style:style>
    <style:style style:name="ce101" style:family="table-cell" style:parent-style-name="Default">
      <style:map style:condition="cell-content()=&quot;&lt;3% = PASS&quot;" style:apply-style-name="Good" style:base-cell-address="'Clause 6 Sizing Calibration'.K54"/>
      <style:map style:condition="cell-content()!=&quot;&lt;3% = PASS&quot;" style:apply-style-name="Bad" style:base-cell-address="'Clause 6 Sizing Calibration'.K54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90ee90" fo:wrap-option="wrap" style:vertical-align="middle"/>
    </style:style>
    <style:style style:name="ce9" style:family="table-cell" style:parent-style-name="Default">
      <style:table-cell-properties fo:background-color="#90ee90"/>
    </style:style>
    <style:style style:name="ce160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161" style:family="table-cell" style:parent-style-name="Good">
      <style:table-cell-properties fo:wrap-option="wrap" style:vertical-align="middle"/>
    </style:style>
    <style:style style:name="ce11" style:family="table-cell" style:parent-style-name="Default">
      <style:table-cell-properties style:cell-protect="none" style:print-content="tru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55" style:family="table-cell" style:parent-style-name="Default" style:data-style-name="N49"/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Accuracy'.A29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Accuracy'.B2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12" style:family="table-cell" style:parent-style-name="Default">
      <style:table-cell-properties fo:background-color="#ffff99" style:diagonal-bl-tr="none" style:diagonal-tl-br="none" fo:border="0.74pt solid #000000" fo:padding="0.071cm" style:rotation-align="none"/>
    </style:style>
    <style:style style:name="ce267" style:family="table-cell" style:parent-style-name="Default" style:data-style-name="N3">
      <style:table-cell-properties fo:padding="0.071cm"/>
    </style:style>
    <style:style style:name="ce209" style:family="table-cell" style:parent-style-name="Default">
      <style:table-cell-properties fo:background-color="#ffffff" style:diagonal-bl-tr="none" style:diagonal-tl-br="none" fo:border="0.74pt solid #000000" fo:padding="0.071cm" style:rotation-align="non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16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</style:style>
    <style:style style:name="ce237" style:family="table-cell" style:parent-style-name="Default" style:data-style-name="N0"/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 style:data-style-name="N157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57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1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P1" style:family="paragraph">
      <loext:graphic-properties draw:fill="none" draw:fill-color="#ffffff"/>
      <style:text-properties style:font-name="Calibri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4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6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7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SO 11171_2020 Summary" table:style-name="ta1" table:print-ranges="'ISO 11171_2020 Summary'.A1:'ISO 11171_2020 Summary'.C18"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number-columns-repeated="1021" table:default-cell-style-name="Default"/>
        <table:table-row table:style-name="ro1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2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2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nex A Preliminary Check" table:style-name="ta1">
        <table:shapes>
          <draw:frame draw:z-index="1" draw:name="Text Frame 2" draw:style-name="gr1" draw:text-style-name="P1" svg:width="11.315cm" svg:height="5.432cm" svg:x="25.55cm" svg:y="4.023cm">
            <draw:text-box>
              <text:p><text:span text:style-name="T1">Used microbalance to weigh 10ml sample of fluid, added using precision digital pipette. Added 10x 10ml I total to plastic sample bottle and weighed result (after taring empty bottle weight).</text:span></text:p>
              <text:p><text:span text:style-name="T1"/></text:p>
              <text:p><text:span text:style-name="T1">Used bottle sampler to sample 15ml pumped flush + 40ml pumped sample.</text:span></text:p>
              <text:p><text:span text:style-name="T1"/></text:p>
              <text:p><text:span text:style-name="T1">Measured final weight of bottle+remaining fluid.</text:span></text:p>
              <text:p><text:span text:style-name="T1"/></text:p>
            </draw:text-box>
          </draw:frame>
        </table:shapes>
        <table:table-column table:style-name="co4" table:default-cell-style-name="ce33"/>
        <table:table-column table:style-name="co5" table:default-cell-style-name="ce33"/>
        <table:table-column table:style-name="co4" table:number-columns-repeated="13" table:default-cell-style-name="ce33"/>
        <table:table-row table:style-name="ro5">
          <table:table-cell table:style-name="ce29" office:value-type="string" calcext:value-type="string">
            <text:p>Cv<text:span text:style-name="T3">4um</text:span> &lt; 3%</text:p>
          </table:table-cell>
          <table:table-cell table:style-name="ce35" office:value-type="string" calcext:value-type="string">
            <text:p>RM8632x</text:p>
          </table:table-cell>
          <table:table-cell table:style-name="ce36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 and a concentration of 25% of coincidence limit.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5"/>
        </table:table-row>
        <table:table-row table:style-name="ro6">
          <table:table-cell table:style-name="ce34" office:value-type="string" calcext:value-type="string">
            <text:p>Analysis using Calibration Rig and RM8632a</text:p>
          </table:table-cell>
          <table:table-cell table:number-columns-repeated="5"/>
          <table:table-cell table:style-name="ce34" office:value-type="string" calcext:value-type="string">
            <text:p>Analysis using Bottle Sampler and MTD</text:p>
          </table:table-cell>
          <table:table-cell table:number-columns-repeated="4"/>
          <table:table-cell table:style-name="ce34" office:value-type="string" calcext:value-type="string">
            <text:p>Volumetric Sampling Accuracy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Calibration Rig</text:p>
          </table:table-cell>
          <table:table-cell table:number-columns-repeated="5"/>
          <table:table-cell table:style-name="ce78" office:value-type="string" calcext:value-type="string">
            <text:p>Bottle Sampler</text:p>
          </table:table-cell>
          <table:table-cell table:number-columns-repeated="2"/>
          <table:table-cell table:style-name="ce37" office:value-type="string" calcext:value-type="string">
            <text:p>BS-500 #BS07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2"/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2"/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Sensor S/N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1-25" calcext:value-type="date">
            <text:p>2025-01-25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2-24" calcext:value-type="date">
            <text:p>2025-02-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2"/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5"/>
        </table:table-row>
        <table:table-row table:style-name="ro2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37" office:value-type="float" office:value="40000" calcext:value-type="float">
            <text:p>40000</text:p>
          </table:table-cell>
          <table:table-cell table:number-columns-repeated="5"/>
          <table:table-cell table:style-name="ce37"/>
          <table:table-cell table:number-columns-repeated="5"/>
        </table:table-row>
        <table:table-row table:style-name="ro2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57" table:formula="of:=[.D14]/[.D15]*0.25" office:value-type="float" office:value="1.58730158730159" calcext:value-type="float">
            <text:p>1.587</text:p>
          </table:table-cell>
          <table:table-cell table:number-columns-repeated="5"/>
          <table:table-cell table:style-name="ce57"/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9"/>
          <table:table-cell table:style-name="ce78" office:value-type="string" calcext:value-type="string">
            <text:p>10ml sampl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4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ion 1</text:p>
          </table:table-cell>
          <table:table-cell table:style-name="ce38" office:value-type="float" office:value="845948" calcext:value-type="float">
            <text:p>845948</text:p>
          </table:table-cell>
          <table:table-cell table:style-name="ce44" table:formula="of:=([.C21]-[.$C$27])/[.$C$27]" office:value-type="percentage" office:value="0.00821495415319522" calcext:value-type="percentage">
            <text:p>0.82%</text:p>
          </table:table-cell>
          <table:table-cell table:number-columns-repeated="3"/>
          <table:table-cell office:value-type="string" calcext:value-type="string">
            <text:p>Portion 1</text:p>
          </table:table-cell>
          <table:table-cell office:value-type="float" office:value="1210363" calcext:value-type="float">
            <text:p>1210363</text:p>
          </table:table-cell>
          <table:table-cell table:style-name="ce44" table:formula="of:=([.I21]-[.I$27])/[.I$27]" office:value-type="percentage" office:value="-0.00754677808546448" calcext:value-type="percentage">
            <text:p>-0.75%</text:p>
          </table:table-cell>
          <table:table-cell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ion 2</text:p>
          </table:table-cell>
          <table:table-cell table:style-name="ce40" office:value-type="float" office:value="835413" calcext:value-type="float">
            <text:p>835413</text:p>
          </table:table-cell>
          <table:table-cell table:style-name="ce44" table:formula="of:=([.C22]-[.$C$27])/[.$C$27]" office:value-type="percentage" office:value="-0.00434083478655511" calcext:value-type="percentage">
            <text:p>-0.43%</text:p>
          </table:table-cell>
          <table:table-cell table:number-columns-repeated="3"/>
          <table:table-cell office:value-type="string" calcext:value-type="string">
            <text:p>Portion 2</text:p>
          </table:table-cell>
          <table:table-cell office:value-type="float" office:value="1210565" calcext:value-type="float">
            <text:p>1210565</text:p>
          </table:table-cell>
          <table:table-cell table:style-name="ce44" table:formula="of:=([.I22]-[.I$27])/[.I$27]" office:value-type="percentage" office:value="-0.00738114550182905" calcext:value-type="percentage">
            <text:p>-0.74%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/>
          <table:table-cell office:value-type="string" calcext:value-type="string">
            <text:p>Portion 3</text:p>
          </table:table-cell>
          <table:table-cell table:style-name="ce40" office:value-type="float" office:value="848340" calcext:value-type="float">
            <text:p>848340</text:p>
          </table:table-cell>
          <table:table-cell table:style-name="ce44" table:formula="of:=([.C23]-[.$C$27])/[.$C$27]" office:value-type="percentage" office:value="0.0110657797007873" calcext:value-type="percentage">
            <text:p>1.11%</text:p>
          </table:table-cell>
          <table:table-cell table:number-columns-repeated="3"/>
          <table:table-cell office:value-type="string" calcext:value-type="string">
            <text:p>Portion 3</text:p>
          </table:table-cell>
          <table:table-cell office:value-type="float" office:value="1221940" calcext:value-type="float">
            <text:p>1221940</text:p>
          </table:table-cell>
          <table:table-cell table:style-name="ce44" table:formula="of:=([.I23]-[.I$27])/[.I$27]" office:value-type="percentage" office:value="0.00194593686873073" calcext:value-type="percentage">
            <text:p>0.19%</text:p>
          </table:table-cell>
          <table:table-cell/>
          <table:table-cell office:value-type="string" calcext:value-type="string">
            <text:p>MIL5606 Fluid</text:p>
          </table:table-cell>
          <table:table-cell/>
          <table:table-cell table:style-name="ce37"/>
          <table:table-cell/>
        </table:table-row>
        <table:table-row table:style-name="ro2">
          <table:table-cell/>
          <table:table-cell office:value-type="string" calcext:value-type="string">
            <text:p>Portion 4</text:p>
          </table:table-cell>
          <table:table-cell table:style-name="ce40" office:value-type="float" office:value="830302" calcext:value-type="float">
            <text:p>830302</text:p>
          </table:table-cell>
          <table:table-cell table:style-name="ce44" table:formula="of:=([.C24]-[.$C$27])/[.$C$27]" office:value-type="percentage" office:value="-0.0104322099428023" calcext:value-type="percentage">
            <text:p>-1.04%</text:p>
          </table:table-cell>
          <table:table-cell table:number-columns-repeated="3"/>
          <table:table-cell office:value-type="string" calcext:value-type="string">
            <text:p>Portion 4</text:p>
          </table:table-cell>
          <table:table-cell office:value-type="float" office:value="1222389" calcext:value-type="float">
            <text:p>1222389</text:p>
          </table:table-cell>
          <table:table-cell table:style-name="ce44" table:formula="of:=([.I24]-[.I$27])/[.I$27]" office:value-type="percentage" office:value="0.00231410038384118" calcext:value-type="percentage">
            <text:p>0.23%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ion 5</text:p>
          </table:table-cell>
          <table:table-cell table:style-name="ce41" office:value-type="float" office:value="835273" calcext:value-type="float">
            <text:p>835273</text:p>
          </table:table-cell>
          <table:table-cell table:style-name="ce44" table:formula="of:=([.C25]-[.$C$27])/[.$C$27]" office:value-type="percentage" office:value="-0.00450768912462488" calcext:value-type="percentage">
            <text:p>-0.45%</text:p>
          </table:table-cell>
          <table:table-cell table:number-columns-repeated="3"/>
          <table:table-cell office:value-type="string" calcext:value-type="string">
            <text:p>Portion 5</text:p>
          </table:table-cell>
          <table:table-cell office:value-type="float" office:value="1232577" calcext:value-type="float">
            <text:p>1232577</text:p>
          </table:table-cell>
          <table:table-cell table:style-name="ce44" table:formula="of:=([.I25]-[.I$27])/[.I$27]" office:value-type="percentage" office:value="0.0106678863347214" calcext:value-type="percentage">
            <text:p>1.07%</text:p>
          </table:table-cell>
          <table:table-cell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2" table:formula="of:=AVERAGE([.C21:.C25])" office:value-type="float" office:value="839055.2" calcext:value-type="float">
            <text:p>839055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42" table:formula="of:=AVERAGE([.I21:.I25])" office:value-type="float" office:value="1219566.8" calcext:value-type="float">
            <text:p>1219567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/>
          <table:table-cell office:value-type="string" calcext:value-type="string">
            <text:p>Sample StdDev</text:p>
          </table:table-cell>
          <table:table-cell table:style-name="ce42" table:formula="of:=STDEVP([.C21:.C25])" office:value-type="float" office:value="6897.93260042457" calcext:value-type="float">
            <text:p>6898</text:p>
          </table:table-cell>
          <table:table-cell table:number-columns-repeated="4"/>
          <table:table-cell office:value-type="string" calcext:value-type="string">
            <text:p>Sample StdDev</text:p>
          </table:table-cell>
          <table:table-cell table:style-name="ce42" table:formula="of:=STDEVP([.I21:.I25])" office:value-type="float" office:value="8349.90458388598" calcext:value-type="float">
            <text:p>8350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number-columns-repeated="2"/>
          <table:table-cell table:style-name="ce42">
            <draw:frame draw:z-index="0" draw:name="Image 3" draw:style-name="gr2" draw:text-style-name="P2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42"/>
          <table:table-cell table:number-columns-repeated="2"/>
          <table:table-cell office:value-type="string" calcext:value-type="string">
            <text:p>Total Fluid</text:p>
          </table:table-cell>
          <table:table-cell/>
          <table:table-cell table:style-name="ce37" table:formula="of:=[.N27]+[.N28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  <table:table-cell office:value-type="string" calcext:value-type="string">
            <text:p>Fluid Weight Taken</text:p>
          </table:table-cell>
          <table:table-cell/>
          <table:table-cell table:style-name="ce82" table:formula="of:=[.N26]-[.N30]" office:value-type="float" office:value="46.869" calcext:value-type="float">
            <text:p>46.87</text:p>
          </table:table-cell>
          <table:table-cell/>
        </table:table-row>
        <table:table-row table:style-name="ro2">
          <table:table-cell table:number-columns-repeated="11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83" table:formula="of:=[.N31]/[.N25]*10" office:value-type="float" office:value="55.6705071861266" calcext:value-type="float">
            <text:p>55.67</text:p>
          </table:table-cell>
          <table:table-cell/>
        </table:table-row>
        <table:table-row table:style-name="ro2">
          <table:table-cell table:number-columns-repeated="13"/>
          <table:table-cell table:style-name="ce37"/>
          <table:table-cell/>
        </table:table-row>
        <table:table-row table:style-name="ro2">
          <table:table-cell table:number-columns-repeated="11"/>
          <table:table-cell office:value-type="string" calcext:value-type="string">
            <text:p>Error</text:p>
          </table:table-cell>
          <table:table-cell/>
          <table:table-cell table:style-name="ce84" table:formula="of:=[.N32]/[.N29]-1" office:value-type="percentage" office:value="0.0121910397477569" calcext:value-type="percentage">
            <text:p>1.22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28]/[.C27]" office:value-type="percentage" office:value="0.00822107127209815" calcext:value-type="percentage">
            <text:p>0.82%</text:p>
          </table:table-cell>
          <table:table-cell table:style-name="ce77" table:formula="of:=IF([.C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3"/>
          <table:table-cell office:value-type="string" calcext:value-type="string">
            <text:p>CV<text:span text:style-name="T7">VOL</text:span></text:p>
          </table:table-cell>
          <table:table-cell table:style-name="ce44" table:formula="of:=[.I28]/[.I27]" office:value-type="percentage" office:value="0.00684661519474454" calcext:value-type="percentage">
            <text:p>0.68%</text:p>
          </table:table-cell>
          <table:table-cell table:style-name="ce79" table:formula="of:=IF([.I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5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8"/>
          <table:table-cell table:style-name="ce37" office:value-type="string" calcext:value-type="string">
            <text:p>&gt;4μm(c)/100ml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8"/>
          <table:table-cell office:value-type="float" office:value="1228768" calcext:value-type="float">
            <text:p>1228768</text:p>
          </table:table-cell>
          <table:table-cell table:style-name="ce44" table:formula="of:=([.I40]-[.I$27])/[.I$27]" office:value-type="percentage" office:value="0.00754464618092257" calcext:value-type="percentage">
            <text:p>0.75%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5654" calcext:value-type="float">
            <text:p>1235654</text:p>
          </table:table-cell>
          <table:table-cell table:style-name="ce44" table:formula="of:=([.I41]-[.I$27])/[.I$27]" office:value-type="percentage" office:value="0.0131909133636632" calcext:value-type="percentage">
            <text:p>1.32%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1619" calcext:value-type="float">
            <text:p>1231619</text:p>
          </table:table-cell>
          <table:table-cell table:style-name="ce44" table:formula="of:=([.I42]-[.I$27])/[.I$27]" office:value-type="percentage" office:value="0.00988236150738111" calcext:value-type="percentage">
            <text:p>0.99%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4171" calcext:value-type="float">
            <text:p>1234171</text:p>
          </table:table-cell>
          <table:table-cell table:style-name="ce44" table:formula="of:=([.I43]-[.I$27])/[.I$27]" office:value-type="percentage" office:value="0.0119749078115278" calcext:value-type="percentage">
            <text:p>1.20%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6577" calcext:value-type="float">
            <text:p>1226577</text:p>
          </table:table-cell>
          <table:table-cell table:style-name="ce44" table:formula="of:=([.I44]-[.I$27])/[.I$27]" office:value-type="percentage" office:value="0.00574810662277782" calcext:value-type="percentage">
            <text:p>0.57%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8"/>
          <table:table-cell table:style-name="ce42" table:formula="of:=AVERAGE([.I40:.I44])" office:value-type="float" office:value="1231357.8" calcext:value-type="float">
            <text:p>1231358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42" table:formula="of:=STDEVP([.I40:.I44])" office:value-type="float" office:value="3346.72277907806" calcext:value-type="float">
            <text:p>3347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42"/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8"/>
          <table:table-cell table:style-name="ce44"/>
          <table:table-cell table:number-columns-repeated="6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8"/>
          <table:table-cell table:style-name="ce44" table:formula="of:=[.I47]/[.I46]" office:value-type="percentage" office:value="0.00271791251826079" calcext:value-type="percentage">
            <text:p>0.27%</text:p>
          </table:table-cell>
          <table:table-cell table:style-name="ce79" table:formula="of:=IF([.I54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5"/>
        </table:table-row>
        <calcext:conditional-formats>
          <calcext:conditional-format calcext:target-range-address="'Annex A Preliminary Check'.D35:'Annex A Preliminary Check'.D35 'Annex A Preliminary Check'.J35:'Annex A Preliminary Check'.J35 'Annex A Preliminary Check'.J54:'Annex A Preliminary Check'.J54">
            <calcext:condition calcext:apply-style-name="Good" calcext:value="=&quot;&lt;3% = PASS&quot;" calcext:base-cell-address="'Annex A Preliminary Check'.D35"/>
            <calcext:condition calcext:apply-style-name="Bad" calcext:value="!=&quot;&lt;3% = PASS&quot;" calcext:base-cell-address="'Annex A Preliminary Check'.D35"/>
          </calcext:conditional-format>
          <calcext:conditional-format calcext:target-range-address="'Annex A Preliminary Check'.C35:'Annex A Preliminary Check'.C35 'Annex A Preliminary Check'.J35:'Annex A Preliminary Check'.J35 'Annex A Preliminary Check'.J54:'Annex A Preliminary Check'.J54">
            <calcext:condition calcext:apply-style-name="Good" calcext:value="&lt;0.03" calcext:base-cell-address="'Annex A Preliminary Check'.C35"/>
            <calcext:condition calcext:apply-style-name="Bad" calcext:value="&gt;=0.03" calcext:base-cell-address="'Annex A Preliminary Check'.C35"/>
          </calcext:conditional-format>
        </calcext:conditional-formats>
      </table:table>
      <table:table table:name="Annex B Coincidence Limit" table:style-name="ta1">
        <table:shapes>
          <draw:frame draw:z-index="0" draw:style-name="gr3" draw:text-style-name="P2" svg:width="23.951cm" svg:height="15.239cm" svg:x="0.186cm" svg:y="18.129cm">
            <draw:object draw:notify-on-update-of-ranges="'Annex A Preliminary Check'.E22:'Annex B Coincidence Limit'.E36 'Annex B Coincidence Limit'.L21:'Annex B Coincidence Limit'.L21 'Annex A Preliminary Check'.L22:'Annex B Coincidence Limit'.L36 'Annex B Coincidence Limit'.E22:'Annex B Coincidence Limit'.E36 'Annex B Coincidence Limit'.K21:'Annex B Coincidence Limit'.K21 'Annex B Coincidence Limit'.K22:'Annex B Coincidence Limit'.K36 'Annex B Coincidence Limit'.E22:'Annex B Coincidence Limit'.E36 'Annex B Coincidence Limit'.I20:'Annex B Coincidence Limit'.I20 'Annex B Coincidence Limit'.I22:'Annex B Coincidence Limit'.I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3" draw:text-style-name="P2" svg:width="20.348cm" svg:height="15.238cm" svg:x="24.798cm" svg:y="18.113cm">
            <draw:object draw:notify-on-update-of-ranges="'Annex A Preliminary Check'.I22:'Annex B Coincidence Limit'.I36 'ISO 11171_2020 Summary'.A1:'ISO 11171_2020 Summary'.A1 'Annex A Preliminary Check'.M22:'Annex B Coincidence Limit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1" draw:style-name="gr4" draw:text-style-name="P1" svg:width="11.201cm" svg:height="15.848cm" svg:x="31.597cm" svg:y="1.901cm">
            <draw:text-box>
              <text:p><text:span text:style-name="T2">Procedure – Using Calibration Rig</text:span></text:p>
              <text:p><text:span text:style-name="T1"/></text:p>
              <text:p><text:span text:style-name="T1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1"/></text:p>
              <text:p><text:span text:style-name="T1">Add successive doses of concentrate, performing flushing and 5-portion tests after each one.</text:span></text:p>
              <text:p><text:span text:style-name="T1"/></text:p>
              <text:p><text:span text:style-name="T1">When the results have stabilized after each addition, record the most recent tests. We are only interested in the 4μm <text:s/>channel counts for this process.</text:span></text:p>
              <text:p><text:span text:style-name="T1"/></text:p>
              <text:p><text:span text:style-name="T1">The optimum flush / stabilization time can be judged by continuously testing and observing the counts. This was about 2 minutes flushing after dosing then perform two 5-portion tests.</text:span></text:p>
              <text:p><text:span text:style-name="T1"/></text:p>
              <text:p><text:span text:style-name="T1">The results are then imported into this spreadsheet and the portions averaged for each dose level.</text:span></text:p>
              <text:p><text:span text:style-name="T1"/></text:p>
              <text:p><text:span text:style-name="T1">The averages are entered into the table as well as the added ml of concentrate for each dose.</text:span></text:p>
              <text:p><text:span text:style-name="T1"/></text:p>
              <text:p><text:span text:style-name="T1">The counts are plotted in the figure and the first 4 results (10,20,30,40% nominal coincidence limit) used to generate a linear regression line.</text:span></text:p>
              <text:p><text:span text:style-name="T1"/></text:p>
              <text:p><text:span text:style-name="T1"/></text:p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ce20"/>
        <table:table-column table:style-name="co4" table:default-cell-style-name="ce76"/>
        <table:table-column table:style-name="co4" table:number-columns-repeated="16361" table:default-cell-style-name="Default"/>
        <table:table-row table:style-name="ro8">
          <table:table-cell table:style-name="ce97" office:value-type="string" calcext:value-type="string">
            <text:p>Δ<text:span text:style-name="T3">COUNTS_4um</text:span> &lt; 5%</text:p>
          </table:table-cell>
          <table:table-cell table:style-name="ce106" office:value-type="string" calcext:value-type="string">
            <text:p>RM8632x</text:p>
          </table:table-cell>
          <table:table-cell table:style-name="ce97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06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2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2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2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2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2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2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2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2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2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16363"/>
        </table:table-row>
        <table:table-row table:style-name="ro2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8" office:value-type="string" calcext:value-type="string">
            <text:p>Expected</text:p>
          </table:table-cell>
          <table:table-cell table:style-name="ce135" office:value-type="string" calcext:value-type="string">
            <text:p>4μm</text:p>
          </table:table-cell>
          <table:table-cell table:style-name="ce128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988"/>
          <table:table-cell table:style-name="ce28" table:number-columns-repeated="15375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9" office:value-type="string" calcext:value-type="string">
            <text:p>4μm/100ml</text:p>
          </table:table-cell>
          <table:table-cell table:style-name="ce136" office:value-type="string" calcext:value-type="string">
            <text:p>Actual</text:p>
          </table:table-cell>
          <table:table-cell table:style-name="ce129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30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1" table:formula="of:=[.$A$6]*[.E23]*100" office:value-type="float" office:value="115904.686245926" calcext:value-type="float">
            <text:p>115905</text:p>
          </table:table-cell>
          <table:table-cell table:style-name="ce137" office:value-type="float" office:value="169243" calcext:value-type="float">
            <text:p>169243</text:p>
          </table:table-cell>
          <table:table-cell table:style-name="ce139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1" table:formula="of:=[.$A$6]*[.E24]*100" office:value-type="float" office:value="227081.833060556" calcext:value-type="float">
            <text:p>227082</text:p>
          </table:table-cell>
          <table:table-cell table:style-name="ce137" office:value-type="float" office:value="294743" calcext:value-type="float">
            <text:p>294743</text:p>
          </table:table-cell>
          <table:table-cell table:style-name="ce139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7" calcext:value-type="float">
            <text:p>0.97313137374567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1" table:formula="of:=[.$A$6]*[.E25]*100" office:value-type="float" office:value="338080.802629642" calcext:value-type="float">
            <text:p>338081</text:p>
          </table:table-cell>
          <table:table-cell table:style-name="ce137" office:value-type="float" office:value="452854" calcext:value-type="float">
            <text:p>452854</text:p>
          </table:table-cell>
          <table:table-cell table:style-name="ce139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1" table:formula="of:=[.$A$6]*[.E26]*100" office:value-type="float" office:value="448902.022941926" calcext:value-type="float">
            <text:p>448902</text:p>
          </table:table-cell>
          <table:table-cell table:style-name="ce137" office:value-type="float" office:value="597630" calcext:value-type="float">
            <text:p>597630</text:p>
          </table:table-cell>
          <table:table-cell table:style-name="ce139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1" table:formula="of:=[.$A$6]*[.E27]*100" office:value-type="float" office:value="559545.92061652" calcext:value-type="float">
            <text:p>559546</text:p>
          </table:table-cell>
          <table:table-cell table:style-name="ce137" office:value-type="float" office:value="720744" calcext:value-type="float">
            <text:p>720744</text:p>
          </table:table-cell>
          <table:table-cell table:style-name="ce139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2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32" table:formula="of:=[.$A$6]*[.E28]*100" office:value-type="float" office:value="670012.920908379" calcext:value-type="float">
            <text:p>670013</text:p>
          </table:table-cell>
          <table:table-cell table:style-name="ce137" office:value-type="float" office:value="837754" calcext:value-type="float">
            <text:p>837754</text:p>
          </table:table-cell>
          <table:table-cell table:style-name="ce140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1" table:formula="of:=[.$A$6]*[.E29]*100" office:value-type="float" office:value="780303.44771375" calcext:value-type="float">
            <text:p>780303</text:p>
          </table:table-cell>
          <table:table-cell table:style-name="ce137" office:value-type="float" office:value="953674" calcext:value-type="float">
            <text:p>953674</text:p>
          </table:table-cell>
          <table:table-cell table:style-name="ce139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1" table:formula="of:=[.$A$6]*[.E30]*100" office:value-type="float" office:value="890417.923575594" calcext:value-type="float">
            <text:p>890418</text:p>
          </table:table-cell>
          <table:table-cell table:style-name="ce137" office:value-type="float" office:value="1085924" calcext:value-type="float">
            <text:p>1085924</text:p>
          </table:table-cell>
          <table:table-cell table:style-name="ce139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1" table:formula="of:=[.$A$6]*[.E31]*100" office:value-type="float" office:value="1000356.76968898" calcext:value-type="float">
            <text:p>1000357</text:p>
          </table:table-cell>
          <table:table-cell table:style-name="ce137" office:value-type="float" office:value="1199473" calcext:value-type="float">
            <text:p>1199473</text:p>
          </table:table-cell>
          <table:table-cell table:style-name="ce139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1" table:formula="of:=[.$A$6]*[.E32]*100" office:value-type="float" office:value="1219709.25074341" calcext:value-type="float">
            <text:p>1219709</text:p>
          </table:table-cell>
          <table:table-cell table:style-name="ce137" office:value-type="float" office:value="1416948" calcext:value-type="float">
            <text:p>1416948</text:p>
          </table:table-cell>
          <table:table-cell table:style-name="ce139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1" table:formula="of:=[.$A$6]*[.E33]*100" office:value-type="float" office:value="1329123.72138334" calcext:value-type="float">
            <text:p>1329124</text:p>
          </table:table-cell>
          <table:table-cell table:style-name="ce137" office:value-type="float" office:value="1526221" calcext:value-type="float">
            <text:p>1526221</text:p>
          </table:table-cell>
          <table:table-cell table:style-name="ce139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1" table:formula="of:=[.$A$6]*[.E34]*100" office:value-type="float" office:value="1438364.23368322" calcext:value-type="float">
            <text:p>1438364</text:p>
          </table:table-cell>
          <table:table-cell table:style-name="ce137" office:value-type="float" office:value="1653842" calcext:value-type="float">
            <text:p>1653842</text:p>
          </table:table-cell>
          <table:table-cell table:style-name="ce139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2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1" table:formula="of:=[.$A$6]*[.E35]*100" office:value-type="float" office:value="1547431.20217871" calcext:value-type="float">
            <text:p>1547431</text:p>
          </table:table-cell>
          <table:table-cell table:style-name="ce137" office:value-type="float" office:value="1770798" calcext:value-type="float">
            <text:p>1770798</text:p>
          </table:table-cell>
          <table:table-cell table:style-name="ce139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33" table:formula="of:=[.$A$6]*[.E36]*100" office:value-type="float" office:value="1656325.04008941" calcext:value-type="float">
            <text:p>1656325</text:p>
          </table:table-cell>
          <table:table-cell table:style-name="ce138" office:value-type="float" office:value="1850630" calcext:value-type="float">
            <text:p>1850630</text:p>
          </table:table-cell>
          <table:table-cell table:style-name="ce141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DATA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8"/>
          <table:table-cell office:value-type="float" office:value="7.098262" calcext:value-type="float">
            <text:p>7.098262</text:p>
          </table:table-cell>
          <table:table-cell office:value-type="float" office:value="7.615141" calcext:value-type="float">
            <text:p>7.615141</text:p>
          </table:table-cell>
          <table:table-cell office:value-type="float" office:value="7.626201" calcext:value-type="float">
            <text:p>7.626201</text:p>
          </table:table-cell>
          <table:table-cell office:value-type="float" office:value="7.674635" calcext:value-type="float">
            <text:p>7.674635</text:p>
          </table:table-cell>
          <table:table-cell office:value-type="float" office:value="7.745643" calcext:value-type="float">
            <text:p>7.745643</text:p>
          </table:table-cell>
          <table:table-cell office:value-type="float" office:value="7.684385" calcext:value-type="float">
            <text:p>7.684385</text:p>
          </table:table-cell>
          <table:table-cell table:number-columns-repeated="27"/>
        </table:table-row>
        <table:table-row table:style-name="ro2">
          <table:table-cell table:number-columns-repeated="16"/>
          <table:table-cell office:value-type="float" office:value="74666.8125" calcext:value-type="float">
            <text:p>74666.8125</text:p>
          </table:table-cell>
          <table:table-cell office:value-type="float" office:value="69482.726562" calcext:value-type="float">
            <text:p>69482.726562</text:p>
          </table:table-cell>
          <table:table-cell office:value-type="float" office:value="67909.703125" calcext:value-type="float">
            <text:p>67909.703125</text:p>
          </table:table-cell>
          <table:table-cell office:value-type="float" office:value="67042.398438" calcext:value-type="float">
            <text:p>67042.398438</text:p>
          </table:table-cell>
          <table:table-cell office:value-type="float" office:value="67076.492188" calcext:value-type="float">
            <text:p>67076.492188</text:p>
          </table:table-cell>
          <table:table-cell office:value-type="float" office:value="65007.496094" calcext:value-type="float">
            <text:p>65007.496094</text:p>
          </table:table-cell>
          <table:table-cell table:number-columns-repeated="27"/>
        </table:table-row>
        <table:table-row table:style-name="ro2">
          <table:table-cell table:number-columns-repeated="16"/>
          <table:table-cell office:value-type="float" office:value="65638.992188" calcext:value-type="float">
            <text:p>65638.992188</text:p>
          </table:table-cell>
          <table:table-cell table:style-name="ce16" office:value-type="float" office:value="61286.046875" calcext:value-type="float">
            <text:p>61286.046875</text:p>
          </table:table-cell>
          <table:table-cell table:style-name="ce16" office:value-type="float" office:value="59624.957031" calcext:value-type="float">
            <text:p>59624.957031</text:p>
          </table:table-cell>
          <table:table-cell table:style-name="ce16" office:value-type="float" office:value="58832.949219" calcext:value-type="float">
            <text:p>58832.949219</text:p>
          </table:table-cell>
          <table:table-cell table:style-name="ce16" office:value-type="float" office:value="58731.863281" calcext:value-type="float">
            <text:p>58731.863281</text:p>
          </table:table-cell>
          <table:table-cell table:style-name="ce16" office:value-type="float" office:value="57170.078125" calcext:value-type="float">
            <text:p>57170.078125</text:p>
          </table:table-cell>
          <table:table-cell table:style-name="ce16" table:number-columns-repeated="27"/>
        </table:table-row>
        <table:table-row table:style-name="ro2">
          <table:table-cell table:number-columns-repeated="15"/>
          <table:table-cell table:style-name="ce28"/>
          <table:table-cell table:style-name="ce28" office:value-type="float" office:value="57065.355469" calcext:value-type="float">
            <text:p>57065.355469</text:p>
          </table:table-cell>
          <table:table-cell table:style-name="ce16" office:value-type="float" office:value="53486.613281" calcext:value-type="float">
            <text:p>53486.613281</text:p>
          </table:table-cell>
          <table:table-cell table:style-name="ce16" office:value-type="float" office:value="52094.191406" calcext:value-type="float">
            <text:p>52094.191406</text:p>
          </table:table-cell>
          <table:table-cell table:style-name="ce16" office:value-type="float" office:value="51239.550781" calcext:value-type="float">
            <text:p>51239.550781</text:p>
          </table:table-cell>
          <table:table-cell table:style-name="ce16" office:value-type="float" office:value="51117.335938" calcext:value-type="float">
            <text:p>51117.335938</text:p>
          </table:table-cell>
          <table:table-cell table:style-name="ce16" office:value-type="float" office:value="49586.308594" calcext:value-type="float">
            <text:p>49586.308594</text:p>
          </table:table-cell>
          <table:table-cell table:style-name="ce16" table:number-columns-repeated="27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9"/>
          <table:table-cell table:style-name="ce28"/>
          <table:table-cell table:style-name="ce28" office:value-type="float" office:value="49565.394531" calcext:value-type="float">
            <text:p>49565.394531</text:p>
          </table:table-cell>
          <table:table-cell table:style-name="ce16" office:value-type="float" office:value="44145" calcext:value-type="float">
            <text:p>44145</text:p>
          </table:table-cell>
          <table:table-cell table:style-name="ce16" office:value-type="float" office:value="43042" calcext:value-type="float">
            <text:p>43042</text:p>
          </table:table-cell>
          <table:table-cell table:style-name="ce16" office:value-type="float" office:value="42341" calcext:value-type="float">
            <text:p>42341</text:p>
          </table:table-cell>
          <table:table-cell table:style-name="ce16" office:value-type="float" office:value="42215" calcext:value-type="float">
            <text:p>42215</text:p>
          </table:table-cell>
          <table:table-cell table:style-name="ce16" office:value-type="float" office:value="40912" calcext:value-type="float">
            <text:p>40912</text:p>
          </table:table-cell>
          <table:table-cell table:style-name="ce16" table:number-columns-repeated="27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number-columns-repeated="4"/>
          <table:table-cell table:style-name="ce28"/>
          <table:table-cell table:style-name="ce28" office:value-type="float" office:value="40457" calcext:value-type="float">
            <text:p>40457</text:p>
          </table:table-cell>
          <table:table-cell table:style-name="ce16" office:value-type="float" office:value="38437" calcext:value-type="float">
            <text:p>38437</text:p>
          </table:table-cell>
          <table:table-cell table:style-name="ce16" office:value-type="float" office:value="37184" calcext:value-type="float">
            <text:p>37184</text:p>
          </table:table-cell>
          <table:table-cell table:style-name="ce16" office:value-type="float" office:value="36713" calcext:value-type="float">
            <text:p>36713</text:p>
          </table:table-cell>
          <table:table-cell table:style-name="ce16" office:value-type="float" office:value="36612" calcext:value-type="float">
            <text:p>36612</text:p>
          </table:table-cell>
          <table:table-cell table:style-name="ce16" office:value-type="float" office:value="35297" calcext:value-type="float">
            <text:p>35297</text:p>
          </table:table-cell>
          <table:table-cell table:style-name="ce16" table:number-columns-repeated="27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098262" calcext:value-type="float">
            <text:p>7.098262</text:p>
          </table:table-cell>
          <table:table-cell office:value-type="float" office:value="7.615141" calcext:value-type="float">
            <text:p>7.615141</text:p>
          </table:table-cell>
          <table:table-cell office:value-type="float" office:value="7.626201" calcext:value-type="float">
            <text:p>7.626201</text:p>
          </table:table-cell>
          <table:table-cell office:value-type="float" office:value="7.674635" calcext:value-type="float">
            <text:p>7.674635</text:p>
          </table:table-cell>
          <table:table-cell office:value-type="float" office:value="7.745643" calcext:value-type="float">
            <text:p>7.745643</text:p>
          </table:table-cell>
          <table:table-cell table:style-name="ce194"/>
          <table:table-cell table:style-name="ce200" table:formula="of:=SUM([.B19:.F19])" office:value-type="float" office:value="37.759882" calcext:value-type="float">
            <text:p>37.8</text:p>
          </table:table-cell>
          <table:table-cell table:style-name="ce203"/>
          <table:table-cell/>
          <table:table-cell table:style-name="ce203"/>
          <table:table-cell table:number-columns-repeated="4"/>
          <table:table-cell table:style-name="ce28"/>
          <table:table-cell table:style-name="ce28" office:value-type="float" office:value="34676" calcext:value-type="float">
            <text:p>34676</text:p>
          </table:table-cell>
          <table:table-cell table:style-name="ce16" office:value-type="float" office:value="33123" calcext:value-type="float">
            <text:p>33123</text:p>
          </table:table-cell>
          <table:table-cell table:style-name="ce16" office:value-type="float" office:value="32068" calcext:value-type="float">
            <text:p>32068</text:p>
          </table:table-cell>
          <table:table-cell table:style-name="ce16" office:value-type="float" office:value="31518" calcext:value-type="float">
            <text:p>31518</text:p>
          </table:table-cell>
          <table:table-cell table:style-name="ce16" office:value-type="float" office:value="31404" calcext:value-type="float">
            <text:p>31404</text:p>
          </table:table-cell>
          <table:table-cell table:style-name="ce16" office:value-type="float" office:value="30303" calcext:value-type="float">
            <text:p>30303</text:p>
          </table:table-cell>
          <table:table-cell table:style-name="ce16" table:number-columns-repeated="27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/>
          <table:table-cell office:value-type="float" office:value="69482.726562" calcext:value-type="float">
            <text:p>69482.726562</text:p>
          </table:table-cell>
          <table:table-cell office:value-type="float" office:value="67909.703125" calcext:value-type="float">
            <text:p>67909.703125</text:p>
          </table:table-cell>
          <table:table-cell office:value-type="float" office:value="67042.398438" calcext:value-type="float">
            <text:p>67042.398438</text:p>
          </table:table-cell>
          <table:table-cell office:value-type="float" office:value="67076.492188" calcext:value-type="float">
            <text:p>67076.492188</text:p>
          </table:table-cell>
          <table:table-cell table:style-name="ce76" table:formula="of:=SUMPRODUCT(([.B20:.F20]&lt;&gt;&quot;&quot;)*([.B20:.F20]/[.B$19:.F$19]) / SUM([.B20:.F20]&lt;&gt;&quot;&quot;))" office:value-type="float" office:value="8856.13885672138" calcext:value-type="float">
            <text:p>8856.1</text:p>
          </table:table-cell>
          <table:table-cell table:style-name="ce201" table:formula="of:=[.G20]*[.H$19]" office:value-type="float" office:value="334406.758205414" calcext:value-type="float">
            <text:p>334407</text:p>
          </table:table-cell>
          <table:table-cell table:style-name="ce203" table:formula="of:=STDEVP([.B20:.F20])/AVERAGE([.B20:.F20])" office:value-type="percentage" office:value="0.0145783236873579" calcext:value-type="percentage">
            <text:p>1.5%</text:p>
          </table:table-cell>
          <table:table-cell table:style-name="ce203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205" table:formula="of:=(MAX([.B20:.F20])-MIN([.B20:.F20]))/[.H20]*5" office:value-type="percentage" office:value="0.0364874223400262" calcext:value-type="percentage">
            <text:p>3.6%</text:p>
          </table:table-cell>
          <table:table-cell table:number-columns-repeated="4"/>
          <table:table-cell table:style-name="ce28"/>
          <table:table-cell table:style-name="ce28" office:value-type="float" office:value="29463" calcext:value-type="float">
            <text:p>29463</text:p>
          </table:table-cell>
          <table:table-cell table:style-name="ce16" office:value-type="float" office:value="28201" calcext:value-type="float">
            <text:p>28201</text:p>
          </table:table-cell>
          <table:table-cell table:style-name="ce16" office:value-type="float" office:value="27339" calcext:value-type="float">
            <text:p>27339</text:p>
          </table:table-cell>
          <table:table-cell table:style-name="ce16" office:value-type="float" office:value="26848" calcext:value-type="float">
            <text:p>26848</text:p>
          </table:table-cell>
          <table:table-cell table:style-name="ce16" office:value-type="float" office:value="26835" calcext:value-type="float">
            <text:p>26835</text:p>
          </table:table-cell>
          <table:table-cell table:style-name="ce16" office:value-type="float" office:value="25770" calcext:value-type="float">
            <text:p>25770</text:p>
          </table:table-cell>
          <table:table-cell table:style-name="ce16" table:number-columns-repeated="27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/>
          <table:table-cell table:style-name="ce16" office:value-type="float" office:value="61286.046875" calcext:value-type="float">
            <text:p>61286.046875</text:p>
          </table:table-cell>
          <table:table-cell table:style-name="ce16" office:value-type="float" office:value="59624.957031" calcext:value-type="float">
            <text:p>59624.957031</text:p>
          </table:table-cell>
          <table:table-cell table:style-name="ce16" office:value-type="float" office:value="58832.949219" calcext:value-type="float">
            <text:p>58832.949219</text:p>
          </table:table-cell>
          <table:table-cell table:style-name="ce16" office:value-type="float" office:value="58731.863281" calcext:value-type="float">
            <text:p>58731.863281</text:p>
          </table:table-cell>
          <table:table-cell table:style-name="ce76" table:formula="of:=SUMPRODUCT(([.B21:.F21]&lt;&gt;&quot;&quot;)*([.B21:.F21]/[.B$19:.F$19]) / SUM([.B21:.F21]&lt;&gt;&quot;&quot;))" office:value-type="float" office:value="7778.70460536144" calcext:value-type="float">
            <text:p>7778.7</text:p>
          </table:table-cell>
          <table:table-cell table:style-name="ce201" table:formula="of:=[.G21]*[.H$19]" office:value-type="float" office:value="293722.968011305" calcext:value-type="float">
            <text:p>293723</text:p>
          </table:table-cell>
          <table:table-cell table:style-name="ce203" table:formula="of:=STDEVP([.B21:.F21])/AVERAGE([.B21:.F21])" office:value-type="percentage" office:value="0.0171545699969889" calcext:value-type="percentage">
            <text:p>1.7%</text:p>
          </table:table-cell>
          <table:table-cell table:style-name="ce203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205" table:formula="of:=(MAX([.B21:.F21])-MIN([.B21:.F21]))/[.H21]*5" office:value-type="percentage" office:value="0.0434794665751454" calcext:value-type="percentage">
            <text:p>4.3%</text:p>
          </table:table-cell>
          <table:table-cell table:number-columns-repeated="3"/>
          <table:table-cell table:style-name="ce28"/>
          <table:table-cell/>
          <table:table-cell office:value-type="float" office:value="24741" calcext:value-type="float">
            <text:p>24741</text:p>
          </table:table-cell>
          <table:table-cell table:style-name="ce31" office:value-type="float" office:value="23717" calcext:value-type="float">
            <text:p>23717</text:p>
          </table:table-cell>
          <table:table-cell table:style-name="ce31" office:value-type="float" office:value="23073" calcext:value-type="float">
            <text:p>23073</text:p>
          </table:table-cell>
          <table:table-cell table:style-name="ce16" office:value-type="float" office:value="22405" calcext:value-type="float">
            <text:p>22405</text:p>
          </table:table-cell>
          <table:table-cell table:style-name="ce16" office:value-type="float" office:value="22446" calcext:value-type="float">
            <text:p>22446</text:p>
          </table:table-cell>
          <table:table-cell table:style-name="ce16" office:value-type="float" office:value="21494" calcext:value-type="float">
            <text:p>21494</text:p>
          </table:table-cell>
          <table:table-cell table:style-name="ce16" table:number-columns-repeated="27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table:style-name="ce28"/>
          <table:table-cell table:style-name="ce16" office:value-type="float" office:value="53486.613281" calcext:value-type="float">
            <text:p>53486.613281</text:p>
          </table:table-cell>
          <table:table-cell table:style-name="ce16" office:value-type="float" office:value="52094.191406" calcext:value-type="float">
            <text:p>52094.191406</text:p>
          </table:table-cell>
          <table:table-cell table:style-name="ce16" office:value-type="float" office:value="51239.550781" calcext:value-type="float">
            <text:p>51239.550781</text:p>
          </table:table-cell>
          <table:table-cell table:style-name="ce16" office:value-type="float" office:value="51117.335938" calcext:value-type="float">
            <text:p>51117.335938</text:p>
          </table:table-cell>
          <table:table-cell table:style-name="ce76" table:formula="of:=SUMPRODUCT(([.B22:.F22]&lt;&gt;&quot;&quot;)*([.B22:.F22]/[.B$19:.F$19]) / SUM([.B22:.F22]&lt;&gt;&quot;&quot;))" office:value-type="float" office:value="6782.66112274753" calcext:value-type="float">
            <text:p>6782.7</text:p>
          </table:table-cell>
          <table:table-cell table:style-name="ce201" table:formula="of:=[.G22]*[.H$19]" office:value-type="float" office:value="256112.483640934" calcext:value-type="float">
            <text:p>256112</text:p>
          </table:table-cell>
          <table:table-cell table:style-name="ce203" table:formula="of:=STDEVP([.B22:.F22])/AVERAGE([.B22:.F22])" office:value-type="percentage" office:value="0.0181866614346445" calcext:value-type="percentage">
            <text:p>1.8%</text:p>
          </table:table-cell>
          <table:table-cell table:style-name="ce203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205" table:formula="of:=(MAX([.B22:.F22])-MIN([.B22:.F22]))/[.H22]*5" office:value-type="percentage" office:value="0.0462546243220555" calcext:value-type="percentage">
            <text:p>4.6%</text:p>
          </table:table-cell>
          <table:table-cell table:number-columns-repeated="3"/>
          <table:table-cell table:style-name="ce193"/>
          <table:table-cell table:style-name="ce16"/>
          <table:table-cell office:value-type="float" office:value="20441" calcext:value-type="float">
            <text:p>20441</text:p>
          </table:table-cell>
          <table:table-cell office:value-type="float" office:value="19578" calcext:value-type="float">
            <text:p>19578</text:p>
          </table:table-cell>
          <table:table-cell office:value-type="float" office:value="18974" calcext:value-type="float">
            <text:p>18974</text:p>
          </table:table-cell>
          <table:table-cell table:style-name="ce76" office:value-type="float" office:value="18418" calcext:value-type="float">
            <text:p>18418.0</text:p>
          </table:table-cell>
          <table:table-cell table:style-name="ce76" office:value-type="float" office:value="18646" calcext:value-type="float">
            <text:p>18646.0</text:p>
          </table:table-cell>
          <table:table-cell table:style-name="ce76" office:value-type="float" office:value="17675" calcext:value-type="float">
            <text:p>17675.0</text:p>
          </table:table-cell>
          <table:table-cell table:style-name="ce76" table:number-columns-repeated="27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table:style-name="ce28"/>
          <table:table-cell table:style-name="ce16" office:value-type="float" office:value="44145" calcext:value-type="float">
            <text:p>44145</text:p>
          </table:table-cell>
          <table:table-cell table:style-name="ce16" office:value-type="float" office:value="43042" calcext:value-type="float">
            <text:p>43042</text:p>
          </table:table-cell>
          <table:table-cell table:style-name="ce16" office:value-type="float" office:value="42341" calcext:value-type="float">
            <text:p>42341</text:p>
          </table:table-cell>
          <table:table-cell table:style-name="ce16" office:value-type="float" office:value="42215" calcext:value-type="float">
            <text:p>42215</text:p>
          </table:table-cell>
          <table:table-cell table:style-name="ce76" table:formula="of:=SUMPRODUCT(([.B23:.F23]&lt;&gt;&quot;&quot;)*([.B23:.F23]/[.B$19:.F$19]) / SUM([.B23:.F23]&lt;&gt;&quot;&quot;))" office:value-type="float" office:value="5602.03324464103" calcext:value-type="float">
            <text:p>5602.0</text:p>
          </table:table-cell>
          <table:table-cell table:style-name="ce201" table:formula="of:=[.G23]*[.H$19]" office:value-type="float" office:value="211532.114277722" calcext:value-type="float">
            <text:p>211532</text:p>
          </table:table-cell>
          <table:table-cell table:style-name="ce203" table:formula="of:=STDEVP([.B23:.F23])/AVERAGE([.B23:.F23])" office:value-type="percentage" office:value="0.0178396937404306" calcext:value-type="percentage">
            <text:p>1.8%</text:p>
          </table:table-cell>
          <table:table-cell table:style-name="ce203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205" table:formula="of:=(MAX([.B23:.F23])-MIN([.B23:.F23]))/[.H23]*5" office:value-type="percentage" office:value="0.0456195506434093" calcext:value-type="percentage">
            <text:p>4.6%</text:p>
          </table:table-cell>
          <table:table-cell table:number-columns-repeated="3"/>
          <table:table-cell table:style-name="ce31"/>
          <table:table-cell/>
          <table:table-cell office:value-type="float" office:value="16619" calcext:value-type="float">
            <text:p>16619</text:p>
          </table:table-cell>
          <table:table-cell office:value-type="float" office:value="16006" calcext:value-type="float">
            <text:p>16006</text:p>
          </table:table-cell>
          <table:table-cell office:value-type="float" office:value="15437" calcext:value-type="float">
            <text:p>15437</text:p>
          </table:table-cell>
          <table:table-cell table:style-name="ce21" office:value-type="percentage" office:value="14978" calcext:value-type="percentage">
            <text:p>1497800.00%</text:p>
          </table:table-cell>
          <table:table-cell table:style-name="ce21" office:value-type="percentage" office:value="15164" calcext:value-type="percentage">
            <text:p>1516400.00%</text:p>
          </table:table-cell>
          <table:table-cell table:style-name="ce21" office:value-type="percentage" office:value="14460" calcext:value-type="percentage">
            <text:p>1446000.00%</text:p>
          </table:table-cell>
          <table:table-cell table:style-name="ce21" table:number-columns-repeated="27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table:style-name="ce28"/>
          <table:table-cell table:style-name="ce16" office:value-type="float" office:value="38437" calcext:value-type="float">
            <text:p>38437</text:p>
          </table:table-cell>
          <table:table-cell table:style-name="ce16" office:value-type="float" office:value="37184" calcext:value-type="float">
            <text:p>37184</text:p>
          </table:table-cell>
          <table:table-cell table:style-name="ce16" office:value-type="float" office:value="36713" calcext:value-type="float">
            <text:p>36713</text:p>
          </table:table-cell>
          <table:table-cell table:style-name="ce16" office:value-type="float" office:value="36612" calcext:value-type="float">
            <text:p>36612</text:p>
          </table:table-cell>
          <table:table-cell table:style-name="ce76" table:formula="of:=SUMPRODUCT(([.B24:.F24]&lt;&gt;&quot;&quot;)*([.B24:.F24]/[.B$19:.F$19]) / SUM([.B24:.F24]&lt;&gt;&quot;&quot;))" office:value-type="float" office:value="4858.433286199" calcext:value-type="float">
            <text:p>4858.4</text:p>
          </table:table-cell>
          <table:table-cell table:style-name="ce201" table:formula="of:=[.G24]*[.H$19]" office:value-type="float" office:value="183453.867591747" calcext:value-type="float">
            <text:p>183454</text:p>
          </table:table-cell>
          <table:table-cell table:style-name="ce203" table:formula="of:=STDEVP([.B24:.F24])/AVERAGE([.B24:.F24])" office:value-type="percentage" office:value="0.0194956348263697" calcext:value-type="percentage">
            <text:p>1.9%</text:p>
          </table:table-cell>
          <table:table-cell table:style-name="ce203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205" table:formula="of:=(MAX([.B24:.F24])-MIN([.B24:.F24]))/[.H24]*5" office:value-type="percentage" office:value="0.0497400252160753" calcext:value-type="percentage">
            <text:p>5.0%</text:p>
          </table:table-cell>
          <table:table-cell table:number-columns-repeated="3"/>
          <table:table-cell table:style-name="ce31"/>
          <table:table-cell/>
          <table:table-cell office:value-type="float" office:value="13427" calcext:value-type="float">
            <text:p>13427</text:p>
          </table:table-cell>
          <table:table-cell office:value-type="float" office:value="12869" calcext:value-type="float">
            <text:p>12869</text:p>
          </table:table-cell>
          <table:table-cell office:value-type="float" office:value="12422" calcext:value-type="float">
            <text:p>12422</text:p>
          </table:table-cell>
          <table:table-cell table:style-name="ce203" office:value-type="percentage" office:value="11941" calcext:value-type="percentage">
            <text:p>1194100.0%</text:p>
          </table:table-cell>
          <table:table-cell table:style-name="ce203" office:value-type="percentage" office:value="12200" calcext:value-type="percentage">
            <text:p>1220000.0%</text:p>
          </table:table-cell>
          <table:table-cell table:style-name="ce203" office:value-type="percentage" office:value="11578" calcext:value-type="percentage">
            <text:p>1157800.0%</text:p>
          </table:table-cell>
          <table:table-cell table:style-name="ce203" table:number-columns-repeated="27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table:style-name="ce28"/>
          <table:table-cell table:style-name="ce16" office:value-type="float" office:value="33123" calcext:value-type="float">
            <text:p>33123</text:p>
          </table:table-cell>
          <table:table-cell table:style-name="ce16" office:value-type="float" office:value="32068" calcext:value-type="float">
            <text:p>32068</text:p>
          </table:table-cell>
          <table:table-cell table:style-name="ce16" office:value-type="float" office:value="31518" calcext:value-type="float">
            <text:p>31518</text:p>
          </table:table-cell>
          <table:table-cell table:style-name="ce16" office:value-type="float" office:value="31404" calcext:value-type="float">
            <text:p>31404</text:p>
          </table:table-cell>
          <table:table-cell table:style-name="ce76" table:formula="of:=SUMPRODUCT(([.B25:.F25]&lt;&gt;&quot;&quot;)*([.B25:.F25]/[.B$19:.F$19]) / SUM([.B25:.F25]&lt;&gt;&quot;&quot;))" office:value-type="float" office:value="4178.94613085206" calcext:value-type="float">
            <text:p>4178.9</text:p>
          </table:table-cell>
          <table:table-cell table:style-name="ce201" table:formula="of:=[.G25]*[.H$19]" office:value-type="float" office:value="157796.51278533" calcext:value-type="float">
            <text:p>157797</text:p>
          </table:table-cell>
          <table:table-cell table:style-name="ce203" table:formula="of:=STDEVP([.B25:.F25])/AVERAGE([.B25:.F25])" office:value-type="percentage" office:value="0.0212341306004215" calcext:value-type="percentage">
            <text:p>2.1%</text:p>
          </table:table-cell>
          <table:table-cell table:style-name="ce203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205" table:formula="of:=(MAX([.B25:.F25])-MIN([.B25:.F25]))/[.H25]*5" office:value-type="percentage" office:value="0.0544688843136402" calcext:value-type="percentage">
            <text:p>5.4%</text:p>
          </table:table-cell>
          <table:table-cell table:number-columns-repeated="3"/>
          <table:table-cell table:style-name="ce31"/>
          <table:table-cell/>
          <table:table-cell office:value-type="float" office:value="10738" calcext:value-type="float">
            <text:p>10738</text:p>
          </table:table-cell>
          <table:table-cell office:value-type="float" office:value="10168" calcext:value-type="float">
            <text:p>10168</text:p>
          </table:table-cell>
          <table:table-cell office:value-type="float" office:value="9895" calcext:value-type="float">
            <text:p>9895</text:p>
          </table:table-cell>
          <table:table-cell table:style-name="ce21" office:value-type="percentage" office:value="9458" calcext:value-type="percentage">
            <text:p>945800.00%</text:p>
          </table:table-cell>
          <table:table-cell table:style-name="ce21" office:value-type="percentage" office:value="9695" calcext:value-type="percentage">
            <text:p>969500.00%</text:p>
          </table:table-cell>
          <table:table-cell table:style-name="ce21" office:value-type="percentage" office:value="9129" calcext:value-type="percentage">
            <text:p>912900.00%</text:p>
          </table:table-cell>
          <table:table-cell table:style-name="ce21" table:number-columns-repeated="27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table:style-name="ce28"/>
          <table:table-cell table:style-name="ce16" office:value-type="float" office:value="28201" calcext:value-type="float">
            <text:p>28201</text:p>
          </table:table-cell>
          <table:table-cell table:style-name="ce16" office:value-type="float" office:value="27339" calcext:value-type="float">
            <text:p>27339</text:p>
          </table:table-cell>
          <table:table-cell table:style-name="ce16" office:value-type="float" office:value="26848" calcext:value-type="float">
            <text:p>26848</text:p>
          </table:table-cell>
          <table:table-cell table:style-name="ce16" office:value-type="float" office:value="26835" calcext:value-type="float">
            <text:p>26835</text:p>
          </table:table-cell>
          <table:table-cell table:style-name="ce76" table:formula="of:=SUMPRODUCT(([.B26:.F26]&lt;&gt;&quot;&quot;)*([.B26:.F26]/[.B$19:.F$19]) / SUM([.B26:.F26]&lt;&gt;&quot;&quot;))" office:value-type="float" office:value="3562.74088910748" calcext:value-type="float">
            <text:p>3562.7</text:p>
          </table:table-cell>
          <table:table-cell table:style-name="ce201" table:formula="of:=[.G26]*[.H$19]" office:value-type="float" office:value="134528.675569273" calcext:value-type="float">
            <text:p>134529</text:p>
          </table:table-cell>
          <table:table-cell table:style-name="ce203" table:formula="of:=STDEVP([.B26:.F26])/AVERAGE([.B26:.F26])" office:value-type="percentage" office:value="0.0203387368471211" calcext:value-type="percentage">
            <text:p>2.0%</text:p>
          </table:table-cell>
          <table:table-cell table:style-name="ce203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205" table:formula="of:=(MAX([.B26:.F26])-MIN([.B26:.F26]))/[.H26]*5" office:value-type="percentage" office:value="0.0507698449501423" calcext:value-type="percentage">
            <text:p>5.1%</text:p>
          </table:table-cell>
          <table:table-cell table:number-columns-repeated="5"/>
          <table:table-cell office:value-type="float" office:value="8551" calcext:value-type="float">
            <text:p>8551</text:p>
          </table:table-cell>
          <table:table-cell office:value-type="float" office:value="7965" calcext:value-type="float">
            <text:p>7965</text:p>
          </table:table-cell>
          <table:table-cell office:value-type="float" office:value="7785" calcext:value-type="float">
            <text:p>7785</text:p>
          </table:table-cell>
          <table:table-cell office:value-type="float" office:value="7407" calcext:value-type="float">
            <text:p>7407</text:p>
          </table:table-cell>
          <table:table-cell office:value-type="float" office:value="7598" calcext:value-type="float">
            <text:p>7598</text:p>
          </table:table-cell>
          <table:table-cell office:value-type="float" office:value="7101" calcext:value-type="float">
            <text:p>7101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/>
          <table:table-cell table:style-name="ce31" office:value-type="float" office:value="23717" calcext:value-type="float">
            <text:p>23717</text:p>
          </table:table-cell>
          <table:table-cell table:style-name="ce31" office:value-type="float" office:value="23073" calcext:value-type="float">
            <text:p>23073</text:p>
          </table:table-cell>
          <table:table-cell table:style-name="ce16" office:value-type="float" office:value="22405" calcext:value-type="float">
            <text:p>22405</text:p>
          </table:table-cell>
          <table:table-cell table:style-name="ce16" office:value-type="float" office:value="22446" calcext:value-type="float">
            <text:p>22446</text:p>
          </table:table-cell>
          <table:table-cell table:style-name="ce76" table:formula="of:=SUMPRODUCT(([.B27:.F27]&lt;&gt;&quot;&quot;)*([.B27:.F27]/[.B$19:.F$19]) / SUM([.B27:.F27]&lt;&gt;&quot;&quot;))" office:value-type="float" office:value="2989.29703871799" calcext:value-type="float">
            <text:p>2989.3</text:p>
          </table:table-cell>
          <table:table-cell table:style-name="ce201" table:formula="of:=[.G27]*[.H$19]" office:value-type="float" office:value="112875.503444941" calcext:value-type="float">
            <text:p>112876</text:p>
          </table:table-cell>
          <table:table-cell table:style-name="ce203" table:formula="of:=STDEVP([.B27:.F27])/AVERAGE([.B27:.F27])" office:value-type="percentage" office:value="0.0233849994166568" calcext:value-type="percentage">
            <text:p>2.3%</text:p>
          </table:table-cell>
          <table:table-cell table:style-name="ce203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205" table:formula="of:=(MAX([.B27:.F27])-MIN([.B27:.F27]))/[.H27]*5" office:value-type="percentage" office:value="0.0581171272755375" calcext:value-type="percentage">
            <text:p>5.8%</text:p>
          </table:table-cell>
          <table:table-cell table:number-columns-repeated="5"/>
          <table:table-cell office:value-type="float" office:value="6739" calcext:value-type="float">
            <text:p>6739</text:p>
          </table:table-cell>
          <table:table-cell office:value-type="float" office:value="6207" calcext:value-type="float">
            <text:p>6207</text:p>
          </table:table-cell>
          <table:table-cell office:value-type="float" office:value="6024" calcext:value-type="float">
            <text:p>6024</text:p>
          </table:table-cell>
          <table:table-cell office:value-type="float" office:value="5836" calcext:value-type="float">
            <text:p>5836</text:p>
          </table:table-cell>
          <table:table-cell office:value-type="float" office:value="5966" calcext:value-type="float">
            <text:p>5966</text:p>
          </table:table-cell>
          <table:table-cell office:value-type="float" office:value="5520" calcext:value-type="float">
            <text:p>5520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/>
          <table:table-cell office:value-type="float" office:value="19578" calcext:value-type="float">
            <text:p>19578</text:p>
          </table:table-cell>
          <table:table-cell office:value-type="float" office:value="18974" calcext:value-type="float">
            <text:p>18974</text:p>
          </table:table-cell>
          <table:table-cell table:style-name="ce76" office:value-type="float" office:value="18418" calcext:value-type="float">
            <text:p>18418.0</text:p>
          </table:table-cell>
          <table:table-cell table:style-name="ce76" office:value-type="float" office:value="18646" calcext:value-type="float">
            <text:p>18646.0</text:p>
          </table:table-cell>
          <table:table-cell table:style-name="ce76" table:formula="of:=SUMPRODUCT(([.B28:.F28]&lt;&gt;&quot;&quot;)*([.B28:.F28]/[.B$19:.F$19]) / SUM([.B28:.F28]&lt;&gt;&quot;&quot;))" office:value-type="float" office:value="2466.51867007481" calcext:value-type="float">
            <text:p>2466.5</text:p>
          </table:table-cell>
          <table:table-cell table:style-name="ce201" table:formula="of:=[.G28]*[.H$19]" office:value-type="float" office:value="93135.4539328216" calcext:value-type="float">
            <text:p>93135</text:p>
          </table:table-cell>
          <table:table-cell table:style-name="ce203" table:formula="of:=STDEVP([.B28:.F28])/AVERAGE([.B28:.F28])" office:value-type="percentage" office:value="0.0230874273864674" calcext:value-type="percentage">
            <text:p>2.3%</text:p>
          </table:table-cell>
          <table:table-cell table:style-name="ce203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205" table:formula="of:=(MAX([.B28:.F28])-MIN([.B28:.F28]))/[.H28]*5" office:value-type="percentage" office:value="0.0622748884026864" calcext:value-type="percentage">
            <text:p>6.2%</text:p>
          </table:table-cell>
          <table:table-cell table:number-columns-repeated="5"/>
          <table:table-cell office:value-type="float" office:value="5323" calcext:value-type="float">
            <text:p>5323</text:p>
          </table:table-cell>
          <table:table-cell office:value-type="float" office:value="4819" calcext:value-type="float">
            <text:p>4819</text:p>
          </table:table-cell>
          <table:table-cell office:value-type="float" office:value="4675" calcext:value-type="float">
            <text:p>4675</text:p>
          </table:table-cell>
          <table:table-cell office:value-type="float" office:value="4555" calcext:value-type="float">
            <text:p>4555</text:p>
          </table:table-cell>
          <table:table-cell office:value-type="float" office:value="4681" calcext:value-type="float">
            <text:p>4681</text:p>
          </table:table-cell>
          <table:table-cell office:value-type="float" office:value="4277" calcext:value-type="float">
            <text:p>4277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/>
          <table:table-cell office:value-type="float" office:value="16006" calcext:value-type="float">
            <text:p>16006</text:p>
          </table:table-cell>
          <table:table-cell office:value-type="float" office:value="15437" calcext:value-type="float">
            <text:p>15437</text:p>
          </table:table-cell>
          <table:table-cell table:style-name="ce21" office:value-type="percentage" office:value="14978" calcext:value-type="percentage">
            <text:p>1497800.00%</text:p>
          </table:table-cell>
          <table:table-cell table:style-name="ce21" office:value-type="percentage" office:value="15164" calcext:value-type="percentage">
            <text:p>1516400.00%</text:p>
          </table:table-cell>
          <table:table-cell table:style-name="ce76" table:formula="of:=SUMPRODUCT(([.B29:.F29]&lt;&gt;&quot;&quot;)*([.B29:.F29]/[.B$19:.F$19]) / SUM([.B29:.F29]&lt;&gt;&quot;&quot;))" office:value-type="float" office:value="2008.86013269156" calcext:value-type="float">
            <text:p>2008.9</text:p>
          </table:table-cell>
          <table:table-cell table:style-name="ce201" table:formula="of:=[.G29]*[.H$19]" office:value-type="float" office:value="75854.3215649377" calcext:value-type="float">
            <text:p>75854</text:p>
          </table:table-cell>
          <table:table-cell table:style-name="ce203" table:formula="of:=STDEVP([.B29:.F29])/AVERAGE([.B29:.F29])" office:value-type="percentage" office:value="0.0252041378631507" calcext:value-type="percentage">
            <text:p>2.5%</text:p>
          </table:table-cell>
          <table:table-cell table:style-name="ce203" table:formula="of:=IF([.H29]&gt;[.$A$7]; [.$C$7]; IF([.H29]&gt;[.$A$8]; [.$C$8]; IF([.H29]&gt;[.$A$9];[.$C$9];IF([.H29]&gt;[.$A$10];[.$C$10]; IF([.H29]&gt;[.$A$11];[.$C$11];IF([.H29]&gt;[.$A$12];[.$C$12];[.$C$13]))))))/100" office:value-type="percentage" office:value="0.11" calcext:value-type="percentage">
            <text:p>11.0%</text:p>
          </table:table-cell>
          <table:table-cell table:style-name="ce205" table:formula="of:=(MAX([.B29:.F29])-MIN([.B29:.F29]))/[.H29]*5" office:value-type="percentage" office:value="0.0677614655824154" calcext:value-type="percentage">
            <text:p>6.8%</text:p>
          </table:table-cell>
          <table:table-cell table:number-columns-repeated="5"/>
          <table:table-cell office:value-type="float" office:value="4117" calcext:value-type="float">
            <text:p>4117</text:p>
          </table:table-cell>
          <table:table-cell office:value-type="float" office:value="3737" calcext:value-type="float">
            <text:p>3737</text:p>
          </table:table-cell>
          <table:table-cell office:value-type="float" office:value="3634" calcext:value-type="float">
            <text:p>3634</text:p>
          </table:table-cell>
          <table:table-cell office:value-type="float" office:value="3524" calcext:value-type="float">
            <text:p>3524</text:p>
          </table:table-cell>
          <table:table-cell office:value-type="float" office:value="3636" calcext:value-type="float">
            <text:p>3636</text:p>
          </table:table-cell>
          <table:table-cell office:value-type="float" office:value="3261" calcext:value-type="float">
            <text:p>3261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/>
          <table:table-cell office:value-type="float" office:value="12869" calcext:value-type="float">
            <text:p>12869</text:p>
          </table:table-cell>
          <table:table-cell office:value-type="float" office:value="12422" calcext:value-type="float">
            <text:p>12422</text:p>
          </table:table-cell>
          <table:table-cell table:style-name="ce203" office:value-type="percentage" office:value="11941" calcext:value-type="percentage">
            <text:p>1194100.0%</text:p>
          </table:table-cell>
          <table:table-cell table:style-name="ce203" office:value-type="percentage" office:value="12200" calcext:value-type="percentage">
            <text:p>1220000.0%</text:p>
          </table:table-cell>
          <table:table-cell table:style-name="ce76" table:formula="of:=SUMPRODUCT(([.B30:.F30]&lt;&gt;&quot;&quot;)*([.B30:.F30]/[.B$19:.F$19]) / SUM([.B30:.F30]&lt;&gt;&quot;&quot;))" office:value-type="float" office:value="1612.44115090677" calcext:value-type="float">
            <text:p>1612.4</text:p>
          </table:table-cell>
          <table:table-cell table:style-name="ce201" table:formula="of:=[.G30]*[.H$19]" office:value-type="float" office:value="60885.5875901839" calcext:value-type="float">
            <text:p>60886</text:p>
          </table:table-cell>
          <table:table-cell table:style-name="ce203" table:formula="of:=STDEVP([.B30:.F30])/AVERAGE([.B30:.F30])" office:value-type="percentage" office:value="0.0275621797405939" calcext:value-type="percentage">
            <text:p>2.8%</text:p>
          </table:table-cell>
          <table:table-cell table:style-name="ce203" table:formula="of:=IF([.H30]&gt;[.$A$7]; [.$C$7]; IF([.H30]&gt;[.$A$8]; [.$C$8]; IF([.H30]&gt;[.$A$9];[.$C$9];IF([.H30]&gt;[.$A$10];[.$C$10]; IF([.H30]&gt;[.$A$11];[.$C$11];IF([.H30]&gt;[.$A$12];[.$C$12];[.$C$13]))))))/100" office:value-type="percentage" office:value="0.11" calcext:value-type="percentage">
            <text:p>11.0%</text:p>
          </table:table-cell>
          <table:table-cell table:style-name="ce205" table:formula="of:=(MAX([.B30:.F30])-MIN([.B30:.F30]))/[.H30]*5" office:value-type="percentage" office:value="0.0762085114663174" calcext:value-type="percentage">
            <text:p>7.6%</text:p>
          </table:table-cell>
          <table:table-cell table:number-columns-repeated="5"/>
          <table:table-cell office:value-type="float" office:value="3171" calcext:value-type="float">
            <text:p>3171</text:p>
          </table:table-cell>
          <table:table-cell office:value-type="float" office:value="2875" calcext:value-type="float">
            <text:p>2875</text:p>
          </table:table-cell>
          <table:table-cell office:value-type="float" office:value="2795" calcext:value-type="float">
            <text:p>2795</text:p>
          </table:table-cell>
          <table:table-cell office:value-type="float" office:value="2718" calcext:value-type="float">
            <text:p>2718</text:p>
          </table:table-cell>
          <table:table-cell office:value-type="float" office:value="2804" calcext:value-type="float">
            <text:p>2804</text:p>
          </table:table-cell>
          <table:table-cell office:value-type="float" office:value="2483" calcext:value-type="float">
            <text:p>2483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/>
          <table:table-cell office:value-type="float" office:value="10168" calcext:value-type="float">
            <text:p>10168</text:p>
          </table:table-cell>
          <table:table-cell office:value-type="float" office:value="9895" calcext:value-type="float">
            <text:p>9895</text:p>
          </table:table-cell>
          <table:table-cell table:style-name="ce21" office:value-type="percentage" office:value="9458" calcext:value-type="percentage">
            <text:p>945800.00%</text:p>
          </table:table-cell>
          <table:table-cell table:style-name="ce21" office:value-type="percentage" office:value="9695" calcext:value-type="percentage">
            <text:p>969500.00%</text:p>
          </table:table-cell>
          <table:table-cell table:style-name="ce76" table:formula="of:=SUMPRODUCT(([.B31:.F31]&lt;&gt;&quot;&quot;)*([.B31:.F31]/[.B$19:.F$19]) / SUM([.B31:.F31]&lt;&gt;&quot;&quot;))" office:value-type="float" office:value="1279.19447981943" calcext:value-type="float">
            <text:p>1279.2</text:p>
          </table:table-cell>
          <table:table-cell table:style-name="ce201" table:formula="of:=[.G31]*[.H$19]" office:value-type="float" office:value="48302.2326130332" calcext:value-type="float">
            <text:p>48302</text:p>
          </table:table-cell>
          <table:table-cell table:style-name="ce203" table:formula="of:=STDEVP([.B31:.F31])/AVERAGE([.B31:.F31])" office:value-type="percentage" office:value="0.0266164129630504" calcext:value-type="percentage">
            <text:p>2.7%</text:p>
          </table:table-cell>
          <table:table-cell table:style-name="ce203" table:formula="of:=IF([.H31]&gt;[.$A$7]; [.$C$7]; IF([.H31]&gt;[.$A$8]; [.$C$8]; IF([.H31]&gt;[.$A$9];[.$C$9];IF([.H31]&gt;[.$A$10];[.$C$10]; IF([.H31]&gt;[.$A$11];[.$C$11];IF([.H31]&gt;[.$A$12];[.$C$12];[.$C$13]))))))/100" office:value-type="percentage" office:value="0.11" calcext:value-type="percentage">
            <text:p>11.0%</text:p>
          </table:table-cell>
          <table:table-cell table:style-name="ce205" table:formula="of:=(MAX([.B31:.F31])-MIN([.B31:.F31]))/[.H31]*5" office:value-type="percentage" office:value="0.0734955675535817" calcext:value-type="percentage">
            <text:p>7.3%</text:p>
          </table:table-cell>
          <table:table-cell table:number-columns-repeated="5"/>
          <table:table-cell office:value-type="float" office:value="2459" calcext:value-type="float">
            <text:p>2459</text:p>
          </table:table-cell>
          <table:table-cell office:value-type="float" office:value="2232" calcext:value-type="float">
            <text:p>2232</text:p>
          </table:table-cell>
          <table:table-cell office:value-type="float" office:value="2153" calcext:value-type="float">
            <text:p>2153</text:p>
          </table:table-cell>
          <table:table-cell office:value-type="float" office:value="2059" calcext:value-type="float">
            <text:p>2059</text:p>
          </table:table-cell>
          <table:table-cell office:value-type="float" office:value="2143" calcext:value-type="float">
            <text:p>2143</text:p>
          </table:table-cell>
          <table:table-cell office:value-type="float" office:value="1906" calcext:value-type="float">
            <text:p>1906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/>
          <table:table-cell office:value-type="float" office:value="7965" calcext:value-type="float">
            <text:p>7965</text:p>
          </table:table-cell>
          <table:table-cell office:value-type="float" office:value="7785" calcext:value-type="float">
            <text:p>7785</text:p>
          </table:table-cell>
          <table:table-cell office:value-type="float" office:value="7407" calcext:value-type="float">
            <text:p>7407</text:p>
          </table:table-cell>
          <table:table-cell office:value-type="float" office:value="7598" calcext:value-type="float">
            <text:p>7598</text:p>
          </table:table-cell>
          <table:table-cell table:style-name="ce76" table:formula="of:=SUMPRODUCT(([.B32:.F32]&lt;&gt;&quot;&quot;)*([.B32:.F32]/[.B$19:.F$19]) / SUM([.B32:.F32]&lt;&gt;&quot;&quot;))" office:value-type="float" office:value="1003.2078187505" calcext:value-type="float">
            <text:p>1003.2</text:p>
          </table:table-cell>
          <table:table-cell table:style-name="ce201" table:formula="of:=[.G32]*[.H$19]" office:value-type="float" office:value="37881.0088574965" calcext:value-type="float">
            <text:p>37881</text:p>
          </table:table-cell>
          <table:table-cell table:style-name="ce203" table:formula="of:=STDEVP([.B32:.F32])/AVERAGE([.B32:.F32])" office:value-type="percentage" office:value="0.0270635107325353" calcext:value-type="percentage">
            <text:p>2.7%</text:p>
          </table:table-cell>
          <table:table-cell table:style-name="ce203" table:formula="of:=IF([.H32]&gt;[.$A$7]; [.$C$7]; IF([.H32]&gt;[.$A$8]; [.$C$8]; IF([.H32]&gt;[.$A$9];[.$C$9];IF([.H32]&gt;[.$A$10];[.$C$10]; IF([.H32]&gt;[.$A$11];[.$C$11];IF([.H32]&gt;[.$A$12];[.$C$12];[.$C$13]))))))/100" office:value-type="percentage" office:value="0.11" calcext:value-type="percentage">
            <text:p>11.0%</text:p>
          </table:table-cell>
          <table:table-cell table:style-name="ce205" table:formula="of:=(MAX([.B32:.F32])-MIN([.B32:.F32]))/[.H32]*5" office:value-type="percentage" office:value="0.0736516815192443" calcext:value-type="percentage">
            <text:p>7.4%</text:p>
          </table:table-cell>
          <table:table-cell table:number-columns-repeated="5"/>
          <table:table-cell office:value-type="float" office:value="1874" calcext:value-type="float">
            <text:p>1874</text:p>
          </table:table-cell>
          <table:table-cell office:value-type="float" office:value="1737" calcext:value-type="float">
            <text:p>1737</text:p>
          </table:table-cell>
          <table:table-cell office:value-type="float" office:value="1629" calcext:value-type="float">
            <text:p>1629</text:p>
          </table:table-cell>
          <table:table-cell office:value-type="float" office:value="1595" calcext:value-type="float">
            <text:p>1595</text:p>
          </table:table-cell>
          <table:table-cell office:value-type="float" office:value="1638" calcext:value-type="float">
            <text:p>1638</text:p>
          </table:table-cell>
          <table:table-cell office:value-type="float" office:value="1439" calcext:value-type="float">
            <text:p>1439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/>
          <table:table-cell office:value-type="float" office:value="6207" calcext:value-type="float">
            <text:p>6207</text:p>
          </table:table-cell>
          <table:table-cell office:value-type="float" office:value="6024" calcext:value-type="float">
            <text:p>6024</text:p>
          </table:table-cell>
          <table:table-cell office:value-type="float" office:value="5836" calcext:value-type="float">
            <text:p>5836</text:p>
          </table:table-cell>
          <table:table-cell office:value-type="float" office:value="5966" calcext:value-type="float">
            <text:p>5966</text:p>
          </table:table-cell>
          <table:table-cell table:style-name="ce76" table:formula="of:=SUMPRODUCT(([.B33:.F33]&lt;&gt;&quot;&quot;)*([.B33:.F33]/[.B$19:.F$19]) / SUM([.B33:.F33]&lt;&gt;&quot;&quot;))" office:value-type="float" office:value="783.915392207583" calcext:value-type="float">
            <text:p>783.9</text:p>
          </table:table-cell>
          <table:table-cell table:style-name="ce201" table:formula="of:=[.G33]*[.H$19]" office:value-type="float" office:value="29600.5527077421" calcext:value-type="float">
            <text:p>29601</text:p>
          </table:table-cell>
          <table:table-cell table:style-name="ce203" table:formula="of:=STDEVP([.B33:.F33])/AVERAGE([.B33:.F33])" office:value-type="percentage" office:value="0.0222063148023875" calcext:value-type="percentage">
            <text:p>2.2%</text:p>
          </table:table-cell>
          <table:table-cell table:style-name="ce203" table:formula="of:=IF([.H33]&gt;[.$A$7]; [.$C$7]; IF([.H33]&gt;[.$A$8]; [.$C$8]; IF([.H33]&gt;[.$A$9];[.$C$9];IF([.H33]&gt;[.$A$10];[.$C$10]; IF([.H33]&gt;[.$A$11];[.$C$11];IF([.H33]&gt;[.$A$12];[.$C$12];[.$C$13]))))))/100" office:value-type="percentage" office:value="0.11" calcext:value-type="percentage">
            <text:p>11.0%</text:p>
          </table:table-cell>
          <table:table-cell table:style-name="ce205" table:formula="of:=(MAX([.B33:.F33])-MIN([.B33:.F33]))/[.H33]*5" office:value-type="percentage" office:value="0.0626677487516921" calcext:value-type="percentage">
            <text:p>6.3%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office:value-type="float" office:value="1233" calcext:value-type="float">
            <text:p>1233</text:p>
          </table:table-cell>
          <table:table-cell office:value-type="float" office:value="1119" calcext:value-type="float">
            <text:p>1119</text:p>
          </table:table-cell>
          <table:table-cell office:value-type="float" office:value="1106" calcext:value-type="float">
            <text:p>1106</text:p>
          </table:table-cell>
          <table:table-cell office:value-type="float" office:value="1130" calcext:value-type="float">
            <text:p>1130</text:p>
          </table:table-cell>
          <table:table-cell office:value-type="float" office:value="980" calcext:value-type="float">
            <text:p>980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/>
          <table:table-cell office:value-type="float" office:value="4819" calcext:value-type="float">
            <text:p>4819</text:p>
          </table:table-cell>
          <table:table-cell office:value-type="float" office:value="4675" calcext:value-type="float">
            <text:p>4675</text:p>
          </table:table-cell>
          <table:table-cell office:value-type="float" office:value="4555" calcext:value-type="float">
            <text:p>4555</text:p>
          </table:table-cell>
          <table:table-cell office:value-type="float" office:value="4681" calcext:value-type="float">
            <text:p>4681</text:p>
          </table:table-cell>
          <table:table-cell table:style-name="ce76" table:formula="of:=SUMPRODUCT(([.B34:.F34]&lt;&gt;&quot;&quot;)*([.B34:.F34]/[.B$19:.F$19]) / SUM([.B34:.F34]&lt;&gt;&quot;&quot;))" office:value-type="float" office:value="610.922436488596" calcext:value-type="float">
            <text:p>610.9</text:p>
          </table:table-cell>
          <table:table-cell table:style-name="ce201" table:formula="of:=[.G34]*[.H$19]" office:value-type="float" office:value="23068.3591129619" calcext:value-type="float">
            <text:p>23068</text:p>
          </table:table-cell>
          <table:table-cell table:style-name="ce203" table:formula="of:=STDEVP([.B34:.F34])/AVERAGE([.B34:.F34])" office:value-type="percentage" office:value="0.0199616836322247" calcext:value-type="percentage">
            <text:p>2.0%</text:p>
          </table:table-cell>
          <table:table-cell table:style-name="ce203" table:formula="of:=IF([.H34]&gt;[.$A$7]; [.$C$7]; IF([.H34]&gt;[.$A$8]; [.$C$8]; IF([.H34]&gt;[.$A$9];[.$C$9];IF([.H34]&gt;[.$A$10];[.$C$10]; IF([.H34]&gt;[.$A$11];[.$C$11];IF([.H34]&gt;[.$A$12];[.$C$12];[.$C$13]))))))/100" office:value-type="percentage" office:value="0.11" calcext:value-type="percentage">
            <text:p>11.0%</text:p>
          </table:table-cell>
          <table:table-cell table:style-name="ce205" table:formula="of:=(MAX([.B34:.F34])-MIN([.B34:.F34]))/[.H34]*5" office:value-type="percentage" office:value="0.0572212350924564" calcext:value-type="percentage">
            <text:p>5.7%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office:value-type="float" office:value="1037" calcext:value-type="float">
            <text:p>1037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927" calcext:value-type="float">
            <text:p>927</text:p>
          </table:table-cell>
          <table:table-cell office:value-type="float" office:value="791" calcext:value-type="float">
            <text:p>791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/>
          <table:table-cell office:value-type="float" office:value="3737" calcext:value-type="float">
            <text:p>3737</text:p>
          </table:table-cell>
          <table:table-cell office:value-type="float" office:value="3634" calcext:value-type="float">
            <text:p>3634</text:p>
          </table:table-cell>
          <table:table-cell office:value-type="float" office:value="3524" calcext:value-type="float">
            <text:p>3524</text:p>
          </table:table-cell>
          <table:table-cell office:value-type="float" office:value="3636" calcext:value-type="float">
            <text:p>3636</text:p>
          </table:table-cell>
          <table:table-cell table:style-name="ce76" table:formula="of:=SUMPRODUCT(([.B35:.F35]&lt;&gt;&quot;&quot;)*([.B35:.F35]/[.B$19:.F$19]) / SUM([.B35:.F35]&lt;&gt;&quot;&quot;))" office:value-type="float" office:value="473.962027174428" calcext:value-type="float">
            <text:p>474.0</text:p>
          </table:table-cell>
          <table:table-cell table:style-name="ce201" table:formula="of:=[.G35]*[.H$19]" office:value-type="float" office:value="17896.7502185872" calcext:value-type="float">
            <text:p>17897</text:p>
          </table:table-cell>
          <table:table-cell table:style-name="ce203" table:formula="of:=STDEVP([.B35:.F35])/AVERAGE([.B35:.F35])" office:value-type="percentage" office:value="0.0207401542536591" calcext:value-type="percentage">
            <text:p>2.1%</text:p>
          </table:table-cell>
          <table:table-cell table:style-name="ce203" table:formula="of:=IF([.H35]&gt;[.$A$7]; [.$C$7]; IF([.H35]&gt;[.$A$8]; [.$C$8]; IF([.H35]&gt;[.$A$9];[.$C$9];IF([.H35]&gt;[.$A$10];[.$C$10]; IF([.H35]&gt;[.$A$11];[.$C$11];IF([.H35]&gt;[.$A$12];[.$C$12];[.$C$13]))))))/100" office:value-type="percentage" office:value="0.11" calcext:value-type="percentage">
            <text:p>11.0%</text:p>
          </table:table-cell>
          <table:table-cell table:style-name="ce205" table:formula="of:=(MAX([.B35:.F35])-MIN([.B35:.F35]))/[.H35]*5" office:value-type="percentage" office:value="0.059508010504271" calcext:value-type="percentage">
            <text:p>6.0%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office:value-type="float" office:value="774" calcext:value-type="float">
            <text:p>774</text:p>
          </table:table-cell>
          <table:table-cell office:value-type="float" office:value="706" calcext:value-type="float">
            <text:p>706</text:p>
          </table:table-cell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office:value-type="float" office:value="558" calcext:value-type="float">
            <text:p>558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/>
          <table:table-cell office:value-type="float" office:value="2875" calcext:value-type="float">
            <text:p>2875</text:p>
          </table:table-cell>
          <table:table-cell office:value-type="float" office:value="2795" calcext:value-type="float">
            <text:p>2795</text:p>
          </table:table-cell>
          <table:table-cell office:value-type="float" office:value="2718" calcext:value-type="float">
            <text:p>2718</text:p>
          </table:table-cell>
          <table:table-cell office:value-type="float" office:value="2804" calcext:value-type="float">
            <text:p>2804</text:p>
          </table:table-cell>
          <table:table-cell table:style-name="ce76" table:formula="of:=SUMPRODUCT(([.B36:.F36]&lt;&gt;&quot;&quot;)*([.B36:.F36]/[.B$19:.F$19]) / SUM([.B36:.F36]&lt;&gt;&quot;&quot;))" office:value-type="float" office:value="365.050150460889" calcext:value-type="float">
            <text:p>365.1</text:p>
          </table:table-cell>
          <table:table-cell table:style-name="ce201" table:formula="of:=[.G36]*[.H$19]" office:value-type="float" office:value="13784.2506054854" calcext:value-type="float">
            <text:p>13784</text:p>
          </table:table-cell>
          <table:table-cell table:style-name="ce203" table:formula="of:=STDEVP([.B36:.F36])/AVERAGE([.B36:.F36])" office:value-type="percentage" office:value="0.0198782134649536" calcext:value-type="percentage">
            <text:p>2.0%</text:p>
          </table:table-cell>
          <table:table-cell table:style-name="ce203" table:formula="of:=IF([.H36]&gt;[.$A$7]; [.$C$7]; IF([.H36]&gt;[.$A$8]; [.$C$8]; IF([.H36]&gt;[.$A$9];[.$C$9];IF([.H36]&gt;[.$A$10];[.$C$10]; IF([.H36]&gt;[.$A$11];[.$C$11];IF([.H36]&gt;[.$A$12];[.$C$12];[.$C$13]))))))/100" office:value-type="percentage" office:value="0.11" calcext:value-type="percentage">
            <text:p>11.0%</text:p>
          </table:table-cell>
          <table:table-cell table:style-name="ce205" table:formula="of:=(MAX([.B36:.F36])-MIN([.B36:.F36]))/[.H36]*5" office:value-type="percentage" office:value="0.0569490516726104" calcext:value-type="percentage">
            <text:p>5.7%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float" office:value="557" calcext:value-type="float">
            <text:p>557</text:p>
          </table:table-cell>
          <table:table-cell office:value-type="float" office:value="500" calcext:value-type="float">
            <text:p>500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office:value-type="float" office:value="401" calcext:value-type="float">
            <text:p>401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/>
          <table:table-cell office:value-type="float" office:value="2232" calcext:value-type="float">
            <text:p>2232</text:p>
          </table:table-cell>
          <table:table-cell office:value-type="float" office:value="2153" calcext:value-type="float">
            <text:p>2153</text:p>
          </table:table-cell>
          <table:table-cell office:value-type="float" office:value="2059" calcext:value-type="float">
            <text:p>2059</text:p>
          </table:table-cell>
          <table:table-cell office:value-type="float" office:value="2143" calcext:value-type="float">
            <text:p>2143</text:p>
          </table:table-cell>
          <table:table-cell table:style-name="ce76" table:formula="of:=SUMPRODUCT(([.B37:.F37]&lt;&gt;&quot;&quot;)*([.B37:.F37]/[.B$19:.F$19]) / SUM([.B37:.F37]&lt;&gt;&quot;&quot;))" office:value-type="float" office:value="280.09363013896" calcext:value-type="float">
            <text:p>280.1</text:p>
          </table:table-cell>
          <table:table-cell table:style-name="ce201" table:formula="of:=[.G37]*[.H$19]" office:value-type="float" office:value="10576.3024229988" calcext:value-type="float">
            <text:p>10576</text:p>
          </table:table-cell>
          <table:table-cell table:style-name="ce203" table:formula="of:=STDEVP([.B37:.F37])/AVERAGE([.B37:.F37])" office:value-type="percentage" office:value="0.0285452822600695" calcext:value-type="percentage">
            <text:p>2.9%</text:p>
          </table:table-cell>
          <table:table-cell table:style-name="ce203" table:formula="of:=IF([.H37]&gt;[.$A$7]; [.$C$7]; IF([.H37]&gt;[.$A$8]; [.$C$8]; IF([.H37]&gt;[.$A$9];[.$C$9];IF([.H37]&gt;[.$A$10];[.$C$10]; IF([.H37]&gt;[.$A$11];[.$C$11];IF([.H37]&gt;[.$A$12];[.$C$12];[.$C$13]))))))/100" office:value-type="percentage" office:value="0.11" calcext:value-type="percentage">
            <text:p>11.0%</text:p>
          </table:table-cell>
          <table:table-cell table:style-name="ce205" table:formula="of:=(MAX([.B37:.F37])-MIN([.B37:.F37]))/[.H37]*5" office:value-type="percentage" office:value="0.0817866174211328" calcext:value-type="percentage">
            <text:p>8.2%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office:value-type="float" office:value="396" calcext:value-type="float">
            <text:p>396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37" calcext:value-type="float">
            <text:p>337</text:p>
          </table:table-cell>
          <table:table-cell office:value-type="float" office:value="271" calcext:value-type="float">
            <text:p>271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float" office:value="1629" calcext:value-type="float">
            <text:p>1629</text:p>
          </table:table-cell>
          <table:table-cell office:value-type="float" office:value="1595" calcext:value-type="float">
            <text:p>1595</text:p>
          </table:table-cell>
          <table:table-cell office:value-type="float" office:value="1638" calcext:value-type="float">
            <text:p>1638</text:p>
          </table:table-cell>
          <table:table-cell table:style-name="ce76" table:formula="of:=SUMPRODUCT(([.B38:.F38]&lt;&gt;&quot;&quot;)*([.B38:.F38]/[.B$19:.F$19]) / SUM([.B38:.F38]&lt;&gt;&quot;&quot;))" office:value-type="float" office:value="215.251276661682" calcext:value-type="float">
            <text:p>215.3</text:p>
          </table:table-cell>
          <table:table-cell table:style-name="ce201" table:formula="of:=[.G38]*[.H$19]" office:value-type="float" office:value="8127.86280709445" calcext:value-type="float">
            <text:p>8128</text:p>
          </table:table-cell>
          <table:table-cell table:style-name="ce203" table:formula="of:=STDEVP([.B38:.F38])/AVERAGE([.B38:.F38])" office:value-type="percentage" office:value="0.0320441303115485" calcext:value-type="percentage">
            <text:p>3.2%</text:p>
          </table:table-cell>
          <table:table-cell table:style-name="ce203" table:formula="of:=IF([.H38]&gt;[.$A$7]; [.$C$7]; IF([.H38]&gt;[.$A$8]; [.$C$8]; IF([.H38]&gt;[.$A$9];[.$C$9];IF([.H38]&gt;[.$A$10];[.$C$10]; IF([.H38]&gt;[.$A$11];[.$C$11];IF([.H38]&gt;[.$A$12];[.$C$12];[.$C$13]))))))/100" office:value-type="percentage" office:value="0.113" calcext:value-type="percentage">
            <text:p>11.3%</text:p>
          </table:table-cell>
          <table:table-cell table:style-name="ce205" table:formula="of:=(MAX([.B38:.F38])-MIN([.B38:.F38]))/[.H38]*5" office:value-type="percentage" office:value="0.0873538366543628" calcext:value-type="percentage">
            <text:p>8.7%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219" calcext:value-type="float">
            <text:p>219</text:p>
          </table:table-cell>
          <table:table-cell office:value-type="float" office:value="185" calcext:value-type="float">
            <text:p>185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1119" calcext:value-type="float">
            <text:p>1119</text:p>
          </table:table-cell>
          <table:table-cell office:value-type="float" office:value="1106" calcext:value-type="float">
            <text:p>1106</text:p>
          </table:table-cell>
          <table:table-cell office:value-type="float" office:value="1130" calcext:value-type="float">
            <text:p>1130</text:p>
          </table:table-cell>
          <table:table-cell table:style-name="ce76" table:formula="of:=SUMPRODUCT(([.B39:.F39]&lt;&gt;&quot;&quot;)*([.B39:.F39]/[.B$19:.F$19]) / SUM([.B39:.F39]&lt;&gt;&quot;&quot;))" office:value-type="float" office:value="149.66120368649" calcext:value-type="float">
            <text:p>149.7</text:p>
          </table:table-cell>
          <table:table-cell table:style-name="ce201" table:formula="of:=[.G39]*[.H$19]" office:value-type="float" office:value="5651.18939117983" calcext:value-type="float">
            <text:p>5651</text:p>
          </table:table-cell>
          <table:table-cell table:style-name="ce203" table:formula="of:=STDEVP([.B39:.F39])/AVERAGE([.B39:.F39])" office:value-type="percentage" office:value="0.0439177020043807" calcext:value-type="percentage">
            <text:p>4.4%</text:p>
          </table:table-cell>
          <table:table-cell table:style-name="ce203" table:formula="of:=IF([.H39]&gt;[.$A$7]; [.$C$7]; IF([.H39]&gt;[.$A$8]; [.$C$8]; IF([.H39]&gt;[.$A$9];[.$C$9];IF([.H39]&gt;[.$A$10];[.$C$10]; IF([.H39]&gt;[.$A$11];[.$C$11];IF([.H39]&gt;[.$A$12];[.$C$12];[.$C$13]))))))/100" office:value-type="percentage" office:value="0.113" calcext:value-type="percentage">
            <text:p>11.3%</text:p>
          </table:table-cell>
          <table:table-cell table:style-name="ce205" table:formula="of:=(MAX([.B39:.F39])-MIN([.B39:.F39]))/[.H39]*5" office:value-type="percentage" office:value="0.112365726229435" calcext:value-type="percentage">
            <text:p>11.2%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1083" calcext:value-type="float">
            <text:p>1083</text:p>
          </table:table-cell>
          <table:table-cell office:value-type="float" office:value="1037" calcext:value-type="float">
            <text:p>1037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927" calcext:value-type="float">
            <text:p>927</text:p>
          </table:table-cell>
          <table:table-cell table:style-name="ce76" table:formula="of:=SUMPRODUCT(([.B40:.F40]&lt;&gt;&quot;&quot;)*([.B40:.F40]/[.B$19:.F$19]) / SUM([.B40:.F40]&lt;&gt;&quot;&quot;))" office:value-type="float" office:value="129.134213341579" calcext:value-type="float">
            <text:p>129.1</text:p>
          </table:table-cell>
          <table:table-cell table:style-name="ce201" table:formula="of:=[.G40]*[.H$19]" office:value-type="float" office:value="4876.09265794084" calcext:value-type="float">
            <text:p>4876</text:p>
          </table:table-cell>
          <table:table-cell table:style-name="ce203" table:formula="of:=STDEVP([.B40:.F40])/AVERAGE([.B40:.F40])" office:value-type="percentage" office:value="0.0754348476850012" calcext:value-type="percentage">
            <text:p>7.5%</text:p>
          </table:table-cell>
          <table:table-cell table:style-name="ce203" table:formula="of:=IF([.H40]&gt;[.$A$7]; [.$C$7]; IF([.H40]&gt;[.$A$8]; [.$C$8]; IF([.H40]&gt;[.$A$9];[.$C$9];IF([.H40]&gt;[.$A$10];[.$C$10]; IF([.H40]&gt;[.$A$11];[.$C$11];IF([.H40]&gt;[.$A$12];[.$C$12];[.$C$13]))))))/100" office:value-type="percentage" office:value="0.119" calcext:value-type="percentage">
            <text:p>11.9%</text:p>
          </table:table-cell>
          <table:table-cell table:style-name="ce205" table:formula="of:=(MAX([.B40:.F40])-MIN([.B40:.F40]))/[.H40]*5" office:value-type="percentage" office:value="0.182523192735194" calcext:value-type="percentage">
            <text:p>18.3%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815" calcext:value-type="float">
            <text:p>815</text:p>
          </table:table-cell>
          <table:table-cell office:value-type="float" office:value="774" calcext:value-type="float">
            <text:p>774</text:p>
          </table:table-cell>
          <table:table-cell office:value-type="float" office:value="706" calcext:value-type="float">
            <text:p>706</text:p>
          </table:table-cell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table:style-name="ce76" table:formula="of:=SUMPRODUCT(([.B41:.F41]&lt;&gt;&quot;&quot;)*([.B41:.F41]/[.B$19:.F$19]) / SUM([.B41:.F41]&lt;&gt;&quot;&quot;))" office:value-type="float" office:value="97.2400647640878" calcext:value-type="float">
            <text:p>97.2</text:p>
          </table:table-cell>
          <table:table-cell table:style-name="ce201" table:formula="of:=[.G41]*[.H$19]" office:value-type="float" office:value="3671.77337116431" calcext:value-type="float">
            <text:p>3672</text:p>
          </table:table-cell>
          <table:table-cell table:style-name="ce203" table:formula="of:=STDEVP([.B41:.F41])/AVERAGE([.B41:.F41])" office:value-type="percentage" office:value="0.0726875171329125" calcext:value-type="percentage">
            <text:p>7.3%</text:p>
          </table:table-cell>
          <table:table-cell table:style-name="ce203" table:formula="of:=IF([.H41]&gt;[.$A$7]; [.$C$7]; IF([.H41]&gt;[.$A$8]; [.$C$8]; IF([.H41]&gt;[.$A$9];[.$C$9];IF([.H41]&gt;[.$A$10];[.$C$10]; IF([.H41]&gt;[.$A$11];[.$C$11];IF([.H41]&gt;[.$A$12];[.$C$12];[.$C$13]))))))/100" office:value-type="percentage" office:value="0.119" calcext:value-type="percentage">
            <text:p>11.9%</text:p>
          </table:table-cell>
          <table:table-cell table:style-name="ce205" table:formula="of:=(MAX([.B41:.F41])-MIN([.B41:.F41]))/[.H41]*5" office:value-type="percentage" office:value="0.185196615167012" calcext:value-type="percentage">
            <text:p>18.5%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590" calcext:value-type="float">
            <text:p>590</text:p>
          </table:table-cell>
          <table:table-cell office:value-type="float" office:value="557" calcext:value-type="float">
            <text:p>557</text:p>
          </table:table-cell>
          <table:table-cell office:value-type="float" office:value="500" calcext:value-type="float">
            <text:p>500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table:style-name="ce76" table:formula="of:=SUMPRODUCT(([.B42:.F42]&lt;&gt;&quot;&quot;)*([.B42:.F42]/[.B$19:.F$19]) / SUM([.B42:.F42]&lt;&gt;&quot;&quot;))" office:value-type="float" office:value="69.9458255624436" calcext:value-type="float">
            <text:p>69.9</text:p>
          </table:table-cell>
          <table:table-cell table:style-name="ce201" table:formula="of:=[.G42]*[.H$19]" office:value-type="float" office:value="2641.14611963045" calcext:value-type="float">
            <text:p>2641</text:p>
          </table:table-cell>
          <table:table-cell table:style-name="ce203" table:formula="of:=STDEVP([.B42:.F42])/AVERAGE([.B42:.F42])" office:value-type="percentage" office:value="0.0773756983529062" calcext:value-type="percentage">
            <text:p>7.7%</text:p>
          </table:table-cell>
          <table:table-cell table:style-name="ce203" table:formula="of:=IF([.H42]&gt;[.$A$7]; [.$C$7]; IF([.H42]&gt;[.$A$8]; [.$C$8]; IF([.H42]&gt;[.$A$9];[.$C$9];IF([.H42]&gt;[.$A$10];[.$C$10]; IF([.H42]&gt;[.$A$11];[.$C$11];IF([.H42]&gt;[.$A$12];[.$C$12];[.$C$13]))))))/100" office:value-type="percentage" office:value="0.119" calcext:value-type="percentage">
            <text:p>11.9%</text:p>
          </table:table-cell>
          <table:table-cell table:style-name="ce205" table:formula="of:=(MAX([.B42:.F42])-MIN([.B42:.F42]))/[.H42]*5" office:value-type="percentage" office:value="0.210136045058217" calcext:value-type="percentage">
            <text:p>21.0%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430" calcext:value-type="float">
            <text:p>430</text:p>
          </table:table-cell>
          <table:table-cell office:value-type="float" office:value="396" calcext:value-type="float">
            <text:p>396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37" calcext:value-type="float">
            <text:p>337</text:p>
          </table:table-cell>
          <table:table-cell table:style-name="ce76" table:formula="of:=SUMPRODUCT(([.B43:.F43]&lt;&gt;&quot;&quot;)*([.B43:.F43]/[.B$19:.F$19]) / SUM([.B43:.F43]&lt;&gt;&quot;&quot;))" office:value-type="float" office:value="50.250133313533" calcext:value-type="float">
            <text:p>50.3</text:p>
          </table:table-cell>
          <table:table-cell table:style-name="ce201" table:formula="of:=[.G43]*[.H$19]" office:value-type="float" office:value="1897.43910440327" calcext:value-type="float">
            <text:p>1897</text:p>
          </table:table-cell>
          <table:table-cell table:style-name="ce203" table:formula="of:=STDEVP([.B43:.F43])/AVERAGE([.B43:.F43])" office:value-type="percentage" office:value="0.0847170148894798" calcext:value-type="percentage">
            <text:p>8.5%</text:p>
          </table:table-cell>
          <table:table-cell table:style-name="ce203" table:formula="of:=IF([.H43]&gt;[.$A$7]; [.$C$7]; IF([.H43]&gt;[.$A$8]; [.$C$8]; IF([.H43]&gt;[.$A$9];[.$C$9];IF([.H43]&gt;[.$A$10];[.$C$10]; IF([.H43]&gt;[.$A$11];[.$C$11];IF([.H43]&gt;[.$A$12];[.$C$12];[.$C$13]))))))/100" office:value-type="percentage" office:value="0.134" calcext:value-type="percentage">
            <text:p>13.4%</text:p>
          </table:table-cell>
          <table:table-cell table:style-name="ce205" table:formula="of:=(MAX([.B43:.F43])-MIN([.B43:.F43]))/[.H43]*5" office:value-type="percentage" office:value="0.24506715336524" calcext:value-type="percentage">
            <text:p>24.5%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219" calcext:value-type="float">
            <text:p>219</text:p>
          </table:table-cell>
          <table:table-cell table:style-name="ce76" table:formula="of:=SUMPRODUCT(([.B44:.F44]&lt;&gt;&quot;&quot;)*([.B44:.F44]/[.B$19:.F$19]) / SUM([.B44:.F44]&lt;&gt;&quot;&quot;))" office:value-type="float" office:value="34.8357359807558" calcext:value-type="float">
            <text:p>34.8</text:p>
          </table:table-cell>
          <table:table-cell table:style-name="ce201" table:formula="of:=[.G44]*[.H$19]" office:value-type="float" office:value="1315.39328001649" calcext:value-type="float">
            <text:p>1315</text:p>
          </table:table-cell>
          <table:table-cell table:style-name="ce203" table:formula="of:=STDEVP([.B44:.F44])/AVERAGE([.B44:.F44])" office:value-type="percentage" office:value="0.114351043121063" calcext:value-type="percentage">
            <text:p>11.4%</text:p>
          </table:table-cell>
          <table:table-cell table:style-name="ce203" table:formula="of:=IF([.H44]&gt;[.$A$7]; [.$C$7]; IF([.H44]&gt;[.$A$8]; [.$C$8]; IF([.H44]&gt;[.$A$9];[.$C$9];IF([.H44]&gt;[.$A$10];[.$C$10]; IF([.H44]&gt;[.$A$11];[.$C$11];IF([.H44]&gt;[.$A$12];[.$C$12];[.$C$13]))))))/100" office:value-type="percentage" office:value="0.134" calcext:value-type="percentage">
            <text:p>13.4%</text:p>
          </table:table-cell>
          <table:table-cell table:style-name="ce205" table:formula="of:=(MAX([.B44:.F44])-MIN([.B44:.F44]))/[.H44]*5" office:value-type="percentage" office:value="0.334500720571176" calcext:value-type="percentage">
            <text:p>33.5%</text:p>
          </table:table-cell>
          <table:table-cell table:number-columns-repeated="38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table:style-name="ce76" table:formula="of:=SUMPRODUCT(([.B45:.F45]&lt;&gt;&quot;&quot;)*([.B45:.F45]/[.B$19:.F$19]) / SUM([.B45:.F45]&lt;&gt;&quot;&quot;))" office:value-type="float" office:value="23.8955537245117" calcext:value-type="float">
            <text:p>23.9</text:p>
          </table:table-cell>
          <table:table-cell table:style-name="ce201" table:formula="of:=[.G45]*[.H$19]" office:value-type="float" office:value="902.293288962224" calcext:value-type="float">
            <text:p>902</text:p>
          </table:table-cell>
          <table:table-cell table:style-name="ce203" table:formula="of:=STDEVP([.B45:.F45])/AVERAGE([.B45:.F45])" office:value-type="percentage" office:value="0.107351576119642" calcext:value-type="percentage">
            <text:p>10.7%</text:p>
          </table:table-cell>
          <table:table-cell table:style-name="ce203" table:formula="of:=IF([.H45]&gt;[.$A$7]; [.$C$7]; IF([.H45]&gt;[.$A$8]; [.$C$8]; IF([.H45]&gt;[.$A$9];[.$C$9];IF([.H45]&gt;[.$A$10];[.$C$10]; IF([.H45]&gt;[.$A$11];[.$C$11];IF([.H45]&gt;[.$A$12];[.$C$12];[.$C$13]))))))/100" office:value-type="percentage" office:value="0.156" calcext:value-type="percentage">
            <text:p>15.6%</text:p>
          </table:table-cell>
          <table:table-cell table:style-name="ce205" table:formula="of:=(MAX([.B45:.F45])-MIN([.B45:.F45]))/[.H45]*5" office:value-type="percentage" office:value="0.321403254958867" calcext:value-type="percentage">
            <text:p>32.1%</text:p>
          </table:table-cell>
          <table:table-cell table:number-columns-repeated="38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table:style-name="ce76" table:formula="of:=SUMPRODUCT(([.B46:.F46]&lt;&gt;&quot;&quot;)*([.B46:.F46]/[.B$19:.F$19]) / SUM([.B46:.F46]&lt;&gt;&quot;&quot;))" office:value-type="float" office:value="16.4834969098295" calcext:value-type="float">
            <text:p>16.5</text:p>
          </table:table-cell>
          <table:table-cell table:style-name="ce201" table:formula="of:=[.G46]*[.H$19]" office:value-type="float" office:value="622.414898262526" calcext:value-type="float">
            <text:p>622</text:p>
          </table:table-cell>
          <table:table-cell table:style-name="ce203" table:formula="of:=STDEVP([.B46:.F46])/AVERAGE([.B46:.F46])" office:value-type="percentage" office:value="0.146143629549346" calcext:value-type="percentage">
            <text:p>14.6%</text:p>
          </table:table-cell>
          <table:table-cell table:style-name="ce203" table:formula="of:=IF([.H46]&gt;[.$A$7]; [.$C$7]; IF([.H46]&gt;[.$A$8]; [.$C$8]; IF([.H46]&gt;[.$A$9];[.$C$9];IF([.H46]&gt;[.$A$10];[.$C$10]; IF([.H46]&gt;[.$A$11];[.$C$11];IF([.H46]&gt;[.$A$12];[.$C$12];[.$C$13]))))))/100" office:value-type="percentage" office:value="0.156" calcext:value-type="percentage">
            <text:p>15.6%</text:p>
          </table:table-cell>
          <table:table-cell table:style-name="ce205" table:formula="of:=(MAX([.B46:.F46])-MIN([.B46:.F46]))/[.H46]*5" office:value-type="percentage" office:value="0.393628109937469" calcext:value-type="percentage">
            <text:p>39.4%</text:p>
          </table:table-cell>
          <table:table-cell table:number-columns-repeated="38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style-name="ce76" table:formula="of:=SUMPRODUCT(([.B47:.F47]&lt;&gt;&quot;&quot;)*([.B47:.F47]/[.B$19:.F$19]) / SUM([.B47:.F47]&lt;&gt;&quot;&quot;))" office:value-type="float" office:value="10.6304411783269" calcext:value-type="float">
            <text:p>10.6</text:p>
          </table:table-cell>
          <table:table-cell table:style-name="ce201" table:formula="of:=[.G47]*[.H$19]" office:value-type="float" office:value="401.404204501564" calcext:value-type="float">
            <text:p>401</text:p>
          </table:table-cell>
          <table:table-cell table:style-name="ce203" table:formula="of:=STDEVP([.B47:.F47])/AVERAGE([.B47:.F47])" office:value-type="percentage" office:value="0.204328167417026" calcext:value-type="percentage">
            <text:p>20.4%</text:p>
          </table:table-cell>
          <table:table-cell table:style-name="ce203" table:formula="of:=IF([.H47]&gt;[.$A$7]; [.$C$7]; IF([.H47]&gt;[.$A$8]; [.$C$8]; IF([.H47]&gt;[.$A$9];[.$C$9];IF([.H47]&gt;[.$A$10];[.$C$10]; IF([.H47]&gt;[.$A$11];[.$C$11];IF([.H47]&gt;[.$A$12];[.$C$12];[.$C$13]))))))/100" office:value-type="percentage" office:value="0.193" calcext:value-type="percentage">
            <text:p>19.3%</text:p>
          </table:table-cell>
          <table:table-cell table:style-name="ce205" table:formula="of:=(MAX([.B47:.F47])-MIN([.B47:.F47]))/[.H47]*5" office:value-type="percentage" office:value="0.572988517361441" calcext:value-type="percentage">
            <text:p>57.3%</text:p>
          </table:table-cell>
          <table:table-cell table:number-columns-repeated="38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table:formula="of:=SUMPRODUCT(([.B48:.F48]&lt;&gt;&quot;&quot;)*([.B48:.F48]/[.B$19:.F$19]) / SUM([.B48:.F48]&lt;&gt;&quot;&quot;))" office:value-type="float" office:value="0.834088040704329" calcext:value-type="float">
            <text:p>0.8</text:p>
          </table:table-cell>
          <table:table-cell table:style-name="ce201" table:formula="of:=[.G48]*[.H$19]" office:value-type="float" office:value="31.4950659946067" calcext:value-type="float">
            <text:p>31</text:p>
          </table:table-cell>
          <table:table-cell table:style-name="ce203" table:formula="of:=STDEVP([.B48:.F48])/AVERAGE([.B48:.F48])" office:value-type="percentage" office:value="0.656354514495994" calcext:value-type="percentage">
            <text:p>65.6%</text:p>
          </table:table-cell>
          <table:table-cell table:style-name="ce203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205" table:formula="of:=(MAX([.B48:.F48])-MIN([.B48:.F48]))/[.H48]*5" office:value-type="percentage" office:value="1.58755025338135" calcext:value-type="percentage">
            <text:p>158.8%</text:p>
          </table:table-cell>
          <table:table-cell table:number-columns-repeated="38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6" table:formula="of:=SUMPRODUCT(([.B49:.F49]&lt;&gt;&quot;&quot;)*([.B49:.F49]/[.B$19:.F$19]) / SUM([.B49:.F49]&lt;&gt;&quot;&quot;))" office:value-type="float" office:value="0.2940786998523" calcext:value-type="float">
            <text:p>0.3</text:p>
          </table:table-cell>
          <table:table-cell table:style-name="ce201" table:formula="of:=[.G49]*[.H$19]" office:value-type="float" office:value="11.1043770051363" calcext:value-type="float">
            <text:p>11</text:p>
          </table:table-cell>
          <table:table-cell table:style-name="ce203" table:formula="of:=STDEVP([.B49:.F49])/AVERAGE([.B49:.F49])" office:value-type="percentage" office:value="0.668042657122685" calcext:value-type="percentage">
            <text:p>66.8%</text:p>
          </table:table-cell>
          <table:table-cell table:style-name="ce203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205" table:formula="of:=(MAX([.B49:.F49])-MIN([.B49:.F49]))/[.H49]*5" office:value-type="percentage" office:value="1.8010915867454" calcext:value-type="percentage">
            <text:p>180.1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DATA.H20:DATA.H49">
            <calcext:condition calcext:apply-style-name="Good" calcext:value="&gt;1000" calcext:base-cell-address="DATA.H20"/>
          </calcext:conditional-format>
          <calcext:conditional-format calcext:target-range-address="DATA.K20:DATA.K49">
            <calcext:condition calcext:apply-style-name="Good" calcext:value="&lt;[.J20]" calcext:base-cell-address="DATA.K20"/>
          </calcext:conditional-format>
        </calcext:conditional-formats>
      </table:table>
      <table:table table:name="Particle Counter" table:style-name="ta1">
        <table:table-column table:style-name="co4" table:default-cell-style-name="Default"/>
        <table:table-row table:style-name="ro2" table:number-rows-repeated="15">
          <table:table-cell/>
        </table:table-row>
        <table:table-row table:style-name="ro2">
          <table:table-cell/>
        </table:table-row>
      </table:table>
      <table:table table:name="Clause 6 Sizing Calibration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7"/>
          <table:table-cell table:style-name="ce27" table:number-columns-repeated="1017"/>
        </table:table-row>
        <table:table-row table:style-name="ro2">
          <table:table-cell table:number-columns-repeated="1024"/>
        </table:table-row>
        <table:table-row table:style-name="ro6">
          <table:table-cell table:style-name="ce34"/>
          <table:table-cell table:style-name="ce33" table:number-columns-repeated="3"/>
          <table:table-cell table:number-columns-repeated="1020"/>
        </table:table-row>
        <table:table-row table:style-name="ro2">
          <table:table-cell table:style-name="ce33" table:number-columns-repeated="4"/>
          <table:table-cell table:number-columns-repeated="4"/>
          <table:table-cell table:style-name="ce28"/>
          <table:table-cell table:number-columns-repeated="2"/>
          <table:table-cell table:style-name="ce16"/>
          <table:table-cell office:value-type="string" calcext:value-type="string">
            <text:p>Need &gt;10000 particles <text:span text:style-name="T6">at the smallest threshold setting</text:span><text:span text:style-name="T10"> for each sub-sample / test portion. </text:span>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BS0707</text:p>
          </table:table-cell>
          <table:table-cell table:number-columns-repeated="7"/>
          <table:table-cell table:style-name="ce16"/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7"/>
          <table:table-cell table:style-name="ce16"/>
          <table:table-cell office:value-type="string" calcext:value-type="string">
            <text:p>SRM2806D has 14/ml at 30um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7"/>
          <table:table-cell table:style-name="ce16"/>
          <table:table-cell office:value-type="string" calcext:value-type="string">
            <text:p>This implies we need at least 1000/14 = 71ml per test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7"/>
          <table:table-cell table:number-columns-repeated="7"/>
          <table:table-cell table:style-name="ce30"/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1" calcext:value-type="date">
            <text:p>2025-05-01</text:p>
          </table:table-cell>
          <table:table-cell table:number-columns-repeated="7"/>
          <table:table-cell table:style-name="ce30"/>
          <table:table-cell table:number-columns-repeated="1012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7"/>
          <table:table-cell table:style-name="ce31"/>
          <table:table-cell table:number-columns-repeated="1012"/>
        </table:table-row>
        <table:table-row table:style-name="ro2">
          <table:table-cell table:style-name="ce33" office:value-type="string" calcext:value-type="string">
            <text:p>Threshold Noise</text:p>
          </table:table-cell>
          <table:table-cell table:style-name="ce33" table:number-columns-repeated="2"/>
          <table:table-cell table:style-name="ce47" table:formula="of:=AVERAGE(88; 92; 92; 92;93)" office:value-type="float" office:value="91.4" calcext:value-type="float">
            <text:p>91.4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Lowest threshold J</text:p>
          </table:table-cell>
          <table:table-cell table:number-columns-repeated="2"/>
          <table:table-cell table:formula="of:=[.D12]*1.5" office:value-type="float" office:value="137.1" calcext:value-type="float">
            <text:p>137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ghest threshold H</text:p>
          </table:table-cell>
          <table:table-cell table:number-columns-repeated="2"/>
          <table:table-cell office:value-type="float" office:value="13479" calcext:value-type="float">
            <text:p>134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Factor K</text:p>
          </table:table-cell>
          <table:table-cell table:number-columns-repeated="2"/>
          <table:table-cell table:formula="of:=10^((LOG([.D15])-LOG([.D14]))/27)" office:value-type="float" office:value="1.18522485082317" calcext:value-type="float">
            <text:p>1.185224850823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s</text:p>
          </table:table-cell>
          <table:table-cell office:value-type="string" calcext:value-type="string">
            <text:p>1.5x noise</text:p>
          </table:table-cell>
          <table:table-cell office:value-type="float" office:value="0" calcext:value-type="float">
            <text:p>0</text:p>
          </table:table-cell>
          <table:table-cell table:style-name="ce20" table:formula="of:=[.D12]*1.5" office:value-type="float" office:value="137.1" calcext:value-type="float">
            <text:p>13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0" table:formula="of:=[.D19]*[.D$16]" office:value-type="float" office:value="162.494327047856" calcext:value-type="float">
            <text:p>16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20" table:formula="of:=[.D20]*[.D$16]" office:value-type="float" office:value="192.592314534906" calcext:value-type="float">
            <text:p>19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.D21]*[.D$16]" office:value-type="float" office:value="228.265197264323" calcext:value-type="float">
            <text:p>22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.D22]*[.D$16]" office:value-type="float" office:value="270.545584375728" calcext:value-type="float">
            <text:p>27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.D23]*[.D$16]" office:value-type="float" office:value="320.657349882588" calcext:value-type="float">
            <text:p>32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.D24]*[.D$16]" office:value-type="float" office:value="380.051059679943" calcext:value-type="float">
            <text:p>38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.D25]*[.D$16]" office:value-type="float" office:value="450.445960514347" calcext:value-type="float">
            <text:p>45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.D26]*[.D$16]" office:value-type="float" office:value="533.879746354515" calcext:value-type="float">
            <text:p>53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style-name="ce20" table:formula="of:=[.D27]*[.D$16]" office:value-type="float" office:value="632.76754273054" calcext:value-type="float">
            <text:p>63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table:formula="of:=[.D28]*[.D$16]" office:value-type="float" office:value="749.971816438546" calcext:value-type="float">
            <text:p>75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table:formula="of:=[.D29]*[.D$16]" office:value-type="float" office:value="888.885234259955" calcext:value-type="float">
            <text:p>88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table:formula="of:=[.D30]*[.D$16]" office:value-type="float" office:value="1053.52886917467" calcext:value-type="float">
            <text:p>105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table:formula="of:=[.D31]*[.D$16]" office:value-type="float" office:value="1248.66859680545" calcext:value-type="float">
            <text:p>124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table:formula="of:=[.D32]*[.D$16]" office:value-type="float" office:value="1479.95305137631" calcext:value-type="float">
            <text:p>148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table:formula="of:=[.D33]*[.D$16]" office:value-type="float" office:value="1754.07713454278" calcext:value-type="float">
            <text:p>175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style-name="ce20" table:formula="of:=[.D34]*[.D$16]" office:value-type="float" office:value="2078.97581012079" calcext:value-type="float">
            <text:p>207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style-name="ce20" table:formula="of:=[.D35]*[.D$16]" office:value-type="float" office:value="2464.05379441539" calcext:value-type="float">
            <text:p>246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style-name="ce20" table:formula="of:=[.D36]*[.D$16]" office:value-type="float" office:value="2920.45779090624" calcext:value-type="float">
            <text:p>2920</text:p>
          </table:table-cell>
          <table:table-cell table:number-columns-repeated="6"/>
          <table:table-cell table:style-name="ce28" office:value-type="string" calcext:value-type="string">
            <text:p>5ml sample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style-name="ce20" table:formula="of:=[.D37]*[.D$16]" office:value-type="float" office:value="3461.3991495622" calcext:value-type="float">
            <text:p>3461</text:p>
          </table:table-cell>
          <table:table-cell table:number-columns-repeated="5"/>
          <table:table-cell table:style-name="ce16" office:value-type="string" calcext:value-type="string">
            <text:p>&gt;4μm(c)/100ml</text:p>
          </table:table-cell>
          <table:table-cell table:style-name="ce16" office:value-type="string" calcext:value-type="string">
            <text:p>Deviation</text:p>
          </table:table-cell>
          <table:table-cell table:style-name="ce16" office:value-type="string" calcext:value-type="string">
            <text:p>6μm</text:p>
          </table:table-cell>
          <table:table-cell/>
          <table:table-cell table:style-name="ce16" office:value-type="string" calcext:value-type="string">
            <text:p>14um</text:p>
          </table:table-cell>
          <table:table-cell/>
          <table:table-cell table:style-name="ce16" office:value-type="string" calcext:value-type="string">
            <text:p>21μm</text:p>
          </table:table-cell>
          <table:table-cell/>
          <table:table-cell table:style-name="ce16" office:value-type="string" calcext:value-type="string">
            <text:p>25μm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style-name="ce20" table:formula="of:=[.D38]*[.D$16]" office:value-type="float" office:value="4102.5362906793" calcext:value-type="float">
            <text:p>410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style-name="ce20" table:formula="of:=[.D39]*[.D$16]" office:value-type="float" office:value="4862.427963117" calcext:value-type="float">
            <text:p>4862</text:p>
          </table:table-cell>
          <table:table-cell table:number-columns-repeated="4"/>
          <table:table-cell office:value-type="string" calcext:value-type="string">
            <text:p>Portion 1</text:p>
          </table:table-cell>
          <table:table-cell office:value-type="float" office:value="1319366" calcext:value-type="float">
            <text:p>1319366</text:p>
          </table:table-cell>
          <table:table-cell table:style-name="ce21" table:formula="of:=([.J40]-[.J$46])/[.J$46]" office:value-type="percentage" office:value="0.0352403515921879" calcext:value-type="percentage">
            <text:p>3.52%</text:p>
          </table:table-cell>
          <table:table-cell office:value-type="float" office:value="504590" calcext:value-type="float">
            <text:p>504590</text:p>
          </table:table-cell>
          <table:table-cell table:style-name="ce21" table:formula="of:=([.L40]-[.L$46])/[.L$46]" office:value-type="percentage" office:value="0.00510209976085033" calcext:value-type="percentage">
            <text:p>0.51%</text:p>
          </table:table-cell>
          <table:table-cell office:value-type="float" office:value="40101" calcext:value-type="float">
            <text:p>40101</text:p>
          </table:table-cell>
          <table:table-cell table:style-name="ce21" table:formula="of:=([.N40]-[.N$46])/[.N$46]" office:value-type="percentage" office:value="-0.0351940871623866" calcext:value-type="percentage">
            <text:p>-3.52%</text:p>
          </table:table-cell>
          <table:table-cell office:value-type="float" office:value="7960" calcext:value-type="float">
            <text:p>7960</text:p>
          </table:table-cell>
          <table:table-cell table:style-name="ce21" table:formula="of:=([.P40]-[.P$46])/[.P$46]" office:value-type="percentage" office:value="-0.0646298472385429" calcext:value-type="percentage">
            <text:p>-6.46%</text:p>
          </table:table-cell>
          <table:table-cell office:value-type="float" office:value="3907" calcext:value-type="float">
            <text:p>3907</text:p>
          </table:table-cell>
          <table:table-cell table:style-name="ce21" table:formula="of:=([.R40]-[.R$46])/[.R$46]" office:value-type="percentage" office:value="-0.0527910782471665" calcext:value-type="percentage">
            <text:p>-5.28%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style-name="ce20" table:formula="of:=[.D40]*[.D$16]" office:value-type="float" office:value="5763.07045722374" calcext:value-type="float">
            <text:p>5763</text:p>
          </table:table-cell>
          <table:table-cell table:number-columns-repeated="4"/>
          <table:table-cell office:value-type="string" calcext:value-type="string">
            <text:p>Portion 2</text:p>
          </table:table-cell>
          <table:table-cell office:value-type="float" office:value="1264547" calcext:value-type="float">
            <text:p>1264547</text:p>
          </table:table-cell>
          <table:table-cell table:style-name="ce21" table:formula="of:=([.J41]-[.J$46])/[.J$46]" office:value-type="percentage" office:value="-0.00777336926611231" calcext:value-type="percentage">
            <text:p>-0.78%</text:p>
          </table:table-cell>
          <table:table-cell office:value-type="float" office:value="496968" calcext:value-type="float">
            <text:p>496968</text:p>
          </table:table-cell>
          <table:table-cell table:style-name="ce21" table:formula="of:=([.L41]-[.L$46])/[.L$46]" office:value-type="percentage" office:value="-0.0100803021979225" calcext:value-type="percentage">
            <text:p>-1.01%</text:p>
          </table:table-cell>
          <table:table-cell office:value-type="float" office:value="41958" calcext:value-type="float">
            <text:p>41958</text:p>
          </table:table-cell>
          <table:table-cell table:style-name="ce21" table:formula="of:=([.N41]-[.N$46])/[.N$46]" office:value-type="percentage" office:value="0.00948421462907619" calcext:value-type="percentage">
            <text:p>0.95%</text:p>
          </table:table-cell>
          <table:table-cell/>
          <table:table-cell table:style-name="ce21"/>
          <table:table-cell/>
          <table:table-cell table:style-name="ce21"/>
          <table:table-cell table:number-columns-repeated="1005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style-name="ce20" table:formula="of:=[.D41]*[.D$16]" office:value-type="float" office:value="6830.53432294641" calcext:value-type="float">
            <text:p>6831</text:p>
          </table:table-cell>
          <table:table-cell table:number-columns-repeated="4"/>
          <table:table-cell office:value-type="string" calcext:value-type="string">
            <text:p>Portion 3</text:p>
          </table:table-cell>
          <table:table-cell office:value-type="float" office:value="1237296" calcext:value-type="float">
            <text:p>1237296</text:p>
          </table:table-cell>
          <table:table-cell table:style-name="ce21" table:formula="of:=([.J42]-[.J$46])/[.J$46]" office:value-type="percentage" office:value="-0.0291558626919234" calcext:value-type="percentage">
            <text:p>-2.92%</text:p>
          </table:table-cell>
          <table:table-cell office:value-type="float" office:value="493550" calcext:value-type="float">
            <text:p>493550</text:p>
          </table:table-cell>
          <table:table-cell table:style-name="ce21" table:formula="of:=([.L42]-[.L$46])/[.L$46]" office:value-type="percentage" office:value="-0.0168886792505446" calcext:value-type="percentage">
            <text:p>-1.69%</text:p>
          </table:table-cell>
          <table:table-cell office:value-type="float" office:value="41992" calcext:value-type="float">
            <text:p>41992</text:p>
          </table:table-cell>
          <table:table-cell table:style-name="ce21" table:formula="of:=([.N42]-[.N$46])/[.N$46]" office:value-type="percentage" office:value="0.0103022341556835" calcext:value-type="percentage">
            <text:p>1.03%</text:p>
          </table:table-cell>
          <table:table-cell office:value-type="float" office:value="8518" calcext:value-type="float">
            <text:p>8518</text:p>
          </table:table-cell>
          <table:table-cell table:style-name="ce21" table:formula="of:=([.P42]-[.P$46])/[.P$46]" office:value-type="percentage" office:value="0.000940070505287897" calcext:value-type="percentage">
            <text:p>0.09%</text:p>
          </table:table-cell>
          <table:table-cell office:value-type="float" office:value="4153" calcext:value-type="float">
            <text:p>4153</text:p>
          </table:table-cell>
          <table:table-cell table:style-name="ce21" table:formula="of:=([.R42]-[.R$46])/[.R$46]" office:value-type="percentage" office:value="0.00684889993332929" calcext:value-type="percentage">
            <text:p>0.68%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style-name="ce20" table:formula="of:=[.D42]*[.D$16]" office:value-type="float" office:value="8095.71902395668" calcext:value-type="float">
            <text:p>8096</text:p>
          </table:table-cell>
          <table:table-cell table:number-columns-repeated="4"/>
          <table:table-cell office:value-type="string" calcext:value-type="string">
            <text:p>Portion 4</text:p>
          </table:table-cell>
          <table:table-cell office:value-type="float" office:value="1282331" calcext:value-type="float">
            <text:p>1282331</text:p>
          </table:table-cell>
          <table:table-cell table:style-name="ce21" table:formula="of:=([.J43]-[.J$46])/[.J$46]" office:value-type="percentage" office:value="0.00618084390348238" calcext:value-type="percentage">
            <text:p>0.62%</text:p>
          </table:table-cell>
          <table:table-cell office:value-type="float" office:value="507867" calcext:value-type="float">
            <text:p>507867</text:p>
          </table:table-cell>
          <table:table-cell table:style-name="ce21" table:formula="of:=([.L43]-[.L$46])/[.L$46]" office:value-type="percentage" office:value="0.0116296163206639" calcext:value-type="percentage">
            <text:p>1.16%</text:p>
          </table:table-cell>
          <table:table-cell office:value-type="float" office:value="42135" calcext:value-type="float">
            <text:p>42135</text:p>
          </table:table-cell>
          <table:table-cell table:style-name="ce21" table:formula="of:=([.N43]-[.N$46])/[.N$46]" office:value-type="percentage" office:value="0.0137427280470024" calcext:value-type="percentage">
            <text:p>1.37%</text:p>
          </table:table-cell>
          <table:table-cell office:value-type="float" office:value="8785" calcext:value-type="float">
            <text:p>8785</text:p>
          </table:table-cell>
          <table:table-cell table:style-name="ce21" table:formula="of:=([.P43]-[.P$46])/[.P$46]" office:value-type="percentage" office:value="0.0323149236192714" calcext:value-type="percentage">
            <text:p>3.23%</text:p>
          </table:table-cell>
          <table:table-cell office:value-type="float" office:value="4187" calcext:value-type="float">
            <text:p>4187</text:p>
          </table:table-cell>
          <table:table-cell table:style-name="ce21" table:formula="of:=([.R43]-[.R$46])/[.R$46]" office:value-type="percentage" office:value="0.0150918237468938" calcext:value-type="percentage">
            <text:p>1.51%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style-name="ce20" table:formula="of:=[.D43]*[.D$16]" office:value-type="float" office:value="9595.24737247533" calcext:value-type="float">
            <text:p>9595</text:p>
          </table:table-cell>
          <table:table-cell table:number-columns-repeated="4"/>
          <table:table-cell office:value-type="string" calcext:value-type="string">
            <text:p>Portion 5</text:p>
          </table:table-cell>
          <table:table-cell office:value-type="float" office:value="1268729" calcext:value-type="float">
            <text:p>1268729</text:p>
          </table:table-cell>
          <table:table-cell table:style-name="ce21" table:formula="of:=([.J44]-[.J$46])/[.J$46]" office:value-type="percentage" office:value="-0.00449196353763475" calcext:value-type="percentage">
            <text:p>-0.45%</text:p>
          </table:table-cell>
          <table:table-cell office:value-type="float" office:value="507168" calcext:value-type="float">
            <text:p>507168</text:p>
          </table:table-cell>
          <table:table-cell table:style-name="ce21" table:formula="of:=([.L44]-[.L$46])/[.L$46]" office:value-type="percentage" office:value="0.0102372653669532" calcext:value-type="percentage">
            <text:p>1.02%</text:p>
          </table:table-cell>
          <table:table-cell office:value-type="float" office:value="41633" calcext:value-type="float">
            <text:p>41633</text:p>
          </table:table-cell>
          <table:table-cell table:style-name="ce21" table:formula="of:=([.N44]-[.N$46])/[.N$46]" office:value-type="percentage" office:value="0.00166491033062418" calcext:value-type="percentage">
            <text:p>0.17%</text:p>
          </table:table-cell>
          <table:table-cell office:value-type="float" office:value="8777" calcext:value-type="float">
            <text:p>8777</text:p>
          </table:table-cell>
          <table:table-cell table:style-name="ce21" table:formula="of:=([.P44]-[.P$46])/[.P$46]" office:value-type="percentage" office:value="0.0313748531139835" calcext:value-type="percentage">
            <text:p>3.14%</text:p>
          </table:table-cell>
          <table:table-cell office:value-type="float" office:value="4252" calcext:value-type="float">
            <text:p>4252</text:p>
          </table:table-cell>
          <table:table-cell table:style-name="ce21" table:formula="of:=([.R44]-[.R$46])/[.R$46]" office:value-type="percentage" office:value="0.0308503545669435" calcext:value-type="percentage">
            <text:p>3.09%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style-name="ce20" table:formula="of:=[.D44]*[.D$16]" office:value-type="float" office:value="11372.5256356535" calcext:value-type="float">
            <text:p>11373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~30um</text:p>
          </table:table-cell>
          <table:table-cell office:value-type="float" office:value="27" calcext:value-type="float">
            <text:p>27</text:p>
          </table:table-cell>
          <table:table-cell table:style-name="ce20" table:formula="of:=[.D45]*[.D$16]" office:value-type="float" office:value="13479" calcext:value-type="float">
            <text:p>13479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20" table:formula="of:=AVERAGE([.J40:.J44])" office:value-type="float" office:value="1274453.8" calcext:value-type="float">
            <text:p>1274454</text:p>
          </table:table-cell>
          <table:table-cell/>
          <table:table-cell table:style-name="ce20" table:formula="of:=AVERAGE([.L40:.L44])" office:value-type="float" office:value="502028.6" calcext:value-type="float">
            <text:p>502029</text:p>
          </table:table-cell>
          <table:table-cell/>
          <table:table-cell table:style-name="ce20" table:formula="of:=AVERAGE([.N40:.N44])" office:value-type="float" office:value="41563.8" calcext:value-type="float">
            <text:p>41564</text:p>
          </table:table-cell>
          <table:table-cell/>
          <table:table-cell table:style-name="ce20" table:formula="of:=AVERAGE([.P40:.P44])" office:value-type="float" office:value="8510" calcext:value-type="float">
            <text:p>8510</text:p>
          </table:table-cell>
          <table:table-cell/>
          <table:table-cell table:style-name="ce20" table:formula="of:=AVERAGE([.R40:.R44])" office:value-type="float" office:value="4124.75" calcext:value-type="float">
            <text:p>4125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ample StdDev</text:p>
          </table:table-cell>
          <table:table-cell table:style-name="ce20" table:formula="of:=STDEVP([.J40:.J44])" office:value-type="float" office:value="26798.4182772043" calcext:value-type="float">
            <text:p>26798</text:p>
          </table:table-cell>
          <table:table-cell/>
          <table:table-cell table:style-name="ce20" table:formula="of:=STDEVP([.L40:.L44])" office:value-type="float" office:value="5736.85361849159" calcext:value-type="float">
            <text:p>5737</text:p>
          </table:table-cell>
          <table:table-cell/>
          <table:table-cell table:style-name="ce20" table:formula="of:=STDEVP([.N40:.N44])" office:value-type="float" office:value="749.612006307263" calcext:value-type="float">
            <text:p>750</text:p>
          </table:table-cell>
          <table:table-cell/>
          <table:table-cell table:style-name="ce20" table:formula="of:=STDEVP([.P40:.P44])" office:value-type="float" office:value="335.215602262186" calcext:value-type="float">
            <text:p>335</text:p>
          </table:table-cell>
          <table:table-cell/>
          <table:table-cell table:style-name="ce20" table:formula="of:=STDEVP([.R40:.R44])" office:value-type="float" office:value="130.652927636544" calcext:value-type="float">
            <text:p>131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D<text:span text:style-name="T7">Q</text:span></text:p>
          </table:table-cell>
          <table:table-cell table:style-name="ce153" table:formula="of:=(MAX([.J40:.J44])-MIN([.J40:.J44]))/[.J46]" office:value-type="percentage" office:value="0.0643962142841114" calcext:value-type="percentage">
            <text:p>6.44%</text:p>
          </table:table-cell>
          <table:table-cell/>
          <table:table-cell table:style-name="ce153" table:formula="of:=(MAX([.L40:.L44])-MIN([.L40:.L44]))/[.L46]" office:value-type="percentage" office:value="0.0285182955712085" calcext:value-type="percentage">
            <text:p>2.85%</text:p>
          </table:table-cell>
          <table:table-cell/>
          <table:table-cell table:style-name="ce153" table:formula="of:=(MAX([.N40:.N44])-MIN([.N40:.N44]))/[.N46]" office:value-type="percentage" office:value="0.0489368152093889" calcext:value-type="percentage">
            <text:p>4.89%</text:p>
          </table:table-cell>
          <table:table-cell/>
          <table:table-cell table:style-name="ce153" table:formula="of:=(MAX([.P40:.P44])-MIN([.P40:.P44]))/[.P46]" office:value-type="percentage" office:value="0.0969447708578143" calcext:value-type="percentage">
            <text:p>9.69%</text:p>
          </table:table-cell>
          <table:table-cell/>
          <table:table-cell table:style-name="ce153" table:formula="of:=(MAX([.R40:.R44])-MIN([.R40:.R44]))/[.R46]" office:value-type="percentage" office:value="0.08364143281411" calcext:value-type="percentage">
            <text:p>8.36%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riteria &lt;%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/>
          <table:table-cell table:style-name="ce21" office:value-type="percentage" office:value="0.119" calcext:value-type="percentage">
            <text:p>11.90%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CV<text:span text:style-name="T7">VOL</text:span></text:p>
          </table:table-cell>
          <table:table-cell table:style-name="ce21" table:formula="of:=[.J47]/[.J46]" office:value-type="percentage" office:value="0.0210273752388704" calcext:value-type="percentage">
            <text:p>2.10%</text:p>
          </table:table-cell>
          <table:table-cell table:style-name="ce101" table:formula="of:=IF([.J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L47]/[.L46]" office:value-type="percentage" office:value="0.0114273442160299" calcext:value-type="percentage">
            <text:p>1.14%</text:p>
          </table:table-cell>
          <table:table-cell table:style-name="ce101" table:formula="of:=IF([.L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N47]/[.N46]" office:value-type="percentage" office:value="0.0180352134864296" calcext:value-type="percentage">
            <text:p>1.80%</text:p>
          </table:table-cell>
          <table:table-cell table:style-name="ce101" table:formula="of:=IF([.N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/>
          <table:table-cell/>
          <table:table-cell table:style-name="ce21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16" office:value-type="string" calcext:value-type="string">
            <text:p>&gt;4μm(c)/100m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1239489" calcext:value-type="float">
            <text:p>1239489</text:p>
          </table:table-cell>
          <table:table-cell table:style-name="ce21" table:formula="of:=([.J59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5922" calcext:value-type="float">
            <text:p>1235922</text:p>
          </table:table-cell>
          <table:table-cell table:style-name="ce21" table:formula="of:=([.J60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13694" calcext:value-type="float">
            <text:p>1213694</text:p>
          </table:table-cell>
          <table:table-cell table:style-name="ce21" table:formula="of:=([.J61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59898" calcext:value-type="float">
            <text:p>1259898</text:p>
          </table:table-cell>
          <table:table-cell table:style-name="ce21" table:formula="of:=([.J62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7332" calcext:value-type="float">
            <text:p>1237332</text:p>
          </table:table-cell>
          <table:table-cell table:style-name="ce21" table:formula="of:=([.J63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0" table:formula="of:=AVERAGE([.J59:.J63])" office:value-type="float" office:value="1237267" calcext:value-type="float">
            <text:p>123726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 table:formula="of:=STDEVP([.J59:.J63])" office:value-type="float" office:value="14660.1434099398" calcext:value-type="float">
            <text:p>1466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21" table:formula="of:=[.J66]/[.J65]" office:value-type="percentage" office:value="0.0118488114610183" calcext:value-type="percentage">
            <text:p>1.18%</text:p>
          </table:table-cell>
          <table:table-cell table:style-name="ce101" table:formula="of:=IF([.J73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013"/>
        </table:table-row>
        <calcext:conditional-formats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=&quot;&lt;3% = PASS&quot;" calcext:base-cell-address="'Clause 6 Sizing Calibration'.K54"/>
            <calcext:condition calcext:apply-style-name="Bad" calcext:value="!=&quot;&lt;3% = PASS&quot;" calcext:base-cell-address="'Clause 6 Sizing Calibration'.K54"/>
          </calcext:conditional-format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&lt;0.03" calcext:base-cell-address="'Clause 6 Sizing Calibration'.K54"/>
            <calcext:condition calcext:apply-style-name="Bad" calcext:value="&gt;=0.03" calcext:base-cell-address="'Clause 6 Sizing Calibration'.K54"/>
          </calcext:conditional-format>
          <calcext:conditional-format calcext:target-range-address="'Clause 6 Sizing Calibration'.J49:'Clause 6 Sizing Calibration'.J49 'Clause 6 Sizing Calibration'.L49:'Clause 6 Sizing Calibration'.L49 'Clause 6 Sizing Calibration'.N49:'Clause 6 Sizing Calibration'.N49 'Clause 6 Sizing Calibration'.P49:'Clause 6 Sizing Calibration'.P49 'Clause 6 Sizing Calibration'.R49:'Clause 6 Sizing Calibration'.R49">
            <calcext:condition calcext:apply-style-name="Accent" calcext:value="&lt;[.J50]" calcext:base-cell-address="'Clause 6 Sizing Calibration'.J49"/>
          </calcext:conditional-format>
        </calcext:conditional-formats>
      </table:table>
      <table:table table:name="Clause 6 - spheres" table:style-name="ta1">
        <table:table-column table:style-name="co4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11"/>
        </table:table-row>
      </table:table>
      <table:table table:name="Annex C Flow Rate Limits" table:style-name="ta1">
        <table:table-column table:style-name="co4" table:number-columns-repeated="9" table:default-cell-style-name="Default"/>
        <table:table-column table:style-name="co4" table:number-columns-repeated="4" table:default-cell-style-name="ce33"/>
        <table:table-column table:style-name="co4" table:number-columns-repeated="1011" table:default-cell-style-name="Default"/>
        <table:table-row table:style-name="ro3">
          <table:table-cell table:style-name="ce8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 table:number-columns-spanned="6" table:number-rows-spanned="1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covered-table-cell table:number-columns-repeated="5" table:style-name="ce27"/>
          <table:table-cell table:style-name="ce27" table:number-columns-repeated="1016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Fixed flow rate <text:s/>PASS</text:p>
          </table:table-cell>
          <table:table-cell table:style-name="ce9"/>
          <table:table-cell>
            <draw:frame draw:z-index="0" draw:name="Image 6" draw:style-name="gr2" draw:text-style-name="P2" svg:width="6.826cm" svg:height="14.526cm" svg:x="0.764cm" svg:y="0.127cm">
              <draw:image xlink:href="Pictures/100000010000010200000225D643068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6">
          <table:table-cell table:number-columns-repeated="9"/>
          <table:table-cell table:style-name="ce34" office:value-type="string" calcext:value-type="string">
            <text:p>Volumetric Sampling Accuracy (Traceable Flow Measurement)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>
            <draw:frame draw:z-index="1" draw:name="Text Frame 4" draw:style-name="gr1" draw:text-style-name="P1" svg:width="11.315cm" svg:height="5.432cm" svg:x="0.001cm" svg:y="0.028cm">
              <draw:text-box>
                <text:p><text:span text:style-name="T1">Used microbalance to weigh 10ml sample of fluid, added using precision digital pipette. Added 10x 10ml in total to plastic sample bottle and weighed result (after Tare-ing empty bottle weight).</text:span></text:p>
                <text:p><text:span text:style-name="T1"/></text:p>
                <text:p><text:span text:style-name="T1">Used bottle sampler to sample 15ml pumped flush + 40ml pumped sample.</text:span></text:p>
                <text:p><text:span text:style-name="T1"/></text:p>
                <text:p><text:span text:style-name="T1">Measured final weight of bottle+remaining fluid.</text:span></text:p>
                <text:p><text:span text:style-name="T1"/></text:p>
              </draw:text-box>
            </draw:frame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Total Fluid</text:p>
          </table:table-cell>
          <table:table-cell/>
          <table:table-cell table:style-name="ce47" table:formula="of:=[.L28]+[.L29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luid Weight Taken</text:p>
          </table:table-cell>
          <table:table-cell/>
          <table:table-cell table:style-name="ce82" table:formula="of:=[.L27]-[.L31]" office:value-type="float" office:value="46.869" calcext:value-type="float">
            <text:p>46.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160" table:formula="of:=[.L32]/[.L26]*10" office:value-type="float" office:value="55.6705071861266" calcext:value-type="float">
            <text:p>55.67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Difference</text:p>
          </table:table-cell>
          <table:table-cell/>
          <table:table-cell table:style-name="ce84" table:formula="of:=[.L33]/[.L30]-1" office:value-type="percentage" office:value="0.0121910397477569" calcext:value-type="percentage">
            <text:p>1.22%</text:p>
          </table:table-cell>
          <table:table-cell table:number-columns-repeated="1012"/>
        </table:table-row>
      </table:table>
      <table:table table:name="Annex D Resolution" table:style-name="ta1">
        <table:shapes>
          <draw:frame draw:z-index="0" draw:style-name="gr3" draw:text-style-name="P2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4" table:number-columns-repeated="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1" table:default-cell-style-name="Default"/>
        <table:table-row table:style-name="ro9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2">
          <table:table-cell office:value-type="string" calcext:value-type="string">
            <text:p>Date</text:p>
          </table:table-cell>
          <table:table-cell table:style-name="ce55" office:value-type="date" office:date-value="2025-02-12" calcext:value-type="date">
            <text:p>2025-02-12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mware</text:p>
          </table:table-cell>
          <table:table-cell office:value-type="float" office:value="4.32" calcext:value-type="float">
            <text:p>4.3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Concentration / 100ml</text:p>
          </table:table-cell>
          <table:table-cell table:style-name="ce22" table:formula="of:=[.A17]" office:value-type="float" office:value="206060.530667392" calcext:value-type="float">
            <text:p>206061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2" office:value-type="float" office:value="200000" calcext:value-type="float">
            <text:p>2.00E+005</text:p>
          </table:table-cell>
          <table:table-cell table:style-name="ce11"/>
          <table:table-cell table:style-name="ce11" office:value-type="string" calcext:value-type="string">
            <text:p>Target concentration per 100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3" table:formula="of:=[.A12]/[.A11]*10" office:value-type="float" office:value="1.16685949137408" calcext:value-type="float">
            <text:p>1.17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4" office:value-type="float" office:value="11.72" calcext:value-type="float">
            <text:p>11.7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3" table:formula="of:=[.A14]*[.A13]" office:value-type="float" office:value="13.6755932389042" calcext:value-type="float">
            <text:p>13.6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4" office:value-type="float" office:value="14.09" calcext:value-type="float">
            <text:p>14.0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22" table:formula="of:=[.A16]/[.A15]*[.A12]" office:value-type="float" office:value="206060.530667392" calcext:value-type="float">
            <text:p>206061</text:p>
          </table:table-cell>
          <table:table-cell table:style-name="ce11" office:value-type="string" calcext:value-type="string">
            <text:p>N/100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1" table:formula="of:=SUM([.M200:.M1000])" office:value-type="float" office:value="161456" calcext:value-type="float">
            <text:p>161456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MAX([.$N$2:.$N$1000])" office:value-type="float" office:value="1104.625" calcext:value-type="float">
            <text:p>1104.63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MATCH([.A23]; [.N3:.N1000]; 0)" office:value-type="float" office:value="537" calcext:value-type="float">
            <text:p>537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MAX([.$A$23])/2" office:value-type="float" office:value="552.3125" calcext:value-type="float">
            <text:p>552.31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MATCH([.A25]; [.N2:.N1000]; 1)" office:value-type="float" office:value="477" calcext:value-type="float">
            <text:p>477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INDEX([.L2:.L1000];[.A26])" office:value-type="float" office:value="476" calcext:value-type="float">
            <text:p>476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[.A24]-[.A27]" office:value-type="float" office:value="61" calcext:value-type="float">
            <text:p>61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[.A28]*2" office:value-type="float" office:value="122" calcext:value-type="float">
            <text:p>122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 table:formula="of:=[.A29] / (2 * SQRT(2 * LN(2)))" office:value-type="float" office:value="51.8086298175692" calcext:value-type="float">
            <text:p>51.81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68" table:formula="of:=[.A30]/[.A24]" office:value-type="percentage" office:value="0.0964778953772238" calcext:value-type="percentage">
            <text:p>9.65%</text:p>
          </table:table-cell>
          <table:table-cell table:style-name="ce171" office:value-type="string" calcext:value-type="string">
            <text:p>CV<text:span text:style-name="T7">SIGNAL</text:span><text:span text:style-name="T11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style-name="ce169" table:formula="of:=[.A31]/2" office:value-type="percentage" office:value="0.0482389476886119" calcext:value-type="percentage">
            <text:p>4.82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M99:.M10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AVERAGE([.M100:.M10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AVERAGE([.M101:.M10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AVERAGE([.M102:.M10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AVERAGE([.M103:.M11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AVERAGE([.M104:.M11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AVERAGE([.M105:.M11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AVERAGE([.M106:.M11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AVERAGE([.M107:.M11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AVERAGE([.M108:.M11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AVERAGE([.M109:.M11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AVERAGE([.M110:.M11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AVERAGE([.M111:.M11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AVERAGE([.M112:.M11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AVERAGE([.M113:.M12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AVERAGE([.M114:.M12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AVERAGE([.M115:.M12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AVERAGE([.M116:.M12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AVERAGE([.M117:.M12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AVERAGE([.M118:.M12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AVERAGE([.M119:.M12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AVERAGE([.M120:.M12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AVERAGE([.M121:.M12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AVERAGE([.M122:.M12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AVERAGE([.M123:.M13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AVERAGE([.M124:.M13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AVERAGE([.M125:.M13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AVERAGE([.M126:.M13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AVERAGE([.M127:.M13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AVERAGE([.M128:.M13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AVERAGE([.M129:.M13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AVERAGE([.M130:.M13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AVERAGE([.M131:.M13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AVERAGE([.M132:.M13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AVERAGE([.M133:.M14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AVERAGE([.M134:.M14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AVERAGE([.M135:.M14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AVERAGE([.M136:.M14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AVERAGE([.M137:.M14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AVERAGE([.M138:.M14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AVERAGE([.M139:.M14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AVERAGE([.M140:.M14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AVERAGE([.M141:.M14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AVERAGE([.M142:.M14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AVERAGE([.M143:.M15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AVERAGE([.M144:.M15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AVERAGE([.M145:.M15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AVERAGE([.M146:.M15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AVERAGE([.M147:.M15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AVERAGE([.M148:.M15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M149:.M15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AVERAGE([.M150:.M15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AVERAGE([.M151:.M15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AVERAGE([.M152:.M15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AVERAGE([.M153:.M16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AVERAGE([.M154:.M16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AVERAGE([.M155:.M16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AVERAGE([.M156:.M16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AVERAGE([.M157:.M16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AVERAGE([.M158:.M16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AVERAGE([.M159:.M16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AVERAGE([.M160:.M16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AVERAGE([.M161:.M16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AVERAGE([.M162:.M16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AVERAGE([.M163:.M17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AVERAGE([.M164:.M17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AVERAGE([.M165:.M17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AVERAGE([.M166:.M17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M167:.M17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AVERAGE([.M168:.M17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AVERAGE([.M169:.M17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AVERAGE([.M170:.M17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AVERAGE([.M171:.M17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AVERAGE([.M172:.M17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AVERAGE([.M173:.M18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AVERAGE([.M174:.M18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AVERAGE([.M175:.M18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AVERAGE([.M176:.M18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AVERAGE([.M177:.M18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AVERAGE([.M178:.M18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AVERAGE([.M179:.M18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AVERAGE([.M180:.M18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AVERAGE([.M181:.M18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AVERAGE([.M182:.M18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AVERAGE([.M183:.M19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AVERAGE([.M184:.M19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AVERAGE([.M185:.M192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AVERAGE([.M186:.M193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AVERAGE([.M187:.M194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AVERAGE([.M188:.M195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AVERAGE([.M189:.M196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AVERAGE([.M190:.M197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AVERAGE([.M191:.M198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AVERAGE([.M192:.M199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AVERAGE([.M193:.M200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AVERAGE([.M194:.M201])" office:value-type="float" office:value="0" calcext:value-type="float">
            <text:p>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AVERAGE([.M195:.M202])" office:value-type="float" office:value="0.125" calcext:value-type="float">
            <text:p>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M196:.M203])" office:value-type="float" office:value="0.375" calcext:value-type="float">
            <text:p>0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AVERAGE([.M197:.M204])" office:value-type="float" office:value="1" calcext:value-type="float">
            <text:p>1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AVERAGE([.M198:.M205])" office:value-type="float" office:value="1.375" calcext:value-type="float">
            <text:p>1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AVERAGE([.M199:.M206])" office:value-type="float" office:value="1.875" calcext:value-type="float">
            <text:p>1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AVERAGE([.M200:.M207])" office:value-type="float" office:value="2.375" calcext:value-type="float">
            <text:p>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formula="of:=AVERAGE([.M201:.M208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table:formula="of:=AVERAGE([.M202:.M209])" office:value-type="float" office:value="3.5" calcext:value-type="float">
            <text:p>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formula="of:=AVERAGE([.M203:.M210])" office:value-type="float" office:value="3.875" calcext:value-type="float">
            <text:p>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formula="of:=AVERAGE([.M204:.M211])" office:value-type="float" office:value="4.875" calcext:value-type="float">
            <text:p>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AVERAGE([.M205:.M212])" office:value-type="float" office:value="4.5" calcext:value-type="float">
            <text:p>4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AVERAGE([.M206:.M213])" office:value-type="float" office:value="4.75" calcext:value-type="float">
            <text:p>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formula="of:=AVERAGE([.M207:.M214])" office:value-type="float" office:value="4.75" calcext:value-type="float">
            <text:p>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table:formula="of:=AVERAGE([.M208:.M215])" office:value-type="float" office:value="5.5" calcext:value-type="float">
            <text:p>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formula="of:=AVERAGE([.M209:.M216])" office:value-type="float" office:value="5.25" calcext:value-type="float">
            <text:p>5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AVERAGE([.M210:.M217])" office:value-type="float" office:value="5.25" calcext:value-type="float">
            <text:p>5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table:formula="of:=AVERAGE([.M211:.M218])" office:value-type="float" office:value="5.125" calcext:value-type="float">
            <text:p>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table:formula="of:=AVERAGE([.M212:.M219])" office:value-type="float" office:value="4.125" calcext:value-type="float">
            <text:p>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formula="of:=AVERAGE([.M213:.M220])" office:value-type="float" office:value="4.75" calcext:value-type="float">
            <text:p>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formula="of:=AVERAGE([.M214:.M221])" office:value-type="float" office:value="4.875" calcext:value-type="float">
            <text:p>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formula="of:=AVERAGE([.M215:.M222])" office:value-type="float" office:value="5.125" calcext:value-type="float">
            <text:p>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formula="of:=AVERAGE([.M216:.M223])" office:value-type="float" office:value="4.5" calcext:value-type="float">
            <text:p>4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table:formula="of:=AVERAGE([.M217:.M224])" office:value-type="float" office:value="4.875" calcext:value-type="float">
            <text:p>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table:formula="of:=AVERAGE([.M218:.M225])" office:value-type="float" office:value="4.75" calcext:value-type="float">
            <text:p>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formula="of:=AVERAGE([.M219:.M226])" office:value-type="float" office:value="4.875" calcext:value-type="float">
            <text:p>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AVERAGE([.M220:.M227])" office:value-type="float" office:value="5" calcext:value-type="float">
            <text:p>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formula="of:=AVERAGE([.M221:.M228])" office:value-type="float" office:value="4.625" calcext:value-type="float">
            <text:p>4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formula="of:=AVERAGE([.M222:.M229])" office:value-type="float" office:value="4.25" calcext:value-type="float">
            <text:p>4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table:formula="of:=AVERAGE([.M223:.M230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AVERAGE([.M224:.M231])" office:value-type="float" office:value="3.625" calcext:value-type="float">
            <text:p>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formula="of:=AVERAGE([.M225:.M232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formula="of:=AVERAGE([.M226:.M233])" office:value-type="float" office:value="3.375" calcext:value-type="float">
            <text:p>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table:formula="of:=AVERAGE([.M227:.M234])" office:value-type="float" office:value="3.5" calcext:value-type="float">
            <text:p>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formula="of:=AVERAGE([.M228:.M235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formula="of:=AVERAGE([.M229:.M236])" office:value-type="float" office:value="3.375" calcext:value-type="float">
            <text:p>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formula="of:=AVERAGE([.M230:.M237])" office:value-type="float" office:value="3.5" calcext:value-type="float">
            <text:p>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table:formula="of:=AVERAGE([.M231:.M238])" office:value-type="float" office:value="3.25" calcext:value-type="float">
            <text:p>3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AVERAGE([.M232:.M239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table:formula="of:=AVERAGE([.M233:.M240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formula="of:=AVERAGE([.M234:.M241])" office:value-type="float" office:value="2.5" calcext:value-type="float">
            <text:p>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AVERAGE([.M235:.M242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formula="of:=AVERAGE([.M236:.M243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formula="of:=AVERAGE([.M237:.M244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AVERAGE([.M238:.M245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formula="of:=AVERAGE([.M239:.M246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formula="of:=AVERAGE([.M240:.M247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formula="of:=AVERAGE([.M241:.M248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formula="of:=AVERAGE([.M242:.M249])" office:value-type="float" office:value="4.125" calcext:value-type="float">
            <text:p>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table:formula="of:=AVERAGE([.M243:.M250])" office:value-type="float" office:value="3.625" calcext:value-type="float">
            <text:p>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table:formula="of:=AVERAGE([.M244:.M251])" office:value-type="float" office:value="3.375" calcext:value-type="float">
            <text:p>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formula="of:=AVERAGE([.M245:.M252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table:formula="of:=AVERAGE([.M246:.M253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formula="of:=AVERAGE([.M247:.M254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AVERAGE([.M248:.M255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AVERAGE([.M249:.M256])" office:value-type="float" office:value="3.25" calcext:value-type="float">
            <text:p>3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formula="of:=AVERAGE([.M250:.M257])" office:value-type="float" office:value="3.375" calcext:value-type="float">
            <text:p>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formula="of:=AVERAGE([.M251:.M258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table:formula="of:=AVERAGE([.M252:.M259])" office:value-type="float" office:value="3.625" calcext:value-type="float">
            <text:p>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AVERAGE([.M253:.M260])" office:value-type="float" office:value="4.375" calcext:value-type="float">
            <text:p>4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AVERAGE([.M254:.M261])" office:value-type="float" office:value="4.375" calcext:value-type="float">
            <text:p>4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AVERAGE([.M255:.M262])" office:value-type="float" office:value="4.625" calcext:value-type="float">
            <text:p>4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formula="of:=AVERAGE([.M256:.M263])" office:value-type="float" office:value="4.75" calcext:value-type="float">
            <text:p>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table:formula="of:=AVERAGE([.M257:.M264])" office:value-type="float" office:value="4.25" calcext:value-type="float">
            <text:p>4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formula="of:=AVERAGE([.M258:.M265])" office:value-type="float" office:value="3.875" calcext:value-type="float">
            <text:p>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formula="of:=AVERAGE([.M259:.M266])" office:value-type="float" office:value="4.5" calcext:value-type="float">
            <text:p>4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formula="of:=AVERAGE([.M260:.M267])" office:value-type="float" office:value="4.125" calcext:value-type="float">
            <text:p>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table:formula="of:=AVERAGE([.M261:.M268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formula="of:=AVERAGE([.M262:.M269])" office:value-type="float" office:value="3.625" calcext:value-type="float">
            <text:p>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table:formula="of:=AVERAGE([.M263:.M270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formula="of:=AVERAGE([.M264:.M271])" office:value-type="float" office:value="2.375" calcext:value-type="float">
            <text:p>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table:formula="of:=AVERAGE([.M265:.M272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formula="of:=AVERAGE([.M266:.M273])" office:value-type="float" office:value="2.625" calcext:value-type="float">
            <text:p>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AVERAGE([.M267:.M274])" office:value-type="float" office:value="2.625" calcext:value-type="float">
            <text:p>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formula="of:=AVERAGE([.M268:.M275])" office:value-type="float" office:value="2.5" calcext:value-type="float">
            <text:p>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formula="of:=AVERAGE([.M269:.M276])" office:value-type="float" office:value="2.5" calcext:value-type="float">
            <text:p>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formula="of:=AVERAGE([.M270:.M277])" office:value-type="float" office:value="2.5" calcext:value-type="float">
            <text:p>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formula="of:=AVERAGE([.M271:.M278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formula="of:=AVERAGE([.M272:.M279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table:formula="of:=AVERAGE([.M273:.M280])" office:value-type="float" office:value="2.5" calcext:value-type="float">
            <text:p>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table:formula="of:=AVERAGE([.M274:.M281])" office:value-type="float" office:value="2.5" calcext:value-type="float">
            <text:p>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table:formula="of:=AVERAGE([.M275:.M282])" office:value-type="float" office:value="2.125" calcext:value-type="float">
            <text:p>2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table:formula="of:=AVERAGE([.M276:.M283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AVERAGE([.M277:.M284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formula="of:=AVERAGE([.M278:.M285])" office:value-type="float" office:value="2.625" calcext:value-type="float">
            <text:p>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formula="of:=AVERAGE([.M279:.M286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AVERAGE([.M280:.M287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formula="of:=AVERAGE([.M281:.M288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AVERAGE([.M282:.M289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AVERAGE([.M283:.M290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table:formula="of:=AVERAGE([.M284:.M291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formula="of:=AVERAGE([.M285:.M292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table:formula="of:=AVERAGE([.M286:.M293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AVERAGE([.M287:.M294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AVERAGE([.M288:.M295])" office:value-type="float" office:value="2.5" calcext:value-type="float">
            <text:p>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AVERAGE([.M289:.M296])" office:value-type="float" office:value="2.625" calcext:value-type="float">
            <text:p>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table:formula="of:=AVERAGE([.M290:.M297])" office:value-type="float" office:value="2.625" calcext:value-type="float">
            <text:p>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AVERAGE([.M291:.M298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formula="of:=AVERAGE([.M292:.M299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formula="of:=AVERAGE([.M293:.M300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formula="of:=AVERAGE([.M294:.M301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formula="of:=AVERAGE([.M295:.M302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formula="of:=AVERAGE([.M296:.M303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formula="of:=AVERAGE([.M297:.M304])" office:value-type="float" office:value="3.125" calcext:value-type="float">
            <text:p>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formula="of:=AVERAGE([.M298:.M305])" office:value-type="float" office:value="3.5" calcext:value-type="float">
            <text:p>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AVERAGE([.M299:.M306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formula="of:=AVERAGE([.M300:.M307])" office:value-type="float" office:value="3.625" calcext:value-type="float">
            <text:p>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AVERAGE([.M301:.M308])" office:value-type="float" office:value="3.5" calcext:value-type="float">
            <text:p>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formula="of:=AVERAGE([.M302:.M309])" office:value-type="float" office:value="3.5" calcext:value-type="float">
            <text:p>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table:formula="of:=AVERAGE([.M303:.M310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AVERAGE([.M304:.M311])" office:value-type="float" office:value="4.125" calcext:value-type="float">
            <text:p>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formula="of:=AVERAGE([.M305:.M312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formula="of:=AVERAGE([.M306:.M313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formula="of:=AVERAGE([.M307:.M314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table:formula="of:=AVERAGE([.M308:.M315])" office:value-type="float" office:value="3.875" calcext:value-type="float">
            <text:p>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formula="of:=AVERAGE([.M309:.M316])" office:value-type="float" office:value="3.5" calcext:value-type="float">
            <text:p>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formula="of:=AVERAGE([.M310:.M317])" office:value-type="float" office:value="3.375" calcext:value-type="float">
            <text:p>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table:formula="of:=AVERAGE([.M311:.M318])" office:value-type="float" office:value="3" calcext:value-type="float">
            <text:p>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table:formula="of:=AVERAGE([.M312:.M319])" office:value-type="float" office:value="3.25" calcext:value-type="float">
            <text:p>3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formula="of:=AVERAGE([.M313:.M320])" office:value-type="float" office:value="3.375" calcext:value-type="float">
            <text:p>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formula="of:=AVERAGE([.M314:.M321])" office:value-type="float" office:value="3.25" calcext:value-type="float">
            <text:p>3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formula="of:=AVERAGE([.M315:.M322])" office:value-type="float" office:value="2.75" calcext:value-type="float">
            <text:p>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table:formula="of:=AVERAGE([.M316:.M323])" office:value-type="float" office:value="2.875" calcext:value-type="float">
            <text:p>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formula="of:=AVERAGE([.M317:.M324])" office:value-type="float" office:value="3.375" calcext:value-type="float">
            <text:p>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table:formula="of:=AVERAGE([.M318:.M325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formula="of:=AVERAGE([.M319:.M326])" office:value-type="float" office:value="3.625" calcext:value-type="float">
            <text:p>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table:formula="of:=AVERAGE([.M320:.M327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table:formula="of:=AVERAGE([.M321:.M328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formula="of:=AVERAGE([.M322:.M329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formula="of:=AVERAGE([.M323:.M330])" office:value-type="float" office:value="3.875" calcext:value-type="float">
            <text:p>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table:formula="of:=AVERAGE([.M324:.M331])" office:value-type="float" office:value="4.125" calcext:value-type="float">
            <text:p>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table:formula="of:=AVERAGE([.M325:.M332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formula="of:=AVERAGE([.M326:.M333])" office:value-type="float" office:value="3.875" calcext:value-type="float">
            <text:p>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formula="of:=AVERAGE([.M327:.M334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table:formula="of:=AVERAGE([.M328:.M335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table:formula="of:=AVERAGE([.M329:.M336])" office:value-type="float" office:value="4.125" calcext:value-type="float">
            <text:p>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table:formula="of:=AVERAGE([.M330:.M337])" office:value-type="float" office:value="4.125" calcext:value-type="float">
            <text:p>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table:formula="of:=AVERAGE([.M331:.M338])" office:value-type="float" office:value="4.25" calcext:value-type="float">
            <text:p>4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table:formula="of:=AVERAGE([.M332:.M339])" office:value-type="float" office:value="3.75" calcext:value-type="float">
            <text:p>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table:formula="of:=AVERAGE([.M333:.M340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formula="of:=AVERAGE([.M334:.M341])" office:value-type="float" office:value="3.625" calcext:value-type="float">
            <text:p>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formula="of:=AVERAGE([.M335:.M342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formula="of:=AVERAGE([.M336:.M343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table:formula="of:=AVERAGE([.M337:.M344])" office:value-type="float" office:value="4" calcext:value-type="float">
            <text:p>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AVERAGE([.M338:.M345])" office:value-type="float" office:value="4.25" calcext:value-type="float">
            <text:p>4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table:formula="of:=AVERAGE([.M339:.M346])" office:value-type="float" office:value="4.5" calcext:value-type="float">
            <text:p>4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table:formula="of:=AVERAGE([.M340:.M347])" office:value-type="float" office:value="4.875" calcext:value-type="float">
            <text:p>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table:formula="of:=AVERAGE([.M341:.M348])" office:value-type="float" office:value="4.75" calcext:value-type="float">
            <text:p>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table:formula="of:=AVERAGE([.M342:.M349])" office:value-type="float" office:value="5.375" calcext:value-type="float">
            <text:p>5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table:formula="of:=AVERAGE([.M343:.M350])" office:value-type="float" office:value="5.625" calcext:value-type="float">
            <text:p>5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AVERAGE([.M344:.M351])" office:value-type="float" office:value="6" calcext:value-type="float">
            <text:p>6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table:formula="of:=AVERAGE([.M345:.M352])" office:value-type="float" office:value="5.625" calcext:value-type="float">
            <text:p>5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table:formula="of:=AVERAGE([.M346:.M353])" office:value-type="float" office:value="5.5" calcext:value-type="float">
            <text:p>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table:formula="of:=AVERAGE([.M347:.M354])" office:value-type="float" office:value="5.5" calcext:value-type="float">
            <text:p>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table:formula="of:=AVERAGE([.M348:.M355])" office:value-type="float" office:value="5.875" calcext:value-type="float">
            <text:p>5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formula="of:=AVERAGE([.M349:.M356])" office:value-type="float" office:value="5.875" calcext:value-type="float">
            <text:p>5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table:formula="of:=AVERAGE([.M350:.M357])" office:value-type="float" office:value="6.5" calcext:value-type="float">
            <text:p>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table:formula="of:=AVERAGE([.M351:.M358])" office:value-type="float" office:value="6.5" calcext:value-type="float">
            <text:p>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table:formula="of:=AVERAGE([.M352:.M359])" office:value-type="float" office:value="5.875" calcext:value-type="float">
            <text:p>5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table:formula="of:=AVERAGE([.M353:.M360])" office:value-type="float" office:value="7.125" calcext:value-type="float">
            <text:p>7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table:formula="of:=AVERAGE([.M354:.M361])" office:value-type="float" office:value="7.625" calcext:value-type="float">
            <text:p>7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table:formula="of:=AVERAGE([.M355:.M362])" office:value-type="float" office:value="8" calcext:value-type="float">
            <text:p>8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table:formula="of:=AVERAGE([.M356:.M363])" office:value-type="float" office:value="8" calcext:value-type="float">
            <text:p>8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table:formula="of:=AVERAGE([.M357:.M364])" office:value-type="float" office:value="8.5" calcext:value-type="float">
            <text:p>8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  <table:table-cell table:formula="of:=AVERAGE([.M358:.M365])" office:value-type="float" office:value="8.375" calcext:value-type="float">
            <text:p>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AVERAGE([.M359:.M366])" office:value-type="float" office:value="8.125" calcext:value-type="float">
            <text:p>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table:formula="of:=AVERAGE([.M360:.M367])" office:value-type="float" office:value="9.375" calcext:value-type="float">
            <text:p>9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9" calcext:value-type="float">
            <text:p>9</text:p>
          </table:table-cell>
          <table:table-cell table:formula="of:=AVERAGE([.M361:.M368])" office:value-type="float" office:value="9.25" calcext:value-type="float">
            <text:p>9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table:formula="of:=AVERAGE([.M362:.M369])" office:value-type="float" office:value="9.125" calcext:value-type="float">
            <text:p>9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table:formula="of:=AVERAGE([.M363:.M370])" office:value-type="float" office:value="9.5" calcext:value-type="float">
            <text:p>9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table:formula="of:=AVERAGE([.M364:.M371])" office:value-type="float" office:value="9.25" calcext:value-type="float">
            <text:p>9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table:formula="of:=AVERAGE([.M365:.M372])" office:value-type="float" office:value="9.5" calcext:value-type="float">
            <text:p>9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table:formula="of:=AVERAGE([.M366:.M373])" office:value-type="float" office:value="9.75" calcext:value-type="float">
            <text:p>9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table:formula="of:=AVERAGE([.M367:.M374])" office:value-type="float" office:value="10.875" calcext:value-type="float">
            <text:p>10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formula="of:=AVERAGE([.M368:.M375])" office:value-type="float" office:value="10.625" calcext:value-type="float">
            <text:p>10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table:formula="of:=AVERAGE([.M369:.M376])" office:value-type="float" office:value="10.25" calcext:value-type="float">
            <text:p>10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table:formula="of:=AVERAGE([.M370:.M377])" office:value-type="float" office:value="11.875" calcext:value-type="float">
            <text:p>11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table:formula="of:=AVERAGE([.M371:.M378])" office:value-type="float" office:value="13" calcext:value-type="float">
            <text:p>1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table:formula="of:=AVERAGE([.M372:.M379])" office:value-type="float" office:value="13.125" calcext:value-type="float">
            <text:p>1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table:formula="of:=AVERAGE([.M373:.M380])" office:value-type="float" office:value="14.375" calcext:value-type="float">
            <text:p>14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table:formula="of:=AVERAGE([.M374:.M381])" office:value-type="float" office:value="15.125" calcext:value-type="float">
            <text:p>1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formula="of:=AVERAGE([.M375:.M382])" office:value-type="float" office:value="15" calcext:value-type="float">
            <text:p>1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table:formula="of:=AVERAGE([.M376:.M383])" office:value-type="float" office:value="15.75" calcext:value-type="float">
            <text:p>15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21" calcext:value-type="float">
            <text:p>21</text:p>
          </table:table-cell>
          <table:table-cell table:formula="of:=AVERAGE([.M377:.M384])" office:value-type="float" office:value="17.625" calcext:value-type="float">
            <text:p>17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17" calcext:value-type="float">
            <text:p>17</text:p>
          </table:table-cell>
          <table:table-cell table:formula="of:=AVERAGE([.M378:.M385])" office:value-type="float" office:value="17.125" calcext:value-type="float">
            <text:p>17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 table:formula="of:=AVERAGE([.M379:.M386])" office:value-type="float" office:value="16.375" calcext:value-type="float">
            <text:p>16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  <table:table-cell table:formula="of:=AVERAGE([.M380:.M387])" office:value-type="float" office:value="18.75" calcext:value-type="float">
            <text:p>18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25" calcext:value-type="float">
            <text:p>25</text:p>
          </table:table-cell>
          <table:table-cell table:formula="of:=AVERAGE([.M381:.M388])" office:value-type="float" office:value="18.5" calcext:value-type="float">
            <text:p>18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table:formula="of:=AVERAGE([.M382:.M389])" office:value-type="float" office:value="19.375" calcext:value-type="float">
            <text:p>19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table:formula="of:=AVERAGE([.M383:.M390])" office:value-type="float" office:value="20.5" calcext:value-type="float">
            <text:p>20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26" calcext:value-type="float">
            <text:p>26</text:p>
          </table:table-cell>
          <table:table-cell table:formula="of:=AVERAGE([.M384:.M391])" office:value-type="float" office:value="20.625" calcext:value-type="float">
            <text:p>20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19" calcext:value-type="float">
            <text:p>19</text:p>
          </table:table-cell>
          <table:table-cell table:formula="of:=AVERAGE([.M385:.M392])" office:value-type="float" office:value="20.75" calcext:value-type="float">
            <text:p>20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24" calcext:value-type="float">
            <text:p>24</text:p>
          </table:table-cell>
          <table:table-cell table:formula="of:=AVERAGE([.M386:.M393])" office:value-type="float" office:value="21.625" calcext:value-type="float">
            <text:p>21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22" calcext:value-type="float">
            <text:p>22</text:p>
          </table:table-cell>
          <table:table-cell table:formula="of:=AVERAGE([.M387:.M394])" office:value-type="float" office:value="23.75" calcext:value-type="float">
            <text:p>2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table:formula="of:=AVERAGE([.M388:.M395])" office:value-type="float" office:value="24.125" calcext:value-type="float">
            <text:p>2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table:formula="of:=AVERAGE([.M389:.M396])" office:value-type="float" office:value="27.125" calcext:value-type="float">
            <text:p>27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24" calcext:value-type="float">
            <text:p>24</text:p>
          </table:table-cell>
          <table:table-cell table:formula="of:=AVERAGE([.M390:.M397])" office:value-type="float" office:value="27.125" calcext:value-type="float">
            <text:p>27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31" calcext:value-type="float">
            <text:p>31</text:p>
          </table:table-cell>
          <table:table-cell table:formula="of:=AVERAGE([.M391:.M398])" office:value-type="float" office:value="28.625" calcext:value-type="float">
            <text:p>28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29" calcext:value-type="float">
            <text:p>29</text:p>
          </table:table-cell>
          <table:table-cell table:formula="of:=AVERAGE([.M392:.M399])" office:value-type="float" office:value="30.25" calcext:value-type="float">
            <text:p>30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43" calcext:value-type="float">
            <text:p>43</text:p>
          </table:table-cell>
          <table:table-cell table:formula="of:=AVERAGE([.M393:.M400])" office:value-type="float" office:value="32.375" calcext:value-type="float">
            <text:p>3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table:formula="of:=AVERAGE([.M394:.M401])" office:value-type="float" office:value="35" calcext:value-type="float">
            <text:p>3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34" calcext:value-type="float">
            <text:p>34</text:p>
          </table:table-cell>
          <table:table-cell table:formula="of:=AVERAGE([.M395:.M402])" office:value-type="float" office:value="35.125" calcext:value-type="float">
            <text:p>3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31" calcext:value-type="float">
            <text:p>31</text:p>
          </table:table-cell>
          <table:table-cell table:formula="of:=AVERAGE([.M396:.M403])" office:value-type="float" office:value="35.375" calcext:value-type="float">
            <text:p>35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43" calcext:value-type="float">
            <text:p>43</text:p>
          </table:table-cell>
          <table:table-cell table:formula="of:=AVERAGE([.M397:.M404])" office:value-type="float" office:value="35.375" calcext:value-type="float">
            <text:p>35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45" calcext:value-type="float">
            <text:p>45</text:p>
          </table:table-cell>
          <table:table-cell table:formula="of:=AVERAGE([.M398:.M405])" office:value-type="float" office:value="38.375" calcext:value-type="float">
            <text:p>3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table:formula="of:=AVERAGE([.M399:.M406])" office:value-type="float" office:value="38.875" calcext:value-type="float">
            <text:p>38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31" calcext:value-type="float">
            <text:p>31</text:p>
          </table:table-cell>
          <table:table-cell table:formula="of:=AVERAGE([.M400:.M407])" office:value-type="float" office:value="43.125" calcext:value-type="float">
            <text:p>4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43" calcext:value-type="float">
            <text:p>43</text:p>
          </table:table-cell>
          <table:table-cell table:formula="of:=AVERAGE([.M401:.M408])" office:value-type="float" office:value="44" calcext:value-type="float">
            <text:p>4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48" calcext:value-type="float">
            <text:p>48</text:p>
          </table:table-cell>
          <table:table-cell table:formula="of:=AVERAGE([.M402:.M409])" office:value-type="float" office:value="46.5" calcext:value-type="float">
            <text:p>4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38" calcext:value-type="float">
            <text:p>38</text:p>
          </table:table-cell>
          <table:table-cell table:formula="of:=AVERAGE([.M403:.M410])" office:value-type="float" office:value="50.5" calcext:value-type="float">
            <text:p>50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65" calcext:value-type="float">
            <text:p>65</text:p>
          </table:table-cell>
          <table:table-cell table:formula="of:=AVERAGE([.M404:.M411])" office:value-type="float" office:value="55.125" calcext:value-type="float">
            <text:p>5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table:formula="of:=AVERAGE([.M405:.M412])" office:value-type="float" office:value="57.75" calcext:value-type="float">
            <text:p>57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65" calcext:value-type="float">
            <text:p>65</text:p>
          </table:table-cell>
          <table:table-cell table:formula="of:=AVERAGE([.M406:.M413])" office:value-type="float" office:value="59.125" calcext:value-type="float">
            <text:p>59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 table:formula="of:=AVERAGE([.M407:.M414])" office:value-type="float" office:value="59.625" calcext:value-type="float">
            <text:p>59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68" calcext:value-type="float">
            <text:p>68</text:p>
          </table:table-cell>
          <table:table-cell table:formula="of:=AVERAGE([.M408:.M415])" office:value-type="float" office:value="58.75" calcext:value-type="float">
            <text:p>58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 table:formula="of:=AVERAGE([.M409:.M416])" office:value-type="float" office:value="60.875" calcext:value-type="float">
            <text:p>60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59" calcext:value-type="float">
            <text:p>59</text:p>
          </table:table-cell>
          <table:table-cell table:formula="of:=AVERAGE([.M410:.M417])" office:value-type="float" office:value="61" calcext:value-type="float">
            <text:p>61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  <table:table-cell table:formula="of:=AVERAGE([.M411:.M418])" office:value-type="float" office:value="61.625" calcext:value-type="float">
            <text:p>61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58" calcext:value-type="float">
            <text:p>58</text:p>
          </table:table-cell>
          <table:table-cell table:formula="of:=AVERAGE([.M412:.M419])" office:value-type="float" office:value="63.625" calcext:value-type="float">
            <text:p>6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67" calcext:value-type="float">
            <text:p>67</text:p>
          </table:table-cell>
          <table:table-cell table:formula="of:=AVERAGE([.M413:.M420])" office:value-type="float" office:value="67.875" calcext:value-type="float">
            <text:p>67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66" calcext:value-type="float">
            <text:p>66</text:p>
          </table:table-cell>
          <table:table-cell table:formula="of:=AVERAGE([.M414:.M421])" office:value-type="float" office:value="71.375" calcext:value-type="float">
            <text:p>71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69" calcext:value-type="float">
            <text:p>69</text:p>
          </table:table-cell>
          <table:table-cell table:formula="of:=AVERAGE([.M415:.M422])" office:value-type="float" office:value="77.25" calcext:value-type="float">
            <text:p>77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84" calcext:value-type="float">
            <text:p>84</text:p>
          </table:table-cell>
          <table:table-cell table:formula="of:=AVERAGE([.M416:.M423])" office:value-type="float" office:value="81.875" calcext:value-type="float">
            <text:p>81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98" calcext:value-type="float">
            <text:p>98</text:p>
          </table:table-cell>
          <table:table-cell table:formula="of:=AVERAGE([.M417:.M424])" office:value-type="float" office:value="87.125" calcext:value-type="float">
            <text:p>87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87" calcext:value-type="float">
            <text:p>87</text:p>
          </table:table-cell>
          <table:table-cell table:formula="of:=AVERAGE([.M418:.M425])" office:value-type="float" office:value="92.625" calcext:value-type="float">
            <text:p>9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formula="of:=AVERAGE([.M419:.M426])" office:value-type="float" office:value="96.125" calcext:value-type="float">
            <text:p>96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95" calcext:value-type="float">
            <text:p>95</text:p>
          </table:table-cell>
          <table:table-cell table:formula="of:=AVERAGE([.M420:.M427])" office:value-type="float" office:value="99.875" calcext:value-type="float">
            <text:p>99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109" calcext:value-type="float">
            <text:p>109</text:p>
          </table:table-cell>
          <table:table-cell table:formula="of:=AVERAGE([.M421:.M428])" office:value-type="float" office:value="102.125" calcext:value-type="float">
            <text:p>102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110" calcext:value-type="float">
            <text:p>110</text:p>
          </table:table-cell>
          <table:table-cell table:formula="of:=AVERAGE([.M422:.M429])" office:value-type="float" office:value="104.75" calcext:value-type="float">
            <text:p>10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97" calcext:value-type="float">
            <text:p>97</text:p>
          </table:table-cell>
          <table:table-cell table:formula="of:=AVERAGE([.M423:.M430])" office:value-type="float" office:value="109.625" calcext:value-type="float">
            <text:p>109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114" calcext:value-type="float">
            <text:p>114</text:p>
          </table:table-cell>
          <table:table-cell table:formula="of:=AVERAGE([.M424:.M431])" office:value-type="float" office:value="113.875" calcext:value-type="float">
            <text:p>11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116" calcext:value-type="float">
            <text:p>116</text:p>
          </table:table-cell>
          <table:table-cell table:formula="of:=AVERAGE([.M425:.M432])" office:value-type="float" office:value="120.5" calcext:value-type="float">
            <text:p>120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108" calcext:value-type="float">
            <text:p>108</text:p>
          </table:table-cell>
          <table:table-cell table:formula="of:=AVERAGE([.M426:.M433])" office:value-type="float" office:value="124.5" calcext:value-type="float">
            <text:p>124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128" calcext:value-type="float">
            <text:p>128</text:p>
          </table:table-cell>
          <table:table-cell table:formula="of:=AVERAGE([.M427:.M434])" office:value-type="float" office:value="131.5" calcext:value-type="float">
            <text:p>131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129" calcext:value-type="float">
            <text:p>129</text:p>
          </table:table-cell>
          <table:table-cell table:formula="of:=AVERAGE([.M428:.M435])" office:value-type="float" office:value="133.625" calcext:value-type="float">
            <text:p>13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162" calcext:value-type="float">
            <text:p>162</text:p>
          </table:table-cell>
          <table:table-cell table:formula="of:=AVERAGE([.M429:.M436])" office:value-type="float" office:value="137.75" calcext:value-type="float">
            <text:p>137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142" calcext:value-type="float">
            <text:p>142</text:p>
          </table:table-cell>
          <table:table-cell table:formula="of:=AVERAGE([.M430:.M437])" office:value-type="float" office:value="143.625" calcext:value-type="float">
            <text:p>14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153" calcext:value-type="float">
            <text:p>153</text:p>
          </table:table-cell>
          <table:table-cell table:formula="of:=AVERAGE([.M431:.M438])" office:value-type="float" office:value="150.5" calcext:value-type="float">
            <text:p>150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131" calcext:value-type="float">
            <text:p>131</text:p>
          </table:table-cell>
          <table:table-cell table:formula="of:=AVERAGE([.M432:.M439])" office:value-type="float" office:value="155.875" calcext:value-type="float">
            <text:p>155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149" calcext:value-type="float">
            <text:p>149</text:p>
          </table:table-cell>
          <table:table-cell table:formula="of:=AVERAGE([.M433:.M440])" office:value-type="float" office:value="159.75" calcext:value-type="float">
            <text:p>159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155" calcext:value-type="float">
            <text:p>155</text:p>
          </table:table-cell>
          <table:table-cell table:formula="of:=AVERAGE([.M434:.M441])" office:value-type="float" office:value="165.5" calcext:value-type="float">
            <text:p>16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183" calcext:value-type="float">
            <text:p>183</text:p>
          </table:table-cell>
          <table:table-cell table:formula="of:=AVERAGE([.M435:.M442])" office:value-type="float" office:value="168.75" calcext:value-type="float">
            <text:p>168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172" calcext:value-type="float">
            <text:p>172</text:p>
          </table:table-cell>
          <table:table-cell table:formula="of:=AVERAGE([.M436:.M443])" office:value-type="float" office:value="176.25" calcext:value-type="float">
            <text:p>176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193" calcext:value-type="float">
            <text:p>193</text:p>
          </table:table-cell>
          <table:table-cell table:formula="of:=AVERAGE([.M437:.M444])" office:value-type="float" office:value="185.5" calcext:value-type="float">
            <text:p>18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188" calcext:value-type="float">
            <text:p>188</text:p>
          </table:table-cell>
          <table:table-cell table:formula="of:=AVERAGE([.M438:.M445])" office:value-type="float" office:value="190.125" calcext:value-type="float">
            <text:p>19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179" calcext:value-type="float">
            <text:p>179</text:p>
          </table:table-cell>
          <table:table-cell table:formula="of:=AVERAGE([.M439:.M446])" office:value-type="float" office:value="195.5" calcext:value-type="float">
            <text:p>19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191" calcext:value-type="float">
            <text:p>191</text:p>
          </table:table-cell>
          <table:table-cell table:formula="of:=AVERAGE([.M440:.M447])" office:value-type="float" office:value="202.75" calcext:value-type="float">
            <text:p>202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223" calcext:value-type="float">
            <text:p>223</text:p>
          </table:table-cell>
          <table:table-cell table:formula="of:=AVERAGE([.M441:.M448])" office:value-type="float" office:value="206.875" calcext:value-type="float">
            <text:p>206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192" calcext:value-type="float">
            <text:p>192</text:p>
          </table:table-cell>
          <table:table-cell table:formula="of:=AVERAGE([.M442:.M449])" office:value-type="float" office:value="216.25" calcext:value-type="float">
            <text:p>216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226" calcext:value-type="float">
            <text:p>226</text:p>
          </table:table-cell>
          <table:table-cell table:formula="of:=AVERAGE([.M443:.M450])" office:value-type="float" office:value="228.375" calcext:value-type="float">
            <text:p>22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230" calcext:value-type="float">
            <text:p>230</text:p>
          </table:table-cell>
          <table:table-cell table:formula="of:=AVERAGE([.M444:.M451])" office:value-type="float" office:value="237.75" calcext:value-type="float">
            <text:p>237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226" calcext:value-type="float">
            <text:p>226</text:p>
          </table:table-cell>
          <table:table-cell table:formula="of:=AVERAGE([.M445:.M452])" office:value-type="float" office:value="245" calcext:value-type="float">
            <text:p>24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263" calcext:value-type="float">
            <text:p>263</text:p>
          </table:table-cell>
          <table:table-cell table:formula="of:=AVERAGE([.M446:.M453])" office:value-type="float" office:value="254.875" calcext:value-type="float">
            <text:p>25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276" calcext:value-type="float">
            <text:p>276</text:p>
          </table:table-cell>
          <table:table-cell table:formula="of:=AVERAGE([.M447:.M454])" office:value-type="float" office:value="265" calcext:value-type="float">
            <text:p>26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266" calcext:value-type="float">
            <text:p>266</text:p>
          </table:table-cell>
          <table:table-cell table:formula="of:=AVERAGE([.M448:.M455])" office:value-type="float" office:value="271.625" calcext:value-type="float">
            <text:p>271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81" calcext:value-type="float">
            <text:p>281</text:p>
          </table:table-cell>
          <table:table-cell table:formula="of:=AVERAGE([.M449:.M456])" office:value-type="float" office:value="282.125" calcext:value-type="float">
            <text:p>282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271" calcext:value-type="float">
            <text:p>271</text:p>
          </table:table-cell>
          <table:table-cell table:formula="of:=AVERAGE([.M450:.M457])" office:value-type="float" office:value="286.25" calcext:value-type="float">
            <text:p>286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307" calcext:value-type="float">
            <text:p>307</text:p>
          </table:table-cell>
          <table:table-cell table:formula="of:=AVERAGE([.M451:.M458])" office:value-type="float" office:value="297.5" calcext:value-type="float">
            <text:p>297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283" calcext:value-type="float">
            <text:p>283</text:p>
          </table:table-cell>
          <table:table-cell table:formula="of:=AVERAGE([.M452:.M459])" office:value-type="float" office:value="302.5" calcext:value-type="float">
            <text:p>30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310" calcext:value-type="float">
            <text:p>310</text:p>
          </table:table-cell>
          <table:table-cell table:formula="of:=AVERAGE([.M453:.M460])" office:value-type="float" office:value="308.875" calcext:value-type="float">
            <text:p>308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96" calcext:value-type="float">
            <text:p>296</text:p>
          </table:table-cell>
          <table:table-cell table:formula="of:=AVERAGE([.M454:.M461])" office:value-type="float" office:value="319.125" calcext:value-type="float">
            <text:p>319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366" calcext:value-type="float">
            <text:p>366</text:p>
          </table:table-cell>
          <table:table-cell table:formula="of:=AVERAGE([.M455:.M462])" office:value-type="float" office:value="326.5" calcext:value-type="float">
            <text:p>32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306" calcext:value-type="float">
            <text:p>306</text:p>
          </table:table-cell>
          <table:table-cell table:formula="of:=AVERAGE([.M456:.M463])" office:value-type="float" office:value="335.125" calcext:value-type="float">
            <text:p>33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332" calcext:value-type="float">
            <text:p>332</text:p>
          </table:table-cell>
          <table:table-cell table:formula="of:=AVERAGE([.M457:.M464])" office:value-type="float" office:value="346.375" calcext:value-type="float">
            <text:p>346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353" calcext:value-type="float">
            <text:p>353</text:p>
          </table:table-cell>
          <table:table-cell table:formula="of:=AVERAGE([.M458:.M465])" office:value-type="float" office:value="354.875" calcext:value-type="float">
            <text:p>35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366" calcext:value-type="float">
            <text:p>366</text:p>
          </table:table-cell>
          <table:table-cell table:formula="of:=AVERAGE([.M459:.M466])" office:value-type="float" office:value="358.125" calcext:value-type="float">
            <text:p>35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352" calcext:value-type="float">
            <text:p>352</text:p>
          </table:table-cell>
          <table:table-cell table:formula="of:=AVERAGE([.M460:.M467])" office:value-type="float" office:value="368.125" calcext:value-type="float">
            <text:p>36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400" calcext:value-type="float">
            <text:p>400</text:p>
          </table:table-cell>
          <table:table-cell table:formula="of:=AVERAGE([.M461:.M468])" office:value-type="float" office:value="385" calcext:value-type="float">
            <text:p>38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364" calcext:value-type="float">
            <text:p>364</text:p>
          </table:table-cell>
          <table:table-cell table:formula="of:=AVERAGE([.M462:.M469])" office:value-type="float" office:value="394.125" calcext:value-type="float">
            <text:p>39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392" calcext:value-type="float">
            <text:p>392</text:p>
          </table:table-cell>
          <table:table-cell table:formula="of:=AVERAGE([.M463:.M470])" office:value-type="float" office:value="402.5" calcext:value-type="float">
            <text:p>40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386" calcext:value-type="float">
            <text:p>386</text:p>
          </table:table-cell>
          <table:table-cell table:formula="of:=AVERAGE([.M464:.M471])" office:value-type="float" office:value="411.75" calcext:value-type="float">
            <text:p>411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table:formula="of:=AVERAGE([.M465:.M472])" office:value-type="float" office:value="418.625" calcext:value-type="float">
            <text:p>418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426" calcext:value-type="float">
            <text:p>426</text:p>
          </table:table-cell>
          <table:table-cell table:formula="of:=AVERAGE([.M466:.M473])" office:value-type="float" office:value="429.875" calcext:value-type="float">
            <text:p>429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433" calcext:value-type="float">
            <text:p>433</text:p>
          </table:table-cell>
          <table:table-cell table:formula="of:=AVERAGE([.M467:.M474])" office:value-type="float" office:value="442.25" calcext:value-type="float">
            <text:p>442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426" calcext:value-type="float">
            <text:p>426</text:p>
          </table:table-cell>
          <table:table-cell table:formula="of:=AVERAGE([.M468:.M475])" office:value-type="float" office:value="453.625" calcext:value-type="float">
            <text:p>45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table:formula="of:=AVERAGE([.M469:.M476])" office:value-type="float" office:value="465.125" calcext:value-type="float">
            <text:p>46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454" calcext:value-type="float">
            <text:p>454</text:p>
          </table:table-cell>
          <table:table-cell table:formula="of:=AVERAGE([.M470:.M477])" office:value-type="float" office:value="474.125" calcext:value-type="float">
            <text:p>474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AVERAGE([.M471:.M478])" office:value-type="float" office:value="494.75" calcext:value-type="float">
            <text:p>494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table:formula="of:=AVERAGE([.M472:.M479])" office:value-type="float" office:value="510.75" calcext:value-type="float">
            <text:p>510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559" calcext:value-type="float">
            <text:p>559</text:p>
          </table:table-cell>
          <table:table-cell table:formula="of:=AVERAGE([.M473:.M480])" office:value-type="float" office:value="528.875" calcext:value-type="float">
            <text:p>528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498" calcext:value-type="float">
            <text:p>498</text:p>
          </table:table-cell>
          <table:table-cell table:formula="of:=AVERAGE([.M474:.M481])" office:value-type="float" office:value="540.25" calcext:value-type="float">
            <text:p>540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598" calcext:value-type="float">
            <text:p>598</text:p>
          </table:table-cell>
          <table:table-cell table:formula="of:=AVERAGE([.M475:.M482])" office:value-type="float" office:value="551.125" calcext:value-type="float">
            <text:p>551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554" calcext:value-type="float">
            <text:p>554</text:p>
          </table:table-cell>
          <table:table-cell table:formula="of:=AVERAGE([.M476:.M483])" office:value-type="float" office:value="563.5" calcext:value-type="float">
            <text:p>56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600" calcext:value-type="float">
            <text:p>600</text:p>
          </table:table-cell>
          <table:table-cell table:formula="of:=AVERAGE([.M477:.M484])" office:value-type="float" office:value="571.25" calcext:value-type="float">
            <text:p>571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545" calcext:value-type="float">
            <text:p>545</text:p>
          </table:table-cell>
          <table:table-cell table:formula="of:=AVERAGE([.M478:.M485])" office:value-type="float" office:value="586" calcext:value-type="float">
            <text:p>586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578" calcext:value-type="float">
            <text:p>578</text:p>
          </table:table-cell>
          <table:table-cell table:formula="of:=AVERAGE([.M479:.M486])" office:value-type="float" office:value="591" calcext:value-type="float">
            <text:p>591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576" calcext:value-type="float">
            <text:p>576</text:p>
          </table:table-cell>
          <table:table-cell table:formula="of:=AVERAGE([.M480:.M487])" office:value-type="float" office:value="599.5" calcext:value-type="float">
            <text:p>599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621" calcext:value-type="float">
            <text:p>621</text:p>
          </table:table-cell>
          <table:table-cell table:formula="of:=AVERAGE([.M481:.M488])" office:value-type="float" office:value="614.625" calcext:value-type="float">
            <text:p>614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616" calcext:value-type="float">
            <text:p>616</text:p>
          </table:table-cell>
          <table:table-cell table:formula="of:=AVERAGE([.M482:.M489])" office:value-type="float" office:value="630" calcext:value-type="float">
            <text:p>63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638" calcext:value-type="float">
            <text:p>638</text:p>
          </table:table-cell>
          <table:table-cell table:formula="of:=AVERAGE([.M483:.M490])" office:value-type="float" office:value="650.125" calcext:value-type="float">
            <text:p>65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622" calcext:value-type="float">
            <text:p>622</text:p>
          </table:table-cell>
          <table:table-cell table:formula="of:=AVERAGE([.M484:.M491])" office:value-type="float" office:value="663.375" calcext:value-type="float">
            <text:p>66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721" calcext:value-type="float">
            <text:p>721</text:p>
          </table:table-cell>
          <table:table-cell table:formula="of:=AVERAGE([.M485:.M492])" office:value-type="float" office:value="678.75" calcext:value-type="float">
            <text:p>678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668" calcext:value-type="float">
            <text:p>668</text:p>
          </table:table-cell>
          <table:table-cell table:formula="of:=AVERAGE([.M486:.M493])" office:value-type="float" office:value="687.5" calcext:value-type="float">
            <text:p>687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739" calcext:value-type="float">
            <text:p>739</text:p>
          </table:table-cell>
          <table:table-cell table:formula="of:=AVERAGE([.M487:.M494])" office:value-type="float" office:value="699.625" calcext:value-type="float">
            <text:p>699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682" calcext:value-type="float">
            <text:p>682</text:p>
          </table:table-cell>
          <table:table-cell table:formula="of:=AVERAGE([.M488:.M495])" office:value-type="float" office:value="714.375" calcext:value-type="float">
            <text:p>714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744" calcext:value-type="float">
            <text:p>744</text:p>
          </table:table-cell>
          <table:table-cell table:formula="of:=AVERAGE([.M489:.M496])" office:value-type="float" office:value="724.875" calcext:value-type="float">
            <text:p>72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686" calcext:value-type="float">
            <text:p>686</text:p>
          </table:table-cell>
          <table:table-cell table:formula="of:=AVERAGE([.M490:.M497])" office:value-type="float" office:value="740.75" calcext:value-type="float">
            <text:p>740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735" calcext:value-type="float">
            <text:p>735</text:p>
          </table:table-cell>
          <table:table-cell table:formula="of:=AVERAGE([.M491:.M498])" office:value-type="float" office:value="753.75" calcext:value-type="float">
            <text:p>75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740" calcext:value-type="float">
            <text:p>740</text:p>
          </table:table-cell>
          <table:table-cell table:formula="of:=AVERAGE([.M492:.M499])" office:value-type="float" office:value="768.125" calcext:value-type="float">
            <text:p>76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805" calcext:value-type="float">
            <text:p>805</text:p>
          </table:table-cell>
          <table:table-cell table:formula="of:=AVERAGE([.M493:.M500])" office:value-type="float" office:value="781.375" calcext:value-type="float">
            <text:p>781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795" calcext:value-type="float">
            <text:p>795</text:p>
          </table:table-cell>
          <table:table-cell table:formula="of:=AVERAGE([.M494:.M501])" office:value-type="float" office:value="799.5" calcext:value-type="float">
            <text:p>799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843" calcext:value-type="float">
            <text:p>843</text:p>
          </table:table-cell>
          <table:table-cell table:formula="of:=AVERAGE([.M495:.M502])" office:value-type="float" office:value="811.625" calcext:value-type="float">
            <text:p>811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797" calcext:value-type="float">
            <text:p>797</text:p>
          </table:table-cell>
          <table:table-cell table:formula="of:=AVERAGE([.M496:.M503])" office:value-type="float" office:value="823.75" calcext:value-type="float">
            <text:p>82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850" calcext:value-type="float">
            <text:p>850</text:p>
          </table:table-cell>
          <table:table-cell table:formula="of:=AVERAGE([.M497:.M504])" office:value-type="float" office:value="831.375" calcext:value-type="float">
            <text:p>831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831" calcext:value-type="float">
            <text:p>831</text:p>
          </table:table-cell>
          <table:table-cell table:formula="of:=AVERAGE([.M498:.M505])" office:value-type="float" office:value="837.5" calcext:value-type="float">
            <text:p>837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832" calcext:value-type="float">
            <text:p>832</text:p>
          </table:table-cell>
          <table:table-cell table:formula="of:=AVERAGE([.M499:.M506])" office:value-type="float" office:value="838.25" calcext:value-type="float">
            <text:p>838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837" calcext:value-type="float">
            <text:p>837</text:p>
          </table:table-cell>
          <table:table-cell table:formula="of:=AVERAGE([.M500:.M507])" office:value-type="float" office:value="840.125" calcext:value-type="float">
            <text:p>84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866" calcext:value-type="float">
            <text:p>866</text:p>
          </table:table-cell>
          <table:table-cell table:formula="of:=AVERAGE([.M501:.M508])" office:value-type="float" office:value="849.25" calcext:value-type="float">
            <text:p>849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844" calcext:value-type="float">
            <text:p>844</text:p>
          </table:table-cell>
          <table:table-cell table:formula="of:=AVERAGE([.M502:.M509])" office:value-type="float" office:value="859" calcext:value-type="float">
            <text:p>859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849" calcext:value-type="float">
            <text:p>849</text:p>
          </table:table-cell>
          <table:table-cell table:formula="of:=AVERAGE([.M503:.M510])" office:value-type="float" office:value="872" calcext:value-type="float">
            <text:p>872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812" calcext:value-type="float">
            <text:p>812</text:p>
          </table:table-cell>
          <table:table-cell table:formula="of:=AVERAGE([.M504:.M511])" office:value-type="float" office:value="875.5" calcext:value-type="float">
            <text:p>87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923" calcext:value-type="float">
            <text:p>923</text:p>
          </table:table-cell>
          <table:table-cell table:formula="of:=AVERAGE([.M505:.M512])" office:value-type="float" office:value="882.875" calcext:value-type="float">
            <text:p>88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909" calcext:value-type="float">
            <text:p>909</text:p>
          </table:table-cell>
          <table:table-cell table:formula="of:=AVERAGE([.M506:.M513])" office:value-type="float" office:value="892" calcext:value-type="float">
            <text:p>892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936" calcext:value-type="float">
            <text:p>936</text:p>
          </table:table-cell>
          <table:table-cell table:formula="of:=AVERAGE([.M507:.M514])" office:value-type="float" office:value="908.125" calcext:value-type="float">
            <text:p>90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865" calcext:value-type="float">
            <text:p>865</text:p>
          </table:table-cell>
          <table:table-cell table:formula="of:=AVERAGE([.M508:.M515])" office:value-type="float" office:value="930.5" calcext:value-type="float">
            <text:p>930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925" calcext:value-type="float">
            <text:p>925</text:p>
          </table:table-cell>
          <table:table-cell table:formula="of:=AVERAGE([.M509:.M516])" office:value-type="float" office:value="945.75" calcext:value-type="float">
            <text:p>945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917" calcext:value-type="float">
            <text:p>917</text:p>
          </table:table-cell>
          <table:table-cell table:formula="of:=AVERAGE([.M510:.M517])" office:value-type="float" office:value="942.125" calcext:value-type="float">
            <text:p>942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978" calcext:value-type="float">
            <text:p>978</text:p>
          </table:table-cell>
          <table:table-cell table:formula="of:=AVERAGE([.M511:.M518])" office:value-type="float" office:value="953.5" calcext:value-type="float">
            <text:p>95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991" calcext:value-type="float">
            <text:p>991</text:p>
          </table:table-cell>
          <table:table-cell table:formula="of:=AVERAGE([.M512:.M519])" office:value-type="float" office:value="972.375" calcext:value-type="float">
            <text:p>97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1045" calcext:value-type="float">
            <text:p>1045</text:p>
          </table:table-cell>
          <table:table-cell table:formula="of:=AVERAGE([.M513:.M520])" office:value-type="float" office:value="973.75" calcext:value-type="float">
            <text:p>97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880" calcext:value-type="float">
            <text:p>880</text:p>
          </table:table-cell>
          <table:table-cell table:formula="of:=AVERAGE([.M514:.M521])" office:value-type="float" office:value="978.375" calcext:value-type="float">
            <text:p>97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1027" calcext:value-type="float">
            <text:p>1027</text:p>
          </table:table-cell>
          <table:table-cell table:formula="of:=AVERAGE([.M515:.M522])" office:value-type="float" office:value="983.375" calcext:value-type="float">
            <text:p>98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1016" calcext:value-type="float">
            <text:p>1016</text:p>
          </table:table-cell>
          <table:table-cell table:formula="of:=AVERAGE([.M516:.M523])" office:value-type="float" office:value="981.125" calcext:value-type="float">
            <text:p>981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936" calcext:value-type="float">
            <text:p>936</text:p>
          </table:table-cell>
          <table:table-cell table:formula="of:=AVERAGE([.M517:.M524])" office:value-type="float" office:value="982.375" calcext:value-type="float">
            <text:p>98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954" calcext:value-type="float">
            <text:p>954</text:p>
          </table:table-cell>
          <table:table-cell table:formula="of:=AVERAGE([.M518:.M525])" office:value-type="float" office:value="1005.25" calcext:value-type="float">
            <text:p>1005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1018" calcext:value-type="float">
            <text:p>1018</text:p>
          </table:table-cell>
          <table:table-cell table:formula="of:=AVERAGE([.M519:.M526])" office:value-type="float" office:value="1008.25" calcext:value-type="float">
            <text:p>1008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973" calcext:value-type="float">
            <text:p>973</text:p>
          </table:table-cell>
          <table:table-cell table:formula="of:=AVERAGE([.M520:.M527])" office:value-type="float" office:value="1009.875" calcext:value-type="float">
            <text:p>1009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1055" calcext:value-type="float">
            <text:p>1055</text:p>
          </table:table-cell>
          <table:table-cell table:formula="of:=AVERAGE([.M521:.M528])" office:value-type="float" office:value="1025.125" calcext:value-type="float">
            <text:p>102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1063" calcext:value-type="float">
            <text:p>1063</text:p>
          </table:table-cell>
          <table:table-cell table:formula="of:=AVERAGE([.M522:.M529])" office:value-type="float" office:value="1037.125" calcext:value-type="float">
            <text:p>1037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1051" calcext:value-type="float">
            <text:p>1051</text:p>
          </table:table-cell>
          <table:table-cell table:formula="of:=AVERAGE([.M523:.M530])" office:value-type="float" office:value="1050.125" calcext:value-type="float">
            <text:p>105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1029" calcext:value-type="float">
            <text:p>1029</text:p>
          </table:table-cell>
          <table:table-cell table:formula="of:=AVERAGE([.M524:.M531])" office:value-type="float" office:value="1058.75" calcext:value-type="float">
            <text:p>1058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1058" calcext:value-type="float">
            <text:p>1058</text:p>
          </table:table-cell>
          <table:table-cell table:formula="of:=AVERAGE([.M525:.M532])" office:value-type="float" office:value="1061.125" calcext:value-type="float">
            <text:p>1061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1050" calcext:value-type="float">
            <text:p>1050</text:p>
          </table:table-cell>
          <table:table-cell table:formula="of:=AVERAGE([.M526:.M533])" office:value-type="float" office:value="1068" calcext:value-type="float">
            <text:p>1068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1122" calcext:value-type="float">
            <text:p>1122</text:p>
          </table:table-cell>
          <table:table-cell table:formula="of:=AVERAGE([.M527:.M534])" office:value-type="float" office:value="1063.25" calcext:value-type="float">
            <text:p>1063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1042" calcext:value-type="float">
            <text:p>1042</text:p>
          </table:table-cell>
          <table:table-cell table:formula="of:=AVERAGE([.M528:.M535])" office:value-type="float" office:value="1061.75" calcext:value-type="float">
            <text:p>1061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1074" calcext:value-type="float">
            <text:p>1074</text:p>
          </table:table-cell>
          <table:table-cell table:formula="of:=AVERAGE([.M529:.M536])" office:value-type="float" office:value="1066.75" calcext:value-type="float">
            <text:p>1066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1118" calcext:value-type="float">
            <text:p>1118</text:p>
          </table:table-cell>
          <table:table-cell table:formula="of:=AVERAGE([.M530:.M537])" office:value-type="float" office:value="1074.875" calcext:value-type="float">
            <text:p>107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013" calcext:value-type="float">
            <text:p>1013</text:p>
          </table:table-cell>
          <table:table-cell table:formula="of:=AVERAGE([.M531:.M538])" office:value-type="float" office:value="1079" calcext:value-type="float">
            <text:p>1079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1017" calcext:value-type="float">
            <text:p>1017</text:p>
          </table:table-cell>
          <table:table-cell table:formula="of:=AVERAGE([.M532:.M539])" office:value-type="float" office:value="1080.5" calcext:value-type="float">
            <text:p>1080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1098" calcext:value-type="float">
            <text:p>1098</text:p>
          </table:table-cell>
          <table:table-cell table:formula="of:=AVERAGE([.M533:.M540])" office:value-type="float" office:value="1085.125" calcext:value-type="float">
            <text:p>108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1115" calcext:value-type="float">
            <text:p>1115</text:p>
          </table:table-cell>
          <table:table-cell table:formula="of:=AVERAGE([.M534:.M541])" office:value-type="float" office:value="1086.125" calcext:value-type="float">
            <text:p>1086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1155" calcext:value-type="float">
            <text:p>1155</text:p>
          </table:table-cell>
          <table:table-cell table:formula="of:=AVERAGE([.M535:.M542])" office:value-type="float" office:value="1099.375" calcext:value-type="float">
            <text:p>1099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1054" calcext:value-type="float">
            <text:p>1054</text:p>
          </table:table-cell>
          <table:table-cell table:formula="of:=AVERAGE([.M536:.M543])" office:value-type="float" office:value="1104.625" calcext:value-type="float">
            <text:p>1104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1111" calcext:value-type="float">
            <text:p>1111</text:p>
          </table:table-cell>
          <table:table-cell table:formula="of:=AVERAGE([.M537:.M544])" office:value-type="float" office:value="1104.375" calcext:value-type="float">
            <text:p>1104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1126" calcext:value-type="float">
            <text:p>1126</text:p>
          </table:table-cell>
          <table:table-cell table:formula="of:=AVERAGE([.M538:.M545])" office:value-type="float" office:value="1094.875" calcext:value-type="float">
            <text:p>109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1119" calcext:value-type="float">
            <text:p>1119</text:p>
          </table:table-cell>
          <table:table-cell table:formula="of:=AVERAGE([.M539:.M546])" office:value-type="float" office:value="1094.25" calcext:value-type="float">
            <text:p>1094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1059" calcext:value-type="float">
            <text:p>1059</text:p>
          </table:table-cell>
          <table:table-cell table:formula="of:=AVERAGE([.M540:.M547])" office:value-type="float" office:value="1101.75" calcext:value-type="float">
            <text:p>1101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1096" calcext:value-type="float">
            <text:p>1096</text:p>
          </table:table-cell>
          <table:table-cell table:formula="of:=AVERAGE([.M541:.M548])" office:value-type="float" office:value="1095.125" calcext:value-type="float">
            <text:p>1095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1039" calcext:value-type="float">
            <text:p>1039</text:p>
          </table:table-cell>
          <table:table-cell table:formula="of:=AVERAGE([.M542:.M549])" office:value-type="float" office:value="1086.5" calcext:value-type="float">
            <text:p>108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1150" calcext:value-type="float">
            <text:p>1150</text:p>
          </table:table-cell>
          <table:table-cell table:formula="of:=AVERAGE([.M543:.M550])" office:value-type="float" office:value="1086.375" calcext:value-type="float">
            <text:p>1086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1114" calcext:value-type="float">
            <text:p>1114</text:p>
          </table:table-cell>
          <table:table-cell table:formula="of:=AVERAGE([.M544:.M551])" office:value-type="float" office:value="1091.5" calcext:value-type="float">
            <text:p>1091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1058" calcext:value-type="float">
            <text:p>1058</text:p>
          </table:table-cell>
          <table:table-cell table:formula="of:=AVERAGE([.M545:.M552])" office:value-type="float" office:value="1089.75" calcext:value-type="float">
            <text:p>1089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1057" calcext:value-type="float">
            <text:p>1057</text:p>
          </table:table-cell>
          <table:table-cell table:formula="of:=AVERAGE([.M546:.M553])" office:value-type="float" office:value="1084.5" calcext:value-type="float">
            <text:p>1084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118" calcext:value-type="float">
            <text:p>1118</text:p>
          </table:table-cell>
          <table:table-cell table:formula="of:=AVERAGE([.M547:.M554])" office:value-type="float" office:value="1073.625" calcext:value-type="float">
            <text:p>107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1100" calcext:value-type="float">
            <text:p>1100</text:p>
          </table:table-cell>
          <table:table-cell table:formula="of:=AVERAGE([.M548:.M555])" office:value-type="float" office:value="1066.75" calcext:value-type="float">
            <text:p>1066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1082" calcext:value-type="float">
            <text:p>1082</text:p>
          </table:table-cell>
          <table:table-cell table:formula="of:=AVERAGE([.M549:.M556])" office:value-type="float" office:value="1068.625" calcext:value-type="float">
            <text:p>1068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997" calcext:value-type="float">
            <text:p>997</text:p>
          </table:table-cell>
          <table:table-cell table:formula="of:=AVERAGE([.M550:.M557])" office:value-type="float" office:value="1066.125" calcext:value-type="float">
            <text:p>1066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1063" calcext:value-type="float">
            <text:p>1063</text:p>
          </table:table-cell>
          <table:table-cell table:formula="of:=AVERAGE([.M551:.M558])" office:value-type="float" office:value="1060.625" calcext:value-type="float">
            <text:p>1060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1059" calcext:value-type="float">
            <text:p>1059</text:p>
          </table:table-cell>
          <table:table-cell table:formula="of:=AVERAGE([.M552:.M559])" office:value-type="float" office:value="1050.25" calcext:value-type="float">
            <text:p>1050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1073" calcext:value-type="float">
            <text:p>1073</text:p>
          </table:table-cell>
          <table:table-cell table:formula="of:=AVERAGE([.M553:.M560])" office:value-type="float" office:value="1050" calcext:value-type="float">
            <text:p>1050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1037" calcext:value-type="float">
            <text:p>1037</text:p>
          </table:table-cell>
          <table:table-cell table:formula="of:=AVERAGE([.M554:.M561])" office:value-type="float" office:value="1056.875" calcext:value-type="float">
            <text:p>1056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1074" calcext:value-type="float">
            <text:p>1074</text:p>
          </table:table-cell>
          <table:table-cell table:formula="of:=AVERAGE([.M555:.M562])" office:value-type="float" office:value="1055.5" calcext:value-type="float">
            <text:p>105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1017" calcext:value-type="float">
            <text:p>1017</text:p>
          </table:table-cell>
          <table:table-cell table:formula="of:=AVERAGE([.M556:.M563])" office:value-type="float" office:value="1042.25" calcext:value-type="float">
            <text:p>1042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1080" calcext:value-type="float">
            <text:p>1080</text:p>
          </table:table-cell>
          <table:table-cell table:formula="of:=AVERAGE([.M557:.M564])" office:value-type="float" office:value="1035" calcext:value-type="float">
            <text:p>103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1052" calcext:value-type="float">
            <text:p>1052</text:p>
          </table:table-cell>
          <table:table-cell table:formula="of:=AVERAGE([.M558:.M565])" office:value-type="float" office:value="1039.125" calcext:value-type="float">
            <text:p>1039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1052" calcext:value-type="float">
            <text:p>1052</text:p>
          </table:table-cell>
          <table:table-cell table:formula="of:=AVERAGE([.M559:.M566])" office:value-type="float" office:value="1036.375" calcext:value-type="float">
            <text:p>1036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953" calcext:value-type="float">
            <text:p>953</text:p>
          </table:table-cell>
          <table:table-cell table:formula="of:=AVERAGE([.M560:.M567])" office:value-type="float" office:value="1031.125" calcext:value-type="float">
            <text:p>1031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1015" calcext:value-type="float">
            <text:p>1015</text:p>
          </table:table-cell>
          <table:table-cell table:formula="of:=AVERAGE([.M561:.M568])" office:value-type="float" office:value="1022.375" calcext:value-type="float">
            <text:p>102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1070" calcext:value-type="float">
            <text:p>1070</text:p>
          </table:table-cell>
          <table:table-cell table:formula="of:=AVERAGE([.M562:.M569])" office:value-type="float" office:value="1018.25" calcext:value-type="float">
            <text:p>1018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1052" calcext:value-type="float">
            <text:p>1052</text:p>
          </table:table-cell>
          <table:table-cell table:formula="of:=AVERAGE([.M563:.M570])" office:value-type="float" office:value="1012" calcext:value-type="float">
            <text:p>1012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975" calcext:value-type="float">
            <text:p>975</text:p>
          </table:table-cell>
          <table:table-cell table:formula="of:=AVERAGE([.M564:.M571])" office:value-type="float" office:value="1008" calcext:value-type="float">
            <text:p>1008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1010" calcext:value-type="float">
            <text:p>1010</text:p>
          </table:table-cell>
          <table:table-cell table:formula="of:=AVERAGE([.M565:.M572])" office:value-type="float" office:value="1008.125" calcext:value-type="float">
            <text:p>100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1019" calcext:value-type="float">
            <text:p>1019</text:p>
          </table:table-cell>
          <table:table-cell table:formula="of:=AVERAGE([.M566:.M573])" office:value-type="float" office:value="993.125" calcext:value-type="float">
            <text:p>993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1002" calcext:value-type="float">
            <text:p>1002</text:p>
          </table:table-cell>
          <table:table-cell table:formula="of:=AVERAGE([.M567:.M574])" office:value-type="float" office:value="979.875" calcext:value-type="float">
            <text:p>979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921" calcext:value-type="float">
            <text:p>921</text:p>
          </table:table-cell>
          <table:table-cell table:formula="of:=AVERAGE([.M568:.M575])" office:value-type="float" office:value="976.5" calcext:value-type="float">
            <text:p>97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1016" calcext:value-type="float">
            <text:p>1016</text:p>
          </table:table-cell>
          <table:table-cell table:formula="of:=AVERAGE([.M569:.M576])" office:value-type="float" office:value="967" calcext:value-type="float">
            <text:p>967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950" calcext:value-type="float">
            <text:p>950</text:p>
          </table:table-cell>
          <table:table-cell table:formula="of:=AVERAGE([.M570:.M577])" office:value-type="float" office:value="958.75" calcext:value-type="float">
            <text:p>958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946" calcext:value-type="float">
            <text:p>946</text:p>
          </table:table-cell>
          <table:table-cell table:formula="of:=AVERAGE([.M571:.M578])" office:value-type="float" office:value="956.625" calcext:value-type="float">
            <text:p>956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948" calcext:value-type="float">
            <text:p>948</text:p>
          </table:table-cell>
          <table:table-cell table:formula="of:=AVERAGE([.M572:.M579])" office:value-type="float" office:value="958.375" calcext:value-type="float">
            <text:p>95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934" calcext:value-type="float">
            <text:p>934</text:p>
          </table:table-cell>
          <table:table-cell table:formula="of:=AVERAGE([.M573:.M580])" office:value-type="float" office:value="943.5" calcext:value-type="float">
            <text:p>94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953" calcext:value-type="float">
            <text:p>953</text:p>
          </table:table-cell>
          <table:table-cell table:formula="of:=AVERAGE([.M574:.M581])" office:value-type="float" office:value="932.25" calcext:value-type="float">
            <text:p>932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985" calcext:value-type="float">
            <text:p>985</text:p>
          </table:table-cell>
          <table:table-cell table:formula="of:=AVERAGE([.M575:.M582])" office:value-type="float" office:value="925.625" calcext:value-type="float">
            <text:p>925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935" calcext:value-type="float">
            <text:p>935</text:p>
          </table:table-cell>
          <table:table-cell table:formula="of:=AVERAGE([.M576:.M583])" office:value-type="float" office:value="913.75" calcext:value-type="float">
            <text:p>91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897" calcext:value-type="float">
            <text:p>897</text:p>
          </table:table-cell>
          <table:table-cell table:formula="of:=AVERAGE([.M577:.M584])" office:value-type="float" office:value="908.375" calcext:value-type="float">
            <text:p>90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860" calcext:value-type="float">
            <text:p>860</text:p>
          </table:table-cell>
          <table:table-cell table:formula="of:=AVERAGE([.M578:.M585])" office:value-type="float" office:value="897" calcext:value-type="float">
            <text:p>897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893" calcext:value-type="float">
            <text:p>893</text:p>
          </table:table-cell>
          <table:table-cell table:formula="of:=AVERAGE([.M579:.M586])" office:value-type="float" office:value="883.75" calcext:value-type="float">
            <text:p>883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853" calcext:value-type="float">
            <text:p>853</text:p>
          </table:table-cell>
          <table:table-cell table:formula="of:=AVERAGE([.M580:.M587])" office:value-type="float" office:value="867" calcext:value-type="float">
            <text:p>867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891" calcext:value-type="float">
            <text:p>891</text:p>
          </table:table-cell>
          <table:table-cell table:formula="of:=AVERAGE([.M581:.M588])" office:value-type="float" office:value="860.625" calcext:value-type="float">
            <text:p>860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862" calcext:value-type="float">
            <text:p>862</text:p>
          </table:table-cell>
          <table:table-cell table:formula="of:=AVERAGE([.M582:.M589])" office:value-type="float" office:value="850.125" calcext:value-type="float">
            <text:p>85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879" calcext:value-type="float">
            <text:p>879</text:p>
          </table:table-cell>
          <table:table-cell table:formula="of:=AVERAGE([.M583:.M590])" office:value-type="float" office:value="843.875" calcext:value-type="float">
            <text:p>84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801" calcext:value-type="float">
            <text:p>801</text:p>
          </table:table-cell>
          <table:table-cell table:formula="of:=AVERAGE([.M584:.M591])" office:value-type="float" office:value="836.5" calcext:value-type="float">
            <text:p>83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846" calcext:value-type="float">
            <text:p>846</text:p>
          </table:table-cell>
          <table:table-cell table:formula="of:=AVERAGE([.M585:.M592])" office:value-type="float" office:value="820.75" calcext:value-type="float">
            <text:p>820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776" calcext:value-type="float">
            <text:p>776</text:p>
          </table:table-cell>
          <table:table-cell table:formula="of:=AVERAGE([.M586:.M593])" office:value-type="float" office:value="812.625" calcext:value-type="float">
            <text:p>81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843" calcext:value-type="float">
            <text:p>843</text:p>
          </table:table-cell>
          <table:table-cell table:formula="of:=AVERAGE([.M587:.M594])" office:value-type="float" office:value="793" calcext:value-type="float">
            <text:p>79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794" calcext:value-type="float">
            <text:p>794</text:p>
          </table:table-cell>
          <table:table-cell table:formula="of:=AVERAGE([.M588:.M595])" office:value-type="float" office:value="783" calcext:value-type="float">
            <text:p>78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765" calcext:value-type="float">
            <text:p>765</text:p>
          </table:table-cell>
          <table:table-cell table:formula="of:=AVERAGE([.M589:.M596])" office:value-type="float" office:value="774" calcext:value-type="float">
            <text:p>77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797" calcext:value-type="float">
            <text:p>797</text:p>
          </table:table-cell>
          <table:table-cell table:formula="of:=AVERAGE([.M590:.M597])" office:value-type="float" office:value="765" calcext:value-type="float">
            <text:p>76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722" calcext:value-type="float">
            <text:p>722</text:p>
          </table:table-cell>
          <table:table-cell table:formula="of:=AVERAGE([.M591:.M598])" office:value-type="float" office:value="747.875" calcext:value-type="float">
            <text:p>747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721" calcext:value-type="float">
            <text:p>721</text:p>
          </table:table-cell>
          <table:table-cell table:formula="of:=AVERAGE([.M592:.M599])" office:value-type="float" office:value="733.375" calcext:value-type="float">
            <text:p>73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774" calcext:value-type="float">
            <text:p>774</text:p>
          </table:table-cell>
          <table:table-cell table:formula="of:=AVERAGE([.M593:.M600])" office:value-type="float" office:value="734" calcext:value-type="float">
            <text:p>734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704" calcext:value-type="float">
            <text:p>704</text:p>
          </table:table-cell>
          <table:table-cell table:formula="of:=AVERAGE([.M594:.M601])" office:value-type="float" office:value="722.625" calcext:value-type="float">
            <text:p>722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706" calcext:value-type="float">
            <text:p>706</text:p>
          </table:table-cell>
          <table:table-cell table:formula="of:=AVERAGE([.M595:.M602])" office:value-type="float" office:value="718.5" calcext:value-type="float">
            <text:p>718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678" calcext:value-type="float">
            <text:p>678</text:p>
          </table:table-cell>
          <table:table-cell table:formula="of:=AVERAGE([.M596:.M603])" office:value-type="float" office:value="709.375" calcext:value-type="float">
            <text:p>709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770" calcext:value-type="float">
            <text:p>770</text:p>
          </table:table-cell>
          <table:table-cell table:formula="of:=AVERAGE([.M597:.M604])" office:value-type="float" office:value="696" calcext:value-type="float">
            <text:p>696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706" calcext:value-type="float">
            <text:p>706</text:p>
          </table:table-cell>
          <table:table-cell table:formula="of:=AVERAGE([.M598:.M605])" office:value-type="float" office:value="688.75" calcext:value-type="float">
            <text:p>688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689" calcext:value-type="float">
            <text:p>689</text:p>
          </table:table-cell>
          <table:table-cell table:formula="of:=AVERAGE([.M599:.M606])" office:value-type="float" office:value="676.5" calcext:value-type="float">
            <text:p>676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648" calcext:value-type="float">
            <text:p>648</text:p>
          </table:table-cell>
          <table:table-cell table:formula="of:=AVERAGE([.M600:.M607])" office:value-type="float" office:value="668.625" calcext:value-type="float">
            <text:p>668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667" calcext:value-type="float">
            <text:p>667</text:p>
          </table:table-cell>
          <table:table-cell table:formula="of:=AVERAGE([.M601:.M608])" office:value-type="float" office:value="653.875" calcext:value-type="float">
            <text:p>653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646" calcext:value-type="float">
            <text:p>646</text:p>
          </table:table-cell>
          <table:table-cell table:formula="of:=AVERAGE([.M602:.M609])" office:value-type="float" office:value="635.625" calcext:value-type="float">
            <text:p>635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table:formula="of:=AVERAGE([.M603:.M610])" office:value-type="float" office:value="627.25" calcext:value-type="float">
            <text:p>627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615" calcext:value-type="float">
            <text:p>615</text:p>
          </table:table-cell>
          <table:table-cell table:formula="of:=AVERAGE([.M604:.M611])" office:value-type="float" office:value="617.375" calcext:value-type="float">
            <text:p>617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652" calcext:value-type="float">
            <text:p>652</text:p>
          </table:table-cell>
          <table:table-cell table:formula="of:=AVERAGE([.M605:.M612])" office:value-type="float" office:value="603" calcext:value-type="float">
            <text:p>60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560" calcext:value-type="float">
            <text:p>560</text:p>
          </table:table-cell>
          <table:table-cell table:formula="of:=AVERAGE([.M606:.M613])" office:value-type="float" office:value="591.5" calcext:value-type="float">
            <text:p>591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622" calcext:value-type="float">
            <text:p>622</text:p>
          </table:table-cell>
          <table:table-cell table:formula="of:=AVERAGE([.M607:.M614])" office:value-type="float" office:value="588.125" calcext:value-type="float">
            <text:p>58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569" calcext:value-type="float">
            <text:p>569</text:p>
          </table:table-cell>
          <table:table-cell table:formula="of:=AVERAGE([.M608:.M615])" office:value-type="float" office:value="580.125" calcext:value-type="float">
            <text:p>58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552" calcext:value-type="float">
            <text:p>552</text:p>
          </table:table-cell>
          <table:table-cell table:formula="of:=AVERAGE([.M609:.M616])" office:value-type="float" office:value="567.375" calcext:value-type="float">
            <text:p>567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554" calcext:value-type="float">
            <text:p>554</text:p>
          </table:table-cell>
          <table:table-cell table:formula="of:=AVERAGE([.M610:.M617])" office:value-type="float" office:value="562.375" calcext:value-type="float">
            <text:p>56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581" calcext:value-type="float">
            <text:p>581</text:p>
          </table:table-cell>
          <table:table-cell table:formula="of:=AVERAGE([.M611:.M618])" office:value-type="float" office:value="551.625" calcext:value-type="float">
            <text:p>551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551" calcext:value-type="float">
            <text:p>551</text:p>
          </table:table-cell>
          <table:table-cell table:formula="of:=AVERAGE([.M612:.M619])" office:value-type="float" office:value="538.625" calcext:value-type="float">
            <text:p>538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550" calcext:value-type="float">
            <text:p>550</text:p>
          </table:table-cell>
          <table:table-cell table:formula="of:=AVERAGE([.M613:.M620])" office:value-type="float" office:value="531.75" calcext:value-type="float">
            <text:p>531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520" calcext:value-type="float">
            <text:p>520</text:p>
          </table:table-cell>
          <table:table-cell table:formula="of:=AVERAGE([.M614:.M621])" office:value-type="float" office:value="523.625" calcext:value-type="float">
            <text:p>523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536" calcext:value-type="float">
            <text:p>536</text:p>
          </table:table-cell>
          <table:table-cell table:formula="of:=AVERAGE([.M615:.M622])" office:value-type="float" office:value="512.375" calcext:value-type="float">
            <text:p>512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465" calcext:value-type="float">
            <text:p>465</text:p>
          </table:table-cell>
          <table:table-cell table:formula="of:=AVERAGE([.M616:.M623])" office:value-type="float" office:value="500.375" calcext:value-type="float">
            <text:p>500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497" calcext:value-type="float">
            <text:p>497</text:p>
          </table:table-cell>
          <table:table-cell table:formula="of:=AVERAGE([.M617:.M624])" office:value-type="float" office:value="487.75" calcext:value-type="float">
            <text:p>487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489" calcext:value-type="float">
            <text:p>489</text:p>
          </table:table-cell>
          <table:table-cell table:formula="of:=AVERAGE([.M618:.M625])" office:value-type="float" office:value="476.25" calcext:value-type="float">
            <text:p>476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491" calcext:value-type="float">
            <text:p>491</text:p>
          </table:table-cell>
          <table:table-cell table:formula="of:=AVERAGE([.M619:.M626])" office:value-type="float" office:value="464.625" calcext:value-type="float">
            <text:p>464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455" calcext:value-type="float">
            <text:p>455</text:p>
          </table:table-cell>
          <table:table-cell table:formula="of:=AVERAGE([.M620:.M627])" office:value-type="float" office:value="456.75" calcext:value-type="float">
            <text:p>456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449" calcext:value-type="float">
            <text:p>449</text:p>
          </table:table-cell>
          <table:table-cell table:formula="of:=AVERAGE([.M621:.M628])" office:value-type="float" office:value="447.875" calcext:value-type="float">
            <text:p>447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428" calcext:value-type="float">
            <text:p>428</text:p>
          </table:table-cell>
          <table:table-cell table:formula="of:=AVERAGE([.M622:.M629])" office:value-type="float" office:value="438.5" calcext:value-type="float">
            <text:p>438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443" calcext:value-type="float">
            <text:p>443</text:p>
          </table:table-cell>
          <table:table-cell table:formula="of:=AVERAGE([.M623:.M630])" office:value-type="float" office:value="426" calcext:value-type="float">
            <text:p>426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402" calcext:value-type="float">
            <text:p>402</text:p>
          </table:table-cell>
          <table:table-cell table:formula="of:=AVERAGE([.M624:.M631])" office:value-type="float" office:value="415.875" calcext:value-type="float">
            <text:p>415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426" calcext:value-type="float">
            <text:p>426</text:p>
          </table:table-cell>
          <table:table-cell table:formula="of:=AVERAGE([.M625:.M632])" office:value-type="float" office:value="409.25" calcext:value-type="float">
            <text:p>409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414" calcext:value-type="float">
            <text:p>414</text:p>
          </table:table-cell>
          <table:table-cell table:formula="of:=AVERAGE([.M626:.M633])" office:value-type="float" office:value="399.75" calcext:value-type="float">
            <text:p>399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391" calcext:value-type="float">
            <text:p>391</text:p>
          </table:table-cell>
          <table:table-cell table:formula="of:=AVERAGE([.M627:.M634])" office:value-type="float" office:value="389" calcext:value-type="float">
            <text:p>389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374" calcext:value-type="float">
            <text:p>374</text:p>
          </table:table-cell>
          <table:table-cell table:formula="of:=AVERAGE([.M628:.M635])" office:value-type="float" office:value="382.5" calcext:value-type="float">
            <text:p>382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396" calcext:value-type="float">
            <text:p>396</text:p>
          </table:table-cell>
          <table:table-cell table:formula="of:=AVERAGE([.M629:.M636])" office:value-type="float" office:value="375.25" calcext:value-type="float">
            <text:p>375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352" calcext:value-type="float">
            <text:p>352</text:p>
          </table:table-cell>
          <table:table-cell table:formula="of:=AVERAGE([.M630:.M637])" office:value-type="float" office:value="367.75" calcext:value-type="float">
            <text:p>367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357" calcext:value-type="float">
            <text:p>357</text:p>
          </table:table-cell>
          <table:table-cell table:formula="of:=AVERAGE([.M631:.M638])" office:value-type="float" office:value="362.875" calcext:value-type="float">
            <text:p>362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350" calcext:value-type="float">
            <text:p>350</text:p>
          </table:table-cell>
          <table:table-cell table:formula="of:=AVERAGE([.M632:.M639])" office:value-type="float" office:value="350.625" calcext:value-type="float">
            <text:p>350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368" calcext:value-type="float">
            <text:p>368</text:p>
          </table:table-cell>
          <table:table-cell table:formula="of:=AVERAGE([.M633:.M640])" office:value-type="float" office:value="340.25" calcext:value-type="float">
            <text:p>340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354" calcext:value-type="float">
            <text:p>354</text:p>
          </table:table-cell>
          <table:table-cell table:formula="of:=AVERAGE([.M634:.M641])" office:value-type="float" office:value="331.5" calcext:value-type="float">
            <text:p>331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352" calcext:value-type="float">
            <text:p>352</text:p>
          </table:table-cell>
          <table:table-cell table:formula="of:=AVERAGE([.M635:.M642])" office:value-type="float" office:value="325.5" calcext:value-type="float">
            <text:p>32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276" calcext:value-type="float">
            <text:p>276</text:p>
          </table:table-cell>
          <table:table-cell table:formula="of:=AVERAGE([.M636:.M643])" office:value-type="float" office:value="316.875" calcext:value-type="float">
            <text:p>316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313" calcext:value-type="float">
            <text:p>313</text:p>
          </table:table-cell>
          <table:table-cell table:formula="of:=AVERAGE([.M637:.M644])" office:value-type="float" office:value="305.5" calcext:value-type="float">
            <text:p>30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282" calcext:value-type="float">
            <text:p>282</text:p>
          </table:table-cell>
          <table:table-cell table:formula="of:=AVERAGE([.M638:.M645])" office:value-type="float" office:value="298.125" calcext:value-type="float">
            <text:p>298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309" calcext:value-type="float">
            <text:p>309</text:p>
          </table:table-cell>
          <table:table-cell table:formula="of:=AVERAGE([.M639:.M646])" office:value-type="float" office:value="290.125" calcext:value-type="float">
            <text:p>29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281" calcext:value-type="float">
            <text:p>281</text:p>
          </table:table-cell>
          <table:table-cell table:formula="of:=AVERAGE([.M640:.M647])" office:value-type="float" office:value="287.625" calcext:value-type="float">
            <text:p>287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277" calcext:value-type="float">
            <text:p>277</text:p>
          </table:table-cell>
          <table:table-cell table:formula="of:=AVERAGE([.M641:.M648])" office:value-type="float" office:value="281.875" calcext:value-type="float">
            <text:p>281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295" calcext:value-type="float">
            <text:p>295</text:p>
          </table:table-cell>
          <table:table-cell table:formula="of:=AVERAGE([.M642:.M649])" office:value-type="float" office:value="279.25" calcext:value-type="float">
            <text:p>279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288" calcext:value-type="float">
            <text:p>288</text:p>
          </table:table-cell>
          <table:table-cell table:formula="of:=AVERAGE([.M643:.M650])" office:value-type="float" office:value="272" calcext:value-type="float">
            <text:p>272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256" calcext:value-type="float">
            <text:p>256</text:p>
          </table:table-cell>
          <table:table-cell table:formula="of:=AVERAGE([.M644:.M651])" office:value-type="float" office:value="267.75" calcext:value-type="float">
            <text:p>267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267" calcext:value-type="float">
            <text:p>267</text:p>
          </table:table-cell>
          <table:table-cell table:formula="of:=AVERAGE([.M645:.M652])" office:value-type="float" office:value="264.875" calcext:value-type="float">
            <text:p>26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261" calcext:value-type="float">
            <text:p>261</text:p>
          </table:table-cell>
          <table:table-cell table:formula="of:=AVERAGE([.M646:.M653])" office:value-type="float" office:value="254.875" calcext:value-type="float">
            <text:p>254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251" calcext:value-type="float">
            <text:p>251</text:p>
          </table:table-cell>
          <table:table-cell table:formula="of:=AVERAGE([.M647:.M654])" office:value-type="float" office:value="247.25" calcext:value-type="float">
            <text:p>247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247" calcext:value-type="float">
            <text:p>247</text:p>
          </table:table-cell>
          <table:table-cell table:formula="of:=AVERAGE([.M648:.M655])" office:value-type="float" office:value="243.375" calcext:value-type="float">
            <text:p>243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254" calcext:value-type="float">
            <text:p>254</text:p>
          </table:table-cell>
          <table:table-cell table:formula="of:=AVERAGE([.M649:.M656])" office:value-type="float" office:value="237.125" calcext:value-type="float">
            <text:p>237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215" calcext:value-type="float">
            <text:p>215</text:p>
          </table:table-cell>
          <table:table-cell table:formula="of:=AVERAGE([.M650:.M657])" office:value-type="float" office:value="228.625" calcext:value-type="float">
            <text:p>228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227" calcext:value-type="float">
            <text:p>227</text:p>
          </table:table-cell>
          <table:table-cell table:formula="of:=AVERAGE([.M651:.M658])" office:value-type="float" office:value="221.5" calcext:value-type="float">
            <text:p>221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225" calcext:value-type="float">
            <text:p>225</text:p>
          </table:table-cell>
          <table:table-cell table:formula="of:=AVERAGE([.M652:.M659])" office:value-type="float" office:value="211.5" calcext:value-type="float">
            <text:p>211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217" calcext:value-type="float">
            <text:p>217</text:p>
          </table:table-cell>
          <table:table-cell table:formula="of:=AVERAGE([.M653:.M660])" office:value-type="float" office:value="201.5" calcext:value-type="float">
            <text:p>201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193" calcext:value-type="float">
            <text:p>193</text:p>
          </table:table-cell>
          <table:table-cell table:formula="of:=AVERAGE([.M654:.M661])" office:value-type="float" office:value="196.625" calcext:value-type="float">
            <text:p>196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194" calcext:value-type="float">
            <text:p>194</text:p>
          </table:table-cell>
          <table:table-cell table:formula="of:=AVERAGE([.M655:.M662])" office:value-type="float" office:value="188.375" calcext:value-type="float">
            <text:p>18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167" calcext:value-type="float">
            <text:p>167</text:p>
          </table:table-cell>
          <table:table-cell table:formula="of:=AVERAGE([.M656:.M663])" office:value-type="float" office:value="181.125" calcext:value-type="float">
            <text:p>181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174" calcext:value-type="float">
            <text:p>174</text:p>
          </table:table-cell>
          <table:table-cell table:formula="of:=AVERAGE([.M657:.M664])" office:value-type="float" office:value="175.5" calcext:value-type="float">
            <text:p>175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176" calcext:value-type="float">
            <text:p>176</text:p>
          </table:table-cell>
          <table:table-cell table:formula="of:=AVERAGE([.M658:.M665])" office:value-type="float" office:value="170.5" calcext:value-type="float">
            <text:p>170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161" calcext:value-type="float">
            <text:p>161</text:p>
          </table:table-cell>
          <table:table-cell table:formula="of:=AVERAGE([.M659:.M666])" office:value-type="float" office:value="169.5" calcext:value-type="float">
            <text:p>169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167" calcext:value-type="float">
            <text:p>167</text:p>
          </table:table-cell>
          <table:table-cell table:formula="of:=AVERAGE([.M660:.M667])" office:value-type="float" office:value="166.875" calcext:value-type="float">
            <text:p>166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172" calcext:value-type="float">
            <text:p>172</text:p>
          </table:table-cell>
          <table:table-cell table:formula="of:=AVERAGE([.M661:.M668])" office:value-type="float" office:value="164.625" calcext:value-type="float">
            <text:p>164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153" calcext:value-type="float">
            <text:p>153</text:p>
          </table:table-cell>
          <table:table-cell table:formula="of:=AVERAGE([.M662:.M669])" office:value-type="float" office:value="159.125" calcext:value-type="float">
            <text:p>159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186" calcext:value-type="float">
            <text:p>186</text:p>
          </table:table-cell>
          <table:table-cell table:formula="of:=AVERAGE([.M663:.M670])" office:value-type="float" office:value="155.75" calcext:value-type="float">
            <text:p>155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146" calcext:value-type="float">
            <text:p>146</text:p>
          </table:table-cell>
          <table:table-cell table:formula="of:=AVERAGE([.M664:.M671])" office:value-type="float" office:value="153" calcext:value-type="float">
            <text:p>153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156" calcext:value-type="float">
            <text:p>156</text:p>
          </table:table-cell>
          <table:table-cell table:formula="of:=AVERAGE([.M665:.M672])" office:value-type="float" office:value="148.375" calcext:value-type="float">
            <text:p>148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132" calcext:value-type="float">
            <text:p>132</text:p>
          </table:table-cell>
          <table:table-cell table:formula="of:=AVERAGE([.M666:.M673])" office:value-type="float" office:value="147.625" calcext:value-type="float">
            <text:p>147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134" calcext:value-type="float">
            <text:p>134</text:p>
          </table:table-cell>
          <table:table-cell table:formula="of:=AVERAGE([.M667:.M674])" office:value-type="float" office:value="138.875" calcext:value-type="float">
            <text:p>138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145" calcext:value-type="float">
            <text:p>145</text:p>
          </table:table-cell>
          <table:table-cell table:formula="of:=AVERAGE([.M668:.M675])" office:value-type="float" office:value="137.875" calcext:value-type="float">
            <text:p>137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135" calcext:value-type="float">
            <text:p>135</text:p>
          </table:table-cell>
          <table:table-cell table:formula="of:=AVERAGE([.M669:.M676])" office:value-type="float" office:value="132.125" calcext:value-type="float">
            <text:p>132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147" calcext:value-type="float">
            <text:p>147</text:p>
          </table:table-cell>
          <table:table-cell table:formula="of:=AVERAGE([.M670:.M677])" office:value-type="float" office:value="130.375" calcext:value-type="float">
            <text:p>130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116" calcext:value-type="float">
            <text:p>116</text:p>
          </table:table-cell>
          <table:table-cell table:formula="of:=AVERAGE([.M671:.M678])" office:value-type="float" office:value="127.375" calcext:value-type="float">
            <text:p>127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138" calcext:value-type="float">
            <text:p>138</text:p>
          </table:table-cell>
          <table:table-cell table:formula="of:=AVERAGE([.M672:.M679])" office:value-type="float" office:value="120.625" calcext:value-type="float">
            <text:p>120.6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110" calcext:value-type="float">
            <text:p>110</text:p>
          </table:table-cell>
          <table:table-cell table:formula="of:=AVERAGE([.M673:.M680])" office:value-type="float" office:value="117.875" calcext:value-type="float">
            <text:p>117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118" calcext:value-type="float">
            <text:p>118</text:p>
          </table:table-cell>
          <table:table-cell table:formula="of:=AVERAGE([.M674:.M681])" office:value-type="float" office:value="110.125" calcext:value-type="float">
            <text:p>110.1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110" calcext:value-type="float">
            <text:p>110</text:p>
          </table:table-cell>
          <table:table-cell table:formula="of:=AVERAGE([.M675:.M682])" office:value-type="float" office:value="108.875" calcext:value-type="float">
            <text:p>108.8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91" calcext:value-type="float">
            <text:p>91</text:p>
          </table:table-cell>
          <table:table-cell table:formula="of:=AVERAGE([.M676:.M683])" office:value-type="float" office:value="101.375" calcext:value-type="float">
            <text:p>101.3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113" calcext:value-type="float">
            <text:p>113</text:p>
          </table:table-cell>
          <table:table-cell table:formula="of:=AVERAGE([.M677:.M684])" office:value-type="float" office:value="97.25" calcext:value-type="float">
            <text:p>97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85" calcext:value-type="float">
            <text:p>85</text:p>
          </table:table-cell>
          <table:table-cell table:formula="of:=AVERAGE([.M678:.M685])" office:value-type="float" office:value="93.5" calcext:value-type="float">
            <text:p>93.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106" calcext:value-type="float">
            <text:p>106</text:p>
          </table:table-cell>
          <table:table-cell table:formula="of:=AVERAGE([.M679:.M686])" office:value-type="float" office:value="89.75" calcext:value-type="float">
            <text:p>89.7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78" calcext:value-type="float">
            <text:p>78</text:p>
          </table:table-cell>
          <table:table-cell table:formula="of:=AVERAGE([.M680:.M687])" office:value-type="float" office:value="91.25" calcext:value-type="float">
            <text:p>91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77" calcext:value-type="float">
            <text:p>77</text:p>
          </table:table-cell>
          <table:table-cell table:formula="of:=AVERAGE([.M681:.M688])" office:value-type="float" office:value="87.25" calcext:value-type="float">
            <text:p>87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  <table:table-cell table:formula="of:=AVERAGE([.M682:.M689])" office:value-type="float" office:value="85.25" calcext:value-type="float">
            <text:p>85.25</text:p>
          </table:table-cell>
          <table:table-cell table:formula="of:=MAX([.$A$23])/2" office:value-type="float" office:value="552.3125" calcext:value-type="float">
            <text:p>552.3125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48" calcext:value-type="float">
            <text:p>48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Verify Counting Accuracy" table:style-name="ta1">
        <table:table-column table:style-name="co15" table:default-cell-style-name="Default"/>
        <table:table-column table:style-name="co16" table:default-cell-style-name="Default"/>
        <table:table-column table:style-name="co4" table:number-columns-repeated="1022" table:default-cell-style-name="Default"/>
        <table:table-row table:style-name="ro10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2" draw:text-style-name="P2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30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/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115" office:value-type="string" calcext:value-type="string">
            <text:p>Source Data</text:p>
          </table:table-cell>
          <table:table-cell table:style-name="ce117" table:number-columns-repeated="3"/>
          <table:table-cell table:style-name="ce118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116" office:value-type="string" calcext:value-type="string">
            <text:p>TotalCount4</text:p>
          </table:table-cell>
          <table:table-cell table:style-name="ce16" office:value-type="string" calcext:value-type="string">
            <text:p>TotalCount6</text:p>
          </table:table-cell>
          <table:table-cell table:style-name="ce16" office:value-type="string" calcext:value-type="string">
            <text:p>TotalCount14</text:p>
          </table:table-cell>
          <table:table-cell table:style-name="ce16" office:value-type="string" calcext:value-type="string">
            <text:p>TotalCount21</text:p>
          </table:table-cell>
          <table:table-cell table:style-name="ce119" office:value-type="string" calcext:value-type="string">
            <text:p>TotalCount25</text:p>
          </table:table-cell>
          <table:table-cell table:style-name="ce16"/>
          <table:table-cell/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/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493492" calcext:value-type="float">
            <text:p>493492</text:p>
          </table:table-cell>
          <table:table-cell office:value-type="float" office:value="148989" calcext:value-type="float">
            <text:p>148989</text:p>
          </table:table-cell>
          <table:table-cell office:value-type="float" office:value="3833" calcext:value-type="float">
            <text:p>3833</text:p>
          </table:table-cell>
          <table:table-cell office:value-type="float" office:value="1112" calcext:value-type="float">
            <text:p>1112</text:p>
          </table:table-cell>
          <table:table-cell office:value-type="float" office:value="619" calcext:value-type="float">
            <text:p>619</text:p>
          </table:table-cell>
          <table:table-cell table:style-name="ce16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485020" calcext:value-type="float">
            <text:p>485020</text:p>
          </table:table-cell>
          <table:table-cell office:value-type="float" office:value="140780" calcext:value-type="float">
            <text:p>140780</text:p>
          </table:table-cell>
          <table:table-cell office:value-type="float" office:value="3037" calcext:value-type="float">
            <text:p>3037</text:p>
          </table:table-cell>
          <table:table-cell office:value-type="float" office:value="892" calcext:value-type="float">
            <text:p>892</text:p>
          </table:table-cell>
          <table:table-cell office:value-type="float" office:value="466" calcext:value-type="float">
            <text:p>466</text:p>
          </table:table-cell>
          <table:table-cell table:style-name="ce16"/>
          <table:table-cell/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/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480652" calcext:value-type="float">
            <text:p>480652</text:p>
          </table:table-cell>
          <table:table-cell office:value-type="float" office:value="138406" calcext:value-type="float">
            <text:p>138406</text:p>
          </table:table-cell>
          <table:table-cell office:value-type="float" office:value="2930" calcext:value-type="float">
            <text:p>2930</text:p>
          </table:table-cell>
          <table:table-cell office:value-type="float" office:value="1035" calcext:value-type="float">
            <text:p>1035</text:p>
          </table:table-cell>
          <table:table-cell office:value-type="float" office:value="621" calcext:value-type="float">
            <text:p>621</text:p>
          </table:table-cell>
          <table:table-cell table:style-name="ce16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473976" calcext:value-type="float">
            <text:p>473976</text:p>
          </table:table-cell>
          <table:table-cell office:value-type="float" office:value="137633" calcext:value-type="float">
            <text:p>137633</text:p>
          </table:table-cell>
          <table:table-cell office:value-type="float" office:value="2715" calcext:value-type="float">
            <text:p>2715</text:p>
          </table:table-cell>
          <table:table-cell office:value-type="float" office:value="836" calcext:value-type="float">
            <text:p>836</text:p>
          </table:table-cell>
          <table:table-cell office:value-type="float" office:value="548" calcext:value-type="float">
            <text:p>548</text:p>
          </table:table-cell>
          <table:table-cell table:style-name="ce16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468082" calcext:value-type="float">
            <text:p>468082</text:p>
          </table:table-cell>
          <table:table-cell office:value-type="float" office:value="137340" calcext:value-type="float">
            <text:p>137340</text:p>
          </table:table-cell>
          <table:table-cell office:value-type="float" office:value="2232" calcext:value-type="float">
            <text:p>2232</text:p>
          </table:table-cell>
          <table:table-cell office:value-type="float" office:value="931" calcext:value-type="float">
            <text:p>931</text:p>
          </table:table-cell>
          <table:table-cell office:value-type="float" office:value="465" calcext:value-type="float">
            <text:p>465</text:p>
          </table:table-cell>
          <table:table-cell table:style-name="ce16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175" table:formula="of:=SUM([.A24:.A28])/5/100" office:value-type="float" office:value="4802.444" calcext:value-type="float">
            <text:p>4802.444</text:p>
          </table:table-cell>
          <table:table-cell table:style-name="ce179" table:formula="of:=SUM([.B24:.B28])/5/100" office:value-type="float" office:value="1406.296" calcext:value-type="float">
            <text:p>1406.296</text:p>
          </table:table-cell>
          <table:table-cell table:style-name="ce28" table:formula="of:=SUM([.C24:.C28])/5/100" office:value-type="float" office:value="29.494" calcext:value-type="float">
            <text:p>29.494</text:p>
          </table:table-cell>
          <table:table-cell table:style-name="ce28" table:formula="of:=SUM([.D24:.D28])/5/100" office:value-type="float" office:value="9.612" calcext:value-type="float">
            <text:p>9.612</text:p>
          </table:table-cell>
          <table:table-cell table:style-name="ce28" table:formula="of:=SUM([.E24:.E28])/5/100" office:value-type="float" office:value="5.438" calcext:value-type="float">
            <text:p>5.438</text:p>
          </table:table-cell>
          <table:table-cell table:style-name="ce16" office:value-type="string" calcext:value-type="string">
            <text:p>/ml</text:p>
          </table:table-cell>
          <table:table-cell/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/>
          <table:table-cell table:style-name="ce28" office:value-type="string" calcext:value-type="string">
            <text:p>~Raw Counts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20" office:value-type="string" calcext:value-type="string">
            <text:p>Portion </text:p>
          </table:table-cell>
          <table:table-cell table:style-name="ce122" office:value-type="string" calcext:value-type="string">
            <text:p>&gt;4μm(c)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6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14u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1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5μm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20" table:formula="of:=[.A24]*[.$B$18]" office:value-type="float" office:value="34544.44" calcext:value-type="float">
            <text:p>34544</text:p>
          </table:table-cell>
          <table:table-cell table:style-name="ce21" table:formula="of:=([.B35]-[.B$47])/[.B$47]" office:value-type="percentage" office:value="0.0275851212424341" calcext:value-type="percentage">
            <text:p>2.76%</text:p>
          </table:table-cell>
          <table:table-cell table:style-name="ce20" table:formula="of:=[.B24]*[.$B$18]" office:value-type="float" office:value="10429.23" calcext:value-type="float">
            <text:p>10429</text:p>
          </table:table-cell>
          <table:table-cell table:style-name="ce21" table:formula="of:=([.D35]-[.D$47])/[.D$47]" office:value-type="percentage" office:value="0.0594426777861846" calcext:value-type="percentage">
            <text:p>5.94%</text:p>
          </table:table-cell>
          <table:table-cell table:style-name="ce20" table:formula="of:=[.C24]*[.$B$18]" office:value-type="float" office:value="268.31" calcext:value-type="float">
            <text:p>268</text:p>
          </table:table-cell>
          <table:table-cell table:style-name="ce21" table:formula="of:=([.F35]-[.F$47])/[.F$47]" office:value-type="percentage" office:value="0.299586356547094" calcext:value-type="percentage">
            <text:p>29.96%</text:p>
          </table:table-cell>
          <table:table-cell table:style-name="ce20" table:formula="of:=[.D24]*[.$B$18]" office:value-type="float" office:value="77.84" calcext:value-type="float">
            <text:p>78</text:p>
          </table:table-cell>
          <table:table-cell table:style-name="ce21" table:formula="of:=([.H35]-[.H$47])/[.H$47]" office:value-type="percentage" office:value="0.156887224302955" calcext:value-type="percentage">
            <text:p>15.69%</text:p>
          </table:table-cell>
          <table:table-cell table:style-name="ce20" table:formula="of:=[.E24]*[.$B$18]" office:value-type="float" office:value="43.33" calcext:value-type="float">
            <text:p>43</text:p>
          </table:table-cell>
          <table:table-cell table:style-name="ce21" table:formula="of:=([.J35]-[.J$47])/[.J$47]" office:value-type="percentage" office:value="0.138286134608312" calcext:value-type="percentage">
            <text:p>13.83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20" table:formula="of:=[.A25]*[.$B$18]" office:value-type="float" office:value="33951.4" calcext:value-type="float">
            <text:p>33951</text:p>
          </table:table-cell>
          <table:table-cell table:style-name="ce21" table:formula="of:=([.B36]-[.B$47])/[.B$47]" office:value-type="percentage" office:value="0.00994410346065465" calcext:value-type="percentage">
            <text:p>0.99%</text:p>
          </table:table-cell>
          <table:table-cell table:style-name="ce20" table:formula="of:=[.B25]*[.$B$18]" office:value-type="float" office:value="9854.6" calcext:value-type="float">
            <text:p>9855</text:p>
          </table:table-cell>
          <table:table-cell table:style-name="ce21" table:formula="of:=([.D36]-[.D$47])/[.D$47]" office:value-type="percentage" office:value="0.0010694761273587" calcext:value-type="percentage">
            <text:p>0.11%</text:p>
          </table:table-cell>
          <table:table-cell table:style-name="ce20" table:formula="of:=[.C25]*[.$B$18]" office:value-type="float" office:value="212.59" calcext:value-type="float">
            <text:p>213</text:p>
          </table:table-cell>
          <table:table-cell table:style-name="ce21" table:formula="of:=([.F36]-[.F$47])/[.F$47]" office:value-type="percentage" office:value="0.02970095612667" calcext:value-type="percentage">
            <text:p>2.97%</text:p>
          </table:table-cell>
          <table:table-cell table:style-name="ce20" table:formula="of:=[.D25]*[.$B$18]" office:value-type="float" office:value="62.44" calcext:value-type="float">
            <text:p>62</text:p>
          </table:table-cell>
          <table:table-cell table:style-name="ce21" table:formula="of:=([.H36]-[.H$47])/[.H$47]" office:value-type="percentage" office:value="-0.071993341656263" calcext:value-type="percentage">
            <text:p>-7.20%</text:p>
          </table:table-cell>
          <table:table-cell table:style-name="ce20" table:formula="of:=[.E25]*[.$B$18]" office:value-type="float" office:value="32.62" calcext:value-type="float">
            <text:p>33</text:p>
          </table:table-cell>
          <table:table-cell table:style-name="ce21" table:formula="of:=([.J36]-[.J$47])/[.J$47]" office:value-type="percentage" office:value="-0.14306730415594" calcext:value-type="percentage">
            <text:p>-14.31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20" table:formula="of:=[.A26]*[.$B$18]" office:value-type="float" office:value="33645.64" calcext:value-type="float">
            <text:p>33646</text:p>
          </table:table-cell>
          <table:table-cell table:style-name="ce21" table:formula="of:=([.B37]-[.B$47])/[.B$47]" office:value-type="percentage" office:value="0.000848734519340763" calcext:value-type="percentage">
            <text:p>0.08%</text:p>
          </table:table-cell>
          <table:table-cell table:style-name="ce20" table:formula="of:=[.B26]*[.$B$18]" office:value-type="float" office:value="9688.42" calcext:value-type="float">
            <text:p>9688</text:p>
          </table:table-cell>
          <table:table-cell table:style-name="ce21" table:formula="of:=([.D37]-[.D$47])/[.D$47]" office:value-type="percentage" office:value="-0.0158117494467737" calcext:value-type="percentage">
            <text:p>-1.58%</text:p>
          </table:table-cell>
          <table:table-cell table:style-name="ce20" table:formula="of:=[.C26]*[.$B$18]" office:value-type="float" office:value="205.1" calcext:value-type="float">
            <text:p>205</text:p>
          </table:table-cell>
          <table:table-cell table:style-name="ce21" table:formula="of:=([.F37]-[.F$47])/[.F$47]" office:value-type="percentage" office:value="-0.00657760900522128" calcext:value-type="percentage">
            <text:p>-0.66%</text:p>
          </table:table-cell>
          <table:table-cell table:style-name="ce20" table:formula="of:=[.D26]*[.$B$18]" office:value-type="float" office:value="72.45" calcext:value-type="float">
            <text:p>72</text:p>
          </table:table-cell>
          <table:table-cell table:style-name="ce21" table:formula="of:=([.H37]-[.H$47])/[.H$47]" office:value-type="percentage" office:value="0.0767790262172284" calcext:value-type="percentage">
            <text:p>7.68%</text:p>
          </table:table-cell>
          <table:table-cell table:style-name="ce20" table:formula="of:=[.E26]*[.$B$18]" office:value-type="float" office:value="43.47" calcext:value-type="float">
            <text:p>43</text:p>
          </table:table-cell>
          <table:table-cell table:style-name="ce21" table:formula="of:=([.J37]-[.J$47])/[.J$47]" office:value-type="percentage" office:value="0.141963957337256" calcext:value-type="percentage">
            <text:p>14.2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20" table:formula="of:=[.A27]*[.$B$18]" office:value-type="float" office:value="33178.32" calcext:value-type="float">
            <text:p>33178</text:p>
          </table:table-cell>
          <table:table-cell table:style-name="ce21" table:formula="of:=([.B38]-[.B$47])/[.B$47]" office:value-type="percentage" office:value="-0.0130525207581806" calcext:value-type="percentage">
            <text:p>-1.31%</text:p>
          </table:table-cell>
          <table:table-cell table:style-name="ce20" table:formula="of:=[.B27]*[.$B$18]" office:value-type="float" office:value="9634.31" calcext:value-type="float">
            <text:p>9634</text:p>
          </table:table-cell>
          <table:table-cell table:style-name="ce21" table:formula="of:=([.D38]-[.D$47])/[.D$47]" office:value-type="percentage" office:value="-0.0213084585322008" calcext:value-type="percentage">
            <text:p>-2.13%</text:p>
          </table:table-cell>
          <table:table-cell table:style-name="ce20" table:formula="of:=[.C27]*[.$B$18]" office:value-type="float" office:value="190.05" calcext:value-type="float">
            <text:p>190</text:p>
          </table:table-cell>
          <table:table-cell table:style-name="ce21" table:formula="of:=([.F38]-[.F$47])/[.F$47]" office:value-type="percentage" office:value="-0.0794737912795822" calcext:value-type="percentage">
            <text:p>-7.95%</text:p>
          </table:table-cell>
          <table:table-cell table:style-name="ce20" table:formula="of:=[.D27]*[.$B$18]" office:value-type="float" office:value="58.52" calcext:value-type="float">
            <text:p>59</text:p>
          </table:table-cell>
          <table:table-cell table:style-name="ce21" table:formula="of:=([.H38]-[.H$47])/[.H$47]" office:value-type="percentage" office:value="-0.130253849354973" calcext:value-type="percentage">
            <text:p>-13.03%</text:p>
          </table:table-cell>
          <table:table-cell table:style-name="ce20" table:formula="of:=[.E27]*[.$B$18]" office:value-type="float" office:value="38.36" calcext:value-type="float">
            <text:p>38</text:p>
          </table:table-cell>
          <table:table-cell table:style-name="ce21" table:formula="of:=([.J38]-[.J$47])/[.J$47]" office:value-type="percentage" office:value="0.00772342773078329" calcext:value-type="percentage">
            <text:p>0.77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20" table:formula="of:=[.A28]*[.$B$18]" office:value-type="float" office:value="32765.74" calcext:value-type="float">
            <text:p>32766</text:p>
          </table:table-cell>
          <table:table-cell table:style-name="ce21" table:formula="of:=([.B39]-[.B$47])/[.B$47]" office:value-type="percentage" office:value="-0.0253254384642486" calcext:value-type="percentage">
            <text:p>-2.53%</text:p>
          </table:table-cell>
          <table:table-cell table:style-name="ce20" table:formula="of:=[.B28]*[.$B$18]" office:value-type="float" office:value="9613.8" calcext:value-type="float">
            <text:p>9614</text:p>
          </table:table-cell>
          <table:table-cell table:style-name="ce21" table:formula="of:=([.D39]-[.D$47])/[.D$47]" office:value-type="percentage" office:value="-0.0233919459345684" calcext:value-type="percentage">
            <text:p>-2.34%</text:p>
          </table:table-cell>
          <table:table-cell table:style-name="ce20" table:formula="of:=[.C28]*[.$B$18]" office:value-type="float" office:value="156.24" calcext:value-type="float">
            <text:p>156</text:p>
          </table:table-cell>
          <table:table-cell table:style-name="ce21" table:formula="of:=([.F39]-[.F$47])/[.F$47]" office:value-type="percentage" office:value="-0.24323591238896" calcext:value-type="percentage">
            <text:p>-24.32%</text:p>
          </table:table-cell>
          <table:table-cell table:style-name="ce20" table:formula="of:=[.D28]*[.$B$18]" office:value-type="float" office:value="65.17" calcext:value-type="float">
            <text:p>65</text:p>
          </table:table-cell>
          <table:table-cell table:style-name="ce21" table:formula="of:=([.H39]-[.H$47])/[.H$47]" office:value-type="percentage" office:value="-0.0314190595089472" calcext:value-type="percentage">
            <text:p>-3.14%</text:p>
          </table:table-cell>
          <table:table-cell table:style-name="ce20" table:formula="of:=[.E28]*[.$B$18]" office:value-type="float" office:value="32.55" calcext:value-type="float">
            <text:p>33</text:p>
          </table:table-cell>
          <table:table-cell table:style-name="ce21" table:formula="of:=([.J39]-[.J$47])/[.J$47]" office:value-type="percentage" office:value="-0.144906215520412" calcext:value-type="percentage">
            <text:p>-14.49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style-name="ce20" table:formula="of:=SUM([.B35:.B39])" office:value-type="float" office:value="168085.54" calcext:value-type="float">
            <text:p>168086</text:p>
          </table:table-cell>
          <table:table-cell table:style-name="ce20"/>
          <table:table-cell table:style-name="ce20" table:formula="of:=SUM([.D35:.D39])" office:value-type="float" office:value="49220.36" calcext:value-type="float">
            <text:p>49220</text:p>
          </table:table-cell>
          <table:table-cell table:style-name="ce20"/>
          <table:table-cell table:style-name="ce20" table:formula="of:=SUM([.F35:.F39])" office:value-type="float" office:value="1032.29" calcext:value-type="float">
            <text:p>1032</text:p>
          </table:table-cell>
          <table:table-cell table:style-name="ce20"/>
          <table:table-cell table:style-name="ce20" table:formula="of:=SUM([.H35:.H39])" office:value-type="float" office:value="336.42" calcext:value-type="float">
            <text:p>336</text:p>
          </table:table-cell>
          <table:table-cell table:style-name="ce20"/>
          <table:table-cell table:style-name="ce20" table:formula="of:=SUM([.J35:.J39])" office:value-type="float" office:value="190.33" calcext:value-type="float">
            <text:p>190</text:p>
          </table:table-cell>
          <table:table-cell table:number-columns-repeated="1014"/>
        </table:table-row>
        <table:table-row table:style-name="ro2">
          <table:table-cell table:style-name="ce121" office:value-type="string" calcext:value-type="string">
            <text:p>X /ml</text:p>
          </table:table-cell>
          <table:table-cell table:style-name="ce20" table:formula="of:=[.B44]/[.$B$19]" office:value-type="float" office:value="4802.444" calcext:value-type="float">
            <text:p>4802</text:p>
          </table:table-cell>
          <table:table-cell table:style-name="ce20"/>
          <table:table-cell table:style-name="ce20" table:formula="of:=[.D44]/[.$B$19]" office:value-type="float" office:value="1406.296" calcext:value-type="float">
            <text:p>1406</text:p>
          </table:table-cell>
          <table:table-cell table:style-name="ce20"/>
          <table:table-cell table:style-name="ce20" table:formula="of:=[.F44]/[.$B$19]" office:value-type="float" office:value="29.494" calcext:value-type="float">
            <text:p>29</text:p>
          </table:table-cell>
          <table:table-cell table:style-name="ce20"/>
          <table:table-cell table:style-name="ce20" table:formula="of:=[.H44]/[.$B$19]" office:value-type="float" office:value="9.612" calcext:value-type="float">
            <text:p>10</text:p>
          </table:table-cell>
          <table:table-cell table:style-name="ce20"/>
          <table:table-cell table:style-name="ce20" table:formula="of:=[.J44]/[.$B$19]" office:value-type="float" office:value="5.438" calcext:value-type="float">
            <text:p>5</text:p>
          </table:table-cell>
          <table:table-cell table:number-columns-repeated="2"/>
          <table:table-cell table:style-name="ce2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20" table:formula="of:=AVERAGE([.B35:.B39])" office:value-type="float" office:value="33617.108" calcext:value-type="float">
            <text:p>33617</text:p>
          </table:table-cell>
          <table:table-cell/>
          <table:table-cell table:style-name="ce20" table:formula="of:=AVERAGE([.D35:.D39])" office:value-type="float" office:value="9844.072" calcext:value-type="float">
            <text:p>9844</text:p>
          </table:table-cell>
          <table:table-cell/>
          <table:table-cell table:style-name="ce20" table:formula="of:=AVERAGE([.F35:.F39])" office:value-type="float" office:value="206.458" calcext:value-type="float">
            <text:p>206</text:p>
          </table:table-cell>
          <table:table-cell/>
          <table:table-cell table:style-name="ce20" table:formula="of:=AVERAGE([.H35:.H39])" office:value-type="float" office:value="67.284" calcext:value-type="float">
            <text:p>67</text:p>
          </table:table-cell>
          <table:table-cell/>
          <table:table-cell table:style-name="ce20" table:formula="of:=AVERAGE([.J35:.J39])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20" table:formula="of:=STDEVP([.B35:.B39])" office:value-type="float" office:value="614.796264608041" calcext:value-type="float">
            <text:p>615</text:p>
          </table:table-cell>
          <table:table-cell/>
          <table:table-cell table:style-name="ce20" table:formula="of:=STDEVP([.D35:.D39])" office:value-type="float" office:value="304.556582421067" calcext:value-type="float">
            <text:p>305</text:p>
          </table:table-cell>
          <table:table-cell/>
          <table:table-cell table:style-name="ce20" table:formula="of:=STDEVP([.F35:.F39])" office:value-type="float" office:value="36.4861219643853" calcext:value-type="float">
            <text:p>36</text:p>
          </table:table-cell>
          <table:table-cell/>
          <table:table-cell table:style-name="ce20" table:formula="of:=STDEVP([.H35:.H39])" office:value-type="float" office:value="6.9693288055594" calcext:value-type="float">
            <text:p>7</text:p>
          </table:table-cell>
          <table:table-cell/>
          <table:table-cell table:style-name="ce20" table:formula="of:=STDEVP([.J35:.J39])" office:value-type="float" office:value="4.83910156950647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20" table:formula="of:=[.B45]*[.$B$20]" office:value-type="float" office:value="33617.108" calcext:value-type="float">
            <text:p>33617</text:p>
          </table:table-cell>
          <table:table-cell table:style-name="ce20"/>
          <table:table-cell table:style-name="ce20" table:formula="of:=[.D45]*[.$B$20]" office:value-type="float" office:value="9844.072" calcext:value-type="float">
            <text:p>9844</text:p>
          </table:table-cell>
          <table:table-cell table:style-name="ce20"/>
          <table:table-cell table:style-name="ce20" table:formula="of:=[.F45]*[.$B$20]" office:value-type="float" office:value="206.458" calcext:value-type="float">
            <text:p>206</text:p>
          </table:table-cell>
          <table:table-cell table:style-name="ce20"/>
          <table:table-cell table:style-name="ce20" table:formula="of:=[.H45]*[.$B$20]" office:value-type="float" office:value="67.284" calcext:value-type="float">
            <text:p>67</text:p>
          </table:table-cell>
          <table:table-cell table:style-name="ce20"/>
          <table:table-cell table:style-name="ce20" table:formula="of:=[.J45]*[.$B$20]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formula="of:=[.$B$14]*[.B49]" office:value-type="float" office:value="168085.54" calcext:value-type="float">
            <text:p>168085.54</text:p>
          </table:table-cell>
          <table:table-cell/>
          <table:table-cell table:formula="of:=[.$B$14]*[.D49]" office:value-type="float" office:value="49220.36" calcext:value-type="float">
            <text:p>49220.36</text:p>
          </table:table-cell>
          <table:table-cell/>
          <table:table-cell table:formula="of:=[.$B$14]*[.F49]" office:value-type="float" office:value="1032.29" calcext:value-type="float">
            <text:p>1032.29</text:p>
          </table:table-cell>
          <table:table-cell/>
          <table:table-cell table:formula="of:=[.$B$14]*[.H49]" office:value-type="float" office:value="336.42" calcext:value-type="float">
            <text:p>336.42</text:p>
          </table:table-cell>
          <table:table-cell/>
          <table:table-cell table:formula="of:=[.$B$14]*[.J49]" office:value-type="float" office:value="190.33" calcext:value-type="float">
            <text:p>190.33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21" table:formula="of:=[.B48]/[.B47]" office:value-type="percentage" office:value="0.0182881961353737" calcext:value-type="percentage">
            <text:p>1.83%</text:p>
          </table:table-cell>
          <table:table-cell/>
          <table:table-cell table:style-name="ce21" table:formula="of:=[.D48]/[.D47]" office:value-type="percentage" office:value="0.0309380693701821" calcext:value-type="percentage">
            <text:p>3.09%</text:p>
          </table:table-cell>
          <table:table-cell/>
          <table:table-cell table:style-name="ce21" table:formula="of:=[.F48]/[.F47]" office:value-type="percentage" office:value="0.176724185860491" calcext:value-type="percentage">
            <text:p>17.67%</text:p>
          </table:table-cell>
          <table:table-cell/>
          <table:table-cell table:style-name="ce21" table:formula="of:=[.H48]/[.H47]" office:value-type="percentage" office:value="0.103580774115085" calcext:value-type="percentage">
            <text:p>10.36%</text:p>
          </table:table-cell>
          <table:table-cell/>
          <table:table-cell table:style-name="ce21" table:formula="of:=[.J48]/[.J47]" office:value-type="percentage" office:value="0.127123983857155" calcext:value-type="percentage">
            <text:p>12.71%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D<text:span text:style-name="T7">Q</text:span></text:p>
          </table:table-cell>
          <table:table-cell table:style-name="ce181" table:formula="of:=(MAX([.B35:.B39])-MIN([.B35:.B39]))/[.B47]" office:value-type="percentage" office:value="0.0529105597066827" calcext:value-type="percentage">
            <text:p>5.29%</text:p>
          </table:table-cell>
          <table:table-cell/>
          <table:table-cell table:style-name="ce181" table:formula="of:=(MAX([.D35:.D39])-MIN([.D35:.D39]))/[.D47]" office:value-type="percentage" office:value="0.082834623720753" calcext:value-type="percentage">
            <text:p>8.28%</text:p>
          </table:table-cell>
          <table:table-cell/>
          <table:table-cell table:style-name="ce123" table:formula="of:=(MAX([.F35:.F39])-MIN([.F35:.F39]))/[.F47]" office:value-type="percentage" office:value="0.542822268936055" calcext:value-type="percentage">
            <text:p>54.28%</text:p>
          </table:table-cell>
          <table:table-cell/>
          <table:table-cell table:style-name="ce123" table:formula="of:=(MAX([.H35:.H39])-MIN([.H35:.H39]))/[.H47]" office:value-type="percentage" office:value="0.287141073657928" calcext:value-type="percentage">
            <text:p>28.71%</text:p>
          </table:table-cell>
          <table:table-cell/>
          <table:table-cell table:style-name="ce123" table:formula="of:=(MAX([.J35:.J39])-MIN([.J35:.J39]))/[.J47]" office:value-type="percentage" office:value="0.286870172857668" calcext:value-type="percentage">
            <text:p>28.69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7">QMAX</text:span>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8"/>
          <table:table-cell table:number-columns-repeated="2"/>
          <table:table-cell table:style-name="ce16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J$23],[.$K$23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J$25],[.$K$25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</calcext:conditional-formats>
      </table:table>
      <table:table table:name="Interpolated Thresholds" table:style-name="ta1">
        <table:shapes>
          <draw:frame draw:z-index="0" draw:style-name="gr3" draw:text-style-name="P2" svg:width="32.899cm" svg:height="18.505cm" svg:x="29.977cm" svg:y="4.671cm">
            <draw:object draw:notify-on-update-of-ranges="'Interpolated Thresholds'.G4:'Interpolated Thresholds'.G20 'Interpolated Thresholds'.K3:'Interpolated Thresholds'.K3 'Interpolated Thresholds'.K4:'Interpolated Thresholds'.K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0" table:default-cell-style-name="Default"/>
        <table:table-column table:style-name="co17" table:default-cell-style-name="Default"/>
        <table:table-row table:style-name="ro11">
          <table:table-cell/>
          <table:table-cell table:style-name="ce261" table:number-columns-repeated="4"/>
          <table:table-cell table:style-name="ce261" office:value-type="string" calcext:value-type="string" table:number-columns-spanned="5" table:number-rows-spanned="1">
            <text:p>Enter all of the threshold  settings determined in 6.3 in column A <text:span text:style-name="T14">in order of decreasing value of threshold  setting</text:span><text:span text:style-name="T15">. For each calibration suspension sample, enter the  values of X̅</text:span><text:span text:style-name="T16">N</text:span><text:span text:style-name="T17"> obtained for each threshold setting actually used for a sample in the a</text:span></text:p>
          </table:table-cell>
          <table:covered-table-cell table:style-name="ce261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261"/>
          <table:covered-table-cell/>
          <table:table-cell/>
        </table:table-row>
        <table:table-row table:style-name="ro11">
          <table:table-cell/>
          <table:table-cell table:style-name="ce210" office:value-type="string" calcext:value-type="string">
            <text:p>X̅<text:span text:style-name="T12">N</text:span><text:span text:style-name="T13"> for First Sample</text:span></text:p>
          </table:table-cell>
          <table:table-cell table:style-name="ce210" office:value-type="string" calcext:value-type="string">
            <text:p>X̅<text:span text:style-name="T12">N</text:span><text:span text:style-name="T13"> for Second Sample</text:span></text:p>
          </table:table-cell>
          <table:table-cell table:style-name="ce210" office:value-type="string" calcext:value-type="string">
            <text:p>X̅<text:span text:style-name="T12">N</text:span><text:span text:style-name="T13"> for Third Sample</text:span></text:p>
          </table:table-cell>
          <table:table-cell table:style-name="ce210" office:value-type="string" calcext:value-type="string">
            <text:p>Mean X̅<text:span text:style-name="T12">N</text:span><text:span text:style-name="T13"> </text:span></text:p>
          </table:table-cell>
          <table:table-cell table:style-name="ce208" office:value-type="string" calcext:value-type="string">
            <text:p>Threshold Voltage Setting</text:p>
          </table:table-cell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 table:number-columns-repeated="2"/>
        </table:table-row>
        <table:table-row table:style-name="ro12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office:value-type="string" calcext:value-type="string">
            <text:p>Threshold</text:p>
          </table:table-cell>
        </table:table-row>
        <table:table-row table:style-name="ro2">
          <table:table-cell/>
          <table:table-cell table:number-columns-repeated="3" table:style-name="ce211" office:value-type="float" office:value="8856.13885672138" calcext:value-type="float">
            <text:p>8856.13885672138</text:p>
          </table:table-cell>
          <table:table-cell table:style-name="ce212" table:formula="of:=AVERAGE([.B4:.D4])" office:value-type="float" office:value="8856.13885672138" calcext:value-type="float">
            <text:p>8856.13885672138</text:p>
          </table:table-cell>
          <table:table-cell table:style-name="ce267" office:value-type="float" office:value="137.1" calcext:value-type="float">
            <text:p>137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10898.56" calcext:value-type="float">
            <text:p>10898.56</text:p>
          </table:table-cell>
          <table:table-cell table:style-name="ce216" table:formula="of:=cubicspline([.H4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4];[.B$4:.B$20];[.F$4:.F$20])" office:value-type="float" office:value="88.9616468555664" calcext:value-type="float">
            <text:p>88.9616468555664</text:p>
          </table:table-cell>
          <table:table-cell table:style-name="ce237" table:formula="of:=ASTROS.MONTEZUMA.CALCTOOLS.CALCFUNCTIONS.PYTHON.INTERPOLATIONIMPL.CERCHA([.H4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7778.70460536144" calcext:value-type="float">
            <text:p>7778.70460536144</text:p>
          </table:table-cell>
          <table:table-cell table:style-name="ce212" table:formula="of:=AVERAGE([.B5:.D5])" office:value-type="float" office:value="7778.70460536144" calcext:value-type="float">
            <text:p>7778.70460536144</text:p>
          </table:table-cell>
          <table:table-cell table:style-name="ce267" office:value-type="float" office:value="162.494327047856" calcext:value-type="float">
            <text:p>162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986.32" calcext:value-type="float">
            <text:p>6986.32</text:p>
          </table:table-cell>
          <table:table-cell table:style-name="ce216" table:formula="of:=cubicspline([.H5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5];[.B$4:.B$20];[.F$4:.F$20])" office:value-type="float" office:value="186.438243506716" calcext:value-type="float">
            <text:p>186.438243506716</text:p>
          </table:table-cell>
          <table:table-cell table:style-name="ce237" table:formula="of:=ASTROS.MONTEZUMA.CALCTOOLS.CALCFUNCTIONS.PYTHON.INTERPOLATIONIMPL.CERCHA([.H5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6782.66112274753" calcext:value-type="float">
            <text:p>6782.66112274753</text:p>
          </table:table-cell>
          <table:table-cell table:style-name="ce212" table:formula="of:=AVERAGE([.B6:.D6])" office:value-type="float" office:value="6782.66112274753" calcext:value-type="float">
            <text:p>6782.66112274753</text:p>
          </table:table-cell>
          <table:table-cell table:style-name="ce267" office:value-type="float" office:value="192.592314534906" calcext:value-type="float">
            <text:p>193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4679.65" calcext:value-type="float">
            <text:p>4679.65</text:p>
          </table:table-cell>
          <table:table-cell table:style-name="ce216" table:formula="of:=cubicspline([.H6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6];[.B$4:.B$20];[.F$4:.F$20])" office:value-type="float" office:value="283.730743276893" calcext:value-type="float">
            <text:p>283.730743276893</text:p>
          </table:table-cell>
          <table:table-cell table:style-name="ce237" table:formula="of:=ASTROS.MONTEZUMA.CALCTOOLS.CALCFUNCTIONS.PYTHON.INTERPOLATIONIMPL.CERCHA([.H6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5602.03324464103" calcext:value-type="float">
            <text:p>5602.03324464103</text:p>
          </table:table-cell>
          <table:table-cell table:style-name="ce212" table:formula="of:=AVERAGE([.B7:.D7])" office:value-type="float" office:value="5602.03324464103" calcext:value-type="float">
            <text:p>5602.03324464103</text:p>
          </table:table-cell>
          <table:table-cell table:style-name="ce267" office:value-type="float" office:value="228.265197264323" calcext:value-type="float">
            <text:p>228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3163.23" calcext:value-type="float">
            <text:p>3163.23</text:p>
          </table:table-cell>
          <table:table-cell table:style-name="ce216" table:formula="of:=cubicspline([.H7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7];[.B$4:.B$20];[.F$4:.F$20])" office:value-type="float" office:value="429.094273591617" calcext:value-type="float">
            <text:p>429.094273591617</text:p>
          </table:table-cell>
          <table:table-cell table:style-name="ce237" table:formula="of:=ASTROS.MONTEZUMA.CALCTOOLS.CALCFUNCTIONS.PYTHON.INTERPOLATIONIMPL.CERCHA([.H7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4858.433286199" calcext:value-type="float">
            <text:p>4858.433286199</text:p>
          </table:table-cell>
          <table:table-cell table:style-name="ce212" table:formula="of:=AVERAGE([.B8:.D8])" office:value-type="float" office:value="4858.433286199" calcext:value-type="float">
            <text:p>4858.433286199</text:p>
          </table:table-cell>
          <table:table-cell table:style-name="ce267" office:value-type="float" office:value="270.545584375728" calcext:value-type="float">
            <text:p>271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2175.47" calcext:value-type="float">
            <text:p>2175.47</text:p>
          </table:table-cell>
          <table:table-cell table:style-name="ce216" table:formula="of:=cubicspline([.H8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8];[.B$4:.B$20];[.F$4:.F$20])" office:value-type="float" office:value="596.767596729671" calcext:value-type="float">
            <text:p>596.767596729671</text:p>
          </table:table-cell>
          <table:table-cell table:style-name="ce237" table:formula="of:=ASTROS.MONTEZUMA.CALCTOOLS.CALCFUNCTIONS.PYTHON.INTERPOLATIONIMPL.CERCHA([.H8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4178.94613085206" calcext:value-type="float">
            <text:p>4178.94613085206</text:p>
          </table:table-cell>
          <table:table-cell table:style-name="ce212" table:formula="of:=AVERAGE([.B9:.D9])" office:value-type="float" office:value="4178.94613085206" calcext:value-type="float">
            <text:p>4178.94613085206</text:p>
          </table:table-cell>
          <table:table-cell table:style-name="ce267" office:value-type="float" office:value="320.657349882588" calcext:value-type="float">
            <text:p>321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512.11" calcext:value-type="float">
            <text:p>1512.11</text:p>
          </table:table-cell>
          <table:table-cell table:style-name="ce216" table:formula="of:=cubicspline([.H9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9];[.B$4:.B$20];[.F$4:.F$20])" office:value-type="float" office:value="791.794719097826" calcext:value-type="float">
            <text:p>791.794719097826</text:p>
          </table:table-cell>
          <table:table-cell table:style-name="ce237" table:formula="of:=ASTROS.MONTEZUMA.CALCTOOLS.CALCFUNCTIONS.PYTHON.INTERPOLATIONIMPL.CERCHA([.H9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3562.74088910748" calcext:value-type="float">
            <text:p>3562.74088910748</text:p>
          </table:table-cell>
          <table:table-cell table:style-name="ce212" table:formula="of:=AVERAGE([.B10:.D10])" office:value-type="float" office:value="3562.74088910748" calcext:value-type="float">
            <text:p>3562.74088910748</text:p>
          </table:table-cell>
          <table:table-cell table:style-name="ce267" office:value-type="float" office:value="380.051059679943" calcext:value-type="float">
            <text:p>380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1079.78" calcext:value-type="float">
            <text:p>1079.78</text:p>
          </table:table-cell>
          <table:table-cell table:style-name="ce216" table:formula="of:=cubicspline([.H10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0];[.B$4:.B$20];[.F$4:.F$20])" office:value-type="float" office:value="1007.84868229376" calcext:value-type="float">
            <text:p>1007.84868229376</text:p>
          </table:table-cell>
          <table:table-cell table:style-name="ce237" table:formula="of:=ASTROS.MONTEZUMA.CALCTOOLS.CALCFUNCTIONS.PYTHON.INTERPOLATIONIMPL.CERCHA([.H10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2989.29703871799" calcext:value-type="float">
            <text:p>2989.29703871799</text:p>
          </table:table-cell>
          <table:table-cell table:style-name="ce212" table:formula="of:=AVERAGE([.B11:.D11])" office:value-type="float" office:value="2989.29703871799" calcext:value-type="float">
            <text:p>2989.29703871799</text:p>
          </table:table-cell>
          <table:table-cell table:style-name="ce267" office:value-type="float" office:value="450.445960514347" calcext:value-type="float">
            <text:p>450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786.62" calcext:value-type="float">
            <text:p>786.62</text:p>
          </table:table-cell>
          <table:table-cell table:style-name="ce216" table:formula="of:=cubicspline([.H11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1];[.B$4:.B$20];[.F$4:.F$20])" office:value-type="float" office:value="1246.26187243161" calcext:value-type="float">
            <text:p>1246.26187243161</text:p>
          </table:table-cell>
          <table:table-cell table:style-name="ce237" table:formula="of:=ASTROS.MONTEZUMA.CALCTOOLS.CALCFUNCTIONS.PYTHON.INTERPOLATIONIMPL.CERCHA([.H11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2466.51867007481" calcext:value-type="float">
            <text:p>2466.51867007481</text:p>
          </table:table-cell>
          <table:table-cell table:style-name="ce212" table:formula="of:=AVERAGE([.B12:.D12])" office:value-type="float" office:value="2466.51867007481" calcext:value-type="float">
            <text:p>2466.51867007481</text:p>
          </table:table-cell>
          <table:table-cell table:style-name="ce267" office:value-type="float" office:value="533.879746354515" calcext:value-type="float">
            <text:p>534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586.06" calcext:value-type="float">
            <text:p>586.06</text:p>
          </table:table-cell>
          <table:table-cell table:style-name="ce216" table:formula="of:=cubicspline([.H12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2];[.B$4:.B$20];[.F$4:.F$20])" office:value-type="float" office:value="1529.71482298498" calcext:value-type="float">
            <text:p>1529.71482298498</text:p>
          </table:table-cell>
          <table:table-cell table:style-name="ce237" table:formula="of:=ASTROS.MONTEZUMA.CALCTOOLS.CALCFUNCTIONS.PYTHON.INTERPOLATIONIMPL.CERCHA([.H12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2008.86013269156" calcext:value-type="float">
            <text:p>2008.86013269156</text:p>
          </table:table-cell>
          <table:table-cell table:style-name="ce212" table:formula="of:=AVERAGE([.B13:.D13])" office:value-type="float" office:value="2008.86013269156" calcext:value-type="float">
            <text:p>2008.86013269156</text:p>
          </table:table-cell>
          <table:table-cell table:style-name="ce267" office:value-type="float" office:value="632.76754273054" calcext:value-type="float">
            <text:p>633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449.93" calcext:value-type="float">
            <text:p>449.93</text:p>
          </table:table-cell>
          <table:table-cell table:style-name="ce216" table:formula="of:=cubicspline([.H13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3];[.B$4:.B$20];[.F$4:.F$20])" office:value-type="float" office:value="1825.76788155803" calcext:value-type="float">
            <text:p>1825.76788155803</text:p>
          </table:table-cell>
          <table:table-cell table:style-name="ce237" table:formula="of:=ASTROS.MONTEZUMA.CALCTOOLS.CALCFUNCTIONS.PYTHON.INTERPOLATIONIMPL.CERCHA([.H13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1612.44115090677" calcext:value-type="float">
            <text:p>1612.44115090677</text:p>
          </table:table-cell>
          <table:table-cell table:style-name="ce212" table:formula="of:=AVERAGE([.B14:.D14])" office:value-type="float" office:value="1612.44115090677" calcext:value-type="float">
            <text:p>1612.44115090677</text:p>
          </table:table-cell>
          <table:table-cell table:style-name="ce267" office:value-type="float" office:value="749.971816438546" calcext:value-type="float">
            <text:p>750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352.62" calcext:value-type="float">
            <text:p>352.62</text:p>
          </table:table-cell>
          <table:table-cell table:style-name="ce216" table:formula="of:=cubicspline([.H14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4];[.B$4:.B$20];[.F$4:.F$20])" office:value-type="float" office:value="2116.05660923878" calcext:value-type="float">
            <text:p>2116.05660923878</text:p>
          </table:table-cell>
          <table:table-cell table:style-name="ce237" table:formula="of:=ASTROS.MONTEZUMA.CALCTOOLS.CALCFUNCTIONS.PYTHON.INTERPOLATIONIMPL.CERCHA([.H14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1279.19447981943" calcext:value-type="float">
            <text:p>1279.19447981943</text:p>
          </table:table-cell>
          <table:table-cell table:style-name="ce212" table:formula="of:=AVERAGE([.B15:.D15])" office:value-type="float" office:value="1279.19447981943" calcext:value-type="float">
            <text:p>1279.19447981943</text:p>
          </table:table-cell>
          <table:table-cell table:style-name="ce267" office:value-type="float" office:value="888.885234259955" calcext:value-type="float">
            <text:p>889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282.04" calcext:value-type="float">
            <text:p>282.04</text:p>
          </table:table-cell>
          <table:table-cell table:style-name="ce216" table:formula="of:=cubicspline([.H15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5];[.B$4:.B$20];[.F$4:.F$20])" office:value-type="float" office:value="2326.60617659781" calcext:value-type="float">
            <text:p>2326.60617659781</text:p>
          </table:table-cell>
          <table:table-cell table:style-name="ce237" table:formula="of:=ASTROS.MONTEZUMA.CALCTOOLS.CALCFUNCTIONS.PYTHON.INTERPOLATIONIMPL.CERCHA([.H15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1003.2078187505" calcext:value-type="float">
            <text:p>1003.2078187505</text:p>
          </table:table-cell>
          <table:table-cell table:style-name="ce212" table:formula="of:=AVERAGE([.B16:.D16])" office:value-type="float" office:value="1003.2078187505" calcext:value-type="float">
            <text:p>1003.2078187505</text:p>
          </table:table-cell>
          <table:table-cell table:style-name="ce267" office:value-type="float" office:value="1053.52886917467" calcext:value-type="float">
            <text:p>1,054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229.42" calcext:value-type="float">
            <text:p>229.42</text:p>
          </table:table-cell>
          <table:table-cell table:style-name="ce216" table:formula="of:=cubicspline([.H16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6];[.B$4:.B$20];[.F$4:.F$20])" office:value-type="float" office:value="2483.57866504259" calcext:value-type="float">
            <text:p>2483.57866504259</text:p>
          </table:table-cell>
          <table:table-cell table:style-name="ce237" table:formula="of:=ASTROS.MONTEZUMA.CALCTOOLS.CALCFUNCTIONS.PYTHON.INTERPOLATIONIMPL.CERCHA([.H16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783.915392207583" calcext:value-type="float">
            <text:p>783.915392207583</text:p>
          </table:table-cell>
          <table:table-cell table:style-name="ce212" table:formula="of:=AVERAGE([.B17:.D17])" office:value-type="float" office:value="783.915392207583" calcext:value-type="float">
            <text:p>783.915392207583</text:p>
          </table:table-cell>
          <table:table-cell table:style-name="ce267" office:value-type="float" office:value="1248.66859680545" calcext:value-type="float">
            <text:p>1,249</text:p>
          </table:table-cell>
          <table:table-cell table:style-name="ce215" office:value-type="float" office:value="17" calcext:value-type="float">
            <text:p>17</text:p>
          </table:table-cell>
          <table:table-cell table:style-name="ce215" office:value-type="float" office:value="186.1" calcext:value-type="float">
            <text:p>186.1</text:p>
          </table:table-cell>
          <table:table-cell table:style-name="ce216" table:formula="of:=cubicspline([.H17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7];[.B$4:.B$20];[.F$4:.F$20])" office:value-type="float" office:value="2612.80801128789" calcext:value-type="float">
            <text:p>2612.80801128789</text:p>
          </table:table-cell>
          <table:table-cell table:style-name="ce237" table:formula="of:=ASTROS.MONTEZUMA.CALCTOOLS.CALCFUNCTIONS.PYTHON.INTERPOLATIONIMPL.CERCHA([.H17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610.922436488596" calcext:value-type="float">
            <text:p>610.922436488596</text:p>
          </table:table-cell>
          <table:table-cell table:style-name="ce212" table:formula="of:=AVERAGE([.B18:.D18])" office:value-type="float" office:value="610.922436488596" calcext:value-type="float">
            <text:p>610.922436488596</text:p>
          </table:table-cell>
          <table:table-cell table:style-name="ce267" office:value-type="float" office:value="1479.95305137631" calcext:value-type="float">
            <text:p>1,480</text:p>
          </table:table-cell>
          <table:table-cell table:style-name="ce215" office:value-type="float" office:value="18" calcext:value-type="float">
            <text:p>18</text:p>
          </table:table-cell>
          <table:table-cell table:style-name="ce215" office:value-type="float" office:value="153.87" calcext:value-type="float">
            <text:p>153.87</text:p>
          </table:table-cell>
          <table:table-cell table:style-name="ce216" table:formula="of:=cubicspline([.H18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8];[.B$4:.B$20];[.F$4:.F$20])" office:value-type="float" office:value="2708.95440624371" calcext:value-type="float">
            <text:p>2708.95440624371</text:p>
          </table:table-cell>
          <table:table-cell table:style-name="ce237" table:formula="of:=ASTROS.MONTEZUMA.CALCTOOLS.CALCFUNCTIONS.PYTHON.INTERPOLATIONIMPL.CERCHA([.H18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473.962027174428" calcext:value-type="float">
            <text:p>473.962027174428</text:p>
          </table:table-cell>
          <table:table-cell table:style-name="ce212" table:formula="of:=AVERAGE([.B19:.D19])" office:value-type="float" office:value="473.962027174428" calcext:value-type="float">
            <text:p>473.962027174428</text:p>
          </table:table-cell>
          <table:table-cell table:style-name="ce267" office:value-type="float" office:value="1754.07713454278" calcext:value-type="float">
            <text:p>1,754</text:p>
          </table:table-cell>
          <table:table-cell table:style-name="ce215" office:value-type="float" office:value="19" calcext:value-type="float">
            <text:p>19</text:p>
          </table:table-cell>
          <table:table-cell table:style-name="ce215" office:value-type="float" office:value="128.62" calcext:value-type="float">
            <text:p>128.62</text:p>
          </table:table-cell>
          <table:table-cell table:style-name="ce216" table:formula="of:=cubicspline([.H19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19];[.B$4:.B$20];[.F$4:.F$20])" office:value-type="float" office:value="2784.27852888207" calcext:value-type="float">
            <text:p>2784.27852888207</text:p>
          </table:table-cell>
          <table:table-cell table:style-name="ce237" table:formula="of:=ASTROS.MONTEZUMA.CALCTOOLS.CALCFUNCTIONS.PYTHON.INTERPOLATIONIMPL.CERCHA([.H19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365.050150460889" calcext:value-type="float">
            <text:p>365.050150460889</text:p>
          </table:table-cell>
          <table:table-cell table:style-name="ce212" table:formula="of:=AVERAGE([.B20:.D20])" office:value-type="float" office:value="365.050150460889" calcext:value-type="float">
            <text:p>365.050150460889</text:p>
          </table:table-cell>
          <table:table-cell table:style-name="ce267" office:value-type="float" office:value="2078.97581012079" calcext:value-type="float">
            <text:p>2,079</text:p>
          </table:table-cell>
          <table:table-cell table:style-name="ce215" office:value-type="float" office:value="20" calcext:value-type="float">
            <text:p>20</text:p>
          </table:table-cell>
          <table:table-cell table:style-name="ce215" office:value-type="float" office:value="107.35" calcext:value-type="float">
            <text:p>107.35</text:p>
          </table:table-cell>
          <table:table-cell table:style-name="ce216" table:formula="of:=cubicspline([.H20];[.$E$5:.$E$107];[.$F$5:.$F$107])" office:value-type="string" office:string-value="" calcext:value-type="error">
            <text:p>#NAME?</text:p>
          </table:table-cell>
          <table:table-cell table:formula="of:=ASTROS.MONTEZUMA.CALCTOOLS.CALCFUNCTIONS.PYTHON.INTERPOLATIONIMPL.INTERPO([.H20];[.B$4:.B$20];[.F$4:.F$20])" office:value-type="float" office:value="2847.72977991248" calcext:value-type="float">
            <text:p>2847.72977991248</text:p>
          </table:table-cell>
          <table:table-cell table:style-name="ce237" table:formula="of:=ASTROS.MONTEZUMA.CALCTOOLS.CALCFUNCTIONS.PYTHON.INTERPOLATIONIMPL.CERCHA([.H20];[.$E$4:.$F$20];&quot;pp&quot;;0;0)" office:value-type="string" office:string-value="Data must be order in ascending" calcext:value-type="string">
            <text:p>Data must be order in ascending</text:p>
          </table:table-cell>
        </table:table-row>
        <table:table-row table:style-name="ro2">
          <table:table-cell/>
          <table:table-cell table:number-columns-repeated="3" table:style-name="ce211" office:value-type="float" office:value="280.09363013896" calcext:value-type="float">
            <text:p>280.09363013896</text:p>
          </table:table-cell>
          <table:table-cell table:style-name="ce212" table:formula="of:=AVERAGE([.B21:.D21])" office:value-type="float" office:value="280.09363013896" calcext:value-type="float">
            <text:p>280.09363013896</text:p>
          </table:table-cell>
          <table:table-cell table:style-name="ce267" office:value-type="float" office:value="2464.05379441539" calcext:value-type="float">
            <text:p>2,464</text:p>
          </table:table-cell>
          <table:table-cell table:style-name="ce215" table:number-columns-repeated="2"/>
          <table:table-cell table:style-name="ce216" table:formula="of:=cubicspline([.H2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215.251276661682" calcext:value-type="float">
            <text:p>215.251276661682</text:p>
          </table:table-cell>
          <table:table-cell table:style-name="ce212" table:formula="of:=AVERAGE([.B22:.D22])" office:value-type="float" office:value="215.251276661682" calcext:value-type="float">
            <text:p>215.251276661682</text:p>
          </table:table-cell>
          <table:table-cell table:style-name="ce267" office:value-type="float" office:value="2920.45779090624" calcext:value-type="float">
            <text:p>2,920</text:p>
          </table:table-cell>
          <table:table-cell table:style-name="ce215" table:number-columns-repeated="2"/>
          <table:table-cell table:style-name="ce216" table:formula="of:=cubicspline([.H2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149.66120368649" calcext:value-type="float">
            <text:p>149.66120368649</text:p>
          </table:table-cell>
          <table:table-cell table:style-name="ce212" table:formula="of:=AVERAGE([.B23:.D23])" office:value-type="float" office:value="149.66120368649" calcext:value-type="float">
            <text:p>149.66120368649</text:p>
          </table:table-cell>
          <table:table-cell table:style-name="ce267" office:value-type="float" office:value="3461.3991495622" calcext:value-type="float">
            <text:p>3,461</text:p>
          </table:table-cell>
          <table:table-cell table:style-name="ce215" table:number-columns-repeated="2"/>
          <table:table-cell table:style-name="ce216" table:formula="of:=cubicspline([.H2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129.134213341579" calcext:value-type="float">
            <text:p>129.134213341579</text:p>
          </table:table-cell>
          <table:table-cell table:style-name="ce212" table:formula="of:=AVERAGE([.B24:.D24])" office:value-type="float" office:value="129.134213341579" calcext:value-type="float">
            <text:p>129.134213341579</text:p>
          </table:table-cell>
          <table:table-cell table:style-name="ce267" office:value-type="float" office:value="4102.5362906793" calcext:value-type="float">
            <text:p>4,103</text:p>
          </table:table-cell>
          <table:table-cell table:style-name="ce215" table:number-columns-repeated="2"/>
          <table:table-cell table:style-name="ce216" table:formula="of:=cubicspline([.H2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97.2400647640878" calcext:value-type="float">
            <text:p>97.2400647640878</text:p>
          </table:table-cell>
          <table:table-cell table:style-name="ce212" table:formula="of:=AVERAGE([.B25:.D25])" office:value-type="float" office:value="97.2400647640878" calcext:value-type="float">
            <text:p>97.2400647640878</text:p>
          </table:table-cell>
          <table:table-cell table:style-name="ce267" office:value-type="float" office:value="4862.427963117" calcext:value-type="float">
            <text:p>4,862</text:p>
          </table:table-cell>
          <table:table-cell table:style-name="ce215" table:number-columns-repeated="2"/>
          <table:table-cell table:style-name="ce216" table:formula="of:=cubicspline([.H2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69.9458255624436" calcext:value-type="float">
            <text:p>69.9458255624436</text:p>
          </table:table-cell>
          <table:table-cell table:style-name="ce212" table:formula="of:=AVERAGE([.B26:.D26])" office:value-type="float" office:value="69.9458255624436" calcext:value-type="float">
            <text:p>69.9458255624436</text:p>
          </table:table-cell>
          <table:table-cell table:style-name="ce267" office:value-type="float" office:value="5763.07045722374" calcext:value-type="float">
            <text:p>5,763</text:p>
          </table:table-cell>
          <table:table-cell table:style-name="ce215" table:number-columns-repeated="2"/>
          <table:table-cell table:style-name="ce216" table:formula="of:=cubicspline([.H2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50.250133313533" calcext:value-type="float">
            <text:p>50.250133313533</text:p>
          </table:table-cell>
          <table:table-cell table:style-name="ce212" table:formula="of:=AVERAGE([.B27:.D27])" office:value-type="float" office:value="50.250133313533" calcext:value-type="float">
            <text:p>50.250133313533</text:p>
          </table:table-cell>
          <table:table-cell table:style-name="ce267" office:value-type="float" office:value="6830.53432294641" calcext:value-type="float">
            <text:p>6,831</text:p>
          </table:table-cell>
          <table:table-cell table:style-name="ce215" table:number-columns-repeated="2"/>
          <table:table-cell table:style-name="ce216" table:formula="of:=cubicspline([.H2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34.8357359807558" calcext:value-type="float">
            <text:p>34.8357359807558</text:p>
          </table:table-cell>
          <table:table-cell table:style-name="ce212" table:formula="of:=AVERAGE([.B28:.D28])" office:value-type="float" office:value="34.8357359807558" calcext:value-type="float">
            <text:p>34.8357359807558</text:p>
          </table:table-cell>
          <table:table-cell table:style-name="ce267" office:value-type="float" office:value="8095.71902395668" calcext:value-type="float">
            <text:p>8,096</text:p>
          </table:table-cell>
          <table:table-cell table:style-name="ce215" table:number-columns-repeated="2"/>
          <table:table-cell table:style-name="ce216" table:formula="of:=cubicspline([.H2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23.8955537245117" calcext:value-type="float">
            <text:p>23.8955537245117</text:p>
          </table:table-cell>
          <table:table-cell table:style-name="ce212" table:formula="of:=AVERAGE([.B29:.D29])" office:value-type="float" office:value="23.8955537245117" calcext:value-type="float">
            <text:p>23.8955537245117</text:p>
          </table:table-cell>
          <table:table-cell table:style-name="ce267" office:value-type="float" office:value="9595.24737247533" calcext:value-type="float">
            <text:p>9,595</text:p>
          </table:table-cell>
          <table:table-cell table:style-name="ce215" table:number-columns-repeated="2"/>
          <table:table-cell table:style-name="ce216" table:formula="of:=cubicspline([.H2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16.4834969098295" calcext:value-type="float">
            <text:p>16.4834969098295</text:p>
          </table:table-cell>
          <table:table-cell table:style-name="ce212" table:formula="of:=AVERAGE([.B30:.D30])" office:value-type="float" office:value="16.4834969098295" calcext:value-type="float">
            <text:p>16.4834969098295</text:p>
          </table:table-cell>
          <table:table-cell table:style-name="ce267" office:value-type="float" office:value="11372.5256356535" calcext:value-type="float">
            <text:p>11,373</text:p>
          </table:table-cell>
          <table:table-cell table:style-name="ce215" table:number-columns-repeated="2"/>
          <table:table-cell table:style-name="ce216" table:formula="of:=cubicspline([.H3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10.6304411783269" calcext:value-type="float">
            <text:p>10.6304411783269</text:p>
          </table:table-cell>
          <table:table-cell table:style-name="ce212" table:formula="of:=AVERAGE([.B31:.D31])" office:value-type="float" office:value="10.6304411783269" calcext:value-type="float">
            <text:p>10.6304411783269</text:p>
          </table:table-cell>
          <table:table-cell table:style-name="ce267" office:value-type="float" office:value="13479" calcext:value-type="float">
            <text:p>13,479</text:p>
          </table:table-cell>
          <table:table-cell table:style-name="ce215" table:number-columns-repeated="2"/>
          <table:table-cell table:style-name="ce216" table:formula="of:=cubicspline([.H3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0.834088040704329" calcext:value-type="float">
            <text:p>0.834088040704329</text:p>
          </table:table-cell>
          <table:table-cell table:style-name="ce212" table:formula="of:=AVERAGE([.B32:.D32])" office:value-type="float" office:value="0.834088040704329" calcext:value-type="float">
            <text:p>0.834088040704329</text:p>
          </table:table-cell>
          <table:table-cell table:style-name="ce267"/>
          <table:table-cell table:style-name="ce215" table:number-columns-repeated="2"/>
          <table:table-cell table:style-name="ce216" table:formula="of:=cubicspline([.H3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211" office:value-type="float" office:value="0.2940786998523" calcext:value-type="float">
            <text:p>0.2940786998523</text:p>
          </table:table-cell>
          <table:table-cell table:style-name="ce212" table:formula="of:=AVERAGE([.B33:.D33])" office:value-type="float" office:value="0.2940786998523" calcext:value-type="float">
            <text:p>0.2940786998523</text:p>
          </table:table-cell>
          <table:table-cell table:style-name="ce267"/>
          <table:table-cell table:style-name="ce215" table:number-columns-repeated="2"/>
          <table:table-cell table:style-name="ce216" table:formula="of:=cubicspline([.H3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4:.D34])" office:value-type="string" office:string-value="" calcext:value-type="error">
            <text:p>#DIV/0!</text:p>
          </table:table-cell>
          <table:table-cell table:style-name="ce267"/>
          <table:table-cell table:style-name="ce215" table:number-columns-repeated="2"/>
          <table:table-cell table:style-name="ce216" table:formula="of:=cubicspline([.H3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5:.D3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6:.D3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7:.D3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8:.D3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9:.D3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0:.D4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1:.D4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2:.D4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3:.D4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4:.D4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5:.D4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6:.D4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7:.D4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8:.D4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9:.D4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0:.D5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1:.D5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2:.D5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3:.D5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4:.D5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5:.D5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6:.D5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7:.D5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8:.D5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9:.D5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0:.D6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1:.D6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2:.D6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3:.D6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4:.D6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5:.D6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6:.D6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7:.D6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8:.D6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9:.D6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0:.D7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1:.D7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2:.D7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3:.D7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4:.D7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5:.D7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6:.D7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7:.D7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8:.D7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9:.D7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0:.D8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1:.D8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2:.D8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3:.D8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4:.D8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5:.D8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6:.D8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7:.D8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8:.D8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9:.D8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0:.D9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1:.D9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2:.D9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3:.D9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4:.D9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5:.D9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6:.D9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7:.D9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7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8:.D9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8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9:.D9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9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0:.D10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0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1:.D10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1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2:.D10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2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3:.D10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3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4:.D10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4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5:.D10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5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6:.D10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6];[.$E$5:.$E$107];[.$F$5:.$F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 table:number-rows-repeated="104846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alibration Curve" table:style-name="ta1">
        <table:table-column table:style-name="co4" table:number-columns-repeated="2" table:default-cell-style-name="ce220"/>
        <table:table-column table:style-name="co4" table:default-cell-style-name="ce226"/>
        <table:table-column table:style-name="co4" table:default-cell-style-name="ce227"/>
        <table:table-column table:style-name="co4" table:number-columns-repeated="2" table:default-cell-style-name="Default"/>
        <table:table-row table:style-name="ro2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2"/>
        </table:table-row>
        <table:table-row table:style-name="ro13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4">in order of increasing value of particle size</text:span><text:span text:style-name="T15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4">in order of increasing particle size</text:span><text:span text:style-name="T15">. The corresponding interpolated threshold voltage settings are displayed in column D.</text:span></text:p>
          </table:table-cell>
          <table:covered-table-cell table:style-name="ce221"/>
          <table:table-cell table:number-columns-repeated="2"/>
        </table:table-row>
        <table:table-row table:style-name="ro11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/>
          <table:table-cell>
            <draw:frame draw:z-index="0" draw:name="Image 1" draw:style-name="gr2" draw:text-style-name="P2" svg:width="17.843cm" svg:height="10.528cm" svg:x="0cm" svg:y="0cm">
              <draw:image xlink:href="Pictures/2000007D000045B400002921584DA5A7.svm" xlink:type="simple" xlink:show="embed" xlink:actuate="onLoad" draw:mime-type="image/x-svm">
                <text:p/>
              </draw:image>
              <draw:image xlink:href="Pictures/100000010000049D000002B90C97F7FB.png" xlink:type="simple" xlink:show="embed" xlink:actuate="onLoad" draw:mime-type="image/png"/>
            </draw:frame>
          </table:table-cell>
        </table:table-row>
        <table:table-row table:style-name="ro2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2"/>
        </table:table-row>
        <table:table-row table:style-name="ro2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288.533289835876" calcext:value-type="float">
            <text:p>288.5</text:p>
          </table:table-cell>
          <table:table-cell table:style-name="ce215" office:value-type="float" office:value="4" calcext:value-type="float">
            <text:p>4</text:p>
          </table:table-cell>
          <table:table-cell table:formula="of:=cubicspline([.C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350.917591323559" calcext:value-type="float">
            <text:p>350.9</text:p>
          </table:table-cell>
          <table:table-cell table:style-name="ce215" office:value-type="float" office:value="5" calcext:value-type="float">
            <text:p>5</text:p>
          </table:table-cell>
          <table:table-cell table:formula="of:=cubicspline([.C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410.457606797449" calcext:value-type="float">
            <text:p>410.5</text:p>
          </table:table-cell>
          <table:table-cell table:style-name="ce215" office:value-type="float" office:value="6" calcext:value-type="float">
            <text:p>6</text:p>
          </table:table-cell>
          <table:table-cell table:formula="of:=cubicspline([.C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489.281772940465" calcext:value-type="float">
            <text:p>489.3</text:p>
          </table:table-cell>
          <table:table-cell table:style-name="ce215" office:value-type="float" office:value="7" calcext:value-type="float">
            <text:p>7</text:p>
          </table:table-cell>
          <table:table-cell table:formula="of:=cubicspline([.C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577.63032403" calcext:value-type="float">
            <text:p>577.6</text:p>
          </table:table-cell>
          <table:table-cell table:style-name="ce215" office:value-type="float" office:value="8" calcext:value-type="float">
            <text:p>8</text:p>
          </table:table-cell>
          <table:table-cell table:formula="of:=cubicspline([.C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697.558919975182" calcext:value-type="float">
            <text:p>697.6</text:p>
          </table:table-cell>
          <table:table-cell table:style-name="ce215" office:value-type="float" office:value="9" calcext:value-type="float">
            <text:p>9</text:p>
          </table:table-cell>
          <table:table-cell table:formula="of:=cubicspline([.C1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0" calcext:value-type="float">
            <text:p>10</text:p>
          </table:table-cell>
          <table:table-cell table:style-name="ce224" office:value-type="float" office:value="779.213849415308" calcext:value-type="float">
            <text:p>779</text:p>
          </table:table-cell>
          <table:table-cell table:style-name="ce215" office:value-type="float" office:value="10" calcext:value-type="float">
            <text:p>10</text:p>
          </table:table-cell>
          <table:table-cell table:formula="of:=cubicspline([.C1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1" calcext:value-type="float">
            <text:p>11</text:p>
          </table:table-cell>
          <table:table-cell table:style-name="ce224" office:value-type="float" office:value="906.5507936103" calcext:value-type="float">
            <text:p>907</text:p>
          </table:table-cell>
          <table:table-cell table:style-name="ce215" office:value-type="float" office:value="11" calcext:value-type="float">
            <text:p>11</text:p>
          </table:table-cell>
          <table:table-cell table:formula="of:=cubicspline([.C1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2" calcext:value-type="float">
            <text:p>12</text:p>
          </table:table-cell>
          <table:table-cell table:style-name="ce224" office:value-type="float" office:value="1010.49852830053" calcext:value-type="float">
            <text:p>1010</text:p>
          </table:table-cell>
          <table:table-cell table:style-name="ce215" office:value-type="float" office:value="12" calcext:value-type="float">
            <text:p>12</text:p>
          </table:table-cell>
          <table:table-cell table:formula="of:=cubicspline([.C1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3" calcext:value-type="float">
            <text:p>13</text:p>
          </table:table-cell>
          <table:table-cell table:style-name="ce224" office:value-type="float" office:value="1150.07" calcext:value-type="float">
            <text:p>1150</text:p>
          </table:table-cell>
          <table:table-cell table:style-name="ce215" office:value-type="float" office:value="13" calcext:value-type="float">
            <text:p>13</text:p>
          </table:table-cell>
          <table:table-cell table:formula="of:=cubicspline([.C1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4" calcext:value-type="float">
            <text:p>14</text:p>
          </table:table-cell>
          <table:table-cell table:style-name="ce224" office:value-type="float" office:value="1243.4425078424" calcext:value-type="float">
            <text:p>1243</text:p>
          </table:table-cell>
          <table:table-cell table:style-name="ce215" office:value-type="float" office:value="14" calcext:value-type="float">
            <text:p>14</text:p>
          </table:table-cell>
          <table:table-cell table:formula="of:=cubicspline([.C1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5" calcext:value-type="float">
            <text:p>15</text:p>
          </table:table-cell>
          <table:table-cell table:style-name="ce224" office:value-type="float" office:value="1331.0034543104" calcext:value-type="float">
            <text:p>1331</text:p>
          </table:table-cell>
          <table:table-cell table:style-name="ce215" office:value-type="float" office:value="15" calcext:value-type="float">
            <text:p>15</text:p>
          </table:table-cell>
          <table:table-cell table:formula="of:=cubicspline([.C1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6" calcext:value-type="float">
            <text:p>16</text:p>
          </table:table-cell>
          <table:table-cell table:style-name="ce224" office:value-type="float" office:value="1441.16" calcext:value-type="float">
            <text:p>1441</text:p>
          </table:table-cell>
          <table:table-cell table:style-name="ce215" office:value-type="float" office:value="16" calcext:value-type="float">
            <text:p>16</text:p>
          </table:table-cell>
          <table:table-cell table:formula="of:=cubicspline([.C1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7" calcext:value-type="float">
            <text:p>17</text:p>
          </table:table-cell>
          <table:table-cell table:style-name="ce224" office:value-type="float" office:value="1527.8" calcext:value-type="float">
            <text:p>1528</text:p>
          </table:table-cell>
          <table:table-cell table:style-name="ce215" office:value-type="float" office:value="17" calcext:value-type="float">
            <text:p>17</text:p>
          </table:table-cell>
          <table:table-cell table:formula="of:=cubicspline([.C1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8" calcext:value-type="float">
            <text:p>18</text:p>
          </table:table-cell>
          <table:table-cell table:style-name="ce224" office:value-type="float" office:value="1592.26" calcext:value-type="float">
            <text:p>1592</text:p>
          </table:table-cell>
          <table:table-cell table:style-name="ce215" office:value-type="float" office:value="18" calcext:value-type="float">
            <text:p>18</text:p>
          </table:table-cell>
          <table:table-cell table:formula="of:=cubicspline([.C1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19" calcext:value-type="float">
            <text:p>19</text:p>
          </table:table-cell>
          <table:table-cell table:style-name="ce224" office:value-type="float" office:value="1642.76" calcext:value-type="float">
            <text:p>1643</text:p>
          </table:table-cell>
          <table:table-cell table:style-name="ce215" office:value-type="float" office:value="19" calcext:value-type="float">
            <text:p>19</text:p>
          </table:table-cell>
          <table:table-cell table:formula="of:=cubicspline([.C2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5" office:value-type="float" office:value="20" calcext:value-type="float">
            <text:p>20</text:p>
          </table:table-cell>
          <table:table-cell table:style-name="ce224" office:value-type="float" office:value="1685.3" calcext:value-type="float">
            <text:p>1685</text:p>
          </table:table-cell>
          <table:table-cell table:style-name="ce215" office:value-type="float" office:value="20" calcext:value-type="float">
            <text:p>20</text:p>
          </table:table-cell>
          <table:table-cell table:formula="of:=cubicspline([.C2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style-name="ce219"/>
          <table:table-cell table:style-name="ce224"/>
          <table:table-cell table:style-name="ce225"/>
          <table:table-cell table:formula="of:=cubicspline([.C2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2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2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2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2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2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2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2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5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5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7];[.$A$5:.$A$107];[.$B$5:.$B$107])" office:value-type="string" office:string-value="" calcext:value-type="error">
            <text:p>#NAME?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Annex B Coincidence Limit'.R1:'Annex B Coincidence Limit'.R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20:34:50.7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5-04T12:01:40.817000000</dc:date>
    <meta:editing-duration>P6DT9H22M13S</meta:editing-duration>
    <meta:editing-cycles>226</meta:editing-cycles>
    <meta:generator>LibreOffice/7.6.4.1$Windows_X86_64 LibreOffice_project/e19e193f88cd6c0525a17fb7a176ed8e6a3e2aa1</meta:generator>
    <dc:title>ISO111171:2020</dc:title>
    <meta:document-statistic meta:table-count="12" meta:cell-count="6154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cm" svg:height="18.506cm" xlink:href=".." xlink:type="simple" chart:class="chart:scatter" chart:style-name="ch1">
        <chart:plot-area chart:style-name="ch2" table:cell-range-address="'Interpolated Thresholds'.G4:'Interpolated Thresholds'.G20 'Interpolated Thresholds'.K3:'Interpolated Thresholds'.K20" chart:data-source-has-labels="row" svg:x="1.647cm" svg:y="0.37cm" svg:width="30.595cm" svg:height="16.807cm">
          <chart:coordinate-region svg:x="2.291cm" svg:y="0.568cm" svg:width="29.754cm" svg:height="15.965cm"/>
          <chart:axis chart:dimension="x" chart:name="primary-x" chart:style-name="ch3">
            <chart:title svg:x="16.479cm" svg:y="17.547cm" chart:style-name="ch4">
              <text:p>um(c)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556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Interpolated Thresholds'.K4:'Interpolated Thresholds'.K20" chart:label-cell-address="'Interpolated Thresholds'.K3:'Interpolated Thresholds'.K3" chart:class="chart:scatter">
            <chart:domain table:cell-range-address="'Interpolated Thresholds'.G4:'Interpolated Thresholds'.G20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hreshold</text:p>
                <draw:g>
                  <svg:desc>'Interpolated Thresholds'.K3:'Interpolated Thresholds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nterpolated Thresholds'.G4:'Interpolated Thresholds'.G20</svg:desc>
                </draw:g>
              </table:table-cell>
              <table:table-cell office:value-type="float" office:value="NaN">
                <text:p>NaN</text:p>
                <draw:g>
                  <svg:desc>'Interpolated Thresholds'.K4:'Interpolated Thresholds'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9cm" svg:y="4.844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6.024cm" svg:height="10.349cm">
          <chart:coordinate-region svg:x="1.42cm" svg:y="0.414cm" svg:width="14.592cm" svg:height="9.5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4">
                <text:p>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">
                <text:p>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">
                <text:p>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">
                <text:p>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6">
                <text:p>6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">
                <text:p>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7">
                <text:p>7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">
                <text:p>6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6">
                <text:p>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4">
                <text:p>4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5">
                <text:p>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7">
                <text:p>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4">
                <text:p>4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5">
                <text:p>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7">
                <text:p>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5">
                <text:p>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5">
                <text:p>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8">
                <text:p>8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8">
                <text:p>8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5">
                <text:p>5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0">
                <text:p>10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4">
                <text:p>1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9">
                <text:p>9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8">
                <text:p>8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">
                <text:p>9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5">
                <text:p>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3">
                <text:p>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3">
                <text:p>1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8">
                <text:p>8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1">
                <text:p>11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6">
                <text:p>6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1">
                <text:p>11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">
                <text:p>11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1">
                <text:p>21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7">
                <text:p>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1">
                <text:p>21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7">
                <text:p>17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3">
                <text:p>13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7">
                <text:p>17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25">
                <text:p>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7">
                <text:p>17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4">
                <text:p>1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26">
                <text:p>26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9">
                <text:p>19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4">
                <text:p>24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2">
                <text:p>2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8">
                <text:p>18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6">
                <text:p>26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4">
                <text:p>24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1">
                <text:p>31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9">
                <text:p>29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43">
                <text:p>43</text:p>
              </table:table-cell>
              <table:table-cell office:value-type="float" office:value="32.375">
                <text:p>32.3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4">
                <text:p>34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1">
                <text:p>31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43">
                <text:p>43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45">
                <text:p>45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2">
                <text:p>32</text:p>
              </table:table-cell>
              <table:table-cell office:value-type="float" office:value="38.875">
                <text:p>38.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1">
                <text:p>31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48">
                <text:p>48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8">
                <text:p>3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50">
                <text:p>50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68">
                <text:p>68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2">
                <text:p>42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8">
                <text:p>58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">
                <text:p>66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69">
                <text:p>69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84">
                <text:p>84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98">
                <text:p>98</text:p>
              </table:table-cell>
              <table:table-cell office:value-type="float" office:value="87.125">
                <text:p>87.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87">
                <text:p>87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89">
                <text:p>89</text:p>
              </table:table-cell>
              <table:table-cell office:value-type="float" office:value="96.125">
                <text:p>96.1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95">
                <text:p>95</text:p>
              </table:table-cell>
              <table:table-cell office:value-type="float" office:value="99.875">
                <text:p>99.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09">
                <text:p>109</text:p>
              </table:table-cell>
              <table:table-cell office:value-type="float" office:value="102.125">
                <text:p>102.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10">
                <text:p>110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97">
                <text:p>97</text:p>
              </table:table-cell>
              <table:table-cell office:value-type="float" office:value="109.625">
                <text:p>109.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14">
                <text:p>114</text:p>
              </table:table-cell>
              <table:table-cell office:value-type="float" office:value="113.875">
                <text:p>113.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16">
                <text:p>116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08">
                <text:p>108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28">
                <text:p>12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29">
                <text:p>129</text:p>
              </table:table-cell>
              <table:table-cell office:value-type="float" office:value="133.625">
                <text:p>133.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62">
                <text:p>162</text:p>
              </table:table-cell>
              <table:table-cell office:value-type="float" office:value="137.75">
                <text:p>137.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42">
                <text:p>142</text:p>
              </table:table-cell>
              <table:table-cell office:value-type="float" office:value="143.625">
                <text:p>143.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53">
                <text:p>153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31">
                <text:p>131</text:p>
              </table:table-cell>
              <table:table-cell office:value-type="float" office:value="155.875">
                <text:p>155.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49">
                <text:p>149</text:p>
              </table:table-cell>
              <table:table-cell office:value-type="float" office:value="159.75">
                <text:p>159.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55">
                <text:p>155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83">
                <text:p>183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72">
                <text:p>172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93">
                <text:p>193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88">
                <text:p>188</text:p>
              </table:table-cell>
              <table:table-cell office:value-type="float" office:value="190.125">
                <text:p>190.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79">
                <text:p>17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91">
                <text:p>191</text:p>
              </table:table-cell>
              <table:table-cell office:value-type="float" office:value="202.75">
                <text:p>202.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223">
                <text:p>223</text:p>
              </table:table-cell>
              <table:table-cell office:value-type="float" office:value="206.875">
                <text:p>206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92">
                <text:p>192</text:p>
              </table:table-cell>
              <table:table-cell office:value-type="float" office:value="216.25">
                <text:p>216.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26">
                <text:p>226</text:p>
              </table:table-cell>
              <table:table-cell office:value-type="float" office:value="228.375">
                <text:p>228.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30">
                <text:p>230</text:p>
              </table:table-cell>
              <table:table-cell office:value-type="float" office:value="237.75">
                <text:p>237.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26">
                <text:p>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63">
                <text:p>263</text:p>
              </table:table-cell>
              <table:table-cell office:value-type="float" office:value="254.875">
                <text:p>254.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76">
                <text:p>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66">
                <text:p>266</text:p>
              </table:table-cell>
              <table:table-cell office:value-type="float" office:value="271.625">
                <text:p>271.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81">
                <text:p>281</text:p>
              </table:table-cell>
              <table:table-cell office:value-type="float" office:value="282.125">
                <text:p>282.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71">
                <text:p>271</text:p>
              </table:table-cell>
              <table:table-cell office:value-type="float" office:value="286.25">
                <text:p>286.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07">
                <text:p>307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83">
                <text:p>283</text:p>
              </table:table-cell>
              <table:table-cell office:value-type="float" office:value="302.5">
                <text:p>302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10">
                <text:p>310</text:p>
              </table:table-cell>
              <table:table-cell office:value-type="float" office:value="308.875">
                <text:p>308.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96">
                <text:p>296</text:p>
              </table:table-cell>
              <table:table-cell office:value-type="float" office:value="319.125">
                <text:p>319.1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66">
                <text:p>366</text:p>
              </table:table-cell>
              <table:table-cell office:value-type="float" office:value="326.5">
                <text:p>326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06">
                <text:p>306</text:p>
              </table:table-cell>
              <table:table-cell office:value-type="float" office:value="335.125">
                <text:p>335.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32">
                <text:p>332</text:p>
              </table:table-cell>
              <table:table-cell office:value-type="float" office:value="346.375">
                <text:p>346.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53">
                <text:p>353</text:p>
              </table:table-cell>
              <table:table-cell office:value-type="float" office:value="354.875">
                <text:p>354.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66">
                <text:p>366</text:p>
              </table:table-cell>
              <table:table-cell office:value-type="float" office:value="358.125">
                <text:p>358.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52">
                <text:p>352</text:p>
              </table:table-cell>
              <table:table-cell office:value-type="float" office:value="368.125">
                <text:p>368.1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00">
                <text:p>4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64">
                <text:p>364</text:p>
              </table:table-cell>
              <table:table-cell office:value-type="float" office:value="394.125">
                <text:p>394.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92">
                <text:p>392</text:p>
              </table:table-cell>
              <table:table-cell office:value-type="float" office:value="402.5">
                <text:p>402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6">
                <text:p>386</text:p>
              </table:table-cell>
              <table:table-cell office:value-type="float" office:value="411.75">
                <text:p>411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18.625">
                <text:p>418.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26">
                <text:p>426</text:p>
              </table:table-cell>
              <table:table-cell office:value-type="float" office:value="429.875">
                <text:p>429.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33">
                <text:p>433</text:p>
              </table:table-cell>
              <table:table-cell office:value-type="float" office:value="442.25">
                <text:p>442.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426">
                <text:p>426</text:p>
              </table:table-cell>
              <table:table-cell office:value-type="float" office:value="453.625">
                <text:p>453.6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55">
                <text:p>455</text:p>
              </table:table-cell>
              <table:table-cell office:value-type="float" office:value="465.125">
                <text:p>465.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54">
                <text:p>454</text:p>
              </table:table-cell>
              <table:table-cell office:value-type="float" office:value="474.125">
                <text:p>474.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91">
                <text:p>491</text:p>
              </table:table-cell>
              <table:table-cell office:value-type="float" office:value="494.75">
                <text:p>494.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77">
                <text:p>477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559">
                <text:p>559</text:p>
              </table:table-cell>
              <table:table-cell office:value-type="float" office:value="528.875">
                <text:p>528.8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98">
                <text:p>498</text:p>
              </table:table-cell>
              <table:table-cell office:value-type="float" office:value="540.25">
                <text:p>540.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598">
                <text:p>598</text:p>
              </table:table-cell>
              <table:table-cell office:value-type="float" office:value="551.125">
                <text:p>551.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554">
                <text:p>554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600">
                <text:p>600</text:p>
              </table:table-cell>
              <table:table-cell office:value-type="float" office:value="571.25">
                <text:p>571.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545">
                <text:p>54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578">
                <text:p>57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576">
                <text:p>576</text:p>
              </table:table-cell>
              <table:table-cell office:value-type="float" office:value="599.5">
                <text:p>599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621">
                <text:p>621</text:p>
              </table:table-cell>
              <table:table-cell office:value-type="float" office:value="614.625">
                <text:p>614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616">
                <text:p>61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638">
                <text:p>638</text:p>
              </table:table-cell>
              <table:table-cell office:value-type="float" office:value="650.125">
                <text:p>650.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622">
                <text:p>622</text:p>
              </table:table-cell>
              <table:table-cell office:value-type="float" office:value="663.375">
                <text:p>663.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721">
                <text:p>721</text:p>
              </table:table-cell>
              <table:table-cell office:value-type="float" office:value="678.75">
                <text:p>678.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668">
                <text:p>668</text:p>
              </table:table-cell>
              <table:table-cell office:value-type="float" office:value="687.5">
                <text:p>687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739">
                <text:p>739</text:p>
              </table:table-cell>
              <table:table-cell office:value-type="float" office:value="699.625">
                <text:p>699.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682">
                <text:p>682</text:p>
              </table:table-cell>
              <table:table-cell office:value-type="float" office:value="714.375">
                <text:p>714.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744">
                <text:p>744</text:p>
              </table:table-cell>
              <table:table-cell office:value-type="float" office:value="724.875">
                <text:p>724.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686">
                <text:p>686</text:p>
              </table:table-cell>
              <table:table-cell office:value-type="float" office:value="740.75">
                <text:p>740.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735">
                <text:p>735</text:p>
              </table:table-cell>
              <table:table-cell office:value-type="float" office:value="753.75">
                <text:p>753.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740">
                <text:p>740</text:p>
              </table:table-cell>
              <table:table-cell office:value-type="float" office:value="768.125">
                <text:p>768.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805">
                <text:p>805</text:p>
              </table:table-cell>
              <table:table-cell office:value-type="float" office:value="781.375">
                <text:p>781.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795">
                <text:p>795</text:p>
              </table:table-cell>
              <table:table-cell office:value-type="float" office:value="799.5">
                <text:p>799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843">
                <text:p>843</text:p>
              </table:table-cell>
              <table:table-cell office:value-type="float" office:value="811.625">
                <text:p>811.6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797">
                <text:p>797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850">
                <text:p>850</text:p>
              </table:table-cell>
              <table:table-cell office:value-type="float" office:value="831.375">
                <text:p>831.3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831">
                <text:p>831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832">
                <text:p>832</text:p>
              </table:table-cell>
              <table:table-cell office:value-type="float" office:value="838.25">
                <text:p>838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837">
                <text:p>837</text:p>
              </table:table-cell>
              <table:table-cell office:value-type="float" office:value="840.125">
                <text:p>840.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866">
                <text:p>866</text:p>
              </table:table-cell>
              <table:table-cell office:value-type="float" office:value="849.25">
                <text:p>849.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844">
                <text:p>84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849">
                <text:p>84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812">
                <text:p>812</text:p>
              </table:table-cell>
              <table:table-cell office:value-type="float" office:value="875.5">
                <text:p>875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923">
                <text:p>923</text:p>
              </table:table-cell>
              <table:table-cell office:value-type="float" office:value="882.875">
                <text:p>882.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909">
                <text:p>90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936">
                <text:p>936</text:p>
              </table:table-cell>
              <table:table-cell office:value-type="float" office:value="908.125">
                <text:p>908.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865">
                <text:p>865</text:p>
              </table:table-cell>
              <table:table-cell office:value-type="float" office:value="930.5">
                <text:p>93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925">
                <text:p>925</text:p>
              </table:table-cell>
              <table:table-cell office:value-type="float" office:value="945.75">
                <text:p>945.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917">
                <text:p>917</text:p>
              </table:table-cell>
              <table:table-cell office:value-type="float" office:value="942.125">
                <text:p>942.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978">
                <text:p>978</text:p>
              </table:table-cell>
              <table:table-cell office:value-type="float" office:value="953.5">
                <text:p>953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991">
                <text:p>991</text:p>
              </table:table-cell>
              <table:table-cell office:value-type="float" office:value="972.375">
                <text:p>972.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045">
                <text:p>1045</text:p>
              </table:table-cell>
              <table:table-cell office:value-type="float" office:value="973.75">
                <text:p>973.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880">
                <text:p>880</text:p>
              </table:table-cell>
              <table:table-cell office:value-type="float" office:value="978.375">
                <text:p>978.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027">
                <text:p>1027</text:p>
              </table:table-cell>
              <table:table-cell office:value-type="float" office:value="983.375">
                <text:p>983.3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016">
                <text:p>1016</text:p>
              </table:table-cell>
              <table:table-cell office:value-type="float" office:value="981.125">
                <text:p>981.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936">
                <text:p>936</text:p>
              </table:table-cell>
              <table:table-cell office:value-type="float" office:value="982.375">
                <text:p>982.3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954">
                <text:p>954</text:p>
              </table:table-cell>
              <table:table-cell office:value-type="float" office:value="1005.25">
                <text:p>1005.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018">
                <text:p>1018</text:p>
              </table:table-cell>
              <table:table-cell office:value-type="float" office:value="1008.25">
                <text:p>1008.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973">
                <text:p>973</text:p>
              </table:table-cell>
              <table:table-cell office:value-type="float" office:value="1009.875">
                <text:p>1009.8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055">
                <text:p>1055</text:p>
              </table:table-cell>
              <table:table-cell office:value-type="float" office:value="1025.125">
                <text:p>1025.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063">
                <text:p>1063</text:p>
              </table:table-cell>
              <table:table-cell office:value-type="float" office:value="1037.125">
                <text:p>1037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051">
                <text:p>1051</text:p>
              </table:table-cell>
              <table:table-cell office:value-type="float" office:value="1050.125">
                <text:p>1050.1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029">
                <text:p>1029</text:p>
              </table:table-cell>
              <table:table-cell office:value-type="float" office:value="1058.75">
                <text:p>1058.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058">
                <text:p>1058</text:p>
              </table:table-cell>
              <table:table-cell office:value-type="float" office:value="1061.125">
                <text:p>1061.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050">
                <text:p>105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122">
                <text:p>1122</text:p>
              </table:table-cell>
              <table:table-cell office:value-type="float" office:value="1063.25">
                <text:p>1063.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042">
                <text:p>1042</text:p>
              </table:table-cell>
              <table:table-cell office:value-type="float" office:value="1061.75">
                <text:p>1061.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074">
                <text:p>1074</text:p>
              </table:table-cell>
              <table:table-cell office:value-type="float" office:value="1066.75">
                <text:p>1066.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118">
                <text:p>1118</text:p>
              </table:table-cell>
              <table:table-cell office:value-type="float" office:value="1074.875">
                <text:p>1074.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013">
                <text:p>101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017">
                <text:p>1017</text:p>
              </table:table-cell>
              <table:table-cell office:value-type="float" office:value="1080.5">
                <text:p>1080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098">
                <text:p>1098</text:p>
              </table:table-cell>
              <table:table-cell office:value-type="float" office:value="1085.125">
                <text:p>1085.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115">
                <text:p>1115</text:p>
              </table:table-cell>
              <table:table-cell office:value-type="float" office:value="1086.125">
                <text:p>1086.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155">
                <text:p>1155</text:p>
              </table:table-cell>
              <table:table-cell office:value-type="float" office:value="1099.375">
                <text:p>1099.3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054">
                <text:p>1054</text:p>
              </table:table-cell>
              <table:table-cell office:value-type="float" office:value="1104.625">
                <text:p>1104.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111">
                <text:p>1111</text:p>
              </table:table-cell>
              <table:table-cell office:value-type="float" office:value="1104.375">
                <text:p>1104.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126">
                <text:p>1126</text:p>
              </table:table-cell>
              <table:table-cell office:value-type="float" office:value="1094.875">
                <text:p>1094.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119">
                <text:p>1119</text:p>
              </table:table-cell>
              <table:table-cell office:value-type="float" office:value="1094.25">
                <text:p>1094.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059">
                <text:p>1059</text:p>
              </table:table-cell>
              <table:table-cell office:value-type="float" office:value="1101.75">
                <text:p>1101.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096">
                <text:p>1096</text:p>
              </table:table-cell>
              <table:table-cell office:value-type="float" office:value="1095.125">
                <text:p>1095.1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039">
                <text:p>1039</text:p>
              </table:table-cell>
              <table:table-cell office:value-type="float" office:value="1086.5">
                <text:p>1086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150">
                <text:p>1150</text:p>
              </table:table-cell>
              <table:table-cell office:value-type="float" office:value="1086.375">
                <text:p>1086.3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114">
                <text:p>1114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058">
                <text:p>1058</text:p>
              </table:table-cell>
              <table:table-cell office:value-type="float" office:value="1089.75">
                <text:p>1089.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057">
                <text:p>1057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118">
                <text:p>1118</text:p>
              </table:table-cell>
              <table:table-cell office:value-type="float" office:value="1073.625">
                <text:p>1073.6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100">
                <text:p>1100</text:p>
              </table:table-cell>
              <table:table-cell office:value-type="float" office:value="1066.75">
                <text:p>1066.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082">
                <text:p>1082</text:p>
              </table:table-cell>
              <table:table-cell office:value-type="float" office:value="1068.625">
                <text:p>1068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997">
                <text:p>997</text:p>
              </table:table-cell>
              <table:table-cell office:value-type="float" office:value="1066.125">
                <text:p>1066.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063">
                <text:p>1063</text:p>
              </table:table-cell>
              <table:table-cell office:value-type="float" office:value="1060.625">
                <text:p>1060.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059">
                <text:p>1059</text:p>
              </table:table-cell>
              <table:table-cell office:value-type="float" office:value="1050.25">
                <text:p>1050.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073">
                <text:p>107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037">
                <text:p>1037</text:p>
              </table:table-cell>
              <table:table-cell office:value-type="float" office:value="1056.875">
                <text:p>1056.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074">
                <text:p>1074</text:p>
              </table:table-cell>
              <table:table-cell office:value-type="float" office:value="1055.5">
                <text:p>1055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017">
                <text:p>1017</text:p>
              </table:table-cell>
              <table:table-cell office:value-type="float" office:value="1042.25">
                <text:p>1042.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080">
                <text:p>108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052">
                <text:p>1052</text:p>
              </table:table-cell>
              <table:table-cell office:value-type="float" office:value="1039.125">
                <text:p>1039.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052">
                <text:p>1052</text:p>
              </table:table-cell>
              <table:table-cell office:value-type="float" office:value="1036.375">
                <text:p>1036.3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953">
                <text:p>953</text:p>
              </table:table-cell>
              <table:table-cell office:value-type="float" office:value="1031.125">
                <text:p>1031.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015">
                <text:p>1015</text:p>
              </table:table-cell>
              <table:table-cell office:value-type="float" office:value="1022.375">
                <text:p>1022.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070">
                <text:p>1070</text:p>
              </table:table-cell>
              <table:table-cell office:value-type="float" office:value="1018.25">
                <text:p>1018.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052">
                <text:p>105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975">
                <text:p>97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010">
                <text:p>1010</text:p>
              </table:table-cell>
              <table:table-cell office:value-type="float" office:value="1008.125">
                <text:p>1008.1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019">
                <text:p>1019</text:p>
              </table:table-cell>
              <table:table-cell office:value-type="float" office:value="993.125">
                <text:p>993.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002">
                <text:p>1002</text:p>
              </table:table-cell>
              <table:table-cell office:value-type="float" office:value="979.875">
                <text:p>979.8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921">
                <text:p>921</text:p>
              </table:table-cell>
              <table:table-cell office:value-type="float" office:value="976.5">
                <text:p>976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016">
                <text:p>10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950">
                <text:p>950</text:p>
              </table:table-cell>
              <table:table-cell office:value-type="float" office:value="958.75">
                <text:p>958.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946">
                <text:p>946</text:p>
              </table:table-cell>
              <table:table-cell office:value-type="float" office:value="956.625">
                <text:p>956.6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948">
                <text:p>948</text:p>
              </table:table-cell>
              <table:table-cell office:value-type="float" office:value="958.375">
                <text:p>958.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934">
                <text:p>934</text:p>
              </table:table-cell>
              <table:table-cell office:value-type="float" office:value="943.5">
                <text:p>943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953">
                <text:p>953</text:p>
              </table:table-cell>
              <table:table-cell office:value-type="float" office:value="932.25">
                <text:p>932.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985">
                <text:p>985</text:p>
              </table:table-cell>
              <table:table-cell office:value-type="float" office:value="925.625">
                <text:p>925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935">
                <text:p>935</text:p>
              </table:table-cell>
              <table:table-cell office:value-type="float" office:value="913.75">
                <text:p>913.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897">
                <text:p>897</text:p>
              </table:table-cell>
              <table:table-cell office:value-type="float" office:value="908.375">
                <text:p>908.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860">
                <text:p>86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893">
                <text:p>893</text:p>
              </table:table-cell>
              <table:table-cell office:value-type="float" office:value="883.75">
                <text:p>883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853">
                <text:p>8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891">
                <text:p>891</text:p>
              </table:table-cell>
              <table:table-cell office:value-type="float" office:value="860.625">
                <text:p>860.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862">
                <text:p>862</text:p>
              </table:table-cell>
              <table:table-cell office:value-type="float" office:value="850.125">
                <text:p>850.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879">
                <text:p>879</text:p>
              </table:table-cell>
              <table:table-cell office:value-type="float" office:value="843.875">
                <text:p>843.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801">
                <text:p>801</text:p>
              </table:table-cell>
              <table:table-cell office:value-type="float" office:value="836.5">
                <text:p>836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46">
                <text:p>846</text:p>
              </table:table-cell>
              <table:table-cell office:value-type="float" office:value="820.75">
                <text:p>820.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776">
                <text:p>776</text:p>
              </table:table-cell>
              <table:table-cell office:value-type="float" office:value="812.625">
                <text:p>812.6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843">
                <text:p>84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794">
                <text:p>79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765">
                <text:p>76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797">
                <text:p>79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22">
                <text:p>722</text:p>
              </table:table-cell>
              <table:table-cell office:value-type="float" office:value="747.875">
                <text:p>747.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721">
                <text:p>721</text:p>
              </table:table-cell>
              <table:table-cell office:value-type="float" office:value="733.375">
                <text:p>733.3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774">
                <text:p>77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704">
                <text:p>704</text:p>
              </table:table-cell>
              <table:table-cell office:value-type="float" office:value="722.625">
                <text:p>722.6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706">
                <text:p>706</text:p>
              </table:table-cell>
              <table:table-cell office:value-type="float" office:value="718.5">
                <text:p>718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678">
                <text:p>678</text:p>
              </table:table-cell>
              <table:table-cell office:value-type="float" office:value="709.375">
                <text:p>709.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770">
                <text:p>77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706">
                <text:p>706</text:p>
              </table:table-cell>
              <table:table-cell office:value-type="float" office:value="688.75">
                <text:p>688.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689">
                <text:p>689</text:p>
              </table:table-cell>
              <table:table-cell office:value-type="float" office:value="676.5">
                <text:p>676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48">
                <text:p>648</text:p>
              </table:table-cell>
              <table:table-cell office:value-type="float" office:value="668.625">
                <text:p>668.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667">
                <text:p>667</text:p>
              </table:table-cell>
              <table:table-cell office:value-type="float" office:value="653.875">
                <text:p>653.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646">
                <text:p>646</text:p>
              </table:table-cell>
              <table:table-cell office:value-type="float" office:value="635.625">
                <text:p>635.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608">
                <text:p>608</text:p>
              </table:table-cell>
              <table:table-cell office:value-type="float" office:value="627.25">
                <text:p>627.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615">
                <text:p>615</text:p>
              </table:table-cell>
              <table:table-cell office:value-type="float" office:value="617.375">
                <text:p>617.3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652">
                <text:p>65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60">
                <text:p>560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622">
                <text:p>622</text:p>
              </table:table-cell>
              <table:table-cell office:value-type="float" office:value="588.125">
                <text:p>588.1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569">
                <text:p>569</text:p>
              </table:table-cell>
              <table:table-cell office:value-type="float" office:value="580.125">
                <text:p>580.1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552">
                <text:p>552</text:p>
              </table:table-cell>
              <table:table-cell office:value-type="float" office:value="567.375">
                <text:p>567.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554">
                <text:p>554</text:p>
              </table:table-cell>
              <table:table-cell office:value-type="float" office:value="562.375">
                <text:p>562.3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581">
                <text:p>581</text:p>
              </table:table-cell>
              <table:table-cell office:value-type="float" office:value="551.625">
                <text:p>551.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551">
                <text:p>551</text:p>
              </table:table-cell>
              <table:table-cell office:value-type="float" office:value="538.625">
                <text:p>538.6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550">
                <text:p>550</text:p>
              </table:table-cell>
              <table:table-cell office:value-type="float" office:value="531.75">
                <text:p>531.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520">
                <text:p>520</text:p>
              </table:table-cell>
              <table:table-cell office:value-type="float" office:value="523.625">
                <text:p>523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12.375">
                <text:p>512.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465">
                <text:p>465</text:p>
              </table:table-cell>
              <table:table-cell office:value-type="float" office:value="500.375">
                <text:p>500.3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497">
                <text:p>497</text:p>
              </table:table-cell>
              <table:table-cell office:value-type="float" office:value="487.75">
                <text:p>487.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489">
                <text:p>489</text:p>
              </table:table-cell>
              <table:table-cell office:value-type="float" office:value="476.25">
                <text:p>476.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491">
                <text:p>491</text:p>
              </table:table-cell>
              <table:table-cell office:value-type="float" office:value="464.625">
                <text:p>464.6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455">
                <text:p>455</text:p>
              </table:table-cell>
              <table:table-cell office:value-type="float" office:value="456.75">
                <text:p>456.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449">
                <text:p>449</text:p>
              </table:table-cell>
              <table:table-cell office:value-type="float" office:value="447.875">
                <text:p>447.8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28">
                <text:p>428</text:p>
              </table:table-cell>
              <table:table-cell office:value-type="float" office:value="438.5">
                <text:p>43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443">
                <text:p>44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402">
                <text:p>402</text:p>
              </table:table-cell>
              <table:table-cell office:value-type="float" office:value="415.875">
                <text:p>415.8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26">
                <text:p>426</text:p>
              </table:table-cell>
              <table:table-cell office:value-type="float" office:value="409.25">
                <text:p>409.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414">
                <text:p>414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91">
                <text:p>39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374">
                <text:p>374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396">
                <text:p>396</text:p>
              </table:table-cell>
              <table:table-cell office:value-type="float" office:value="375.25">
                <text:p>375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352">
                <text:p>352</text:p>
              </table:table-cell>
              <table:table-cell office:value-type="float" office:value="367.75">
                <text:p>367.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357">
                <text:p>357</text:p>
              </table:table-cell>
              <table:table-cell office:value-type="float" office:value="362.875">
                <text:p>362.8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350">
                <text:p>350</text:p>
              </table:table-cell>
              <table:table-cell office:value-type="float" office:value="350.625">
                <text:p>350.6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68">
                <text:p>368</text:p>
              </table:table-cell>
              <table:table-cell office:value-type="float" office:value="340.25">
                <text:p>340.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354">
                <text:p>354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352">
                <text:p>352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76">
                <text:p>276</text:p>
              </table:table-cell>
              <table:table-cell office:value-type="float" office:value="316.875">
                <text:p>316.8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313">
                <text:p>313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82">
                <text:p>282</text:p>
              </table:table-cell>
              <table:table-cell office:value-type="float" office:value="298.125">
                <text:p>298.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309">
                <text:p>309</text:p>
              </table:table-cell>
              <table:table-cell office:value-type="float" office:value="290.125">
                <text:p>290.1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81">
                <text:p>281</text:p>
              </table:table-cell>
              <table:table-cell office:value-type="float" office:value="287.625">
                <text:p>287.6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77">
                <text:p>277</text:p>
              </table:table-cell>
              <table:table-cell office:value-type="float" office:value="281.875">
                <text:p>281.8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95">
                <text:p>295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88">
                <text:p>28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56">
                <text:p>256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67">
                <text:p>267</text:p>
              </table:table-cell>
              <table:table-cell office:value-type="float" office:value="264.875">
                <text:p>264.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61">
                <text:p>261</text:p>
              </table:table-cell>
              <table:table-cell office:value-type="float" office:value="254.875">
                <text:p>254.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51">
                <text:p>251</text:p>
              </table:table-cell>
              <table:table-cell office:value-type="float" office:value="247.25">
                <text:p>247.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47">
                <text:p>247</text:p>
              </table:table-cell>
              <table:table-cell office:value-type="float" office:value="243.375">
                <text:p>243.3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54">
                <text:p>254</text:p>
              </table:table-cell>
              <table:table-cell office:value-type="float" office:value="237.125">
                <text:p>237.1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15">
                <text:p>215</text:p>
              </table:table-cell>
              <table:table-cell office:value-type="float" office:value="228.625">
                <text:p>228.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27">
                <text:p>227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25">
                <text:p>225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17">
                <text:p>217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93">
                <text:p>193</text:p>
              </table:table-cell>
              <table:table-cell office:value-type="float" office:value="196.625">
                <text:p>196.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94">
                <text:p>194</text:p>
              </table:table-cell>
              <table:table-cell office:value-type="float" office:value="188.375">
                <text:p>188.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67">
                <text:p>167</text:p>
              </table:table-cell>
              <table:table-cell office:value-type="float" office:value="181.125">
                <text:p>181.1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74">
                <text:p>174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76">
                <text:p>176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61">
                <text:p>16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67">
                <text:p>167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72">
                <text:p>172</text:p>
              </table:table-cell>
              <table:table-cell office:value-type="float" office:value="164.625">
                <text:p>164.6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53">
                <text:p>153</text:p>
              </table:table-cell>
              <table:table-cell office:value-type="float" office:value="159.125">
                <text:p>159.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86">
                <text:p>186</text:p>
              </table:table-cell>
              <table:table-cell office:value-type="float" office:value="155.75">
                <text:p>155.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56">
                <text:p>156</text:p>
              </table:table-cell>
              <table:table-cell office:value-type="float" office:value="148.375">
                <text:p>148.3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32">
                <text:p>132</text:p>
              </table:table-cell>
              <table:table-cell office:value-type="float" office:value="147.625">
                <text:p>147.6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34">
                <text:p>134</text:p>
              </table:table-cell>
              <table:table-cell office:value-type="float" office:value="138.875">
                <text:p>138.8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45">
                <text:p>145</text:p>
              </table:table-cell>
              <table:table-cell office:value-type="float" office:value="137.875">
                <text:p>137.8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35">
                <text:p>135</text:p>
              </table:table-cell>
              <table:table-cell office:value-type="float" office:value="132.125">
                <text:p>132.1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47">
                <text:p>147</text:p>
              </table:table-cell>
              <table:table-cell office:value-type="float" office:value="130.375">
                <text:p>130.3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16">
                <text:p>116</text:p>
              </table:table-cell>
              <table:table-cell office:value-type="float" office:value="127.375">
                <text:p>127.3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38">
                <text:p>138</text:p>
              </table:table-cell>
              <table:table-cell office:value-type="float" office:value="120.625">
                <text:p>120.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10">
                <text:p>110</text:p>
              </table:table-cell>
              <table:table-cell office:value-type="float" office:value="117.875">
                <text:p>117.8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18">
                <text:p>118</text:p>
              </table:table-cell>
              <table:table-cell office:value-type="float" office:value="110.125">
                <text:p>110.1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10">
                <text:p>110</text:p>
              </table:table-cell>
              <table:table-cell office:value-type="float" office:value="108.875">
                <text:p>108.8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91">
                <text:p>91</text:p>
              </table:table-cell>
              <table:table-cell office:value-type="float" office:value="101.375">
                <text:p>101.3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13">
                <text:p>113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85">
                <text:p>85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06">
                <text:p>106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78">
                <text:p>78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77">
                <text:p>77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88">
                <text:p>88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A Preliminary Check'.E22:'Annex B Coincidence Limit'.E36 'Annex B Coincidence Limit'.K21:'Annex B Coincidence Limit'.L21 'Annex A Preliminary Check'.L22:'Annex B Coincidence Limit'.L36 'Annex B Coincidence Limit'.K22:'Annex B Coincidence Limit'.K36 'Annex B Coincidence Limit'.I20:'Annex B Coincidence Limit'.I20 'Annex B Coincidence Limit'.I22:'Annex B Coincidence Limit'.I36" chart:data-source-has-labels="row" svg:x="1.468cm" svg:y="0.304cm" svg:width="22.005cm" svg:height="13.673cm">
          <chart:coordinate-region svg:x="3.095cm" svg:y="0.502cm" svg:width="20.278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A Preliminary Check'.L22:'Annex B Coincidence Limit'.L36" chart:label-cell-address="'Annex B Coincidence Limit'.L21:'Annex B Coincidence Limit'.L21" chart:class="chart:scatter">
            <chart:domain table:cell-range-address="'Annex A Preliminary Check'.E22:'Annex B Coincidence Limit'.E36"/>
            <chart:data-point chart:repeated="30"/>
          </chart:series>
          <chart:series chart:style-name="ch9" chart:values-cell-range-address="'Annex B Coincidence Limit'.K22:'Annex B Coincidence Limit'.K36" chart:label-cell-address="'Annex B Coincidence Limit'.K21:'Annex B Coincidence Limit'.K21" chart:class="chart:scatter">
            <chart:domain table:cell-range-address="'Annex B Coincidence Limit'.E22:'Annex B Coincidence Limit'.E36"/>
            <chart:data-point chart:repeated="15"/>
          </chart:series>
          <chart:series chart:style-name="ch10" chart:values-cell-range-address="'Annex B Coincidence Limit'.I22:'Annex B Coincidence Limit'.I36" chart:label-cell-address="'Annex B Coincidence Limit'.I20:'Annex B Coincidence Limit'.I20" chart:class="chart:scatter">
            <chart:domain table:cell-range-address="'Annex B Coincidence Limit'.E22:'Annex B Coincidence Limit'.E3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  <draw:g>
                  <svg:desc>'Annex B Coincidence Limit'.L21:'Annex B Coincidence Limit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95%</text:p>
                <draw:g>
                  <svg:desc>'Annex B Coincidence Limit'.K21:'Annex B Coincidence Limit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ression</text:p>
                <draw:g>
                  <svg:desc>'Annex B Coincidence Limit'.I20:'Annex B Coincidence Limit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A Preliminary Check'.E22:'Annex B Coincidence Limit'.E36</svg:desc>
                </draw:g>
              </table:table-cell>
              <table:table-cell office:value-type="float" office:value="NaN">
                <text:p>NaN</text:p>
                <draw:g>
                  <svg:desc>'Annex A Preliminary Check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46863.622038757">
                <text:p>146863.622038757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54593.286356587">
                <text:p>154593.28635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87736.94647438">
                <text:p>287736.94647438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302880.996288821">
                <text:p>302880.99628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28384.50130143">
                <text:p>428384.50130143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50931.054001505">
                <text:p>450931.05400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68806.828827374">
                <text:p>568806.828827374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98744.030344604">
                <text:p>598744.030344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09004.469624212">
                <text:p>709004.469624212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46320.494341276">
                <text:p>746320.494341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48977.962535409">
                <text:p>848977.962535409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93661.013195168">
                <text:p>893661.013195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88727.844682814">
                <text:p>988727.844682814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1040766.1522977">
                <text:p>1040766.152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28254.65147349">
                <text:p>1128254.65147349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87636.47523525">
                <text:p>1187636.4752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267558.91660661">
                <text:p>1267558.91660661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334272.54379644">
                <text:p>1334272.5437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545501.948198">
                <text:p>1545501.948198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626844.15599789">
                <text:p>1626844.15599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684141.77357606">
                <text:p>1684141.77357606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772780.81429059">
                <text:p>1772780.814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822561.1751496">
                <text:p>1822561.1751496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918485.44752589">
                <text:p>1918485.44752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960760.67817959">
                <text:p>1960760.67817959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2063958.60861009">
                <text:p>2063958.60861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098740.80625944">
                <text:p>2098740.80625944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209200.84869415">
                <text:p>2209200.84869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397569245385">
                <text:p>0.18397569245385</text:p>
              </table:table-cell>
              <table:table-cell office:value-type="float" office:value="169243">
                <text:p>16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47354064375">
                <text:p>0.360447354064375</text:p>
              </table:table-cell>
              <table:table-cell office:value-type="float" office:value="294743">
                <text:p>29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636194650226">
                <text:p>0.536636194650226</text:p>
              </table:table-cell>
              <table:table-cell office:value-type="float" office:value="452854">
                <text:p>45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2542893558613">
                <text:p>0.712542893558613</text:p>
              </table:table-cell>
              <table:table-cell office:value-type="float" office:value="597630">
                <text:p>597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816812796273">
                <text:p>0.88816812796273</text:p>
              </table:table-cell>
              <table:table-cell office:value-type="float" office:value="772691.1913536">
                <text:p>772691.191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351257287044">
                <text:p>1.06351257287044</text:p>
              </table:table-cell>
              <table:table-cell office:value-type="float" office:value="907937.1764516">
                <text:p>907937.176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857690113294">
                <text:p>1.23857690113294</text:p>
              </table:table-cell>
              <table:table-cell office:value-type="float" office:value="1044623.4098276">
                <text:p>1044623.409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336178345332">
                <text:p>1.41336178345332</text:p>
              </table:table-cell>
              <table:table-cell office:value-type="float" office:value="1203847.0933776">
                <text:p>1203847.093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786788839521">
                <text:p>1.58786788839521</text:p>
              </table:table-cell>
              <table:table-cell office:value-type="float" office:value="1343346.5477729">
                <text:p>1343346.547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604642975144">
                <text:p>1.93604642975144</text:p>
              </table:table-cell>
              <table:table-cell office:value-type="float" office:value="1617722.1634704">
                <text:p>1617722.163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0972019267197">
                <text:p>2.10972019267197</text:p>
              </table:table-cell>
              <table:table-cell office:value-type="float" office:value="1759156.0540841">
                <text:p>1759156.054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8311783124321">
                <text:p>2.28311783124321</text:p>
              </table:table-cell>
              <table:table-cell office:value-type="float" office:value="1927361.3360964">
                <text:p>1927361.336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624000345826">
                <text:p>2.45624000345826</text:p>
              </table:table-cell>
              <table:table-cell office:value-type="float" office:value="2084370.5556804">
                <text:p>2084370.55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2908736522129">
                <text:p>2.62908736522129</text:p>
              </table:table-cell>
              <table:table-cell office:value-type="float" office:value="2193113.13969">
                <text:p>2193113.1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A Preliminary Check'.I22:'Annex B Coincidence Limit'.I36 'ISO 11171_2020 Summary'.A1:'ISO 11171_2020 Summary'.A1 'Annex A Preliminary Check'.M22:'Annex B Coincidence Limit'.M36" chart:data-source-has-labels="row" svg:x="1.395cm" svg:y="2.51cm" svg:width="18.548cm" svg:height="11.466cm">
          <chart:coordinate-region svg:x="2.13cm" svg:y="2.708cm" svg:width="17.123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A Preliminary Check'.M22:'Annex B Coincidence Limit'.M36" chart:label-cell-address="'ISO 11171_2020 Summary'.A1:'ISO 11171_2020 Summary'.A1" chart:class="chart:scatter">
            <chart:domain table:cell-range-address="'Annex A Preliminary Check'.I22:'Annex B Coincidence Limit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65">
                <text:p>1210565</text:p>
                <draw:g>
                  <svg:desc>'Annex A Preliminary Check'.I22:'Annex B Coincidence Limit'.I36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940">
                <text:p>122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2389">
                <text:p>122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577">
                <text:p>123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9566.8">
                <text:p>121956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49.90458388598">
                <text:p>8349.90458388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4661519474454">
                <text:p>0.0068466151947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54593.286356587">
                <text:p>154593.286356587</text:p>
              </table:table-cell>
              <table:table-cell office:value-type="float" office:value="1.09476293562724">
                <text:p>1.09476293562724</text:p>
              </table:table-cell>
            </table:table-row>
            <table:table-row>
              <table:table-cell office:value-type="string"/>
              <table:table-cell office:value-type="float" office:value="302880.996288821">
                <text:p>302880.996288821</text:p>
              </table:table-cell>
              <table:table-cell office:value-type="float" office:value="0.973131373745677">
                <text:p>0.973131373745677</text:p>
              </table:table-cell>
            </table:table-row>
            <table:table-row>
              <table:table-cell office:value-type="string"/>
              <table:table-cell office:value-type="float" office:value="450931.054001505">
                <text:p>450931.054001505</text:p>
              </table:table-cell>
              <table:table-cell office:value-type="float" office:value="1.0042643902686">
                <text:p>1.0042643902686</text:p>
              </table:table-cell>
            </table:table-row>
            <table:table-row>
              <table:table-cell office:value-type="string"/>
              <table:table-cell office:value-type="float" office:value="598744.030344604">
                <text:p>598744.030344604</text:p>
              </table:table-cell>
              <table:table-cell office:value-type="float" office:value="0.998139387971914">
                <text:p>0.998139387971914</text:p>
              </table:table-cell>
            </table:table-row>
            <table:table-row>
              <table:table-cell office:value-type="string"/>
              <table:table-cell office:value-type="float" office:value="746320.494341276">
                <text:p>746320.494341276</text:p>
              </table:table-cell>
              <table:table-cell office:value-type="float" office:value="1.03533427959204">
                <text:p>1.03533427959204</text:p>
              </table:table-cell>
            </table:table-row>
            <table:table-row>
              <table:table-cell office:value-type="string"/>
              <table:table-cell office:value-type="float" office:value="893661.013195168">
                <text:p>893661.013195168</text:p>
              </table:table-cell>
              <table:table-cell office:value-type="float" office:value="1.01597492007108">
                <text:p>1.01597492007108</text:p>
              </table:table-cell>
            </table:table-row>
            <table:table-row>
              <table:table-cell office:value-type="string"/>
              <table:table-cell office:value-type="float" office:value="1040766.1522977">
                <text:p>1040766.1522977</text:p>
              </table:table-cell>
              <table:table-cell office:value-type="float" office:value="1.0037061711907">
                <text:p>1.0037061711907</text:p>
              </table:table-cell>
            </table:table-row>
            <table:table-row>
              <table:table-cell office:value-type="string"/>
              <table:table-cell office:value-type="float" office:value="1187636.47523525">
                <text:p>1187636.47523525</text:p>
              </table:table-cell>
              <table:table-cell office:value-type="float" office:value="1.01364947816977">
                <text:p>1.01364947816977</text:p>
              </table:table-cell>
            </table:table-row>
            <table:table-row>
              <table:table-cell office:value-type="string"/>
              <table:table-cell office:value-type="float" office:value="1334272.54379644">
                <text:p>1334272.54379644</text:p>
              </table:table-cell>
              <table:table-cell office:value-type="float" office:value="1.00680071250709">
                <text:p>1.00680071250709</text:p>
              </table:table-cell>
            </table:table-row>
            <table:table-row>
              <table:table-cell office:value-type="string"/>
              <table:table-cell office:value-type="float" office:value="1626844.15599789">
                <text:p>1626844.15599789</text:p>
              </table:table-cell>
              <table:table-cell office:value-type="float" office:value="0.994392829519741">
                <text:p>0.994392829519741</text:p>
              </table:table-cell>
            </table:table-row>
            <table:table-row>
              <table:table-cell office:value-type="string"/>
              <table:table-cell office:value-type="float" office:value="1772780.81429059">
                <text:p>1772780.81429059</text:p>
              </table:table-cell>
              <table:table-cell office:value-type="float" office:value="0.992314469957788">
                <text:p>0.992314469957788</text:p>
              </table:table-cell>
            </table:table-row>
            <table:table-row>
              <table:table-cell office:value-type="string"/>
              <table:table-cell office:value-type="float" office:value="1918485.44752589">
                <text:p>1918485.44752589</text:p>
              </table:table-cell>
              <table:table-cell office:value-type="float" office:value="1.00462650815619">
                <text:p>1.00462650815619</text:p>
              </table:table-cell>
            </table:table-row>
            <table:table-row>
              <table:table-cell office:value-type="string"/>
              <table:table-cell office:value-type="float" office:value="2063958.60861009">
                <text:p>2063958.60861009</text:p>
              </table:table-cell>
              <table:table-cell office:value-type="float" office:value="1.00988970756737">
                <text:p>1.00988970756737</text:p>
              </table:table-cell>
            </table:table-row>
            <table:table-row>
              <table:table-cell office:value-type="string"/>
              <table:table-cell office:value-type="float" office:value="2209200.84869415">
                <text:p>2209200.84869415</text:p>
              </table:table-cell>
              <table:table-cell office:value-type="float" office:value="0.992717860391166">
                <text:p>0.992717860391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