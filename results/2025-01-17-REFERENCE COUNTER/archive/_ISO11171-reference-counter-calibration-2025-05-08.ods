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Pictures/100000000000050C0000022180CD14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5.932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517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924cm"/>
    </style:style>
    <style:style style:name="co16" style:family="table-column">
      <style:table-column-properties fo:break-before="auto" style:column-width="5.017cm"/>
    </style:style>
    <style:style style:name="co17" style:family="table-column">
      <style:table-column-properties fo:break-before="auto" style:column-width="2.11cm"/>
    </style:style>
    <style:style style:name="co18" style:family="table-column">
      <style:table-column-properties fo:break-before="auto" style:column-width="5.413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556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192cm" fo:break-before="auto" style:use-optimal-row-height="false"/>
    </style:style>
    <style:style style:name="ro11" style:family="table-row">
      <style:table-row-properties style:row-height="1.748cm" fo:break-before="auto" style:use-optimal-row-height="true"/>
    </style:style>
    <style:style style:name="ro12" style:family="table-row">
      <style:table-row-properties style:row-height="0.933cm" fo:break-before="auto" style:use-optimal-row-height="true"/>
    </style:style>
    <style:style style:name="ro13" style:family="table-row">
      <style:table-row-properties style:row-height="3.7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79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3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08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1" style:family="table-cell" style:parent-style-name="Default" style:data-style-name="N1">
      <style:table-cell-properties fo:background-color="#e0ffff"/>
      <style:text-properties fo:color="#e0ffff"/>
    </style:style>
    <style:style style:name="ce132" style:family="table-cell" style:parent-style-name="Default" style:data-style-name="N1">
      <style:table-cell-properties fo:background-color="#e0ffff"/>
      <style:text-properties fo:color="#e0ffff" fo:font-weight="bold" style:font-weight-asian="bold" style:font-weight-complex="bold"/>
    </style:style>
    <style:style style:name="ce13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fo:color="#e0ffff"/>
    </style:style>
    <style:style style:name="ce20" style:family="table-cell" style:parent-style-name="Default" style:data-style-name="N1"/>
    <style:style style:name="ce13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normal" style:font-weight-asian="normal" style:font-weight-complex="normal"/>
    </style:style>
    <style:style style:name="ce13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normal" style:font-weight-asian="normal" style:font-weight-complex="normal"/>
    </style:style>
    <style:style style:name="ce137" style:family="table-cell" style:parent-style-name="Default">
      <style:table-cell-properties fo:background-color="#e0ffff"/>
      <style:text-properties fo:color="#e0ffff" fo:font-weight="normal" style:font-weight-asian="normal" style:font-weight-complex="normal"/>
    </style:style>
    <style:style style:name="ce138" style:family="table-cell" style:parent-style-name="Default">
      <style:table-cell-properties fo:border-bottom="0.74pt solid #000000" fo:background-color="#e0ffff" fo:border-left="none" fo:border-right="none" fo:border-top="none"/>
      <style:text-properties fo:color="#e0ffff" fo:font-weight="normal" style:font-weight-asian="normal" style:font-weight-complex="normal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121" style:family="table-cell" style:parent-style-name="Default">
      <style:text-properties style:text-overline-style="solid" style:text-overline-width="auto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4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1"/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.H7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7]" style:apply-style-name="Good" style:base-cell-address="DATA.K7"/>
    </style:style>
    <style:style style:name="ce202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_2.H7"/>
    </style:style>
    <style:style style:name="ce204" style:family="table-cell" style:parent-style-name="Default" style:data-style-name="N212">
      <style:map style:condition="cell-content()&lt;[.J7]" style:apply-style-name="Good" style:base-cell-address="DATA_2.K7"/>
    </style:style>
    <style:style style:name="ce20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_2_2.H7"/>
    </style:style>
    <style:style style:name="ce219" style:family="table-cell" style:parent-style-name="Default" style:data-style-name="N212">
      <style:map style:condition="cell-content()&lt;[.J7]" style:apply-style-name="Good" style:base-cell-address="DATA_2_2.K7"/>
    </style:style>
    <style:style style:name="ce224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AnnexE_DATA.H7"/>
    </style:style>
    <style:style style:name="ce236" style:family="table-cell" style:parent-style-name="Default" style:data-style-name="N212">
      <style:map style:condition="cell-content()&lt;[.J7]" style:apply-style-name="Good" style:base-cell-address="AnnexE_DATA.K7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153" style:family="table-cell" style:parent-style-name="Default" style:data-style-name="N11">
      <style:table-cell-properties fo:background-color="#ccf4c6"/>
      <style:map style:condition="cell-content()&lt;[.J50]" style:apply-style-name="Accent" style:base-cell-address="'Clause 6 Sizing Calibration'.J49"/>
    </style:style>
    <style:style style:name="ce101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cell-protect="none" style:print-content="true"/>
    </style:style>
    <style:style style:name="ce246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47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54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55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56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57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58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65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68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 style:data-style-name="N49"/>
    <style:style style:name="ce8" style:family="table-cell" style:parent-style-name="Default">
      <style:table-cell-properties fo:background-color="#90ee90" fo:wrap-option="wrap" style:vertical-align="middle"/>
    </style:style>
    <style:style style:name="ce9" style:family="table-cell" style:parent-style-name="Default">
      <style:table-cell-properties fo:background-color="#90ee90"/>
    </style:style>
    <style:style style:name="ce16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Accuracy'.A29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Accuracy'.B2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9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12" style:family="table-cell" style:parent-style-name="Default">
      <style:table-cell-properties fo:background-color="#ffff99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209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16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</style:style>
    <style:style style:name="ce237" style:family="table-cell" style:parent-style-name="Default" style:data-style-name="N0"/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57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333333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P1" style:family="paragraph">
      <loext:graphic-properties draw:fill="none" draw:fill-color="#ffffff"/>
      <style:text-properties style:font-name="Calibri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4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6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7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SO 11171_2020 Summary" table:style-name="ta1" table:print-ranges="'ISO 11171_2020 Summary'.A1:'ISO 11171_2020 Summary'.C18"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number-columns-repeated="1021" table:default-cell-style-name="Default"/>
        <table:table-row table:style-name="ro1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2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2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icle Counter" table:style-name="ta1">
        <table:table-column table:style-name="co4" table:number-columns-repeated="5" table:default-cell-style-name="Default"/>
        <table:table-row table:style-name="ro2" table:number-rows-repeated="9">
          <table:table-cell table:number-columns-repeated="5"/>
        </table:table-row>
        <table:table-row table:style-name="ro2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</table:table-row>
        <table:table-row table:style-name="ro2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nnex A Preliminary Check" table:style-name="ta1">
        <table:shapes>
          <draw:frame draw:z-index="1" draw:name="Text Frame 2" draw:style-name="gr1" draw:text-style-name="P1" svg:width="11.315cm" svg:height="5.432cm" svg:x="25.55cm" svg:y="4.023cm">
            <draw:text-box>
              <text:p><text:span text:style-name="T1">Used microbalance to weigh 10ml sample of fluid, added using precision digital pipette. Added 10x 10ml I total to plastic sample bottle and weighed result (after taring empty bottle weight).</text:span></text:p>
              <text:p><text:span text:style-name="T1"/></text:p>
              <text:p><text:span text:style-name="T1">Used bottle sampler to sample 15ml pumped flush + 40ml pumped sample.</text:span></text:p>
              <text:p><text:span text:style-name="T1"/></text:p>
              <text:p><text:span text:style-name="T1">Measured final weight of bottle+remaining fluid.</text:span></text:p>
              <text:p><text:span text:style-name="T1"/></text:p>
            </draw:text-box>
          </draw:frame>
        </table:shapes>
        <table:table-column table:style-name="co4" table:default-cell-style-name="ce33"/>
        <table:table-column table:style-name="co5" table:default-cell-style-name="ce33"/>
        <table:table-column table:style-name="co4" table:number-columns-repeated="13" table:default-cell-style-name="ce33"/>
        <table:table-column table:style-name="co4" table:number-columns-repeated="7" table:default-cell-style-name="Default"/>
        <table:table-row table:style-name="ro5">
          <table:table-cell table:style-name="ce29" office:value-type="string" calcext:value-type="string">
            <text:p>Cv<text:span text:style-name="T3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 and a concentration of 25% of coincidence limit.</text:p>
          </table:table-cell>
          <table:covered-table-cell table:number-columns-repeated="7"/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6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 office:value-type="string" calcext:value-type="string">
            <text:p>Analysis using Bottle Sampler and MTD</text:p>
          </table:table-cell>
          <table:table-cell table:number-columns-repeated="4"/>
          <table:table-cell table:style-name="ce34" office:value-type="string" calcext:value-type="string">
            <text:p>Volumetric Sampling Accuracy</text:p>
          </table:table-cell>
          <table:table-cell table:number-columns-repeated="6"/>
          <table:table-cell table:style-name="ce28" office:value-type="string" calcext:value-type="string">
            <text:p>Capture Fraction</text:p>
          </table:table-cell>
          <table:table-cell table:number-columns-repeated="3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alibration Rig</text:p>
          </table:table-cell>
          <table:table-cell table:number-columns-repeated="5"/>
          <table:table-cell table:style-name="ce78" office:value-type="string" calcext:value-type="string">
            <text:p>Bottle Sampler</text:p>
          </table:table-cell>
          <table:table-cell table:number-columns-repeated="2"/>
          <table:table-cell table:style-name="ce37" office:value-type="string" calcext:value-type="string">
            <text:p>BS-500 #BS0707</text:p>
          </table:table-cell>
          <table:table-cell table:number-columns-repeated="8"/>
          <table:table-cell office:value-type="string" calcext:value-type="string">
            <text:p>Concentrate</text:p>
          </table:table-cell>
          <table:table-cell/>
          <table:table-cell table:style-name="ce97" office:value-type="float" office:value="253330" calcext:value-type="float">
            <text:p>253330</text:p>
          </table:table-cell>
          <table:table-cell office:value-type="string" calcext:value-type="string">
            <text:p>/ml</text:p>
          </table:table-cell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2"/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8"/>
          <table:table-cell office:value-type="string" calcext:value-type="string">
            <text:p>Diluent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8"/>
          <table:table-cell office:value-type="string" calcext:value-type="string">
            <text:p>Add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8"/>
          <table:table-cell office:value-type="string" calcext:value-type="string">
            <text:p>Final Concentration</text:p>
          </table:table-cell>
          <table:table-cell/>
          <table:table-cell table:formula="of:=[.U7]/([.U7]+[.U6])*[.U5]" office:value-type="float" office:value="5066.6" calcext:value-type="float">
            <text:p>5066.6</text:p>
          </table:table-cell>
          <table:table-cell office:value-type="string" calcext:value-type="string">
            <text:p>/ml</text:p>
          </table:table-cell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Sensor S/N</text:p>
          </table:table-cell>
          <table:table-cell table:number-columns-repeated="2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1-25" calcext:value-type="date">
            <text:p>2025-01-25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2-24" calcext:value-type="date">
            <text:p>2025-02-2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8"/>
          <table:table-cell office:value-type="string" calcext:value-type="string">
            <text:p>counted</text:p>
          </table:table-cell>
          <table:table-cell/>
          <table:table-cell office:value-type="float" office:value="4651" calcext:value-type="float">
            <text:p>4651</text:p>
          </table:table-cell>
          <table:table-cell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5" calcext:value-type="float">
            <text:p>135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 office:value-type="float" office:value="40000" calcext:value-type="float">
            <text:p>40000</text:p>
          </table:table-cell>
          <table:table-cell table:number-columns-repeated="5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57"/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table:style-name="ce78" office:value-type="string" calcext:value-type="string">
            <text:p>10ml sample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1</text:p>
          </table:table-cell>
          <table:table-cell table:style-name="ce38" office:value-type="float" office:value="845948" calcext:value-type="float">
            <text:p>845948</text:p>
          </table:table-cell>
          <table:table-cell table:style-name="ce44" table:formula="of:=([.C21]-[.$C$27])/[.$C$27]" office:value-type="percentage" office:value="0.00821495415319522" calcext:value-type="percentage">
            <text:p>0.82%</text:p>
          </table:table-cell>
          <table:table-cell table:number-columns-repeated="3"/>
          <table:table-cell office:value-type="string" calcext:value-type="string">
            <text:p>Portion 1</text:p>
          </table:table-cell>
          <table:table-cell office:value-type="float" office:value="1210363" calcext:value-type="float">
            <text:p>1210363</text:p>
          </table:table-cell>
          <table:table-cell table:style-name="ce44" table:formula="of:=([.I21]-[.I$27])/[.I$27]" office:value-type="percentage" office:value="-0.00754677808546448" calcext:value-type="percentage">
            <text:p>-0.75%</text:p>
          </table:table-cell>
          <table:table-cell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2</text:p>
          </table:table-cell>
          <table:table-cell table:style-name="ce40" office:value-type="float" office:value="835413" calcext:value-type="float">
            <text:p>835413</text:p>
          </table:table-cell>
          <table:table-cell table:style-name="ce44" table:formula="of:=([.C22]-[.$C$27])/[.$C$27]" office:value-type="percentage" office:value="-0.00434083478655511" calcext:value-type="percentage">
            <text:p>-0.43%</text:p>
          </table:table-cell>
          <table:table-cell table:number-columns-repeated="3"/>
          <table:table-cell office:value-type="string" calcext:value-type="string">
            <text:p>Portion 2</text:p>
          </table:table-cell>
          <table:table-cell office:value-type="float" office:value="1210565" calcext:value-type="float">
            <text:p>1210565</text:p>
          </table:table-cell>
          <table:table-cell table:style-name="ce44" table:formula="of:=([.I22]-[.I$27])/[.I$27]" office:value-type="percentage" office:value="-0.00738114550182905" calcext:value-type="percentage">
            <text:p>-0.74%</text:p>
          </table:table-cell>
          <table:table-cell table:number-columns-repeated="3"/>
          <table:table-cell table:style-name="ce37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3</text:p>
          </table:table-cell>
          <table:table-cell table:style-name="ce40" office:value-type="float" office:value="848340" calcext:value-type="float">
            <text:p>848340</text:p>
          </table:table-cell>
          <table:table-cell table:style-name="ce44" table:formula="of:=([.C23]-[.$C$27])/[.$C$27]" office:value-type="percentage" office:value="0.0110657797007873" calcext:value-type="percentage">
            <text:p>1.11%</text:p>
          </table:table-cell>
          <table:table-cell table:number-columns-repeated="3"/>
          <table:table-cell office:value-type="string" calcext:value-type="string">
            <text:p>Portion 3</text:p>
          </table:table-cell>
          <table:table-cell office:value-type="float" office:value="1221940" calcext:value-type="float">
            <text:p>1221940</text:p>
          </table:table-cell>
          <table:table-cell table:style-name="ce44" table:formula="of:=([.I23]-[.I$27])/[.I$27]" office:value-type="percentage" office:value="0.00194593686873073" calcext:value-type="percentage">
            <text:p>0.19%</text:p>
          </table:table-cell>
          <table:table-cell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4</text:p>
          </table:table-cell>
          <table:table-cell table:style-name="ce40" office:value-type="float" office:value="830302" calcext:value-type="float">
            <text:p>830302</text:p>
          </table:table-cell>
          <table:table-cell table:style-name="ce44" table:formula="of:=([.C24]-[.$C$27])/[.$C$27]" office:value-type="percentage" office:value="-0.0104322099428023" calcext:value-type="percentage">
            <text:p>-1.04%</text:p>
          </table:table-cell>
          <table:table-cell table:number-columns-repeated="3"/>
          <table:table-cell office:value-type="string" calcext:value-type="string">
            <text:p>Portion 4</text:p>
          </table:table-cell>
          <table:table-cell office:value-type="float" office:value="1222389" calcext:value-type="float">
            <text:p>1222389</text:p>
          </table:table-cell>
          <table:table-cell table:style-name="ce44" table:formula="of:=([.I24]-[.I$27])/[.I$27]" office:value-type="percentage" office:value="0.00231410038384118" calcext:value-type="percentage">
            <text:p>0.23%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5</text:p>
          </table:table-cell>
          <table:table-cell table:style-name="ce41" office:value-type="float" office:value="835273" calcext:value-type="float">
            <text:p>835273</text:p>
          </table:table-cell>
          <table:table-cell table:style-name="ce44" table:formula="of:=([.C25]-[.$C$27])/[.$C$27]" office:value-type="percentage" office:value="-0.00450768912462488" calcext:value-type="percentage">
            <text:p>-0.45%</text:p>
          </table:table-cell>
          <table:table-cell table:number-columns-repeated="3"/>
          <table:table-cell office:value-type="string" calcext:value-type="string">
            <text:p>Portion 5</text:p>
          </table:table-cell>
          <table:table-cell office:value-type="float" office:value="1232577" calcext:value-type="float">
            <text:p>1232577</text:p>
          </table:table-cell>
          <table:table-cell table:style-name="ce44" table:formula="of:=([.I25]-[.I$27])/[.I$27]" office:value-type="percentage" office:value="0.0106678863347214" calcext:value-type="percentage">
            <text:p>1.07%</text:p>
          </table:table-cell>
          <table:table-cell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float" office:value="839055.2" calcext:value-type="float">
            <text:p>83905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42" table:formula="of:=AVERAGE([.I21:.I25])" office:value-type="float" office:value="1219566.8" calcext:value-type="float">
            <text:p>1219567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float" office:value="6897.93260042457" calcext:value-type="float">
            <text:p>6898</text:p>
          </table:table-cell>
          <table:table-cell table:number-columns-repeated="4"/>
          <table:table-cell office:value-type="string" calcext:value-type="string">
            <text:p>Sample StdDev</text:p>
          </table:table-cell>
          <table:table-cell table:style-name="ce42" table:formula="of:=STDEVP([.I21:.I25])" office:value-type="float" office:value="8349.90458388598" calcext:value-type="float">
            <text:p>8350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2">
            <draw:frame draw:z-index="0" draw:name="Image 3" draw:style-name="gr2" draw:text-style-name="P2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number-columns-repeated="2"/>
          <table:table-cell office:value-type="string" calcext:value-type="string">
            <text:p>Total Fluid</text:p>
          </table:table-cell>
          <table:table-cell/>
          <table:table-cell table:style-name="ce37" table:formula="of:=[.N27]+[.N28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7">
          <table:table-cell table:number-columns-repeated="11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  <table:table-cell office:value-type="string" calcext:value-type="string">
            <text:p>Fluid Weight Taken</text:p>
          </table:table-cell>
          <table:table-cell/>
          <table:table-cell table:style-name="ce82" table:formula="of:=[.N26]-[.N30]" office:value-type="float" office:value="46.869" calcext:value-type="float">
            <text:p>46.87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83" table:formula="of:=[.N31]/[.N25]*10" office:value-type="float" office:value="55.6705071861266" calcext:value-type="float">
            <text:p>55.67</text:p>
          </table:table-cell>
          <table:table-cell table:number-columns-repeated="8"/>
        </table:table-row>
        <table:table-row table:style-name="ro2">
          <table:table-cell table:number-columns-repeated="13"/>
          <table:table-cell table:style-name="ce37"/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Error</text:p>
          </table:table-cell>
          <table:table-cell/>
          <table:table-cell table:style-name="ce84" table:formula="of:=[.N32]/[.N29]-1" office:value-type="percentage" office:value="0.0121910397477569" calcext:value-type="percentage">
            <text:p>1.22%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28]/[.C27]" office:value-type="percentage" office:value="0.00822107127209815" calcext:value-type="percentage">
            <text:p>0.82%</text:p>
          </table:table-cell>
          <table:table-cell table:style-name="ce77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3"/>
          <table:table-cell office:value-type="string" calcext:value-type="string">
            <text:p>CV<text:span text:style-name="T7">VOL</text:span></text:p>
          </table:table-cell>
          <table:table-cell table:style-name="ce44" table:formula="of:=[.I28]/[.I27]" office:value-type="percentage" office:value="0.00684661519474454" calcext:value-type="percentage">
            <text:p>0.68%</text:p>
          </table:table-cell>
          <table:table-cell table:style-name="ce79" table:formula="of:=IF([.I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8"/>
          <table:table-cell table:style-name="ce37" office:value-type="string" calcext:value-type="string">
            <text:p>&gt;4μm(c)/100ml</text:p>
          </table:table-cell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float" office:value="1228768" calcext:value-type="float">
            <text:p>1228768</text:p>
          </table:table-cell>
          <table:table-cell table:style-name="ce44" table:formula="of:=([.I40]-[.I$27])/[.I$27]" office:value-type="percentage" office:value="0.00754464618092257" calcext:value-type="percentage">
            <text:p>0.75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5654" calcext:value-type="float">
            <text:p>1235654</text:p>
          </table:table-cell>
          <table:table-cell table:style-name="ce44" table:formula="of:=([.I41]-[.I$27])/[.I$27]" office:value-type="percentage" office:value="0.0131909133636632" calcext:value-type="percentage">
            <text:p>1.32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1619" calcext:value-type="float">
            <text:p>1231619</text:p>
          </table:table-cell>
          <table:table-cell table:style-name="ce44" table:formula="of:=([.I42]-[.I$27])/[.I$27]" office:value-type="percentage" office:value="0.00988236150738111" calcext:value-type="percentage">
            <text:p>0.99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4171" calcext:value-type="float">
            <text:p>1234171</text:p>
          </table:table-cell>
          <table:table-cell table:style-name="ce44" table:formula="of:=([.I43]-[.I$27])/[.I$27]" office:value-type="percentage" office:value="0.0119749078115278" calcext:value-type="percentage">
            <text:p>1.20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26577" calcext:value-type="float">
            <text:p>1226577</text:p>
          </table:table-cell>
          <table:table-cell table:style-name="ce44" table:formula="of:=([.I44]-[.I$27])/[.I$27]" office:value-type="percentage" office:value="0.00574810662277782" calcext:value-type="percentage">
            <text:p>0.57%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2" table:formula="of:=AVERAGE([.I40:.I44])" office:value-type="float" office:value="1231357.8" calcext:value-type="float">
            <text:p>1231358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42" table:formula="of:=STDEVP([.I40:.I44])" office:value-type="float" office:value="3346.72277907806" calcext:value-type="float">
            <text:p>3347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42"/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4"/>
          <table:table-cell table:number-columns-repeated="13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8"/>
          <table:table-cell table:style-name="ce44" table:formula="of:=[.I47]/[.I46]" office:value-type="percentage" office:value="0.00271791251826079" calcext:value-type="percentage">
            <text:p>0.27%</text:p>
          </table:table-cell>
          <table:table-cell table:style-name="ce79" table:formula="of:=IF([.I54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2"/>
        </table:table-row>
        <calcext:conditional-formats>
          <calcext:conditional-format calcext:target-range-address="'Annex A Preliminary Check'.D35:'Annex A Preliminary Check'.D35 'Annex A Preliminary Check'.J35:'Annex A Preliminary Check'.J35 'Annex A Preliminary Check'.J54:'Annex A Preliminary Check'.J54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 'Annex A Preliminary Check'.J35:'Annex A Preliminary Check'.J35 'Annex A Preliminary Check'.J54:'Annex A Preliminary Check'.J54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3" draw:text-style-name="P2" svg:width="23.951cm" svg:height="15.239cm" svg:x="0.186cm" svg:y="18.129cm">
            <draw:object draw:notify-on-update-of-ranges="'Annex A Preliminary Check'.E22:'Annex B Coincidence Limit'.E36 'Annex B Coincidence Limit'.L21:'Annex B Coincidence Limit'.L21 'Annex A Preliminary Check'.L22:'Annex B Coincidence Limit'.L36 'Annex B Coincidence Limit'.E22:'Annex B Coincidence Limit'.E36 'Annex B Coincidence Limit'.K21:'Annex B Coincidence Limit'.K21 'Annex B Coincidence Limit'.K22:'Annex B Coincidence Limit'.K36 'Annex B Coincidence Limit'.E22:'Annex B Coincidence Limit'.E36 'Annex B Coincidence Limit'.I20:'Annex B Coincidence Limit'.I20 'Annex B Coincidence Limit'.I22:'Annex B Coincidence Limit'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3" draw:text-style-name="P2" svg:width="20.348cm" svg:height="15.238cm" svg:x="24.798cm" svg:y="18.113cm">
            <draw:object draw:notify-on-update-of-ranges="'Annex A Preliminary Check'.I22:'Annex B Coincidence Limit'.I36 'ISO 11171_2020 Summary'.A1:'ISO 11171_2020 Summary'.A1 'Annex A Preliminary Check'.M22:'Annex B Coincidence Limit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1" draw:style-name="gr4" draw:text-style-name="P1" svg:width="11.201cm" svg:height="15.848cm" svg:x="31.597cm" svg:y="1.901cm">
            <draw:text-box>
              <text:p><text:span text:style-name="T2">Procedure – Using Calibration Rig</text:span></text:p>
              <text:p><text:span text:style-name="T1"/></text:p>
              <text:p><text:span text:style-name="T1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1"/></text:p>
              <text:p><text:span text:style-name="T1">Add successive doses of concentrate, performing flushing and 5-portion tests after each one.</text:span></text:p>
              <text:p><text:span text:style-name="T1"/></text:p>
              <text:p><text:span text:style-name="T1">When the results have stabilized after each addition, record the most recent tests. We are only interested in the 4μm <text:s/>channel counts for this process.</text:span></text:p>
              <text:p><text:span text:style-name="T1"/></text:p>
              <text:p><text:span text:style-name="T1">The optimum flush / stabilization time can be judged by continuously testing and observing the counts. This was about 2 minutes flushing after dosing then perform two 5-portion tests.</text:span></text:p>
              <text:p><text:span text:style-name="T1"/></text:p>
              <text:p><text:span text:style-name="T1">The results are then imported into this spreadsheet and the portions averaged for each dose level.</text:span></text:p>
              <text:p><text:span text:style-name="T1"/></text:p>
              <text:p><text:span text:style-name="T1">The averages are entered into the table as well as the added ml of concentrate for each dose.</text:span></text:p>
              <text:p><text:span text:style-name="T1"/></text:p>
              <text:p><text:span text:style-name="T1">The counts are plotted in the figure and the first 4 results (10,20,30,40% nominal coincidence limit) used to generate a linear regression line.</text:span></text:p>
              <text:p><text:span text:style-name="T1"/></text:p>
              <text:p><text:span text:style-name="T1"/></text:p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76"/>
        <table:table-column table:style-name="co4" table:number-columns-repeated="16361" table:default-cell-style-name="Default"/>
        <table:table-row table:style-name="ro8">
          <table:table-cell table:style-name="ce99" office:value-type="string" calcext:value-type="string">
            <text:p>Δ<text:span text:style-name="T3">COUNTS_4um</text:span> &lt; 5%</text:p>
          </table:table-cell>
          <table:table-cell table:style-name="ce108" office:value-type="string" calcext:value-type="string">
            <text:p>RM8632x</text:p>
          </table:table-cell>
          <table:table-cell table:style-name="ce99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8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2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2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2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2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2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2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2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2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2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2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8" office:value-type="string" calcext:value-type="string">
            <text:p>Expected</text:p>
          </table:table-cell>
          <table:table-cell table:style-name="ce135" office:value-type="string" calcext:value-type="string">
            <text:p>4μm</text:p>
          </table:table-cell>
          <table:table-cell table:style-name="ce128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9" office:value-type="string" calcext:value-type="string">
            <text:p>4μm/100ml</text:p>
          </table:table-cell>
          <table:table-cell table:style-name="ce136" office:value-type="string" calcext:value-type="string">
            <text:p>Actual</text:p>
          </table:table-cell>
          <table:table-cell table:style-name="ce129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30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1" table:formula="of:=[.$A$6]*[.E23]*100" office:value-type="float" office:value="115904.686245926" calcext:value-type="float">
            <text:p>115905</text:p>
          </table:table-cell>
          <table:table-cell table:style-name="ce137" office:value-type="float" office:value="169243" calcext:value-type="float">
            <text:p>169243</text:p>
          </table:table-cell>
          <table:table-cell table:style-name="ce139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1" table:formula="of:=[.$A$6]*[.E24]*100" office:value-type="float" office:value="227081.833060556" calcext:value-type="float">
            <text:p>227082</text:p>
          </table:table-cell>
          <table:table-cell table:style-name="ce137" office:value-type="float" office:value="294743" calcext:value-type="float">
            <text:p>294743</text:p>
          </table:table-cell>
          <table:table-cell table:style-name="ce139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1" table:formula="of:=[.$A$6]*[.E25]*100" office:value-type="float" office:value="338080.802629642" calcext:value-type="float">
            <text:p>338081</text:p>
          </table:table-cell>
          <table:table-cell table:style-name="ce137" office:value-type="float" office:value="452854" calcext:value-type="float">
            <text:p>452854</text:p>
          </table:table-cell>
          <table:table-cell table:style-name="ce139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1" table:formula="of:=[.$A$6]*[.E26]*100" office:value-type="float" office:value="448902.022941926" calcext:value-type="float">
            <text:p>448902</text:p>
          </table:table-cell>
          <table:table-cell table:style-name="ce137" office:value-type="float" office:value="597630" calcext:value-type="float">
            <text:p>597630</text:p>
          </table:table-cell>
          <table:table-cell table:style-name="ce139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1" table:formula="of:=[.$A$6]*[.E27]*100" office:value-type="float" office:value="559545.92061652" calcext:value-type="float">
            <text:p>559546</text:p>
          </table:table-cell>
          <table:table-cell table:style-name="ce137" office:value-type="float" office:value="720744" calcext:value-type="float">
            <text:p>720744</text:p>
          </table:table-cell>
          <table:table-cell table:style-name="ce139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32" table:formula="of:=[.$A$6]*[.E28]*100" office:value-type="float" office:value="670012.920908379" calcext:value-type="float">
            <text:p>670013</text:p>
          </table:table-cell>
          <table:table-cell table:style-name="ce137" office:value-type="float" office:value="837754" calcext:value-type="float">
            <text:p>837754</text:p>
          </table:table-cell>
          <table:table-cell table:style-name="ce140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1" table:formula="of:=[.$A$6]*[.E29]*100" office:value-type="float" office:value="780303.44771375" calcext:value-type="float">
            <text:p>780303</text:p>
          </table:table-cell>
          <table:table-cell table:style-name="ce137" office:value-type="float" office:value="953674" calcext:value-type="float">
            <text:p>953674</text:p>
          </table:table-cell>
          <table:table-cell table:style-name="ce139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1" table:formula="of:=[.$A$6]*[.E30]*100" office:value-type="float" office:value="890417.923575594" calcext:value-type="float">
            <text:p>890418</text:p>
          </table:table-cell>
          <table:table-cell table:style-name="ce137" office:value-type="float" office:value="1085924" calcext:value-type="float">
            <text:p>1085924</text:p>
          </table:table-cell>
          <table:table-cell table:style-name="ce139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1" table:formula="of:=[.$A$6]*[.E31]*100" office:value-type="float" office:value="1000356.76968898" calcext:value-type="float">
            <text:p>1000357</text:p>
          </table:table-cell>
          <table:table-cell table:style-name="ce137" office:value-type="float" office:value="1199473" calcext:value-type="float">
            <text:p>1199473</text:p>
          </table:table-cell>
          <table:table-cell table:style-name="ce139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1" table:formula="of:=[.$A$6]*[.E32]*100" office:value-type="float" office:value="1219709.25074341" calcext:value-type="float">
            <text:p>1219709</text:p>
          </table:table-cell>
          <table:table-cell table:style-name="ce137" office:value-type="float" office:value="1416948" calcext:value-type="float">
            <text:p>1416948</text:p>
          </table:table-cell>
          <table:table-cell table:style-name="ce139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1" table:formula="of:=[.$A$6]*[.E33]*100" office:value-type="float" office:value="1329123.72138334" calcext:value-type="float">
            <text:p>1329124</text:p>
          </table:table-cell>
          <table:table-cell table:style-name="ce137" office:value-type="float" office:value="1526221" calcext:value-type="float">
            <text:p>1526221</text:p>
          </table:table-cell>
          <table:table-cell table:style-name="ce139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1" table:formula="of:=[.$A$6]*[.E34]*100" office:value-type="float" office:value="1438364.23368322" calcext:value-type="float">
            <text:p>1438364</text:p>
          </table:table-cell>
          <table:table-cell table:style-name="ce137" office:value-type="float" office:value="1653842" calcext:value-type="float">
            <text:p>1653842</text:p>
          </table:table-cell>
          <table:table-cell table:style-name="ce139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2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1" table:formula="of:=[.$A$6]*[.E35]*100" office:value-type="float" office:value="1547431.20217871" calcext:value-type="float">
            <text:p>1547431</text:p>
          </table:table-cell>
          <table:table-cell table:style-name="ce137" office:value-type="float" office:value="1770798" calcext:value-type="float">
            <text:p>1770798</text:p>
          </table:table-cell>
          <table:table-cell table:style-name="ce139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33" table:formula="of:=[.$A$6]*[.E36]*100" office:value-type="float" office:value="1656325.04008941" calcext:value-type="float">
            <text:p>1656325</text:p>
          </table:table-cell>
          <table:table-cell table:style-name="ce138" office:value-type="float" office:value="1850630" calcext:value-type="float">
            <text:p>1850630</text:p>
          </table:table-cell>
          <table:table-cell table:style-name="ce141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DATA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200444" calcext:value-type="float">
            <text:p>7.200444</text:p>
          </table:table-cell>
          <table:table-cell office:value-type="float" office:value="7.575788" calcext:value-type="float">
            <text:p>7.575788</text:p>
          </table:table-cell>
          <table:table-cell office:value-type="float" office:value="7.56043" calcext:value-type="float">
            <text:p>7.56043</text:p>
          </table:table-cell>
          <table:table-cell office:value-type="float" office:value="7.61339" calcext:value-type="float">
            <text:p>7.61339</text:p>
          </table:table-cell>
          <table:table-cell office:value-type="float" office:value="7.616566" calcext:value-type="float">
            <text:p>7.616566</text:p>
          </table:table-cell>
          <table:table-cell table:style-name="ce194"/>
          <table:table-cell table:style-name="ce200" table:formula="of:=SUM([.B6:.F6])" office:value-type="float" office:value="37.566618" calcext:value-type="float">
            <text:p>37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118799.648438" calcext:value-type="float">
            <text:p>118799.648438</text:p>
          </table:table-cell>
          <table:table-cell office:value-type="float" office:value="125336.085938" calcext:value-type="float">
            <text:p>125336.085938</text:p>
          </table:table-cell>
          <table:table-cell office:value-type="float" office:value="124504.75" calcext:value-type="float">
            <text:p>124504.75</text:p>
          </table:table-cell>
          <table:table-cell office:value-type="float" office:value="123298.5625" calcext:value-type="float">
            <text:p>123298.5625</text:p>
          </table:table-cell>
          <table:table-cell office:value-type="float" office:value="125787.195312" calcext:value-type="float">
            <text:p>125787.195312</text:p>
          </table:table-cell>
          <table:table-cell table:style-name="ce76" table:formula="of:=SUMPRODUCT(([.B7:.F7]&lt;&gt;&quot;&quot;)*([.B7:.F7]/[.B$6:.F$6]) / SUM([.B7:.F7]&lt;&gt;&quot;&quot;))" office:value-type="float" office:value="16444.2173710842" calcext:value-type="float">
            <text:p>16444.2</text:p>
          </table:table-cell>
          <table:table-cell table:style-name="ce201" table:formula="of:=[.G7]*[.H$6]" office:value-type="float" office:value="617753.632288485" calcext:value-type="float">
            <text:p>617754</text:p>
          </table:table-cell>
          <table:table-cell table:style-name="ce203" table:formula="of:=STDEVP([.B7:.F7])/AVERAGE([.B7:.F7])" office:value-type="percentage" office:value="0.0203921299551056" calcext:value-type="percentage">
            <text:p>2.0%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percentage" office:value="0.11" calcext:value-type="percentage">
            <text:p>11.0%</text:p>
          </table:table-cell>
          <table:table-cell table:style-name="ce205" table:formula="of:=(MAX([.B7:.F7])-MIN([.B7:.F7]))/[.H7]*5" office:value-type="percentage" office:value="0.0565560970326831" calcext:value-type="percentage">
            <text:p>5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103330.617188" calcext:value-type="float">
            <text:p>103330.617188</text:p>
          </table:table-cell>
          <table:table-cell office:value-type="float" office:value="109118.453125" calcext:value-type="float">
            <text:p>109118.453125</text:p>
          </table:table-cell>
          <table:table-cell office:value-type="float" office:value="108352.820312" calcext:value-type="float">
            <text:p>108352.820312</text:p>
          </table:table-cell>
          <table:table-cell office:value-type="float" office:value="107332.890625" calcext:value-type="float">
            <text:p>107332.890625</text:p>
          </table:table-cell>
          <table:table-cell office:value-type="float" office:value="109923.25" calcext:value-type="float">
            <text:p>109923.25</text:p>
          </table:table-cell>
          <table:table-cell table:style-name="ce76" table:formula="of:=SUMPRODUCT(([.B8:.F8]&lt;&gt;&quot;&quot;)*([.B8:.F8]/[.B$6:.F$6]) / SUM([.B8:.F8]&lt;&gt;&quot;&quot;))" office:value-type="float" office:value="14323.1547737773" calcext:value-type="float">
            <text:p>14323.2</text:p>
          </table:table-cell>
          <table:table-cell table:style-name="ce201" table:formula="of:=[.G8]*[.H$6]" office:value-type="float" office:value="538072.483941367" calcext:value-type="float">
            <text:p>538072</text:p>
          </table:table-cell>
          <table:table-cell table:style-name="ce203" table:formula="of:=STDEVP([.B8:.F8])/AVERAGE([.B8:.F8])" office:value-type="percentage" office:value="0.0214208753701087" calcext:value-type="percentage">
            <text:p>2.1%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percentage" office:value="0.11" calcext:value-type="percentage">
            <text:p>11.0%</text:p>
          </table:table-cell>
          <table:table-cell table:style-name="ce205" table:formula="of:=(MAX([.B8:.F8])-MIN([.B8:.F8]))/[.H8]*5" office:value-type="percentage" office:value="0.0612615679927464" calcext:value-type="percentage">
            <text:p>6.1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89220.882812" calcext:value-type="float">
            <text:p>89220.882812</text:p>
          </table:table-cell>
          <table:table-cell office:value-type="float" office:value="94394.953125" calcext:value-type="float">
            <text:p>94394.953125</text:p>
          </table:table-cell>
          <table:table-cell office:value-type="float" office:value="93744.84375" calcext:value-type="float">
            <text:p>93744.84375</text:p>
          </table:table-cell>
          <table:table-cell office:value-type="float" office:value="92955.484375" calcext:value-type="float">
            <text:p>92955.484375</text:p>
          </table:table-cell>
          <table:table-cell office:value-type="float" office:value="94895.828125" calcext:value-type="float">
            <text:p>94895.828125</text:p>
          </table:table-cell>
          <table:table-cell table:style-name="ce76" table:formula="of:=SUMPRODUCT(([.B9:.F9]&lt;&gt;&quot;&quot;)*([.B9:.F9]/[.B$6:.F$6]) / SUM([.B9:.F9]&lt;&gt;&quot;&quot;))" office:value-type="float" office:value="12383.8248895995" calcext:value-type="float">
            <text:p>12383.8</text:p>
          </table:table-cell>
          <table:table-cell table:style-name="ce201" table:formula="of:=[.G9]*[.H$6]" office:value-type="float" office:value="465218.419006478" calcext:value-type="float">
            <text:p>465218</text:p>
          </table:table-cell>
          <table:table-cell table:style-name="ce203" table:formula="of:=STDEVP([.B9:.F9])/AVERAGE([.B9:.F9])" office:value-type="percentage" office:value="0.0216932709845944" calcext:value-type="percentage">
            <text:p>2.2%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percentage" office:value="0.11" calcext:value-type="percentage">
            <text:p>11.0%</text:p>
          </table:table-cell>
          <table:table-cell table:style-name="ce205" table:formula="of:=(MAX([.B9:.F9])-MIN([.B9:.F9]))/[.H9]*5" office:value-type="percentage" office:value="0.0609922681599693" calcext:value-type="percentage">
            <text:p>6.1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77229.335938" calcext:value-type="float">
            <text:p>77229.335938</text:p>
          </table:table-cell>
          <table:table-cell office:value-type="float" office:value="81756.898438" calcext:value-type="float">
            <text:p>81756.898438</text:p>
          </table:table-cell>
          <table:table-cell office:value-type="float" office:value="81504.90625" calcext:value-type="float">
            <text:p>81504.90625</text:p>
          </table:table-cell>
          <table:table-cell office:value-type="float" office:value="80500.28125" calcext:value-type="float">
            <text:p>80500.28125</text:p>
          </table:table-cell>
          <table:table-cell office:value-type="float" office:value="82273.914062" calcext:value-type="float">
            <text:p>82273.914062</text:p>
          </table:table-cell>
          <table:table-cell table:style-name="ce76" table:formula="of:=SUMPRODUCT(([.B10:.F10]&lt;&gt;&quot;&quot;)*([.B10:.F10]/[.B$6:.F$6]) / SUM([.B10:.F10]&lt;&gt;&quot;&quot;))" office:value-type="float" office:value="10734.6889088701" calcext:value-type="float">
            <text:p>10734.7</text:p>
          </table:table-cell>
          <table:table-cell table:style-name="ce201" table:formula="of:=[.G10]*[.H$6]" office:value-type="float" office:value="403265.957588358" calcext:value-type="float">
            <text:p>403266</text:p>
          </table:table-cell>
          <table:table-cell table:style-name="ce203" table:formula="of:=STDEVP([.B10:.F10])/AVERAGE([.B10:.F10])" office:value-type="percentage" office:value="0.0223979140023974" calcext:value-type="percentage">
            <text:p>2.2%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percentage" office:value="0.11" calcext:value-type="percentage">
            <text:p>11.0%</text:p>
          </table:table-cell>
          <table:table-cell table:style-name="ce205" table:formula="of:=(MAX([.B10:.F10])-MIN([.B10:.F10]))/[.H10]*5" office:value-type="percentage" office:value="0.0625465406771249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66120.960938" calcext:value-type="float">
            <text:p>66120.960938</text:p>
          </table:table-cell>
          <table:table-cell office:value-type="float" office:value="70226.789062" calcext:value-type="float">
            <text:p>70226.789062</text:p>
          </table:table-cell>
          <table:table-cell office:value-type="float" office:value="69978.078125" calcext:value-type="float">
            <text:p>69978.078125</text:p>
          </table:table-cell>
          <table:table-cell office:value-type="float" office:value="69193.132812" calcext:value-type="float">
            <text:p>69193.132812</text:p>
          </table:table-cell>
          <table:table-cell office:value-type="float" office:value="70515.515625" calcext:value-type="float">
            <text:p>70515.515625</text:p>
          </table:table-cell>
          <table:table-cell table:style-name="ce76" table:formula="of:=SUMPRODUCT(([.B11:.F11]&lt;&gt;&quot;&quot;)*([.B11:.F11]/[.B$6:.F$6]) / SUM([.B11:.F11]&lt;&gt;&quot;&quot;))" office:value-type="float" office:value="9211.03136156302" calcext:value-type="float">
            <text:p>9211.0</text:p>
          </table:table-cell>
          <table:table-cell table:style-name="ce201" table:formula="of:=[.G11]*[.H$6]" office:value-type="float" office:value="346027.296545858" calcext:value-type="float">
            <text:p>346027</text:p>
          </table:table-cell>
          <table:table-cell table:style-name="ce203" table:formula="of:=STDEVP([.B11:.F11])/AVERAGE([.B11:.F11])" office:value-type="percentage" office:value="0.02318273034442" calcext:value-type="percentage">
            <text:p>2.3%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percentage" office:value="0.11" calcext:value-type="percentage">
            <text:p>11.0%</text:p>
          </table:table-cell>
          <table:table-cell table:style-name="ce205" table:formula="of:=(MAX([.B11:.F11])-MIN([.B11:.F11]))/[.H11]*5" office:value-type="percentage" office:value="0.0635001158993478" calcext:value-type="percentage">
            <text:p>6.4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56481.457031" calcext:value-type="float">
            <text:p>56481.457031</text:p>
          </table:table-cell>
          <table:table-cell office:value-type="float" office:value="59921.464844" calcext:value-type="float">
            <text:p>59921.464844</text:p>
          </table:table-cell>
          <table:table-cell office:value-type="float" office:value="59841.457031" calcext:value-type="float">
            <text:p>59841.457031</text:p>
          </table:table-cell>
          <table:table-cell office:value-type="float" office:value="59197.628906" calcext:value-type="float">
            <text:p>59197.628906</text:p>
          </table:table-cell>
          <table:table-cell office:value-type="float" office:value="60217.144531" calcext:value-type="float">
            <text:p>60217.144531</text:p>
          </table:table-cell>
          <table:table-cell table:style-name="ce76" table:formula="of:=SUMPRODUCT(([.B12:.F12]&lt;&gt;&quot;&quot;)*([.B12:.F12]/[.B$6:.F$6]) / SUM([.B12:.F12]&lt;&gt;&quot;&quot;))" office:value-type="float" office:value="7870.07780331982" calcext:value-type="float">
            <text:p>7870.1</text:p>
          </table:table-cell>
          <table:table-cell table:style-name="ce201" table:formula="of:=[.G12]*[.H$6]" office:value-type="float" office:value="295652.206467595" calcext:value-type="float">
            <text:p>295652</text:p>
          </table:table-cell>
          <table:table-cell table:style-name="ce203" table:formula="of:=STDEVP([.B12:.F12])/AVERAGE([.B12:.F12])" office:value-type="percentage" office:value="0.0231059111788688" calcext:value-type="percentage">
            <text:p>2.3%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percentage" office:value="0.11" calcext:value-type="percentage">
            <text:p>11.0%</text:p>
          </table:table-cell>
          <table:table-cell table:style-name="ce205" table:formula="of:=(MAX([.B12:.F12])-MIN([.B12:.F12]))/[.H12]*5" office:value-type="percentage" office:value="0.0631770610582176" calcext:value-type="percentage">
            <text:p>6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47792.078125" calcext:value-type="float">
            <text:p>47792.078125</text:p>
          </table:table-cell>
          <table:table-cell office:value-type="float" office:value="50639.195312" calcext:value-type="float">
            <text:p>50639.195312</text:p>
          </table:table-cell>
          <table:table-cell office:value-type="float" office:value="50623.890625" calcext:value-type="float">
            <text:p>50623.890625</text:p>
          </table:table-cell>
          <table:table-cell office:value-type="float" office:value="50156.5625" calcext:value-type="float">
            <text:p>50156.5625</text:p>
          </table:table-cell>
          <table:table-cell office:value-type="float" office:value="51004.714844" calcext:value-type="float">
            <text:p>51004.714844</text:p>
          </table:table-cell>
          <table:table-cell table:style-name="ce76" table:formula="of:=SUMPRODUCT(([.B13:.F13]&lt;&gt;&quot;&quot;)*([.B13:.F13]/[.B$6:.F$6]) / SUM([.B13:.F13]&lt;&gt;&quot;&quot;))" office:value-type="float" office:value="6660.42359933335" calcext:value-type="float">
            <text:p>6660.4</text:p>
          </table:table-cell>
          <table:table-cell table:style-name="ce201" table:formula="of:=[.G13]*[.H$6]" office:value-type="float" office:value="250209.589074341" calcext:value-type="float">
            <text:p>250210</text:p>
          </table:table-cell>
          <table:table-cell table:style-name="ce203" table:formula="of:=STDEVP([.B13:.F13])/AVERAGE([.B13:.F13])" office:value-type="percentage" office:value="0.0231270265106067" calcext:value-type="percentage">
            <text:p>2.3%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percentage" office:value="0.11" calcext:value-type="percentage">
            <text:p>11.0%</text:p>
          </table:table-cell>
          <table:table-cell table:style-name="ce205" table:formula="of:=(MAX([.B13:.F13])-MIN([.B13:.F13]))/[.H13]*5" office:value-type="percentage" office:value="0.0641989128171558" calcext:value-type="percentage">
            <text:p>6.4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38022" calcext:value-type="float">
            <text:p>38022</text:p>
          </table:table-cell>
          <table:table-cell office:value-type="float" office:value="40179" calcext:value-type="float">
            <text:p>40179</text:p>
          </table:table-cell>
          <table:table-cell office:value-type="float" office:value="40241" calcext:value-type="float">
            <text:p>40241</text:p>
          </table:table-cell>
          <table:table-cell office:value-type="float" office:value="39850" calcext:value-type="float">
            <text:p>39850</text:p>
          </table:table-cell>
          <table:table-cell office:value-type="float" office:value="40492" calcext:value-type="float">
            <text:p>40492</text:p>
          </table:table-cell>
          <table:table-cell table:style-name="ce76" table:formula="of:=SUMPRODUCT(([.B14:.F14]&lt;&gt;&quot;&quot;)*([.B14:.F14]/[.B$6:.F$6]) / SUM([.B14:.F14]&lt;&gt;&quot;&quot;))" office:value-type="float" office:value="5291.44021376088" calcext:value-type="float">
            <text:p>5291.4</text:p>
          </table:table-cell>
          <table:table-cell table:style-name="ce201" table:formula="of:=[.G14]*[.H$6]" office:value-type="float" office:value="198781.513180193" calcext:value-type="float">
            <text:p>198782</text:p>
          </table:table-cell>
          <table:table-cell table:style-name="ce203" table:formula="of:=STDEVP([.B14:.F14])/AVERAGE([.B14:.F14])" office:value-type="percentage" office:value="0.0224170011457335" calcext:value-type="percentage">
            <text:p>2.2%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percentage" office:value="0.11" calcext:value-type="percentage">
            <text:p>11.0%</text:p>
          </table:table-cell>
          <table:table-cell table:style-name="ce205" table:formula="of:=(MAX([.B14:.F14])-MIN([.B14:.F14]))/[.H14]*5" office:value-type="percentage" office:value="0.0621285138764632" calcext:value-type="percentage">
            <text:p>6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31580" calcext:value-type="float">
            <text:p>31580</text:p>
          </table:table-cell>
          <table:table-cell office:value-type="float" office:value="33324" calcext:value-type="float">
            <text:p>33324</text:p>
          </table:table-cell>
          <table:table-cell office:value-type="float" office:value="33367" calcext:value-type="float">
            <text:p>33367</text:p>
          </table:table-cell>
          <table:table-cell office:value-type="float" office:value="33090" calcext:value-type="float">
            <text:p>33090</text:p>
          </table:table-cell>
          <table:table-cell office:value-type="float" office:value="33635" calcext:value-type="float">
            <text:p>33635</text:p>
          </table:table-cell>
          <table:table-cell table:style-name="ce76" table:formula="of:=SUMPRODUCT(([.B15:.F15]&lt;&gt;&quot;&quot;)*([.B15:.F15]/[.B$6:.F$6]) / SUM([.B15:.F15]&lt;&gt;&quot;&quot;))" office:value-type="float" office:value="4392.05725954488" calcext:value-type="float">
            <text:p>4392.1</text:p>
          </table:table-cell>
          <table:table-cell table:style-name="ce201" table:formula="of:=[.G15]*[.H$6]" office:value-type="float" office:value="164994.737303449" calcext:value-type="float">
            <text:p>164995</text:p>
          </table:table-cell>
          <table:table-cell table:style-name="ce203" table:formula="of:=STDEVP([.B15:.F15])/AVERAGE([.B15:.F15])" office:value-type="percentage" office:value="0.0221337288480204" calcext:value-type="percentage">
            <text:p>2.2%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percentage" office:value="0.11" calcext:value-type="percentage">
            <text:p>11.0%</text:p>
          </table:table-cell>
          <table:table-cell table:style-name="ce205" table:formula="of:=(MAX([.B15:.F15])-MIN([.B15:.F15]))/[.H15]*5" office:value-type="percentage" office:value="0.0622747135328491" calcext:value-type="percentage">
            <text:p>6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25764" calcext:value-type="float">
            <text:p>25764</text:p>
          </table:table-cell>
          <table:table-cell office:value-type="float" office:value="27041" calcext:value-type="float">
            <text:p>27041</text:p>
          </table:table-cell>
          <table:table-cell office:value-type="float" office:value="27278" calcext:value-type="float">
            <text:p>27278</text:p>
          </table:table-cell>
          <table:table-cell office:value-type="float" office:value="26936" calcext:value-type="float">
            <text:p>26936</text:p>
          </table:table-cell>
          <table:table-cell office:value-type="float" office:value="27509" calcext:value-type="float">
            <text:p>27509</text:p>
          </table:table-cell>
          <table:table-cell table:style-name="ce76" table:formula="of:=SUMPRODUCT(([.B16:.F16]&lt;&gt;&quot;&quot;)*([.B16:.F16]/[.B$6:.F$6]) / SUM([.B16:.F16]&lt;&gt;&quot;&quot;))" office:value-type="float" office:value="3581.04319909892" calcext:value-type="float">
            <text:p>3581.0</text:p>
          </table:table-cell>
          <table:table-cell table:style-name="ce201" table:formula="of:=[.G16]*[.H$6]" office:value-type="float" office:value="134527.681902047" calcext:value-type="float">
            <text:p>134528</text:p>
          </table:table-cell>
          <table:table-cell table:style-name="ce203" table:formula="of:=STDEVP([.B16:.F16])/AVERAGE([.B16:.F16])" office:value-type="percentage" office:value="0.0224562485669199" calcext:value-type="percentage">
            <text:p>2.2%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percentage" office:value="0.11" calcext:value-type="percentage">
            <text:p>11.0%</text:p>
          </table:table-cell>
          <table:table-cell table:style-name="ce205" table:formula="of:=(MAX([.B16:.F16])-MIN([.B16:.F16]))/[.H16]*5" office:value-type="percentage" office:value="0.0648565401309218" calcext:value-type="percentage">
            <text:p>6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20536" calcext:value-type="float">
            <text:p>20536</text:p>
          </table:table-cell>
          <table:table-cell office:value-type="float" office:value="21520" calcext:value-type="float">
            <text:p>21520</text:p>
          </table:table-cell>
          <table:table-cell office:value-type="float" office:value="21737" calcext:value-type="float">
            <text:p>21737</text:p>
          </table:table-cell>
          <table:table-cell office:value-type="float" office:value="21583" calcext:value-type="float">
            <text:p>21583</text:p>
          </table:table-cell>
          <table:table-cell office:value-type="float" office:value="21924" calcext:value-type="float">
            <text:p>21924</text:p>
          </table:table-cell>
          <table:table-cell table:style-name="ce76" table:formula="of:=SUMPRODUCT(([.B17:.F17]&lt;&gt;&quot;&quot;)*([.B17:.F17]/[.B$6:.F$6]) / SUM([.B17:.F17]&lt;&gt;&quot;&quot;))" office:value-type="float" office:value="2856.22246593567" calcext:value-type="float">
            <text:p>2856.2</text:p>
          </table:table-cell>
          <table:table-cell table:style-name="ce201" table:formula="of:=[.G17]*[.H$6]" office:value-type="float" office:value="107298.618300823" calcext:value-type="float">
            <text:p>107299</text:p>
          </table:table-cell>
          <table:table-cell table:style-name="ce203" table:formula="of:=STDEVP([.B17:.F17])/AVERAGE([.B17:.F17])" office:value-type="percentage" office:value="0.0224885068408931" calcext:value-type="percentage">
            <text:p>2.2%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percentage" office:value="0.11" calcext:value-type="percentage">
            <text:p>11.0%</text:p>
          </table:table-cell>
          <table:table-cell table:style-name="ce205" table:formula="of:=(MAX([.B17:.F17])-MIN([.B17:.F17]))/[.H17]*5" office:value-type="percentage" office:value="0.0646793044486646" calcext:value-type="percentage">
            <text:p>6.5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16089" calcext:value-type="float">
            <text:p>16089</text:p>
          </table:table-cell>
          <table:table-cell office:value-type="float" office:value="16963" calcext:value-type="float">
            <text:p>16963</text:p>
          </table:table-cell>
          <table:table-cell office:value-type="float" office:value="16951" calcext:value-type="float">
            <text:p>16951</text:p>
          </table:table-cell>
          <table:table-cell office:value-type="float" office:value="16744" calcext:value-type="float">
            <text:p>16744</text:p>
          </table:table-cell>
          <table:table-cell office:value-type="float" office:value="17171" calcext:value-type="float">
            <text:p>17171</text:p>
          </table:table-cell>
          <table:table-cell table:style-name="ce76" table:formula="of:=SUMPRODUCT(([.B18:.F18]&lt;&gt;&quot;&quot;)*([.B18:.F18]/[.B$6:.F$6]) / SUM([.B18:.F18]&lt;&gt;&quot;&quot;))" office:value-type="float" office:value="2233.86638859538" calcext:value-type="float">
            <text:p>2233.9</text:p>
          </table:table-cell>
          <table:table-cell table:style-name="ce201" table:formula="of:=[.G18]*[.H$6]" office:value-type="float" office:value="83918.8052834022" calcext:value-type="float">
            <text:p>83919</text:p>
          </table:table-cell>
          <table:table-cell table:style-name="ce203" table:formula="of:=STDEVP([.B18:.F18])/AVERAGE([.B18:.F18])" office:value-type="percentage" office:value="0.0222029517821842" calcext:value-type="percentage">
            <text:p>2.2%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percentage" office:value="0.11" calcext:value-type="percentage">
            <text:p>11.0%</text:p>
          </table:table-cell>
          <table:table-cell table:style-name="ce205" table:formula="of:=(MAX([.B18:.F18])-MIN([.B18:.F18]))/[.H18]*5" office:value-type="percentage" office:value="0.064467076023424" calcext:value-type="percentage">
            <text:p>6.4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12397" calcext:value-type="float">
            <text:p>12397</text:p>
          </table:table-cell>
          <table:table-cell office:value-type="float" office:value="12985" calcext:value-type="float">
            <text:p>1298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13" calcext:value-type="float">
            <text:p>12813</text:p>
          </table:table-cell>
          <table:table-cell office:value-type="float" office:value="13172" calcext:value-type="float">
            <text:p>13172</text:p>
          </table:table-cell>
          <table:table-cell table:style-name="ce76" table:formula="of:=SUMPRODUCT(([.B19:.F19]&lt;&gt;&quot;&quot;)*([.B19:.F19]/[.B$6:.F$6]) / SUM([.B19:.F19]&lt;&gt;&quot;&quot;))" office:value-type="float" office:value="1714.61817841715" calcext:value-type="float">
            <text:p>1714.6</text:p>
          </table:table-cell>
          <table:table-cell table:style-name="ce201" table:formula="of:=[.G19]*[.H$6]" office:value-type="float" office:value="64412.4061244531" calcext:value-type="float">
            <text:p>64412</text:p>
          </table:table-cell>
          <table:table-cell table:style-name="ce203" table:formula="of:=STDEVP([.B19:.F19])/AVERAGE([.B19:.F19])" office:value-type="percentage" office:value="0.0208385474305276" calcext:value-type="percentage">
            <text:p>2.1%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percentage" office:value="0.11" calcext:value-type="percentage">
            <text:p>11.0%</text:p>
          </table:table-cell>
          <table:table-cell table:style-name="ce205" table:formula="of:=(MAX([.B19:.F19])-MIN([.B19:.F19]))/[.H19]*5" office:value-type="percentage" office:value="0.0601592182802953" calcext:value-type="percentage">
            <text:p>6.0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9489" calcext:value-type="float">
            <text:p>9489</text:p>
          </table:table-cell>
          <table:table-cell office:value-type="float" office:value="9844" calcext:value-type="float">
            <text:p>9844</text:p>
          </table:table-cell>
          <table:table-cell office:value-type="float" office:value="9892" calcext:value-type="float">
            <text:p>9892</text:p>
          </table:table-cell>
          <table:table-cell office:value-type="float" office:value="9676" calcext:value-type="float">
            <text:p>9676</text:p>
          </table:table-cell>
          <table:table-cell office:value-type="float" office:value="10016" calcext:value-type="float">
            <text:p>10016</text:p>
          </table:table-cell>
          <table:table-cell table:style-name="ce76" table:formula="of:=SUMPRODUCT(([.B20:.F20]&lt;&gt;&quot;&quot;)*([.B20:.F20]/[.B$6:.F$6]) / SUM([.B20:.F20]&lt;&gt;&quot;&quot;))" office:value-type="float" office:value="1302.31528577903" calcext:value-type="float">
            <text:p>1302.3</text:p>
          </table:table-cell>
          <table:table-cell table:style-name="ce201" table:formula="of:=[.G20]*[.H$6]" office:value-type="float" office:value="48923.5808564218" calcext:value-type="float">
            <text:p>48924</text:p>
          </table:table-cell>
          <table:table-cell table:style-name="ce203" table:formula="of:=STDEVP([.B20:.F20])/AVERAGE([.B20:.F20])" office:value-type="percentage" office:value="0.018723587739535" calcext:value-type="percentage">
            <text:p>1.9%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percentage" office:value="0.11" calcext:value-type="percentage">
            <text:p>11.0%</text:p>
          </table:table-cell>
          <table:table-cell table:style-name="ce205" table:formula="of:=(MAX([.B20:.F20])-MIN([.B20:.F20]))/[.H20]*5" office:value-type="percentage" office:value="0.0538595081119072" calcext:value-type="percentage">
            <text:p>5.4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7147" calcext:value-type="float">
            <text:p>7147</text:p>
          </table:table-cell>
          <table:table-cell office:value-type="float" office:value="7401" calcext:value-type="float">
            <text:p>7401</text:p>
          </table:table-cell>
          <table:table-cell office:value-type="float" office:value="7512" calcext:value-type="float">
            <text:p>7512</text:p>
          </table:table-cell>
          <table:table-cell office:value-type="float" office:value="7315" calcext:value-type="float">
            <text:p>7315</text:p>
          </table:table-cell>
          <table:table-cell office:value-type="float" office:value="7564" calcext:value-type="float">
            <text:p>7564</text:p>
          </table:table-cell>
          <table:table-cell table:style-name="ce76" table:formula="of:=SUMPRODUCT(([.B21:.F21]&lt;&gt;&quot;&quot;)*([.B21:.F21]/[.B$6:.F$6]) / SUM([.B21:.F21]&lt;&gt;&quot;&quot;))" office:value-type="float" office:value="983.401142053265" calcext:value-type="float">
            <text:p>983.4</text:p>
          </table:table-cell>
          <table:table-cell table:style-name="ce201" table:formula="of:=[.G21]*[.H$6]" office:value-type="float" office:value="36943.0550442787" calcext:value-type="float">
            <text:p>36943</text:p>
          </table:table-cell>
          <table:table-cell table:style-name="ce203" table:formula="of:=STDEVP([.B21:.F21])/AVERAGE([.B21:.F21])" office:value-type="percentage" office:value="0.0200705633303041" calcext:value-type="percentage">
            <text:p>2.0%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percentage" office:value="0.11" calcext:value-type="percentage">
            <text:p>11.0%</text:p>
          </table:table-cell>
          <table:table-cell table:style-name="ce205" table:formula="of:=(MAX([.B21:.F21])-MIN([.B21:.F21]))/[.H21]*5" office:value-type="percentage" office:value="0.0564382127439376" calcext:value-type="percentage">
            <text:p>5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5429" calcext:value-type="float">
            <text:p>5429</text:p>
          </table:table-cell>
          <table:table-cell office:value-type="float" office:value="5563" calcext:value-type="float">
            <text:p>5563</text:p>
          </table:table-cell>
          <table:table-cell office:value-type="float" office:value="5688" calcext:value-type="float">
            <text:p>5688</text:p>
          </table:table-cell>
          <table:table-cell office:value-type="float" office:value="5519" calcext:value-type="float">
            <text:p>5519</text:p>
          </table:table-cell>
          <table:table-cell office:value-type="float" office:value="5598" calcext:value-type="float">
            <text:p>5598</text:p>
          </table:table-cell>
          <table:table-cell table:style-name="ce76" table:formula="of:=SUMPRODUCT(([.B22:.F22]&lt;&gt;&quot;&quot;)*([.B22:.F22]/[.B$6:.F$6]) / SUM([.B22:.F22]&lt;&gt;&quot;&quot;))" office:value-type="float" office:value="740.103284773596" calcext:value-type="float">
            <text:p>740.1</text:p>
          </table:table-cell>
          <table:table-cell table:style-name="ce201" table:formula="of:=[.G22]*[.H$6]" office:value-type="float" office:value="27803.1773796349" calcext:value-type="float">
            <text:p>27803</text:p>
          </table:table-cell>
          <table:table-cell table:style-name="ce203" table:formula="of:=STDEVP([.B22:.F22])/AVERAGE([.B22:.F22])" office:value-type="percentage" office:value="0.0154058321505609" calcext:value-type="percentage">
            <text:p>1.5%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percentage" office:value="0.11" calcext:value-type="percentage">
            <text:p>11.0%</text:p>
          </table:table-cell>
          <table:table-cell table:style-name="ce205" table:formula="of:=(MAX([.B22:.F22])-MIN([.B22:.F22]))/[.H22]*5" office:value-type="percentage" office:value="0.0465774102836373" calcext:value-type="percentage">
            <text:p>4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4035" calcext:value-type="float">
            <text:p>4035</text:p>
          </table:table-cell>
          <table:table-cell office:value-type="float" office:value="4208" calcext:value-type="float">
            <text:p>4208</text:p>
          </table:table-cell>
          <table:table-cell office:value-type="float" office:value="4289" calcext:value-type="float">
            <text:p>4289</text:p>
          </table:table-cell>
          <table:table-cell office:value-type="float" office:value="4151" calcext:value-type="float">
            <text:p>4151</text:p>
          </table:table-cell>
          <table:table-cell office:value-type="float" office:value="4222" calcext:value-type="float">
            <text:p>4222</text:p>
          </table:table-cell>
          <table:table-cell table:style-name="ce76" table:formula="of:=SUMPRODUCT(([.B23:.F23]&lt;&gt;&quot;&quot;)*([.B23:.F23]/[.B$6:.F$6]) / SUM([.B23:.F23]&lt;&gt;&quot;&quot;))" office:value-type="float" office:value="556.534663099709" calcext:value-type="float">
            <text:p>556.5</text:p>
          </table:table-cell>
          <table:table-cell table:style-name="ce201" table:formula="of:=[.G23]*[.H$6]" office:value-type="float" office:value="20907.1250924254" calcext:value-type="float">
            <text:p>20907</text:p>
          </table:table-cell>
          <table:table-cell table:style-name="ce203" table:formula="of:=STDEVP([.B23:.F23])/AVERAGE([.B23:.F23])" office:value-type="percentage" office:value="0.0203764402044954" calcext:value-type="percentage">
            <text:p>2.0%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percentage" office:value="0.11" calcext:value-type="percentage">
            <text:p>11.0%</text:p>
          </table:table-cell>
          <table:table-cell table:style-name="ce205" table:formula="of:=(MAX([.B23:.F23])-MIN([.B23:.F23]))/[.H23]*5" office:value-type="percentage" office:value="0.0607448415019105" calcext:value-type="percentage">
            <text:p>6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3076" calcext:value-type="float">
            <text:p>3076</text:p>
          </table:table-cell>
          <table:table-cell office:value-type="float" office:value="3165" calcext:value-type="float">
            <text:p>3165</text:p>
          </table:table-cell>
          <table:table-cell office:value-type="float" office:value="3202" calcext:value-type="float">
            <text:p>3202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table:style-name="ce76" table:formula="of:=SUMPRODUCT(([.B24:.F24]&lt;&gt;&quot;&quot;)*([.B24:.F24]/[.B$6:.F$6]) / SUM([.B24:.F24]&lt;&gt;&quot;&quot;))" office:value-type="float" office:value="417.376220349484" calcext:value-type="float">
            <text:p>417.4</text:p>
          </table:table-cell>
          <table:table-cell table:style-name="ce201" table:formula="of:=[.G24]*[.H$6]" office:value-type="float" office:value="15679.4130321529" calcext:value-type="float">
            <text:p>15679</text:p>
          </table:table-cell>
          <table:table-cell table:style-name="ce203" table:formula="of:=STDEVP([.B24:.F24])/AVERAGE([.B24:.F24])" office:value-type="percentage" office:value="0.0145993572988374" calcext:value-type="percentage">
            <text:p>1.5%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percentage" office:value="0.11" calcext:value-type="percentage">
            <text:p>11.0%</text:p>
          </table:table-cell>
          <table:table-cell table:style-name="ce205" table:formula="of:=(MAX([.B24:.F24])-MIN([.B24:.F24]))/[.H24]*5" office:value-type="percentage" office:value="0.0401800755365073" calcext:value-type="percentage">
            <text:p>4.0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2338" calcext:value-type="float">
            <text:p>2338</text:p>
          </table:table-cell>
          <table:table-cell office:value-type="float" office:value="2422" calcext:value-type="float">
            <text:p>2422</text:p>
          </table:table-cell>
          <table:table-cell office:value-type="float" office:value="2434" calcext:value-type="float">
            <text:p>2434</text:p>
          </table:table-cell>
          <table:table-cell office:value-type="float" office:value="2327" calcext:value-type="float">
            <text:p>2327</text:p>
          </table:table-cell>
          <table:table-cell office:value-type="float" office:value="2381" calcext:value-type="float">
            <text:p>2381</text:p>
          </table:table-cell>
          <table:table-cell table:style-name="ce76" table:formula="of:=SUMPRODUCT(([.B25:.F25]&lt;&gt;&quot;&quot;)*([.B25:.F25]/[.B$6:.F$6]) / SUM([.B25:.F25]&lt;&gt;&quot;&quot;))" office:value-type="float" office:value="316.919611397039" calcext:value-type="float">
            <text:p>316.9</text:p>
          </table:table-cell>
          <table:table-cell table:style-name="ce201" table:formula="of:=[.G25]*[.H$6]" office:value-type="float" office:value="11905.597978061" calcext:value-type="float">
            <text:p>11906</text:p>
          </table:table-cell>
          <table:table-cell table:style-name="ce203" table:formula="of:=STDEVP([.B25:.F25])/AVERAGE([.B25:.F25])" office:value-type="percentage" office:value="0.0180722002775826" calcext:value-type="percentage">
            <text:p>1.8%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percentage" office:value="0.11" calcext:value-type="percentage">
            <text:p>11.0%</text:p>
          </table:table-cell>
          <table:table-cell table:style-name="ce205" table:formula="of:=(MAX([.B25:.F25])-MIN([.B25:.F25]))/[.H25]*5" office:value-type="percentage" office:value="0.0449368440783797" calcext:value-type="percentage">
            <text:p>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637" calcext:value-type="float">
            <text:p>163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style-name="ce76" table:formula="of:=SUMPRODUCT(([.B26:.F26]&lt;&gt;&quot;&quot;)*([.B26:.F26]/[.B$6:.F$6]) / SUM([.B26:.F26]&lt;&gt;&quot;&quot;))" office:value-type="float" office:value="217.59303432236" calcext:value-type="float">
            <text:p>217.6</text:p>
          </table:table-cell>
          <table:table-cell table:style-name="ce201" table:formula="of:=[.G26]*[.H$6]" office:value-type="float" office:value="8174.23439984899" calcext:value-type="float">
            <text:p>8174</text:p>
          </table:table-cell>
          <table:table-cell table:style-name="ce203" table:formula="of:=STDEVP([.B26:.F26])/AVERAGE([.B26:.F26])" office:value-type="percentage" office:value="0.0167914326948764" calcext:value-type="percentage">
            <text:p>1.7%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percentage" office:value="0.113" calcext:value-type="percentage">
            <text:p>11.3%</text:p>
          </table:table-cell>
          <table:table-cell table:style-name="ce205" table:formula="of:=(MAX([.B26:.F26])-MIN([.B26:.F26]))/[.H26]*5" office:value-type="percentage" office:value="0.0452641778913063" calcext:value-type="percentage">
            <text:p>4.5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318" calcext:value-type="float">
            <text:p>1318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  <table:table-cell office:value-type="float" office:value="1289" calcext:value-type="float">
            <text:p>1289</text:p>
          </table:table-cell>
          <table:table-cell office:value-type="float" office:value="1307" calcext:value-type="float">
            <text:p>1307</text:p>
          </table:table-cell>
          <table:table-cell table:style-name="ce76" table:formula="of:=SUMPRODUCT(([.B27:.F27]&lt;&gt;&quot;&quot;)*([.B27:.F27]/[.B$6:.F$6]) / SUM([.B27:.F27]&lt;&gt;&quot;&quot;))" office:value-type="float" office:value="177.039830295821" calcext:value-type="float">
            <text:p>177.0</text:p>
          </table:table-cell>
          <table:table-cell table:style-name="ce201" table:formula="of:=[.G27]*[.H$6]" office:value-type="float" office:value="6650.78767550794" calcext:value-type="float">
            <text:p>6651</text:p>
          </table:table-cell>
          <table:table-cell table:style-name="ce203" table:formula="of:=STDEVP([.B27:.F27])/AVERAGE([.B27:.F27])" office:value-type="percentage" office:value="0.0254811879396627" calcext:value-type="percentage">
            <text:p>2.5%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percentage" office:value="0.113" calcext:value-type="percentage">
            <text:p>11.3%</text:p>
          </table:table-cell>
          <table:table-cell table:style-name="ce205" table:formula="of:=(MAX([.B27:.F27])-MIN([.B27:.F27]))/[.H27]*5" office:value-type="percentage" office:value="0.0721719025503759" calcext:value-type="percentage">
            <text:p>7.2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931" calcext:value-type="float">
            <text:p>931</text:p>
          </table:table-cell>
          <table:table-cell table:style-name="ce76" table:formula="of:=SUMPRODUCT(([.B28:.F28]&lt;&gt;&quot;&quot;)*([.B28:.F28]/[.B$6:.F$6]) / SUM([.B28:.F28]&lt;&gt;&quot;&quot;))" office:value-type="float" office:value="129.205080736386" calcext:value-type="float">
            <text:p>129.2</text:p>
          </table:table-cell>
          <table:table-cell table:style-name="ce201" table:formula="of:=[.G28]*[.H$6]" office:value-type="float" office:value="4853.79791168296" calcext:value-type="float">
            <text:p>4854</text:p>
          </table:table-cell>
          <table:table-cell table:style-name="ce203" table:formula="of:=STDEVP([.B28:.F28])/AVERAGE([.B28:.F28])" office:value-type="percentage" office:value="0.0338627238893112" calcext:value-type="percentage">
            <text:p>3.4%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percentage" office:value="0.119" calcext:value-type="percentage">
            <text:p>11.9%</text:p>
          </table:table-cell>
          <table:table-cell table:style-name="ce205" table:formula="of:=(MAX([.B28:.F28])-MIN([.B28:.F28]))/[.H28]*5" office:value-type="percentage" office:value="0.0824096938682204" calcext:value-type="percentage">
            <text:p>8.2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style-name="ce76" table:formula="of:=SUMPRODUCT(([.B29:.F29]&lt;&gt;&quot;&quot;)*([.B29:.F29]/[.B$6:.F$6]) / SUM([.B29:.F29]&lt;&gt;&quot;&quot;))" office:value-type="float" office:value="92.9941336052311" calcext:value-type="float">
            <text:p>93.0</text:p>
          </table:table-cell>
          <table:table-cell table:style-name="ce201" table:formula="of:=[.G29]*[.H$6]" office:value-type="float" office:value="3493.47509338868" calcext:value-type="float">
            <text:p>3493</text:p>
          </table:table-cell>
          <table:table-cell table:style-name="ce203" table:formula="of:=STDEVP([.B29:.F29])/AVERAGE([.B29:.F29])" office:value-type="percentage" office:value="0.0427128894685513" calcext:value-type="percentage">
            <text:p>4.3%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percentage" office:value="0.119" calcext:value-type="percentage">
            <text:p>11.9%</text:p>
          </table:table-cell>
          <table:table-cell table:style-name="ce205" table:formula="of:=(MAX([.B29:.F29])-MIN([.B29:.F29]))/[.H29]*5" office:value-type="percentage" office:value="0.107342972248372" calcext:value-type="percentage">
            <text:p>10.7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table:style-name="ce76" table:formula="of:=SUMPRODUCT(([.B30:.F30]&lt;&gt;&quot;&quot;)*([.B30:.F30]/[.B$6:.F$6]) / SUM([.B30:.F30]&lt;&gt;&quot;&quot;))" office:value-type="float" office:value="65.5155806292663" calcext:value-type="float">
            <text:p>65.5</text:p>
          </table:table-cell>
          <table:table-cell table:style-name="ce201" table:formula="of:=[.G30]*[.H$6]" office:value-type="float" office:value="2461.19879054785" calcext:value-type="float">
            <text:p>2461</text:p>
          </table:table-cell>
          <table:table-cell table:style-name="ce203" table:formula="of:=STDEVP([.B30:.F30])/AVERAGE([.B30:.F30])" office:value-type="percentage" office:value="0.042814386948359" calcext:value-type="percentage">
            <text:p>4.3%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percentage" office:value="0.119" calcext:value-type="percentage">
            <text:p>11.9%</text:p>
          </table:table-cell>
          <table:table-cell table:style-name="ce205" table:formula="of:=(MAX([.B30:.F30])-MIN([.B30:.F30]))/[.H30]*5" office:value-type="percentage" office:value="0.117828759348386" calcext:value-type="percentage">
            <text:p>11.8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style-name="ce76" table:formula="of:=SUMPRODUCT(([.B31:.F31]&lt;&gt;&quot;&quot;)*([.B31:.F31]/[.B$6:.F$6]) / SUM([.B31:.F31]&lt;&gt;&quot;&quot;))" office:value-type="float" office:value="45.4199444309137" calcext:value-type="float">
            <text:p>45.4</text:p>
          </table:table-cell>
          <table:table-cell table:style-name="ce201" table:formula="of:=[.G31]*[.H$6]" office:value-type="float" office:value="1706.27370201736" calcext:value-type="float">
            <text:p>1706</text:p>
          </table:table-cell>
          <table:table-cell table:style-name="ce203" table:formula="of:=STDEVP([.B31:.F31])/AVERAGE([.B31:.F31])" office:value-type="percentage" office:value="0.0749567311101269" calcext:value-type="percentage">
            <text:p>7.5%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percentage" office:value="0.134" calcext:value-type="percentage">
            <text:p>13.4%</text:p>
          </table:table-cell>
          <table:table-cell table:style-name="ce205" table:formula="of:=(MAX([.B31:.F31])-MIN([.B31:.F31]))/[.H31]*5" office:value-type="percentage" office:value="0.175821733433097" calcext:value-type="percentage">
            <text:p>17.6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style-name="ce76" table:formula="of:=SUMPRODUCT(([.B32:.F32]&lt;&gt;&quot;&quot;)*([.B32:.F32]/[.B$6:.F$6]) / SUM([.B32:.F32]&lt;&gt;&quot;&quot;))" office:value-type="float" office:value="30.6345130603433" calcext:value-type="float">
            <text:p>30.6</text:p>
          </table:table-cell>
          <table:table-cell table:style-name="ce201" table:formula="of:=[.G32]*[.H$6]" office:value-type="float" office:value="1150.83504975393" calcext:value-type="float">
            <text:p>1151</text:p>
          </table:table-cell>
          <table:table-cell table:style-name="ce203" table:formula="of:=STDEVP([.B32:.F32])/AVERAGE([.B32:.F32])" office:value-type="percentage" office:value="0.0880875956754047" calcext:value-type="percentage">
            <text:p>8.8%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percentage" office:value="0.134" calcext:value-type="percentage">
            <text:p>13.4%</text:p>
          </table:table-cell>
          <table:table-cell table:style-name="ce205" table:formula="of:=(MAX([.B32:.F32])-MIN([.B32:.F32]))/[.H32]*5" office:value-type="percentage" office:value="0.208544221912008" calcext:value-type="percentage">
            <text:p>20.9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style-name="ce76" table:formula="of:=SUMPRODUCT(([.B33:.F33]&lt;&gt;&quot;&quot;)*([.B33:.F33]/[.B$6:.F$6]) / SUM([.B33:.F33]&lt;&gt;&quot;&quot;))" office:value-type="float" office:value="20.2221866934826" calcext:value-type="float">
            <text:p>20.2</text:p>
          </table:table-cell>
          <table:table-cell table:style-name="ce201" table:formula="of:=[.G33]*[.H$6]" office:value-type="float" office:value="759.679162638743" calcext:value-type="float">
            <text:p>760</text:p>
          </table:table-cell>
          <table:table-cell table:style-name="ce203" table:formula="of:=STDEVP([.B33:.F33])/AVERAGE([.B33:.F33])" office:value-type="percentage" office:value="0.102766798418972" calcext:value-type="percentage">
            <text:p>10.3%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percentage" office:value="0.156" calcext:value-type="percentage">
            <text:p>15.6%</text:p>
          </table:table-cell>
          <table:table-cell table:style-name="ce205" table:formula="of:=(MAX([.B33:.F33])-MIN([.B33:.F33]))/[.H33]*5" office:value-type="percentage" office:value="0.25668730905119" calcext:value-type="percentage">
            <text:p>25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76" table:formula="of:=SUMPRODUCT(([.B34:.F34]&lt;&gt;&quot;&quot;)*([.B34:.F34]/[.B$6:.F$6]) / SUM([.B34:.F34]&lt;&gt;&quot;&quot;))" office:value-type="float" office:value="12.7008899489725" calcext:value-type="float">
            <text:p>12.7</text:p>
          </table:table-cell>
          <table:table-cell table:style-name="ce201" table:formula="of:=[.G34]*[.H$6]" office:value-type="float" office:value="477.129480973089" calcext:value-type="float">
            <text:p>477</text:p>
          </table:table-cell>
          <table:table-cell table:style-name="ce203" table:formula="of:=STDEVP([.B34:.F34])/AVERAGE([.B34:.F34])" office:value-type="percentage" office:value="0.155842914381935" calcext:value-type="percentage">
            <text:p>15.6%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percentage" office:value="0.193" calcext:value-type="percentage">
            <text:p>19.3%</text:p>
          </table:table-cell>
          <table:table-cell table:style-name="ce205" table:formula="of:=(MAX([.B34:.F34])-MIN([.B34:.F34]))/[.H34]*5" office:value-type="percentage" office:value="0.440132099093337" calcext:value-type="percentage">
            <text:p>44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5:.F35]&lt;&gt;&quot;&quot;)*([.B35:.F35]/[.B$6:.F$6]) / SUM([.B35:.F35]&lt;&gt;&quot;&quot;))" office:value-type="float" office:value="0.503814235306652" calcext:value-type="float">
            <text:p>0.5</text:p>
          </table:table-cell>
          <table:table-cell table:style-name="ce201" table:formula="of:=[.G35]*[.H$6]" office:value-type="float" office:value="18.9265969207271" calcext:value-type="float">
            <text:p>19</text:p>
          </table:table-cell>
          <table:table-cell table:style-name="ce203" table:formula="of:=STDEVP([.B35:.F35])/AVERAGE([.B35:.F35])" office:value-type="percentage" office:value="0.421052631578947" calcext:value-type="percentage">
            <text:p>42.1%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percentage" office:value="0.275" calcext:value-type="percentage">
            <text:p>27.5%</text:p>
          </table:table-cell>
          <table:table-cell table:style-name="ce205" table:formula="of:=(MAX([.B35:.F35])-MIN([.B35:.F35]))/[.H35]*5" office:value-type="percentage" office:value="1.05671400324997" calcext:value-type="percentage">
            <text:p>105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6" table:formula="of:=SUMPRODUCT(([.B36:.F36]&lt;&gt;&quot;&quot;)*([.B36:.F36]/[.B$6:.F$6]) / SUM([.B36:.F36]&lt;&gt;&quot;&quot;))" office:value-type="float" office:value="0" calcext:value-type="float">
            <text:p>0.0</text:p>
          </table:table-cell>
          <table:table-cell table:style-name="ce201" table:formula="of:=[.G36]*[.H$6]" office:value-type="float" office:value="0" calcext:value-type="float">
            <text:p>0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percentage" office:value="0.275" calcext:value-type="percentage">
            <text:p>27.5%</text:p>
          </table:table-cell>
          <table:table-cell table:style-name="ce205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.H7:DATA.H36">
            <calcext:condition calcext:apply-style-name="Good" calcext:value="&gt;1000" calcext:base-cell-address="DATA.H7"/>
          </calcext:conditional-format>
          <calcext:conditional-format calcext:target-range-address="DATA.K7:DATA.K36">
            <calcext:condition calcext:apply-style-name="Good" calcext:value="&lt;[.J7]" calcext:base-cell-address="DATA.K7"/>
          </calcext:conditional-format>
        </calcext:conditional-formats>
      </table:table>
      <table:table table:name="DATA_2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200444" calcext:value-type="float">
            <text:p>7.200444</text:p>
          </table:table-cell>
          <table:table-cell office:value-type="float" office:value="7.575788" calcext:value-type="float">
            <text:p>7.575788</text:p>
          </table:table-cell>
          <table:table-cell office:value-type="float" office:value="7.56043" calcext:value-type="float">
            <text:p>7.56043</text:p>
          </table:table-cell>
          <table:table-cell office:value-type="float" office:value="7.61339" calcext:value-type="float">
            <text:p>7.61339</text:p>
          </table:table-cell>
          <table:table-cell office:value-type="float" office:value="7.616566" calcext:value-type="float">
            <text:p>7.616566</text:p>
          </table:table-cell>
          <table:table-cell table:style-name="ce194"/>
          <table:table-cell table:style-name="ce200" table:formula="of:=SUM([.B6:.F6])" office:value-type="float" office:value="37.566618" calcext:value-type="float">
            <text:p>37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118799.648438" calcext:value-type="float">
            <text:p>118799.648438</text:p>
          </table:table-cell>
          <table:table-cell office:value-type="float" office:value="125336.085938" calcext:value-type="float">
            <text:p>125336.085938</text:p>
          </table:table-cell>
          <table:table-cell office:value-type="float" office:value="124504.75" calcext:value-type="float">
            <text:p>124504.75</text:p>
          </table:table-cell>
          <table:table-cell office:value-type="float" office:value="123298.5625" calcext:value-type="float">
            <text:p>123298.5625</text:p>
          </table:table-cell>
          <table:table-cell office:value-type="float" office:value="125787.195312" calcext:value-type="float">
            <text:p>125787.195312</text:p>
          </table:table-cell>
          <table:table-cell table:style-name="ce76" table:formula="of:=SUMPRODUCT(([.B7:.F7]&lt;&gt;&quot;&quot;)*([.B7:.F7]/[.B$6:.F$6]) / SUM([.B7:.F7]&lt;&gt;&quot;&quot;))" office:value-type="float" office:value="16444.2173710842" calcext:value-type="float">
            <text:p>16444.2</text:p>
          </table:table-cell>
          <table:table-cell table:style-name="ce202" table:formula="of:=[.G7]*[.H$6]" office:value-type="float" office:value="617753.632288485" calcext:value-type="float">
            <text:p>617754</text:p>
          </table:table-cell>
          <table:table-cell table:style-name="ce203" table:formula="of:=STDEVP([.B7:.F7])/AVERAGE([.B7:.F7])" office:value-type="percentage" office:value="0.0203921299551056" calcext:value-type="percentage">
            <text:p>2.0%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percentage" office:value="0.11" calcext:value-type="percentage">
            <text:p>11.0%</text:p>
          </table:table-cell>
          <table:table-cell table:style-name="ce204" table:formula="of:=(MAX([.B7:.F7])-MIN([.B7:.F7]))/[.H7]*5" office:value-type="percentage" office:value="0.0565560970326831" calcext:value-type="percentage">
            <text:p>5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103330.617188" calcext:value-type="float">
            <text:p>103330.617188</text:p>
          </table:table-cell>
          <table:table-cell office:value-type="float" office:value="109118.453125" calcext:value-type="float">
            <text:p>109118.453125</text:p>
          </table:table-cell>
          <table:table-cell office:value-type="float" office:value="108352.820312" calcext:value-type="float">
            <text:p>108352.820312</text:p>
          </table:table-cell>
          <table:table-cell office:value-type="float" office:value="107332.890625" calcext:value-type="float">
            <text:p>107332.890625</text:p>
          </table:table-cell>
          <table:table-cell office:value-type="float" office:value="109923.25" calcext:value-type="float">
            <text:p>109923.25</text:p>
          </table:table-cell>
          <table:table-cell table:style-name="ce76" table:formula="of:=SUMPRODUCT(([.B8:.F8]&lt;&gt;&quot;&quot;)*([.B8:.F8]/[.B$6:.F$6]) / SUM([.B8:.F8]&lt;&gt;&quot;&quot;))" office:value-type="float" office:value="14323.1547737773" calcext:value-type="float">
            <text:p>14323.2</text:p>
          </table:table-cell>
          <table:table-cell table:style-name="ce202" table:formula="of:=[.G8]*[.H$6]" office:value-type="float" office:value="538072.483941367" calcext:value-type="float">
            <text:p>538072</text:p>
          </table:table-cell>
          <table:table-cell table:style-name="ce203" table:formula="of:=STDEVP([.B8:.F8])/AVERAGE([.B8:.F8])" office:value-type="percentage" office:value="0.0214208753701087" calcext:value-type="percentage">
            <text:p>2.1%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percentage" office:value="0.11" calcext:value-type="percentage">
            <text:p>11.0%</text:p>
          </table:table-cell>
          <table:table-cell table:style-name="ce204" table:formula="of:=(MAX([.B8:.F8])-MIN([.B8:.F8]))/[.H8]*5" office:value-type="percentage" office:value="0.0612615679927464" calcext:value-type="percentage">
            <text:p>6.1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89220.882812" calcext:value-type="float">
            <text:p>89220.882812</text:p>
          </table:table-cell>
          <table:table-cell office:value-type="float" office:value="94394.953125" calcext:value-type="float">
            <text:p>94394.953125</text:p>
          </table:table-cell>
          <table:table-cell office:value-type="float" office:value="93744.84375" calcext:value-type="float">
            <text:p>93744.84375</text:p>
          </table:table-cell>
          <table:table-cell office:value-type="float" office:value="92955.484375" calcext:value-type="float">
            <text:p>92955.484375</text:p>
          </table:table-cell>
          <table:table-cell office:value-type="float" office:value="94895.828125" calcext:value-type="float">
            <text:p>94895.828125</text:p>
          </table:table-cell>
          <table:table-cell table:style-name="ce76" table:formula="of:=SUMPRODUCT(([.B9:.F9]&lt;&gt;&quot;&quot;)*([.B9:.F9]/[.B$6:.F$6]) / SUM([.B9:.F9]&lt;&gt;&quot;&quot;))" office:value-type="float" office:value="12383.8248895995" calcext:value-type="float">
            <text:p>12383.8</text:p>
          </table:table-cell>
          <table:table-cell table:style-name="ce202" table:formula="of:=[.G9]*[.H$6]" office:value-type="float" office:value="465218.419006478" calcext:value-type="float">
            <text:p>465218</text:p>
          </table:table-cell>
          <table:table-cell table:style-name="ce203" table:formula="of:=STDEVP([.B9:.F9])/AVERAGE([.B9:.F9])" office:value-type="percentage" office:value="0.0216932709845944" calcext:value-type="percentage">
            <text:p>2.2%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percentage" office:value="0.11" calcext:value-type="percentage">
            <text:p>11.0%</text:p>
          </table:table-cell>
          <table:table-cell table:style-name="ce204" table:formula="of:=(MAX([.B9:.F9])-MIN([.B9:.F9]))/[.H9]*5" office:value-type="percentage" office:value="0.0609922681599693" calcext:value-type="percentage">
            <text:p>6.1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77229.335938" calcext:value-type="float">
            <text:p>77229.335938</text:p>
          </table:table-cell>
          <table:table-cell office:value-type="float" office:value="81756.898438" calcext:value-type="float">
            <text:p>81756.898438</text:p>
          </table:table-cell>
          <table:table-cell office:value-type="float" office:value="81504.90625" calcext:value-type="float">
            <text:p>81504.90625</text:p>
          </table:table-cell>
          <table:table-cell office:value-type="float" office:value="80500.28125" calcext:value-type="float">
            <text:p>80500.28125</text:p>
          </table:table-cell>
          <table:table-cell office:value-type="float" office:value="82273.914062" calcext:value-type="float">
            <text:p>82273.914062</text:p>
          </table:table-cell>
          <table:table-cell table:style-name="ce76" table:formula="of:=SUMPRODUCT(([.B10:.F10]&lt;&gt;&quot;&quot;)*([.B10:.F10]/[.B$6:.F$6]) / SUM([.B10:.F10]&lt;&gt;&quot;&quot;))" office:value-type="float" office:value="10734.6889088701" calcext:value-type="float">
            <text:p>10734.7</text:p>
          </table:table-cell>
          <table:table-cell table:style-name="ce202" table:formula="of:=[.G10]*[.H$6]" office:value-type="float" office:value="403265.957588358" calcext:value-type="float">
            <text:p>403266</text:p>
          </table:table-cell>
          <table:table-cell table:style-name="ce203" table:formula="of:=STDEVP([.B10:.F10])/AVERAGE([.B10:.F10])" office:value-type="percentage" office:value="0.0223979140023974" calcext:value-type="percentage">
            <text:p>2.2%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percentage" office:value="0.11" calcext:value-type="percentage">
            <text:p>11.0%</text:p>
          </table:table-cell>
          <table:table-cell table:style-name="ce204" table:formula="of:=(MAX([.B10:.F10])-MIN([.B10:.F10]))/[.H10]*5" office:value-type="percentage" office:value="0.0625465406771249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66120.960938" calcext:value-type="float">
            <text:p>66120.960938</text:p>
          </table:table-cell>
          <table:table-cell office:value-type="float" office:value="70226.789062" calcext:value-type="float">
            <text:p>70226.789062</text:p>
          </table:table-cell>
          <table:table-cell office:value-type="float" office:value="69978.078125" calcext:value-type="float">
            <text:p>69978.078125</text:p>
          </table:table-cell>
          <table:table-cell office:value-type="float" office:value="69193.132812" calcext:value-type="float">
            <text:p>69193.132812</text:p>
          </table:table-cell>
          <table:table-cell office:value-type="float" office:value="70515.515625" calcext:value-type="float">
            <text:p>70515.515625</text:p>
          </table:table-cell>
          <table:table-cell table:style-name="ce76" table:formula="of:=SUMPRODUCT(([.B11:.F11]&lt;&gt;&quot;&quot;)*([.B11:.F11]/[.B$6:.F$6]) / SUM([.B11:.F11]&lt;&gt;&quot;&quot;))" office:value-type="float" office:value="9211.03136156302" calcext:value-type="float">
            <text:p>9211.0</text:p>
          </table:table-cell>
          <table:table-cell table:style-name="ce202" table:formula="of:=[.G11]*[.H$6]" office:value-type="float" office:value="346027.296545858" calcext:value-type="float">
            <text:p>346027</text:p>
          </table:table-cell>
          <table:table-cell table:style-name="ce203" table:formula="of:=STDEVP([.B11:.F11])/AVERAGE([.B11:.F11])" office:value-type="percentage" office:value="0.02318273034442" calcext:value-type="percentage">
            <text:p>2.3%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percentage" office:value="0.11" calcext:value-type="percentage">
            <text:p>11.0%</text:p>
          </table:table-cell>
          <table:table-cell table:style-name="ce204" table:formula="of:=(MAX([.B11:.F11])-MIN([.B11:.F11]))/[.H11]*5" office:value-type="percentage" office:value="0.0635001158993478" calcext:value-type="percentage">
            <text:p>6.4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56481.457031" calcext:value-type="float">
            <text:p>56481.457031</text:p>
          </table:table-cell>
          <table:table-cell office:value-type="float" office:value="59921.464844" calcext:value-type="float">
            <text:p>59921.464844</text:p>
          </table:table-cell>
          <table:table-cell office:value-type="float" office:value="59841.457031" calcext:value-type="float">
            <text:p>59841.457031</text:p>
          </table:table-cell>
          <table:table-cell office:value-type="float" office:value="59197.628906" calcext:value-type="float">
            <text:p>59197.628906</text:p>
          </table:table-cell>
          <table:table-cell office:value-type="float" office:value="60217.144531" calcext:value-type="float">
            <text:p>60217.144531</text:p>
          </table:table-cell>
          <table:table-cell table:style-name="ce76" table:formula="of:=SUMPRODUCT(([.B12:.F12]&lt;&gt;&quot;&quot;)*([.B12:.F12]/[.B$6:.F$6]) / SUM([.B12:.F12]&lt;&gt;&quot;&quot;))" office:value-type="float" office:value="7870.07780331982" calcext:value-type="float">
            <text:p>7870.1</text:p>
          </table:table-cell>
          <table:table-cell table:style-name="ce202" table:formula="of:=[.G12]*[.H$6]" office:value-type="float" office:value="295652.206467595" calcext:value-type="float">
            <text:p>295652</text:p>
          </table:table-cell>
          <table:table-cell table:style-name="ce203" table:formula="of:=STDEVP([.B12:.F12])/AVERAGE([.B12:.F12])" office:value-type="percentage" office:value="0.0231059111788688" calcext:value-type="percentage">
            <text:p>2.3%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percentage" office:value="0.11" calcext:value-type="percentage">
            <text:p>11.0%</text:p>
          </table:table-cell>
          <table:table-cell table:style-name="ce204" table:formula="of:=(MAX([.B12:.F12])-MIN([.B12:.F12]))/[.H12]*5" office:value-type="percentage" office:value="0.0631770610582176" calcext:value-type="percentage">
            <text:p>6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47792.078125" calcext:value-type="float">
            <text:p>47792.078125</text:p>
          </table:table-cell>
          <table:table-cell office:value-type="float" office:value="50639.195312" calcext:value-type="float">
            <text:p>50639.195312</text:p>
          </table:table-cell>
          <table:table-cell office:value-type="float" office:value="50623.890625" calcext:value-type="float">
            <text:p>50623.890625</text:p>
          </table:table-cell>
          <table:table-cell office:value-type="float" office:value="50156.5625" calcext:value-type="float">
            <text:p>50156.5625</text:p>
          </table:table-cell>
          <table:table-cell office:value-type="float" office:value="51004.714844" calcext:value-type="float">
            <text:p>51004.714844</text:p>
          </table:table-cell>
          <table:table-cell table:style-name="ce76" table:formula="of:=SUMPRODUCT(([.B13:.F13]&lt;&gt;&quot;&quot;)*([.B13:.F13]/[.B$6:.F$6]) / SUM([.B13:.F13]&lt;&gt;&quot;&quot;))" office:value-type="float" office:value="6660.42359933335" calcext:value-type="float">
            <text:p>6660.4</text:p>
          </table:table-cell>
          <table:table-cell table:style-name="ce202" table:formula="of:=[.G13]*[.H$6]" office:value-type="float" office:value="250209.589074341" calcext:value-type="float">
            <text:p>250210</text:p>
          </table:table-cell>
          <table:table-cell table:style-name="ce203" table:formula="of:=STDEVP([.B13:.F13])/AVERAGE([.B13:.F13])" office:value-type="percentage" office:value="0.0231270265106067" calcext:value-type="percentage">
            <text:p>2.3%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percentage" office:value="0.11" calcext:value-type="percentage">
            <text:p>11.0%</text:p>
          </table:table-cell>
          <table:table-cell table:style-name="ce204" table:formula="of:=(MAX([.B13:.F13])-MIN([.B13:.F13]))/[.H13]*5" office:value-type="percentage" office:value="0.0641989128171558" calcext:value-type="percentage">
            <text:p>6.4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38022" calcext:value-type="float">
            <text:p>38022</text:p>
          </table:table-cell>
          <table:table-cell office:value-type="float" office:value="40179" calcext:value-type="float">
            <text:p>40179</text:p>
          </table:table-cell>
          <table:table-cell office:value-type="float" office:value="40241" calcext:value-type="float">
            <text:p>40241</text:p>
          </table:table-cell>
          <table:table-cell office:value-type="float" office:value="39850" calcext:value-type="float">
            <text:p>39850</text:p>
          </table:table-cell>
          <table:table-cell office:value-type="float" office:value="40492" calcext:value-type="float">
            <text:p>40492</text:p>
          </table:table-cell>
          <table:table-cell table:style-name="ce76" table:formula="of:=SUMPRODUCT(([.B14:.F14]&lt;&gt;&quot;&quot;)*([.B14:.F14]/[.B$6:.F$6]) / SUM([.B14:.F14]&lt;&gt;&quot;&quot;))" office:value-type="float" office:value="5291.44021376088" calcext:value-type="float">
            <text:p>5291.4</text:p>
          </table:table-cell>
          <table:table-cell table:style-name="ce202" table:formula="of:=[.G14]*[.H$6]" office:value-type="float" office:value="198781.513180193" calcext:value-type="float">
            <text:p>198782</text:p>
          </table:table-cell>
          <table:table-cell table:style-name="ce203" table:formula="of:=STDEVP([.B14:.F14])/AVERAGE([.B14:.F14])" office:value-type="percentage" office:value="0.0224170011457335" calcext:value-type="percentage">
            <text:p>2.2%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percentage" office:value="0.11" calcext:value-type="percentage">
            <text:p>11.0%</text:p>
          </table:table-cell>
          <table:table-cell table:style-name="ce204" table:formula="of:=(MAX([.B14:.F14])-MIN([.B14:.F14]))/[.H14]*5" office:value-type="percentage" office:value="0.0621285138764632" calcext:value-type="percentage">
            <text:p>6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31580" calcext:value-type="float">
            <text:p>31580</text:p>
          </table:table-cell>
          <table:table-cell office:value-type="float" office:value="33324" calcext:value-type="float">
            <text:p>33324</text:p>
          </table:table-cell>
          <table:table-cell office:value-type="float" office:value="33367" calcext:value-type="float">
            <text:p>33367</text:p>
          </table:table-cell>
          <table:table-cell office:value-type="float" office:value="33090" calcext:value-type="float">
            <text:p>33090</text:p>
          </table:table-cell>
          <table:table-cell office:value-type="float" office:value="33635" calcext:value-type="float">
            <text:p>33635</text:p>
          </table:table-cell>
          <table:table-cell table:style-name="ce76" table:formula="of:=SUMPRODUCT(([.B15:.F15]&lt;&gt;&quot;&quot;)*([.B15:.F15]/[.B$6:.F$6]) / SUM([.B15:.F15]&lt;&gt;&quot;&quot;))" office:value-type="float" office:value="4392.05725954488" calcext:value-type="float">
            <text:p>4392.1</text:p>
          </table:table-cell>
          <table:table-cell table:style-name="ce202" table:formula="of:=[.G15]*[.H$6]" office:value-type="float" office:value="164994.737303449" calcext:value-type="float">
            <text:p>164995</text:p>
          </table:table-cell>
          <table:table-cell table:style-name="ce203" table:formula="of:=STDEVP([.B15:.F15])/AVERAGE([.B15:.F15])" office:value-type="percentage" office:value="0.0221337288480204" calcext:value-type="percentage">
            <text:p>2.2%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percentage" office:value="0.11" calcext:value-type="percentage">
            <text:p>11.0%</text:p>
          </table:table-cell>
          <table:table-cell table:style-name="ce204" table:formula="of:=(MAX([.B15:.F15])-MIN([.B15:.F15]))/[.H15]*5" office:value-type="percentage" office:value="0.0622747135328491" calcext:value-type="percentage">
            <text:p>6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25764" calcext:value-type="float">
            <text:p>25764</text:p>
          </table:table-cell>
          <table:table-cell office:value-type="float" office:value="27041" calcext:value-type="float">
            <text:p>27041</text:p>
          </table:table-cell>
          <table:table-cell office:value-type="float" office:value="27278" calcext:value-type="float">
            <text:p>27278</text:p>
          </table:table-cell>
          <table:table-cell office:value-type="float" office:value="26936" calcext:value-type="float">
            <text:p>26936</text:p>
          </table:table-cell>
          <table:table-cell office:value-type="float" office:value="27509" calcext:value-type="float">
            <text:p>27509</text:p>
          </table:table-cell>
          <table:table-cell table:style-name="ce76" table:formula="of:=SUMPRODUCT(([.B16:.F16]&lt;&gt;&quot;&quot;)*([.B16:.F16]/[.B$6:.F$6]) / SUM([.B16:.F16]&lt;&gt;&quot;&quot;))" office:value-type="float" office:value="3581.04319909892" calcext:value-type="float">
            <text:p>3581.0</text:p>
          </table:table-cell>
          <table:table-cell table:style-name="ce202" table:formula="of:=[.G16]*[.H$6]" office:value-type="float" office:value="134527.681902047" calcext:value-type="float">
            <text:p>134528</text:p>
          </table:table-cell>
          <table:table-cell table:style-name="ce203" table:formula="of:=STDEVP([.B16:.F16])/AVERAGE([.B16:.F16])" office:value-type="percentage" office:value="0.0224562485669199" calcext:value-type="percentage">
            <text:p>2.2%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percentage" office:value="0.11" calcext:value-type="percentage">
            <text:p>11.0%</text:p>
          </table:table-cell>
          <table:table-cell table:style-name="ce204" table:formula="of:=(MAX([.B16:.F16])-MIN([.B16:.F16]))/[.H16]*5" office:value-type="percentage" office:value="0.0648565401309218" calcext:value-type="percentage">
            <text:p>6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20536" calcext:value-type="float">
            <text:p>20536</text:p>
          </table:table-cell>
          <table:table-cell office:value-type="float" office:value="21520" calcext:value-type="float">
            <text:p>21520</text:p>
          </table:table-cell>
          <table:table-cell office:value-type="float" office:value="21737" calcext:value-type="float">
            <text:p>21737</text:p>
          </table:table-cell>
          <table:table-cell office:value-type="float" office:value="21583" calcext:value-type="float">
            <text:p>21583</text:p>
          </table:table-cell>
          <table:table-cell office:value-type="float" office:value="21924" calcext:value-type="float">
            <text:p>21924</text:p>
          </table:table-cell>
          <table:table-cell table:style-name="ce76" table:formula="of:=SUMPRODUCT(([.B17:.F17]&lt;&gt;&quot;&quot;)*([.B17:.F17]/[.B$6:.F$6]) / SUM([.B17:.F17]&lt;&gt;&quot;&quot;))" office:value-type="float" office:value="2856.22246593567" calcext:value-type="float">
            <text:p>2856.2</text:p>
          </table:table-cell>
          <table:table-cell table:style-name="ce202" table:formula="of:=[.G17]*[.H$6]" office:value-type="float" office:value="107298.618300823" calcext:value-type="float">
            <text:p>107299</text:p>
          </table:table-cell>
          <table:table-cell table:style-name="ce203" table:formula="of:=STDEVP([.B17:.F17])/AVERAGE([.B17:.F17])" office:value-type="percentage" office:value="0.0224885068408931" calcext:value-type="percentage">
            <text:p>2.2%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percentage" office:value="0.11" calcext:value-type="percentage">
            <text:p>11.0%</text:p>
          </table:table-cell>
          <table:table-cell table:style-name="ce204" table:formula="of:=(MAX([.B17:.F17])-MIN([.B17:.F17]))/[.H17]*5" office:value-type="percentage" office:value="0.0646793044486646" calcext:value-type="percentage">
            <text:p>6.5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16089" calcext:value-type="float">
            <text:p>16089</text:p>
          </table:table-cell>
          <table:table-cell office:value-type="float" office:value="16963" calcext:value-type="float">
            <text:p>16963</text:p>
          </table:table-cell>
          <table:table-cell office:value-type="float" office:value="16951" calcext:value-type="float">
            <text:p>16951</text:p>
          </table:table-cell>
          <table:table-cell office:value-type="float" office:value="16744" calcext:value-type="float">
            <text:p>16744</text:p>
          </table:table-cell>
          <table:table-cell office:value-type="float" office:value="17171" calcext:value-type="float">
            <text:p>17171</text:p>
          </table:table-cell>
          <table:table-cell table:style-name="ce76" table:formula="of:=SUMPRODUCT(([.B18:.F18]&lt;&gt;&quot;&quot;)*([.B18:.F18]/[.B$6:.F$6]) / SUM([.B18:.F18]&lt;&gt;&quot;&quot;))" office:value-type="float" office:value="2233.86638859538" calcext:value-type="float">
            <text:p>2233.9</text:p>
          </table:table-cell>
          <table:table-cell table:style-name="ce202" table:formula="of:=[.G18]*[.H$6]" office:value-type="float" office:value="83918.8052834022" calcext:value-type="float">
            <text:p>83919</text:p>
          </table:table-cell>
          <table:table-cell table:style-name="ce203" table:formula="of:=STDEVP([.B18:.F18])/AVERAGE([.B18:.F18])" office:value-type="percentage" office:value="0.0222029517821842" calcext:value-type="percentage">
            <text:p>2.2%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percentage" office:value="0.11" calcext:value-type="percentage">
            <text:p>11.0%</text:p>
          </table:table-cell>
          <table:table-cell table:style-name="ce204" table:formula="of:=(MAX([.B18:.F18])-MIN([.B18:.F18]))/[.H18]*5" office:value-type="percentage" office:value="0.064467076023424" calcext:value-type="percentage">
            <text:p>6.4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12397" calcext:value-type="float">
            <text:p>12397</text:p>
          </table:table-cell>
          <table:table-cell office:value-type="float" office:value="12985" calcext:value-type="float">
            <text:p>1298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13" calcext:value-type="float">
            <text:p>12813</text:p>
          </table:table-cell>
          <table:table-cell office:value-type="float" office:value="13172" calcext:value-type="float">
            <text:p>13172</text:p>
          </table:table-cell>
          <table:table-cell table:style-name="ce76" table:formula="of:=SUMPRODUCT(([.B19:.F19]&lt;&gt;&quot;&quot;)*([.B19:.F19]/[.B$6:.F$6]) / SUM([.B19:.F19]&lt;&gt;&quot;&quot;))" office:value-type="float" office:value="1714.61817841715" calcext:value-type="float">
            <text:p>1714.6</text:p>
          </table:table-cell>
          <table:table-cell table:style-name="ce202" table:formula="of:=[.G19]*[.H$6]" office:value-type="float" office:value="64412.4061244531" calcext:value-type="float">
            <text:p>64412</text:p>
          </table:table-cell>
          <table:table-cell table:style-name="ce203" table:formula="of:=STDEVP([.B19:.F19])/AVERAGE([.B19:.F19])" office:value-type="percentage" office:value="0.0208385474305276" calcext:value-type="percentage">
            <text:p>2.1%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percentage" office:value="0.11" calcext:value-type="percentage">
            <text:p>11.0%</text:p>
          </table:table-cell>
          <table:table-cell table:style-name="ce204" table:formula="of:=(MAX([.B19:.F19])-MIN([.B19:.F19]))/[.H19]*5" office:value-type="percentage" office:value="0.0601592182802953" calcext:value-type="percentage">
            <text:p>6.0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9489" calcext:value-type="float">
            <text:p>9489</text:p>
          </table:table-cell>
          <table:table-cell office:value-type="float" office:value="9844" calcext:value-type="float">
            <text:p>9844</text:p>
          </table:table-cell>
          <table:table-cell office:value-type="float" office:value="9892" calcext:value-type="float">
            <text:p>9892</text:p>
          </table:table-cell>
          <table:table-cell office:value-type="float" office:value="9676" calcext:value-type="float">
            <text:p>9676</text:p>
          </table:table-cell>
          <table:table-cell office:value-type="float" office:value="10016" calcext:value-type="float">
            <text:p>10016</text:p>
          </table:table-cell>
          <table:table-cell table:style-name="ce76" table:formula="of:=SUMPRODUCT(([.B20:.F20]&lt;&gt;&quot;&quot;)*([.B20:.F20]/[.B$6:.F$6]) / SUM([.B20:.F20]&lt;&gt;&quot;&quot;))" office:value-type="float" office:value="1302.31528577903" calcext:value-type="float">
            <text:p>1302.3</text:p>
          </table:table-cell>
          <table:table-cell table:style-name="ce202" table:formula="of:=[.G20]*[.H$6]" office:value-type="float" office:value="48923.5808564218" calcext:value-type="float">
            <text:p>48924</text:p>
          </table:table-cell>
          <table:table-cell table:style-name="ce203" table:formula="of:=STDEVP([.B20:.F20])/AVERAGE([.B20:.F20])" office:value-type="percentage" office:value="0.018723587739535" calcext:value-type="percentage">
            <text:p>1.9%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percentage" office:value="0.11" calcext:value-type="percentage">
            <text:p>11.0%</text:p>
          </table:table-cell>
          <table:table-cell table:style-name="ce204" table:formula="of:=(MAX([.B20:.F20])-MIN([.B20:.F20]))/[.H20]*5" office:value-type="percentage" office:value="0.0538595081119072" calcext:value-type="percentage">
            <text:p>5.4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7147" calcext:value-type="float">
            <text:p>7147</text:p>
          </table:table-cell>
          <table:table-cell office:value-type="float" office:value="7401" calcext:value-type="float">
            <text:p>7401</text:p>
          </table:table-cell>
          <table:table-cell office:value-type="float" office:value="7512" calcext:value-type="float">
            <text:p>7512</text:p>
          </table:table-cell>
          <table:table-cell office:value-type="float" office:value="7315" calcext:value-type="float">
            <text:p>7315</text:p>
          </table:table-cell>
          <table:table-cell office:value-type="float" office:value="7564" calcext:value-type="float">
            <text:p>7564</text:p>
          </table:table-cell>
          <table:table-cell table:style-name="ce76" table:formula="of:=SUMPRODUCT(([.B21:.F21]&lt;&gt;&quot;&quot;)*([.B21:.F21]/[.B$6:.F$6]) / SUM([.B21:.F21]&lt;&gt;&quot;&quot;))" office:value-type="float" office:value="983.401142053265" calcext:value-type="float">
            <text:p>983.4</text:p>
          </table:table-cell>
          <table:table-cell table:style-name="ce202" table:formula="of:=[.G21]*[.H$6]" office:value-type="float" office:value="36943.0550442787" calcext:value-type="float">
            <text:p>36943</text:p>
          </table:table-cell>
          <table:table-cell table:style-name="ce203" table:formula="of:=STDEVP([.B21:.F21])/AVERAGE([.B21:.F21])" office:value-type="percentage" office:value="0.0200705633303041" calcext:value-type="percentage">
            <text:p>2.0%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percentage" office:value="0.11" calcext:value-type="percentage">
            <text:p>11.0%</text:p>
          </table:table-cell>
          <table:table-cell table:style-name="ce204" table:formula="of:=(MAX([.B21:.F21])-MIN([.B21:.F21]))/[.H21]*5" office:value-type="percentage" office:value="0.0564382127439376" calcext:value-type="percentage">
            <text:p>5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5429" calcext:value-type="float">
            <text:p>5429</text:p>
          </table:table-cell>
          <table:table-cell office:value-type="float" office:value="5563" calcext:value-type="float">
            <text:p>5563</text:p>
          </table:table-cell>
          <table:table-cell office:value-type="float" office:value="5688" calcext:value-type="float">
            <text:p>5688</text:p>
          </table:table-cell>
          <table:table-cell office:value-type="float" office:value="5519" calcext:value-type="float">
            <text:p>5519</text:p>
          </table:table-cell>
          <table:table-cell office:value-type="float" office:value="5598" calcext:value-type="float">
            <text:p>5598</text:p>
          </table:table-cell>
          <table:table-cell table:style-name="ce76" table:formula="of:=SUMPRODUCT(([.B22:.F22]&lt;&gt;&quot;&quot;)*([.B22:.F22]/[.B$6:.F$6]) / SUM([.B22:.F22]&lt;&gt;&quot;&quot;))" office:value-type="float" office:value="740.103284773596" calcext:value-type="float">
            <text:p>740.1</text:p>
          </table:table-cell>
          <table:table-cell table:style-name="ce202" table:formula="of:=[.G22]*[.H$6]" office:value-type="float" office:value="27803.1773796349" calcext:value-type="float">
            <text:p>27803</text:p>
          </table:table-cell>
          <table:table-cell table:style-name="ce203" table:formula="of:=STDEVP([.B22:.F22])/AVERAGE([.B22:.F22])" office:value-type="percentage" office:value="0.0154058321505609" calcext:value-type="percentage">
            <text:p>1.5%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percentage" office:value="0.11" calcext:value-type="percentage">
            <text:p>11.0%</text:p>
          </table:table-cell>
          <table:table-cell table:style-name="ce204" table:formula="of:=(MAX([.B22:.F22])-MIN([.B22:.F22]))/[.H22]*5" office:value-type="percentage" office:value="0.0465774102836373" calcext:value-type="percentage">
            <text:p>4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4035" calcext:value-type="float">
            <text:p>4035</text:p>
          </table:table-cell>
          <table:table-cell office:value-type="float" office:value="4208" calcext:value-type="float">
            <text:p>4208</text:p>
          </table:table-cell>
          <table:table-cell office:value-type="float" office:value="4289" calcext:value-type="float">
            <text:p>4289</text:p>
          </table:table-cell>
          <table:table-cell office:value-type="float" office:value="4151" calcext:value-type="float">
            <text:p>4151</text:p>
          </table:table-cell>
          <table:table-cell office:value-type="float" office:value="4222" calcext:value-type="float">
            <text:p>4222</text:p>
          </table:table-cell>
          <table:table-cell table:style-name="ce76" table:formula="of:=SUMPRODUCT(([.B23:.F23]&lt;&gt;&quot;&quot;)*([.B23:.F23]/[.B$6:.F$6]) / SUM([.B23:.F23]&lt;&gt;&quot;&quot;))" office:value-type="float" office:value="556.534663099709" calcext:value-type="float">
            <text:p>556.5</text:p>
          </table:table-cell>
          <table:table-cell table:style-name="ce202" table:formula="of:=[.G23]*[.H$6]" office:value-type="float" office:value="20907.1250924254" calcext:value-type="float">
            <text:p>20907</text:p>
          </table:table-cell>
          <table:table-cell table:style-name="ce203" table:formula="of:=STDEVP([.B23:.F23])/AVERAGE([.B23:.F23])" office:value-type="percentage" office:value="0.0203764402044954" calcext:value-type="percentage">
            <text:p>2.0%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percentage" office:value="0.11" calcext:value-type="percentage">
            <text:p>11.0%</text:p>
          </table:table-cell>
          <table:table-cell table:style-name="ce204" table:formula="of:=(MAX([.B23:.F23])-MIN([.B23:.F23]))/[.H23]*5" office:value-type="percentage" office:value="0.0607448415019105" calcext:value-type="percentage">
            <text:p>6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3076" calcext:value-type="float">
            <text:p>3076</text:p>
          </table:table-cell>
          <table:table-cell office:value-type="float" office:value="3165" calcext:value-type="float">
            <text:p>3165</text:p>
          </table:table-cell>
          <table:table-cell office:value-type="float" office:value="3202" calcext:value-type="float">
            <text:p>3202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table:style-name="ce76" table:formula="of:=SUMPRODUCT(([.B24:.F24]&lt;&gt;&quot;&quot;)*([.B24:.F24]/[.B$6:.F$6]) / SUM([.B24:.F24]&lt;&gt;&quot;&quot;))" office:value-type="float" office:value="417.376220349484" calcext:value-type="float">
            <text:p>417.4</text:p>
          </table:table-cell>
          <table:table-cell table:style-name="ce202" table:formula="of:=[.G24]*[.H$6]" office:value-type="float" office:value="15679.4130321529" calcext:value-type="float">
            <text:p>15679</text:p>
          </table:table-cell>
          <table:table-cell table:style-name="ce203" table:formula="of:=STDEVP([.B24:.F24])/AVERAGE([.B24:.F24])" office:value-type="percentage" office:value="0.0145993572988374" calcext:value-type="percentage">
            <text:p>1.5%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percentage" office:value="0.11" calcext:value-type="percentage">
            <text:p>11.0%</text:p>
          </table:table-cell>
          <table:table-cell table:style-name="ce204" table:formula="of:=(MAX([.B24:.F24])-MIN([.B24:.F24]))/[.H24]*5" office:value-type="percentage" office:value="0.0401800755365073" calcext:value-type="percentage">
            <text:p>4.0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2338" calcext:value-type="float">
            <text:p>2338</text:p>
          </table:table-cell>
          <table:table-cell office:value-type="float" office:value="2422" calcext:value-type="float">
            <text:p>2422</text:p>
          </table:table-cell>
          <table:table-cell office:value-type="float" office:value="2434" calcext:value-type="float">
            <text:p>2434</text:p>
          </table:table-cell>
          <table:table-cell office:value-type="float" office:value="2327" calcext:value-type="float">
            <text:p>2327</text:p>
          </table:table-cell>
          <table:table-cell office:value-type="float" office:value="2381" calcext:value-type="float">
            <text:p>2381</text:p>
          </table:table-cell>
          <table:table-cell table:style-name="ce76" table:formula="of:=SUMPRODUCT(([.B25:.F25]&lt;&gt;&quot;&quot;)*([.B25:.F25]/[.B$6:.F$6]) / SUM([.B25:.F25]&lt;&gt;&quot;&quot;))" office:value-type="float" office:value="316.919611397039" calcext:value-type="float">
            <text:p>316.9</text:p>
          </table:table-cell>
          <table:table-cell table:style-name="ce202" table:formula="of:=[.G25]*[.H$6]" office:value-type="float" office:value="11905.597978061" calcext:value-type="float">
            <text:p>11906</text:p>
          </table:table-cell>
          <table:table-cell table:style-name="ce203" table:formula="of:=STDEVP([.B25:.F25])/AVERAGE([.B25:.F25])" office:value-type="percentage" office:value="0.0180722002775826" calcext:value-type="percentage">
            <text:p>1.8%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percentage" office:value="0.11" calcext:value-type="percentage">
            <text:p>11.0%</text:p>
          </table:table-cell>
          <table:table-cell table:style-name="ce204" table:formula="of:=(MAX([.B25:.F25])-MIN([.B25:.F25]))/[.H25]*5" office:value-type="percentage" office:value="0.0449368440783797" calcext:value-type="percentage">
            <text:p>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637" calcext:value-type="float">
            <text:p>163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style-name="ce76" table:formula="of:=SUMPRODUCT(([.B26:.F26]&lt;&gt;&quot;&quot;)*([.B26:.F26]/[.B$6:.F$6]) / SUM([.B26:.F26]&lt;&gt;&quot;&quot;))" office:value-type="float" office:value="217.59303432236" calcext:value-type="float">
            <text:p>217.6</text:p>
          </table:table-cell>
          <table:table-cell table:style-name="ce202" table:formula="of:=[.G26]*[.H$6]" office:value-type="float" office:value="8174.23439984899" calcext:value-type="float">
            <text:p>8174</text:p>
          </table:table-cell>
          <table:table-cell table:style-name="ce203" table:formula="of:=STDEVP([.B26:.F26])/AVERAGE([.B26:.F26])" office:value-type="percentage" office:value="0.0167914326948764" calcext:value-type="percentage">
            <text:p>1.7%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percentage" office:value="0.113" calcext:value-type="percentage">
            <text:p>11.3%</text:p>
          </table:table-cell>
          <table:table-cell table:style-name="ce204" table:formula="of:=(MAX([.B26:.F26])-MIN([.B26:.F26]))/[.H26]*5" office:value-type="percentage" office:value="0.0452641778913063" calcext:value-type="percentage">
            <text:p>4.5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318" calcext:value-type="float">
            <text:p>1318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  <table:table-cell office:value-type="float" office:value="1289" calcext:value-type="float">
            <text:p>1289</text:p>
          </table:table-cell>
          <table:table-cell office:value-type="float" office:value="1307" calcext:value-type="float">
            <text:p>1307</text:p>
          </table:table-cell>
          <table:table-cell table:style-name="ce76" table:formula="of:=SUMPRODUCT(([.B27:.F27]&lt;&gt;&quot;&quot;)*([.B27:.F27]/[.B$6:.F$6]) / SUM([.B27:.F27]&lt;&gt;&quot;&quot;))" office:value-type="float" office:value="177.039830295821" calcext:value-type="float">
            <text:p>177.0</text:p>
          </table:table-cell>
          <table:table-cell table:style-name="ce202" table:formula="of:=[.G27]*[.H$6]" office:value-type="float" office:value="6650.78767550794" calcext:value-type="float">
            <text:p>6651</text:p>
          </table:table-cell>
          <table:table-cell table:style-name="ce203" table:formula="of:=STDEVP([.B27:.F27])/AVERAGE([.B27:.F27])" office:value-type="percentage" office:value="0.0254811879396627" calcext:value-type="percentage">
            <text:p>2.5%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percentage" office:value="0.113" calcext:value-type="percentage">
            <text:p>11.3%</text:p>
          </table:table-cell>
          <table:table-cell table:style-name="ce204" table:formula="of:=(MAX([.B27:.F27])-MIN([.B27:.F27]))/[.H27]*5" office:value-type="percentage" office:value="0.0721719025503759" calcext:value-type="percentage">
            <text:p>7.2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931" calcext:value-type="float">
            <text:p>931</text:p>
          </table:table-cell>
          <table:table-cell table:style-name="ce76" table:formula="of:=SUMPRODUCT(([.B28:.F28]&lt;&gt;&quot;&quot;)*([.B28:.F28]/[.B$6:.F$6]) / SUM([.B28:.F28]&lt;&gt;&quot;&quot;))" office:value-type="float" office:value="129.205080736386" calcext:value-type="float">
            <text:p>129.2</text:p>
          </table:table-cell>
          <table:table-cell table:style-name="ce202" table:formula="of:=[.G28]*[.H$6]" office:value-type="float" office:value="4853.79791168296" calcext:value-type="float">
            <text:p>4854</text:p>
          </table:table-cell>
          <table:table-cell table:style-name="ce203" table:formula="of:=STDEVP([.B28:.F28])/AVERAGE([.B28:.F28])" office:value-type="percentage" office:value="0.0338627238893112" calcext:value-type="percentage">
            <text:p>3.4%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percentage" office:value="0.119" calcext:value-type="percentage">
            <text:p>11.9%</text:p>
          </table:table-cell>
          <table:table-cell table:style-name="ce204" table:formula="of:=(MAX([.B28:.F28])-MIN([.B28:.F28]))/[.H28]*5" office:value-type="percentage" office:value="0.0824096938682204" calcext:value-type="percentage">
            <text:p>8.2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style-name="ce76" table:formula="of:=SUMPRODUCT(([.B29:.F29]&lt;&gt;&quot;&quot;)*([.B29:.F29]/[.B$6:.F$6]) / SUM([.B29:.F29]&lt;&gt;&quot;&quot;))" office:value-type="float" office:value="92.9941336052311" calcext:value-type="float">
            <text:p>93.0</text:p>
          </table:table-cell>
          <table:table-cell table:style-name="ce202" table:formula="of:=[.G29]*[.H$6]" office:value-type="float" office:value="3493.47509338868" calcext:value-type="float">
            <text:p>3493</text:p>
          </table:table-cell>
          <table:table-cell table:style-name="ce203" table:formula="of:=STDEVP([.B29:.F29])/AVERAGE([.B29:.F29])" office:value-type="percentage" office:value="0.0427128894685513" calcext:value-type="percentage">
            <text:p>4.3%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percentage" office:value="0.119" calcext:value-type="percentage">
            <text:p>11.9%</text:p>
          </table:table-cell>
          <table:table-cell table:style-name="ce204" table:formula="of:=(MAX([.B29:.F29])-MIN([.B29:.F29]))/[.H29]*5" office:value-type="percentage" office:value="0.107342972248372" calcext:value-type="percentage">
            <text:p>10.7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table:style-name="ce76" table:formula="of:=SUMPRODUCT(([.B30:.F30]&lt;&gt;&quot;&quot;)*([.B30:.F30]/[.B$6:.F$6]) / SUM([.B30:.F30]&lt;&gt;&quot;&quot;))" office:value-type="float" office:value="65.5155806292663" calcext:value-type="float">
            <text:p>65.5</text:p>
          </table:table-cell>
          <table:table-cell table:style-name="ce202" table:formula="of:=[.G30]*[.H$6]" office:value-type="float" office:value="2461.19879054785" calcext:value-type="float">
            <text:p>2461</text:p>
          </table:table-cell>
          <table:table-cell table:style-name="ce203" table:formula="of:=STDEVP([.B30:.F30])/AVERAGE([.B30:.F30])" office:value-type="percentage" office:value="0.042814386948359" calcext:value-type="percentage">
            <text:p>4.3%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percentage" office:value="0.119" calcext:value-type="percentage">
            <text:p>11.9%</text:p>
          </table:table-cell>
          <table:table-cell table:style-name="ce204" table:formula="of:=(MAX([.B30:.F30])-MIN([.B30:.F30]))/[.H30]*5" office:value-type="percentage" office:value="0.117828759348386" calcext:value-type="percentage">
            <text:p>11.8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style-name="ce76" table:formula="of:=SUMPRODUCT(([.B31:.F31]&lt;&gt;&quot;&quot;)*([.B31:.F31]/[.B$6:.F$6]) / SUM([.B31:.F31]&lt;&gt;&quot;&quot;))" office:value-type="float" office:value="45.4199444309137" calcext:value-type="float">
            <text:p>45.4</text:p>
          </table:table-cell>
          <table:table-cell table:style-name="ce202" table:formula="of:=[.G31]*[.H$6]" office:value-type="float" office:value="1706.27370201736" calcext:value-type="float">
            <text:p>1706</text:p>
          </table:table-cell>
          <table:table-cell table:style-name="ce203" table:formula="of:=STDEVP([.B31:.F31])/AVERAGE([.B31:.F31])" office:value-type="percentage" office:value="0.0749567311101269" calcext:value-type="percentage">
            <text:p>7.5%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percentage" office:value="0.134" calcext:value-type="percentage">
            <text:p>13.4%</text:p>
          </table:table-cell>
          <table:table-cell table:style-name="ce204" table:formula="of:=(MAX([.B31:.F31])-MIN([.B31:.F31]))/[.H31]*5" office:value-type="percentage" office:value="0.175821733433097" calcext:value-type="percentage">
            <text:p>17.6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style-name="ce76" table:formula="of:=SUMPRODUCT(([.B32:.F32]&lt;&gt;&quot;&quot;)*([.B32:.F32]/[.B$6:.F$6]) / SUM([.B32:.F32]&lt;&gt;&quot;&quot;))" office:value-type="float" office:value="30.6345130603433" calcext:value-type="float">
            <text:p>30.6</text:p>
          </table:table-cell>
          <table:table-cell table:style-name="ce202" table:formula="of:=[.G32]*[.H$6]" office:value-type="float" office:value="1150.83504975393" calcext:value-type="float">
            <text:p>1151</text:p>
          </table:table-cell>
          <table:table-cell table:style-name="ce203" table:formula="of:=STDEVP([.B32:.F32])/AVERAGE([.B32:.F32])" office:value-type="percentage" office:value="0.0880875956754047" calcext:value-type="percentage">
            <text:p>8.8%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percentage" office:value="0.134" calcext:value-type="percentage">
            <text:p>13.4%</text:p>
          </table:table-cell>
          <table:table-cell table:style-name="ce204" table:formula="of:=(MAX([.B32:.F32])-MIN([.B32:.F32]))/[.H32]*5" office:value-type="percentage" office:value="0.208544221912008" calcext:value-type="percentage">
            <text:p>20.9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style-name="ce76" table:formula="of:=SUMPRODUCT(([.B33:.F33]&lt;&gt;&quot;&quot;)*([.B33:.F33]/[.B$6:.F$6]) / SUM([.B33:.F33]&lt;&gt;&quot;&quot;))" office:value-type="float" office:value="20.2221866934826" calcext:value-type="float">
            <text:p>20.2</text:p>
          </table:table-cell>
          <table:table-cell table:style-name="ce202" table:formula="of:=[.G33]*[.H$6]" office:value-type="float" office:value="759.679162638743" calcext:value-type="float">
            <text:p>760</text:p>
          </table:table-cell>
          <table:table-cell table:style-name="ce203" table:formula="of:=STDEVP([.B33:.F33])/AVERAGE([.B33:.F33])" office:value-type="percentage" office:value="0.102766798418972" calcext:value-type="percentage">
            <text:p>10.3%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percentage" office:value="0.156" calcext:value-type="percentage">
            <text:p>15.6%</text:p>
          </table:table-cell>
          <table:table-cell table:style-name="ce204" table:formula="of:=(MAX([.B33:.F33])-MIN([.B33:.F33]))/[.H33]*5" office:value-type="percentage" office:value="0.25668730905119" calcext:value-type="percentage">
            <text:p>25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76" table:formula="of:=SUMPRODUCT(([.B34:.F34]&lt;&gt;&quot;&quot;)*([.B34:.F34]/[.B$6:.F$6]) / SUM([.B34:.F34]&lt;&gt;&quot;&quot;))" office:value-type="float" office:value="12.7008899489725" calcext:value-type="float">
            <text:p>12.7</text:p>
          </table:table-cell>
          <table:table-cell table:style-name="ce202" table:formula="of:=[.G34]*[.H$6]" office:value-type="float" office:value="477.129480973089" calcext:value-type="float">
            <text:p>477</text:p>
          </table:table-cell>
          <table:table-cell table:style-name="ce203" table:formula="of:=STDEVP([.B34:.F34])/AVERAGE([.B34:.F34])" office:value-type="percentage" office:value="0.155842914381935" calcext:value-type="percentage">
            <text:p>15.6%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percentage" office:value="0.193" calcext:value-type="percentage">
            <text:p>19.3%</text:p>
          </table:table-cell>
          <table:table-cell table:style-name="ce204" table:formula="of:=(MAX([.B34:.F34])-MIN([.B34:.F34]))/[.H34]*5" office:value-type="percentage" office:value="0.440132099093337" calcext:value-type="percentage">
            <text:p>44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5:.F35]&lt;&gt;&quot;&quot;)*([.B35:.F35]/[.B$6:.F$6]) / SUM([.B35:.F35]&lt;&gt;&quot;&quot;))" office:value-type="float" office:value="0.503814235306652" calcext:value-type="float">
            <text:p>0.5</text:p>
          </table:table-cell>
          <table:table-cell table:style-name="ce202" table:formula="of:=[.G35]*[.H$6]" office:value-type="float" office:value="18.9265969207271" calcext:value-type="float">
            <text:p>19</text:p>
          </table:table-cell>
          <table:table-cell table:style-name="ce203" table:formula="of:=STDEVP([.B35:.F35])/AVERAGE([.B35:.F35])" office:value-type="percentage" office:value="0.421052631578947" calcext:value-type="percentage">
            <text:p>42.1%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percentage" office:value="0.275" calcext:value-type="percentage">
            <text:p>27.5%</text:p>
          </table:table-cell>
          <table:table-cell table:style-name="ce204" table:formula="of:=(MAX([.B35:.F35])-MIN([.B35:.F35]))/[.H35]*5" office:value-type="percentage" office:value="1.05671400324997" calcext:value-type="percentage">
            <text:p>105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6" table:formula="of:=SUMPRODUCT(([.B36:.F36]&lt;&gt;&quot;&quot;)*([.B36:.F36]/[.B$6:.F$6]) / SUM([.B36:.F36]&lt;&gt;&quot;&quot;))" office:value-type="float" office:value="0" calcext:value-type="float">
            <text:p>0.0</text:p>
          </table:table-cell>
          <table:table-cell table:style-name="ce202" table:formula="of:=[.G36]*[.H$6]" office:value-type="float" office:value="0" calcext:value-type="float">
            <text:p>0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percentage" office:value="0.275" calcext:value-type="percentage">
            <text:p>27.5%</text:p>
          </table:table-cell>
          <table:table-cell table:style-name="ce204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_2.H7:DATA_2.H36">
            <calcext:condition calcext:apply-style-name="Good" calcext:value="&gt;1000" calcext:base-cell-address="DATA_2.H7"/>
          </calcext:conditional-format>
          <calcext:conditional-format calcext:target-range-address="DATA_2.K7:DATA_2.K36">
            <calcext:condition calcext:apply-style-name="Good" calcext:value="&lt;[.J7]" calcext:base-cell-address="DATA_2.K7"/>
          </calcext:conditional-format>
        </calcext:conditional-formats>
      </table:table>
      <table:table table:name="DATA_2_2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200444" calcext:value-type="float">
            <text:p>7.200444</text:p>
          </table:table-cell>
          <table:table-cell office:value-type="float" office:value="7.575788" calcext:value-type="float">
            <text:p>7.575788</text:p>
          </table:table-cell>
          <table:table-cell office:value-type="float" office:value="7.56043" calcext:value-type="float">
            <text:p>7.56043</text:p>
          </table:table-cell>
          <table:table-cell office:value-type="float" office:value="7.61339" calcext:value-type="float">
            <text:p>7.61339</text:p>
          </table:table-cell>
          <table:table-cell office:value-type="float" office:value="7.616566" calcext:value-type="float">
            <text:p>7.616566</text:p>
          </table:table-cell>
          <table:table-cell table:style-name="ce194"/>
          <table:table-cell table:style-name="ce200" table:formula="of:=SUM([.B6:.F6])" office:value-type="float" office:value="37.566618" calcext:value-type="float">
            <text:p>37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118799.648438" calcext:value-type="float">
            <text:p>118799.648438</text:p>
          </table:table-cell>
          <table:table-cell office:value-type="float" office:value="125336.085938" calcext:value-type="float">
            <text:p>125336.085938</text:p>
          </table:table-cell>
          <table:table-cell office:value-type="float" office:value="124504.75" calcext:value-type="float">
            <text:p>124504.75</text:p>
          </table:table-cell>
          <table:table-cell office:value-type="float" office:value="123298.5625" calcext:value-type="float">
            <text:p>123298.5625</text:p>
          </table:table-cell>
          <table:table-cell office:value-type="float" office:value="125787.195312" calcext:value-type="float">
            <text:p>125787.195312</text:p>
          </table:table-cell>
          <table:table-cell table:style-name="ce76" table:formula="of:=SUMPRODUCT(([.B7:.F7]&lt;&gt;&quot;&quot;)*([.B7:.F7]/[.B$6:.F$6]) / SUM([.B7:.F7]&lt;&gt;&quot;&quot;))" office:value-type="float" office:value="16444.2173710842" calcext:value-type="float">
            <text:p>16444.2</text:p>
          </table:table-cell>
          <table:table-cell table:style-name="ce206" table:formula="of:=[.G7]*[.H$6]" office:value-type="float" office:value="617753.632288485" calcext:value-type="float">
            <text:p>617754</text:p>
          </table:table-cell>
          <table:table-cell table:style-name="ce203" table:formula="of:=STDEVP([.B7:.F7])/AVERAGE([.B7:.F7])" office:value-type="percentage" office:value="0.0203921299551056" calcext:value-type="percentage">
            <text:p>2.0%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percentage" office:value="0.11" calcext:value-type="percentage">
            <text:p>11.0%</text:p>
          </table:table-cell>
          <table:table-cell table:style-name="ce219" table:formula="of:=(MAX([.B7:.F7])-MIN([.B7:.F7]))/[.H7]*5" office:value-type="percentage" office:value="0.0565560970326831" calcext:value-type="percentage">
            <text:p>5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103330.617188" calcext:value-type="float">
            <text:p>103330.617188</text:p>
          </table:table-cell>
          <table:table-cell office:value-type="float" office:value="109118.453125" calcext:value-type="float">
            <text:p>109118.453125</text:p>
          </table:table-cell>
          <table:table-cell office:value-type="float" office:value="108352.820312" calcext:value-type="float">
            <text:p>108352.820312</text:p>
          </table:table-cell>
          <table:table-cell office:value-type="float" office:value="107332.890625" calcext:value-type="float">
            <text:p>107332.890625</text:p>
          </table:table-cell>
          <table:table-cell office:value-type="float" office:value="109923.25" calcext:value-type="float">
            <text:p>109923.25</text:p>
          </table:table-cell>
          <table:table-cell table:style-name="ce76" table:formula="of:=SUMPRODUCT(([.B8:.F8]&lt;&gt;&quot;&quot;)*([.B8:.F8]/[.B$6:.F$6]) / SUM([.B8:.F8]&lt;&gt;&quot;&quot;))" office:value-type="float" office:value="14323.1547737773" calcext:value-type="float">
            <text:p>14323.2</text:p>
          </table:table-cell>
          <table:table-cell table:style-name="ce206" table:formula="of:=[.G8]*[.H$6]" office:value-type="float" office:value="538072.483941367" calcext:value-type="float">
            <text:p>538072</text:p>
          </table:table-cell>
          <table:table-cell table:style-name="ce203" table:formula="of:=STDEVP([.B8:.F8])/AVERAGE([.B8:.F8])" office:value-type="percentage" office:value="0.0214208753701087" calcext:value-type="percentage">
            <text:p>2.1%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percentage" office:value="0.11" calcext:value-type="percentage">
            <text:p>11.0%</text:p>
          </table:table-cell>
          <table:table-cell table:style-name="ce219" table:formula="of:=(MAX([.B8:.F8])-MIN([.B8:.F8]))/[.H8]*5" office:value-type="percentage" office:value="0.0612615679927464" calcext:value-type="percentage">
            <text:p>6.1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89220.882812" calcext:value-type="float">
            <text:p>89220.882812</text:p>
          </table:table-cell>
          <table:table-cell office:value-type="float" office:value="94394.953125" calcext:value-type="float">
            <text:p>94394.953125</text:p>
          </table:table-cell>
          <table:table-cell office:value-type="float" office:value="93744.84375" calcext:value-type="float">
            <text:p>93744.84375</text:p>
          </table:table-cell>
          <table:table-cell office:value-type="float" office:value="92955.484375" calcext:value-type="float">
            <text:p>92955.484375</text:p>
          </table:table-cell>
          <table:table-cell office:value-type="float" office:value="94895.828125" calcext:value-type="float">
            <text:p>94895.828125</text:p>
          </table:table-cell>
          <table:table-cell table:style-name="ce76" table:formula="of:=SUMPRODUCT(([.B9:.F9]&lt;&gt;&quot;&quot;)*([.B9:.F9]/[.B$6:.F$6]) / SUM([.B9:.F9]&lt;&gt;&quot;&quot;))" office:value-type="float" office:value="12383.8248895995" calcext:value-type="float">
            <text:p>12383.8</text:p>
          </table:table-cell>
          <table:table-cell table:style-name="ce206" table:formula="of:=[.G9]*[.H$6]" office:value-type="float" office:value="465218.419006478" calcext:value-type="float">
            <text:p>465218</text:p>
          </table:table-cell>
          <table:table-cell table:style-name="ce203" table:formula="of:=STDEVP([.B9:.F9])/AVERAGE([.B9:.F9])" office:value-type="percentage" office:value="0.0216932709845944" calcext:value-type="percentage">
            <text:p>2.2%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percentage" office:value="0.11" calcext:value-type="percentage">
            <text:p>11.0%</text:p>
          </table:table-cell>
          <table:table-cell table:style-name="ce219" table:formula="of:=(MAX([.B9:.F9])-MIN([.B9:.F9]))/[.H9]*5" office:value-type="percentage" office:value="0.0609922681599693" calcext:value-type="percentage">
            <text:p>6.1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77229.335938" calcext:value-type="float">
            <text:p>77229.335938</text:p>
          </table:table-cell>
          <table:table-cell office:value-type="float" office:value="81756.898438" calcext:value-type="float">
            <text:p>81756.898438</text:p>
          </table:table-cell>
          <table:table-cell office:value-type="float" office:value="81504.90625" calcext:value-type="float">
            <text:p>81504.90625</text:p>
          </table:table-cell>
          <table:table-cell office:value-type="float" office:value="80500.28125" calcext:value-type="float">
            <text:p>80500.28125</text:p>
          </table:table-cell>
          <table:table-cell office:value-type="float" office:value="82273.914062" calcext:value-type="float">
            <text:p>82273.914062</text:p>
          </table:table-cell>
          <table:table-cell table:style-name="ce76" table:formula="of:=SUMPRODUCT(([.B10:.F10]&lt;&gt;&quot;&quot;)*([.B10:.F10]/[.B$6:.F$6]) / SUM([.B10:.F10]&lt;&gt;&quot;&quot;))" office:value-type="float" office:value="10734.6889088701" calcext:value-type="float">
            <text:p>10734.7</text:p>
          </table:table-cell>
          <table:table-cell table:style-name="ce206" table:formula="of:=[.G10]*[.H$6]" office:value-type="float" office:value="403265.957588358" calcext:value-type="float">
            <text:p>403266</text:p>
          </table:table-cell>
          <table:table-cell table:style-name="ce203" table:formula="of:=STDEVP([.B10:.F10])/AVERAGE([.B10:.F10])" office:value-type="percentage" office:value="0.0223979140023974" calcext:value-type="percentage">
            <text:p>2.2%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percentage" office:value="0.11" calcext:value-type="percentage">
            <text:p>11.0%</text:p>
          </table:table-cell>
          <table:table-cell table:style-name="ce219" table:formula="of:=(MAX([.B10:.F10])-MIN([.B10:.F10]))/[.H10]*5" office:value-type="percentage" office:value="0.0625465406771249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66120.960938" calcext:value-type="float">
            <text:p>66120.960938</text:p>
          </table:table-cell>
          <table:table-cell office:value-type="float" office:value="70226.789062" calcext:value-type="float">
            <text:p>70226.789062</text:p>
          </table:table-cell>
          <table:table-cell office:value-type="float" office:value="69978.078125" calcext:value-type="float">
            <text:p>69978.078125</text:p>
          </table:table-cell>
          <table:table-cell office:value-type="float" office:value="69193.132812" calcext:value-type="float">
            <text:p>69193.132812</text:p>
          </table:table-cell>
          <table:table-cell office:value-type="float" office:value="70515.515625" calcext:value-type="float">
            <text:p>70515.515625</text:p>
          </table:table-cell>
          <table:table-cell table:style-name="ce76" table:formula="of:=SUMPRODUCT(([.B11:.F11]&lt;&gt;&quot;&quot;)*([.B11:.F11]/[.B$6:.F$6]) / SUM([.B11:.F11]&lt;&gt;&quot;&quot;))" office:value-type="float" office:value="9211.03136156302" calcext:value-type="float">
            <text:p>9211.0</text:p>
          </table:table-cell>
          <table:table-cell table:style-name="ce206" table:formula="of:=[.G11]*[.H$6]" office:value-type="float" office:value="346027.296545858" calcext:value-type="float">
            <text:p>346027</text:p>
          </table:table-cell>
          <table:table-cell table:style-name="ce203" table:formula="of:=STDEVP([.B11:.F11])/AVERAGE([.B11:.F11])" office:value-type="percentage" office:value="0.02318273034442" calcext:value-type="percentage">
            <text:p>2.3%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percentage" office:value="0.11" calcext:value-type="percentage">
            <text:p>11.0%</text:p>
          </table:table-cell>
          <table:table-cell table:style-name="ce219" table:formula="of:=(MAX([.B11:.F11])-MIN([.B11:.F11]))/[.H11]*5" office:value-type="percentage" office:value="0.0635001158993478" calcext:value-type="percentage">
            <text:p>6.4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56481.457031" calcext:value-type="float">
            <text:p>56481.457031</text:p>
          </table:table-cell>
          <table:table-cell office:value-type="float" office:value="59921.464844" calcext:value-type="float">
            <text:p>59921.464844</text:p>
          </table:table-cell>
          <table:table-cell office:value-type="float" office:value="59841.457031" calcext:value-type="float">
            <text:p>59841.457031</text:p>
          </table:table-cell>
          <table:table-cell office:value-type="float" office:value="59197.628906" calcext:value-type="float">
            <text:p>59197.628906</text:p>
          </table:table-cell>
          <table:table-cell office:value-type="float" office:value="60217.144531" calcext:value-type="float">
            <text:p>60217.144531</text:p>
          </table:table-cell>
          <table:table-cell table:style-name="ce76" table:formula="of:=SUMPRODUCT(([.B12:.F12]&lt;&gt;&quot;&quot;)*([.B12:.F12]/[.B$6:.F$6]) / SUM([.B12:.F12]&lt;&gt;&quot;&quot;))" office:value-type="float" office:value="7870.07780331982" calcext:value-type="float">
            <text:p>7870.1</text:p>
          </table:table-cell>
          <table:table-cell table:style-name="ce206" table:formula="of:=[.G12]*[.H$6]" office:value-type="float" office:value="295652.206467595" calcext:value-type="float">
            <text:p>295652</text:p>
          </table:table-cell>
          <table:table-cell table:style-name="ce203" table:formula="of:=STDEVP([.B12:.F12])/AVERAGE([.B12:.F12])" office:value-type="percentage" office:value="0.0231059111788688" calcext:value-type="percentage">
            <text:p>2.3%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percentage" office:value="0.11" calcext:value-type="percentage">
            <text:p>11.0%</text:p>
          </table:table-cell>
          <table:table-cell table:style-name="ce219" table:formula="of:=(MAX([.B12:.F12])-MIN([.B12:.F12]))/[.H12]*5" office:value-type="percentage" office:value="0.0631770610582176" calcext:value-type="percentage">
            <text:p>6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47792.078125" calcext:value-type="float">
            <text:p>47792.078125</text:p>
          </table:table-cell>
          <table:table-cell office:value-type="float" office:value="50639.195312" calcext:value-type="float">
            <text:p>50639.195312</text:p>
          </table:table-cell>
          <table:table-cell office:value-type="float" office:value="50623.890625" calcext:value-type="float">
            <text:p>50623.890625</text:p>
          </table:table-cell>
          <table:table-cell office:value-type="float" office:value="50156.5625" calcext:value-type="float">
            <text:p>50156.5625</text:p>
          </table:table-cell>
          <table:table-cell office:value-type="float" office:value="51004.714844" calcext:value-type="float">
            <text:p>51004.714844</text:p>
          </table:table-cell>
          <table:table-cell table:style-name="ce76" table:formula="of:=SUMPRODUCT(([.B13:.F13]&lt;&gt;&quot;&quot;)*([.B13:.F13]/[.B$6:.F$6]) / SUM([.B13:.F13]&lt;&gt;&quot;&quot;))" office:value-type="float" office:value="6660.42359933335" calcext:value-type="float">
            <text:p>6660.4</text:p>
          </table:table-cell>
          <table:table-cell table:style-name="ce206" table:formula="of:=[.G13]*[.H$6]" office:value-type="float" office:value="250209.589074341" calcext:value-type="float">
            <text:p>250210</text:p>
          </table:table-cell>
          <table:table-cell table:style-name="ce203" table:formula="of:=STDEVP([.B13:.F13])/AVERAGE([.B13:.F13])" office:value-type="percentage" office:value="0.0231270265106067" calcext:value-type="percentage">
            <text:p>2.3%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percentage" office:value="0.11" calcext:value-type="percentage">
            <text:p>11.0%</text:p>
          </table:table-cell>
          <table:table-cell table:style-name="ce219" table:formula="of:=(MAX([.B13:.F13])-MIN([.B13:.F13]))/[.H13]*5" office:value-type="percentage" office:value="0.0641989128171558" calcext:value-type="percentage">
            <text:p>6.4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38022" calcext:value-type="float">
            <text:p>38022</text:p>
          </table:table-cell>
          <table:table-cell office:value-type="float" office:value="40179" calcext:value-type="float">
            <text:p>40179</text:p>
          </table:table-cell>
          <table:table-cell office:value-type="float" office:value="40241" calcext:value-type="float">
            <text:p>40241</text:p>
          </table:table-cell>
          <table:table-cell office:value-type="float" office:value="39850" calcext:value-type="float">
            <text:p>39850</text:p>
          </table:table-cell>
          <table:table-cell office:value-type="float" office:value="40492" calcext:value-type="float">
            <text:p>40492</text:p>
          </table:table-cell>
          <table:table-cell table:style-name="ce76" table:formula="of:=SUMPRODUCT(([.B14:.F14]&lt;&gt;&quot;&quot;)*([.B14:.F14]/[.B$6:.F$6]) / SUM([.B14:.F14]&lt;&gt;&quot;&quot;))" office:value-type="float" office:value="5291.44021376088" calcext:value-type="float">
            <text:p>5291.4</text:p>
          </table:table-cell>
          <table:table-cell table:style-name="ce206" table:formula="of:=[.G14]*[.H$6]" office:value-type="float" office:value="198781.513180193" calcext:value-type="float">
            <text:p>198782</text:p>
          </table:table-cell>
          <table:table-cell table:style-name="ce203" table:formula="of:=STDEVP([.B14:.F14])/AVERAGE([.B14:.F14])" office:value-type="percentage" office:value="0.0224170011457335" calcext:value-type="percentage">
            <text:p>2.2%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percentage" office:value="0.11" calcext:value-type="percentage">
            <text:p>11.0%</text:p>
          </table:table-cell>
          <table:table-cell table:style-name="ce219" table:formula="of:=(MAX([.B14:.F14])-MIN([.B14:.F14]))/[.H14]*5" office:value-type="percentage" office:value="0.0621285138764632" calcext:value-type="percentage">
            <text:p>6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31580" calcext:value-type="float">
            <text:p>31580</text:p>
          </table:table-cell>
          <table:table-cell office:value-type="float" office:value="33324" calcext:value-type="float">
            <text:p>33324</text:p>
          </table:table-cell>
          <table:table-cell office:value-type="float" office:value="33367" calcext:value-type="float">
            <text:p>33367</text:p>
          </table:table-cell>
          <table:table-cell office:value-type="float" office:value="33090" calcext:value-type="float">
            <text:p>33090</text:p>
          </table:table-cell>
          <table:table-cell office:value-type="float" office:value="33635" calcext:value-type="float">
            <text:p>33635</text:p>
          </table:table-cell>
          <table:table-cell table:style-name="ce76" table:formula="of:=SUMPRODUCT(([.B15:.F15]&lt;&gt;&quot;&quot;)*([.B15:.F15]/[.B$6:.F$6]) / SUM([.B15:.F15]&lt;&gt;&quot;&quot;))" office:value-type="float" office:value="4392.05725954488" calcext:value-type="float">
            <text:p>4392.1</text:p>
          </table:table-cell>
          <table:table-cell table:style-name="ce206" table:formula="of:=[.G15]*[.H$6]" office:value-type="float" office:value="164994.737303449" calcext:value-type="float">
            <text:p>164995</text:p>
          </table:table-cell>
          <table:table-cell table:style-name="ce203" table:formula="of:=STDEVP([.B15:.F15])/AVERAGE([.B15:.F15])" office:value-type="percentage" office:value="0.0221337288480204" calcext:value-type="percentage">
            <text:p>2.2%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percentage" office:value="0.11" calcext:value-type="percentage">
            <text:p>11.0%</text:p>
          </table:table-cell>
          <table:table-cell table:style-name="ce219" table:formula="of:=(MAX([.B15:.F15])-MIN([.B15:.F15]))/[.H15]*5" office:value-type="percentage" office:value="0.0622747135328491" calcext:value-type="percentage">
            <text:p>6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25764" calcext:value-type="float">
            <text:p>25764</text:p>
          </table:table-cell>
          <table:table-cell office:value-type="float" office:value="27041" calcext:value-type="float">
            <text:p>27041</text:p>
          </table:table-cell>
          <table:table-cell office:value-type="float" office:value="27278" calcext:value-type="float">
            <text:p>27278</text:p>
          </table:table-cell>
          <table:table-cell office:value-type="float" office:value="26936" calcext:value-type="float">
            <text:p>26936</text:p>
          </table:table-cell>
          <table:table-cell office:value-type="float" office:value="27509" calcext:value-type="float">
            <text:p>27509</text:p>
          </table:table-cell>
          <table:table-cell table:style-name="ce76" table:formula="of:=SUMPRODUCT(([.B16:.F16]&lt;&gt;&quot;&quot;)*([.B16:.F16]/[.B$6:.F$6]) / SUM([.B16:.F16]&lt;&gt;&quot;&quot;))" office:value-type="float" office:value="3581.04319909892" calcext:value-type="float">
            <text:p>3581.0</text:p>
          </table:table-cell>
          <table:table-cell table:style-name="ce206" table:formula="of:=[.G16]*[.H$6]" office:value-type="float" office:value="134527.681902047" calcext:value-type="float">
            <text:p>134528</text:p>
          </table:table-cell>
          <table:table-cell table:style-name="ce203" table:formula="of:=STDEVP([.B16:.F16])/AVERAGE([.B16:.F16])" office:value-type="percentage" office:value="0.0224562485669199" calcext:value-type="percentage">
            <text:p>2.2%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percentage" office:value="0.11" calcext:value-type="percentage">
            <text:p>11.0%</text:p>
          </table:table-cell>
          <table:table-cell table:style-name="ce219" table:formula="of:=(MAX([.B16:.F16])-MIN([.B16:.F16]))/[.H16]*5" office:value-type="percentage" office:value="0.0648565401309218" calcext:value-type="percentage">
            <text:p>6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20536" calcext:value-type="float">
            <text:p>20536</text:p>
          </table:table-cell>
          <table:table-cell office:value-type="float" office:value="21520" calcext:value-type="float">
            <text:p>21520</text:p>
          </table:table-cell>
          <table:table-cell office:value-type="float" office:value="21737" calcext:value-type="float">
            <text:p>21737</text:p>
          </table:table-cell>
          <table:table-cell office:value-type="float" office:value="21583" calcext:value-type="float">
            <text:p>21583</text:p>
          </table:table-cell>
          <table:table-cell office:value-type="float" office:value="21924" calcext:value-type="float">
            <text:p>21924</text:p>
          </table:table-cell>
          <table:table-cell table:style-name="ce76" table:formula="of:=SUMPRODUCT(([.B17:.F17]&lt;&gt;&quot;&quot;)*([.B17:.F17]/[.B$6:.F$6]) / SUM([.B17:.F17]&lt;&gt;&quot;&quot;))" office:value-type="float" office:value="2856.22246593567" calcext:value-type="float">
            <text:p>2856.2</text:p>
          </table:table-cell>
          <table:table-cell table:style-name="ce206" table:formula="of:=[.G17]*[.H$6]" office:value-type="float" office:value="107298.618300823" calcext:value-type="float">
            <text:p>107299</text:p>
          </table:table-cell>
          <table:table-cell table:style-name="ce203" table:formula="of:=STDEVP([.B17:.F17])/AVERAGE([.B17:.F17])" office:value-type="percentage" office:value="0.0224885068408931" calcext:value-type="percentage">
            <text:p>2.2%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percentage" office:value="0.11" calcext:value-type="percentage">
            <text:p>11.0%</text:p>
          </table:table-cell>
          <table:table-cell table:style-name="ce219" table:formula="of:=(MAX([.B17:.F17])-MIN([.B17:.F17]))/[.H17]*5" office:value-type="percentage" office:value="0.0646793044486646" calcext:value-type="percentage">
            <text:p>6.5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16089" calcext:value-type="float">
            <text:p>16089</text:p>
          </table:table-cell>
          <table:table-cell office:value-type="float" office:value="16963" calcext:value-type="float">
            <text:p>16963</text:p>
          </table:table-cell>
          <table:table-cell office:value-type="float" office:value="16951" calcext:value-type="float">
            <text:p>16951</text:p>
          </table:table-cell>
          <table:table-cell office:value-type="float" office:value="16744" calcext:value-type="float">
            <text:p>16744</text:p>
          </table:table-cell>
          <table:table-cell office:value-type="float" office:value="17171" calcext:value-type="float">
            <text:p>17171</text:p>
          </table:table-cell>
          <table:table-cell table:style-name="ce76" table:formula="of:=SUMPRODUCT(([.B18:.F18]&lt;&gt;&quot;&quot;)*([.B18:.F18]/[.B$6:.F$6]) / SUM([.B18:.F18]&lt;&gt;&quot;&quot;))" office:value-type="float" office:value="2233.86638859538" calcext:value-type="float">
            <text:p>2233.9</text:p>
          </table:table-cell>
          <table:table-cell table:style-name="ce206" table:formula="of:=[.G18]*[.H$6]" office:value-type="float" office:value="83918.8052834022" calcext:value-type="float">
            <text:p>83919</text:p>
          </table:table-cell>
          <table:table-cell table:style-name="ce203" table:formula="of:=STDEVP([.B18:.F18])/AVERAGE([.B18:.F18])" office:value-type="percentage" office:value="0.0222029517821842" calcext:value-type="percentage">
            <text:p>2.2%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percentage" office:value="0.11" calcext:value-type="percentage">
            <text:p>11.0%</text:p>
          </table:table-cell>
          <table:table-cell table:style-name="ce219" table:formula="of:=(MAX([.B18:.F18])-MIN([.B18:.F18]))/[.H18]*5" office:value-type="percentage" office:value="0.064467076023424" calcext:value-type="percentage">
            <text:p>6.4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12397" calcext:value-type="float">
            <text:p>12397</text:p>
          </table:table-cell>
          <table:table-cell office:value-type="float" office:value="12985" calcext:value-type="float">
            <text:p>1298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13" calcext:value-type="float">
            <text:p>12813</text:p>
          </table:table-cell>
          <table:table-cell office:value-type="float" office:value="13172" calcext:value-type="float">
            <text:p>13172</text:p>
          </table:table-cell>
          <table:table-cell table:style-name="ce76" table:formula="of:=SUMPRODUCT(([.B19:.F19]&lt;&gt;&quot;&quot;)*([.B19:.F19]/[.B$6:.F$6]) / SUM([.B19:.F19]&lt;&gt;&quot;&quot;))" office:value-type="float" office:value="1714.61817841715" calcext:value-type="float">
            <text:p>1714.6</text:p>
          </table:table-cell>
          <table:table-cell table:style-name="ce206" table:formula="of:=[.G19]*[.H$6]" office:value-type="float" office:value="64412.4061244531" calcext:value-type="float">
            <text:p>64412</text:p>
          </table:table-cell>
          <table:table-cell table:style-name="ce203" table:formula="of:=STDEVP([.B19:.F19])/AVERAGE([.B19:.F19])" office:value-type="percentage" office:value="0.0208385474305276" calcext:value-type="percentage">
            <text:p>2.1%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percentage" office:value="0.11" calcext:value-type="percentage">
            <text:p>11.0%</text:p>
          </table:table-cell>
          <table:table-cell table:style-name="ce219" table:formula="of:=(MAX([.B19:.F19])-MIN([.B19:.F19]))/[.H19]*5" office:value-type="percentage" office:value="0.0601592182802953" calcext:value-type="percentage">
            <text:p>6.0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9489" calcext:value-type="float">
            <text:p>9489</text:p>
          </table:table-cell>
          <table:table-cell office:value-type="float" office:value="9844" calcext:value-type="float">
            <text:p>9844</text:p>
          </table:table-cell>
          <table:table-cell office:value-type="float" office:value="9892" calcext:value-type="float">
            <text:p>9892</text:p>
          </table:table-cell>
          <table:table-cell office:value-type="float" office:value="9676" calcext:value-type="float">
            <text:p>9676</text:p>
          </table:table-cell>
          <table:table-cell office:value-type="float" office:value="10016" calcext:value-type="float">
            <text:p>10016</text:p>
          </table:table-cell>
          <table:table-cell table:style-name="ce76" table:formula="of:=SUMPRODUCT(([.B20:.F20]&lt;&gt;&quot;&quot;)*([.B20:.F20]/[.B$6:.F$6]) / SUM([.B20:.F20]&lt;&gt;&quot;&quot;))" office:value-type="float" office:value="1302.31528577903" calcext:value-type="float">
            <text:p>1302.3</text:p>
          </table:table-cell>
          <table:table-cell table:style-name="ce206" table:formula="of:=[.G20]*[.H$6]" office:value-type="float" office:value="48923.5808564218" calcext:value-type="float">
            <text:p>48924</text:p>
          </table:table-cell>
          <table:table-cell table:style-name="ce203" table:formula="of:=STDEVP([.B20:.F20])/AVERAGE([.B20:.F20])" office:value-type="percentage" office:value="0.018723587739535" calcext:value-type="percentage">
            <text:p>1.9%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percentage" office:value="0.11" calcext:value-type="percentage">
            <text:p>11.0%</text:p>
          </table:table-cell>
          <table:table-cell table:style-name="ce219" table:formula="of:=(MAX([.B20:.F20])-MIN([.B20:.F20]))/[.H20]*5" office:value-type="percentage" office:value="0.0538595081119072" calcext:value-type="percentage">
            <text:p>5.4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7147" calcext:value-type="float">
            <text:p>7147</text:p>
          </table:table-cell>
          <table:table-cell office:value-type="float" office:value="7401" calcext:value-type="float">
            <text:p>7401</text:p>
          </table:table-cell>
          <table:table-cell office:value-type="float" office:value="7512" calcext:value-type="float">
            <text:p>7512</text:p>
          </table:table-cell>
          <table:table-cell office:value-type="float" office:value="7315" calcext:value-type="float">
            <text:p>7315</text:p>
          </table:table-cell>
          <table:table-cell office:value-type="float" office:value="7564" calcext:value-type="float">
            <text:p>7564</text:p>
          </table:table-cell>
          <table:table-cell table:style-name="ce76" table:formula="of:=SUMPRODUCT(([.B21:.F21]&lt;&gt;&quot;&quot;)*([.B21:.F21]/[.B$6:.F$6]) / SUM([.B21:.F21]&lt;&gt;&quot;&quot;))" office:value-type="float" office:value="983.401142053265" calcext:value-type="float">
            <text:p>983.4</text:p>
          </table:table-cell>
          <table:table-cell table:style-name="ce206" table:formula="of:=[.G21]*[.H$6]" office:value-type="float" office:value="36943.0550442787" calcext:value-type="float">
            <text:p>36943</text:p>
          </table:table-cell>
          <table:table-cell table:style-name="ce203" table:formula="of:=STDEVP([.B21:.F21])/AVERAGE([.B21:.F21])" office:value-type="percentage" office:value="0.0200705633303041" calcext:value-type="percentage">
            <text:p>2.0%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percentage" office:value="0.11" calcext:value-type="percentage">
            <text:p>11.0%</text:p>
          </table:table-cell>
          <table:table-cell table:style-name="ce219" table:formula="of:=(MAX([.B21:.F21])-MIN([.B21:.F21]))/[.H21]*5" office:value-type="percentage" office:value="0.0564382127439376" calcext:value-type="percentage">
            <text:p>5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5429" calcext:value-type="float">
            <text:p>5429</text:p>
          </table:table-cell>
          <table:table-cell office:value-type="float" office:value="5563" calcext:value-type="float">
            <text:p>5563</text:p>
          </table:table-cell>
          <table:table-cell office:value-type="float" office:value="5688" calcext:value-type="float">
            <text:p>5688</text:p>
          </table:table-cell>
          <table:table-cell office:value-type="float" office:value="5519" calcext:value-type="float">
            <text:p>5519</text:p>
          </table:table-cell>
          <table:table-cell office:value-type="float" office:value="5598" calcext:value-type="float">
            <text:p>5598</text:p>
          </table:table-cell>
          <table:table-cell table:style-name="ce76" table:formula="of:=SUMPRODUCT(([.B22:.F22]&lt;&gt;&quot;&quot;)*([.B22:.F22]/[.B$6:.F$6]) / SUM([.B22:.F22]&lt;&gt;&quot;&quot;))" office:value-type="float" office:value="740.103284773596" calcext:value-type="float">
            <text:p>740.1</text:p>
          </table:table-cell>
          <table:table-cell table:style-name="ce206" table:formula="of:=[.G22]*[.H$6]" office:value-type="float" office:value="27803.1773796349" calcext:value-type="float">
            <text:p>27803</text:p>
          </table:table-cell>
          <table:table-cell table:style-name="ce203" table:formula="of:=STDEVP([.B22:.F22])/AVERAGE([.B22:.F22])" office:value-type="percentage" office:value="0.0154058321505609" calcext:value-type="percentage">
            <text:p>1.5%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percentage" office:value="0.11" calcext:value-type="percentage">
            <text:p>11.0%</text:p>
          </table:table-cell>
          <table:table-cell table:style-name="ce219" table:formula="of:=(MAX([.B22:.F22])-MIN([.B22:.F22]))/[.H22]*5" office:value-type="percentage" office:value="0.0465774102836373" calcext:value-type="percentage">
            <text:p>4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4035" calcext:value-type="float">
            <text:p>4035</text:p>
          </table:table-cell>
          <table:table-cell office:value-type="float" office:value="4208" calcext:value-type="float">
            <text:p>4208</text:p>
          </table:table-cell>
          <table:table-cell office:value-type="float" office:value="4289" calcext:value-type="float">
            <text:p>4289</text:p>
          </table:table-cell>
          <table:table-cell office:value-type="float" office:value="4151" calcext:value-type="float">
            <text:p>4151</text:p>
          </table:table-cell>
          <table:table-cell office:value-type="float" office:value="4222" calcext:value-type="float">
            <text:p>4222</text:p>
          </table:table-cell>
          <table:table-cell table:style-name="ce76" table:formula="of:=SUMPRODUCT(([.B23:.F23]&lt;&gt;&quot;&quot;)*([.B23:.F23]/[.B$6:.F$6]) / SUM([.B23:.F23]&lt;&gt;&quot;&quot;))" office:value-type="float" office:value="556.534663099709" calcext:value-type="float">
            <text:p>556.5</text:p>
          </table:table-cell>
          <table:table-cell table:style-name="ce206" table:formula="of:=[.G23]*[.H$6]" office:value-type="float" office:value="20907.1250924254" calcext:value-type="float">
            <text:p>20907</text:p>
          </table:table-cell>
          <table:table-cell table:style-name="ce203" table:formula="of:=STDEVP([.B23:.F23])/AVERAGE([.B23:.F23])" office:value-type="percentage" office:value="0.0203764402044954" calcext:value-type="percentage">
            <text:p>2.0%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percentage" office:value="0.11" calcext:value-type="percentage">
            <text:p>11.0%</text:p>
          </table:table-cell>
          <table:table-cell table:style-name="ce219" table:formula="of:=(MAX([.B23:.F23])-MIN([.B23:.F23]))/[.H23]*5" office:value-type="percentage" office:value="0.0607448415019105" calcext:value-type="percentage">
            <text:p>6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3076" calcext:value-type="float">
            <text:p>3076</text:p>
          </table:table-cell>
          <table:table-cell office:value-type="float" office:value="3165" calcext:value-type="float">
            <text:p>3165</text:p>
          </table:table-cell>
          <table:table-cell office:value-type="float" office:value="3202" calcext:value-type="float">
            <text:p>3202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table:style-name="ce76" table:formula="of:=SUMPRODUCT(([.B24:.F24]&lt;&gt;&quot;&quot;)*([.B24:.F24]/[.B$6:.F$6]) / SUM([.B24:.F24]&lt;&gt;&quot;&quot;))" office:value-type="float" office:value="417.376220349484" calcext:value-type="float">
            <text:p>417.4</text:p>
          </table:table-cell>
          <table:table-cell table:style-name="ce206" table:formula="of:=[.G24]*[.H$6]" office:value-type="float" office:value="15679.4130321529" calcext:value-type="float">
            <text:p>15679</text:p>
          </table:table-cell>
          <table:table-cell table:style-name="ce203" table:formula="of:=STDEVP([.B24:.F24])/AVERAGE([.B24:.F24])" office:value-type="percentage" office:value="0.0145993572988374" calcext:value-type="percentage">
            <text:p>1.5%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percentage" office:value="0.11" calcext:value-type="percentage">
            <text:p>11.0%</text:p>
          </table:table-cell>
          <table:table-cell table:style-name="ce219" table:formula="of:=(MAX([.B24:.F24])-MIN([.B24:.F24]))/[.H24]*5" office:value-type="percentage" office:value="0.0401800755365073" calcext:value-type="percentage">
            <text:p>4.0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2338" calcext:value-type="float">
            <text:p>2338</text:p>
          </table:table-cell>
          <table:table-cell office:value-type="float" office:value="2422" calcext:value-type="float">
            <text:p>2422</text:p>
          </table:table-cell>
          <table:table-cell office:value-type="float" office:value="2434" calcext:value-type="float">
            <text:p>2434</text:p>
          </table:table-cell>
          <table:table-cell office:value-type="float" office:value="2327" calcext:value-type="float">
            <text:p>2327</text:p>
          </table:table-cell>
          <table:table-cell office:value-type="float" office:value="2381" calcext:value-type="float">
            <text:p>2381</text:p>
          </table:table-cell>
          <table:table-cell table:style-name="ce76" table:formula="of:=SUMPRODUCT(([.B25:.F25]&lt;&gt;&quot;&quot;)*([.B25:.F25]/[.B$6:.F$6]) / SUM([.B25:.F25]&lt;&gt;&quot;&quot;))" office:value-type="float" office:value="316.919611397039" calcext:value-type="float">
            <text:p>316.9</text:p>
          </table:table-cell>
          <table:table-cell table:style-name="ce206" table:formula="of:=[.G25]*[.H$6]" office:value-type="float" office:value="11905.597978061" calcext:value-type="float">
            <text:p>11906</text:p>
          </table:table-cell>
          <table:table-cell table:style-name="ce203" table:formula="of:=STDEVP([.B25:.F25])/AVERAGE([.B25:.F25])" office:value-type="percentage" office:value="0.0180722002775826" calcext:value-type="percentage">
            <text:p>1.8%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percentage" office:value="0.11" calcext:value-type="percentage">
            <text:p>11.0%</text:p>
          </table:table-cell>
          <table:table-cell table:style-name="ce219" table:formula="of:=(MAX([.B25:.F25])-MIN([.B25:.F25]))/[.H25]*5" office:value-type="percentage" office:value="0.0449368440783797" calcext:value-type="percentage">
            <text:p>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637" calcext:value-type="float">
            <text:p>163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style-name="ce76" table:formula="of:=SUMPRODUCT(([.B26:.F26]&lt;&gt;&quot;&quot;)*([.B26:.F26]/[.B$6:.F$6]) / SUM([.B26:.F26]&lt;&gt;&quot;&quot;))" office:value-type="float" office:value="217.59303432236" calcext:value-type="float">
            <text:p>217.6</text:p>
          </table:table-cell>
          <table:table-cell table:style-name="ce206" table:formula="of:=[.G26]*[.H$6]" office:value-type="float" office:value="8174.23439984899" calcext:value-type="float">
            <text:p>8174</text:p>
          </table:table-cell>
          <table:table-cell table:style-name="ce203" table:formula="of:=STDEVP([.B26:.F26])/AVERAGE([.B26:.F26])" office:value-type="percentage" office:value="0.0167914326948764" calcext:value-type="percentage">
            <text:p>1.7%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percentage" office:value="0.113" calcext:value-type="percentage">
            <text:p>11.3%</text:p>
          </table:table-cell>
          <table:table-cell table:style-name="ce219" table:formula="of:=(MAX([.B26:.F26])-MIN([.B26:.F26]))/[.H26]*5" office:value-type="percentage" office:value="0.0452641778913063" calcext:value-type="percentage">
            <text:p>4.5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1318" calcext:value-type="float">
            <text:p>1318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  <table:table-cell office:value-type="float" office:value="1289" calcext:value-type="float">
            <text:p>1289</text:p>
          </table:table-cell>
          <table:table-cell office:value-type="float" office:value="1307" calcext:value-type="float">
            <text:p>1307</text:p>
          </table:table-cell>
          <table:table-cell table:style-name="ce76" table:formula="of:=SUMPRODUCT(([.B27:.F27]&lt;&gt;&quot;&quot;)*([.B27:.F27]/[.B$6:.F$6]) / SUM([.B27:.F27]&lt;&gt;&quot;&quot;))" office:value-type="float" office:value="177.039830295821" calcext:value-type="float">
            <text:p>177.0</text:p>
          </table:table-cell>
          <table:table-cell table:style-name="ce206" table:formula="of:=[.G27]*[.H$6]" office:value-type="float" office:value="6650.78767550794" calcext:value-type="float">
            <text:p>6651</text:p>
          </table:table-cell>
          <table:table-cell table:style-name="ce203" table:formula="of:=STDEVP([.B27:.F27])/AVERAGE([.B27:.F27])" office:value-type="percentage" office:value="0.0254811879396627" calcext:value-type="percentage">
            <text:p>2.5%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percentage" office:value="0.113" calcext:value-type="percentage">
            <text:p>11.3%</text:p>
          </table:table-cell>
          <table:table-cell table:style-name="ce219" table:formula="of:=(MAX([.B27:.F27])-MIN([.B27:.F27]))/[.H27]*5" office:value-type="percentage" office:value="0.0721719025503759" calcext:value-type="percentage">
            <text:p>7.2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931" calcext:value-type="float">
            <text:p>931</text:p>
          </table:table-cell>
          <table:table-cell table:style-name="ce76" table:formula="of:=SUMPRODUCT(([.B28:.F28]&lt;&gt;&quot;&quot;)*([.B28:.F28]/[.B$6:.F$6]) / SUM([.B28:.F28]&lt;&gt;&quot;&quot;))" office:value-type="float" office:value="129.205080736386" calcext:value-type="float">
            <text:p>129.2</text:p>
          </table:table-cell>
          <table:table-cell table:style-name="ce206" table:formula="of:=[.G28]*[.H$6]" office:value-type="float" office:value="4853.79791168296" calcext:value-type="float">
            <text:p>4854</text:p>
          </table:table-cell>
          <table:table-cell table:style-name="ce203" table:formula="of:=STDEVP([.B28:.F28])/AVERAGE([.B28:.F28])" office:value-type="percentage" office:value="0.0338627238893112" calcext:value-type="percentage">
            <text:p>3.4%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percentage" office:value="0.119" calcext:value-type="percentage">
            <text:p>11.9%</text:p>
          </table:table-cell>
          <table:table-cell table:style-name="ce219" table:formula="of:=(MAX([.B28:.F28])-MIN([.B28:.F28]))/[.H28]*5" office:value-type="percentage" office:value="0.0824096938682204" calcext:value-type="percentage">
            <text:p>8.2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style-name="ce76" table:formula="of:=SUMPRODUCT(([.B29:.F29]&lt;&gt;&quot;&quot;)*([.B29:.F29]/[.B$6:.F$6]) / SUM([.B29:.F29]&lt;&gt;&quot;&quot;))" office:value-type="float" office:value="92.9941336052311" calcext:value-type="float">
            <text:p>93.0</text:p>
          </table:table-cell>
          <table:table-cell table:style-name="ce206" table:formula="of:=[.G29]*[.H$6]" office:value-type="float" office:value="3493.47509338868" calcext:value-type="float">
            <text:p>3493</text:p>
          </table:table-cell>
          <table:table-cell table:style-name="ce203" table:formula="of:=STDEVP([.B29:.F29])/AVERAGE([.B29:.F29])" office:value-type="percentage" office:value="0.0427128894685513" calcext:value-type="percentage">
            <text:p>4.3%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percentage" office:value="0.119" calcext:value-type="percentage">
            <text:p>11.9%</text:p>
          </table:table-cell>
          <table:table-cell table:style-name="ce219" table:formula="of:=(MAX([.B29:.F29])-MIN([.B29:.F29]))/[.H29]*5" office:value-type="percentage" office:value="0.107342972248372" calcext:value-type="percentage">
            <text:p>10.7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table:style-name="ce76" table:formula="of:=SUMPRODUCT(([.B30:.F30]&lt;&gt;&quot;&quot;)*([.B30:.F30]/[.B$6:.F$6]) / SUM([.B30:.F30]&lt;&gt;&quot;&quot;))" office:value-type="float" office:value="65.5155806292663" calcext:value-type="float">
            <text:p>65.5</text:p>
          </table:table-cell>
          <table:table-cell table:style-name="ce206" table:formula="of:=[.G30]*[.H$6]" office:value-type="float" office:value="2461.19879054785" calcext:value-type="float">
            <text:p>2461</text:p>
          </table:table-cell>
          <table:table-cell table:style-name="ce203" table:formula="of:=STDEVP([.B30:.F30])/AVERAGE([.B30:.F30])" office:value-type="percentage" office:value="0.042814386948359" calcext:value-type="percentage">
            <text:p>4.3%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percentage" office:value="0.119" calcext:value-type="percentage">
            <text:p>11.9%</text:p>
          </table:table-cell>
          <table:table-cell table:style-name="ce219" table:formula="of:=(MAX([.B30:.F30])-MIN([.B30:.F30]))/[.H30]*5" office:value-type="percentage" office:value="0.117828759348386" calcext:value-type="percentage">
            <text:p>11.8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style-name="ce76" table:formula="of:=SUMPRODUCT(([.B31:.F31]&lt;&gt;&quot;&quot;)*([.B31:.F31]/[.B$6:.F$6]) / SUM([.B31:.F31]&lt;&gt;&quot;&quot;))" office:value-type="float" office:value="45.4199444309137" calcext:value-type="float">
            <text:p>45.4</text:p>
          </table:table-cell>
          <table:table-cell table:style-name="ce206" table:formula="of:=[.G31]*[.H$6]" office:value-type="float" office:value="1706.27370201736" calcext:value-type="float">
            <text:p>1706</text:p>
          </table:table-cell>
          <table:table-cell table:style-name="ce203" table:formula="of:=STDEVP([.B31:.F31])/AVERAGE([.B31:.F31])" office:value-type="percentage" office:value="0.0749567311101269" calcext:value-type="percentage">
            <text:p>7.5%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percentage" office:value="0.134" calcext:value-type="percentage">
            <text:p>13.4%</text:p>
          </table:table-cell>
          <table:table-cell table:style-name="ce219" table:formula="of:=(MAX([.B31:.F31])-MIN([.B31:.F31]))/[.H31]*5" office:value-type="percentage" office:value="0.175821733433097" calcext:value-type="percentage">
            <text:p>17.6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style-name="ce76" table:formula="of:=SUMPRODUCT(([.B32:.F32]&lt;&gt;&quot;&quot;)*([.B32:.F32]/[.B$6:.F$6]) / SUM([.B32:.F32]&lt;&gt;&quot;&quot;))" office:value-type="float" office:value="30.6345130603433" calcext:value-type="float">
            <text:p>30.6</text:p>
          </table:table-cell>
          <table:table-cell table:style-name="ce206" table:formula="of:=[.G32]*[.H$6]" office:value-type="float" office:value="1150.83504975393" calcext:value-type="float">
            <text:p>1151</text:p>
          </table:table-cell>
          <table:table-cell table:style-name="ce203" table:formula="of:=STDEVP([.B32:.F32])/AVERAGE([.B32:.F32])" office:value-type="percentage" office:value="0.0880875956754047" calcext:value-type="percentage">
            <text:p>8.8%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percentage" office:value="0.134" calcext:value-type="percentage">
            <text:p>13.4%</text:p>
          </table:table-cell>
          <table:table-cell table:style-name="ce219" table:formula="of:=(MAX([.B32:.F32])-MIN([.B32:.F32]))/[.H32]*5" office:value-type="percentage" office:value="0.208544221912008" calcext:value-type="percentage">
            <text:p>20.9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style-name="ce76" table:formula="of:=SUMPRODUCT(([.B33:.F33]&lt;&gt;&quot;&quot;)*([.B33:.F33]/[.B$6:.F$6]) / SUM([.B33:.F33]&lt;&gt;&quot;&quot;))" office:value-type="float" office:value="20.2221866934826" calcext:value-type="float">
            <text:p>20.2</text:p>
          </table:table-cell>
          <table:table-cell table:style-name="ce206" table:formula="of:=[.G33]*[.H$6]" office:value-type="float" office:value="759.679162638743" calcext:value-type="float">
            <text:p>760</text:p>
          </table:table-cell>
          <table:table-cell table:style-name="ce203" table:formula="of:=STDEVP([.B33:.F33])/AVERAGE([.B33:.F33])" office:value-type="percentage" office:value="0.102766798418972" calcext:value-type="percentage">
            <text:p>10.3%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percentage" office:value="0.156" calcext:value-type="percentage">
            <text:p>15.6%</text:p>
          </table:table-cell>
          <table:table-cell table:style-name="ce219" table:formula="of:=(MAX([.B33:.F33])-MIN([.B33:.F33]))/[.H33]*5" office:value-type="percentage" office:value="0.25668730905119" calcext:value-type="percentage">
            <text:p>25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76" table:formula="of:=SUMPRODUCT(([.B34:.F34]&lt;&gt;&quot;&quot;)*([.B34:.F34]/[.B$6:.F$6]) / SUM([.B34:.F34]&lt;&gt;&quot;&quot;))" office:value-type="float" office:value="12.7008899489725" calcext:value-type="float">
            <text:p>12.7</text:p>
          </table:table-cell>
          <table:table-cell table:style-name="ce206" table:formula="of:=[.G34]*[.H$6]" office:value-type="float" office:value="477.129480973089" calcext:value-type="float">
            <text:p>477</text:p>
          </table:table-cell>
          <table:table-cell table:style-name="ce203" table:formula="of:=STDEVP([.B34:.F34])/AVERAGE([.B34:.F34])" office:value-type="percentage" office:value="0.155842914381935" calcext:value-type="percentage">
            <text:p>15.6%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percentage" office:value="0.193" calcext:value-type="percentage">
            <text:p>19.3%</text:p>
          </table:table-cell>
          <table:table-cell table:style-name="ce219" table:formula="of:=(MAX([.B34:.F34])-MIN([.B34:.F34]))/[.H34]*5" office:value-type="percentage" office:value="0.440132099093337" calcext:value-type="percentage">
            <text:p>44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5:.F35]&lt;&gt;&quot;&quot;)*([.B35:.F35]/[.B$6:.F$6]) / SUM([.B35:.F35]&lt;&gt;&quot;&quot;))" office:value-type="float" office:value="0.503814235306652" calcext:value-type="float">
            <text:p>0.5</text:p>
          </table:table-cell>
          <table:table-cell table:style-name="ce206" table:formula="of:=[.G35]*[.H$6]" office:value-type="float" office:value="18.9265969207271" calcext:value-type="float">
            <text:p>19</text:p>
          </table:table-cell>
          <table:table-cell table:style-name="ce203" table:formula="of:=STDEVP([.B35:.F35])/AVERAGE([.B35:.F35])" office:value-type="percentage" office:value="0.421052631578947" calcext:value-type="percentage">
            <text:p>42.1%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percentage" office:value="0.275" calcext:value-type="percentage">
            <text:p>27.5%</text:p>
          </table:table-cell>
          <table:table-cell table:style-name="ce219" table:formula="of:=(MAX([.B35:.F35])-MIN([.B35:.F35]))/[.H35]*5" office:value-type="percentage" office:value="1.05671400324997" calcext:value-type="percentage">
            <text:p>105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6" table:formula="of:=SUMPRODUCT(([.B36:.F36]&lt;&gt;&quot;&quot;)*([.B36:.F36]/[.B$6:.F$6]) / SUM([.B36:.F36]&lt;&gt;&quot;&quot;))" office:value-type="float" office:value="0" calcext:value-type="float">
            <text:p>0.0</text:p>
          </table:table-cell>
          <table:table-cell table:style-name="ce206" table:formula="of:=[.G36]*[.H$6]" office:value-type="float" office:value="0" calcext:value-type="float">
            <text:p>0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percentage" office:value="0.275" calcext:value-type="percentage">
            <text:p>27.5%</text:p>
          </table:table-cell>
          <table:table-cell table:style-name="ce219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DATA_2_2.H7:DATA_2_2.H36">
            <calcext:condition calcext:apply-style-name="Good" calcext:value="&gt;1000" calcext:base-cell-address="DATA_2_2.H7"/>
          </calcext:conditional-format>
          <calcext:conditional-format calcext:target-range-address="DATA_2_2.K7:DATA_2_2.K36">
            <calcext:condition calcext:apply-style-name="Good" calcext:value="&lt;[.J7]" calcext:base-cell-address="DATA_2_2.K7"/>
          </calcext:conditional-format>
        </calcext:conditional-formats>
      </table:table>
      <table:table table:name="AnnexE_DATA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table:number-columns-repeated="5"/>
          <table:table-cell table:style-name="ce194"/>
          <table:table-cell table:style-name="ce200" table:formula="of:=SUM([.B6:.F6])" office:value-type="float" office:value="0" calcext:value-type="float">
            <text:p>0.0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table:number-columns-repeated="5"/>
          <table:table-cell table:style-name="ce76" table:formula="of:=SUMPRODUCT(([.B7:.F7]&lt;&gt;&quot;&quot;)*([.B7:.F7]/[.B$6:.F$6]) / SUM([.B7:.F7]&lt;&gt;&quot;&quot;))" office:value-type="string" office:string-value="" calcext:value-type="error">
            <text:p>#DIV/0!</text:p>
          </table:table-cell>
          <table:table-cell table:style-name="ce224" table:formula="of:=[.G7]*[.H$6]" office:value-type="string" office:string-value="" calcext:value-type="error">
            <text:p>#DIV/0!</text:p>
          </table:table-cell>
          <table:table-cell table:style-name="ce203" table:formula="of:=STDEVP([.B7:.F7])/AVERAGE([.B7:.F7])" office:value-type="string" office:string-value="" calcext:value-type="error">
            <text:p>#DIV/0!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string" office:string-value="" calcext:value-type="error">
            <text:p>#DIV/0!</text:p>
          </table:table-cell>
          <table:table-cell table:style-name="ce236" table:formula="of:=(MAX([.B7:.F7])-MIN([.B7:.F7]))/[.H7]*5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table:number-columns-repeated="5"/>
          <table:table-cell table:style-name="ce76" table:formula="of:=SUMPRODUCT(([.B8:.F8]&lt;&gt;&quot;&quot;)*([.B8:.F8]/[.B$6:.F$6]) / SUM([.B8:.F8]&lt;&gt;&quot;&quot;))" office:value-type="string" office:string-value="" calcext:value-type="error">
            <text:p>#DIV/0!</text:p>
          </table:table-cell>
          <table:table-cell table:style-name="ce224" table:formula="of:=[.G8]*[.H$6]" office:value-type="string" office:string-value="" calcext:value-type="error">
            <text:p>#DIV/0!</text:p>
          </table:table-cell>
          <table:table-cell table:style-name="ce203" table:formula="of:=STDEVP([.B8:.F8])/AVERAGE([.B8:.F8])" office:value-type="string" office:string-value="" calcext:value-type="error">
            <text:p>#DIV/0!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string" office:string-value="" calcext:value-type="error">
            <text:p>#DIV/0!</text:p>
          </table:table-cell>
          <table:table-cell table:style-name="ce236" table:formula="of:=(MAX([.B8:.F8])-MIN([.B8:.F8]))/[.H8]*5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table:number-columns-repeated="5"/>
          <table:table-cell table:style-name="ce76" table:formula="of:=SUMPRODUCT(([.B9:.F9]&lt;&gt;&quot;&quot;)*([.B9:.F9]/[.B$6:.F$6]) / SUM([.B9:.F9]&lt;&gt;&quot;&quot;))" office:value-type="string" office:string-value="" calcext:value-type="error">
            <text:p>#DIV/0!</text:p>
          </table:table-cell>
          <table:table-cell table:style-name="ce224" table:formula="of:=[.G9]*[.H$6]" office:value-type="string" office:string-value="" calcext:value-type="error">
            <text:p>#DIV/0!</text:p>
          </table:table-cell>
          <table:table-cell table:style-name="ce203" table:formula="of:=STDEVP([.B9:.F9])/AVERAGE([.B9:.F9])" office:value-type="string" office:string-value="" calcext:value-type="error">
            <text:p>#DIV/0!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string" office:string-value="" calcext:value-type="error">
            <text:p>#DIV/0!</text:p>
          </table:table-cell>
          <table:table-cell table:style-name="ce236" table:formula="of:=(MAX([.B9:.F9])-MIN([.B9:.F9]))/[.H9]*5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table:number-columns-repeated="5"/>
          <table:table-cell table:style-name="ce76" table:formula="of:=SUMPRODUCT(([.B10:.F10]&lt;&gt;&quot;&quot;)*([.B10:.F10]/[.B$6:.F$6]) / SUM([.B10:.F10]&lt;&gt;&quot;&quot;))" office:value-type="string" office:string-value="" calcext:value-type="error">
            <text:p>#DIV/0!</text:p>
          </table:table-cell>
          <table:table-cell table:style-name="ce224" table:formula="of:=[.G10]*[.H$6]" office:value-type="string" office:string-value="" calcext:value-type="error">
            <text:p>#DIV/0!</text:p>
          </table:table-cell>
          <table:table-cell table:style-name="ce203" table:formula="of:=STDEVP([.B10:.F10])/AVERAGE([.B10:.F10])" office:value-type="string" office:string-value="" calcext:value-type="error">
            <text:p>#DIV/0!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string" office:string-value="" calcext:value-type="error">
            <text:p>#DIV/0!</text:p>
          </table:table-cell>
          <table:table-cell table:style-name="ce236" table:formula="of:=(MAX([.B10:.F10])-MIN([.B10:.F10]))/[.H10]*5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table:number-columns-repeated="5"/>
          <table:table-cell table:style-name="ce76" table:formula="of:=SUMPRODUCT(([.B11:.F11]&lt;&gt;&quot;&quot;)*([.B11:.F11]/[.B$6:.F$6]) / SUM([.B11:.F11]&lt;&gt;&quot;&quot;))" office:value-type="string" office:string-value="" calcext:value-type="error">
            <text:p>#DIV/0!</text:p>
          </table:table-cell>
          <table:table-cell table:style-name="ce224" table:formula="of:=[.G11]*[.H$6]" office:value-type="string" office:string-value="" calcext:value-type="error">
            <text:p>#DIV/0!</text:p>
          </table:table-cell>
          <table:table-cell table:style-name="ce203" table:formula="of:=STDEVP([.B11:.F11])/AVERAGE([.B11:.F11])" office:value-type="string" office:string-value="" calcext:value-type="error">
            <text:p>#DIV/0!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string" office:string-value="" calcext:value-type="error">
            <text:p>#DIV/0!</text:p>
          </table:table-cell>
          <table:table-cell table:style-name="ce236" table:formula="of:=(MAX([.B11:.F11])-MIN([.B11:.F11]))/[.H11]*5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table:number-columns-repeated="5"/>
          <table:table-cell table:style-name="ce76" table:formula="of:=SUMPRODUCT(([.B12:.F12]&lt;&gt;&quot;&quot;)*([.B12:.F12]/[.B$6:.F$6]) / SUM([.B12:.F12]&lt;&gt;&quot;&quot;))" office:value-type="string" office:string-value="" calcext:value-type="error">
            <text:p>#DIV/0!</text:p>
          </table:table-cell>
          <table:table-cell table:style-name="ce224" table:formula="of:=[.G12]*[.H$6]" office:value-type="string" office:string-value="" calcext:value-type="error">
            <text:p>#DIV/0!</text:p>
          </table:table-cell>
          <table:table-cell table:style-name="ce203" table:formula="of:=STDEVP([.B12:.F12])/AVERAGE([.B12:.F12])" office:value-type="string" office:string-value="" calcext:value-type="error">
            <text:p>#DIV/0!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string" office:string-value="" calcext:value-type="error">
            <text:p>#DIV/0!</text:p>
          </table:table-cell>
          <table:table-cell table:style-name="ce236" table:formula="of:=(MAX([.B12:.F12])-MIN([.B12:.F12]))/[.H12]*5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table:number-columns-repeated="5"/>
          <table:table-cell table:style-name="ce76" table:formula="of:=SUMPRODUCT(([.B13:.F13]&lt;&gt;&quot;&quot;)*([.B13:.F13]/[.B$6:.F$6]) / SUM([.B13:.F13]&lt;&gt;&quot;&quot;))" office:value-type="string" office:string-value="" calcext:value-type="error">
            <text:p>#DIV/0!</text:p>
          </table:table-cell>
          <table:table-cell table:style-name="ce224" table:formula="of:=[.G13]*[.H$6]" office:value-type="string" office:string-value="" calcext:value-type="error">
            <text:p>#DIV/0!</text:p>
          </table:table-cell>
          <table:table-cell table:style-name="ce203" table:formula="of:=STDEVP([.B13:.F13])/AVERAGE([.B13:.F13])" office:value-type="string" office:string-value="" calcext:value-type="error">
            <text:p>#DIV/0!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string" office:string-value="" calcext:value-type="error">
            <text:p>#DIV/0!</text:p>
          </table:table-cell>
          <table:table-cell table:style-name="ce236" table:formula="of:=(MAX([.B13:.F13])-MIN([.B13:.F13]))/[.H13]*5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table:number-columns-repeated="5"/>
          <table:table-cell table:style-name="ce76" table:formula="of:=SUMPRODUCT(([.B14:.F14]&lt;&gt;&quot;&quot;)*([.B14:.F14]/[.B$6:.F$6]) / SUM([.B14:.F14]&lt;&gt;&quot;&quot;))" office:value-type="string" office:string-value="" calcext:value-type="error">
            <text:p>#DIV/0!</text:p>
          </table:table-cell>
          <table:table-cell table:style-name="ce224" table:formula="of:=[.G14]*[.H$6]" office:value-type="string" office:string-value="" calcext:value-type="error">
            <text:p>#DIV/0!</text:p>
          </table:table-cell>
          <table:table-cell table:style-name="ce203" table:formula="of:=STDEVP([.B14:.F14])/AVERAGE([.B14:.F14])" office:value-type="string" office:string-value="" calcext:value-type="error">
            <text:p>#DIV/0!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string" office:string-value="" calcext:value-type="error">
            <text:p>#DIV/0!</text:p>
          </table:table-cell>
          <table:table-cell table:style-name="ce236" table:formula="of:=(MAX([.B14:.F14])-MIN([.B14:.F14]))/[.H14]*5" office:value-type="string" office:string-value="" calcext:value-type="error">
            <text:p>#DIV/0!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table:number-columns-repeated="5"/>
          <table:table-cell table:style-name="ce76" table:formula="of:=SUMPRODUCT(([.B15:.F15]&lt;&gt;&quot;&quot;)*([.B15:.F15]/[.B$6:.F$6]) / SUM([.B15:.F15]&lt;&gt;&quot;&quot;))" office:value-type="string" office:string-value="" calcext:value-type="error">
            <text:p>#DIV/0!</text:p>
          </table:table-cell>
          <table:table-cell table:style-name="ce224" table:formula="of:=[.G15]*[.H$6]" office:value-type="string" office:string-value="" calcext:value-type="error">
            <text:p>#DIV/0!</text:p>
          </table:table-cell>
          <table:table-cell table:style-name="ce203" table:formula="of:=STDEVP([.B15:.F15])/AVERAGE([.B15:.F15])" office:value-type="string" office:string-value="" calcext:value-type="error">
            <text:p>#DIV/0!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string" office:string-value="" calcext:value-type="error">
            <text:p>#DIV/0!</text:p>
          </table:table-cell>
          <table:table-cell table:style-name="ce236" table:formula="of:=(MAX([.B15:.F15])-MIN([.B15:.F15]))/[.H15]*5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table:number-columns-repeated="5"/>
          <table:table-cell table:style-name="ce76" table:formula="of:=SUMPRODUCT(([.B16:.F16]&lt;&gt;&quot;&quot;)*([.B16:.F16]/[.B$6:.F$6]) / SUM([.B16:.F16]&lt;&gt;&quot;&quot;))" office:value-type="string" office:string-value="" calcext:value-type="error">
            <text:p>#DIV/0!</text:p>
          </table:table-cell>
          <table:table-cell table:style-name="ce224" table:formula="of:=[.G16]*[.H$6]" office:value-type="string" office:string-value="" calcext:value-type="error">
            <text:p>#DIV/0!</text:p>
          </table:table-cell>
          <table:table-cell table:style-name="ce203" table:formula="of:=STDEVP([.B16:.F16])/AVERAGE([.B16:.F16])" office:value-type="string" office:string-value="" calcext:value-type="error">
            <text:p>#DIV/0!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string" office:string-value="" calcext:value-type="error">
            <text:p>#DIV/0!</text:p>
          </table:table-cell>
          <table:table-cell table:style-name="ce236" table:formula="of:=(MAX([.B16:.F16])-MIN([.B16:.F16]))/[.H16]*5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table:number-columns-repeated="5"/>
          <table:table-cell table:style-name="ce76" table:formula="of:=SUMPRODUCT(([.B17:.F17]&lt;&gt;&quot;&quot;)*([.B17:.F17]/[.B$6:.F$6]) / SUM([.B17:.F17]&lt;&gt;&quot;&quot;))" office:value-type="string" office:string-value="" calcext:value-type="error">
            <text:p>#DIV/0!</text:p>
          </table:table-cell>
          <table:table-cell table:style-name="ce224" table:formula="of:=[.G17]*[.H$6]" office:value-type="string" office:string-value="" calcext:value-type="error">
            <text:p>#DIV/0!</text:p>
          </table:table-cell>
          <table:table-cell table:style-name="ce203" table:formula="of:=STDEVP([.B17:.F17])/AVERAGE([.B17:.F17])" office:value-type="string" office:string-value="" calcext:value-type="error">
            <text:p>#DIV/0!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string" office:string-value="" calcext:value-type="error">
            <text:p>#DIV/0!</text:p>
          </table:table-cell>
          <table:table-cell table:style-name="ce236" table:formula="of:=(MAX([.B17:.F17])-MIN([.B17:.F17]))/[.H17]*5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table:number-columns-repeated="5"/>
          <table:table-cell table:style-name="ce76" table:formula="of:=SUMPRODUCT(([.B18:.F18]&lt;&gt;&quot;&quot;)*([.B18:.F18]/[.B$6:.F$6]) / SUM([.B18:.F18]&lt;&gt;&quot;&quot;))" office:value-type="string" office:string-value="" calcext:value-type="error">
            <text:p>#DIV/0!</text:p>
          </table:table-cell>
          <table:table-cell table:style-name="ce224" table:formula="of:=[.G18]*[.H$6]" office:value-type="string" office:string-value="" calcext:value-type="error">
            <text:p>#DIV/0!</text:p>
          </table:table-cell>
          <table:table-cell table:style-name="ce203" table:formula="of:=STDEVP([.B18:.F18])/AVERAGE([.B18:.F18])" office:value-type="string" office:string-value="" calcext:value-type="error">
            <text:p>#DIV/0!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string" office:string-value="" calcext:value-type="error">
            <text:p>#DIV/0!</text:p>
          </table:table-cell>
          <table:table-cell table:style-name="ce236" table:formula="of:=(MAX([.B18:.F18])-MIN([.B18:.F18]))/[.H18]*5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table:number-columns-repeated="5"/>
          <table:table-cell table:style-name="ce76" table:formula="of:=SUMPRODUCT(([.B19:.F19]&lt;&gt;&quot;&quot;)*([.B19:.F19]/[.B$6:.F$6]) / SUM([.B19:.F19]&lt;&gt;&quot;&quot;))" office:value-type="string" office:string-value="" calcext:value-type="error">
            <text:p>#DIV/0!</text:p>
          </table:table-cell>
          <table:table-cell table:style-name="ce224" table:formula="of:=[.G19]*[.H$6]" office:value-type="string" office:string-value="" calcext:value-type="error">
            <text:p>#DIV/0!</text:p>
          </table:table-cell>
          <table:table-cell table:style-name="ce203" table:formula="of:=STDEVP([.B19:.F19])/AVERAGE([.B19:.F19])" office:value-type="string" office:string-value="" calcext:value-type="error">
            <text:p>#DIV/0!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string" office:string-value="" calcext:value-type="error">
            <text:p>#DIV/0!</text:p>
          </table:table-cell>
          <table:table-cell table:style-name="ce236" table:formula="of:=(MAX([.B19:.F19])-MIN([.B19:.F19]))/[.H19]*5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table:number-columns-repeated="5"/>
          <table:table-cell table:style-name="ce76" table:formula="of:=SUMPRODUCT(([.B20:.F20]&lt;&gt;&quot;&quot;)*([.B20:.F20]/[.B$6:.F$6]) / SUM([.B20:.F20]&lt;&gt;&quot;&quot;))" office:value-type="string" office:string-value="" calcext:value-type="error">
            <text:p>#DIV/0!</text:p>
          </table:table-cell>
          <table:table-cell table:style-name="ce224" table:formula="of:=[.G20]*[.H$6]" office:value-type="string" office:string-value="" calcext:value-type="error">
            <text:p>#DIV/0!</text:p>
          </table:table-cell>
          <table:table-cell table:style-name="ce203" table:formula="of:=STDEVP([.B20:.F20])/AVERAGE([.B20:.F20])" office:value-type="string" office:string-value="" calcext:value-type="error">
            <text:p>#DIV/0!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string" office:string-value="" calcext:value-type="error">
            <text:p>#DIV/0!</text:p>
          </table:table-cell>
          <table:table-cell table:style-name="ce236" table:formula="of:=(MAX([.B20:.F20])-MIN([.B20:.F20]))/[.H20]*5" office:value-type="string" office:string-value="" calcext:value-type="error">
            <text:p>#DIV/0!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table:number-columns-repeated="5"/>
          <table:table-cell table:style-name="ce76" table:formula="of:=SUMPRODUCT(([.B21:.F21]&lt;&gt;&quot;&quot;)*([.B21:.F21]/[.B$6:.F$6]) / SUM([.B21:.F21]&lt;&gt;&quot;&quot;))" office:value-type="string" office:string-value="" calcext:value-type="error">
            <text:p>#DIV/0!</text:p>
          </table:table-cell>
          <table:table-cell table:style-name="ce224" table:formula="of:=[.G21]*[.H$6]" office:value-type="string" office:string-value="" calcext:value-type="error">
            <text:p>#DIV/0!</text:p>
          </table:table-cell>
          <table:table-cell table:style-name="ce203" table:formula="of:=STDEVP([.B21:.F21])/AVERAGE([.B21:.F21])" office:value-type="string" office:string-value="" calcext:value-type="error">
            <text:p>#DIV/0!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string" office:string-value="" calcext:value-type="error">
            <text:p>#DIV/0!</text:p>
          </table:table-cell>
          <table:table-cell table:style-name="ce236" table:formula="of:=(MAX([.B21:.F21])-MIN([.B21:.F21]))/[.H21]*5" office:value-type="string" office:string-value="" calcext:value-type="error">
            <text:p>#DIV/0!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table:number-columns-repeated="5"/>
          <table:table-cell table:style-name="ce76" table:formula="of:=SUMPRODUCT(([.B22:.F22]&lt;&gt;&quot;&quot;)*([.B22:.F22]/[.B$6:.F$6]) / SUM([.B22:.F22]&lt;&gt;&quot;&quot;))" office:value-type="string" office:string-value="" calcext:value-type="error">
            <text:p>#DIV/0!</text:p>
          </table:table-cell>
          <table:table-cell table:style-name="ce224" table:formula="of:=[.G22]*[.H$6]" office:value-type="string" office:string-value="" calcext:value-type="error">
            <text:p>#DIV/0!</text:p>
          </table:table-cell>
          <table:table-cell table:style-name="ce203" table:formula="of:=STDEVP([.B22:.F22])/AVERAGE([.B22:.F22])" office:value-type="string" office:string-value="" calcext:value-type="error">
            <text:p>#DIV/0!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string" office:string-value="" calcext:value-type="error">
            <text:p>#DIV/0!</text:p>
          </table:table-cell>
          <table:table-cell table:style-name="ce236" table:formula="of:=(MAX([.B22:.F22])-MIN([.B22:.F22]))/[.H22]*5" office:value-type="string" office:string-value="" calcext:value-type="error">
            <text:p>#DIV/0!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table:number-columns-repeated="5"/>
          <table:table-cell table:style-name="ce76" table:formula="of:=SUMPRODUCT(([.B23:.F23]&lt;&gt;&quot;&quot;)*([.B23:.F23]/[.B$6:.F$6]) / SUM([.B23:.F23]&lt;&gt;&quot;&quot;))" office:value-type="string" office:string-value="" calcext:value-type="error">
            <text:p>#DIV/0!</text:p>
          </table:table-cell>
          <table:table-cell table:style-name="ce224" table:formula="of:=[.G23]*[.H$6]" office:value-type="string" office:string-value="" calcext:value-type="error">
            <text:p>#DIV/0!</text:p>
          </table:table-cell>
          <table:table-cell table:style-name="ce203" table:formula="of:=STDEVP([.B23:.F23])/AVERAGE([.B23:.F23])" office:value-type="string" office:string-value="" calcext:value-type="error">
            <text:p>#DIV/0!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string" office:string-value="" calcext:value-type="error">
            <text:p>#DIV/0!</text:p>
          </table:table-cell>
          <table:table-cell table:style-name="ce236" table:formula="of:=(MAX([.B23:.F23])-MIN([.B23:.F23]))/[.H23]*5" office:value-type="string" office:string-value="" calcext:value-type="error">
            <text:p>#DIV/0!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table:number-columns-repeated="5"/>
          <table:table-cell table:style-name="ce76" table:formula="of:=SUMPRODUCT(([.B24:.F24]&lt;&gt;&quot;&quot;)*([.B24:.F24]/[.B$6:.F$6]) / SUM([.B24:.F24]&lt;&gt;&quot;&quot;))" office:value-type="string" office:string-value="" calcext:value-type="error">
            <text:p>#DIV/0!</text:p>
          </table:table-cell>
          <table:table-cell table:style-name="ce224" table:formula="of:=[.G24]*[.H$6]" office:value-type="string" office:string-value="" calcext:value-type="error">
            <text:p>#DIV/0!</text:p>
          </table:table-cell>
          <table:table-cell table:style-name="ce203" table:formula="of:=STDEVP([.B24:.F24])/AVERAGE([.B24:.F24])" office:value-type="string" office:string-value="" calcext:value-type="error">
            <text:p>#DIV/0!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string" office:string-value="" calcext:value-type="error">
            <text:p>#DIV/0!</text:p>
          </table:table-cell>
          <table:table-cell table:style-name="ce236" table:formula="of:=(MAX([.B24:.F24])-MIN([.B24:.F24]))/[.H24]*5" office:value-type="string" office:string-value="" calcext:value-type="error">
            <text:p>#DIV/0!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table:number-columns-repeated="5"/>
          <table:table-cell table:style-name="ce76" table:formula="of:=SUMPRODUCT(([.B25:.F25]&lt;&gt;&quot;&quot;)*([.B25:.F25]/[.B$6:.F$6]) / SUM([.B25:.F25]&lt;&gt;&quot;&quot;))" office:value-type="string" office:string-value="" calcext:value-type="error">
            <text:p>#DIV/0!</text:p>
          </table:table-cell>
          <table:table-cell table:style-name="ce224" table:formula="of:=[.G25]*[.H$6]" office:value-type="string" office:string-value="" calcext:value-type="error">
            <text:p>#DIV/0!</text:p>
          </table:table-cell>
          <table:table-cell table:style-name="ce203" table:formula="of:=STDEVP([.B25:.F25])/AVERAGE([.B25:.F25])" office:value-type="string" office:string-value="" calcext:value-type="error">
            <text:p>#DIV/0!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string" office:string-value="" calcext:value-type="error">
            <text:p>#DIV/0!</text:p>
          </table:table-cell>
          <table:table-cell table:style-name="ce236" table:formula="of:=(MAX([.B25:.F25])-MIN([.B25:.F25]))/[.H25]*5" office:value-type="string" office:string-value="" calcext:value-type="error">
            <text:p>#DIV/0!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table:number-columns-repeated="5"/>
          <table:table-cell table:style-name="ce76" table:formula="of:=SUMPRODUCT(([.B26:.F26]&lt;&gt;&quot;&quot;)*([.B26:.F26]/[.B$6:.F$6]) / SUM([.B26:.F26]&lt;&gt;&quot;&quot;))" office:value-type="string" office:string-value="" calcext:value-type="error">
            <text:p>#DIV/0!</text:p>
          </table:table-cell>
          <table:table-cell table:style-name="ce224" table:formula="of:=[.G26]*[.H$6]" office:value-type="string" office:string-value="" calcext:value-type="error">
            <text:p>#DIV/0!</text:p>
          </table:table-cell>
          <table:table-cell table:style-name="ce203" table:formula="of:=STDEVP([.B26:.F26])/AVERAGE([.B26:.F26])" office:value-type="string" office:string-value="" calcext:value-type="error">
            <text:p>#DIV/0!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string" office:string-value="" calcext:value-type="error">
            <text:p>#DIV/0!</text:p>
          </table:table-cell>
          <table:table-cell table:style-name="ce236" table:formula="of:=(MAX([.B26:.F26])-MIN([.B26:.F26]))/[.H26]*5" office:value-type="string" office:string-value="" calcext:value-type="error">
            <text:p>#DIV/0!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table:number-columns-repeated="5"/>
          <table:table-cell table:style-name="ce76" table:formula="of:=SUMPRODUCT(([.B27:.F27]&lt;&gt;&quot;&quot;)*([.B27:.F27]/[.B$6:.F$6]) / SUM([.B27:.F27]&lt;&gt;&quot;&quot;))" office:value-type="string" office:string-value="" calcext:value-type="error">
            <text:p>#DIV/0!</text:p>
          </table:table-cell>
          <table:table-cell table:style-name="ce224" table:formula="of:=[.G27]*[.H$6]" office:value-type="string" office:string-value="" calcext:value-type="error">
            <text:p>#DIV/0!</text:p>
          </table:table-cell>
          <table:table-cell table:style-name="ce203" table:formula="of:=STDEVP([.B27:.F27])/AVERAGE([.B27:.F27])" office:value-type="string" office:string-value="" calcext:value-type="error">
            <text:p>#DIV/0!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string" office:string-value="" calcext:value-type="error">
            <text:p>#DIV/0!</text:p>
          </table:table-cell>
          <table:table-cell table:style-name="ce236" table:formula="of:=(MAX([.B27:.F27])-MIN([.B27:.F27]))/[.H27]*5" office:value-type="string" office:string-value="" calcext:value-type="error">
            <text:p>#DIV/0!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table:number-columns-repeated="5"/>
          <table:table-cell table:style-name="ce76" table:formula="of:=SUMPRODUCT(([.B28:.F28]&lt;&gt;&quot;&quot;)*([.B28:.F28]/[.B$6:.F$6]) / SUM([.B28:.F28]&lt;&gt;&quot;&quot;))" office:value-type="string" office:string-value="" calcext:value-type="error">
            <text:p>#DIV/0!</text:p>
          </table:table-cell>
          <table:table-cell table:style-name="ce224" table:formula="of:=[.G28]*[.H$6]" office:value-type="string" office:string-value="" calcext:value-type="error">
            <text:p>#DIV/0!</text:p>
          </table:table-cell>
          <table:table-cell table:style-name="ce203" table:formula="of:=STDEVP([.B28:.F28])/AVERAGE([.B28:.F28])" office:value-type="string" office:string-value="" calcext:value-type="error">
            <text:p>#DIV/0!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string" office:string-value="" calcext:value-type="error">
            <text:p>#DIV/0!</text:p>
          </table:table-cell>
          <table:table-cell table:style-name="ce236" table:formula="of:=(MAX([.B28:.F28])-MIN([.B28:.F28]))/[.H28]*5" office:value-type="string" office:string-value="" calcext:value-type="error">
            <text:p>#DIV/0!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table:number-columns-repeated="5"/>
          <table:table-cell table:style-name="ce76" table:formula="of:=SUMPRODUCT(([.B29:.F29]&lt;&gt;&quot;&quot;)*([.B29:.F29]/[.B$6:.F$6]) / SUM([.B29:.F29]&lt;&gt;&quot;&quot;))" office:value-type="string" office:string-value="" calcext:value-type="error">
            <text:p>#DIV/0!</text:p>
          </table:table-cell>
          <table:table-cell table:style-name="ce224" table:formula="of:=[.G29]*[.H$6]" office:value-type="string" office:string-value="" calcext:value-type="error">
            <text:p>#DIV/0!</text:p>
          </table:table-cell>
          <table:table-cell table:style-name="ce203" table:formula="of:=STDEVP([.B29:.F29])/AVERAGE([.B29:.F29])" office:value-type="string" office:string-value="" calcext:value-type="error">
            <text:p>#DIV/0!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string" office:string-value="" calcext:value-type="error">
            <text:p>#DIV/0!</text:p>
          </table:table-cell>
          <table:table-cell table:style-name="ce236" table:formula="of:=(MAX([.B29:.F29])-MIN([.B29:.F29]))/[.H29]*5" office:value-type="string" office:string-value="" calcext:value-type="error">
            <text:p>#DIV/0!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table:number-columns-repeated="5"/>
          <table:table-cell table:style-name="ce76" table:formula="of:=SUMPRODUCT(([.B30:.F30]&lt;&gt;&quot;&quot;)*([.B30:.F30]/[.B$6:.F$6]) / SUM([.B30:.F30]&lt;&gt;&quot;&quot;))" office:value-type="string" office:string-value="" calcext:value-type="error">
            <text:p>#DIV/0!</text:p>
          </table:table-cell>
          <table:table-cell table:style-name="ce224" table:formula="of:=[.G30]*[.H$6]" office:value-type="string" office:string-value="" calcext:value-type="error">
            <text:p>#DIV/0!</text:p>
          </table:table-cell>
          <table:table-cell table:style-name="ce203" table:formula="of:=STDEVP([.B30:.F30])/AVERAGE([.B30:.F30])" office:value-type="string" office:string-value="" calcext:value-type="error">
            <text:p>#DIV/0!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string" office:string-value="" calcext:value-type="error">
            <text:p>#DIV/0!</text:p>
          </table:table-cell>
          <table:table-cell table:style-name="ce236" table:formula="of:=(MAX([.B30:.F30])-MIN([.B30:.F30]))/[.H30]*5" office:value-type="string" office:string-value="" calcext:value-type="error">
            <text:p>#DIV/0!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table:number-columns-repeated="5"/>
          <table:table-cell table:style-name="ce76" table:formula="of:=SUMPRODUCT(([.B31:.F31]&lt;&gt;&quot;&quot;)*([.B31:.F31]/[.B$6:.F$6]) / SUM([.B31:.F31]&lt;&gt;&quot;&quot;))" office:value-type="string" office:string-value="" calcext:value-type="error">
            <text:p>#DIV/0!</text:p>
          </table:table-cell>
          <table:table-cell table:style-name="ce224" table:formula="of:=[.G31]*[.H$6]" office:value-type="string" office:string-value="" calcext:value-type="error">
            <text:p>#DIV/0!</text:p>
          </table:table-cell>
          <table:table-cell table:style-name="ce203" table:formula="of:=STDEVP([.B31:.F31])/AVERAGE([.B31:.F31])" office:value-type="string" office:string-value="" calcext:value-type="error">
            <text:p>#DIV/0!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string" office:string-value="" calcext:value-type="error">
            <text:p>#DIV/0!</text:p>
          </table:table-cell>
          <table:table-cell table:style-name="ce236" table:formula="of:=(MAX([.B31:.F31])-MIN([.B31:.F31]))/[.H31]*5" office:value-type="string" office:string-value="" calcext:value-type="error">
            <text:p>#DIV/0!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table:number-columns-repeated="5"/>
          <table:table-cell table:style-name="ce76" table:formula="of:=SUMPRODUCT(([.B32:.F32]&lt;&gt;&quot;&quot;)*([.B32:.F32]/[.B$6:.F$6]) / SUM([.B32:.F32]&lt;&gt;&quot;&quot;))" office:value-type="string" office:string-value="" calcext:value-type="error">
            <text:p>#DIV/0!</text:p>
          </table:table-cell>
          <table:table-cell table:style-name="ce224" table:formula="of:=[.G32]*[.H$6]" office:value-type="string" office:string-value="" calcext:value-type="error">
            <text:p>#DIV/0!</text:p>
          </table:table-cell>
          <table:table-cell table:style-name="ce203" table:formula="of:=STDEVP([.B32:.F32])/AVERAGE([.B32:.F32])" office:value-type="string" office:string-value="" calcext:value-type="error">
            <text:p>#DIV/0!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string" office:string-value="" calcext:value-type="error">
            <text:p>#DIV/0!</text:p>
          </table:table-cell>
          <table:table-cell table:style-name="ce236" table:formula="of:=(MAX([.B32:.F32])-MIN([.B32:.F32]))/[.H32]*5" office:value-type="string" office:string-value="" calcext:value-type="error">
            <text:p>#DIV/0!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table:number-columns-repeated="5"/>
          <table:table-cell table:style-name="ce76" table:formula="of:=SUMPRODUCT(([.B33:.F33]&lt;&gt;&quot;&quot;)*([.B33:.F33]/[.B$6:.F$6]) / SUM([.B33:.F33]&lt;&gt;&quot;&quot;))" office:value-type="string" office:string-value="" calcext:value-type="error">
            <text:p>#DIV/0!</text:p>
          </table:table-cell>
          <table:table-cell table:style-name="ce224" table:formula="of:=[.G33]*[.H$6]" office:value-type="string" office:string-value="" calcext:value-type="error">
            <text:p>#DIV/0!</text:p>
          </table:table-cell>
          <table:table-cell table:style-name="ce203" table:formula="of:=STDEVP([.B33:.F33])/AVERAGE([.B33:.F33])" office:value-type="string" office:string-value="" calcext:value-type="error">
            <text:p>#DIV/0!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string" office:string-value="" calcext:value-type="error">
            <text:p>#DIV/0!</text:p>
          </table:table-cell>
          <table:table-cell table:style-name="ce236" table:formula="of:=(MAX([.B33:.F33])-MIN([.B33:.F33]))/[.H33]*5" office:value-type="string" office:string-value="" calcext:value-type="error">
            <text:p>#DIV/0!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table:number-columns-repeated="5"/>
          <table:table-cell table:style-name="ce76" table:formula="of:=SUMPRODUCT(([.B34:.F34]&lt;&gt;&quot;&quot;)*([.B34:.F34]/[.B$6:.F$6]) / SUM([.B34:.F34]&lt;&gt;&quot;&quot;))" office:value-type="string" office:string-value="" calcext:value-type="error">
            <text:p>#DIV/0!</text:p>
          </table:table-cell>
          <table:table-cell table:style-name="ce224" table:formula="of:=[.G34]*[.H$6]" office:value-type="string" office:string-value="" calcext:value-type="error">
            <text:p>#DIV/0!</text:p>
          </table:table-cell>
          <table:table-cell table:style-name="ce203" table:formula="of:=STDEVP([.B34:.F34])/AVERAGE([.B34:.F34])" office:value-type="string" office:string-value="" calcext:value-type="error">
            <text:p>#DIV/0!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string" office:string-value="" calcext:value-type="error">
            <text:p>#DIV/0!</text:p>
          </table:table-cell>
          <table:table-cell table:style-name="ce236" table:formula="of:=(MAX([.B34:.F34])-MIN([.B34:.F34]))/[.H34]*5" office:value-type="string" office:string-value="" calcext:value-type="error">
            <text:p>#DIV/0!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table:number-columns-repeated="5"/>
          <table:table-cell table:style-name="ce76" table:formula="of:=SUMPRODUCT(([.B35:.F35]&lt;&gt;&quot;&quot;)*([.B35:.F35]/[.B$6:.F$6]) / SUM([.B35:.F35]&lt;&gt;&quot;&quot;))" office:value-type="string" office:string-value="" calcext:value-type="error">
            <text:p>#DIV/0!</text:p>
          </table:table-cell>
          <table:table-cell table:style-name="ce224" table:formula="of:=[.G35]*[.H$6]" office:value-type="string" office:string-value="" calcext:value-type="error">
            <text:p>#DIV/0!</text:p>
          </table:table-cell>
          <table:table-cell table:style-name="ce203" table:formula="of:=STDEVP([.B35:.F35])/AVERAGE([.B35:.F35])" office:value-type="string" office:string-value="" calcext:value-type="error">
            <text:p>#DIV/0!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string" office:string-value="" calcext:value-type="error">
            <text:p>#DIV/0!</text:p>
          </table:table-cell>
          <table:table-cell table:style-name="ce236" table:formula="of:=(MAX([.B35:.F35])-MIN([.B35:.F35]))/[.H35]*5" office:value-type="string" office:string-value="" calcext:value-type="error">
            <text:p>#DIV/0!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/>
          <table:table-cell table:style-name="ce76" table:formula="of:=SUMPRODUCT(([.B36:.F36]&lt;&gt;&quot;&quot;)*([.B36:.F36]/[.B$6:.F$6]) / SUM([.B36:.F36]&lt;&gt;&quot;&quot;))" office:value-type="string" office:string-value="" calcext:value-type="error">
            <text:p>#DIV/0!</text:p>
          </table:table-cell>
          <table:table-cell table:style-name="ce224" table:formula="of:=[.G36]*[.H$6]" office:value-type="string" office:string-value="" calcext:value-type="error">
            <text:p>#DIV/0!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string" office:string-value="" calcext:value-type="error">
            <text:p>#DIV/0!</text:p>
          </table:table-cell>
          <table:table-cell table:style-name="ce236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AnnexE_DATA.H7:AnnexE_DATA.H36">
            <calcext:condition calcext:apply-style-name="Good" calcext:value="&gt;1000" calcext:base-cell-address="AnnexE_DATA.H7"/>
          </calcext:conditional-format>
          <calcext:conditional-format calcext:target-range-address="AnnexE_DATA.K7:AnnexE_DATA.K36">
            <calcext:condition calcext:apply-style-name="Good" calcext:value="&lt;[.J7]" calcext:base-cell-address="AnnexE_DATA.K7"/>
          </calcext:conditional-format>
        </calcext:conditional-formats>
      </table:table>
      <table:table table:name="Clause 6 Sizing Calibration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7"/>
          <table:table-cell table:style-name="ce27" table:number-columns-repeated="1017"/>
        </table:table-row>
        <table:table-row table:style-name="ro2">
          <table:table-cell table:number-columns-repeated="1024"/>
        </table:table-row>
        <table:table-row table:style-name="ro6">
          <table:table-cell table:style-name="ce34"/>
          <table:table-cell table:style-name="ce33" table:number-columns-repeated="3"/>
          <table:table-cell table:number-columns-repeated="1020"/>
        </table:table-row>
        <table:table-row table:style-name="ro2">
          <table:table-cell table:style-name="ce33" table:number-columns-repeated="4"/>
          <table:table-cell table:number-columns-repeated="4"/>
          <table:table-cell table:style-name="ce28"/>
          <table:table-cell table:number-columns-repeated="2"/>
          <table:table-cell table:style-name="ce16"/>
          <table:table-cell office:value-type="string" calcext:value-type="string">
            <text:p>Need &gt;10000 particles <text:span text:style-name="T6">at the smallest threshold setting</text:span><text:span text:style-name="T10"> for each sub-sample / test portion. </text:span>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BS0707</text:p>
          </table:table-cell>
          <table:table-cell table:number-columns-repeated="7"/>
          <table:table-cell table:style-name="ce16"/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7"/>
          <table:table-cell table:style-name="ce16"/>
          <table:table-cell office:value-type="string" calcext:value-type="string">
            <text:p>SRM2806D has 14/ml at 30um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7"/>
          <table:table-cell table:style-name="ce16"/>
          <table:table-cell office:value-type="string" calcext:value-type="string">
            <text:p>This implies we need at least 1000/14 = 71ml per test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7"/>
          <table:table-cell table:number-columns-repeated="7"/>
          <table:table-cell table:style-name="ce30"/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1" calcext:value-type="date">
            <text:p>2025-05-01</text:p>
          </table:table-cell>
          <table:table-cell table:number-columns-repeated="7"/>
          <table:table-cell table:style-name="ce30"/>
          <table:table-cell table:number-columns-repeated="1012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7"/>
          <table:table-cell table:style-name="ce31"/>
          <table:table-cell table:number-columns-repeated="1012"/>
        </table:table-row>
        <table:table-row table:style-name="ro2">
          <table:table-cell table:style-name="ce33" office:value-type="string" calcext:value-type="string">
            <text:p>Threshold Noise</text:p>
          </table:table-cell>
          <table:table-cell table:style-name="ce33" table:number-columns-repeated="2"/>
          <table:table-cell table:style-name="ce47" table:formula="of:=AVERAGE(88; 92; 92; 92;93)" office:value-type="float" office:value="91.4" calcext:value-type="float">
            <text:p>91.4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Lowest threshold J</text:p>
          </table:table-cell>
          <table:table-cell table:number-columns-repeated="2"/>
          <table:table-cell table:formula="of:=[.D12]*1.5" office:value-type="float" office:value="137.1" calcext:value-type="float">
            <text:p>137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ghest threshold H</text:p>
          </table:table-cell>
          <table:table-cell table:number-columns-repeated="2"/>
          <table:table-cell office:value-type="float" office:value="13479" calcext:value-type="float">
            <text:p>134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Factor K</text:p>
          </table:table-cell>
          <table:table-cell table:number-columns-repeated="2"/>
          <table:table-cell table:formula="of:=10^((LOG([.D15])-LOG([.D14]))/27)" office:value-type="float" office:value="1.18522485082317" calcext:value-type="float">
            <text:p>1.185224850823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Nominal</text:p>
          </table:table-cell>
          <table:table-cell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Rever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resholds</text:p>
          </table:table-cell>
          <table:table-cell office:value-type="string" calcext:value-type="string">
            <text:p>1.5x noi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 table:style-name="ce20" table:formula="of:=[.F20]*[.D$16]" office:value-type="float" office:value="13479" calcext:value-type="float">
            <text:p>134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D$16]" office:value-type="float" office:value="162.494327047856" calcext:value-type="float">
            <text:p>162</text:p>
          </table:table-cell>
          <table:table-cell table:style-name="ce20" table:formula="of:=[.F21]*[.D$16]" office:value-type="float" office:value="11372.5256356535" calcext:value-type="float">
            <text:p>113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D$16]" office:value-type="float" office:value="192.592314534906" calcext:value-type="float">
            <text:p>193</text:p>
          </table:table-cell>
          <table:table-cell table:style-name="ce20" table:formula="of:=[.F22]*[.D$16]" office:value-type="float" office:value="9595.24737247533" calcext:value-type="float">
            <text:p>95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D$16]" office:value-type="float" office:value="228.265197264323" calcext:value-type="float">
            <text:p>228</text:p>
          </table:table-cell>
          <table:table-cell table:style-name="ce20" table:formula="of:=[.F23]*[.D$16]" office:value-type="float" office:value="8095.71902395668" calcext:value-type="float">
            <text:p>809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D$16]" office:value-type="float" office:value="270.545584375728" calcext:value-type="float">
            <text:p>271</text:p>
          </table:table-cell>
          <table:table-cell table:style-name="ce20" table:formula="of:=[.F24]*[.D$16]" office:value-type="float" office:value="6830.53432294641" calcext:value-type="float">
            <text:p>683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D$16]" office:value-type="float" office:value="320.657349882588" calcext:value-type="float">
            <text:p>321</text:p>
          </table:table-cell>
          <table:table-cell table:style-name="ce20" table:formula="of:=[.F25]*[.D$16]" office:value-type="float" office:value="5763.07045722374" calcext:value-type="float">
            <text:p>57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D$16]" office:value-type="float" office:value="380.051059679943" calcext:value-type="float">
            <text:p>380</text:p>
          </table:table-cell>
          <table:table-cell table:style-name="ce20" table:formula="of:=[.F26]*[.D$16]" office:value-type="float" office:value="4862.427963117" calcext:value-type="float">
            <text:p>486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D$16]" office:value-type="float" office:value="450.445960514347" calcext:value-type="float">
            <text:p>450</text:p>
          </table:table-cell>
          <table:table-cell table:style-name="ce20" table:formula="of:=[.F27]*[.D$16]" office:value-type="float" office:value="4102.5362906793" calcext:value-type="float">
            <text:p>410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D$16]" office:value-type="float" office:value="533.879746354515" calcext:value-type="float">
            <text:p>534</text:p>
          </table:table-cell>
          <table:table-cell table:style-name="ce20" table:formula="of:=[.F28]*[.D$16]" office:value-type="float" office:value="3461.3991495622" calcext:value-type="float">
            <text:p>34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D$16]" office:value-type="float" office:value="632.76754273054" calcext:value-type="float">
            <text:p>633</text:p>
          </table:table-cell>
          <table:table-cell table:style-name="ce20" table:formula="of:=[.F29]*[.D$16]" office:value-type="float" office:value="2920.45779090624" calcext:value-type="float">
            <text:p>292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D$16]" office:value-type="float" office:value="749.971816438546" calcext:value-type="float">
            <text:p>750</text:p>
          </table:table-cell>
          <table:table-cell table:style-name="ce20" table:formula="of:=[.F30]*[.D$16]" office:value-type="float" office:value="2464.05379441539" calcext:value-type="float">
            <text:p>24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D$16]" office:value-type="float" office:value="888.885234259955" calcext:value-type="float">
            <text:p>889</text:p>
          </table:table-cell>
          <table:table-cell table:style-name="ce20" table:formula="of:=[.F31]*[.D$16]" office:value-type="float" office:value="2078.97581012079" calcext:value-type="float">
            <text:p>20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D$16]" office:value-type="float" office:value="1053.52886917467" calcext:value-type="float">
            <text:p>1054</text:p>
          </table:table-cell>
          <table:table-cell table:style-name="ce20" table:formula="of:=[.F32]*[.D$16]" office:value-type="float" office:value="1754.07713454278" calcext:value-type="float">
            <text:p>17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D$16]" office:value-type="float" office:value="1248.66859680545" calcext:value-type="float">
            <text:p>1249</text:p>
          </table:table-cell>
          <table:table-cell table:style-name="ce20" table:formula="of:=[.F33]*[.D$16]" office:value-type="float" office:value="1479.95305137631" calcext:value-type="float">
            <text:p>148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D$16]" office:value-type="float" office:value="1479.95305137631" calcext:value-type="float">
            <text:p>1480</text:p>
          </table:table-cell>
          <table:table-cell table:style-name="ce20" table:formula="of:=[.F34]*[.D$16]" office:value-type="float" office:value="1248.66859680545" calcext:value-type="float">
            <text:p>12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D$16]" office:value-type="float" office:value="1754.07713454278" calcext:value-type="float">
            <text:p>1754</text:p>
          </table:table-cell>
          <table:table-cell table:style-name="ce20" table:formula="of:=[.F35]*[.D$16]" office:value-type="float" office:value="1053.52886917467" calcext:value-type="float">
            <text:p>10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D$16]" office:value-type="float" office:value="2078.97581012079" calcext:value-type="float">
            <text:p>2079</text:p>
          </table:table-cell>
          <table:table-cell table:style-name="ce20" table:formula="of:=[.F36]*[.D$16]" office:value-type="float" office:value="888.885234259955" calcext:value-type="float">
            <text:p>8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D$16]" office:value-type="float" office:value="2464.05379441539" calcext:value-type="float">
            <text:p>2464</text:p>
          </table:table-cell>
          <table:table-cell table:style-name="ce20" table:formula="of:=[.F37]*[.D$16]" office:value-type="float" office:value="749.971816438546" calcext:value-type="float">
            <text:p>75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D$16]" office:value-type="float" office:value="2920.45779090624" calcext:value-type="float">
            <text:p>2920</text:p>
          </table:table-cell>
          <table:table-cell table:style-name="ce20" table:formula="of:=[.F38]*[.D$16]" office:value-type="float" office:value="632.76754273054" calcext:value-type="float">
            <text:p>633</text:p>
          </table:table-cell>
          <table:table-cell table:number-columns-repeated="4"/>
          <table:table-cell table:style-name="ce28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D$16]" office:value-type="float" office:value="3461.3991495622" calcext:value-type="float">
            <text:p>3461</text:p>
          </table:table-cell>
          <table:table-cell table:style-name="ce20" table:formula="of:=[.F39]*[.D$16]" office:value-type="float" office:value="533.879746354515" calcext:value-type="float">
            <text:p>534</text:p>
          </table:table-cell>
          <table:table-cell table:number-columns-repeated="3"/>
          <table:table-cell table:style-name="ce16" office:value-type="string" calcext:value-type="string">
            <text:p>&gt;4μm(c)/100ml</text:p>
          </table:table-cell>
          <table:table-cell table:style-name="ce16" office:value-type="string" calcext:value-type="string">
            <text:p>Deviation</text:p>
          </table:table-cell>
          <table:table-cell table:style-name="ce16" office:value-type="string" calcext:value-type="string">
            <text:p>6μm</text:p>
          </table:table-cell>
          <table:table-cell/>
          <table:table-cell table:style-name="ce16" office:value-type="string" calcext:value-type="string">
            <text:p>14um</text:p>
          </table:table-cell>
          <table:table-cell/>
          <table:table-cell table:style-name="ce16" office:value-type="string" calcext:value-type="string">
            <text:p>21μm</text:p>
          </table:table-cell>
          <table:table-cell/>
          <table:table-cell table:style-name="ce16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D$16]" office:value-type="float" office:value="4102.5362906793" calcext:value-type="float">
            <text:p>4103</text:p>
          </table:table-cell>
          <table:table-cell table:style-name="ce20" table:formula="of:=[.F40]*[.D$16]" office:value-type="float" office:value="450.445960514347" calcext:value-type="float">
            <text:p>45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D$16]" office:value-type="float" office:value="4862.427963117" calcext:value-type="float">
            <text:p>4862</text:p>
          </table:table-cell>
          <table:table-cell table:style-name="ce20" table:formula="of:=[.F41]*[.D$16]" office:value-type="float" office:value="380.051059679943" calcext:value-type="float">
            <text:p>380</text:p>
          </table:table-cell>
          <table:table-cell table:number-columns-repeated="2"/>
          <table:table-cell office:value-type="string" calcext:value-type="string">
            <text:p>Portion 1</text:p>
          </table:table-cell>
          <table:table-cell office:value-type="float" office:value="1319366" calcext:value-type="float">
            <text:p>1319366</text:p>
          </table:table-cell>
          <table:table-cell table:style-name="ce21" table:formula="of:=([.J40]-[.J$46])/[.J$46]" office:value-type="percentage" office:value="0.0352403515921879" calcext:value-type="percentage">
            <text:p>3.52%</text:p>
          </table:table-cell>
          <table:table-cell office:value-type="float" office:value="504590" calcext:value-type="float">
            <text:p>504590</text:p>
          </table:table-cell>
          <table:table-cell table:style-name="ce21" table:formula="of:=([.L40]-[.L$46])/[.L$46]" office:value-type="percentage" office:value="0.00510209976085033" calcext:value-type="percentage">
            <text:p>0.51%</text:p>
          </table:table-cell>
          <table:table-cell office:value-type="float" office:value="40101" calcext:value-type="float">
            <text:p>40101</text:p>
          </table:table-cell>
          <table:table-cell table:style-name="ce21" table:formula="of:=([.N40]-[.N$46])/[.N$46]" office:value-type="percentage" office:value="-0.0351940871623866" calcext:value-type="percentage">
            <text:p>-3.52%</text:p>
          </table:table-cell>
          <table:table-cell office:value-type="float" office:value="7960" calcext:value-type="float">
            <text:p>7960</text:p>
          </table:table-cell>
          <table:table-cell table:style-name="ce21" table:formula="of:=([.P40]-[.P$46])/[.P$46]" office:value-type="percentage" office:value="-0.0646298472385429" calcext:value-type="percentage">
            <text:p>-6.46%</text:p>
          </table:table-cell>
          <table:table-cell office:value-type="float" office:value="3907" calcext:value-type="float">
            <text:p>3907</text:p>
          </table:table-cell>
          <table:table-cell table:style-name="ce21" table:formula="of:=([.R40]-[.R$46])/[.R$46]" office:value-type="percentage" office:value="-0.0527910782471665" calcext:value-type="percentage">
            <text:p>-5.28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D$16]" office:value-type="float" office:value="5763.07045722374" calcext:value-type="float">
            <text:p>5763</text:p>
          </table:table-cell>
          <table:table-cell table:style-name="ce20" table:formula="of:=[.F42]*[.D$16]" office:value-type="float" office:value="320.657349882588" calcext:value-type="float">
            <text:p>321</text:p>
          </table:table-cell>
          <table:table-cell table:number-columns-repeated="2"/>
          <table:table-cell office:value-type="string" calcext:value-type="string">
            <text:p>Portion 2</text:p>
          </table:table-cell>
          <table:table-cell office:value-type="float" office:value="1264547" calcext:value-type="float">
            <text:p>1264547</text:p>
          </table:table-cell>
          <table:table-cell table:style-name="ce21" table:formula="of:=([.J41]-[.J$46])/[.J$46]" office:value-type="percentage" office:value="-0.00777336926611231" calcext:value-type="percentage">
            <text:p>-0.78%</text:p>
          </table:table-cell>
          <table:table-cell office:value-type="float" office:value="496968" calcext:value-type="float">
            <text:p>496968</text:p>
          </table:table-cell>
          <table:table-cell table:style-name="ce21" table:formula="of:=([.L41]-[.L$46])/[.L$46]" office:value-type="percentage" office:value="-0.0100803021979225" calcext:value-type="percentage">
            <text:p>-1.01%</text:p>
          </table:table-cell>
          <table:table-cell office:value-type="float" office:value="41958" calcext:value-type="float">
            <text:p>41958</text:p>
          </table:table-cell>
          <table:table-cell table:style-name="ce21" table:formula="of:=([.N41]-[.N$46])/[.N$46]" office:value-type="percentage" office:value="0.00948421462907619" calcext:value-type="percentage">
            <text:p>0.95%</text:p>
          </table:table-cell>
          <table:table-cell/>
          <table:table-cell table:style-name="ce21"/>
          <table:table-cell/>
          <table:table-cell table:style-name="ce21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D$16]" office:value-type="float" office:value="6830.53432294641" calcext:value-type="float">
            <text:p>6831</text:p>
          </table:table-cell>
          <table:table-cell table:style-name="ce20" table:formula="of:=[.F43]*[.D$16]" office:value-type="float" office:value="270.545584375728" calcext:value-type="float">
            <text:p>271</text:p>
          </table:table-cell>
          <table:table-cell table:number-columns-repeated="2"/>
          <table:table-cell office:value-type="string" calcext:value-type="string">
            <text:p>Portion 3</text:p>
          </table:table-cell>
          <table:table-cell office:value-type="float" office:value="1237296" calcext:value-type="float">
            <text:p>1237296</text:p>
          </table:table-cell>
          <table:table-cell table:style-name="ce21" table:formula="of:=([.J42]-[.J$46])/[.J$46]" office:value-type="percentage" office:value="-0.0291558626919234" calcext:value-type="percentage">
            <text:p>-2.92%</text:p>
          </table:table-cell>
          <table:table-cell office:value-type="float" office:value="493550" calcext:value-type="float">
            <text:p>493550</text:p>
          </table:table-cell>
          <table:table-cell table:style-name="ce21" table:formula="of:=([.L42]-[.L$46])/[.L$46]" office:value-type="percentage" office:value="-0.0168886792505446" calcext:value-type="percentage">
            <text:p>-1.69%</text:p>
          </table:table-cell>
          <table:table-cell office:value-type="float" office:value="41992" calcext:value-type="float">
            <text:p>41992</text:p>
          </table:table-cell>
          <table:table-cell table:style-name="ce21" table:formula="of:=([.N42]-[.N$46])/[.N$46]" office:value-type="percentage" office:value="0.0103022341556835" calcext:value-type="percentage">
            <text:p>1.03%</text:p>
          </table:table-cell>
          <table:table-cell office:value-type="float" office:value="8518" calcext:value-type="float">
            <text:p>8518</text:p>
          </table:table-cell>
          <table:table-cell table:style-name="ce21" table:formula="of:=([.P42]-[.P$46])/[.P$46]" office:value-type="percentage" office:value="0.000940070505287897" calcext:value-type="percentage">
            <text:p>0.09%</text:p>
          </table:table-cell>
          <table:table-cell office:value-type="float" office:value="4153" calcext:value-type="float">
            <text:p>4153</text:p>
          </table:table-cell>
          <table:table-cell table:style-name="ce21" table:formula="of:=([.R42]-[.R$46])/[.R$46]" office:value-type="percentage" office:value="0.00684889993332929" calcext:value-type="percentage">
            <text:p>0.68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D$16]" office:value-type="float" office:value="8095.71902395668" calcext:value-type="float">
            <text:p>8096</text:p>
          </table:table-cell>
          <table:table-cell table:style-name="ce20" table:formula="of:=[.F44]*[.D$16]" office:value-type="float" office:value="228.265197264323" calcext:value-type="float">
            <text:p>228</text:p>
          </table:table-cell>
          <table:table-cell table:number-columns-repeated="2"/>
          <table:table-cell office:value-type="string" calcext:value-type="string">
            <text:p>Portion 4</text:p>
          </table:table-cell>
          <table:table-cell office:value-type="float" office:value="1282331" calcext:value-type="float">
            <text:p>1282331</text:p>
          </table:table-cell>
          <table:table-cell table:style-name="ce21" table:formula="of:=([.J43]-[.J$46])/[.J$46]" office:value-type="percentage" office:value="0.00618084390348238" calcext:value-type="percentage">
            <text:p>0.62%</text:p>
          </table:table-cell>
          <table:table-cell office:value-type="float" office:value="507867" calcext:value-type="float">
            <text:p>507867</text:p>
          </table:table-cell>
          <table:table-cell table:style-name="ce21" table:formula="of:=([.L43]-[.L$46])/[.L$46]" office:value-type="percentage" office:value="0.0116296163206639" calcext:value-type="percentage">
            <text:p>1.16%</text:p>
          </table:table-cell>
          <table:table-cell office:value-type="float" office:value="42135" calcext:value-type="float">
            <text:p>42135</text:p>
          </table:table-cell>
          <table:table-cell table:style-name="ce21" table:formula="of:=([.N43]-[.N$46])/[.N$46]" office:value-type="percentage" office:value="0.0137427280470024" calcext:value-type="percentage">
            <text:p>1.37%</text:p>
          </table:table-cell>
          <table:table-cell office:value-type="float" office:value="8785" calcext:value-type="float">
            <text:p>8785</text:p>
          </table:table-cell>
          <table:table-cell table:style-name="ce21" table:formula="of:=([.P43]-[.P$46])/[.P$46]" office:value-type="percentage" office:value="0.0323149236192714" calcext:value-type="percentage">
            <text:p>3.23%</text:p>
          </table:table-cell>
          <table:table-cell office:value-type="float" office:value="4187" calcext:value-type="float">
            <text:p>4187</text:p>
          </table:table-cell>
          <table:table-cell table:style-name="ce21" table:formula="of:=([.R43]-[.R$46])/[.R$46]" office:value-type="percentage" office:value="0.0150918237468938" calcext:value-type="percentage">
            <text:p>1.51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D$16]" office:value-type="float" office:value="9595.24737247533" calcext:value-type="float">
            <text:p>9595</text:p>
          </table:table-cell>
          <table:table-cell table:style-name="ce20" table:formula="of:=[.F45]*[.D$16]" office:value-type="float" office:value="192.592314534906" calcext:value-type="float">
            <text:p>193</text:p>
          </table:table-cell>
          <table:table-cell table:number-columns-repeated="2"/>
          <table:table-cell office:value-type="string" calcext:value-type="string">
            <text:p>Portion 5</text:p>
          </table:table-cell>
          <table:table-cell office:value-type="float" office:value="1268729" calcext:value-type="float">
            <text:p>1268729</text:p>
          </table:table-cell>
          <table:table-cell table:style-name="ce21" table:formula="of:=([.J44]-[.J$46])/[.J$46]" office:value-type="percentage" office:value="-0.00449196353763475" calcext:value-type="percentage">
            <text:p>-0.45%</text:p>
          </table:table-cell>
          <table:table-cell office:value-type="float" office:value="507168" calcext:value-type="float">
            <text:p>507168</text:p>
          </table:table-cell>
          <table:table-cell table:style-name="ce21" table:formula="of:=([.L44]-[.L$46])/[.L$46]" office:value-type="percentage" office:value="0.0102372653669532" calcext:value-type="percentage">
            <text:p>1.02%</text:p>
          </table:table-cell>
          <table:table-cell office:value-type="float" office:value="41633" calcext:value-type="float">
            <text:p>41633</text:p>
          </table:table-cell>
          <table:table-cell table:style-name="ce21" table:formula="of:=([.N44]-[.N$46])/[.N$46]" office:value-type="percentage" office:value="0.00166491033062418" calcext:value-type="percentage">
            <text:p>0.17%</text:p>
          </table:table-cell>
          <table:table-cell office:value-type="float" office:value="8777" calcext:value-type="float">
            <text:p>8777</text:p>
          </table:table-cell>
          <table:table-cell table:style-name="ce21" table:formula="of:=([.P44]-[.P$46])/[.P$46]" office:value-type="percentage" office:value="0.0313748531139835" calcext:value-type="percentage">
            <text:p>3.14%</text:p>
          </table:table-cell>
          <table:table-cell office:value-type="float" office:value="4252" calcext:value-type="float">
            <text:p>4252</text:p>
          </table:table-cell>
          <table:table-cell table:style-name="ce21" table:formula="of:=([.R44]-[.R$46])/[.R$46]" office:value-type="percentage" office:value="0.0308503545669435" calcext:value-type="percentage">
            <text:p>3.09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D$16]" office:value-type="float" office:value="11372.5256356535" calcext:value-type="float">
            <text:p>11373</text:p>
          </table:table-cell>
          <table:table-cell table:style-name="ce20" table:formula="of:=[.F46]*[.D$16]" office:value-type="float" office:value="162.494327047856" calcext:value-type="float">
            <text:p>16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D$16]" office:value-type="float" office:value="13479" calcext:value-type="float">
            <text:p>13479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20" table:formula="of:=AVERAGE([.J40:.J44])" office:value-type="float" office:value="1274453.8" calcext:value-type="float">
            <text:p>1274454</text:p>
          </table:table-cell>
          <table:table-cell/>
          <table:table-cell table:style-name="ce20" table:formula="of:=AVERAGE([.L40:.L44])" office:value-type="float" office:value="502028.6" calcext:value-type="float">
            <text:p>502029</text:p>
          </table:table-cell>
          <table:table-cell/>
          <table:table-cell table:style-name="ce20" table:formula="of:=AVERAGE([.N40:.N44])" office:value-type="float" office:value="41563.8" calcext:value-type="float">
            <text:p>41564</text:p>
          </table:table-cell>
          <table:table-cell/>
          <table:table-cell table:style-name="ce20" table:formula="of:=AVERAGE([.P40:.P44])" office:value-type="float" office:value="8510" calcext:value-type="float">
            <text:p>8510</text:p>
          </table:table-cell>
          <table:table-cell/>
          <table:table-cell table:style-name="ce20" table:formula="of:=AVERAGE([.R40:.R44])" office:value-type="float" office:value="4124.75" calcext:value-type="float">
            <text:p>4125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office:value-type="string" calcext:value-type="string">
            <text:p>Sample StdDev</text:p>
          </table:table-cell>
          <table:table-cell table:style-name="ce20" table:formula="of:=STDEVP([.J40:.J44])" office:value-type="float" office:value="26798.4182772043" calcext:value-type="float">
            <text:p>26798</text:p>
          </table:table-cell>
          <table:table-cell/>
          <table:table-cell table:style-name="ce20" table:formula="of:=STDEVP([.L40:.L44])" office:value-type="float" office:value="5736.85361849159" calcext:value-type="float">
            <text:p>5737</text:p>
          </table:table-cell>
          <table:table-cell/>
          <table:table-cell table:style-name="ce20" table:formula="of:=STDEVP([.N40:.N44])" office:value-type="float" office:value="749.612006307263" calcext:value-type="float">
            <text:p>750</text:p>
          </table:table-cell>
          <table:table-cell/>
          <table:table-cell table:style-name="ce20" table:formula="of:=STDEVP([.P40:.P44])" office:value-type="float" office:value="335.215602262186" calcext:value-type="float">
            <text:p>335</text:p>
          </table:table-cell>
          <table:table-cell/>
          <table:table-cell table:style-name="ce20" table:formula="of:=STDEVP([.R40:.R44])" office:value-type="float" office:value="130.652927636544" calcext:value-type="float">
            <text:p>131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office:value-type="string" calcext:value-type="string">
            <text:p>D<text:span text:style-name="T7">Q</text:span></text:p>
          </table:table-cell>
          <table:table-cell table:style-name="ce153" table:formula="of:=(MAX([.J40:.J44])-MIN([.J40:.J44]))/[.J46]" office:value-type="percentage" office:value="0.0643962142841114" calcext:value-type="percentage">
            <text:p>6.44%</text:p>
          </table:table-cell>
          <table:table-cell/>
          <table:table-cell table:style-name="ce153" table:formula="of:=(MAX([.L40:.L44])-MIN([.L40:.L44]))/[.L46]" office:value-type="percentage" office:value="0.0285182955712085" calcext:value-type="percentage">
            <text:p>2.85%</text:p>
          </table:table-cell>
          <table:table-cell/>
          <table:table-cell table:style-name="ce153" table:formula="of:=(MAX([.N40:.N44])-MIN([.N40:.N44]))/[.N46]" office:value-type="percentage" office:value="0.0489368152093889" calcext:value-type="percentage">
            <text:p>4.89%</text:p>
          </table:table-cell>
          <table:table-cell/>
          <table:table-cell table:style-name="ce153" table:formula="of:=(MAX([.P40:.P44])-MIN([.P40:.P44]))/[.P46]" office:value-type="percentage" office:value="0.0969447708578143" calcext:value-type="percentage">
            <text:p>9.69%</text:p>
          </table:table-cell>
          <table:table-cell/>
          <table:table-cell table:style-name="ce153" table:formula="of:=(MAX([.R40:.R44])-MIN([.R40:.R44]))/[.R46]" office:value-type="percentage" office:value="0.08364143281411" calcext:value-type="percentage">
            <text:p>8.36%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riteria &lt;%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/>
          <table:table-cell table:style-name="ce21" office:value-type="percentage" office:value="0.119" calcext:value-type="percentage">
            <text:p>11.90%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7">VOL</text:span></text:p>
          </table:table-cell>
          <table:table-cell table:style-name="ce21" table:formula="of:=[.J47]/[.J46]" office:value-type="percentage" office:value="0.0210273752388704" calcext:value-type="percentage">
            <text:p>2.10%</text:p>
          </table:table-cell>
          <table:table-cell table:style-name="ce101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L47]/[.L46]" office:value-type="percentage" office:value="0.0114273442160299" calcext:value-type="percentage">
            <text:p>1.14%</text:p>
          </table:table-cell>
          <table:table-cell table:style-name="ce101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N47]/[.N46]" office:value-type="percentage" office:value="0.0180352134864296" calcext:value-type="percentage">
            <text:p>1.80%</text:p>
          </table:table-cell>
          <table:table-cell table:style-name="ce101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/>
          <table:table-cell/>
          <table:table-cell table:style-name="ce21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16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21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21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21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21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21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0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1" table:formula="of:=[.J66]/[.J65]" office:value-type="percentage" office:value="0.0118488114610183" calcext:value-type="percentage">
            <text:p>1.18%</text:p>
          </table:table-cell>
          <table:table-cell table:style-name="ce101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  <calcext:conditional-format calcext:target-range-address="'Clause 6 Sizing Calibration'.J49:'Clause 6 Sizing Calibration'.J49 'Clause 6 Sizing Calibration'.L49:'Clause 6 Sizing Calibration'.L49 'Clause 6 Sizing Calibration'.N49:'Clause 6 Sizing Calibration'.N49 'Clause 6 Sizing Calibration'.P49:'Clause 6 Sizing Calibration'.P49 'Clause 6 Sizing Calibration'.R49:'Clause 6 Sizing Calibration'.R49">
            <calcext:condition calcext:apply-style-name="Accent" calcext:value="&lt;[.J50]" calcext:base-cell-address="'Clause 6 Sizing Calibration'.J49"/>
          </calcext:conditional-format>
        </calcext:conditional-formats>
      </table:table>
      <table:table table:name="Clause 6 - Spheres" table:style-name="ta1">
        <table:table-column table:style-name="co9" table:default-cell-style-name="Default"/>
        <table:table-column table:style-name="co4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7" calcext:value-type="date">
            <text:p>2025-05-07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2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2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2">
          <table:table-cell table:style-name="ce246" office:value-type="float" office:value="49.4" calcext:value-type="float">
            <text:p>49.4</text:p>
          </table:table-cell>
          <table:table-cell table:style-name="ce258" office:value-type="string" calcext:value-type="string">
            <text:p>microns</text:p>
          </table:table-cell>
          <table:table-cell table:style-name="ce258" office:value-type="string" calcext:value-type="string">
            <text:p>diameter</text:p>
          </table:table-cell>
          <table:table-cell table:style-name="ce264"/>
          <table:table-cell/>
          <table:table-cell table:style-name="ce268" office:value-type="float" office:value="39" calcext:value-type="float">
            <text:p>39</text:p>
          </table:table-cell>
          <table:table-cell table:style-name="ce258" office:value-type="string" calcext:value-type="string">
            <text:p>microns</text:p>
          </table:table-cell>
          <table:table-cell table:style-name="ce258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46" office:value-type="float" office:value="69.7" calcext:value-type="float">
            <text:p>69.7</text:p>
          </table:table-cell>
          <table:table-cell table:style-name="ce258" office:value-type="string" calcext:value-type="string">
            <text:p>microns</text:p>
          </table:table-cell>
          <table:table-cell table:style-name="ce258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2">
          <table:table-cell table:style-name="ce247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65"/>
          <table:table-cell/>
          <table:table-cell table:style-name="ce247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47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2">
          <table:table-cell table:style-name="ce247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65"/>
          <table:table-cell/>
          <table:table-cell table:style-name="ce247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47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2">
          <table:table-cell table:style-name="ce247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65"/>
          <table:table-cell/>
          <table:table-cell table:style-name="ce247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47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2">
          <table:table-cell table:style-name="ce253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65"/>
          <table:table-cell/>
          <table:table-cell table:style-name="ce253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3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2">
          <table:table-cell table:style-name="ce254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65"/>
          <table:table-cell/>
          <table:table-cell table:style-name="ce254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54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2">
          <table:table-cell table:style-name="ce255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65"/>
          <table:table-cell/>
          <table:table-cell table:style-name="ce255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55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2">
          <table:table-cell table:style-name="ce254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65"/>
          <table:table-cell/>
          <table:table-cell table:style-name="ce254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54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2">
          <table:table-cell table:style-name="ce255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65"/>
          <table:table-cell/>
          <table:table-cell table:style-name="ce255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55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2">
          <table:table-cell table:style-name="ce256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65"/>
          <table:table-cell/>
          <table:table-cell table:style-name="ce256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56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57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57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57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57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57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57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2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2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2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2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2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2">
          <table:table-cell table:style-name="ce257" table:formula="of:=[.A30]/[.A21]" office:value-type="float" office:value="6.00051922215571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57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57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2">
          <table:table-cell table:style-name="ce257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57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57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2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table:style-name="ce55" office:value-type="date" office:date-value="2025-05-08" calcext:value-type="date">
            <text:p>2025-05-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20664" calcext:value-type="float">
            <text:p>20664</text:p>
          </table:table-cell>
          <table:table-cell table:style-name="ce251" office:value-type="float" office:value="36900" calcext:value-type="float">
            <text:p>36900</text:p>
          </table:table-cell>
          <table:table-cell table:style-name="ce252" table:formula="of:=1.56*[.C42]" office:value-type="float" office:value="57564" calcext:value-type="float">
            <text:p>57564</text:p>
          </table:table-cell>
          <table:table-cell/>
          <table:table-cell table:style-name="ce248" table:formula="of:=0.56*[.G42]" office:value-type="float" office:value="14168" calcext:value-type="float">
            <text:p>14168</text:p>
          </table:table-cell>
          <table:table-cell table:style-name="ce251" office:value-type="float" office:value="25300" calcext:value-type="float">
            <text:p>25300</text:p>
          </table:table-cell>
          <table:table-cell table:style-name="ce252" table:formula="of:=1.56*[.G42]" office:value-type="float" office:value="39468" calcext:value-type="float">
            <text:p>39468</text:p>
          </table:table-cell>
          <table:table-cell table:number-columns-repeated="4"/>
          <table:table-cell table:style-name="ce248" table:formula="of:=0.56*[.N42]" office:value-type="float" office:value="31150" calcext:value-type="float">
            <text:p>31150</text:p>
          </table:table-cell>
          <table:table-cell table:style-name="ce251" office:value-type="float" office:value="55625" calcext:value-type="float">
            <text:p>55625</text:p>
          </table:table-cell>
          <table:table-cell table:style-name="ce252" table:formula="of:=1.56*[.N42]" office:value-type="float" office:value="86775" calcext:value-type="float">
            <text:p>867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2" table:number-rows-repeated="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inearity" table:style-name="ta1">
        <table:table-column table:style-name="co4" table:number-columns-repeated="6" table:default-cell-style-name="Default"/>
        <table:table-row table:style-name="ro2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Annex C Flow Rate Limits" table:style-name="ta1">
        <table:table-column table:style-name="co4" table:number-columns-repeated="9" table:default-cell-style-name="Default"/>
        <table:table-column table:style-name="co4" table:number-columns-repeated="4" table:default-cell-style-name="ce33"/>
        <table:table-column table:style-name="co4" table:number-columns-repeated="1011" table:default-cell-style-name="Default"/>
        <table:table-row table:style-name="ro3">
          <table:table-cell table:style-name="ce8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 table:number-columns-spanned="6" table:number-rows-spanned="1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covered-table-cell table:number-columns-repeated="5" table:style-name="ce27"/>
          <table:table-cell table:style-name="ce27" table:number-columns-repeated="1016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2" draw:text-style-name="P2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6">
          <table:table-cell table:number-columns-repeated="9"/>
          <table:table-cell table:style-name="ce34" office:value-type="string" calcext:value-type="string">
            <text:p>Volumetric Sampling Accuracy (Traceable Flow Measurement)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>
            <draw:frame draw:z-index="1" draw:name="Text Frame 4" draw:style-name="gr1" draw:text-style-name="P1" svg:width="11.315cm" svg:height="5.432cm" svg:x="0.001cm" svg:y="0.028cm">
              <draw:text-box>
                <text:p><text:span text:style-name="T1">Used microbalance to weigh 10ml sample of fluid, added using precision digital pipette. Added 10x 10ml in total to plastic sample bottle and weighed result (after Tare-ing empty bottle weight).</text:span></text:p>
                <text:p><text:span text:style-name="T1"/></text:p>
                <text:p><text:span text:style-name="T1">Used bottle sampler to sample 15ml pumped flush + 40ml pumped sample.</text:span></text:p>
                <text:p><text:span text:style-name="T1"/></text:p>
                <text:p><text:span text:style-name="T1">Measured final weight of bottle+remaining fluid.</text:span></text:p>
                <text:p><text:span text:style-name="T1"/></text:p>
              </draw:text-box>
            </draw:frame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Total Fluid</text:p>
          </table:table-cell>
          <table:table-cell/>
          <table:table-cell table:style-name="ce47" table:formula="of:=[.L28]+[.L29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luid Weight Taken</text:p>
          </table:table-cell>
          <table:table-cell/>
          <table:table-cell table:style-name="ce82" table:formula="of:=[.L27]-[.L31]" office:value-type="float" office:value="46.869" calcext:value-type="float">
            <text:p>46.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160" table:formula="of:=[.L32]/[.L26]*10" office:value-type="float" office:value="55.6705071861266" calcext:value-type="float">
            <text:p>55.67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Difference</text:p>
          </table:table-cell>
          <table:table-cell/>
          <table:table-cell table:style-name="ce84" table:formula="of:=[.L33]/[.L30]-1" office:value-type="percentage" office:value="0.0121910397477569" calcext:value-type="percentage">
            <text:p>1.22%</text:p>
          </table:table-cell>
          <table:table-cell table:number-columns-repeated="1012"/>
        </table:table-row>
      </table:table>
      <table:table table:name="Annex D Resolution" table:style-name="ta1">
        <table:shapes>
          <draw:frame draw:z-index="0" draw:style-name="gr3" draw:text-style-name="P2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1" table:default-cell-style-name="Default"/>
        <table:table-row table:style-name="ro9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2">
          <table:table-cell office:value-type="string" calcext:value-type="string">
            <text:p>Date</text:p>
          </table:table-cell>
          <table:table-cell table:style-name="ce55" office:value-type="date" office:date-value="2025-05-06" calcext:value-type="date">
            <text:p>2025-05-06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formula="of:=SUM([.M200:.M1000])" office:value-type="float" office:value="157173" calcext:value-type="float">
            <text:p>157173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X([.$N$2:.$N$1000])" office:value-type="float" office:value="974.5" calcext:value-type="float">
            <text:p>974.50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TCH([.A23]; [.N3:.N1000]; 0)" office:value-type="float" office:value="479" calcext:value-type="float">
            <text:p>479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X([.$A$23])/2" office:value-type="float" office:value="487.25" calcext:value-type="float">
            <text:p>487.25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TCH([.A25]; [.N2:.N1000]; 1)" office:value-type="float" office:value="415" calcext:value-type="float">
            <text:p>41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INDEX([.L2:.L1000];[.A26])" office:value-type="float" office:value="414" calcext:value-type="float">
            <text:p>41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4]-[.A27]" office:value-type="float" office:value="65" calcext:value-type="float">
            <text:p>65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8]*2" office:value-type="float" office:value="130" calcext:value-type="float">
            <text:p>130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9] / (2 * SQRT(2 * LN(2)))" office:value-type="float" office:value="55.2059170187212" calcext:value-type="float">
            <text:p>55.21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68" table:formula="of:=[.A30]/[.A24]" office:value-type="percentage" office:value="0.115252436364763" calcext:value-type="percentage">
            <text:p>11.53%</text:p>
          </table:table-cell>
          <table:table-cell table:style-name="ce171" office:value-type="string" calcext:value-type="string">
            <text:p>CV<text:span text:style-name="T7">SIGNAL</text:span><text:span text:style-name="T11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69" table:formula="of:=[.A31]/2" office:value-type="percentage" office:value="0.0576262181823813" calcext:value-type="percentage">
            <text:p>5.76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M99:.M10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AVERAGE([.M100:.M10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AVERAGE([.M101:.M10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AVERAGE([.M102:.M10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AVERAGE([.M103:.M11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AVERAGE([.M104:.M11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AVERAGE([.M105:.M11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AVERAGE([.M106:.M11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AVERAGE([.M107:.M11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AVERAGE([.M108:.M11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AVERAGE([.M109:.M11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AVERAGE([.M110:.M11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AVERAGE([.M111:.M11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AVERAGE([.M112:.M11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AVERAGE([.M113:.M12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AVERAGE([.M114:.M12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AVERAGE([.M115:.M12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AVERAGE([.M116:.M12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AVERAGE([.M117:.M12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AVERAGE([.M118:.M12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AVERAGE([.M119:.M12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AVERAGE([.M120:.M12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AVERAGE([.M121:.M12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AVERAGE([.M122:.M12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AVERAGE([.M123:.M13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AVERAGE([.M124:.M13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[.M125:.M13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AVERAGE([.M126:.M13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AVERAGE([.M127:.M13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AVERAGE([.M128:.M13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VERAGE([.M129:.M13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AVERAGE([.M130:.M13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AVERAGE([.M131:.M13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AVERAGE([.M132:.M13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AVERAGE([.M133:.M14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AVERAGE([.M134:.M14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AVERAGE([.M135:.M14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AVERAGE([.M136:.M14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AVERAGE([.M137:.M14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AVERAGE([.M138:.M14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M139:.M14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AVERAGE([.M140:.M14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AVERAGE([.M141:.M14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AVERAGE([.M142:.M14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AVERAGE([.M143:.M15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AVERAGE([.M144:.M15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AVERAGE([.M145:.M15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AVERAGE([.M146:.M15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AVERAGE([.M147:.M15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AVERAGE([.M148:.M15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M149:.M15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AVERAGE([.M150:.M15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AVERAGE([.M151:.M15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AVERAGE([.M152:.M15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AVERAGE([.M153:.M16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AVERAGE([.M154:.M16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AVERAGE([.M155:.M16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AVERAGE([.M156:.M16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AVERAGE([.M157:.M16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AVERAGE([.M158:.M16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AVERAGE([.M159:.M16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AVERAGE([.M160:.M16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AVERAGE([.M161:.M16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AVERAGE([.M162:.M16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AVERAGE([.M163:.M17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AVERAGE([.M164:.M17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AVERAGE([.M165:.M17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AVERAGE([.M166:.M17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M167:.M17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AVERAGE([.M168:.M17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AVERAGE([.M169:.M17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AVERAGE([.M170:.M17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M171:.M17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AVERAGE([.M172:.M17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AVERAGE([.M173:.M18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[.M174:.M18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AVERAGE([.M175:.M18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AVERAGE([.M176:.M18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AVERAGE([.M177:.M18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AVERAGE([.M178:.M18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AVERAGE([.M179:.M18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AVERAGE([.M180:.M18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AVERAGE([.M181:.M18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AVERAGE([.M182:.M18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M183:.M19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AVERAGE([.M184:.M19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AVERAGE([.M185:.M19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AVERAGE([.M186:.M19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M187:.M19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AVERAGE([.M188:.M19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AVERAGE([.M189:.M19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AVERAGE([.M190:.M19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AVERAGE([.M191:.M19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AVERAGE([.M192:.M19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AVERAGE([.M193:.M20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AVERAGE([.M194:.M20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M195:.M202])" office:value-type="float" office:value="0.25" calcext:value-type="float">
            <text:p>0.2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M196:.M203])" office:value-type="float" office:value="0.5" calcext:value-type="float">
            <text:p>0.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AVERAGE([.M197:.M204])" office:value-type="float" office:value="1.375" calcext:value-type="float">
            <text:p>1.37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M198:.M205])" office:value-type="float" office:value="2.875" calcext:value-type="float">
            <text:p>2.87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AVERAGE([.M199:.M206])" office:value-type="float" office:value="4" calcext:value-type="float">
            <text:p>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AVERAGE([.M200:.M207])" office:value-type="float" office:value="4.25" calcext:value-type="float">
            <text:p>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AVERAGE([.M201:.M208])" office:value-type="float" office:value="5.375" calcext:value-type="float">
            <text:p>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formula="of:=AVERAGE([.M202:.M209])" office:value-type="float" office:value="6.375" calcext:value-type="float">
            <text:p>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formula="of:=AVERAGE([.M203:.M21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AVERAGE([.M204:.M211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table:formula="of:=AVERAGE([.M205:.M212])" office:value-type="float" office:value="8.5" calcext:value-type="float">
            <text:p>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table:formula="of:=AVERAGE([.M206:.M213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AVERAGE([.M207:.M21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table:formula="of:=AVERAGE([.M208:.M215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formula="of:=AVERAGE([.M209:.M216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formula="of:=AVERAGE([.M210:.M217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AVERAGE([.M211:.M218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formula="of:=AVERAGE([.M212:.M219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AVERAGE([.M213:.M220])" office:value-type="float" office:value="7" calcext:value-type="float">
            <text:p>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formula="of:=AVERAGE([.M214:.M221])" office:value-type="float" office:value="7.25" calcext:value-type="float">
            <text:p>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table:formula="of:=AVERAGE([.M215:.M222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table:formula="of:=AVERAGE([.M216:.M223])" office:value-type="float" office:value="8.125" calcext:value-type="float">
            <text:p>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formula="of:=AVERAGE([.M217:.M224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AVERAGE([.M218:.M225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formula="of:=AVERAGE([.M219:.M226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formula="of:=AVERAGE([.M220:.M227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AVERAGE([.M221:.M228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formula="of:=AVERAGE([.M222:.M229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formula="of:=AVERAGE([.M223:.M230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AVERAGE([.M224:.M231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formula="of:=AVERAGE([.M225:.M232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formula="of:=AVERAGE([.M226:.M233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table:formula="of:=AVERAGE([.M227:.M234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formula="of:=AVERAGE([.M228:.M235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formula="of:=AVERAGE([.M229:.M236])" office:value-type="float" office:value="5.5" calcext:value-type="float">
            <text:p>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formula="of:=AVERAGE([.M230:.M237])" office:value-type="float" office:value="5.375" calcext:value-type="float">
            <text:p>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formula="of:=AVERAGE([.M231:.M238])" office:value-type="float" office:value="5" calcext:value-type="float">
            <text:p>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formula="of:=AVERAGE([.M232:.M239])" office:value-type="float" office:value="4.375" calcext:value-type="float">
            <text:p>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formula="of:=AVERAGE([.M233:.M240])" office:value-type="float" office:value="4.375" calcext:value-type="float">
            <text:p>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AVERAGE([.M234:.M241])" office:value-type="float" office:value="5.5" calcext:value-type="float">
            <text:p>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AVERAGE([.M235:.M242])" office:value-type="float" office:value="5.875" calcext:value-type="float">
            <text:p>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table:formula="of:=AVERAGE([.M236:.M243])" office:value-type="float" office:value="6.375" calcext:value-type="float">
            <text:p>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AVERAGE([.M237:.M24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table:formula="of:=AVERAGE([.M238:.M245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formula="of:=AVERAGE([.M239:.M246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formula="of:=AVERAGE([.M240:.M247])" office:value-type="float" office:value="8.5" calcext:value-type="float">
            <text:p>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formula="of:=AVERAGE([.M241:.M248])" office:value-type="float" office:value="8.375" calcext:value-type="float">
            <text:p>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formula="of:=AVERAGE([.M242:.M249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table:formula="of:=AVERAGE([.M243:.M250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table:formula="of:=AVERAGE([.M244:.M251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formula="of:=AVERAGE([.M245:.M252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table:formula="of:=AVERAGE([.M246:.M253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formula="of:=AVERAGE([.M247:.M254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table:formula="of:=AVERAGE([.M248:.M255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AVERAGE([.M249:.M256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formula="of:=AVERAGE([.M250:.M257])" office:value-type="float" office:value="5.875" calcext:value-type="float">
            <text:p>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formula="of:=AVERAGE([.M251:.M258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table:formula="of:=AVERAGE([.M252:.M259])" office:value-type="float" office:value="5.125" calcext:value-type="float">
            <text:p>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formula="of:=AVERAGE([.M253:.M260])" office:value-type="float" office:value="5.25" calcext:value-type="float">
            <text:p>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AVERAGE([.M254:.M261])" office:value-type="float" office:value="4.875" calcext:value-type="float">
            <text:p>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AVERAGE([.M255:.M262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AVERAGE([.M256:.M263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formula="of:=AVERAGE([.M257:.M264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formula="of:=AVERAGE([.M258:.M265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AVERAGE([.M259:.M266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table:formula="of:=AVERAGE([.M260:.M267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formula="of:=AVERAGE([.M261:.M268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formula="of:=AVERAGE([.M262:.M269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AVERAGE([.M263:.M270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formula="of:=AVERAGE([.M264:.M271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table:formula="of:=AVERAGE([.M265:.M272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table:formula="of:=AVERAGE([.M266:.M273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formula="of:=AVERAGE([.M267:.M27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formula="of:=AVERAGE([.M268:.M275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table:formula="of:=AVERAGE([.M269:.M276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AVERAGE([.M270:.M277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table:formula="of:=AVERAGE([.M271:.M278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formula="of:=AVERAGE([.M272:.M279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formula="of:=AVERAGE([.M273:.M28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AVERAGE([.M274:.M281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AVERAGE([.M275:.M282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table:formula="of:=AVERAGE([.M276:.M283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formula="of:=AVERAGE([.M277:.M284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table:formula="of:=AVERAGE([.M278:.M285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AVERAGE([.M279:.M286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table:formula="of:=AVERAGE([.M280:.M287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AVERAGE([.M281:.M288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AVERAGE([.M282:.M289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formula="of:=AVERAGE([.M283:.M29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formula="of:=AVERAGE([.M284:.M291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table:formula="of:=AVERAGE([.M285:.M292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AVERAGE([.M286:.M293])" office:value-type="float" office:value="7" calcext:value-type="float">
            <text:p>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AVERAGE([.M287:.M294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AVERAGE([.M288:.M295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formula="of:=AVERAGE([.M289:.M296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table:formula="of:=AVERAGE([.M290:.M297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AVERAGE([.M291:.M298])" office:value-type="float" office:value="7.25" calcext:value-type="float">
            <text:p>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formula="of:=AVERAGE([.M292:.M299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AVERAGE([.M293:.M300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formula="of:=AVERAGE([.M294:.M301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formula="of:=AVERAGE([.M295:.M302])" office:value-type="float" office:value="8.625" calcext:value-type="float">
            <text:p>8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AVERAGE([.M296:.M303])" office:value-type="float" office:value="8.875" calcext:value-type="float">
            <text:p>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AVERAGE([.M297:.M304])" office:value-type="float" office:value="9.125" calcext:value-type="float">
            <text:p>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table:formula="of:=AVERAGE([.M298:.M305])" office:value-type="float" office:value="9.375" calcext:value-type="float">
            <text:p>9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table:formula="of:=AVERAGE([.M299:.M306])" office:value-type="float" office:value="10" calcext:value-type="float">
            <text:p>1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table:formula="of:=AVERAGE([.M300:.M307])" office:value-type="float" office:value="10.25" calcext:value-type="float">
            <text:p>1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table:formula="of:=AVERAGE([.M301:.M308])" office:value-type="float" office:value="11.25" calcext:value-type="float">
            <text:p>1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table:formula="of:=AVERAGE([.M302:.M309])" office:value-type="float" office:value="11.625" calcext:value-type="float">
            <text:p>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table:formula="of:=AVERAGE([.M303:.M310])" office:value-type="float" office:value="11.625" calcext:value-type="float">
            <text:p>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formula="of:=AVERAGE([.M304:.M311])" office:value-type="float" office:value="12.25" calcext:value-type="float">
            <text:p>1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16" calcext:value-type="float">
            <text:p>16</text:p>
          </table:table-cell>
          <table:table-cell table:formula="of:=AVERAGE([.M305:.M312])" office:value-type="float" office:value="12.875" calcext:value-type="float">
            <text:p>1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table:formula="of:=AVERAGE([.M306:.M313])" office:value-type="float" office:value="13" calcext:value-type="float">
            <text:p>13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table:formula="of:=AVERAGE([.M307:.M314])" office:value-type="float" office:value="13.375" calcext:value-type="float">
            <text:p>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table:formula="of:=AVERAGE([.M308:.M315])" office:value-type="float" office:value="13.5" calcext:value-type="float">
            <text:p>1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table:formula="of:=AVERAGE([.M309:.M316])" office:value-type="float" office:value="12.75" calcext:value-type="float">
            <text:p>1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table:formula="of:=AVERAGE([.M310:.M317])" office:value-type="float" office:value="13.375" calcext:value-type="float">
            <text:p>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table:formula="of:=AVERAGE([.M311:.M318])" office:value-type="float" office:value="13.5" calcext:value-type="float">
            <text:p>1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table:formula="of:=AVERAGE([.M312:.M319])" office:value-type="float" office:value="13.25" calcext:value-type="float">
            <text:p>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table:formula="of:=AVERAGE([.M313:.M320])" office:value-type="float" office:value="13.25" calcext:value-type="float">
            <text:p>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table:formula="of:=AVERAGE([.M314:.M321])" office:value-type="float" office:value="13.75" calcext:value-type="float">
            <text:p>1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table:formula="of:=AVERAGE([.M315:.M322])" office:value-type="float" office:value="13.625" calcext:value-type="float">
            <text:p>1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table:formula="of:=AVERAGE([.M316:.M323])" office:value-type="float" office:value="14.375" calcext:value-type="float">
            <text:p>1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formula="of:=AVERAGE([.M317:.M324])" office:value-type="float" office:value="15.125" calcext:value-type="float">
            <text:p>1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table:formula="of:=AVERAGE([.M318:.M325])" office:value-type="float" office:value="15.875" calcext:value-type="float">
            <text:p>1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table:formula="of:=AVERAGE([.M319:.M326])" office:value-type="float" office:value="16.375" calcext:value-type="float">
            <text:p>1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table:formula="of:=AVERAGE([.M320:.M327])" office:value-type="float" office:value="18.125" calcext:value-type="float">
            <text:p>1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table:formula="of:=AVERAGE([.M321:.M328])" office:value-type="float" office:value="18.125" calcext:value-type="float">
            <text:p>1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formula="of:=AVERAGE([.M322:.M329])" office:value-type="float" office:value="18.75" calcext:value-type="float">
            <text:p>1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table:formula="of:=AVERAGE([.M323:.M330])" office:value-type="float" office:value="19.125" calcext:value-type="float">
            <text:p>1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table:formula="of:=AVERAGE([.M324:.M331])" office:value-type="float" office:value="20.875" calcext:value-type="float">
            <text:p>2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table:formula="of:=AVERAGE([.M325:.M332])" office:value-type="float" office:value="22.25" calcext:value-type="float">
            <text:p>2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table:formula="of:=AVERAGE([.M326:.M333])" office:value-type="float" office:value="22.125" calcext:value-type="float">
            <text:p>2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table:formula="of:=AVERAGE([.M327:.M334])" office:value-type="float" office:value="22.375" calcext:value-type="float">
            <text:p>2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table:formula="of:=AVERAGE([.M328:.M335])" office:value-type="float" office:value="22.625" calcext:value-type="float">
            <text:p>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7" calcext:value-type="float">
            <text:p>27</text:p>
          </table:table-cell>
          <table:table-cell table:formula="of:=AVERAGE([.M329:.M336])" office:value-type="float" office:value="24.75" calcext:value-type="float">
            <text:p>2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table:formula="of:=AVERAGE([.M330:.M337])" office:value-type="float" office:value="26.25" calcext:value-type="float">
            <text:p>2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table:formula="of:=AVERAGE([.M331:.M338])" office:value-type="float" office:value="27" calcext:value-type="float">
            <text:p>2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 table:formula="of:=AVERAGE([.M332:.M339])" office:value-type="float" office:value="26.75" calcext:value-type="float">
            <text:p>2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3" calcext:value-type="float">
            <text:p>33</text:p>
          </table:table-cell>
          <table:table-cell table:formula="of:=AVERAGE([.M333:.M340])" office:value-type="float" office:value="27.125" calcext:value-type="float">
            <text:p>2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table:formula="of:=AVERAGE([.M334:.M341])" office:value-type="float" office:value="29.25" calcext:value-type="float">
            <text:p>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AVERAGE([.M335:.M342])" office:value-type="float" office:value="31.25" calcext:value-type="float">
            <text:p>3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table:formula="of:=AVERAGE([.M336:.M343])" office:value-type="float" office:value="33.5" calcext:value-type="float">
            <text:p>3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 table:formula="of:=AVERAGE([.M337:.M344])" office:value-type="float" office:value="35.125" calcext:value-type="float">
            <text:p>3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table:formula="of:=AVERAGE([.M338:.M345])" office:value-type="float" office:value="34.625" calcext:value-type="float">
            <text:p>3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table:formula="of:=AVERAGE([.M339:.M346])" office:value-type="float" office:value="37.875" calcext:value-type="float">
            <text:p>3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5" calcext:value-type="float">
            <text:p>45</text:p>
          </table:table-cell>
          <table:table-cell table:formula="of:=AVERAGE([.M340:.M347])" office:value-type="float" office:value="39.125" calcext:value-type="float">
            <text:p>3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table:formula="of:=AVERAGE([.M341:.M348])" office:value-type="float" office:value="41.25" calcext:value-type="float">
            <text:p>4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table:formula="of:=AVERAGE([.M342:.M349])" office:value-type="float" office:value="44.25" calcext:value-type="float">
            <text:p>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table:formula="of:=AVERAGE([.M343:.M350])" office:value-type="float" office:value="47.25" calcext:value-type="float">
            <text:p>4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9" calcext:value-type="float">
            <text:p>39</text:p>
          </table:table-cell>
          <table:table-cell table:formula="of:=AVERAGE([.M344:.M351])" office:value-type="float" office:value="48" calcext:value-type="float">
            <text:p>4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table:formula="of:=AVERAGE([.M345:.M352])" office:value-type="float" office:value="48.25" calcext:value-type="float">
            <text:p>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table:formula="of:=AVERAGE([.M346:.M353])" office:value-type="float" office:value="52.5" calcext:value-type="float">
            <text:p>5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table:formula="of:=AVERAGE([.M347:.M354])" office:value-type="float" office:value="53.25" calcext:value-type="float">
            <text:p>5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51" calcext:value-type="float">
            <text:p>51</text:p>
          </table:table-cell>
          <table:table-cell table:formula="of:=AVERAGE([.M348:.M355])" office:value-type="float" office:value="55.5" calcext:value-type="float">
            <text:p>5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48" calcext:value-type="float">
            <text:p>48</text:p>
          </table:table-cell>
          <table:table-cell table:formula="of:=AVERAGE([.M349:.M356])" office:value-type="float" office:value="59.25" calcext:value-type="float">
            <text:p>5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table:formula="of:=AVERAGE([.M350:.M357])" office:value-type="float" office:value="59.625" calcext:value-type="float">
            <text:p>5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table:formula="of:=AVERAGE([.M351:.M358])" office:value-type="float" office:value="61.875" calcext:value-type="float">
            <text:p>6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table:formula="of:=AVERAGE([.M352:.M359])" office:value-type="float" office:value="63.875" calcext:value-type="float">
            <text:p>6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77" calcext:value-type="float">
            <text:p>77</text:p>
          </table:table-cell>
          <table:table-cell table:formula="of:=AVERAGE([.M353:.M360])" office:value-type="float" office:value="68" calcext:value-type="float">
            <text:p>6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65" calcext:value-type="float">
            <text:p>65</text:p>
          </table:table-cell>
          <table:table-cell table:formula="of:=AVERAGE([.M354:.M361])" office:value-type="float" office:value="70.25" calcext:value-type="float">
            <text:p>7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77" calcext:value-type="float">
            <text:p>77</text:p>
          </table:table-cell>
          <table:table-cell table:formula="of:=AVERAGE([.M355:.M362])" office:value-type="float" office:value="70.75" calcext:value-type="float">
            <text:p>7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table:formula="of:=AVERAGE([.M356:.M363])" office:value-type="float" office:value="74.375" calcext:value-type="float">
            <text:p>7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81" calcext:value-type="float">
            <text:p>81</text:p>
          </table:table-cell>
          <table:table-cell table:formula="of:=AVERAGE([.M357:.M364])" office:value-type="float" office:value="77.25" calcext:value-type="float">
            <text:p>7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80" calcext:value-type="float">
            <text:p>80</text:p>
          </table:table-cell>
          <table:table-cell table:formula="of:=AVERAGE([.M358:.M365])" office:value-type="float" office:value="78.75" calcext:value-type="float">
            <text:p>7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62" calcext:value-type="float">
            <text:p>62</text:p>
          </table:table-cell>
          <table:table-cell table:formula="of:=AVERAGE([.M359:.M366])" office:value-type="float" office:value="80.5" calcext:value-type="float">
            <text:p>8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86" calcext:value-type="float">
            <text:p>86</text:p>
          </table:table-cell>
          <table:table-cell table:formula="of:=AVERAGE([.M360:.M367])" office:value-type="float" office:value="84.125" calcext:value-type="float">
            <text:p>8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table:formula="of:=AVERAGE([.M361:.M368])" office:value-type="float" office:value="86.25" calcext:value-type="float">
            <text:p>8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77" calcext:value-type="float">
            <text:p>77</text:p>
          </table:table-cell>
          <table:table-cell table:formula="of:=AVERAGE([.M362:.M369])" office:value-type="float" office:value="88.375" calcext:value-type="float">
            <text:p>8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91" calcext:value-type="float">
            <text:p>91</text:p>
          </table:table-cell>
          <table:table-cell table:formula="of:=AVERAGE([.M363:.M370])" office:value-type="float" office:value="95" calcext:value-type="float">
            <text:p>9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table:formula="of:=AVERAGE([.M364:.M371])" office:value-type="float" office:value="97.5" calcext:value-type="float">
            <text:p>9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table:formula="of:=AVERAGE([.M365:.M372])" office:value-type="float" office:value="99.75" calcext:value-type="float">
            <text:p>9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97" calcext:value-type="float">
            <text:p>97</text:p>
          </table:table-cell>
          <table:table-cell table:formula="of:=AVERAGE([.M366:.M373])" office:value-type="float" office:value="104.375" calcext:value-type="float">
            <text:p>10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115" calcext:value-type="float">
            <text:p>115</text:p>
          </table:table-cell>
          <table:table-cell table:formula="of:=AVERAGE([.M367:.M374])" office:value-type="float" office:value="108.875" calcext:value-type="float">
            <text:p>10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106" calcext:value-type="float">
            <text:p>106</text:p>
          </table:table-cell>
          <table:table-cell table:formula="of:=AVERAGE([.M368:.M375])" office:value-type="float" office:value="114.625" calcext:value-type="float">
            <text:p>11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  <table:table-cell table:formula="of:=AVERAGE([.M369:.M376])" office:value-type="float" office:value="117" calcext:value-type="float">
            <text:p>11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114" calcext:value-type="float">
            <text:p>114</text:p>
          </table:table-cell>
          <table:table-cell table:formula="of:=AVERAGE([.M370:.M377])" office:value-type="float" office:value="123.375" calcext:value-type="float">
            <text:p>12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127" calcext:value-type="float">
            <text:p>127</text:p>
          </table:table-cell>
          <table:table-cell table:formula="of:=AVERAGE([.M371:.M378])" office:value-type="float" office:value="126.875" calcext:value-type="float">
            <text:p>12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142" calcext:value-type="float">
            <text:p>142</text:p>
          </table:table-cell>
          <table:table-cell table:formula="of:=AVERAGE([.M372:.M379])" office:value-type="float" office:value="132.125" calcext:value-type="float">
            <text:p>13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  <table:table-cell table:formula="of:=AVERAGE([.M373:.M380])" office:value-type="float" office:value="139.125" calcext:value-type="float">
            <text:p>13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148" calcext:value-type="float">
            <text:p>148</text:p>
          </table:table-cell>
          <table:table-cell table:formula="of:=AVERAGE([.M374:.M381])" office:value-type="float" office:value="147.5" calcext:value-type="float">
            <text:p>14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143" calcext:value-type="float">
            <text:p>143</text:p>
          </table:table-cell>
          <table:table-cell table:formula="of:=AVERAGE([.M375:.M382])" office:value-type="float" office:value="154.25" calcext:value-type="float">
            <text:p>15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148" calcext:value-type="float">
            <text:p>148</text:p>
          </table:table-cell>
          <table:table-cell table:formula="of:=AVERAGE([.M376:.M383])" office:value-type="float" office:value="158.75" calcext:value-type="float">
            <text:p>15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174" calcext:value-type="float">
            <text:p>174</text:p>
          </table:table-cell>
          <table:table-cell table:formula="of:=AVERAGE([.M377:.M384])" office:value-type="float" office:value="168.125" calcext:value-type="float">
            <text:p>16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181" calcext:value-type="float">
            <text:p>181</text:p>
          </table:table-cell>
          <table:table-cell table:formula="of:=AVERAGE([.M378:.M385])" office:value-type="float" office:value="175.875" calcext:value-type="float">
            <text:p>17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181" calcext:value-type="float">
            <text:p>181</text:p>
          </table:table-cell>
          <table:table-cell table:formula="of:=AVERAGE([.M379:.M386])" office:value-type="float" office:value="185.25" calcext:value-type="float">
            <text:p>18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178" calcext:value-type="float">
            <text:p>178</text:p>
          </table:table-cell>
          <table:table-cell table:formula="of:=AVERAGE([.M380:.M387])" office:value-type="float" office:value="190.875" calcext:value-type="float">
            <text:p>19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192" calcext:value-type="float">
            <text:p>192</text:p>
          </table:table-cell>
          <table:table-cell table:formula="of:=AVERAGE([.M381:.M388])" office:value-type="float" office:value="196.75" calcext:value-type="float">
            <text:p>19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210" calcext:value-type="float">
            <text:p>210</text:p>
          </table:table-cell>
          <table:table-cell table:formula="of:=AVERAGE([.M382:.M389])" office:value-type="float" office:value="202.375" calcext:value-type="float">
            <text:p>20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218" calcext:value-type="float">
            <text:p>218</text:p>
          </table:table-cell>
          <table:table-cell table:formula="of:=AVERAGE([.M383:.M390])" office:value-type="float" office:value="213.625" calcext:value-type="float">
            <text:p>21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193" calcext:value-type="float">
            <text:p>193</text:p>
          </table:table-cell>
          <table:table-cell table:formula="of:=AVERAGE([.M384:.M391])" office:value-type="float" office:value="220.5" calcext:value-type="float">
            <text:p>22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221" calcext:value-type="float">
            <text:p>221</text:p>
          </table:table-cell>
          <table:table-cell table:formula="of:=AVERAGE([.M385:.M392])" office:value-type="float" office:value="229" calcext:value-type="float">
            <text:p>2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226" calcext:value-type="float">
            <text:p>226</text:p>
          </table:table-cell>
          <table:table-cell table:formula="of:=AVERAGE([.M386:.M393])" office:value-type="float" office:value="232.875" calcext:value-type="float">
            <text:p>23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271" calcext:value-type="float">
            <text:p>271</text:p>
          </table:table-cell>
          <table:table-cell table:formula="of:=AVERAGE([.M387:.M394])" office:value-type="float" office:value="240.625" calcext:value-type="float">
            <text:p>240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233" calcext:value-type="float">
            <text:p>233</text:p>
          </table:table-cell>
          <table:table-cell table:formula="of:=AVERAGE([.M388:.M395])" office:value-type="float" office:value="251.25" calcext:value-type="float">
            <text:p>25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260" calcext:value-type="float">
            <text:p>260</text:p>
          </table:table-cell>
          <table:table-cell table:formula="of:=AVERAGE([.M389:.M396])" office:value-type="float" office:value="258.125" calcext:value-type="float">
            <text:p>25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241" calcext:value-type="float">
            <text:p>241</text:p>
          </table:table-cell>
          <table:table-cell table:formula="of:=AVERAGE([.M390:.M397])" office:value-type="float" office:value="264.5" calcext:value-type="float">
            <text:p>26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280" calcext:value-type="float">
            <text:p>280</text:p>
          </table:table-cell>
          <table:table-cell table:formula="of:=AVERAGE([.M391:.M398])" office:value-type="float" office:value="268.125" calcext:value-type="float">
            <text:p>26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278" calcext:value-type="float">
            <text:p>278</text:p>
          </table:table-cell>
          <table:table-cell table:formula="of:=AVERAGE([.M392:.M399])" office:value-type="float" office:value="279" calcext:value-type="float">
            <text:p>27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276" calcext:value-type="float">
            <text:p>276</text:p>
          </table:table-cell>
          <table:table-cell table:formula="of:=AVERAGE([.M393:.M400])" office:value-type="float" office:value="286.5" calcext:value-type="float">
            <text:p>28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277" calcext:value-type="float">
            <text:p>277</text:p>
          </table:table-cell>
          <table:table-cell table:formula="of:=AVERAGE([.M394:.M401])" office:value-type="float" office:value="296.875" calcext:value-type="float">
            <text:p>29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table:formula="of:=AVERAGE([.M395:.M402])" office:value-type="float" office:value="302.125" calcext:value-type="float">
            <text:p>30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320" calcext:value-type="float">
            <text:p>320</text:p>
          </table:table-cell>
          <table:table-cell table:formula="of:=AVERAGE([.M396:.M403])" office:value-type="float" office:value="307.75" calcext:value-type="float">
            <text:p>30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table:formula="of:=AVERAGE([.M397:.M404])" office:value-type="float" office:value="319.875" calcext:value-type="float">
            <text:p>31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324" calcext:value-type="float">
            <text:p>324</text:p>
          </table:table-cell>
          <table:table-cell table:formula="of:=AVERAGE([.M398:.M405])" office:value-type="float" office:value="329.75" calcext:value-type="float">
            <text:p>32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table:formula="of:=AVERAGE([.M399:.M406])" office:value-type="float" office:value="340.75" calcext:value-type="float">
            <text:p>34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323" calcext:value-type="float">
            <text:p>323</text:p>
          </table:table-cell>
          <table:table-cell table:formula="of:=AVERAGE([.M400:.M407])" office:value-type="float" office:value="350.625" calcext:value-type="float">
            <text:p>350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formula="of:=AVERAGE([.M401:.M408])" office:value-type="float" office:value="361.125" calcext:value-type="float">
            <text:p>36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356" calcext:value-type="float">
            <text:p>356</text:p>
          </table:table-cell>
          <table:table-cell table:formula="of:=AVERAGE([.M402:.M409])" office:value-type="float" office:value="371.625" calcext:value-type="float">
            <text:p>37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table:formula="of:=AVERAGE([.M403:.M410])" office:value-type="float" office:value="381.75" calcext:value-type="float">
            <text:p>38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table:formula="of:=AVERAGE([.M404:.M411])" office:value-type="float" office:value="392.125" calcext:value-type="float">
            <text:p>39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table:formula="of:=AVERAGE([.M405:.M412])" office:value-type="float" office:value="394.25" calcext:value-type="float">
            <text:p>39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formula="of:=AVERAGE([.M406:.M413])" office:value-type="float" office:value="406.25" calcext:value-type="float">
            <text:p>40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table:formula="of:=AVERAGE([.M407:.M414])" office:value-type="float" office:value="412.75" calcext:value-type="float">
            <text:p>41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table:formula="of:=AVERAGE([.M408:.M415])" office:value-type="float" office:value="424.875" calcext:value-type="float">
            <text:p>42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table:formula="of:=AVERAGE([.M409:.M416])" office:value-type="float" office:value="433.875" calcext:value-type="float">
            <text:p>43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452" calcext:value-type="float">
            <text:p>452</text:p>
          </table:table-cell>
          <table:table-cell table:formula="of:=AVERAGE([.M410:.M417])" office:value-type="float" office:value="445.75" calcext:value-type="float">
            <text:p>44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440" calcext:value-type="float">
            <text:p>440</text:p>
          </table:table-cell>
          <table:table-cell table:formula="of:=AVERAGE([.M411:.M418])" office:value-type="float" office:value="457.75" calcext:value-type="float">
            <text:p>45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96" calcext:value-type="float">
            <text:p>496</text:p>
          </table:table-cell>
          <table:table-cell table:formula="of:=AVERAGE([.M412:.M419])" office:value-type="float" office:value="473.5" calcext:value-type="float">
            <text:p>47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476" calcext:value-type="float">
            <text:p>476</text:p>
          </table:table-cell>
          <table:table-cell table:formula="of:=AVERAGE([.M413:.M420])" office:value-type="float" office:value="486.625" calcext:value-type="float">
            <text:p>48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  <table:table-cell table:formula="of:=AVERAGE([.M414:.M421])" office:value-type="float" office:value="495.25" calcext:value-type="float">
            <text:p>49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  <table:table-cell table:formula="of:=AVERAGE([.M415:.M422])" office:value-type="float" office:value="508.75" calcext:value-type="float">
            <text:p>50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table:formula="of:=AVERAGE([.M416:.M423])" office:value-type="float" office:value="517.75" calcext:value-type="float">
            <text:p>51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  <table:table-cell table:formula="of:=AVERAGE([.M417:.M424])" office:value-type="float" office:value="529.25" calcext:value-type="float">
            <text:p>5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21" calcext:value-type="float">
            <text:p>521</text:p>
          </table:table-cell>
          <table:table-cell table:formula="of:=AVERAGE([.M418:.M425])" office:value-type="float" office:value="536.75" calcext:value-type="float">
            <text:p>53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548" calcext:value-type="float">
            <text:p>548</text:p>
          </table:table-cell>
          <table:table-cell table:formula="of:=AVERAGE([.M419:.M426])" office:value-type="float" office:value="548" calcext:value-type="float">
            <text:p>54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table:formula="of:=AVERAGE([.M420:.M427])" office:value-type="float" office:value="552.375" calcext:value-type="float">
            <text:p>55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568" calcext:value-type="float">
            <text:p>568</text:p>
          </table:table-cell>
          <table:table-cell table:formula="of:=AVERAGE([.M421:.M428])" office:value-type="float" office:value="571.875" calcext:value-type="float">
            <text:p>57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563" calcext:value-type="float">
            <text:p>563</text:p>
          </table:table-cell>
          <table:table-cell table:formula="of:=AVERAGE([.M422:.M429])" office:value-type="float" office:value="582.125" calcext:value-type="float">
            <text:p>58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89" calcext:value-type="float">
            <text:p>589</text:p>
          </table:table-cell>
          <table:table-cell table:formula="of:=AVERAGE([.M423:.M430])" office:value-type="float" office:value="589.125" calcext:value-type="float">
            <text:p>58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67" calcext:value-type="float">
            <text:p>567</text:p>
          </table:table-cell>
          <table:table-cell table:formula="of:=AVERAGE([.M424:.M431])" office:value-type="float" office:value="599.625" calcext:value-type="float">
            <text:p>59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651" calcext:value-type="float">
            <text:p>651</text:p>
          </table:table-cell>
          <table:table-cell table:formula="of:=AVERAGE([.M425:.M432])" office:value-type="float" office:value="611.375" calcext:value-type="float">
            <text:p>61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603" calcext:value-type="float">
            <text:p>603</text:p>
          </table:table-cell>
          <table:table-cell table:formula="of:=AVERAGE([.M426:.M433])" office:value-type="float" office:value="622.625" calcext:value-type="float">
            <text:p>6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604" calcext:value-type="float">
            <text:p>604</text:p>
          </table:table-cell>
          <table:table-cell table:formula="of:=AVERAGE([.M427:.M434])" office:value-type="float" office:value="632.375" calcext:value-type="float">
            <text:p>63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652" calcext:value-type="float">
            <text:p>652</text:p>
          </table:table-cell>
          <table:table-cell table:formula="of:=AVERAGE([.M428:.M435])" office:value-type="float" office:value="646" calcext:value-type="float">
            <text:p>64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662" calcext:value-type="float">
            <text:p>662</text:p>
          </table:table-cell>
          <table:table-cell table:formula="of:=AVERAGE([.M429:.M436])" office:value-type="float" office:value="652.625" calcext:value-type="float">
            <text:p>65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653" calcext:value-type="float">
            <text:p>653</text:p>
          </table:table-cell>
          <table:table-cell table:formula="of:=AVERAGE([.M430:.M437])" office:value-type="float" office:value="672.25" calcext:value-type="float">
            <text:p>67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667" calcext:value-type="float">
            <text:p>667</text:p>
          </table:table-cell>
          <table:table-cell table:formula="of:=AVERAGE([.M431:.M438])" office:value-type="float" office:value="685.875" calcext:value-type="float">
            <text:p>68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676" calcext:value-type="float">
            <text:p>676</text:p>
          </table:table-cell>
          <table:table-cell table:formula="of:=AVERAGE([.M432:.M439])" office:value-type="float" office:value="688.375" calcext:value-type="float">
            <text:p>68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704" calcext:value-type="float">
            <text:p>704</text:p>
          </table:table-cell>
          <table:table-cell table:formula="of:=AVERAGE([.M433:.M440])" office:value-type="float" office:value="698" calcext:value-type="float">
            <text:p>69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760" calcext:value-type="float">
            <text:p>760</text:p>
          </table:table-cell>
          <table:table-cell table:formula="of:=AVERAGE([.M434:.M441])" office:value-type="float" office:value="717" calcext:value-type="float">
            <text:p>71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713" calcext:value-type="float">
            <text:p>713</text:p>
          </table:table-cell>
          <table:table-cell table:formula="of:=AVERAGE([.M435:.M442])" office:value-type="float" office:value="733.375" calcext:value-type="float">
            <text:p>7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672" calcext:value-type="float">
            <text:p>672</text:p>
          </table:table-cell>
          <table:table-cell table:formula="of:=AVERAGE([.M436:.M443])" office:value-type="float" office:value="747.875" calcext:value-type="float">
            <text:p>74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739" calcext:value-type="float">
            <text:p>739</text:p>
          </table:table-cell>
          <table:table-cell table:formula="of:=AVERAGE([.M437:.M444])" office:value-type="float" office:value="751.875" calcext:value-type="float">
            <text:p>75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805" calcext:value-type="float">
            <text:p>805</text:p>
          </table:table-cell>
          <table:table-cell table:formula="of:=AVERAGE([.M438:.M445])" office:value-type="float" office:value="755.875" calcext:value-type="float">
            <text:p>75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798" calcext:value-type="float">
            <text:p>798</text:p>
          </table:table-cell>
          <table:table-cell table:formula="of:=AVERAGE([.M439:.M446])" office:value-type="float" office:value="767.125" calcext:value-type="float">
            <text:p>76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792" calcext:value-type="float">
            <text:p>792</text:p>
          </table:table-cell>
          <table:table-cell table:formula="of:=AVERAGE([.M440:.M447])" office:value-type="float" office:value="785.875" calcext:value-type="float">
            <text:p>78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736" calcext:value-type="float">
            <text:p>736</text:p>
          </table:table-cell>
          <table:table-cell table:formula="of:=AVERAGE([.M441:.M448])" office:value-type="float" office:value="801.125" calcext:value-type="float">
            <text:p>80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792" calcext:value-type="float">
            <text:p>792</text:p>
          </table:table-cell>
          <table:table-cell table:formula="of:=AVERAGE([.M442:.M449])" office:value-type="float" office:value="806.875" calcext:value-type="float">
            <text:p>80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803" calcext:value-type="float">
            <text:p>803</text:p>
          </table:table-cell>
          <table:table-cell table:formula="of:=AVERAGE([.M443:.M450])" office:value-type="float" office:value="813.25" calcext:value-type="float">
            <text:p>8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822" calcext:value-type="float">
            <text:p>822</text:p>
          </table:table-cell>
          <table:table-cell table:formula="of:=AVERAGE([.M444:.M451])" office:value-type="float" office:value="816.875" calcext:value-type="float">
            <text:p>81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861" calcext:value-type="float">
            <text:p>861</text:p>
          </table:table-cell>
          <table:table-cell table:formula="of:=AVERAGE([.M445:.M452])" office:value-type="float" office:value="829.5" calcext:value-type="float">
            <text:p>829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851" calcext:value-type="float">
            <text:p>851</text:p>
          </table:table-cell>
          <table:table-cell table:formula="of:=AVERAGE([.M446:.M453])" office:value-type="float" office:value="841.5" calcext:value-type="float">
            <text:p>84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849" calcext:value-type="float">
            <text:p>849</text:p>
          </table:table-cell>
          <table:table-cell table:formula="of:=AVERAGE([.M447:.M454])" office:value-type="float" office:value="851.875" calcext:value-type="float">
            <text:p>85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821" calcext:value-type="float">
            <text:p>821</text:p>
          </table:table-cell>
          <table:table-cell table:formula="of:=AVERAGE([.M448:.M455])" office:value-type="float" office:value="860.375" calcext:value-type="float">
            <text:p>86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837" calcext:value-type="float">
            <text:p>837</text:p>
          </table:table-cell>
          <table:table-cell table:formula="of:=AVERAGE([.M449:.M456])" office:value-type="float" office:value="859.75" calcext:value-type="float">
            <text:p>85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888" calcext:value-type="float">
            <text:p>888</text:p>
          </table:table-cell>
          <table:table-cell table:formula="of:=AVERAGE([.M450:.M457])" office:value-type="float" office:value="865.375" calcext:value-type="float">
            <text:p>86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886" calcext:value-type="float">
            <text:p>886</text:p>
          </table:table-cell>
          <table:table-cell table:formula="of:=AVERAGE([.M451:.M458])" office:value-type="float" office:value="869.75" calcext:value-type="float">
            <text:p>86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890" calcext:value-type="float">
            <text:p>890</text:p>
          </table:table-cell>
          <table:table-cell table:formula="of:=AVERAGE([.M452:.M459])" office:value-type="float" office:value="877.375" calcext:value-type="float">
            <text:p>87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856" calcext:value-type="float">
            <text:p>856</text:p>
          </table:table-cell>
          <table:table-cell table:formula="of:=AVERAGE([.M453:.M460])" office:value-type="float" office:value="884.125" calcext:value-type="float">
            <text:p>88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896" calcext:value-type="float">
            <text:p>896</text:p>
          </table:table-cell>
          <table:table-cell table:formula="of:=AVERAGE([.M454:.M461])" office:value-type="float" office:value="892" calcext:value-type="float">
            <text:p>89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884" calcext:value-type="float">
            <text:p>884</text:p>
          </table:table-cell>
          <table:table-cell table:formula="of:=AVERAGE([.M455:.M462])" office:value-type="float" office:value="892.5" calcext:value-type="float">
            <text:p>89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882" calcext:value-type="float">
            <text:p>882</text:p>
          </table:table-cell>
          <table:table-cell table:formula="of:=AVERAGE([.M456:.M463])" office:value-type="float" office:value="892.375" calcext:value-type="float">
            <text:p>89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891" calcext:value-type="float">
            <text:p>891</text:p>
          </table:table-cell>
          <table:table-cell table:formula="of:=AVERAGE([.M457:.M464])" office:value-type="float" office:value="899.25" calcext:value-type="float">
            <text:p>89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951" calcext:value-type="float">
            <text:p>951</text:p>
          </table:table-cell>
          <table:table-cell table:formula="of:=AVERAGE([.M458:.M465])" office:value-type="float" office:value="909" calcext:value-type="float">
            <text:p>90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890" calcext:value-type="float">
            <text:p>890</text:p>
          </table:table-cell>
          <table:table-cell table:formula="of:=AVERAGE([.M459:.M466])" office:value-type="float" office:value="905.5" calcext:value-type="float">
            <text:p>90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889" calcext:value-type="float">
            <text:p>889</text:p>
          </table:table-cell>
          <table:table-cell table:formula="of:=AVERAGE([.M460:.M467])" office:value-type="float" office:value="911.75" calcext:value-type="float">
            <text:p>91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911" calcext:value-type="float">
            <text:p>911</text:p>
          </table:table-cell>
          <table:table-cell table:formula="of:=AVERAGE([.M461:.M468])" office:value-type="float" office:value="915.875" calcext:value-type="float">
            <text:p>91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974" calcext:value-type="float">
            <text:p>974</text:p>
          </table:table-cell>
          <table:table-cell table:formula="of:=AVERAGE([.M462:.M469])" office:value-type="float" office:value="910.75" calcext:value-type="float">
            <text:p>91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856" calcext:value-type="float">
            <text:p>856</text:p>
          </table:table-cell>
          <table:table-cell table:formula="of:=AVERAGE([.M463:.M470])" office:value-type="float" office:value="915.375" calcext:value-type="float">
            <text:p>91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932" calcext:value-type="float">
            <text:p>932</text:p>
          </table:table-cell>
          <table:table-cell table:formula="of:=AVERAGE([.M464:.M471])" office:value-type="float" office:value="928.875" calcext:value-type="float">
            <text:p>92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924" calcext:value-type="float">
            <text:p>924</text:p>
          </table:table-cell>
          <table:table-cell table:formula="of:=AVERAGE([.M465:.M472])" office:value-type="float" office:value="938.375" calcext:value-type="float">
            <text:p>93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910" calcext:value-type="float">
            <text:p>910</text:p>
          </table:table-cell>
          <table:table-cell table:formula="of:=AVERAGE([.M466:.M473])" office:value-type="float" office:value="934.875" calcext:value-type="float">
            <text:p>93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927" calcext:value-type="float">
            <text:p>927</text:p>
          </table:table-cell>
          <table:table-cell table:formula="of:=AVERAGE([.M467:.M474])" office:value-type="float" office:value="949.875" calcext:value-type="float">
            <text:p>94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997" calcext:value-type="float">
            <text:p>997</text:p>
          </table:table-cell>
          <table:table-cell table:formula="of:=AVERAGE([.M468:.M475])" office:value-type="float" office:value="944.75" calcext:value-type="float">
            <text:p>94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987" calcext:value-type="float">
            <text:p>987</text:p>
          </table:table-cell>
          <table:table-cell table:formula="of:=AVERAGE([.M469:.M476])" office:value-type="float" office:value="952.25" calcext:value-type="float">
            <text:p>95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946" calcext:value-type="float">
            <text:p>946</text:p>
          </table:table-cell>
          <table:table-cell table:formula="of:=AVERAGE([.M470:.M477])" office:value-type="float" office:value="957.375" calcext:value-type="float">
            <text:p>95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976" calcext:value-type="float">
            <text:p>976</text:p>
          </table:table-cell>
          <table:table-cell table:formula="of:=AVERAGE([.M471:.M478])" office:value-type="float" office:value="964.5" calcext:value-type="float">
            <text:p>96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891" calcext:value-type="float">
            <text:p>891</text:p>
          </table:table-cell>
          <table:table-cell table:formula="of:=AVERAGE([.M472:.M479])" office:value-type="float" office:value="961.5" calcext:value-type="float">
            <text:p>96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984" calcext:value-type="float">
            <text:p>984</text:p>
          </table:table-cell>
          <table:table-cell table:formula="of:=AVERAGE([.M473:.M480])" office:value-type="float" office:value="955.625" calcext:value-type="float">
            <text:p>95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951" calcext:value-type="float">
            <text:p>951</text:p>
          </table:table-cell>
          <table:table-cell table:formula="of:=AVERAGE([.M474:.M481])" office:value-type="float" office:value="961.125" calcext:value-type="float">
            <text:p>96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984" calcext:value-type="float">
            <text:p>984</text:p>
          </table:table-cell>
          <table:table-cell table:formula="of:=AVERAGE([.M475:.M482])" office:value-type="float" office:value="963.375" calcext:value-type="float">
            <text:p>96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973" calcext:value-type="float">
            <text:p>973</text:p>
          </table:table-cell>
          <table:table-cell table:formula="of:=AVERAGE([.M476:.M483])" office:value-type="float" office:value="971.75" calcext:value-type="float">
            <text:p>97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940" calcext:value-type="float">
            <text:p>940</text:p>
          </table:table-cell>
          <table:table-cell table:formula="of:=AVERAGE([.M477:.M484])" office:value-type="float" office:value="971.375" calcext:value-type="float">
            <text:p>97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990" calcext:value-type="float">
            <text:p>990</text:p>
          </table:table-cell>
          <table:table-cell table:formula="of:=AVERAGE([.M478:.M485])" office:value-type="float" office:value="974.5" calcext:value-type="float">
            <text:p>97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94" calcext:value-type="float">
            <text:p>994</text:p>
          </table:table-cell>
          <table:table-cell table:formula="of:=AVERAGE([.M479:.M486])" office:value-type="float" office:value="970.875" calcext:value-type="float">
            <text:p>97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958" calcext:value-type="float">
            <text:p>958</text:p>
          </table:table-cell>
          <table:table-cell table:formula="of:=AVERAGE([.M480:.M487])" office:value-type="float" office:value="962.5" calcext:value-type="float">
            <text:p>96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981" calcext:value-type="float">
            <text:p>981</text:p>
          </table:table-cell>
          <table:table-cell table:formula="of:=AVERAGE([.M481:.M488])" office:value-type="float" office:value="967" calcext:value-type="float">
            <text:p>96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976" calcext:value-type="float">
            <text:p>976</text:p>
          </table:table-cell>
          <table:table-cell table:formula="of:=AVERAGE([.M482:.M489])" office:value-type="float" office:value="960.25" calcext:value-type="float">
            <text:p>96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955" calcext:value-type="float">
            <text:p>955</text:p>
          </table:table-cell>
          <table:table-cell table:formula="of:=AVERAGE([.M483:.M490])" office:value-type="float" office:value="956.375" calcext:value-type="float">
            <text:p>95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906" calcext:value-type="float">
            <text:p>906</text:p>
          </table:table-cell>
          <table:table-cell table:formula="of:=AVERAGE([.M484:.M491])" office:value-type="float" office:value="953.125" calcext:value-type="float">
            <text:p>953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976" calcext:value-type="float">
            <text:p>976</text:p>
          </table:table-cell>
          <table:table-cell table:formula="of:=AVERAGE([.M485:.M492])" office:value-type="float" office:value="945.25" calcext:value-type="float">
            <text:p>94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936" calcext:value-type="float">
            <text:p>936</text:p>
          </table:table-cell>
          <table:table-cell table:formula="of:=AVERAGE([.M486:.M493])" office:value-type="float" office:value="940.125" calcext:value-type="float">
            <text:p>940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963" calcext:value-type="float">
            <text:p>963</text:p>
          </table:table-cell>
          <table:table-cell table:formula="of:=AVERAGE([.M487:.M494])" office:value-type="float" office:value="933.375" calcext:value-type="float">
            <text:p>9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932" calcext:value-type="float">
            <text:p>932</text:p>
          </table:table-cell>
          <table:table-cell table:formula="of:=AVERAGE([.M488:.M495])" office:value-type="float" office:value="933.875" calcext:value-type="float">
            <text:p>93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918" calcext:value-type="float">
            <text:p>918</text:p>
          </table:table-cell>
          <table:table-cell table:formula="of:=AVERAGE([.M489:.M496])" office:value-type="float" office:value="931" calcext:value-type="float">
            <text:p>93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935" calcext:value-type="float">
            <text:p>935</text:p>
          </table:table-cell>
          <table:table-cell table:formula="of:=AVERAGE([.M490:.M497])" office:value-type="float" office:value="936.75" calcext:value-type="float">
            <text:p>93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901" calcext:value-type="float">
            <text:p>901</text:p>
          </table:table-cell>
          <table:table-cell table:formula="of:=AVERAGE([.M491:.M498])" office:value-type="float" office:value="932.875" calcext:value-type="float">
            <text:p>93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910" calcext:value-type="float">
            <text:p>910</text:p>
          </table:table-cell>
          <table:table-cell table:formula="of:=AVERAGE([.M492:.M499])" office:value-type="float" office:value="930.75" calcext:value-type="float">
            <text:p>93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953" calcext:value-type="float">
            <text:p>953</text:p>
          </table:table-cell>
          <table:table-cell table:formula="of:=AVERAGE([.M493:.M500])" office:value-type="float" office:value="935.25" calcext:value-type="float">
            <text:p>93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982" calcext:value-type="float">
            <text:p>982</text:p>
          </table:table-cell>
          <table:table-cell table:formula="of:=AVERAGE([.M494:.M501])" office:value-type="float" office:value="938.375" calcext:value-type="float">
            <text:p>93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932" calcext:value-type="float">
            <text:p>932</text:p>
          </table:table-cell>
          <table:table-cell table:formula="of:=AVERAGE([.M495:.M502])" office:value-type="float" office:value="944.25" calcext:value-type="float">
            <text:p>9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915" calcext:value-type="float">
            <text:p>915</text:p>
          </table:table-cell>
          <table:table-cell table:formula="of:=AVERAGE([.M496:.M503])" office:value-type="float" office:value="948.25" calcext:value-type="float">
            <text:p>9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954" calcext:value-type="float">
            <text:p>954</text:p>
          </table:table-cell>
          <table:table-cell table:formula="of:=AVERAGE([.M497:.M504])" office:value-type="float" office:value="942.75" calcext:value-type="float">
            <text:p>94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960" calcext:value-type="float">
            <text:p>960</text:p>
          </table:table-cell>
          <table:table-cell table:formula="of:=AVERAGE([.M498:.M505])" office:value-type="float" office:value="943.5" calcext:value-type="float">
            <text:p>94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948" calcext:value-type="float">
            <text:p>948</text:p>
          </table:table-cell>
          <table:table-cell table:formula="of:=AVERAGE([.M499:.M506])" office:value-type="float" office:value="940.5" calcext:value-type="float">
            <text:p>94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942" calcext:value-type="float">
            <text:p>942</text:p>
          </table:table-cell>
          <table:table-cell table:formula="of:=AVERAGE([.M500:.M507])" office:value-type="float" office:value="943.75" calcext:value-type="float">
            <text:p>9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909" calcext:value-type="float">
            <text:p>909</text:p>
          </table:table-cell>
          <table:table-cell table:formula="of:=AVERAGE([.M501:.M508])" office:value-type="float" office:value="940" calcext:value-type="float">
            <text:p>94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988" calcext:value-type="float">
            <text:p>988</text:p>
          </table:table-cell>
          <table:table-cell table:formula="of:=AVERAGE([.M502:.M509])" office:value-type="float" office:value="931.625" calcext:value-type="float">
            <text:p>93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908" calcext:value-type="float">
            <text:p>908</text:p>
          </table:table-cell>
          <table:table-cell table:formula="of:=AVERAGE([.M503:.M510])" office:value-type="float" office:value="926.125" calcext:value-type="float">
            <text:p>92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941" calcext:value-type="float">
            <text:p>941</text:p>
          </table:table-cell>
          <table:table-cell table:formula="of:=AVERAGE([.M504:.M511])" office:value-type="float" office:value="921" calcext:value-type="float">
            <text:p>92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924" calcext:value-type="float">
            <text:p>924</text:p>
          </table:table-cell>
          <table:table-cell table:formula="of:=AVERAGE([.M505:.M512])" office:value-type="float" office:value="913.25" calcext:value-type="float">
            <text:p>9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893" calcext:value-type="float">
            <text:p>893</text:p>
          </table:table-cell>
          <table:table-cell table:formula="of:=AVERAGE([.M506:.M513])" office:value-type="float" office:value="899.125" calcext:value-type="float">
            <text:p>89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904" calcext:value-type="float">
            <text:p>904</text:p>
          </table:table-cell>
          <table:table-cell table:formula="of:=AVERAGE([.M507:.M514])" office:value-type="float" office:value="890.375" calcext:value-type="float">
            <text:p>89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901" calcext:value-type="float">
            <text:p>901</text:p>
          </table:table-cell>
          <table:table-cell table:formula="of:=AVERAGE([.M508:.M515])" office:value-type="float" office:value="877.375" calcext:value-type="float">
            <text:p>87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847" calcext:value-type="float">
            <text:p>847</text:p>
          </table:table-cell>
          <table:table-cell table:formula="of:=AVERAGE([.M509:.M516])" office:value-type="float" office:value="868.875" calcext:value-type="float">
            <text:p>86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875" calcext:value-type="float">
            <text:p>875</text:p>
          </table:table-cell>
          <table:table-cell table:formula="of:=AVERAGE([.M510:.M517])" office:value-type="float" office:value="858.5" calcext:value-type="float">
            <text:p>85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38" calcext:value-type="float">
            <text:p>838</text:p>
          </table:table-cell>
          <table:table-cell table:formula="of:=AVERAGE([.M511:.M518])" office:value-type="float" office:value="854.5" calcext:value-type="float">
            <text:p>85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837" calcext:value-type="float">
            <text:p>837</text:p>
          </table:table-cell>
          <table:table-cell table:formula="of:=AVERAGE([.M512:.M519])" office:value-type="float" office:value="844" calcext:value-type="float">
            <text:p>84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856" calcext:value-type="float">
            <text:p>856</text:p>
          </table:table-cell>
          <table:table-cell table:formula="of:=AVERAGE([.M513:.M520])" office:value-type="float" office:value="845.25" calcext:value-type="float">
            <text:p>84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table:formula="of:=AVERAGE([.M514:.M521])" office:value-type="float" office:value="834.125" calcext:value-type="float">
            <text:p>83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872" calcext:value-type="float">
            <text:p>872</text:p>
          </table:table-cell>
          <table:table-cell table:formula="of:=AVERAGE([.M515:.M522])" office:value-type="float" office:value="832.625" calcext:value-type="float">
            <text:p>83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817" calcext:value-type="float">
            <text:p>817</text:p>
          </table:table-cell>
          <table:table-cell table:formula="of:=AVERAGE([.M516:.M523])" office:value-type="float" office:value="827.875" calcext:value-type="float">
            <text:p>82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57" calcext:value-type="float">
            <text:p>857</text:p>
          </table:table-cell>
          <table:table-cell table:formula="of:=AVERAGE([.M517:.M524])" office:value-type="float" office:value="822.25" calcext:value-type="float">
            <text:p>82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786" calcext:value-type="float">
            <text:p>786</text:p>
          </table:table-cell>
          <table:table-cell table:formula="of:=AVERAGE([.M518:.M525])" office:value-type="float" office:value="825.625" calcext:value-type="float">
            <text:p>82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826" calcext:value-type="float">
            <text:p>826</text:p>
          </table:table-cell>
          <table:table-cell table:formula="of:=AVERAGE([.M519:.M526])" office:value-type="float" office:value="819.25" calcext:value-type="float">
            <text:p>81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799" calcext:value-type="float">
            <text:p>799</text:p>
          </table:table-cell>
          <table:table-cell table:formula="of:=AVERAGE([.M520:.M527])" office:value-type="float" office:value="811.75" calcext:value-type="float">
            <text:p>81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811" calcext:value-type="float">
            <text:p>811</text:p>
          </table:table-cell>
          <table:table-cell table:formula="of:=AVERAGE([.M521:.M528])" office:value-type="float" office:value="807.625" calcext:value-type="float">
            <text:p>80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37" calcext:value-type="float">
            <text:p>837</text:p>
          </table:table-cell>
          <table:table-cell table:formula="of:=AVERAGE([.M522:.M529])" office:value-type="float" office:value="810.125" calcext:value-type="float">
            <text:p>810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821" calcext:value-type="float">
            <text:p>821</text:p>
          </table:table-cell>
          <table:table-cell table:formula="of:=AVERAGE([.M523:.M530])" office:value-type="float" office:value="799.25" calcext:value-type="float">
            <text:p>79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757" calcext:value-type="float">
            <text:p>757</text:p>
          </table:table-cell>
          <table:table-cell table:formula="of:=AVERAGE([.M524:.M531])" office:value-type="float" office:value="796.5" calcext:value-type="float">
            <text:p>79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824" calcext:value-type="float">
            <text:p>824</text:p>
          </table:table-cell>
          <table:table-cell table:formula="of:=AVERAGE([.M525:.M532])" office:value-type="float" office:value="786.25" calcext:value-type="float">
            <text:p>78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806" calcext:value-type="float">
            <text:p>806</text:p>
          </table:table-cell>
          <table:table-cell table:formula="of:=AVERAGE([.M526:.M533])" office:value-type="float" office:value="777.5" calcext:value-type="float">
            <text:p>77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739" calcext:value-type="float">
            <text:p>739</text:p>
          </table:table-cell>
          <table:table-cell table:formula="of:=AVERAGE([.M527:.M534])" office:value-type="float" office:value="763.375" calcext:value-type="float">
            <text:p>76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777" calcext:value-type="float">
            <text:p>777</text:p>
          </table:table-cell>
          <table:table-cell table:formula="of:=AVERAGE([.M528:.M535])" office:value-type="float" office:value="759" calcext:value-type="float">
            <text:p>75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729" calcext:value-type="float">
            <text:p>729</text:p>
          </table:table-cell>
          <table:table-cell table:formula="of:=AVERAGE([.M529:.M536])" office:value-type="float" office:value="744.25" calcext:value-type="float">
            <text:p>7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767" calcext:value-type="float">
            <text:p>767</text:p>
          </table:table-cell>
          <table:table-cell table:formula="of:=AVERAGE([.M530:.M537])" office:value-type="float" office:value="731.75" calcext:value-type="float">
            <text:p>73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708" calcext:value-type="float">
            <text:p>708</text:p>
          </table:table-cell>
          <table:table-cell table:formula="of:=AVERAGE([.M531:.M538])" office:value-type="float" office:value="728.75" calcext:value-type="float">
            <text:p>72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722" calcext:value-type="float">
            <text:p>722</text:p>
          </table:table-cell>
          <table:table-cell table:formula="of:=AVERAGE([.M532:.M539])" office:value-type="float" office:value="717.5" calcext:value-type="float">
            <text:p>71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706" calcext:value-type="float">
            <text:p>706</text:p>
          </table:table-cell>
          <table:table-cell table:formula="of:=AVERAGE([.M533:.M540])" office:value-type="float" office:value="713.25" calcext:value-type="float">
            <text:p>7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706" calcext:value-type="float">
            <text:p>706</text:p>
          </table:table-cell>
          <table:table-cell table:formula="of:=AVERAGE([.M534:.M541])" office:value-type="float" office:value="702.25" calcext:value-type="float">
            <text:p>70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715" calcext:value-type="float">
            <text:p>715</text:p>
          </table:table-cell>
          <table:table-cell table:formula="of:=AVERAGE([.M535:.M542])" office:value-type="float" office:value="694.125" calcext:value-type="float">
            <text:p>69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687" calcext:value-type="float">
            <text:p>687</text:p>
          </table:table-cell>
          <table:table-cell table:formula="of:=AVERAGE([.M536:.M543])" office:value-type="float" office:value="684.625" calcext:value-type="float">
            <text:p>68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95" calcext:value-type="float">
            <text:p>695</text:p>
          </table:table-cell>
          <table:table-cell table:formula="of:=AVERAGE([.M537:.M544])" office:value-type="float" office:value="674.75" calcext:value-type="float">
            <text:p>67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79" calcext:value-type="float">
            <text:p>679</text:p>
          </table:table-cell>
          <table:table-cell table:formula="of:=AVERAGE([.M538:.M545])" office:value-type="float" office:value="670.5" calcext:value-type="float">
            <text:p>67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643" calcext:value-type="float">
            <text:p>643</text:p>
          </table:table-cell>
          <table:table-cell table:formula="of:=AVERAGE([.M539:.M546])" office:value-type="float" office:value="663.625" calcext:value-type="float">
            <text:p>66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646" calcext:value-type="float">
            <text:p>646</text:p>
          </table:table-cell>
          <table:table-cell table:formula="of:=AVERAGE([.M540:.M547])" office:value-type="float" office:value="656.875" calcext:value-type="float">
            <text:p>65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table:formula="of:=AVERAGE([.M541:.M548])" office:value-type="float" office:value="647" calcext:value-type="float">
            <text:p>64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672" calcext:value-type="float">
            <text:p>672</text:p>
          </table:table-cell>
          <table:table-cell table:formula="of:=AVERAGE([.M542:.M549])" office:value-type="float" office:value="640.375" calcext:value-type="float">
            <text:p>64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660" calcext:value-type="float">
            <text:p>660</text:p>
          </table:table-cell>
          <table:table-cell table:formula="of:=AVERAGE([.M543:.M550])" office:value-type="float" office:value="629" calcext:value-type="float">
            <text:p>6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33" calcext:value-type="float">
            <text:p>633</text:p>
          </table:table-cell>
          <table:table-cell table:formula="of:=AVERAGE([.M544:.M551])" office:value-type="float" office:value="624.625" calcext:value-type="float">
            <text:p>62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616" calcext:value-type="float">
            <text:p>616</text:p>
          </table:table-cell>
          <table:table-cell table:formula="of:=AVERAGE([.M545:.M552])" office:value-type="float" office:value="619.875" calcext:value-type="float">
            <text:p>61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626" calcext:value-type="float">
            <text:p>626</text:p>
          </table:table-cell>
          <table:table-cell table:formula="of:=AVERAGE([.M546:.M553])" office:value-type="float" office:value="604.75" calcext:value-type="float">
            <text:p>60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table:formula="of:=AVERAGE([.M547:.M554])" office:value-type="float" office:value="598.125" calcext:value-type="float">
            <text:p>59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611" calcext:value-type="float">
            <text:p>611</text:p>
          </table:table-cell>
          <table:table-cell table:formula="of:=AVERAGE([.M548:.M555])" office:value-type="float" office:value="586.125" calcext:value-type="float">
            <text:p>58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589" calcext:value-type="float">
            <text:p>589</text:p>
          </table:table-cell>
          <table:table-cell table:formula="of:=AVERAGE([.M549:.M556])" office:value-type="float" office:value="585.625" calcext:value-type="float">
            <text:p>58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number-columns-repeated="2" office:value-type="float" office:value="551" calcext:value-type="float">
            <text:p>551</text:p>
          </table:table-cell>
          <table:table-cell table:formula="of:=AVERAGE([.M550:.M557])" office:value-type="float" office:value="577" calcext:value-type="float">
            <text:p>57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607" calcext:value-type="float">
            <text:p>607</text:p>
          </table:table-cell>
          <table:table-cell table:formula="of:=AVERAGE([.M551:.M558])" office:value-type="float" office:value="577.625" calcext:value-type="float">
            <text:p>57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537" calcext:value-type="float">
            <text:p>537</text:p>
          </table:table-cell>
          <table:table-cell table:formula="of:=AVERAGE([.M552:.M559])" office:value-type="float" office:value="566.875" calcext:value-type="float">
            <text:p>56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612" calcext:value-type="float">
            <text:p>612</text:p>
          </table:table-cell>
          <table:table-cell table:formula="of:=AVERAGE([.M553:.M560])" office:value-type="float" office:value="555.75" calcext:value-type="float">
            <text:p>55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formula="of:=AVERAGE([.M554:.M561])" office:value-type="float" office:value="550.25" calcext:value-type="float">
            <text:p>55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formula="of:=AVERAGE([.M555:.M562])" office:value-type="float" office:value="533.75" calcext:value-type="float">
            <text:p>53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525" calcext:value-type="float">
            <text:p>525</text:p>
          </table:table-cell>
          <table:table-cell table:formula="of:=AVERAGE([.M556:.M563])" office:value-type="float" office:value="532" calcext:value-type="float">
            <text:p>53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table:formula="of:=AVERAGE([.M557:.M564])" office:value-type="float" office:value="510.75" calcext:value-type="float">
            <text:p>51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table:formula="of:=AVERAGE([.M558:.M565])" office:value-type="float" office:value="501.875" calcext:value-type="float">
            <text:p>50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75" calcext:value-type="float">
            <text:p>475</text:p>
          </table:table-cell>
          <table:table-cell table:formula="of:=AVERAGE([.M559:.M566])" office:value-type="float" office:value="488.125" calcext:value-type="float">
            <text:p>48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table:formula="of:=AVERAGE([.M560:.M567])" office:value-type="float" office:value="482.375" calcext:value-type="float">
            <text:p>48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442" calcext:value-type="float">
            <text:p>442</text:p>
          </table:table-cell>
          <table:table-cell table:formula="of:=AVERAGE([.M561:.M568])" office:value-type="float" office:value="476.125" calcext:value-type="float">
            <text:p>47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486" calcext:value-type="float">
            <text:p>486</text:p>
          </table:table-cell>
          <table:table-cell table:formula="of:=AVERAGE([.M562:.M569])" office:value-type="float" office:value="467.375" calcext:value-type="float">
            <text:p>46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447" calcext:value-type="float">
            <text:p>447</text:p>
          </table:table-cell>
          <table:table-cell table:formula="of:=AVERAGE([.M563:.M570])" office:value-type="float" office:value="460.5" calcext:value-type="float">
            <text:p>46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479" calcext:value-type="float">
            <text:p>479</text:p>
          </table:table-cell>
          <table:table-cell table:formula="of:=AVERAGE([.M564:.M571])" office:value-type="float" office:value="443.75" calcext:value-type="float">
            <text:p>4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450" calcext:value-type="float">
            <text:p>450</text:p>
          </table:table-cell>
          <table:table-cell table:formula="of:=AVERAGE([.M565:.M572])" office:value-type="float" office:value="443.75" calcext:value-type="float">
            <text:p>4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437" calcext:value-type="float">
            <text:p>437</text:p>
          </table:table-cell>
          <table:table-cell table:formula="of:=AVERAGE([.M566:.M573])" office:value-type="float" office:value="433.25" calcext:value-type="float">
            <text:p>43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420" calcext:value-type="float">
            <text:p>420</text:p>
          </table:table-cell>
          <table:table-cell table:formula="of:=AVERAGE([.M567:.M574])" office:value-type="float" office:value="431" calcext:value-type="float">
            <text:p>43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389" calcext:value-type="float">
            <text:p>389</text:p>
          </table:table-cell>
          <table:table-cell table:formula="of:=AVERAGE([.M568:.M575])" office:value-type="float" office:value="419.25" calcext:value-type="float">
            <text:p>41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42" calcext:value-type="float">
            <text:p>442</text:p>
          </table:table-cell>
          <table:table-cell table:formula="of:=AVERAGE([.M569:.M576])" office:value-type="float" office:value="416" calcext:value-type="float">
            <text:p>41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402" calcext:value-type="float">
            <text:p>402</text:p>
          </table:table-cell>
          <table:table-cell table:formula="of:=AVERAGE([.M570:.M577])" office:value-type="float" office:value="411.625" calcext:value-type="float">
            <text:p>4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429" calcext:value-type="float">
            <text:p>429</text:p>
          </table:table-cell>
          <table:table-cell table:formula="of:=AVERAGE([.M571:.M578])" office:value-type="float" office:value="406.625" calcext:value-type="float">
            <text:p>40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85" calcext:value-type="float">
            <text:p>385</text:p>
          </table:table-cell>
          <table:table-cell table:formula="of:=AVERAGE([.M572:.M579])" office:value-type="float" office:value="406.125" calcext:value-type="float">
            <text:p>40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424" calcext:value-type="float">
            <text:p>424</text:p>
          </table:table-cell>
          <table:table-cell table:formula="of:=AVERAGE([.M573:.M580])" office:value-type="float" office:value="399.75" calcext:value-type="float">
            <text:p>39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402" calcext:value-type="float">
            <text:p>402</text:p>
          </table:table-cell>
          <table:table-cell table:formula="of:=AVERAGE([.M574:.M581])" office:value-type="float" office:value="394.875" calcext:value-type="float">
            <text:p>39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80" calcext:value-type="float">
            <text:p>380</text:p>
          </table:table-cell>
          <table:table-cell table:formula="of:=AVERAGE([.M575:.M582])" office:value-type="float" office:value="383.875" calcext:value-type="float">
            <text:p>38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385" calcext:value-type="float">
            <text:p>385</text:p>
          </table:table-cell>
          <table:table-cell table:formula="of:=AVERAGE([.M576:.M583])" office:value-type="float" office:value="378.25" calcext:value-type="float">
            <text:p>37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391" calcext:value-type="float">
            <text:p>391</text:p>
          </table:table-cell>
          <table:table-cell table:formula="of:=AVERAGE([.M577:.M584])" office:value-type="float" office:value="368.375" calcext:value-type="float">
            <text:p>36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363" calcext:value-type="float">
            <text:p>363</text:p>
          </table:table-cell>
          <table:table-cell table:formula="of:=AVERAGE([.M578:.M585])" office:value-type="float" office:value="354.25" calcext:value-type="float">
            <text:p>35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41" calcext:value-type="float">
            <text:p>341</text:p>
          </table:table-cell>
          <table:table-cell table:formula="of:=AVERAGE([.M579:.M586])" office:value-type="float" office:value="346.5" calcext:value-type="float">
            <text:p>34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40" calcext:value-type="float">
            <text:p>340</text:p>
          </table:table-cell>
          <table:table-cell table:formula="of:=AVERAGE([.M580:.M587])" office:value-type="float" office:value="337.25" calcext:value-type="float">
            <text:p>33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345" calcext:value-type="float">
            <text:p>345</text:p>
          </table:table-cell>
          <table:table-cell table:formula="of:=AVERAGE([.M581:.M588])" office:value-type="float" office:value="329.25" calcext:value-type="float">
            <text:p>3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289" calcext:value-type="float">
            <text:p>289</text:p>
          </table:table-cell>
          <table:table-cell table:formula="of:=AVERAGE([.M582:.M589])" office:value-type="float" office:value="319.125" calcext:value-type="float">
            <text:p>31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318" calcext:value-type="float">
            <text:p>318</text:p>
          </table:table-cell>
          <table:table-cell table:formula="of:=AVERAGE([.M583:.M590])" office:value-type="float" office:value="313.375" calcext:value-type="float">
            <text:p>3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311" calcext:value-type="float">
            <text:p>311</text:p>
          </table:table-cell>
          <table:table-cell table:formula="of:=AVERAGE([.M584:.M591])" office:value-type="float" office:value="304.5" calcext:value-type="float">
            <text:p>30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327" calcext:value-type="float">
            <text:p>327</text:p>
          </table:table-cell>
          <table:table-cell table:formula="of:=AVERAGE([.M585:.M592])" office:value-type="float" office:value="297.25" calcext:value-type="float">
            <text:p>29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282" calcext:value-type="float">
            <text:p>282</text:p>
          </table:table-cell>
          <table:table-cell table:formula="of:=AVERAGE([.M586:.M593])" office:value-type="float" office:value="297.375" calcext:value-type="float">
            <text:p>29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295" calcext:value-type="float">
            <text:p>295</text:p>
          </table:table-cell>
          <table:table-cell table:formula="of:=AVERAGE([.M587:.M594])" office:value-type="float" office:value="291.125" calcext:value-type="float">
            <text:p>29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269" calcext:value-type="float">
            <text:p>269</text:p>
          </table:table-cell>
          <table:table-cell table:formula="of:=AVERAGE([.M588:.M595])" office:value-type="float" office:value="287.25" calcext:value-type="float">
            <text:p>28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287" calcext:value-type="float">
            <text:p>287</text:p>
          </table:table-cell>
          <table:table-cell table:formula="of:=AVERAGE([.M589:.M596])" office:value-type="float" office:value="279.25" calcext:value-type="float">
            <text:p>27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290" calcext:value-type="float">
            <text:p>290</text:p>
          </table:table-cell>
          <table:table-cell table:formula="of:=AVERAGE([.M590:.M597])" office:value-type="float" office:value="273.625" calcext:value-type="float">
            <text:p>27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268" calcext:value-type="float">
            <text:p>268</text:p>
          </table:table-cell>
          <table:table-cell table:formula="of:=AVERAGE([.M591:.M598])" office:value-type="float" office:value="265.875" calcext:value-type="float">
            <text:p>26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280" calcext:value-type="float">
            <text:p>280</text:p>
          </table:table-cell>
          <table:table-cell table:formula="of:=AVERAGE([.M592:.M599])" office:value-type="float" office:value="260.875" calcext:value-type="float">
            <text:p>26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263" calcext:value-type="float">
            <text:p>263</text:p>
          </table:table-cell>
          <table:table-cell table:formula="of:=AVERAGE([.M593:.M600])" office:value-type="float" office:value="253.75" calcext:value-type="float">
            <text:p>25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237" calcext:value-type="float">
            <text:p>237</text:p>
          </table:table-cell>
          <table:table-cell table:formula="of:=AVERAGE([.M594:.M601])" office:value-type="float" office:value="246.875" calcext:value-type="float">
            <text:p>24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233" calcext:value-type="float">
            <text:p>233</text:p>
          </table:table-cell>
          <table:table-cell table:formula="of:=AVERAGE([.M595:.M602])" office:value-type="float" office:value="242.125" calcext:value-type="float">
            <text:p>24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229" calcext:value-type="float">
            <text:p>229</text:p>
          </table:table-cell>
          <table:table-cell table:formula="of:=AVERAGE([.M596:.M603])" office:value-type="float" office:value="235.5" calcext:value-type="float">
            <text:p>23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230" calcext:value-type="float">
            <text:p>230</text:p>
          </table:table-cell>
          <table:table-cell table:formula="of:=AVERAGE([.M597:.M604])" office:value-type="float" office:value="226.5" calcext:value-type="float">
            <text:p>22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235" calcext:value-type="float">
            <text:p>235</text:p>
          </table:table-cell>
          <table:table-cell table:formula="of:=AVERAGE([.M598:.M605])" office:value-type="float" office:value="222.625" calcext:value-type="float">
            <text:p>2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table:formula="of:=AVERAGE([.M599:.M606])" office:value-type="float" office:value="217.25" calcext:value-type="float">
            <text:p>21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227" calcext:value-type="float">
            <text:p>227</text:p>
          </table:table-cell>
          <table:table-cell table:formula="of:=AVERAGE([.M600:.M607])" office:value-type="float" office:value="208.25" calcext:value-type="float">
            <text:p>20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191" calcext:value-type="float">
            <text:p>191</text:p>
          </table:table-cell>
          <table:table-cell table:formula="of:=AVERAGE([.M601:.M608])" office:value-type="float" office:value="201.375" calcext:value-type="float">
            <text:p>20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206" calcext:value-type="float">
            <text:p>206</text:p>
          </table:table-cell>
          <table:table-cell table:formula="of:=AVERAGE([.M602:.M609])" office:value-type="float" office:value="195.75" calcext:value-type="float">
            <text:p>19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190" calcext:value-type="float">
            <text:p>190</text:p>
          </table:table-cell>
          <table:table-cell table:formula="of:=AVERAGE([.M603:.M610])" office:value-type="float" office:value="189.625" calcext:value-type="float">
            <text:p>18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157" calcext:value-type="float">
            <text:p>157</text:p>
          </table:table-cell>
          <table:table-cell table:formula="of:=AVERAGE([.M604:.M611])" office:value-type="float" office:value="182.5" calcext:value-type="float">
            <text:p>18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175" calcext:value-type="float">
            <text:p>175</text:p>
          </table:table-cell>
          <table:table-cell table:formula="of:=AVERAGE([.M605:.M612])" office:value-type="float" office:value="178" calcext:value-type="float">
            <text:p>17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190" calcext:value-type="float">
            <text:p>190</text:p>
          </table:table-cell>
          <table:table-cell table:formula="of:=AVERAGE([.M606:.M613])" office:value-type="float" office:value="176.75" calcext:value-type="float">
            <text:p>17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81" calcext:value-type="float">
            <text:p>181</text:p>
          </table:table-cell>
          <table:table-cell table:formula="of:=AVERAGE([.M607:.M614])" office:value-type="float" office:value="175.625" calcext:value-type="float">
            <text:p>17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70" calcext:value-type="float">
            <text:p>170</text:p>
          </table:table-cell>
          <table:table-cell table:formula="of:=AVERAGE([.M608:.M615])" office:value-type="float" office:value="177.625" calcext:value-type="float">
            <text:p>17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155" calcext:value-type="float">
            <text:p>155</text:p>
          </table:table-cell>
          <table:table-cell table:formula="of:=AVERAGE([.M609:.M616])" office:value-type="float" office:value="176.125" calcext:value-type="float">
            <text:p>17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196" calcext:value-type="float">
            <text:p>196</text:p>
          </table:table-cell>
          <table:table-cell table:formula="of:=AVERAGE([.M610:.M617])" office:value-type="float" office:value="174.875" calcext:value-type="float">
            <text:p>17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181" calcext:value-type="float">
            <text:p>181</text:p>
          </table:table-cell>
          <table:table-cell table:formula="of:=AVERAGE([.M611:.M618])" office:value-type="float" office:value="170" calcext:value-type="float">
            <text:p>17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173" calcext:value-type="float">
            <text:p>173</text:p>
          </table:table-cell>
          <table:table-cell table:formula="of:=AVERAGE([.M612:.M619])" office:value-type="float" office:value="166" calcext:value-type="float">
            <text:p>16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163" calcext:value-type="float">
            <text:p>163</text:p>
          </table:table-cell>
          <table:table-cell table:formula="of:=AVERAGE([.M613:.M620])" office:value-type="float" office:value="164" calcext:value-type="float">
            <text:p>16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80" calcext:value-type="float">
            <text:p>180</text:p>
          </table:table-cell>
          <table:table-cell table:formula="of:=AVERAGE([.M614:.M621])" office:value-type="float" office:value="156.625" calcext:value-type="float">
            <text:p>15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table:formula="of:=AVERAGE([.M615:.M622])" office:value-type="float" office:value="151.375" calcext:value-type="float">
            <text:p>15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formula="of:=AVERAGE([.M616:.M623])" office:value-type="float" office:value="145.625" calcext:value-type="float">
            <text:p>14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139" calcext:value-type="float">
            <text:p>139</text:p>
          </table:table-cell>
          <table:table-cell table:formula="of:=AVERAGE([.M617:.M624])" office:value-type="float" office:value="140.875" calcext:value-type="float">
            <text:p>14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37" calcext:value-type="float">
            <text:p>137</text:p>
          </table:table-cell>
          <table:table-cell table:formula="of:=AVERAGE([.M618:.M625])" office:value-type="float" office:value="135.875" calcext:value-type="float">
            <text:p>13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139" calcext:value-type="float">
            <text:p>139</text:p>
          </table:table-cell>
          <table:table-cell table:formula="of:=AVERAGE([.M619:.M626])" office:value-type="float" office:value="135.625" calcext:value-type="float">
            <text:p>13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27" calcext:value-type="float">
            <text:p>127</text:p>
          </table:table-cell>
          <table:table-cell table:formula="of:=AVERAGE([.M620:.M627])" office:value-type="float" office:value="132.125" calcext:value-type="float">
            <text:p>13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125" calcext:value-type="float">
            <text:p>125</text:p>
          </table:table-cell>
          <table:table-cell table:formula="of:=AVERAGE([.M621:.M628])" office:value-type="float" office:value="129.75" calcext:value-type="float">
            <text:p>12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140" calcext:value-type="float">
            <text:p>140</text:p>
          </table:table-cell>
          <table:table-cell table:formula="of:=AVERAGE([.M622:.M629])" office:value-type="float" office:value="128" calcext:value-type="float">
            <text:p>12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140" calcext:value-type="float">
            <text:p>140</text:p>
          </table:table-cell>
          <table:table-cell table:formula="of:=AVERAGE([.M623:.M630])" office:value-type="float" office:value="121.5" calcext:value-type="float">
            <text:p>12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110" calcext:value-type="float">
            <text:p>110</text:p>
          </table:table-cell>
          <table:table-cell table:formula="of:=AVERAGE([.M624:.M631])" office:value-type="float" office:value="118.75" calcext:value-type="float">
            <text:p>11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120" calcext:value-type="float">
            <text:p>120</text:p>
          </table:table-cell>
          <table:table-cell table:formula="of:=AVERAGE([.M625:.M632])" office:value-type="float" office:value="115.625" calcext:value-type="float">
            <text:p>11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123" calcext:value-type="float">
            <text:p>123</text:p>
          </table:table-cell>
          <table:table-cell table:formula="of:=AVERAGE([.M626:.M633])" office:value-type="float" office:value="109.75" calcext:value-type="float">
            <text:p>10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table:formula="of:=AVERAGE([.M627:.M634])" office:value-type="float" office:value="106.5" calcext:value-type="float">
            <text:p>10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105" calcext:value-type="float">
            <text:p>105</text:p>
          </table:table-cell>
          <table:table-cell table:formula="of:=AVERAGE([.M628:.M635])" office:value-type="float" office:value="103.75" calcext:value-type="float">
            <text:p>10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AVERAGE([.M629:.M636])" office:value-type="float" office:value="100.25" calcext:value-type="float">
            <text:p>10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93" calcext:value-type="float">
            <text:p>93</text:p>
          </table:table-cell>
          <table:table-cell table:formula="of:=AVERAGE([.M630:.M637])" office:value-type="float" office:value="96.625" calcext:value-type="float">
            <text:p>9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114" calcext:value-type="float">
            <text:p>114</text:p>
          </table:table-cell>
          <table:table-cell table:formula="of:=AVERAGE([.M631:.M638])" office:value-type="float" office:value="98.25" calcext:value-type="float">
            <text:p>9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88" calcext:value-type="float">
            <text:p>88</text:p>
          </table:table-cell>
          <table:table-cell table:formula="of:=AVERAGE([.M632:.M639])" office:value-type="float" office:value="96.625" calcext:value-type="float">
            <text:p>9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table:formula="of:=AVERAGE([.M633:.M640])" office:value-type="float" office:value="93.625" calcext:value-type="float">
            <text:p>9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94" calcext:value-type="float">
            <text:p>94</text:p>
          </table:table-cell>
          <table:table-cell table:formula="of:=AVERAGE([.M634:.M641])" office:value-type="float" office:value="92.125" calcext:value-type="float">
            <text:p>9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00" calcext:value-type="float">
            <text:p>100</text:p>
          </table:table-cell>
          <table:table-cell table:formula="of:=AVERAGE([.M635:.M642])" office:value-type="float" office:value="87" calcext:value-type="float">
            <text:p>8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92" calcext:value-type="float">
            <text:p>92</text:p>
          </table:table-cell>
          <table:table-cell table:formula="of:=AVERAGE([.M636:.M643])" office:value-type="float" office:value="85.5" calcext:value-type="float">
            <text:p>8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76" calcext:value-type="float">
            <text:p>76</text:p>
          </table:table-cell>
          <table:table-cell table:formula="of:=AVERAGE([.M637:.M644])" office:value-type="float" office:value="82" calcext:value-type="float">
            <text:p>8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81" calcext:value-type="float">
            <text:p>81</text:p>
          </table:table-cell>
          <table:table-cell table:formula="of:=AVERAGE([.M638:.M645])" office:value-type="float" office:value="79.375" calcext:value-type="float">
            <text:p>79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73" calcext:value-type="float">
            <text:p>73</text:p>
          </table:table-cell>
          <table:table-cell table:formula="of:=AVERAGE([.M639:.M646])" office:value-type="float" office:value="75.25" calcext:value-type="float">
            <text:p>7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76" calcext:value-type="float">
            <text:p>76</text:p>
          </table:table-cell>
          <table:table-cell table:formula="of:=AVERAGE([.M640:.M647])" office:value-type="float" office:value="70.75" calcext:value-type="float">
            <text:p>7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 table:formula="of:=AVERAGE([.M641:.M648])" office:value-type="float" office:value="69.75" calcext:value-type="float">
            <text:p>6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73" calcext:value-type="float">
            <text:p>73</text:p>
          </table:table-cell>
          <table:table-cell table:formula="of:=AVERAGE([.M642:.M649])" office:value-type="float" office:value="67.875" calcext:value-type="float">
            <text:p>6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67" calcext:value-type="float">
            <text:p>67</text:p>
          </table:table-cell>
          <table:table-cell table:formula="of:=AVERAGE([.M643:.M650])" office:value-type="float" office:value="66.625" calcext:value-type="float">
            <text:p>6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56" calcext:value-type="float">
            <text:p>56</text:p>
          </table:table-cell>
          <table:table-cell table:formula="of:=AVERAGE([.M644:.M651])" office:value-type="float" office:value="64.875" calcext:value-type="float">
            <text:p>6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table:formula="of:=AVERAGE([.M645:.M652])" office:value-type="float" office:value="63.625" calcext:value-type="float">
            <text:p>6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66" calcext:value-type="float">
            <text:p>66</text:p>
          </table:table-cell>
          <table:table-cell table:formula="of:=AVERAGE([.M646:.M653])" office:value-type="float" office:value="61.875" calcext:value-type="float">
            <text:p>6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63" calcext:value-type="float">
            <text:p>63</text:p>
          </table:table-cell>
          <table:table-cell table:formula="of:=AVERAGE([.M647:.M654])" office:value-type="float" office:value="58.875" calcext:value-type="float">
            <text:p>5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62" calcext:value-type="float">
            <text:p>62</text:p>
          </table:table-cell>
          <table:table-cell table:formula="of:=AVERAGE([.M648:.M655])" office:value-type="float" office:value="58.25" calcext:value-type="float">
            <text:p>5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54" calcext:value-type="float">
            <text:p>54</text:p>
          </table:table-cell>
          <table:table-cell table:formula="of:=AVERAGE([.M649:.M656])" office:value-type="float" office:value="56.625" calcext:value-type="float">
            <text:p>5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59" calcext:value-type="float">
            <text:p>59</text:p>
          </table:table-cell>
          <table:table-cell table:formula="of:=AVERAGE([.M650:.M657])" office:value-type="float" office:value="55" calcext:value-type="float">
            <text:p>5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43" calcext:value-type="float">
            <text:p>43</text:p>
          </table:table-cell>
          <table:table-cell table:formula="of:=AVERAGE([.M651:.M658])" office:value-type="float" office:value="52.875" calcext:value-type="float">
            <text:p>5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51" calcext:value-type="float">
            <text:p>51</text:p>
          </table:table-cell>
          <table:table-cell table:formula="of:=AVERAGE([.M652:.M659])" office:value-type="float" office:value="50.5" calcext:value-type="float">
            <text:p>5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5" calcext:value-type="float">
            <text:p>55</text:p>
          </table:table-cell>
          <table:table-cell table:formula="of:=AVERAGE([.M653:.M660])" office:value-type="float" office:value="48.25" calcext:value-type="float">
            <text:p>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3" calcext:value-type="float">
            <text:p>53</text:p>
          </table:table-cell>
          <table:table-cell table:formula="of:=AVERAGE([.M654:.M661])" office:value-type="float" office:value="47.625" calcext:value-type="float">
            <text:p>4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46" calcext:value-type="float">
            <text:p>46</text:p>
          </table:table-cell>
          <table:table-cell table:formula="of:=AVERAGE([.M655:.M662])" office:value-type="float" office:value="46.875" calcext:value-type="float">
            <text:p>4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43" calcext:value-type="float">
            <text:p>43</text:p>
          </table:table-cell>
          <table:table-cell table:formula="of:=AVERAGE([.M656:.M663])" office:value-type="float" office:value="45.875" calcext:value-type="float">
            <text:p>4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36" calcext:value-type="float">
            <text:p>36</text:p>
          </table:table-cell>
          <table:table-cell table:formula="of:=AVERAGE([.M657:.M664])" office:value-type="float" office:value="44" calcext:value-type="float">
            <text:p>4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54" calcext:value-type="float">
            <text:p>54</text:p>
          </table:table-cell>
          <table:table-cell table:formula="of:=AVERAGE([.M658:.M665])" office:value-type="float" office:value="42.75" calcext:value-type="float">
            <text:p>4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37" calcext:value-type="float">
            <text:p>37</text:p>
          </table:table-cell>
          <table:table-cell table:formula="of:=AVERAGE([.M659:.M666])" office:value-type="float" office:value="42" calcext:value-type="float">
            <text:p>4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43" calcext:value-type="float">
            <text:p>43</text:p>
          </table:table-cell>
          <table:table-cell table:formula="of:=AVERAGE([.M660:.M667])" office:value-type="float" office:value="41.375" calcext:value-type="float">
            <text:p>4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table:formula="of:=AVERAGE([.M661:.M668])" office:value-type="float" office:value="41.375" calcext:value-type="float">
            <text:p>4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43" calcext:value-type="float">
            <text:p>43</text:p>
          </table:table-cell>
          <table:table-cell table:formula="of:=AVERAGE([.M662:.M669])" office:value-type="float" office:value="38.625" calcext:value-type="float">
            <text:p>38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table:formula="of:=AVERAGE([.M663:.M670])" office:value-type="float" office:value="37.875" calcext:value-type="float">
            <text:p>3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  <table:table-cell table:formula="of:=AVERAGE([.M664:.M671])" office:value-type="float" office:value="36.875" calcext:value-type="float">
            <text:p>3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table:formula="of:=AVERAGE([.M665:.M672])" office:value-type="float" office:value="35" calcext:value-type="float">
            <text:p>3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32" calcext:value-type="float">
            <text:p>32</text:p>
          </table:table-cell>
          <table:table-cell table:formula="of:=AVERAGE([.M666:.M673])" office:value-type="float" office:value="33.375" calcext:value-type="float">
            <text:p>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31" calcext:value-type="float">
            <text:p>31</text:p>
          </table:table-cell>
          <table:table-cell table:formula="of:=AVERAGE([.M667:.M674])" office:value-type="float" office:value="31.875" calcext:value-type="float">
            <text:p>3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35" calcext:value-type="float">
            <text:p>35</text:p>
          </table:table-cell>
          <table:table-cell table:formula="of:=AVERAGE([.M668:.M675])" office:value-type="float" office:value="30" calcext:value-type="float">
            <text:p>3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table:formula="of:=AVERAGE([.M669:.M676])" office:value-type="float" office:value="29.5" calcext:value-type="float">
            <text:p>29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table:formula="of:=AVERAGE([.M670:.M677])" office:value-type="float" office:value="29" calcext:value-type="float">
            <text:p>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table:formula="of:=AVERAGE([.M671:.M678])" office:value-type="float" office:value="28.375" calcext:value-type="float">
            <text:p>2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table:formula="of:=AVERAGE([.M672:.M679])" office:value-type="float" office:value="26.25" calcext:value-type="float">
            <text:p>2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  <table:table-cell table:formula="of:=AVERAGE([.M673:.M680])" office:value-type="float" office:value="25.25" calcext:value-type="float">
            <text:p>2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table:formula="of:=AVERAGE([.M674:.M681])" office:value-type="float" office:value="25" calcext:value-type="float">
            <text:p>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table:formula="of:=AVERAGE([.M675:.M682])" office:value-type="float" office:value="23.5" calcext:value-type="float">
            <text:p>2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8" calcext:value-type="float">
            <text:p>18</text:p>
          </table:table-cell>
          <table:table-cell table:formula="of:=AVERAGE([.M676:.M683])" office:value-type="float" office:value="24" calcext:value-type="float">
            <text:p>2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17" calcext:value-type="float">
            <text:p>17</text:p>
          </table:table-cell>
          <table:table-cell table:formula="of:=AVERAGE([.M677:.M684])" office:value-type="float" office:value="22.75" calcext:value-type="float">
            <text:p>2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AVERAGE([.M678:.M685])" office:value-type="float" office:value="21.375" calcext:value-type="float">
            <text:p>2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table:formula="of:=AVERAGE([.M679:.M686])" office:value-type="float" office:value="21" calcext:value-type="float">
            <text:p>2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7" calcext:value-type="float">
            <text:p>27</text:p>
          </table:table-cell>
          <table:table-cell table:formula="of:=AVERAGE([.M680:.M687])" office:value-type="float" office:value="23" calcext:value-type="float">
            <text:p>23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22" calcext:value-type="float">
            <text:p>22</text:p>
          </table:table-cell>
          <table:table-cell table:formula="of:=AVERAGE([.M681:.M688])" office:value-type="float" office:value="23.75" calcext:value-type="float">
            <text:p>2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17" calcext:value-type="float">
            <text:p>17</text:p>
          </table:table-cell>
          <table:table-cell table:formula="of:=AVERAGE([.M682:.M689])" office:value-type="float" office:value="23.5" calcext:value-type="float">
            <text:p>2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Verify Counting Accuracy" table:style-name="ta1">
        <table:table-column table:style-name="co16" table:default-cell-style-name="Default"/>
        <table:table-column table:style-name="co17" table:default-cell-style-name="Default"/>
        <table:table-column table:style-name="co4" table:number-columns-repeated="1022" table:default-cell-style-name="Default"/>
        <table:table-row table:style-name="ro10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2" draw:text-style-name="P2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/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115" office:value-type="string" calcext:value-type="string">
            <text:p>Source Data</text:p>
          </table:table-cell>
          <table:table-cell table:style-name="ce117" table:number-columns-repeated="3"/>
          <table:table-cell table:style-name="ce118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116" office:value-type="string" calcext:value-type="string">
            <text:p>TotalCount4</text:p>
          </table:table-cell>
          <table:table-cell table:style-name="ce16" office:value-type="string" calcext:value-type="string">
            <text:p>TotalCount6</text:p>
          </table:table-cell>
          <table:table-cell table:style-name="ce16" office:value-type="string" calcext:value-type="string">
            <text:p>TotalCount14</text:p>
          </table:table-cell>
          <table:table-cell table:style-name="ce16" office:value-type="string" calcext:value-type="string">
            <text:p>TotalCount21</text:p>
          </table:table-cell>
          <table:table-cell table:style-name="ce119" office:value-type="string" calcext:value-type="string">
            <text:p>TotalCount25</text:p>
          </table:table-cell>
          <table:table-cell table:style-name="ce16"/>
          <table:table-cell/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/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493492" calcext:value-type="float">
            <text:p>493492</text:p>
          </table:table-cell>
          <table:table-cell office:value-type="float" office:value="148989" calcext:value-type="float">
            <text:p>148989</text:p>
          </table:table-cell>
          <table:table-cell office:value-type="float" office:value="3833" calcext:value-type="float">
            <text:p>3833</text:p>
          </table:table-cell>
          <table:table-cell office:value-type="float" office:value="1112" calcext:value-type="float">
            <text:p>1112</text:p>
          </table:table-cell>
          <table:table-cell office:value-type="float" office:value="619" calcext:value-type="float">
            <text:p>619</text:p>
          </table:table-cell>
          <table:table-cell table:style-name="ce16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485020" calcext:value-type="float">
            <text:p>4850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3037" calcext:value-type="float">
            <text:p>3037</text:p>
          </table:table-cell>
          <table:table-cell office:value-type="float" office:value="892" calcext:value-type="float">
            <text:p>892</text:p>
          </table:table-cell>
          <table:table-cell office:value-type="float" office:value="466" calcext:value-type="float">
            <text:p>466</text:p>
          </table:table-cell>
          <table:table-cell table:style-name="ce16"/>
          <table:table-cell/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/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480652" calcext:value-type="float">
            <text:p>480652</text:p>
          </table:table-cell>
          <table:table-cell office:value-type="float" office:value="138406" calcext:value-type="float">
            <text:p>138406</text:p>
          </table:table-cell>
          <table:table-cell office:value-type="float" office:value="2930" calcext:value-type="float">
            <text:p>2930</text:p>
          </table:table-cell>
          <table:table-cell office:value-type="float" office:value="1035" calcext:value-type="float">
            <text:p>1035</text:p>
          </table:table-cell>
          <table:table-cell office:value-type="float" office:value="621" calcext:value-type="float">
            <text:p>621</text:p>
          </table:table-cell>
          <table:table-cell table:style-name="ce16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473976" calcext:value-type="float">
            <text:p>473976</text:p>
          </table:table-cell>
          <table:table-cell office:value-type="float" office:value="137633" calcext:value-type="float">
            <text:p>137633</text:p>
          </table:table-cell>
          <table:table-cell office:value-type="float" office:value="2715" calcext:value-type="float">
            <text:p>2715</text:p>
          </table:table-cell>
          <table:table-cell office:value-type="float" office:value="836" calcext:value-type="float">
            <text:p>836</text:p>
          </table:table-cell>
          <table:table-cell office:value-type="float" office:value="548" calcext:value-type="float">
            <text:p>548</text:p>
          </table:table-cell>
          <table:table-cell table:style-name="ce16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468082" calcext:value-type="float">
            <text:p>468082</text:p>
          </table:table-cell>
          <table:table-cell office:value-type="float" office:value="137340" calcext:value-type="float">
            <text:p>137340</text:p>
          </table:table-cell>
          <table:table-cell office:value-type="float" office:value="2232" calcext:value-type="float">
            <text:p>2232</text:p>
          </table:table-cell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table:style-name="ce16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175" table:formula="of:=SUM([.A24:.A28])/5/100" office:value-type="float" office:value="4802.444" calcext:value-type="float">
            <text:p>4802.444</text:p>
          </table:table-cell>
          <table:table-cell table:style-name="ce179" table:formula="of:=SUM([.B24:.B28])/5/100" office:value-type="float" office:value="1406.296" calcext:value-type="float">
            <text:p>1406.296</text:p>
          </table:table-cell>
          <table:table-cell table:style-name="ce28" table:formula="of:=SUM([.C24:.C28])/5/100" office:value-type="float" office:value="29.494" calcext:value-type="float">
            <text:p>29.494</text:p>
          </table:table-cell>
          <table:table-cell table:style-name="ce28" table:formula="of:=SUM([.D24:.D28])/5/100" office:value-type="float" office:value="9.612" calcext:value-type="float">
            <text:p>9.612</text:p>
          </table:table-cell>
          <table:table-cell table:style-name="ce28" table:formula="of:=SUM([.E24:.E28])/5/100" office:value-type="float" office:value="5.438" calcext:value-type="float">
            <text:p>5.438</text:p>
          </table:table-cell>
          <table:table-cell table:style-name="ce16" office:value-type="string" calcext:value-type="string">
            <text:p>/ml</text:p>
          </table:table-cell>
          <table:table-cell/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/>
          <table:table-cell table:style-name="ce28" office:value-type="string" calcext:value-type="string">
            <text:p>~Raw Counts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20" office:value-type="string" calcext:value-type="string">
            <text:p>Portion </text:p>
          </table:table-cell>
          <table:table-cell table:style-name="ce122" office:value-type="string" calcext:value-type="string">
            <text:p>&gt;4μm(c)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6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14u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1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5μm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20" table:formula="of:=[.A24]*[.$B$18]" office:value-type="float" office:value="34544.44" calcext:value-type="float">
            <text:p>34544</text:p>
          </table:table-cell>
          <table:table-cell table:style-name="ce21" table:formula="of:=([.B35]-[.B$47])/[.B$47]" office:value-type="percentage" office:value="0.0275851212424341" calcext:value-type="percentage">
            <text:p>2.76%</text:p>
          </table:table-cell>
          <table:table-cell table:style-name="ce20" table:formula="of:=[.B24]*[.$B$18]" office:value-type="float" office:value="10429.23" calcext:value-type="float">
            <text:p>10429</text:p>
          </table:table-cell>
          <table:table-cell table:style-name="ce21" table:formula="of:=([.D35]-[.D$47])/[.D$47]" office:value-type="percentage" office:value="0.0594426777861846" calcext:value-type="percentage">
            <text:p>5.94%</text:p>
          </table:table-cell>
          <table:table-cell table:style-name="ce20" table:formula="of:=[.C24]*[.$B$18]" office:value-type="float" office:value="268.31" calcext:value-type="float">
            <text:p>268</text:p>
          </table:table-cell>
          <table:table-cell table:style-name="ce21" table:formula="of:=([.F35]-[.F$47])/[.F$47]" office:value-type="percentage" office:value="0.299586356547094" calcext:value-type="percentage">
            <text:p>29.96%</text:p>
          </table:table-cell>
          <table:table-cell table:style-name="ce20" table:formula="of:=[.D24]*[.$B$18]" office:value-type="float" office:value="77.84" calcext:value-type="float">
            <text:p>78</text:p>
          </table:table-cell>
          <table:table-cell table:style-name="ce21" table:formula="of:=([.H35]-[.H$47])/[.H$47]" office:value-type="percentage" office:value="0.156887224302955" calcext:value-type="percentage">
            <text:p>15.69%</text:p>
          </table:table-cell>
          <table:table-cell table:style-name="ce20" table:formula="of:=[.E24]*[.$B$18]" office:value-type="float" office:value="43.33" calcext:value-type="float">
            <text:p>43</text:p>
          </table:table-cell>
          <table:table-cell table:style-name="ce21" table:formula="of:=([.J35]-[.J$47])/[.J$47]" office:value-type="percentage" office:value="0.138286134608312" calcext:value-type="percentage">
            <text:p>13.8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20" table:formula="of:=[.A25]*[.$B$18]" office:value-type="float" office:value="33951.4" calcext:value-type="float">
            <text:p>33951</text:p>
          </table:table-cell>
          <table:table-cell table:style-name="ce21" table:formula="of:=([.B36]-[.B$47])/[.B$47]" office:value-type="percentage" office:value="0.00994410346065465" calcext:value-type="percentage">
            <text:p>0.99%</text:p>
          </table:table-cell>
          <table:table-cell table:style-name="ce20" table:formula="of:=[.B25]*[.$B$18]" office:value-type="float" office:value="9854.6" calcext:value-type="float">
            <text:p>9855</text:p>
          </table:table-cell>
          <table:table-cell table:style-name="ce21" table:formula="of:=([.D36]-[.D$47])/[.D$47]" office:value-type="percentage" office:value="0.0010694761273587" calcext:value-type="percentage">
            <text:p>0.11%</text:p>
          </table:table-cell>
          <table:table-cell table:style-name="ce20" table:formula="of:=[.C25]*[.$B$18]" office:value-type="float" office:value="212.59" calcext:value-type="float">
            <text:p>213</text:p>
          </table:table-cell>
          <table:table-cell table:style-name="ce21" table:formula="of:=([.F36]-[.F$47])/[.F$47]" office:value-type="percentage" office:value="0.02970095612667" calcext:value-type="percentage">
            <text:p>2.97%</text:p>
          </table:table-cell>
          <table:table-cell table:style-name="ce20" table:formula="of:=[.D25]*[.$B$18]" office:value-type="float" office:value="62.44" calcext:value-type="float">
            <text:p>62</text:p>
          </table:table-cell>
          <table:table-cell table:style-name="ce21" table:formula="of:=([.H36]-[.H$47])/[.H$47]" office:value-type="percentage" office:value="-0.071993341656263" calcext:value-type="percentage">
            <text:p>-7.20%</text:p>
          </table:table-cell>
          <table:table-cell table:style-name="ce20" table:formula="of:=[.E25]*[.$B$18]" office:value-type="float" office:value="32.62" calcext:value-type="float">
            <text:p>33</text:p>
          </table:table-cell>
          <table:table-cell table:style-name="ce21" table:formula="of:=([.J36]-[.J$47])/[.J$47]" office:value-type="percentage" office:value="-0.14306730415594" calcext:value-type="percentage">
            <text:p>-14.31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20" table:formula="of:=[.A26]*[.$B$18]" office:value-type="float" office:value="33645.64" calcext:value-type="float">
            <text:p>33646</text:p>
          </table:table-cell>
          <table:table-cell table:style-name="ce21" table:formula="of:=([.B37]-[.B$47])/[.B$47]" office:value-type="percentage" office:value="0.000848734519340763" calcext:value-type="percentage">
            <text:p>0.08%</text:p>
          </table:table-cell>
          <table:table-cell table:style-name="ce20" table:formula="of:=[.B26]*[.$B$18]" office:value-type="float" office:value="9688.42" calcext:value-type="float">
            <text:p>9688</text:p>
          </table:table-cell>
          <table:table-cell table:style-name="ce21" table:formula="of:=([.D37]-[.D$47])/[.D$47]" office:value-type="percentage" office:value="-0.0158117494467737" calcext:value-type="percentage">
            <text:p>-1.58%</text:p>
          </table:table-cell>
          <table:table-cell table:style-name="ce20" table:formula="of:=[.C26]*[.$B$18]" office:value-type="float" office:value="205.1" calcext:value-type="float">
            <text:p>205</text:p>
          </table:table-cell>
          <table:table-cell table:style-name="ce21" table:formula="of:=([.F37]-[.F$47])/[.F$47]" office:value-type="percentage" office:value="-0.00657760900522128" calcext:value-type="percentage">
            <text:p>-0.66%</text:p>
          </table:table-cell>
          <table:table-cell table:style-name="ce20" table:formula="of:=[.D26]*[.$B$18]" office:value-type="float" office:value="72.45" calcext:value-type="float">
            <text:p>72</text:p>
          </table:table-cell>
          <table:table-cell table:style-name="ce21" table:formula="of:=([.H37]-[.H$47])/[.H$47]" office:value-type="percentage" office:value="0.0767790262172284" calcext:value-type="percentage">
            <text:p>7.68%</text:p>
          </table:table-cell>
          <table:table-cell table:style-name="ce20" table:formula="of:=[.E26]*[.$B$18]" office:value-type="float" office:value="43.47" calcext:value-type="float">
            <text:p>43</text:p>
          </table:table-cell>
          <table:table-cell table:style-name="ce21" table:formula="of:=([.J37]-[.J$47])/[.J$47]" office:value-type="percentage" office:value="0.141963957337256" calcext:value-type="percentage">
            <text:p>14.2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20" table:formula="of:=[.A27]*[.$B$18]" office:value-type="float" office:value="33178.32" calcext:value-type="float">
            <text:p>33178</text:p>
          </table:table-cell>
          <table:table-cell table:style-name="ce21" table:formula="of:=([.B38]-[.B$47])/[.B$47]" office:value-type="percentage" office:value="-0.0130525207581806" calcext:value-type="percentage">
            <text:p>-1.31%</text:p>
          </table:table-cell>
          <table:table-cell table:style-name="ce20" table:formula="of:=[.B27]*[.$B$18]" office:value-type="float" office:value="9634.31" calcext:value-type="float">
            <text:p>9634</text:p>
          </table:table-cell>
          <table:table-cell table:style-name="ce21" table:formula="of:=([.D38]-[.D$47])/[.D$47]" office:value-type="percentage" office:value="-0.0213084585322008" calcext:value-type="percentage">
            <text:p>-2.13%</text:p>
          </table:table-cell>
          <table:table-cell table:style-name="ce20" table:formula="of:=[.C27]*[.$B$18]" office:value-type="float" office:value="190.05" calcext:value-type="float">
            <text:p>190</text:p>
          </table:table-cell>
          <table:table-cell table:style-name="ce21" table:formula="of:=([.F38]-[.F$47])/[.F$47]" office:value-type="percentage" office:value="-0.0794737912795822" calcext:value-type="percentage">
            <text:p>-7.95%</text:p>
          </table:table-cell>
          <table:table-cell table:style-name="ce20" table:formula="of:=[.D27]*[.$B$18]" office:value-type="float" office:value="58.52" calcext:value-type="float">
            <text:p>59</text:p>
          </table:table-cell>
          <table:table-cell table:style-name="ce21" table:formula="of:=([.H38]-[.H$47])/[.H$47]" office:value-type="percentage" office:value="-0.130253849354973" calcext:value-type="percentage">
            <text:p>-13.03%</text:p>
          </table:table-cell>
          <table:table-cell table:style-name="ce20" table:formula="of:=[.E27]*[.$B$18]" office:value-type="float" office:value="38.36" calcext:value-type="float">
            <text:p>38</text:p>
          </table:table-cell>
          <table:table-cell table:style-name="ce21" table:formula="of:=([.J38]-[.J$47])/[.J$47]" office:value-type="percentage" office:value="0.00772342773078329" calcext:value-type="percentage">
            <text:p>0.77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20" table:formula="of:=[.A28]*[.$B$18]" office:value-type="float" office:value="32765.74" calcext:value-type="float">
            <text:p>32766</text:p>
          </table:table-cell>
          <table:table-cell table:style-name="ce21" table:formula="of:=([.B39]-[.B$47])/[.B$47]" office:value-type="percentage" office:value="-0.0253254384642486" calcext:value-type="percentage">
            <text:p>-2.53%</text:p>
          </table:table-cell>
          <table:table-cell table:style-name="ce20" table:formula="of:=[.B28]*[.$B$18]" office:value-type="float" office:value="9613.8" calcext:value-type="float">
            <text:p>9614</text:p>
          </table:table-cell>
          <table:table-cell table:style-name="ce21" table:formula="of:=([.D39]-[.D$47])/[.D$47]" office:value-type="percentage" office:value="-0.0233919459345684" calcext:value-type="percentage">
            <text:p>-2.34%</text:p>
          </table:table-cell>
          <table:table-cell table:style-name="ce20" table:formula="of:=[.C28]*[.$B$18]" office:value-type="float" office:value="156.24" calcext:value-type="float">
            <text:p>156</text:p>
          </table:table-cell>
          <table:table-cell table:style-name="ce21" table:formula="of:=([.F39]-[.F$47])/[.F$47]" office:value-type="percentage" office:value="-0.24323591238896" calcext:value-type="percentage">
            <text:p>-24.32%</text:p>
          </table:table-cell>
          <table:table-cell table:style-name="ce20" table:formula="of:=[.D28]*[.$B$18]" office:value-type="float" office:value="65.17" calcext:value-type="float">
            <text:p>65</text:p>
          </table:table-cell>
          <table:table-cell table:style-name="ce21" table:formula="of:=([.H39]-[.H$47])/[.H$47]" office:value-type="percentage" office:value="-0.0314190595089472" calcext:value-type="percentage">
            <text:p>-3.14%</text:p>
          </table:table-cell>
          <table:table-cell table:style-name="ce20" table:formula="of:=[.E28]*[.$B$18]" office:value-type="float" office:value="32.55" calcext:value-type="float">
            <text:p>33</text:p>
          </table:table-cell>
          <table:table-cell table:style-name="ce21" table:formula="of:=([.J39]-[.J$47])/[.J$47]" office:value-type="percentage" office:value="-0.144906215520412" calcext:value-type="percentage">
            <text:p>-14.49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style-name="ce20" table:formula="of:=SUM([.B35:.B39])" office:value-type="float" office:value="168085.54" calcext:value-type="float">
            <text:p>168086</text:p>
          </table:table-cell>
          <table:table-cell table:style-name="ce20"/>
          <table:table-cell table:style-name="ce20" table:formula="of:=SUM([.D35:.D39])" office:value-type="float" office:value="49220.36" calcext:value-type="float">
            <text:p>49220</text:p>
          </table:table-cell>
          <table:table-cell table:style-name="ce20"/>
          <table:table-cell table:style-name="ce20" table:formula="of:=SUM([.F35:.F39])" office:value-type="float" office:value="1032.29" calcext:value-type="float">
            <text:p>1032</text:p>
          </table:table-cell>
          <table:table-cell table:style-name="ce20"/>
          <table:table-cell table:style-name="ce20" table:formula="of:=SUM([.H35:.H39])" office:value-type="float" office:value="336.42" calcext:value-type="float">
            <text:p>336</text:p>
          </table:table-cell>
          <table:table-cell table:style-name="ce20"/>
          <table:table-cell table:style-name="ce20" table:formula="of:=SUM([.J35:.J39])" office:value-type="float" office:value="190.33" calcext:value-type="float">
            <text:p>190</text:p>
          </table:table-cell>
          <table:table-cell table:number-columns-repeated="1014"/>
        </table:table-row>
        <table:table-row table:style-name="ro2">
          <table:table-cell table:style-name="ce121" office:value-type="string" calcext:value-type="string">
            <text:p>X /ml</text:p>
          </table:table-cell>
          <table:table-cell table:style-name="ce20" table:formula="of:=[.B44]/[.$B$19]" office:value-type="float" office:value="4802.444" calcext:value-type="float">
            <text:p>4802</text:p>
          </table:table-cell>
          <table:table-cell table:style-name="ce20"/>
          <table:table-cell table:style-name="ce20" table:formula="of:=[.D44]/[.$B$19]" office:value-type="float" office:value="1406.296" calcext:value-type="float">
            <text:p>1406</text:p>
          </table:table-cell>
          <table:table-cell table:style-name="ce20"/>
          <table:table-cell table:style-name="ce20" table:formula="of:=[.F44]/[.$B$19]" office:value-type="float" office:value="29.494" calcext:value-type="float">
            <text:p>29</text:p>
          </table:table-cell>
          <table:table-cell table:style-name="ce20"/>
          <table:table-cell table:style-name="ce20" table:formula="of:=[.H44]/[.$B$19]" office:value-type="float" office:value="9.612" calcext:value-type="float">
            <text:p>10</text:p>
          </table:table-cell>
          <table:table-cell table:style-name="ce20"/>
          <table:table-cell table:style-name="ce20" table:formula="of:=[.J44]/[.$B$19]" office:value-type="float" office:value="5.438" calcext:value-type="float">
            <text:p>5</text:p>
          </table:table-cell>
          <table:table-cell table:number-columns-repeated="2"/>
          <table:table-cell table:style-name="ce2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20" table:formula="of:=AVERAGE([.B35:.B39])" office:value-type="float" office:value="33617.108" calcext:value-type="float">
            <text:p>33617</text:p>
          </table:table-cell>
          <table:table-cell/>
          <table:table-cell table:style-name="ce20" table:formula="of:=AVERAGE([.D35:.D39])" office:value-type="float" office:value="9844.072" calcext:value-type="float">
            <text:p>9844</text:p>
          </table:table-cell>
          <table:table-cell/>
          <table:table-cell table:style-name="ce20" table:formula="of:=AVERAGE([.F35:.F39])" office:value-type="float" office:value="206.458" calcext:value-type="float">
            <text:p>206</text:p>
          </table:table-cell>
          <table:table-cell/>
          <table:table-cell table:style-name="ce20" table:formula="of:=AVERAGE([.H35:.H39])" office:value-type="float" office:value="67.284" calcext:value-type="float">
            <text:p>67</text:p>
          </table:table-cell>
          <table:table-cell/>
          <table:table-cell table:style-name="ce20" table:formula="of:=AVERAGE([.J35:.J39])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20" table:formula="of:=STDEVP([.B35:.B39])" office:value-type="float" office:value="614.796264608041" calcext:value-type="float">
            <text:p>615</text:p>
          </table:table-cell>
          <table:table-cell/>
          <table:table-cell table:style-name="ce20" table:formula="of:=STDEVP([.D35:.D39])" office:value-type="float" office:value="304.556582421067" calcext:value-type="float">
            <text:p>305</text:p>
          </table:table-cell>
          <table:table-cell/>
          <table:table-cell table:style-name="ce20" table:formula="of:=STDEVP([.F35:.F39])" office:value-type="float" office:value="36.4861219643853" calcext:value-type="float">
            <text:p>36</text:p>
          </table:table-cell>
          <table:table-cell/>
          <table:table-cell table:style-name="ce20" table:formula="of:=STDEVP([.H35:.H39])" office:value-type="float" office:value="6.9693288055594" calcext:value-type="float">
            <text:p>7</text:p>
          </table:table-cell>
          <table:table-cell/>
          <table:table-cell table:style-name="ce20" table:formula="of:=STDEVP([.J35:.J39])" office:value-type="float" office:value="4.83910156950647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20" table:formula="of:=[.B45]*[.$B$20]" office:value-type="float" office:value="33617.108" calcext:value-type="float">
            <text:p>33617</text:p>
          </table:table-cell>
          <table:table-cell table:style-name="ce20"/>
          <table:table-cell table:style-name="ce20" table:formula="of:=[.D45]*[.$B$20]" office:value-type="float" office:value="9844.072" calcext:value-type="float">
            <text:p>9844</text:p>
          </table:table-cell>
          <table:table-cell table:style-name="ce20"/>
          <table:table-cell table:style-name="ce20" table:formula="of:=[.F45]*[.$B$20]" office:value-type="float" office:value="206.458" calcext:value-type="float">
            <text:p>206</text:p>
          </table:table-cell>
          <table:table-cell table:style-name="ce20"/>
          <table:table-cell table:style-name="ce20" table:formula="of:=[.H45]*[.$B$20]" office:value-type="float" office:value="67.284" calcext:value-type="float">
            <text:p>67</text:p>
          </table:table-cell>
          <table:table-cell table:style-name="ce20"/>
          <table:table-cell table:style-name="ce20" table:formula="of:=[.J45]*[.$B$20]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formula="of:=[.$B$14]*[.B49]" office:value-type="float" office:value="168085.54" calcext:value-type="float">
            <text:p>168085.54</text:p>
          </table:table-cell>
          <table:table-cell/>
          <table:table-cell table:formula="of:=[.$B$14]*[.D49]" office:value-type="float" office:value="49220.36" calcext:value-type="float">
            <text:p>49220.36</text:p>
          </table:table-cell>
          <table:table-cell/>
          <table:table-cell table:formula="of:=[.$B$14]*[.F49]" office:value-type="float" office:value="1032.29" calcext:value-type="float">
            <text:p>1032.29</text:p>
          </table:table-cell>
          <table:table-cell/>
          <table:table-cell table:formula="of:=[.$B$14]*[.H49]" office:value-type="float" office:value="336.42" calcext:value-type="float">
            <text:p>336.42</text:p>
          </table:table-cell>
          <table:table-cell/>
          <table:table-cell table:formula="of:=[.$B$14]*[.J49]" office:value-type="float" office:value="190.33" calcext:value-type="float">
            <text:p>190.33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21" table:formula="of:=[.B48]/[.B47]" office:value-type="percentage" office:value="0.0182881961353737" calcext:value-type="percentage">
            <text:p>1.83%</text:p>
          </table:table-cell>
          <table:table-cell/>
          <table:table-cell table:style-name="ce21" table:formula="of:=[.D48]/[.D47]" office:value-type="percentage" office:value="0.0309380693701821" calcext:value-type="percentage">
            <text:p>3.09%</text:p>
          </table:table-cell>
          <table:table-cell/>
          <table:table-cell table:style-name="ce21" table:formula="of:=[.F48]/[.F47]" office:value-type="percentage" office:value="0.176724185860491" calcext:value-type="percentage">
            <text:p>17.67%</text:p>
          </table:table-cell>
          <table:table-cell/>
          <table:table-cell table:style-name="ce21" table:formula="of:=[.H48]/[.H47]" office:value-type="percentage" office:value="0.103580774115085" calcext:value-type="percentage">
            <text:p>10.36%</text:p>
          </table:table-cell>
          <table:table-cell/>
          <table:table-cell table:style-name="ce21" table:formula="of:=[.J48]/[.J47]" office:value-type="percentage" office:value="0.127123983857155" calcext:value-type="percentage">
            <text:p>12.71%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D<text:span text:style-name="T7">Q</text:span></text:p>
          </table:table-cell>
          <table:table-cell table:style-name="ce181" table:formula="of:=(MAX([.B35:.B39])-MIN([.B35:.B39]))/[.B47]" office:value-type="percentage" office:value="0.0529105597066827" calcext:value-type="percentage">
            <text:p>5.29%</text:p>
          </table:table-cell>
          <table:table-cell/>
          <table:table-cell table:style-name="ce181" table:formula="of:=(MAX([.D35:.D39])-MIN([.D35:.D39]))/[.D47]" office:value-type="percentage" office:value="0.082834623720753" calcext:value-type="percentage">
            <text:p>8.28%</text:p>
          </table:table-cell>
          <table:table-cell/>
          <table:table-cell table:style-name="ce123" table:formula="of:=(MAX([.F35:.F39])-MIN([.F35:.F39]))/[.F47]" office:value-type="percentage" office:value="0.542822268936055" calcext:value-type="percentage">
            <text:p>54.28%</text:p>
          </table:table-cell>
          <table:table-cell/>
          <table:table-cell table:style-name="ce123" table:formula="of:=(MAX([.H35:.H39])-MIN([.H35:.H39]))/[.H47]" office:value-type="percentage" office:value="0.287141073657928" calcext:value-type="percentage">
            <text:p>28.71%</text:p>
          </table:table-cell>
          <table:table-cell/>
          <table:table-cell table:style-name="ce123" table:formula="of:=(MAX([.J35:.J39])-MIN([.J35:.J39]))/[.J47]" office:value-type="percentage" office:value="0.286870172857668" calcext:value-type="percentage">
            <text:p>28.69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7">QMAX</text:span>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8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J$23],[.$K$23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J$25],[.$K$25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</calcext:conditional-formats>
      </table:table>
      <table:table table:name="Interpolated Thresholds" table:style-name="ta1">
        <table:table-column table:style-name="co4" table:number-columns-repeated="10" table:default-cell-style-name="Default"/>
        <table:table-column table:style-name="co18" table:default-cell-style-name="Default"/>
        <table:table-column table:style-name="co4" table:number-columns-repeated="29" table:default-cell-style-name="Default"/>
        <table:table-row table:style-name="ro11">
          <table:table-cell/>
          <table:table-cell table:style-name="ce293" table:number-columns-repeated="4"/>
          <table:table-cell table:style-name="ce293" office:value-type="string" calcext:value-type="string" table:number-columns-spanned="5" table:number-rows-spanned="1">
            <text:p>Enter all of the threshold  settings determined in 6.3 in column A <text:span text:style-name="T14">in order of decreasing value of threshold  setting</text:span><text:span text:style-name="T15">. For each calibration suspension sample, enter the  values of X̅</text:span><text:span text:style-name="T16">N</text:span><text:span text:style-name="T17"> obtained for each threshold setting actually used for a sample in the a</text:span></text:p>
          </table:table-cell>
          <table:covered-table-cell table:style-name="ce293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293"/>
          <table:covered-table-cell/>
          <table:table-cell table:number-columns-repeated="30"/>
        </table:table-row>
        <table:table-row table:style-name="ro11">
          <table:table-cell/>
          <table:table-cell table:style-name="ce210" office:value-type="string" calcext:value-type="string">
            <text:p>X̅<text:span text:style-name="T12">N</text:span><text:span text:style-name="T13"> for First Sample</text:span></text:p>
          </table:table-cell>
          <table:table-cell table:style-name="ce210" office:value-type="string" calcext:value-type="string">
            <text:p>X̅<text:span text:style-name="T12">N</text:span><text:span text:style-name="T13"> for Second Sample</text:span></text:p>
          </table:table-cell>
          <table:table-cell table:style-name="ce210" office:value-type="string" calcext:value-type="string">
            <text:p>X̅<text:span text:style-name="T12">N</text:span><text:span text:style-name="T13"> for Third Sample</text:span></text:p>
          </table:table-cell>
          <table:table-cell table:style-name="ce210" office:value-type="string" calcext:value-type="string">
            <text:p>Mean X̅<text:span text:style-name="T12">N</text:span><text:span text:style-name="T13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 table:number-columns-repeated="31"/>
        </table:table-row>
        <table:table-row table:style-name="ro12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number-columns-repeated="3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table:style-name="ce211" office:value-type="float" office:value="12.7008899489725" calcext:value-type="float">
            <text:p>12.7008899489725</text:p>
          </table:table-cell>
          <table:table-cell table:style-name="ce212" table:formula="of:=AVERAGE([.B4:.D4])" office:value-type="float" office:value="12.7008899489725" calcext:value-type="float">
            <text:p>12.7008899489725</text:p>
          </table:table-cell>
          <table:table-cell office:value-type="float" office:value="13479" calcext:value-type="float">
            <text:p>13479</text:p>
          </table:table-cell>
          <table:table-cell table:style-name="ce215"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style-name="ce75" table:formula="of:=ASTROS.MONTEZUMA.CALCTOOLS.CALCFUNCTIONS.PYTHON.INTERPOLATIONIMPL.INTERPO([.$H4];[.$E$4:.$E$31];[.$F$4:.$F$31])" office:value-type="float" office:value="227.927509754219" calcext:value-type="float">
            <text:p>22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table:style-name="ce211" office:value-type="float" office:value="20.2221866934826" calcext:value-type="float">
            <text:p>20.2221866934826</text:p>
          </table:table-cell>
          <table:table-cell table:style-name="ce212" table:formula="of:=AVERAGE([.B5:.D5])" office:value-type="float" office:value="20.2221866934826" calcext:value-type="float">
            <text:p>20.2221866934826</text:p>
          </table:table-cell>
          <table:table-cell office:value-type="float" office:value="11372.5256356535" calcext:value-type="float">
            <text:p>11372.5256356535</text:p>
          </table:table-cell>
          <table:table-cell table:style-name="ce215"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style-name="ce20" table:formula="of:=ASTROS.MONTEZUMA.CALCTOOLS.CALCFUNCTIONS.PYTHON.INTERPOLATIONIMPL.INTERPO([.$H5];[.$E$4:.$E$31];[.$F$4:.$F$31])" office:value-type="float" office:value="357.431967081815" calcext:value-type="float">
            <text:p>357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 table:style-name="ce211" office:value-type="float" office:value="30.6345130603433" calcext:value-type="float">
            <text:p>30.6345130603433</text:p>
          </table:table-cell>
          <table:table-cell table:style-name="ce212" table:formula="of:=AVERAGE([.B6:.D6])" office:value-type="float" office:value="30.6345130603433" calcext:value-type="float">
            <text:p>30.6345130603433</text:p>
          </table:table-cell>
          <table:table-cell office:value-type="float" office:value="9595.24737247533" calcext:value-type="float">
            <text:p>9595.24737247533</text:p>
          </table:table-cell>
          <table:table-cell table:style-name="ce215"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style-name="ce75" table:formula="of:=ASTROS.MONTEZUMA.CALCTOOLS.CALCFUNCTIONS.PYTHON.INTERPOLATIONIMPL.INTERPO([.$H6];[.$E$4:.$E$31];[.$F$4:.$F$31])" office:value-type="float" office:value="502.613029885968" calcext:value-type="float">
            <text:p>50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table:style-name="ce211" office:value-type="float" office:value="45.4199444309137" calcext:value-type="float">
            <text:p>45.4199444309137</text:p>
          </table:table-cell>
          <table:table-cell table:style-name="ce212" table:formula="of:=AVERAGE([.B7:.D7])" office:value-type="float" office:value="45.4199444309137" calcext:value-type="float">
            <text:p>45.4199444309137</text:p>
          </table:table-cell>
          <table:table-cell office:value-type="float" office:value="8095.71902395668" calcext:value-type="float">
            <text:p>8095.71902395668</text:p>
          </table:table-cell>
          <table:table-cell table:style-name="ce215"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style-name="ce20" table:formula="of:=ASTROS.MONTEZUMA.CALCTOOLS.CALCFUNCTIONS.PYTHON.INTERPOLATIONIMPL.INTERPO([.$H7];[.$E$4:.$E$31];[.$F$4:.$F$31])" office:value-type="float" office:value="694.495818904564" calcext:value-type="float">
            <text:p>694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 table:style-name="ce211" office:value-type="float" office:value="65.5155806292663" calcext:value-type="float">
            <text:p>65.5155806292663</text:p>
          </table:table-cell>
          <table:table-cell table:style-name="ce212" table:formula="of:=AVERAGE([.B8:.D8])" office:value-type="float" office:value="65.5155806292663" calcext:value-type="float">
            <text:p>65.5155806292663</text:p>
          </table:table-cell>
          <table:table-cell office:value-type="float" office:value="6830.53432294641" calcext:value-type="float">
            <text:p>6830.53432294641</text:p>
          </table:table-cell>
          <table:table-cell table:style-name="ce215"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style-name="ce20" table:formula="of:=ASTROS.MONTEZUMA.CALCTOOLS.CALCFUNCTIONS.PYTHON.INTERPOLATIONIMPL.INTERPO([.$H8];[.$E$4:.$E$31];[.$F$4:.$F$31])" office:value-type="float" office:value="878.454026268708" calcext:value-type="float">
            <text:p>87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table:style-name="ce211" office:value-type="float" office:value="92.9941336052311" calcext:value-type="float">
            <text:p>92.9941336052311</text:p>
          </table:table-cell>
          <table:table-cell table:style-name="ce212" table:formula="of:=AVERAGE([.B9:.D9])" office:value-type="float" office:value="92.9941336052311" calcext:value-type="float">
            <text:p>92.9941336052311</text:p>
          </table:table-cell>
          <table:table-cell office:value-type="float" office:value="5763.07045722374" calcext:value-type="float">
            <text:p>5763.07045722374</text:p>
          </table:table-cell>
          <table:table-cell table:style-name="ce215"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style-name="ce20" table:formula="of:=ASTROS.MONTEZUMA.CALCTOOLS.CALCFUNCTIONS.PYTHON.INTERPOLATIONIMPL.INTERPO([.$H9];[.$E$4:.$E$31];[.$F$4:.$F$31])" office:value-type="float" office:value="1100.67737225456" calcext:value-type="float">
            <text:p>1101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table:style-name="ce211" office:value-type="float" office:value="129.205080736386" calcext:value-type="float">
            <text:p>129.205080736386</text:p>
          </table:table-cell>
          <table:table-cell table:style-name="ce212" table:formula="of:=AVERAGE([.B10:.D10])" office:value-type="float" office:value="129.205080736386" calcext:value-type="float">
            <text:p>129.205080736386</text:p>
          </table:table-cell>
          <table:table-cell office:value-type="float" office:value="4862.427963117" calcext:value-type="float">
            <text:p>4862.427963117</text:p>
          </table:table-cell>
          <table:table-cell table:style-name="ce215"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style-name="ce75" table:formula="of:=ASTROS.MONTEZUMA.CALCTOOLS.CALCFUNCTIONS.PYTHON.INTERPOLATIONIMPL.INTERPO([.$H10];[.$E$4:.$E$31];[.$F$4:.$F$31])" office:value-type="float" office:value="1373.2733076348" calcext:value-type="float">
            <text:p>137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table:style-name="ce211" office:value-type="float" office:value="177.039830295821" calcext:value-type="float">
            <text:p>177.039830295821</text:p>
          </table:table-cell>
          <table:table-cell table:style-name="ce212" table:formula="of:=AVERAGE([.B11:.D11])" office:value-type="float" office:value="177.039830295821" calcext:value-type="float">
            <text:p>177.039830295821</text:p>
          </table:table-cell>
          <table:table-cell office:value-type="float" office:value="4102.5362906793" calcext:value-type="float">
            <text:p>4102.5362906793</text:p>
          </table:table-cell>
          <table:table-cell table:style-name="ce215"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style-name="ce20" table:formula="of:=ASTROS.MONTEZUMA.CALCTOOLS.CALCFUNCTIONS.PYTHON.INTERPOLATIONIMPL.INTERPO([.$H11];[.$E$4:.$E$31];[.$F$4:.$F$31])" office:value-type="float" office:value="1668.33884433893" calcext:value-type="float">
            <text:p>166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table:style-name="ce211" office:value-type="float" office:value="217.59303432236" calcext:value-type="float">
            <text:p>217.59303432236</text:p>
          </table:table-cell>
          <table:table-cell table:style-name="ce212" table:formula="of:=AVERAGE([.B12:.D12])" office:value-type="float" office:value="217.59303432236" calcext:value-type="float">
            <text:p>217.59303432236</text:p>
          </table:table-cell>
          <table:table-cell office:value-type="float" office:value="3461.3991495622" calcext:value-type="float">
            <text:p>3461.3991495622</text:p>
          </table:table-cell>
          <table:table-cell table:style-name="ce215"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style-name="ce20" table:formula="of:=ASTROS.MONTEZUMA.CALCTOOLS.CALCFUNCTIONS.PYTHON.INTERPOLATIONIMPL.INTERPO([.$H12];[.$E$4:.$E$31];[.$F$4:.$F$31])" office:value-type="float" office:value="1969.12617691915" calcext:value-type="float">
            <text:p>1969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table:style-name="ce211" office:value-type="float" office:value="316.919611397039" calcext:value-type="float">
            <text:p>316.919611397039</text:p>
          </table:table-cell>
          <table:table-cell table:style-name="ce212" table:formula="of:=AVERAGE([.B13:.D13])" office:value-type="float" office:value="316.919611397039" calcext:value-type="float">
            <text:p>316.919611397039</text:p>
          </table:table-cell>
          <table:table-cell office:value-type="float" office:value="2920.45779090624" calcext:value-type="float">
            <text:p>2920.45779090624</text:p>
          </table:table-cell>
          <table:table-cell table:style-name="ce215"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style-name="ce20" table:formula="of:=ASTROS.MONTEZUMA.CALCTOOLS.CALCFUNCTIONS.PYTHON.INTERPOLATIONIMPL.INTERPO([.$H13];[.$E$4:.$E$31];[.$F$4:.$F$31])" office:value-type="float" office:value="2285.50417488934" calcext:value-type="float">
            <text:p>2286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 table:style-name="ce211" office:value-type="float" office:value="417.376220349484" calcext:value-type="float">
            <text:p>417.376220349484</text:p>
          </table:table-cell>
          <table:table-cell table:style-name="ce212" table:formula="of:=AVERAGE([.B14:.D14])" office:value-type="float" office:value="417.376220349484" calcext:value-type="float">
            <text:p>417.376220349484</text:p>
          </table:table-cell>
          <table:table-cell office:value-type="float" office:value="2464.05379441539" calcext:value-type="float">
            <text:p>2464.05379441539</text:p>
          </table:table-cell>
          <table:table-cell table:style-name="ce215"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style-name="ce75" table:formula="of:=ASTROS.MONTEZUMA.CALCTOOLS.CALCFUNCTIONS.PYTHON.INTERPOLATIONIMPL.INTERPO([.$H14];[.$E$4:.$E$31];[.$F$4:.$F$31])" office:value-type="float" office:value="2612.51149882367" calcext:value-type="float">
            <text:p>261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 table:style-name="ce211" office:value-type="float" office:value="556.534663099709" calcext:value-type="float">
            <text:p>556.534663099709</text:p>
          </table:table-cell>
          <table:table-cell table:style-name="ce212" table:formula="of:=AVERAGE([.B15:.D15])" office:value-type="float" office:value="556.534663099709" calcext:value-type="float">
            <text:p>556.534663099709</text:p>
          </table:table-cell>
          <table:table-cell office:value-type="float" office:value="2078.97581012079" calcext:value-type="float">
            <text:p>2078.97581012079</text:p>
          </table:table-cell>
          <table:table-cell table:style-name="ce215"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style-name="ce20" table:formula="of:=ASTROS.MONTEZUMA.CALCTOOLS.CALCFUNCTIONS.PYTHON.INTERPOLATIONIMPL.INTERPO([.$H15];[.$E$4:.$E$31];[.$F$4:.$F$31])" office:value-type="float" office:value="2933.09060054917" calcext:value-type="float">
            <text:p>2933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 table:style-name="ce211" office:value-type="float" office:value="740.103284773596" calcext:value-type="float">
            <text:p>740.103284773596</text:p>
          </table:table-cell>
          <table:table-cell table:style-name="ce212" table:formula="of:=AVERAGE([.B16:.D16])" office:value-type="float" office:value="740.103284773596" calcext:value-type="float">
            <text:p>740.103284773596</text:p>
          </table:table-cell>
          <table:table-cell office:value-type="float" office:value="1754.07713454278" calcext:value-type="float">
            <text:p>1754.07713454278</text:p>
          </table:table-cell>
          <table:table-cell table:style-name="ce215"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style-name="ce20" table:formula="of:=ASTROS.MONTEZUMA.CALCTOOLS.CALCFUNCTIONS.PYTHON.INTERPOLATIONIMPL.INTERPO([.$H16];[.$E$4:.$E$31];[.$F$4:.$F$31])" office:value-type="float" office:value="3220.64408903353" calcext:value-type="float">
            <text:p>3221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table:style-name="ce211" office:value-type="float" office:value="983.401142053265" calcext:value-type="float">
            <text:p>983.401142053265</text:p>
          </table:table-cell>
          <table:table-cell table:style-name="ce212" table:formula="of:=AVERAGE([.B17:.D17])" office:value-type="float" office:value="983.401142053265" calcext:value-type="float">
            <text:p>983.401142053265</text:p>
          </table:table-cell>
          <table:table-cell office:value-type="float" office:value="1479.95305137631" calcext:value-type="float">
            <text:p>1479.95305137631</text:p>
          </table:table-cell>
          <table:table-cell table:style-name="ce215"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style-name="ce20" table:formula="of:=ASTROS.MONTEZUMA.CALCTOOLS.CALCFUNCTIONS.PYTHON.INTERPOLATIONIMPL.INTERPO([.$H17];[.$E$4:.$E$31];[.$F$4:.$F$31])" office:value-type="float" office:value="3441.75529419385" calcext:value-type="float">
            <text:p>3442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211" office:value-type="float" office:value="1302.31528577903" calcext:value-type="float">
            <text:p>1302.31528577903</text:p>
          </table:table-cell>
          <table:table-cell table:style-name="ce212" table:formula="of:=AVERAGE([.B18:.D18])" office:value-type="float" office:value="1302.31528577903" calcext:value-type="float">
            <text:p>1302.31528577903</text:p>
          </table:table-cell>
          <table:table-cell office:value-type="float" office:value="1248.66859680545" calcext:value-type="float">
            <text:p>1248.66859680545</text:p>
          </table:table-cell>
          <table:table-cell table:style-name="ce215"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style-name="ce20" table:formula="of:=ASTROS.MONTEZUMA.CALCTOOLS.CALCFUNCTIONS.PYTHON.INTERPOLATIONIMPL.INTERPO([.$H18];[.$E$4:.$E$31];[.$F$4:.$F$31])" office:value-type="float" office:value="3918.19159958695" calcext:value-type="float">
            <text:p>391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table:style-name="ce211" office:value-type="float" office:value="1714.61817841715" calcext:value-type="float">
            <text:p>1714.61817841715</text:p>
          </table:table-cell>
          <table:table-cell table:style-name="ce212" table:formula="of:=AVERAGE([.B19:.D19])" office:value-type="float" office:value="1714.61817841715" calcext:value-type="float">
            <text:p>1714.61817841715</text:p>
          </table:table-cell>
          <table:table-cell office:value-type="float" office:value="1053.52886917467" calcext:value-type="float">
            <text:p>1053.52886917467</text:p>
          </table:table-cell>
          <table:table-cell table:style-name="ce215"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style-name="ce20" table:formula="of:=ASTROS.MONTEZUMA.CALCTOOLS.CALCFUNCTIONS.PYTHON.INTERPOLATIONIMPL.INTERPO([.$H19];[.$E$4:.$E$31];[.$F$4:.$F$31])" office:value-type="float" office:value="4357.34129292906" calcext:value-type="float">
            <text:p>4357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table:style-name="ce211" office:value-type="float" office:value="2233.86638859538" calcext:value-type="float">
            <text:p>2233.86638859538</text:p>
          </table:table-cell>
          <table:table-cell table:style-name="ce212" table:formula="of:=AVERAGE([.B20:.D20])" office:value-type="float" office:value="2233.86638859538" calcext:value-type="float">
            <text:p>2233.86638859538</text:p>
          </table:table-cell>
          <table:table-cell office:value-type="float" office:value="888.885234259955" calcext:value-type="float">
            <text:p>888.885234259955</text:p>
          </table:table-cell>
          <table:table-cell table:style-name="ce215"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style-name="ce20" table:formula="of:=ASTROS.MONTEZUMA.CALCTOOLS.CALCFUNCTIONS.PYTHON.INTERPOLATIONIMPL.INTERPO([.$H20];[.$E$4:.$E$31];[.$F$4:.$F$31])" office:value-type="float" office:value="4748.13115415203" calcext:value-type="float">
            <text:p>4748</text:p>
          </table:table-cell>
          <table:table-cell/>
          <table:table-cell table:style-name="ce237"/>
          <table:table-cell table:number-columns-repeated="29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table:style-name="ce211" office:value-type="float" office:value="2856.22246593567" calcext:value-type="float">
            <text:p>2856.22246593567</text:p>
          </table:table-cell>
          <table:table-cell table:style-name="ce212" table:formula="of:=AVERAGE([.B21:.D21])" office:value-type="float" office:value="2856.22246593567" calcext:value-type="float">
            <text:p>2856.22246593567</text:p>
          </table:table-cell>
          <table:table-cell office:value-type="float" office:value="749.971816438546" calcext:value-type="float">
            <text:p>749.971816438546</text:p>
          </table:table-cell>
          <table:table-cell table:style-name="ce215"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style-name="ce20" table:formula="of:=ASTROS.MONTEZUMA.CALCTOOLS.CALCFUNCTIONS.PYTHON.INTERPOLATIONIMPL.INTERPO([.$H21];[.$E$4:.$E$31];[.$F$4:.$F$31])" office:value-type="float" office:value="5230.66149182241" calcext:value-type="float">
            <text:p>5231</text:p>
          </table:table-cell>
          <table:table-cell table:number-columns-repeated="3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table:style-name="ce211" office:value-type="float" office:value="3581.04319909892" calcext:value-type="float">
            <text:p>3581.04319909892</text:p>
          </table:table-cell>
          <table:table-cell table:style-name="ce212" table:formula="of:=AVERAGE([.B22:.D22])" office:value-type="float" office:value="3581.04319909892" calcext:value-type="float">
            <text:p>3581.04319909892</text:p>
          </table:table-cell>
          <table:table-cell office:value-type="float" office:value="632.76754273054" calcext:value-type="float">
            <text:p>632.76754273054</text:p>
          </table:table-cell>
          <table:table-cell table:style-name="ce215"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style-name="ce20" table:formula="of:=ASTROS.MONTEZUMA.CALCTOOLS.CALCFUNCTIONS.PYTHON.INTERPOLATIONIMPL.INTERPO([.$H22];[.$E$4:.$E$31];[.$F$4:.$F$31])" office:value-type="float" office:value="5705.71870518755" calcext:value-type="float">
            <text:p>5706</text:p>
          </table:table-cell>
          <table:table-cell table:number-columns-repeated="3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211" office:value-type="float" office:value="4392.05725954488" calcext:value-type="float">
            <text:p>4392.05725954488</text:p>
          </table:table-cell>
          <table:table-cell table:style-name="ce212" table:formula="of:=AVERAGE([.B23:.D23])" office:value-type="float" office:value="4392.05725954488" calcext:value-type="float">
            <text:p>4392.05725954488</text:p>
          </table:table-cell>
          <table:table-cell office:value-type="float" office:value="533.879746354515" calcext:value-type="float">
            <text:p>533.879746354515</text:p>
          </table:table-cell>
          <table:table-cell table:style-name="ce215"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style-name="ce20" table:formula="of:=ASTROS.MONTEZUMA.CALCTOOLS.CALCFUNCTIONS.PYTHON.INTERPOLATIONIMPL.INTERPO([.$H23];[.$E$4:.$E$31];[.$F$4:.$F$31])" office:value-type="float" office:value="6306.70286642468" calcext:value-type="float">
            <text:p>6307</text:p>
          </table:table-cell>
          <table:table-cell table:number-columns-repeated="3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table:style-name="ce211" office:value-type="float" office:value="5291.44021376088" calcext:value-type="float">
            <text:p>5291.44021376088</text:p>
          </table:table-cell>
          <table:table-cell table:style-name="ce212" table:formula="of:=AVERAGE([.B24:.D24])" office:value-type="float" office:value="5291.44021376088" calcext:value-type="float">
            <text:p>5291.44021376088</text:p>
          </table:table-cell>
          <table:table-cell office:value-type="float" office:value="450.445960514347" calcext:value-type="float">
            <text:p>450.445960514347</text:p>
          </table:table-cell>
          <table:table-cell table:style-name="ce215"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style-name="ce20" table:formula="of:=ASTROS.MONTEZUMA.CALCTOOLS.CALCFUNCTIONS.PYTHON.INTERPOLATIONIMPL.INTERPO([.$H24];[.$E$4:.$E$31];[.$F$4:.$F$31])" office:value-type="float" office:value="6844.10688722304" calcext:value-type="float">
            <text:p>6844</text:p>
          </table:table-cell>
          <table:table-cell table:number-columns-repeated="3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table:style-name="ce211" office:value-type="float" office:value="6660.42359933335" calcext:value-type="float">
            <text:p>6660.42359933335</text:p>
          </table:table-cell>
          <table:table-cell table:style-name="ce212" table:formula="of:=AVERAGE([.B25:.D25])" office:value-type="float" office:value="6660.42359933335" calcext:value-type="float">
            <text:p>6660.42359933335</text:p>
          </table:table-cell>
          <table:table-cell office:value-type="float" office:value="380.051059679943" calcext:value-type="float">
            <text:p>380.051059679943</text:p>
          </table:table-cell>
          <table:table-cell table:style-name="ce215"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style-name="ce20" table:formula="of:=ASTROS.MONTEZUMA.CALCTOOLS.CALCFUNCTIONS.PYTHON.INTERPOLATIONIMPL.INTERPO([.$H25];[.$E$4:.$E$31];[.$F$4:.$F$31])" office:value-type="float" office:value="7568.12596867968" calcext:value-type="float">
            <text:p>7568</text:p>
          </table:table-cell>
          <table:table-cell table:number-columns-repeated="3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table:style-name="ce211" office:value-type="float" office:value="7870.07780331982" calcext:value-type="float">
            <text:p>7870.07780331982</text:p>
          </table:table-cell>
          <table:table-cell table:style-name="ce212" table:formula="of:=AVERAGE([.B26:.D26])" office:value-type="float" office:value="7870.07780331982" calcext:value-type="float">
            <text:p>7870.07780331982</text:p>
          </table:table-cell>
          <table:table-cell office:value-type="float" office:value="320.657349882588" calcext:value-type="float">
            <text:p>320.657349882588</text:p>
          </table:table-cell>
          <table:table-cell table:style-name="ce215"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style-name="ce20" table:formula="of:=ASTROS.MONTEZUMA.CALCTOOLS.CALCFUNCTIONS.PYTHON.INTERPOLATIONIMPL.INTERPO([.$H26];[.$E$4:.$E$31];[.$F$4:.$F$31])" office:value-type="float" office:value="8178.87722797178" calcext:value-type="float">
            <text:p>8179</text:p>
          </table:table-cell>
          <table:table-cell table:number-columns-repeated="3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table:style-name="ce211" office:value-type="float" office:value="9211.03136156302" calcext:value-type="float">
            <text:p>9211.03136156302</text:p>
          </table:table-cell>
          <table:table-cell table:style-name="ce212" table:formula="of:=AVERAGE([.B27:.D27])" office:value-type="float" office:value="9211.03136156302" calcext:value-type="float">
            <text:p>9211.03136156302</text:p>
          </table:table-cell>
          <table:table-cell office:value-type="float" office:value="270.545584375728" calcext:value-type="float">
            <text:p>270.545584375728</text:p>
          </table:table-cell>
          <table:table-cell table:style-name="ce215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0" table:formula="of:=ASTROS.MONTEZUMA.CALCTOOLS.CALCFUNCTIONS.PYTHON.INTERPOLATIONIMPL.INTERPO([.$H27];[.$E$4:.$E$31];[.$F$4:.$F$31])" office:value-type="float" office:value="8949.66403581735" calcext:value-type="float">
            <text:p>8950</text:p>
          </table:table-cell>
          <table:table-cell table:number-columns-repeated="3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table:style-name="ce211" office:value-type="float" office:value="10734.6889088701" calcext:value-type="float">
            <text:p>10734.6889088701</text:p>
          </table:table-cell>
          <table:table-cell table:style-name="ce212" table:formula="of:=AVERAGE([.B28:.D28])" office:value-type="float" office:value="10734.6889088701" calcext:value-type="float">
            <text:p>10734.6889088701</text:p>
          </table:table-cell>
          <table:table-cell office:value-type="float" office:value="228.265197264323" calcext:value-type="float">
            <text:p>228.265197264323</text:p>
          </table:table-cell>
          <table:table-cell table:style-name="ce215"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style-name="ce20" table:formula="of:=ASTROS.MONTEZUMA.CALCTOOLS.CALCFUNCTIONS.PYTHON.INTERPOLATIONIMPL.INTERPO([.$H28];[.$E$4:.$E$31];[.$F$4:.$F$31])" office:value-type="float" office:value="9588.6057317946" calcext:value-type="float">
            <text:p>9589</text:p>
          </table:table-cell>
          <table:table-cell table:number-columns-repeated="3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table:style-name="ce211" office:value-type="float" office:value="12383.8248895995" calcext:value-type="float">
            <text:p>12383.8248895995</text:p>
          </table:table-cell>
          <table:table-cell table:style-name="ce212" table:formula="of:=AVERAGE([.B29:.D29])" office:value-type="float" office:value="12383.8248895995" calcext:value-type="float">
            <text:p>12383.8248895995</text:p>
          </table:table-cell>
          <table:table-cell office:value-type="float" office:value="192.592314534906" calcext:value-type="float">
            <text:p>192.592314534906</text:p>
          </table:table-cell>
          <table:table-cell table:style-name="ce215"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style-name="ce20" table:formula="of:=ASTROS.MONTEZUMA.CALCTOOLS.CALCFUNCTIONS.PYTHON.INTERPOLATIONIMPL.INTERPO([.$H29];[.$E$4:.$E$31];[.$F$4:.$F$31])" office:value-type="float" office:value="10522.8635067378" calcext:value-type="float">
            <text:p>10523</text:p>
          </table:table-cell>
          <table:table-cell table:number-columns-repeated="3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table:style-name="ce211" office:value-type="float" office:value="14323.1547737773" calcext:value-type="float">
            <text:p>14323.1547737773</text:p>
          </table:table-cell>
          <table:table-cell table:style-name="ce212" table:formula="of:=AVERAGE([.B30:.D30])" office:value-type="float" office:value="14323.1547737773" calcext:value-type="float">
            <text:p>14323.1547737773</text:p>
          </table:table-cell>
          <table:table-cell office:value-type="float" office:value="162.494327047856" calcext:value-type="float">
            <text:p>162.494327047856</text:p>
          </table:table-cell>
          <table:table-cell table:style-name="ce215"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style-name="ce20" table:formula="of:=ASTROS.MONTEZUMA.CALCTOOLS.CALCFUNCTIONS.PYTHON.INTERPOLATIONIMPL.INTERPO([.$H30];[.$E$4:.$E$31];[.$F$4:.$F$31])" office:value-type="float" office:value="11406.7462157248" calcext:value-type="float">
            <text:p>11407</text:p>
          </table:table-cell>
          <table:table-cell table:number-columns-repeated="3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11" office:value-type="float" office:value="16444.2173710842" calcext:value-type="float">
            <text:p>16444.2173710842</text:p>
          </table:table-cell>
          <table:table-cell table:style-name="ce212" table:formula="of:=AVERAGE([.B31:.D31])" office:value-type="float" office:value="16444.2173710842" calcext:value-type="float">
            <text:p>16444.2173710842</text:p>
          </table:table-cell>
          <table:table-cell office:value-type="float" office:value="137.1" calcext:value-type="float">
            <text:p>137.1</text:p>
          </table:table-cell>
          <table:table-cell table:style-name="ce215" table:number-columns-repeated="2"/>
          <table:table-cell table:style-name="ce216" table:formula="of:=cubicspline([.H3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/>
          <table:table-cell table:style-name="ce267"/>
          <table:table-cell table:style-name="ce215" table:number-columns-repeated="2"/>
          <table:table-cell table:style-name="ce216" table:formula="of:=cubicspline([.H3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number-columns-repeated="3" table:style-name="ce211" office:value-type="float" office:value="0" calcext:value-type="float">
            <text:p>0</text:p>
          </table:table-cell>
          <table:table-cell table:style-name="ce212" table:formula="of:=AVERAGE([.B33:.D33])" office:value-type="float" office:value="0" calcext:value-type="float">
            <text:p>0</text:p>
          </table:table-cell>
          <table:table-cell table:style-name="ce267"/>
          <table:table-cell table:style-name="ce215" table:number-columns-repeated="2"/>
          <table:table-cell table:style-name="ce216" table:formula="of:=cubicspline([.H3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4:.D34])" office:value-type="string" office:string-value="" calcext:value-type="error">
            <text:p>#DIV/0!</text:p>
          </table:table-cell>
          <table:table-cell table:style-name="ce267"/>
          <table:table-cell table:style-name="ce215" table:number-columns-repeated="2"/>
          <table:table-cell table:style-name="ce216" table:formula="of:=cubicspline([.H3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5:.D3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6:.D3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7:.D3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8:.D3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9:.D3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0:.D4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1:.D4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2:.D4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 table:number-columns-repeated="28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3:.D4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4:.D4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5:.D4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6:.D4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7:.D4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8:.D4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9:.D4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0:.D5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1:.D5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2:.D5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3:.D5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3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4:.D5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4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5:.D5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6:.D5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7:.D5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8:.D5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9:.D5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0:.D6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1:.D6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2:.D6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3:.D6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3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4:.D6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4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5:.D6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6:.D6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7:.D6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8:.D6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9:.D6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0:.D7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1:.D7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2:.D7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3:.D7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4:.D7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5:.D7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6:.D7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7:.D7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8:.D7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9:.D7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0:.D8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1:.D8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2:.D8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3:.D8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4:.D8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5:.D8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6:.D8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7:.D8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8:.D8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9:.D8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0:.D9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1:.D9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2:.D9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3:.D9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4:.D9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5:.D9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6:.D9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7:.D9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8:.D9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9:.D9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0:.D10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1:.D10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2:.D10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3:.D10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4:.D10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5:.D10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6:.D10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 table:number-rows-repeated="1048469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Calibration Curve" table:style-name="ta1">
        <table:table-column table:style-name="co4" table:number-columns-repeated="2" table:default-cell-style-name="ce220"/>
        <table:table-column table:style-name="co4" table:default-cell-style-name="ce226"/>
        <table:table-column table:style-name="co4" table:default-cell-style-name="ce227"/>
        <table:table-column table:style-name="co4" table:number-columns-repeated="2" table:default-cell-style-name="Default"/>
        <table:table-row table:style-name="ro2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2"/>
        </table:table-row>
        <table:table-row table:style-name="ro13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4">in order of increasing value of particle size</text:span><text:span text:style-name="T15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4">in order of increasing particle size</text:span><text:span text:style-name="T15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3" draw:text-style-name="P2" svg:width="20.292cm" svg:height="11.414cm" svg:x="0.001cm" svg:y="2.997cm">
              <draw:object draw:notify-on-update-of-ranges="'Calibration Curve'.D5:'Calibration Curve'.D34 'Calibration Curve'.C5:'Calibration Curve'.C34 'Calibration Curve'.D5:'Calibration Curve'.D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1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2"/>
        </table:table-row>
        <table:table-row table:style-name="ro2">
          <table:table-cell table:style-name="ce215" office:value-type="float" office:value="4" calcext:value-type="float">
            <text:p>4</text:p>
          </table:table-cell>
          <table:table-cell table:style-name="ce20" office:value-type="float" office:value="227.927509754218" calcext:value-type="float">
            <text:p>228</text:p>
          </table:table-cell>
          <table:table-cell table:style-name="ce215" office:value-type="float" office:value="4" calcext:value-type="float">
            <text:p>4</text:p>
          </table:table-cell>
          <table:table-cell table:style-name="ce313" table:formula="of:=ASTROS.MONTEZUMA.CALCTOOLS.CALCFUNCTIONS.PYTHON.INTERPOLATIONIMPL.INTERPO([.C5];[.A$5:.A$34];[.B$5:.B$34])" office:value-type="float" office:value="227.927509754218" calcext:value-type="float">
            <text:p>228</text:p>
          </table:table-cell>
          <table:table-cell table:number-columns-repeated="2"/>
        </table:table-row>
        <table:table-row table:style-name="ro2">
          <table:table-cell table:style-name="ce215" office:value-type="float" office:value="5" calcext:value-type="float">
            <text:p>5</text:p>
          </table:table-cell>
          <table:table-cell table:style-name="ce20" office:value-type="float" office:value="357.431967081815" calcext:value-type="float">
            <text:p>357</text:p>
          </table:table-cell>
          <table:table-cell table:style-name="ce215" office:value-type="float" office:value="5" calcext:value-type="float">
            <text:p>5</text:p>
          </table:table-cell>
          <table:table-cell table:style-name="ce313" table:formula="of:=ASTROS.MONTEZUMA.CALCTOOLS.CALCFUNCTIONS.PYTHON.INTERPOLATIONIMPL.INTERPO([.C6];[.A$5:.A$34];[.B$5:.B$34])" office:value-type="float" office:value="357.431967081815" calcext:value-type="float">
            <text:p>357</text:p>
          </table:table-cell>
          <table:table-cell table:number-columns-repeated="2"/>
        </table:table-row>
        <table:table-row table:style-name="ro2">
          <table:table-cell table:style-name="ce215" office:value-type="float" office:value="6" calcext:value-type="float">
            <text:p>6</text:p>
          </table:table-cell>
          <table:table-cell table:style-name="ce20" office:value-type="float" office:value="502.613029885968" calcext:value-type="float">
            <text:p>503</text:p>
          </table:table-cell>
          <table:table-cell table:style-name="ce215" office:value-type="float" office:value="6" calcext:value-type="float">
            <text:p>6</text:p>
          </table:table-cell>
          <table:table-cell table:style-name="ce313" table:formula="of:=ASTROS.MONTEZUMA.CALCTOOLS.CALCFUNCTIONS.PYTHON.INTERPOLATIONIMPL.INTERPO([.C7];[.A$5:.A$34];[.B$5:.B$34])" office:value-type="float" office:value="502.613029885968" calcext:value-type="float">
            <text:p>503</text:p>
          </table:table-cell>
          <table:table-cell table:number-columns-repeated="2"/>
        </table:table-row>
        <table:table-row table:style-name="ro2">
          <table:table-cell table:style-name="ce215" office:value-type="float" office:value="7" calcext:value-type="float">
            <text:p>7</text:p>
          </table:table-cell>
          <table:table-cell table:style-name="ce20" office:value-type="float" office:value="694.495818904563" calcext:value-type="float">
            <text:p>694</text:p>
          </table:table-cell>
          <table:table-cell table:style-name="ce215" office:value-type="float" office:value="7" calcext:value-type="float">
            <text:p>7</text:p>
          </table:table-cell>
          <table:table-cell table:style-name="ce313" table:formula="of:=ASTROS.MONTEZUMA.CALCTOOLS.CALCFUNCTIONS.PYTHON.INTERPOLATIONIMPL.INTERPO([.C8];[.A$5:.A$34];[.B$5:.B$34])" office:value-type="float" office:value="694.495818904563" calcext:value-type="float">
            <text:p>694</text:p>
          </table:table-cell>
          <table:table-cell table:number-columns-repeated="2"/>
        </table:table-row>
        <table:table-row table:style-name="ro2">
          <table:table-cell table:style-name="ce215" office:value-type="float" office:value="8" calcext:value-type="float">
            <text:p>8</text:p>
          </table:table-cell>
          <table:table-cell table:style-name="ce20" office:value-type="float" office:value="878.454026268707" calcext:value-type="float">
            <text:p>878</text:p>
          </table:table-cell>
          <table:table-cell table:style-name="ce215" office:value-type="float" office:value="8" calcext:value-type="float">
            <text:p>8</text:p>
          </table:table-cell>
          <table:table-cell table:style-name="ce313" table:formula="of:=ASTROS.MONTEZUMA.CALCTOOLS.CALCFUNCTIONS.PYTHON.INTERPOLATIONIMPL.INTERPO([.C9];[.A$5:.A$34];[.B$5:.B$34])" office:value-type="float" office:value="878.454026268707" calcext:value-type="float">
            <text:p>878</text:p>
          </table:table-cell>
          <table:table-cell table:number-columns-repeated="2"/>
        </table:table-row>
        <table:table-row table:style-name="ro2">
          <table:table-cell table:style-name="ce215" office:value-type="float" office:value="9" calcext:value-type="float">
            <text:p>9</text:p>
          </table:table-cell>
          <table:table-cell table:style-name="ce20" office:value-type="float" office:value="1100.67737225457" calcext:value-type="float">
            <text:p>1101</text:p>
          </table:table-cell>
          <table:table-cell table:style-name="ce215" office:value-type="float" office:value="9" calcext:value-type="float">
            <text:p>9</text:p>
          </table:table-cell>
          <table:table-cell table:style-name="ce313" table:formula="of:=ASTROS.MONTEZUMA.CALCTOOLS.CALCFUNCTIONS.PYTHON.INTERPOLATIONIMPL.INTERPO([.C10];[.A$5:.A$34];[.B$5:.B$34])" office:value-type="float" office:value="1100.67737225457" calcext:value-type="float">
            <text:p>1101</text:p>
          </table:table-cell>
          <table:table-cell table:number-columns-repeated="2"/>
        </table:table-row>
        <table:table-row table:style-name="ro2">
          <table:table-cell table:style-name="ce215" office:value-type="float" office:value="10" calcext:value-type="float">
            <text:p>10</text:p>
          </table:table-cell>
          <table:table-cell table:style-name="ce20" office:value-type="float" office:value="1373.2733076348" calcext:value-type="float">
            <text:p>1373</text:p>
          </table:table-cell>
          <table:table-cell table:style-name="ce215" office:value-type="float" office:value="10" calcext:value-type="float">
            <text:p>10</text:p>
          </table:table-cell>
          <table:table-cell table:style-name="ce313" table:formula="of:=ASTROS.MONTEZUMA.CALCTOOLS.CALCFUNCTIONS.PYTHON.INTERPOLATIONIMPL.INTERPO([.C11];[.A$5:.A$34];[.B$5:.B$34])" office:value-type="float" office:value="1373.2733076348" calcext:value-type="float">
            <text:p>1373</text:p>
          </table:table-cell>
          <table:table-cell table:number-columns-repeated="2"/>
        </table:table-row>
        <table:table-row table:style-name="ro2">
          <table:table-cell table:style-name="ce215" office:value-type="float" office:value="11" calcext:value-type="float">
            <text:p>11</text:p>
          </table:table-cell>
          <table:table-cell table:style-name="ce20" office:value-type="float" office:value="1668.33884433893" calcext:value-type="float">
            <text:p>1668</text:p>
          </table:table-cell>
          <table:table-cell table:style-name="ce215" office:value-type="float" office:value="11" calcext:value-type="float">
            <text:p>11</text:p>
          </table:table-cell>
          <table:table-cell table:style-name="ce313" table:formula="of:=ASTROS.MONTEZUMA.CALCTOOLS.CALCFUNCTIONS.PYTHON.INTERPOLATIONIMPL.INTERPO([.C12];[.A$5:.A$34];[.B$5:.B$34])" office:value-type="float" office:value="1668.33884433893" calcext:value-type="float">
            <text:p>1668</text:p>
          </table:table-cell>
          <table:table-cell table:number-columns-repeated="2"/>
        </table:table-row>
        <table:table-row table:style-name="ro2">
          <table:table-cell table:style-name="ce215" office:value-type="float" office:value="12" calcext:value-type="float">
            <text:p>12</text:p>
          </table:table-cell>
          <table:table-cell table:style-name="ce20" office:value-type="float" office:value="1969.12617691915" calcext:value-type="float">
            <text:p>1969</text:p>
          </table:table-cell>
          <table:table-cell table:style-name="ce215" office:value-type="float" office:value="12" calcext:value-type="float">
            <text:p>12</text:p>
          </table:table-cell>
          <table:table-cell table:style-name="ce313" table:formula="of:=ASTROS.MONTEZUMA.CALCTOOLS.CALCFUNCTIONS.PYTHON.INTERPOLATIONIMPL.INTERPO([.C13];[.A$5:.A$34];[.B$5:.B$34])" office:value-type="float" office:value="1969.12617691915" calcext:value-type="float">
            <text:p>1969</text:p>
          </table:table-cell>
          <table:table-cell table:number-columns-repeated="2"/>
        </table:table-row>
        <table:table-row table:style-name="ro2">
          <table:table-cell table:style-name="ce215" office:value-type="float" office:value="13" calcext:value-type="float">
            <text:p>13</text:p>
          </table:table-cell>
          <table:table-cell table:style-name="ce20" office:value-type="float" office:value="2285.50417488935" calcext:value-type="float">
            <text:p>2286</text:p>
          </table:table-cell>
          <table:table-cell table:style-name="ce215" office:value-type="float" office:value="13" calcext:value-type="float">
            <text:p>13</text:p>
          </table:table-cell>
          <table:table-cell table:style-name="ce313" table:formula="of:=ASTROS.MONTEZUMA.CALCTOOLS.CALCFUNCTIONS.PYTHON.INTERPOLATIONIMPL.INTERPO([.C14];[.A$5:.A$34];[.B$5:.B$34])" office:value-type="float" office:value="2285.50417488935" calcext:value-type="float">
            <text:p>2286</text:p>
          </table:table-cell>
          <table:table-cell table:number-columns-repeated="2"/>
        </table:table-row>
        <table:table-row table:style-name="ro2">
          <table:table-cell table:style-name="ce215" office:value-type="float" office:value="14" calcext:value-type="float">
            <text:p>14</text:p>
          </table:table-cell>
          <table:table-cell table:style-name="ce20" office:value-type="float" office:value="2612.51149882367" calcext:value-type="float">
            <text:p>2613</text:p>
          </table:table-cell>
          <table:table-cell table:style-name="ce215" office:value-type="float" office:value="14" calcext:value-type="float">
            <text:p>14</text:p>
          </table:table-cell>
          <table:table-cell table:style-name="ce313" table:formula="of:=ASTROS.MONTEZUMA.CALCTOOLS.CALCFUNCTIONS.PYTHON.INTERPOLATIONIMPL.INTERPO([.C15];[.A$5:.A$34];[.B$5:.B$34])" office:value-type="float" office:value="2612.51149882367" calcext:value-type="float">
            <text:p>2613</text:p>
          </table:table-cell>
          <table:table-cell table:number-columns-repeated="2"/>
        </table:table-row>
        <table:table-row table:style-name="ro2">
          <table:table-cell table:style-name="ce215" office:value-type="float" office:value="15" calcext:value-type="float">
            <text:p>15</text:p>
          </table:table-cell>
          <table:table-cell table:style-name="ce20" office:value-type="float" office:value="2933.09060054917" calcext:value-type="float">
            <text:p>2933</text:p>
          </table:table-cell>
          <table:table-cell table:style-name="ce215" office:value-type="float" office:value="15" calcext:value-type="float">
            <text:p>15</text:p>
          </table:table-cell>
          <table:table-cell table:style-name="ce313" table:formula="of:=ASTROS.MONTEZUMA.CALCTOOLS.CALCFUNCTIONS.PYTHON.INTERPOLATIONIMPL.INTERPO([.C16];[.A$5:.A$34];[.B$5:.B$34])" office:value-type="float" office:value="2933.09060054917" calcext:value-type="float">
            <text:p>2933</text:p>
          </table:table-cell>
          <table:table-cell table:number-columns-repeated="2"/>
        </table:table-row>
        <table:table-row table:style-name="ro2">
          <table:table-cell table:style-name="ce215" office:value-type="float" office:value="16" calcext:value-type="float">
            <text:p>16</text:p>
          </table:table-cell>
          <table:table-cell table:style-name="ce20" office:value-type="float" office:value="3220.64408903353" calcext:value-type="float">
            <text:p>3221</text:p>
          </table:table-cell>
          <table:table-cell table:style-name="ce215" office:value-type="float" office:value="16" calcext:value-type="float">
            <text:p>16</text:p>
          </table:table-cell>
          <table:table-cell table:style-name="ce313" table:formula="of:=ASTROS.MONTEZUMA.CALCTOOLS.CALCFUNCTIONS.PYTHON.INTERPOLATIONIMPL.INTERPO([.C17];[.A$5:.A$34];[.B$5:.B$34])" office:value-type="float" office:value="3220.64408903353" calcext:value-type="float">
            <text:p>3221</text:p>
          </table:table-cell>
          <table:table-cell table:number-columns-repeated="2"/>
        </table:table-row>
        <table:table-row table:style-name="ro2">
          <table:table-cell table:style-name="ce215" office:value-type="float" office:value="17" calcext:value-type="float">
            <text:p>17</text:p>
          </table:table-cell>
          <table:table-cell table:style-name="ce20" office:value-type="float" office:value="3441.75529419385" calcext:value-type="float">
            <text:p>3442</text:p>
          </table:table-cell>
          <table:table-cell table:style-name="ce215" office:value-type="float" office:value="17" calcext:value-type="float">
            <text:p>17</text:p>
          </table:table-cell>
          <table:table-cell table:style-name="ce313" table:formula="of:=ASTROS.MONTEZUMA.CALCTOOLS.CALCFUNCTIONS.PYTHON.INTERPOLATIONIMPL.INTERPO([.C18];[.A$5:.A$34];[.B$5:.B$34])" office:value-type="float" office:value="3441.75529419385" calcext:value-type="float">
            <text:p>3442</text:p>
          </table:table-cell>
          <table:table-cell table:number-columns-repeated="2"/>
        </table:table-row>
        <table:table-row table:style-name="ro2">
          <table:table-cell table:style-name="ce215" office:value-type="float" office:value="18" calcext:value-type="float">
            <text:p>18</text:p>
          </table:table-cell>
          <table:table-cell table:style-name="ce20" office:value-type="float" office:value="3918.19159958695" calcext:value-type="float">
            <text:p>3918</text:p>
          </table:table-cell>
          <table:table-cell table:style-name="ce215" office:value-type="float" office:value="18" calcext:value-type="float">
            <text:p>18</text:p>
          </table:table-cell>
          <table:table-cell table:style-name="ce313" table:formula="of:=ASTROS.MONTEZUMA.CALCTOOLS.CALCFUNCTIONS.PYTHON.INTERPOLATIONIMPL.INTERPO([.C19];[.A$5:.A$34];[.B$5:.B$34])" office:value-type="float" office:value="3918.19159958695" calcext:value-type="float">
            <text:p>3918</text:p>
          </table:table-cell>
          <table:table-cell table:number-columns-repeated="2"/>
        </table:table-row>
        <table:table-row table:style-name="ro2">
          <table:table-cell table:style-name="ce215" office:value-type="float" office:value="19" calcext:value-type="float">
            <text:p>19</text:p>
          </table:table-cell>
          <table:table-cell table:style-name="ce20" office:value-type="float" office:value="4357.34129292905" calcext:value-type="float">
            <text:p>4357</text:p>
          </table:table-cell>
          <table:table-cell table:style-name="ce215" office:value-type="float" office:value="19" calcext:value-type="float">
            <text:p>19</text:p>
          </table:table-cell>
          <table:table-cell table:style-name="ce313" table:formula="of:=ASTROS.MONTEZUMA.CALCTOOLS.CALCFUNCTIONS.PYTHON.INTERPOLATIONIMPL.INTERPO([.C20];[.A$5:.A$34];[.B$5:.B$34])" office:value-type="float" office:value="4357.34129292905" calcext:value-type="float">
            <text:p>4357</text:p>
          </table:table-cell>
          <table:table-cell table:number-columns-repeated="2"/>
        </table:table-row>
        <table:table-row table:style-name="ro2">
          <table:table-cell table:style-name="ce215" office:value-type="float" office:value="20" calcext:value-type="float">
            <text:p>20</text:p>
          </table:table-cell>
          <table:table-cell table:style-name="ce20" office:value-type="float" office:value="4748.13115415202" calcext:value-type="float">
            <text:p>4748</text:p>
          </table:table-cell>
          <table:table-cell table:style-name="ce215" office:value-type="float" office:value="20" calcext:value-type="float">
            <text:p>20</text:p>
          </table:table-cell>
          <table:table-cell table:style-name="ce313" table:formula="of:=ASTROS.MONTEZUMA.CALCTOOLS.CALCFUNCTIONS.PYTHON.INTERPOLATIONIMPL.INTERPO([.C21];[.A$5:.A$34];[.B$5:.B$34])" office:value-type="float" office:value="4748.13115415202" calcext:value-type="float">
            <text:p>4748</text:p>
          </table:table-cell>
          <table:table-cell table:number-columns-repeated="2"/>
        </table:table-row>
        <table:table-row table:style-name="ro2">
          <table:table-cell table:style-name="ce215" office:value-type="float" office:value="21" calcext:value-type="float">
            <text:p>21</text:p>
          </table:table-cell>
          <table:table-cell table:style-name="ce20" office:value-type="float" office:value="5230.66149182241" calcext:value-type="float">
            <text:p>5231</text:p>
          </table:table-cell>
          <table:table-cell table:style-name="ce215" office:value-type="float" office:value="21" calcext:value-type="float">
            <text:p>21</text:p>
          </table:table-cell>
          <table:table-cell table:style-name="ce313" table:formula="of:=ASTROS.MONTEZUMA.CALCTOOLS.CALCFUNCTIONS.PYTHON.INTERPOLATIONIMPL.INTERPO([.C22];[.A$5:.A$34];[.B$5:.B$34])" office:value-type="float" office:value="5230.66149182241" calcext:value-type="float">
            <text:p>5231</text:p>
          </table:table-cell>
          <table:table-cell table:number-columns-repeated="2"/>
        </table:table-row>
        <table:table-row table:style-name="ro2">
          <table:table-cell table:style-name="ce215" office:value-type="float" office:value="22" calcext:value-type="float">
            <text:p>22</text:p>
          </table:table-cell>
          <table:table-cell table:style-name="ce20" office:value-type="float" office:value="5705.71870518755" calcext:value-type="float">
            <text:p>5706</text:p>
          </table:table-cell>
          <table:table-cell table:style-name="ce215" office:value-type="float" office:value="22" calcext:value-type="float">
            <text:p>22</text:p>
          </table:table-cell>
          <table:table-cell table:style-name="ce313" table:formula="of:=ASTROS.MONTEZUMA.CALCTOOLS.CALCFUNCTIONS.PYTHON.INTERPOLATIONIMPL.INTERPO([.C23];[.A$5:.A$34];[.B$5:.B$34])" office:value-type="float" office:value="5705.71870518755" calcext:value-type="float">
            <text:p>5706</text:p>
          </table:table-cell>
          <table:table-cell table:number-columns-repeated="2"/>
        </table:table-row>
        <table:table-row table:style-name="ro2">
          <table:table-cell table:style-name="ce215" office:value-type="float" office:value="23" calcext:value-type="float">
            <text:p>23</text:p>
          </table:table-cell>
          <table:table-cell table:style-name="ce20" office:value-type="float" office:value="6306.70286642468" calcext:value-type="float">
            <text:p>6307</text:p>
          </table:table-cell>
          <table:table-cell table:style-name="ce215" office:value-type="float" office:value="23" calcext:value-type="float">
            <text:p>23</text:p>
          </table:table-cell>
          <table:table-cell table:style-name="ce313" table:formula="of:=ASTROS.MONTEZUMA.CALCTOOLS.CALCFUNCTIONS.PYTHON.INTERPOLATIONIMPL.INTERPO([.C24];[.A$5:.A$34];[.B$5:.B$34])" office:value-type="float" office:value="6306.70286642468" calcext:value-type="float">
            <text:p>6307</text:p>
          </table:table-cell>
          <table:table-cell table:number-columns-repeated="2"/>
        </table:table-row>
        <table:table-row table:style-name="ro2">
          <table:table-cell table:style-name="ce215" office:value-type="float" office:value="24" calcext:value-type="float">
            <text:p>24</text:p>
          </table:table-cell>
          <table:table-cell table:style-name="ce20" office:value-type="float" office:value="6844.10688722303" calcext:value-type="float">
            <text:p>6844</text:p>
          </table:table-cell>
          <table:table-cell table:style-name="ce215" office:value-type="float" office:value="24" calcext:value-type="float">
            <text:p>24</text:p>
          </table:table-cell>
          <table:table-cell table:style-name="ce313" table:formula="of:=ASTROS.MONTEZUMA.CALCTOOLS.CALCFUNCTIONS.PYTHON.INTERPOLATIONIMPL.INTERPO([.C25];[.A$5:.A$34];[.B$5:.B$34])" office:value-type="float" office:value="6844.10688722303" calcext:value-type="float">
            <text:p>6844</text:p>
          </table:table-cell>
          <table:table-cell table:number-columns-repeated="2"/>
        </table:table-row>
        <table:table-row table:style-name="ro2">
          <table:table-cell table:style-name="ce215" office:value-type="float" office:value="25" calcext:value-type="float">
            <text:p>25</text:p>
          </table:table-cell>
          <table:table-cell table:style-name="ce20" office:value-type="float" office:value="7568.12596867968" calcext:value-type="float">
            <text:p>7568</text:p>
          </table:table-cell>
          <table:table-cell table:style-name="ce215" office:value-type="float" office:value="25" calcext:value-type="float">
            <text:p>25</text:p>
          </table:table-cell>
          <table:table-cell table:style-name="ce313" table:formula="of:=ASTROS.MONTEZUMA.CALCTOOLS.CALCFUNCTIONS.PYTHON.INTERPOLATIONIMPL.INTERPO([.C26];[.A$5:.A$34];[.B$5:.B$34])" office:value-type="float" office:value="7568.12596867968" calcext:value-type="float">
            <text:p>7568</text:p>
          </table:table-cell>
          <table:table-cell table:number-columns-repeated="2"/>
        </table:table-row>
        <table:table-row table:style-name="ro2">
          <table:table-cell table:style-name="ce215" office:value-type="float" office:value="26" calcext:value-type="float">
            <text:p>26</text:p>
          </table:table-cell>
          <table:table-cell table:style-name="ce20" office:value-type="float" office:value="8178.87722797177" calcext:value-type="float">
            <text:p>8179</text:p>
          </table:table-cell>
          <table:table-cell table:style-name="ce215" office:value-type="float" office:value="26" calcext:value-type="float">
            <text:p>26</text:p>
          </table:table-cell>
          <table:table-cell table:style-name="ce313" table:formula="of:=ASTROS.MONTEZUMA.CALCTOOLS.CALCFUNCTIONS.PYTHON.INTERPOLATIONIMPL.INTERPO([.C27];[.A$5:.A$34];[.B$5:.B$34])" office:value-type="float" office:value="8178.87722797177" calcext:value-type="float">
            <text:p>8179</text:p>
          </table:table-cell>
          <table:table-cell table:number-columns-repeated="2"/>
        </table:table-row>
        <table:table-row table:style-name="ro2">
          <table:table-cell table:style-name="ce215" office:value-type="float" office:value="27" calcext:value-type="float">
            <text:p>27</text:p>
          </table:table-cell>
          <table:table-cell table:style-name="ce20" office:value-type="float" office:value="8949.66403581734" calcext:value-type="float">
            <text:p>8950</text:p>
          </table:table-cell>
          <table:table-cell table:style-name="ce215" office:value-type="float" office:value="27" calcext:value-type="float">
            <text:p>27</text:p>
          </table:table-cell>
          <table:table-cell table:style-name="ce313" table:formula="of:=ASTROS.MONTEZUMA.CALCTOOLS.CALCFUNCTIONS.PYTHON.INTERPOLATIONIMPL.INTERPO([.C28];[.A$5:.A$34];[.B$5:.B$34])" office:value-type="float" office:value="8949.66403581734" calcext:value-type="float">
            <text:p>8950</text:p>
          </table:table-cell>
          <table:table-cell table:number-columns-repeated="2"/>
        </table:table-row>
        <table:table-row table:style-name="ro2">
          <table:table-cell table:style-name="ce215" office:value-type="float" office:value="28" calcext:value-type="float">
            <text:p>28</text:p>
          </table:table-cell>
          <table:table-cell table:style-name="ce20" office:value-type="float" office:value="9588.60573179459" calcext:value-type="float">
            <text:p>9589</text:p>
          </table:table-cell>
          <table:table-cell table:style-name="ce215" office:value-type="float" office:value="28" calcext:value-type="float">
            <text:p>28</text:p>
          </table:table-cell>
          <table:table-cell table:style-name="ce313" table:formula="of:=ASTROS.MONTEZUMA.CALCTOOLS.CALCFUNCTIONS.PYTHON.INTERPOLATIONIMPL.INTERPO([.C29];[.A$5:.A$34];[.B$5:.B$34])" office:value-type="float" office:value="9588.60573179459" calcext:value-type="float">
            <text:p>9589</text:p>
          </table:table-cell>
          <table:table-cell table:number-columns-repeated="2"/>
        </table:table-row>
        <table:table-row table:style-name="ro2">
          <table:table-cell table:style-name="ce215" office:value-type="float" office:value="29" calcext:value-type="float">
            <text:p>29</text:p>
          </table:table-cell>
          <table:table-cell table:style-name="ce20" office:value-type="float" office:value="10522.8635067377" calcext:value-type="float">
            <text:p>10523</text:p>
          </table:table-cell>
          <table:table-cell table:style-name="ce215" office:value-type="float" office:value="29" calcext:value-type="float">
            <text:p>29</text:p>
          </table:table-cell>
          <table:table-cell table:style-name="ce313" table:formula="of:=ASTROS.MONTEZUMA.CALCTOOLS.CALCFUNCTIONS.PYTHON.INTERPOLATIONIMPL.INTERPO([.C30];[.A$5:.A$34];[.B$5:.B$34])" office:value-type="float" office:value="10522.8635067377" calcext:value-type="float">
            <text:p>10523</text:p>
          </table:table-cell>
          <table:table-cell table:number-columns-repeated="2"/>
        </table:table-row>
        <table:table-row table:style-name="ro2">
          <table:table-cell table:style-name="ce215" office:value-type="float" office:value="30" calcext:value-type="float">
            <text:p>30</text:p>
          </table:table-cell>
          <table:table-cell table:style-name="ce20" office:value-type="float" office:value="11406.7462157247" calcext:value-type="float">
            <text:p>11407</text:p>
          </table:table-cell>
          <table:table-cell table:style-name="ce215" office:value-type="float" office:value="30" calcext:value-type="float">
            <text:p>30</text:p>
          </table:table-cell>
          <table:table-cell table:style-name="ce313" table:formula="of:=ASTROS.MONTEZUMA.CALCTOOLS.CALCFUNCTIONS.PYTHON.INTERPOLATIONIMPL.INTERPO([.C31];[.A$5:.A$34];[.B$5:.B$34])" office:value-type="float" office:value="11406.7462157247" calcext:value-type="float">
            <text:p>11407</text:p>
          </table:table-cell>
          <table:table-cell table:number-columns-repeated="2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5300" calcext:value-type="float">
            <text:p>25300</text:p>
          </table:table-cell>
          <table:table-cell table:style-name="ce225" office:value-type="float" office:value="38" calcext:value-type="float">
            <text:p>38.0</text:p>
          </table:table-cell>
          <table:table-cell table:style-name="ce313" table:formula="of:=ASTROS.MONTEZUMA.CALCTOOLS.CALCFUNCTIONS.PYTHON.INTERPOLATIONIMPL.INTERPO([.C32];[.A$5:.A$34];[.B$5:.B$34])" office:value-type="float" office:value="23756.3051350805" calcext:value-type="float">
            <text:p>23756</text:p>
          </table:table-cell>
          <table:table-cell table:number-columns-repeated="2"/>
        </table:table-row>
        <table:table-row table:style-name="ro2">
          <table:table-cell office:value-type="float" office:value="49.4" calcext:value-type="float">
            <text:p>49.4</text:p>
          </table:table-cell>
          <table:table-cell office:value-type="float" office:value="36900" calcext:value-type="float">
            <text:p>36900</text:p>
          </table:table-cell>
          <table:table-cell table:style-name="ce225" office:value-type="float" office:value="50" calcext:value-type="float">
            <text:p>50.0</text:p>
          </table:table-cell>
          <table:table-cell table:style-name="ce313" table:formula="of:=ASTROS.MONTEZUMA.CALCTOOLS.CALCFUNCTIONS.PYTHON.INTERPOLATIONIMPL.INTERPO([.C33];[.A$5:.A$34];[.B$5:.B$34])" office:value-type="float" office:value="37442.8078817734" calcext:value-type="float">
            <text:p>37443</text:p>
          </table:table-cell>
          <table:table-cell table:number-columns-repeated="2"/>
        </table:table-row>
        <table:table-row table:style-name="ro2">
          <table:table-cell office:value-type="float" office:value="69.7" calcext:value-type="float">
            <text:p>69.7</text:p>
          </table:table-cell>
          <table:table-cell office:value-type="float" office:value="55265" calcext:value-type="float">
            <text:p>55265</text:p>
          </table:table-cell>
          <table:table-cell table:style-name="ce225" office:value-type="float" office:value="70" calcext:value-type="float">
            <text:p>70.0</text:p>
          </table:table-cell>
          <table:table-cell table:style-name="ce313" table:formula="of:=ASTROS.MONTEZUMA.CALCTOOLS.CALCFUNCTIONS.PYTHON.INTERPOLATIONIMPL.INTERPO([.C34];[.A$5:.A$34];[.B$5:.B$34])" office:value-type="float" office:value="55536.4039408867" calcext:value-type="float">
            <text:p>5553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3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4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5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25"/>
          <table:table-cell table:formula="of:=cubicspline([.C5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5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6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7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8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7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8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99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0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1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2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3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4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5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6];[.$A$5:.$A$107];[.$B$5:.$B$107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ubicspline([.C107];[.$A$5:.$A$107];[.$B$5:.$B$107])" office:value-type="string" office:string-value="" calcext:value-type="error">
            <text:p>#NAME?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14" table:target-range-address="'Interpolated Thresholds'.A4:'Interpolated Thresholds'.F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4:25:14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5-08T15:37:08.702000000</dc:date>
    <meta:editing-duration>P6DT18H20M2S</meta:editing-duration>
    <meta:editing-cycles>278</meta:editing-cycles>
    <meta:generator>LibreOffice/7.6.4.1$Windows_X86_64 LibreOffice_project/e19e193f88cd6c0525a17fb7a176ed8e6a3e2aa1</meta:generator>
    <dc:title>ISO111171:2020</dc:title>
    <meta:document-statistic meta:table-count="16" meta:cell-count="8540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Calibration Curve'.C5:'Calibration Curve'.D34" chart:data-source-has-labels="column" svg:x="1.394cm" svg:y="0.228cm" svg:width="18.494cm" svg:height="10cm">
          <chart:coordinate-region svg:x="2.824cm" svg:y="0.426cm" svg:width="16.866cm" svg:height="9.158cm"/>
          <chart:axis chart:dimension="x" chart:name="primary-x" chart:style-name="ch3" chartooo:axis-type="auto">
            <chart:title svg:x="10.176cm" svg:y="10.456cm" chart:style-name="ch4">
              <text:p>um(c)</text:p>
            </chart:title>
            <chart:categories table:cell-range-address="'Calibration Curve'.D5:'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6.011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Calibration Curve'.D5:'Calibration Curve'.D34" chart:class="chart:scatter">
            <chart:domain table:cell-range-address="'Calibration Curve'.C5:'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27.927509754218">
                <text:p>227.927509754218</text:p>
                <draw:g>
                  <svg:desc>'Calibration Curve'.D5:'Calibration Curve'.D34</svg:desc>
                </draw:g>
              </table:table-cell>
              <table:table-cell office:value-type="float" office:value="4">
                <text:p>4</text:p>
                <draw:g>
                  <svg:desc>'Calibration Curve'.C5:'Calibration Curve'.C34</svg:desc>
                </draw:g>
              </table:table-cell>
              <table:table-cell office:value-type="float" office:value="227.927509754218">
                <text:p>227.927509754218</text:p>
                <draw:g>
                  <svg:desc>'Calibration Curve'.D5:'Calibration Curve'.D34</svg:desc>
                </draw:g>
              </table:table-cell>
            </table:table-row>
            <table:table-row>
              <table:table-cell office:value-type="float" office:value="357.431967081815">
                <text:p>357.431967081815</text:p>
              </table:table-cell>
              <table:table-cell office:value-type="float" office:value="5">
                <text:p>5</text:p>
              </table:table-cell>
              <table:table-cell office:value-type="float" office:value="357.431967081815">
                <text:p>357.431967081815</text:p>
              </table:table-cell>
            </table:table-row>
            <table:table-row>
              <table:table-cell office:value-type="float" office:value="502.613029885968">
                <text:p>502.613029885968</text:p>
              </table:table-cell>
              <table:table-cell office:value-type="float" office:value="6">
                <text:p>6</text:p>
              </table:table-cell>
              <table:table-cell office:value-type="float" office:value="502.613029885968">
                <text:p>502.613029885968</text:p>
              </table:table-cell>
            </table:table-row>
            <table:table-row>
              <table:table-cell office:value-type="float" office:value="694.495818904563">
                <text:p>694.495818904563</text:p>
              </table:table-cell>
              <table:table-cell office:value-type="float" office:value="7">
                <text:p>7</text:p>
              </table:table-cell>
              <table:table-cell office:value-type="float" office:value="694.495818904563">
                <text:p>694.495818904563</text:p>
              </table:table-cell>
            </table:table-row>
            <table:table-row>
              <table:table-cell office:value-type="float" office:value="878.454026268707">
                <text:p>878.454026268707</text:p>
              </table:table-cell>
              <table:table-cell office:value-type="float" office:value="8">
                <text:p>8</text:p>
              </table:table-cell>
              <table:table-cell office:value-type="float" office:value="878.454026268707">
                <text:p>878.454026268707</text:p>
              </table:table-cell>
            </table:table-row>
            <table:table-row>
              <table:table-cell office:value-type="float" office:value="1100.67737225457">
                <text:p>1100.67737225457</text:p>
              </table:table-cell>
              <table:table-cell office:value-type="float" office:value="9">
                <text:p>9</text:p>
              </table:table-cell>
              <table:table-cell office:value-type="float" office:value="1100.67737225457">
                <text:p>1100.67737225457</text:p>
              </table:table-cell>
            </table:table-row>
            <table:table-row>
              <table:table-cell office:value-type="float" office:value="1373.2733076348">
                <text:p>1373.2733076348</text:p>
              </table:table-cell>
              <table:table-cell office:value-type="float" office:value="10">
                <text:p>10</text:p>
              </table:table-cell>
              <table:table-cell office:value-type="float" office:value="1373.2733076348">
                <text:p>1373.2733076348</text:p>
              </table:table-cell>
            </table:table-row>
            <table:table-row>
              <table:table-cell office:value-type="float" office:value="1668.33884433893">
                <text:p>1668.33884433893</text:p>
              </table:table-cell>
              <table:table-cell office:value-type="float" office:value="11">
                <text:p>11</text:p>
              </table:table-cell>
              <table:table-cell office:value-type="float" office:value="1668.33884433893">
                <text:p>1668.33884433893</text:p>
              </table:table-cell>
            </table:table-row>
            <table:table-row>
              <table:table-cell office:value-type="float" office:value="1969.12617691915">
                <text:p>1969.12617691915</text:p>
              </table:table-cell>
              <table:table-cell office:value-type="float" office:value="12">
                <text:p>12</text:p>
              </table:table-cell>
              <table:table-cell office:value-type="float" office:value="1969.12617691915">
                <text:p>1969.12617691915</text:p>
              </table:table-cell>
            </table:table-row>
            <table:table-row>
              <table:table-cell office:value-type="float" office:value="2285.50417488935">
                <text:p>2285.50417488935</text:p>
              </table:table-cell>
              <table:table-cell office:value-type="float" office:value="13">
                <text:p>13</text:p>
              </table:table-cell>
              <table:table-cell office:value-type="float" office:value="2285.50417488935">
                <text:p>2285.50417488935</text:p>
              </table:table-cell>
            </table:table-row>
            <table:table-row>
              <table:table-cell office:value-type="float" office:value="2612.51149882367">
                <text:p>2612.51149882367</text:p>
              </table:table-cell>
              <table:table-cell office:value-type="float" office:value="14">
                <text:p>14</text:p>
              </table:table-cell>
              <table:table-cell office:value-type="float" office:value="2612.51149882367">
                <text:p>2612.51149882367</text:p>
              </table:table-cell>
            </table:table-row>
            <table:table-row>
              <table:table-cell office:value-type="float" office:value="2933.09060054917">
                <text:p>2933.09060054917</text:p>
              </table:table-cell>
              <table:table-cell office:value-type="float" office:value="15">
                <text:p>15</text:p>
              </table:table-cell>
              <table:table-cell office:value-type="float" office:value="2933.09060054917">
                <text:p>2933.09060054917</text:p>
              </table:table-cell>
            </table:table-row>
            <table:table-row>
              <table:table-cell office:value-type="float" office:value="3220.64408903353">
                <text:p>3220.64408903353</text:p>
              </table:table-cell>
              <table:table-cell office:value-type="float" office:value="16">
                <text:p>16</text:p>
              </table:table-cell>
              <table:table-cell office:value-type="float" office:value="3220.64408903353">
                <text:p>3220.64408903353</text:p>
              </table:table-cell>
            </table:table-row>
            <table:table-row>
              <table:table-cell office:value-type="float" office:value="3441.75529419385">
                <text:p>3441.75529419385</text:p>
              </table:table-cell>
              <table:table-cell office:value-type="float" office:value="17">
                <text:p>17</text:p>
              </table:table-cell>
              <table:table-cell office:value-type="float" office:value="3441.75529419385">
                <text:p>3441.75529419385</text:p>
              </table:table-cell>
            </table:table-row>
            <table:table-row>
              <table:table-cell office:value-type="float" office:value="3918.19159958695">
                <text:p>3918.19159958695</text:p>
              </table:table-cell>
              <table:table-cell office:value-type="float" office:value="18">
                <text:p>18</text:p>
              </table:table-cell>
              <table:table-cell office:value-type="float" office:value="3918.19159958695">
                <text:p>3918.19159958695</text:p>
              </table:table-cell>
            </table:table-row>
            <table:table-row>
              <table:table-cell office:value-type="float" office:value="4357.34129292905">
                <text:p>4357.34129292905</text:p>
              </table:table-cell>
              <table:table-cell office:value-type="float" office:value="19">
                <text:p>19</text:p>
              </table:table-cell>
              <table:table-cell office:value-type="float" office:value="4357.34129292905">
                <text:p>4357.34129292905</text:p>
              </table:table-cell>
            </table:table-row>
            <table:table-row>
              <table:table-cell office:value-type="float" office:value="4748.13115415202">
                <text:p>4748.13115415202</text:p>
              </table:table-cell>
              <table:table-cell office:value-type="float" office:value="20">
                <text:p>20</text:p>
              </table:table-cell>
              <table:table-cell office:value-type="float" office:value="4748.13115415202">
                <text:p>4748.13115415202</text:p>
              </table:table-cell>
            </table:table-row>
            <table:table-row>
              <table:table-cell office:value-type="float" office:value="5230.66149182241">
                <text:p>5230.66149182241</text:p>
              </table:table-cell>
              <table:table-cell office:value-type="float" office:value="21">
                <text:p>21</text:p>
              </table:table-cell>
              <table:table-cell office:value-type="float" office:value="5230.66149182241">
                <text:p>5230.66149182241</text:p>
              </table:table-cell>
            </table:table-row>
            <table:table-row>
              <table:table-cell office:value-type="float" office:value="5705.71870518755">
                <text:p>5705.71870518755</text:p>
              </table:table-cell>
              <table:table-cell office:value-type="float" office:value="22">
                <text:p>22</text:p>
              </table:table-cell>
              <table:table-cell office:value-type="float" office:value="5705.71870518755">
                <text:p>5705.71870518755</text:p>
              </table:table-cell>
            </table:table-row>
            <table:table-row>
              <table:table-cell office:value-type="float" office:value="6306.70286642468">
                <text:p>6306.70286642468</text:p>
              </table:table-cell>
              <table:table-cell office:value-type="float" office:value="23">
                <text:p>23</text:p>
              </table:table-cell>
              <table:table-cell office:value-type="float" office:value="6306.70286642468">
                <text:p>6306.70286642468</text:p>
              </table:table-cell>
            </table:table-row>
            <table:table-row>
              <table:table-cell office:value-type="float" office:value="6844.10688722303">
                <text:p>6844.10688722303</text:p>
              </table:table-cell>
              <table:table-cell office:value-type="float" office:value="24">
                <text:p>24</text:p>
              </table:table-cell>
              <table:table-cell office:value-type="float" office:value="6844.10688722303">
                <text:p>6844.10688722303</text:p>
              </table:table-cell>
            </table:table-row>
            <table:table-row>
              <table:table-cell office:value-type="float" office:value="7568.12596867968">
                <text:p>7568.12596867968</text:p>
              </table:table-cell>
              <table:table-cell office:value-type="float" office:value="25">
                <text:p>25</text:p>
              </table:table-cell>
              <table:table-cell office:value-type="float" office:value="7568.12596867968">
                <text:p>7568.12596867968</text:p>
              </table:table-cell>
            </table:table-row>
            <table:table-row>
              <table:table-cell office:value-type="float" office:value="8178.87722797177">
                <text:p>8178.87722797177</text:p>
              </table:table-cell>
              <table:table-cell office:value-type="float" office:value="26">
                <text:p>26</text:p>
              </table:table-cell>
              <table:table-cell office:value-type="float" office:value="8178.87722797177">
                <text:p>8178.87722797177</text:p>
              </table:table-cell>
            </table:table-row>
            <table:table-row>
              <table:table-cell office:value-type="float" office:value="8949.66403581734">
                <text:p>8949.66403581734</text:p>
              </table:table-cell>
              <table:table-cell office:value-type="float" office:value="27">
                <text:p>27</text:p>
              </table:table-cell>
              <table:table-cell office:value-type="float" office:value="8949.66403581734">
                <text:p>8949.66403581734</text:p>
              </table:table-cell>
            </table:table-row>
            <table:table-row>
              <table:table-cell office:value-type="float" office:value="9588.60573179459">
                <text:p>9588.60573179459</text:p>
              </table:table-cell>
              <table:table-cell office:value-type="float" office:value="28">
                <text:p>28</text:p>
              </table:table-cell>
              <table:table-cell office:value-type="float" office:value="9588.60573179459">
                <text:p>9588.60573179459</text:p>
              </table:table-cell>
            </table:table-row>
            <table:table-row>
              <table:table-cell office:value-type="float" office:value="10522.8635067377">
                <text:p>10522.8635067377</text:p>
              </table:table-cell>
              <table:table-cell office:value-type="float" office:value="29">
                <text:p>29</text:p>
              </table:table-cell>
              <table:table-cell office:value-type="float" office:value="10522.8635067377">
                <text:p>10522.8635067377</text:p>
              </table:table-cell>
            </table:table-row>
            <table:table-row>
              <table:table-cell office:value-type="float" office:value="11406.7462157247">
                <text:p>11406.7462157247</text:p>
              </table:table-cell>
              <table:table-cell office:value-type="float" office:value="30">
                <text:p>30</text:p>
              </table:table-cell>
              <table:table-cell office:value-type="float" office:value="11406.7462157247">
                <text:p>11406.7462157247</text:p>
              </table:table-cell>
            </table:table-row>
            <table:table-row>
              <table:table-cell office:value-type="float" office:value="23756.3051350805">
                <text:p>23756.3051350805</text:p>
              </table:table-cell>
              <table:table-cell office:value-type="float" office:value="38">
                <text:p>38</text:p>
              </table:table-cell>
              <table:table-cell office:value-type="float" office:value="23756.3051350805">
                <text:p>23756.3051350805</text:p>
              </table:table-cell>
            </table:table-row>
            <table:table-row>
              <table:table-cell office:value-type="float" office:value="37442.8078817734">
                <text:p>37442.8078817734</text:p>
              </table:table-cell>
              <table:table-cell office:value-type="float" office:value="50">
                <text:p>50</text:p>
              </table:table-cell>
              <table:table-cell office:value-type="float" office:value="37442.8078817734">
                <text:p>37442.8078817734</text:p>
              </table:table-cell>
            </table:table-row>
            <table:table-row>
              <table:table-cell office:value-type="float" office:value="55536.4039408867">
                <text:p>55536.4039408867</text:p>
              </table:table-cell>
              <table:table-cell office:value-type="float" office:value="70">
                <text:p>70</text:p>
              </table:table-cell>
              <table:table-cell office:value-type="float" office:value="55536.4039408867">
                <text:p>55536.4039408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42cm" svg:y="0.413cm" svg:width="14.592cm" svg:height="9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">
                <text:p>6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">
                <text:p>9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">
                <text:p>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">
                <text:p>12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">
                <text:p>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">
                <text:p>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6">
                <text:p>16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">
                <text:p>16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">
                <text:p>1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6">
                <text:p>16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3">
                <text:p>13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">
                <text:p>11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">
                <text:p>1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7">
                <text:p>17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7">
                <text:p>17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6">
                <text:p>16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2">
                <text:p>2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7">
                <text:p>17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6">
                <text:p>16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0">
                <text:p>20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0">
                <text:p>20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1">
                <text:p>31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7">
                <text:p>2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1">
                <text:p>21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7">
                <text:p>2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2">
                <text:p>3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">
                <text:p>30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8">
                <text:p>38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5">
                <text:p>4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46">
                <text:p>46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52">
                <text:p>52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7">
                <text:p>47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62">
                <text:p>6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59">
                <text:p>5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48">
                <text:p>48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62">
                <text:p>62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8">
                <text:p>58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57">
                <text:p>57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65">
                <text:p>65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7">
                <text:p>7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7">
                <text:p>67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81">
                <text:p>81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2">
                <text:p>62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86">
                <text:p>86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7">
                <text:p>77</text:p>
              </table:table-cell>
              <table:table-cell office:value-type="float" office:value="88.375">
                <text:p>88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98">
                <text:p>98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7">
                <text:p>97</text:p>
              </table:table-cell>
              <table:table-cell office:value-type="float" office:value="104.375">
                <text:p>104.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15">
                <text:p>115</text:p>
              </table:table-cell>
              <table:table-cell office:value-type="float" office:value="108.875">
                <text:p>108.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06">
                <text:p>106</text:p>
              </table:table-cell>
              <table:table-cell office:value-type="float" office:value="114.625">
                <text:p>114.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14">
                <text:p>114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27">
                <text:p>127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42">
                <text:p>142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7">
                <text:p>117</text:p>
              </table:table-cell>
              <table:table-cell office:value-type="float" office:value="139.125">
                <text:p>139.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48">
                <text:p>148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43">
                <text:p>143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48">
                <text:p>148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4">
                <text:p>174</text:p>
              </table:table-cell>
              <table:table-cell office:value-type="float" office:value="168.125">
                <text:p>168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81">
                <text:p>181</text:p>
              </table:table-cell>
              <table:table-cell office:value-type="float" office:value="175.875">
                <text:p>175.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1">
                <text:p>181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78">
                <text:p>178</text:p>
              </table:table-cell>
              <table:table-cell office:value-type="float" office:value="190.875">
                <text:p>190.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92">
                <text:p>192</text:p>
              </table:table-cell>
              <table:table-cell office:value-type="float" office:value="196.75">
                <text:p>196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202.375">
                <text:p>202.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18">
                <text:p>218</text:p>
              </table:table-cell>
              <table:table-cell office:value-type="float" office:value="213.625">
                <text:p>213.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93">
                <text:p>193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26">
                <text:p>226</text:p>
              </table:table-cell>
              <table:table-cell office:value-type="float" office:value="232.875">
                <text:p>232.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71">
                <text:p>271</text:p>
              </table:table-cell>
              <table:table-cell office:value-type="float" office:value="240.625">
                <text:p>240.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33">
                <text:p>233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60">
                <text:p>260</text:p>
              </table:table-cell>
              <table:table-cell office:value-type="float" office:value="258.125">
                <text:p>258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41">
                <text:p>241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80">
                <text:p>280</text:p>
              </table:table-cell>
              <table:table-cell office:value-type="float" office:value="268.125">
                <text:p>268.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76">
                <text:p>276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77">
                <text:p>277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00">
                <text:p>300</text:p>
              </table:table-cell>
              <table:table-cell office:value-type="float" office:value="302.125">
                <text:p>302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20">
                <text:p>320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20">
                <text:p>320</text:p>
              </table:table-cell>
              <table:table-cell office:value-type="float" office:value="319.875">
                <text:p>319.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24">
                <text:p>324</text:p>
              </table:table-cell>
              <table:table-cell office:value-type="float" office:value="329.75">
                <text:p>329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22">
                <text:p>322</text:p>
              </table:table-cell>
              <table:table-cell office:value-type="float" office:value="340.75">
                <text:p>340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23">
                <text:p>323</text:p>
              </table:table-cell>
              <table:table-cell office:value-type="float" office:value="350.625">
                <text:p>350.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73">
                <text:p>373</text:p>
              </table:table-cell>
              <table:table-cell office:value-type="float" office:value="361.125">
                <text:p>361.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56">
                <text:p>356</text:p>
              </table:table-cell>
              <table:table-cell office:value-type="float" office:value="371.625">
                <text:p>371.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88">
                <text:p>388</text:p>
              </table:table-cell>
              <table:table-cell office:value-type="float" office:value="381.75">
                <text:p>381.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99">
                <text:p>399</text:p>
              </table:table-cell>
              <table:table-cell office:value-type="float" office:value="392.125">
                <text:p>392.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04">
                <text:p>404</text:p>
              </table:table-cell>
              <table:table-cell office:value-type="float" office:value="394.25">
                <text:p>394.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03">
                <text:p>403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  <table:table-cell office:value-type="float" office:value="424.875">
                <text:p>424.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90">
                <text:p>390</text:p>
              </table:table-cell>
              <table:table-cell office:value-type="float" office:value="433.875">
                <text:p>433.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452">
                <text:p>452</text:p>
              </table:table-cell>
              <table:table-cell office:value-type="float" office:value="445.75">
                <text:p>445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40">
                <text:p>440</text:p>
              </table:table-cell>
              <table:table-cell office:value-type="float" office:value="457.75">
                <text:p>457.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96">
                <text:p>496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76">
                <text:p>476</text:p>
              </table:table-cell>
              <table:table-cell office:value-type="float" office:value="486.625">
                <text:p>486.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03">
                <text:p>503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99">
                <text:p>499</text:p>
              </table:table-cell>
              <table:table-cell office:value-type="float" office:value="508.75">
                <text:p>508.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532">
                <text:p>532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95">
                <text:p>495</text:p>
              </table:table-cell>
              <table:table-cell office:value-type="float" office:value="529.25">
                <text:p>529.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21">
                <text:p>521</text:p>
              </table:table-cell>
              <table:table-cell office:value-type="float" office:value="536.75">
                <text:p>536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68">
                <text:p>568</text:p>
              </table:table-cell>
              <table:table-cell office:value-type="float" office:value="552.375">
                <text:p>552.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68">
                <text:p>568</text:p>
              </table:table-cell>
              <table:table-cell office:value-type="float" office:value="571.875">
                <text:p>571.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563">
                <text:p>563</text:p>
              </table:table-cell>
              <table:table-cell office:value-type="float" office:value="582.125">
                <text:p>582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89">
                <text:p>589</text:p>
              </table:table-cell>
              <table:table-cell office:value-type="float" office:value="589.125">
                <text:p>589.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7">
                <text:p>567</text:p>
              </table:table-cell>
              <table:table-cell office:value-type="float" office:value="599.625">
                <text:p>599.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651">
                <text:p>651</text:p>
              </table:table-cell>
              <table:table-cell office:value-type="float" office:value="611.375">
                <text:p>611.3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603">
                <text:p>603</text:p>
              </table:table-cell>
              <table:table-cell office:value-type="float" office:value="622.625">
                <text:p>622.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604">
                <text:p>604</text:p>
              </table:table-cell>
              <table:table-cell office:value-type="float" office:value="632.375">
                <text:p>632.3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652">
                <text:p>6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662">
                <text:p>662</text:p>
              </table:table-cell>
              <table:table-cell office:value-type="float" office:value="652.625">
                <text:p>652.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653">
                <text:p>653</text:p>
              </table:table-cell>
              <table:table-cell office:value-type="float" office:value="672.25">
                <text:p>672.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667">
                <text:p>667</text:p>
              </table:table-cell>
              <table:table-cell office:value-type="float" office:value="685.875">
                <text:p>685.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676">
                <text:p>676</text:p>
              </table:table-cell>
              <table:table-cell office:value-type="float" office:value="688.375">
                <text:p>688.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760">
                <text:p>7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713">
                <text:p>713</text:p>
              </table:table-cell>
              <table:table-cell office:value-type="float" office:value="733.375">
                <text:p>733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672">
                <text:p>672</text:p>
              </table:table-cell>
              <table:table-cell office:value-type="float" office:value="747.875">
                <text:p>747.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739">
                <text:p>739</text:p>
              </table:table-cell>
              <table:table-cell office:value-type="float" office:value="751.875">
                <text:p>751.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805">
                <text:p>805</text:p>
              </table:table-cell>
              <table:table-cell office:value-type="float" office:value="755.875">
                <text:p>755.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798">
                <text:p>798</text:p>
              </table:table-cell>
              <table:table-cell office:value-type="float" office:value="767.125">
                <text:p>767.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792">
                <text:p>792</text:p>
              </table:table-cell>
              <table:table-cell office:value-type="float" office:value="785.875">
                <text:p>785.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736">
                <text:p>736</text:p>
              </table:table-cell>
              <table:table-cell office:value-type="float" office:value="801.125">
                <text:p>801.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792">
                <text:p>792</text:p>
              </table:table-cell>
              <table:table-cell office:value-type="float" office:value="806.875">
                <text:p>806.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803">
                <text:p>803</text:p>
              </table:table-cell>
              <table:table-cell office:value-type="float" office:value="813.25">
                <text:p>813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822">
                <text:p>822</text:p>
              </table:table-cell>
              <table:table-cell office:value-type="float" office:value="816.875">
                <text:p>816.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861">
                <text:p>861</text:p>
              </table:table-cell>
              <table:table-cell office:value-type="float" office:value="829.5">
                <text:p>829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851">
                <text:p>851</text:p>
              </table:table-cell>
              <table:table-cell office:value-type="float" office:value="841.5">
                <text:p>841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849">
                <text:p>849</text:p>
              </table:table-cell>
              <table:table-cell office:value-type="float" office:value="851.875">
                <text:p>851.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821">
                <text:p>821</text:p>
              </table:table-cell>
              <table:table-cell office:value-type="float" office:value="860.375">
                <text:p>860.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837">
                <text:p>837</text:p>
              </table:table-cell>
              <table:table-cell office:value-type="float" office:value="859.75">
                <text:p>859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888">
                <text:p>888</text:p>
              </table:table-cell>
              <table:table-cell office:value-type="float" office:value="865.375">
                <text:p>865.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886">
                <text:p>886</text:p>
              </table:table-cell>
              <table:table-cell office:value-type="float" office:value="869.75">
                <text:p>869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890">
                <text:p>890</text:p>
              </table:table-cell>
              <table:table-cell office:value-type="float" office:value="877.375">
                <text:p>877.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856">
                <text:p>856</text:p>
              </table:table-cell>
              <table:table-cell office:value-type="float" office:value="884.125">
                <text:p>884.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896">
                <text:p>8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884">
                <text:p>884</text:p>
              </table:table-cell>
              <table:table-cell office:value-type="float" office:value="892.5">
                <text:p>89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882">
                <text:p>882</text:p>
              </table:table-cell>
              <table:table-cell office:value-type="float" office:value="892.375">
                <text:p>892.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891">
                <text:p>891</text:p>
              </table:table-cell>
              <table:table-cell office:value-type="float" office:value="899.25">
                <text:p>899.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951">
                <text:p>95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890">
                <text:p>890</text:p>
              </table:table-cell>
              <table:table-cell office:value-type="float" office:value="905.5">
                <text:p>905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889">
                <text:p>889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911">
                <text:p>911</text:p>
              </table:table-cell>
              <table:table-cell office:value-type="float" office:value="915.875">
                <text:p>915.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974">
                <text:p>974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856">
                <text:p>856</text:p>
              </table:table-cell>
              <table:table-cell office:value-type="float" office:value="915.375">
                <text:p>915.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932">
                <text:p>932</text:p>
              </table:table-cell>
              <table:table-cell office:value-type="float" office:value="928.875">
                <text:p>928.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924">
                <text:p>924</text:p>
              </table:table-cell>
              <table:table-cell office:value-type="float" office:value="938.375">
                <text:p>938.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910">
                <text:p>910</text:p>
              </table:table-cell>
              <table:table-cell office:value-type="float" office:value="934.875">
                <text:p>934.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927">
                <text:p>927</text:p>
              </table:table-cell>
              <table:table-cell office:value-type="float" office:value="949.875">
                <text:p>949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997">
                <text:p>997</text:p>
              </table:table-cell>
              <table:table-cell office:value-type="float" office:value="944.75">
                <text:p>944.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987">
                <text:p>987</text:p>
              </table:table-cell>
              <table:table-cell office:value-type="float" office:value="952.25">
                <text:p>952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946">
                <text:p>946</text:p>
              </table:table-cell>
              <table:table-cell office:value-type="float" office:value="957.375">
                <text:p>957.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976">
                <text:p>976</text:p>
              </table:table-cell>
              <table:table-cell office:value-type="float" office:value="964.5">
                <text:p>964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891">
                <text:p>891</text:p>
              </table:table-cell>
              <table:table-cell office:value-type="float" office:value="961.5">
                <text:p>96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984">
                <text:p>984</text:p>
              </table:table-cell>
              <table:table-cell office:value-type="float" office:value="955.625">
                <text:p>955.6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51">
                <text:p>951</text:p>
              </table:table-cell>
              <table:table-cell office:value-type="float" office:value="961.125">
                <text:p>961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984">
                <text:p>984</text:p>
              </table:table-cell>
              <table:table-cell office:value-type="float" office:value="963.375">
                <text:p>963.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973">
                <text:p>973</text:p>
              </table:table-cell>
              <table:table-cell office:value-type="float" office:value="971.75">
                <text:p>971.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940">
                <text:p>940</text:p>
              </table:table-cell>
              <table:table-cell office:value-type="float" office:value="971.375">
                <text:p>971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990">
                <text:p>990</text:p>
              </table:table-cell>
              <table:table-cell office:value-type="float" office:value="974.5">
                <text:p>974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94">
                <text:p>994</text:p>
              </table:table-cell>
              <table:table-cell office:value-type="float" office:value="970.875">
                <text:p>970.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958">
                <text:p>958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981">
                <text:p>98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976">
                <text:p>976</text:p>
              </table:table-cell>
              <table:table-cell office:value-type="float" office:value="960.25">
                <text:p>960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955">
                <text:p>955</text:p>
              </table:table-cell>
              <table:table-cell office:value-type="float" office:value="956.375">
                <text:p>956.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906">
                <text:p>906</text:p>
              </table:table-cell>
              <table:table-cell office:value-type="float" office:value="953.125">
                <text:p>953.1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976">
                <text:p>976</text:p>
              </table:table-cell>
              <table:table-cell office:value-type="float" office:value="945.25">
                <text:p>945.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936">
                <text:p>936</text:p>
              </table:table-cell>
              <table:table-cell office:value-type="float" office:value="940.125">
                <text:p>940.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963">
                <text:p>963</text:p>
              </table:table-cell>
              <table:table-cell office:value-type="float" office:value="933.375">
                <text:p>933.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932">
                <text:p>932</text:p>
              </table:table-cell>
              <table:table-cell office:value-type="float" office:value="933.875">
                <text:p>933.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918">
                <text:p>91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935">
                <text:p>935</text:p>
              </table:table-cell>
              <table:table-cell office:value-type="float" office:value="936.75">
                <text:p>936.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901">
                <text:p>901</text:p>
              </table:table-cell>
              <table:table-cell office:value-type="float" office:value="932.875">
                <text:p>932.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910">
                <text:p>910</text:p>
              </table:table-cell>
              <table:table-cell office:value-type="float" office:value="930.75">
                <text:p>930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953">
                <text:p>953</text:p>
              </table:table-cell>
              <table:table-cell office:value-type="float" office:value="935.25">
                <text:p>935.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982">
                <text:p>982</text:p>
              </table:table-cell>
              <table:table-cell office:value-type="float" office:value="938.375">
                <text:p>938.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932">
                <text:p>932</text:p>
              </table:table-cell>
              <table:table-cell office:value-type="float" office:value="944.25">
                <text:p>944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915">
                <text:p>915</text:p>
              </table:table-cell>
              <table:table-cell office:value-type="float" office:value="948.25">
                <text:p>948.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954">
                <text:p>954</text:p>
              </table:table-cell>
              <table:table-cell office:value-type="float" office:value="942.75">
                <text:p>942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960">
                <text:p>960</text:p>
              </table:table-cell>
              <table:table-cell office:value-type="float" office:value="943.5">
                <text:p>943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948">
                <text:p>948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942">
                <text:p>942</text:p>
              </table:table-cell>
              <table:table-cell office:value-type="float" office:value="943.75">
                <text:p>943.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909">
                <text:p>90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88">
                <text:p>988</text:p>
              </table:table-cell>
              <table:table-cell office:value-type="float" office:value="931.625">
                <text:p>931.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908">
                <text:p>908</text:p>
              </table:table-cell>
              <table:table-cell office:value-type="float" office:value="926.125">
                <text:p>926.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941">
                <text:p>94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924">
                <text:p>924</text:p>
              </table:table-cell>
              <table:table-cell office:value-type="float" office:value="913.25">
                <text:p>913.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893">
                <text:p>893</text:p>
              </table:table-cell>
              <table:table-cell office:value-type="float" office:value="899.125">
                <text:p>899.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904">
                <text:p>904</text:p>
              </table:table-cell>
              <table:table-cell office:value-type="float" office:value="890.375">
                <text:p>890.3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901">
                <text:p>901</text:p>
              </table:table-cell>
              <table:table-cell office:value-type="float" office:value="877.375">
                <text:p>877.3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847">
                <text:p>847</text:p>
              </table:table-cell>
              <table:table-cell office:value-type="float" office:value="868.875">
                <text:p>868.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875">
                <text:p>875</text:p>
              </table:table-cell>
              <table:table-cell office:value-type="float" office:value="858.5">
                <text:p>858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38">
                <text:p>838</text:p>
              </table:table-cell>
              <table:table-cell office:value-type="float" office:value="854.5">
                <text:p>854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837">
                <text:p>83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856">
                <text:p>856</text:p>
              </table:table-cell>
              <table:table-cell office:value-type="float" office:value="845.25">
                <text:p>845.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810">
                <text:p>810</text:p>
              </table:table-cell>
              <table:table-cell office:value-type="float" office:value="834.125">
                <text:p>834.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872">
                <text:p>872</text:p>
              </table:table-cell>
              <table:table-cell office:value-type="float" office:value="832.625">
                <text:p>832.6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817">
                <text:p>817</text:p>
              </table:table-cell>
              <table:table-cell office:value-type="float" office:value="827.875">
                <text:p>827.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57">
                <text:p>857</text:p>
              </table:table-cell>
              <table:table-cell office:value-type="float" office:value="822.25">
                <text:p>822.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786">
                <text:p>786</text:p>
              </table:table-cell>
              <table:table-cell office:value-type="float" office:value="825.625">
                <text:p>825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826">
                <text:p>826</text:p>
              </table:table-cell>
              <table:table-cell office:value-type="float" office:value="819.25">
                <text:p>819.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799">
                <text:p>799</text:p>
              </table:table-cell>
              <table:table-cell office:value-type="float" office:value="811.75">
                <text:p>811.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811">
                <text:p>811</text:p>
              </table:table-cell>
              <table:table-cell office:value-type="float" office:value="807.625">
                <text:p>807.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37">
                <text:p>837</text:p>
              </table:table-cell>
              <table:table-cell office:value-type="float" office:value="810.125">
                <text:p>810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821">
                <text:p>821</text:p>
              </table:table-cell>
              <table:table-cell office:value-type="float" office:value="799.25">
                <text:p>799.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757">
                <text:p>757</text:p>
              </table:table-cell>
              <table:table-cell office:value-type="float" office:value="796.5">
                <text:p>796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824">
                <text:p>824</text:p>
              </table:table-cell>
              <table:table-cell office:value-type="float" office:value="786.25">
                <text:p>786.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806">
                <text:p>806</text:p>
              </table:table-cell>
              <table:table-cell office:value-type="float" office:value="777.5">
                <text:p>77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739">
                <text:p>739</text:p>
              </table:table-cell>
              <table:table-cell office:value-type="float" office:value="763.375">
                <text:p>763.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777">
                <text:p>77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729">
                <text:p>729</text:p>
              </table:table-cell>
              <table:table-cell office:value-type="float" office:value="744.25">
                <text:p>744.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767">
                <text:p>767</text:p>
              </table:table-cell>
              <table:table-cell office:value-type="float" office:value="731.75">
                <text:p>731.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708">
                <text:p>708</text:p>
              </table:table-cell>
              <table:table-cell office:value-type="float" office:value="728.75">
                <text:p>728.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722">
                <text:p>722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706">
                <text:p>706</text:p>
              </table:table-cell>
              <table:table-cell office:value-type="float" office:value="713.25">
                <text:p>713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706">
                <text:p>706</text:p>
              </table:table-cell>
              <table:table-cell office:value-type="float" office:value="702.25">
                <text:p>702.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715">
                <text:p>715</text:p>
              </table:table-cell>
              <table:table-cell office:value-type="float" office:value="694.125">
                <text:p>694.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687">
                <text:p>687</text:p>
              </table:table-cell>
              <table:table-cell office:value-type="float" office:value="684.625">
                <text:p>684.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95">
                <text:p>695</text:p>
              </table:table-cell>
              <table:table-cell office:value-type="float" office:value="674.75">
                <text:p>674.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79">
                <text:p>679</text:p>
              </table:table-cell>
              <table:table-cell office:value-type="float" office:value="670.5">
                <text:p>67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643">
                <text:p>643</text:p>
              </table:table-cell>
              <table:table-cell office:value-type="float" office:value="663.625">
                <text:p>663.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646">
                <text:p>646</text:p>
              </table:table-cell>
              <table:table-cell office:value-type="float" office:value="656.875">
                <text:p>656.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627">
                <text:p>6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672">
                <text:p>672</text:p>
              </table:table-cell>
              <table:table-cell office:value-type="float" office:value="640.375">
                <text:p>640.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660">
                <text:p>66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33">
                <text:p>633</text:p>
              </table:table-cell>
              <table:table-cell office:value-type="float" office:value="624.625">
                <text:p>624.6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616">
                <text:p>616</text:p>
              </table:table-cell>
              <table:table-cell office:value-type="float" office:value="619.875">
                <text:p>619.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626">
                <text:p>626</text:p>
              </table:table-cell>
              <table:table-cell office:value-type="float" office:value="604.75">
                <text:p>604.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52">
                <text:p>552</text:p>
              </table:table-cell>
              <table:table-cell office:value-type="float" office:value="598.125">
                <text:p>598.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611">
                <text:p>611</text:p>
              </table:table-cell>
              <table:table-cell office:value-type="float" office:value="586.125">
                <text:p>586.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89">
                <text:p>589</text:p>
              </table:table-cell>
              <table:table-cell office:value-type="float" office:value="585.625">
                <text:p>585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607">
                <text:p>607</text:p>
              </table:table-cell>
              <table:table-cell office:value-type="float" office:value="577.625">
                <text:p>577.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37">
                <text:p>537</text:p>
              </table:table-cell>
              <table:table-cell office:value-type="float" office:value="566.875">
                <text:p>566.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612">
                <text:p>612</text:p>
              </table:table-cell>
              <table:table-cell office:value-type="float" office:value="555.75">
                <text:p>555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550.25">
                <text:p>550.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33.75">
                <text:p>533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00">
                <text:p>500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07">
                <text:p>507</text:p>
              </table:table-cell>
              <table:table-cell office:value-type="float" office:value="501.875">
                <text:p>501.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475">
                <text:p>475</text:p>
              </table:table-cell>
              <table:table-cell office:value-type="float" office:value="488.125">
                <text:p>488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23">
                <text:p>523</text:p>
              </table:table-cell>
              <table:table-cell office:value-type="float" office:value="482.375">
                <text:p>482.3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42">
                <text:p>442</text:p>
              </table:table-cell>
              <table:table-cell office:value-type="float" office:value="476.125">
                <text:p>476.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486">
                <text:p>486</text:p>
              </table:table-cell>
              <table:table-cell office:value-type="float" office:value="467.375">
                <text:p>467.3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47">
                <text:p>447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479">
                <text:p>479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450">
                <text:p>450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437">
                <text:p>437</text:p>
              </table:table-cell>
              <table:table-cell office:value-type="float" office:value="433.25">
                <text:p>433.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420">
                <text:p>4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89">
                <text:p>389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42">
                <text:p>44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402">
                <text:p>402</text:p>
              </table:table-cell>
              <table:table-cell office:value-type="float" office:value="411.625">
                <text:p>411.6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429">
                <text:p>429</text:p>
              </table:table-cell>
              <table:table-cell office:value-type="float" office:value="406.625">
                <text:p>406.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85">
                <text:p>385</text:p>
              </table:table-cell>
              <table:table-cell office:value-type="float" office:value="406.125">
                <text:p>406.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424">
                <text:p>424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402">
                <text:p>402</text:p>
              </table:table-cell>
              <table:table-cell office:value-type="float" office:value="394.875">
                <text:p>394.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80">
                <text:p>380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85">
                <text:p>38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391">
                <text:p>391</text:p>
              </table:table-cell>
              <table:table-cell office:value-type="float" office:value="368.375">
                <text:p>368.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63">
                <text:p>363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41">
                <text:p>341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40">
                <text:p>340</text:p>
              </table:table-cell>
              <table:table-cell office:value-type="float" office:value="337.25">
                <text:p>337.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45">
                <text:p>345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9">
                <text:p>289</text:p>
              </table:table-cell>
              <table:table-cell office:value-type="float" office:value="319.125">
                <text:p>319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318">
                <text:p>318</text:p>
              </table:table-cell>
              <table:table-cell office:value-type="float" office:value="313.375">
                <text:p>313.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11">
                <text:p>311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327">
                <text:p>327</text:p>
              </table:table-cell>
              <table:table-cell office:value-type="float" office:value="297.25">
                <text:p>297.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2">
                <text:p>282</text:p>
              </table:table-cell>
              <table:table-cell office:value-type="float" office:value="297.375">
                <text:p>297.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95">
                <text:p>295</text:p>
              </table:table-cell>
              <table:table-cell office:value-type="float" office:value="291.125">
                <text:p>291.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69">
                <text:p>269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87">
                <text:p>287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0">
                <text:p>290</text:p>
              </table:table-cell>
              <table:table-cell office:value-type="float" office:value="273.625">
                <text:p>273.6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68">
                <text:p>268</text:p>
              </table:table-cell>
              <table:table-cell office:value-type="float" office:value="265.875">
                <text:p>265.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80">
                <text:p>280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63">
                <text:p>263</text:p>
              </table:table-cell>
              <table:table-cell office:value-type="float" office:value="253.75">
                <text:p>253.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37">
                <text:p>237</text:p>
              </table:table-cell>
              <table:table-cell office:value-type="float" office:value="246.875">
                <text:p>246.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33">
                <text:p>233</text:p>
              </table:table-cell>
              <table:table-cell office:value-type="float" office:value="242.125">
                <text:p>242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29">
                <text:p>229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30">
                <text:p>23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35">
                <text:p>235</text:p>
              </table:table-cell>
              <table:table-cell office:value-type="float" office:value="222.625">
                <text:p>222.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30">
                <text:p>230</text:p>
              </table:table-cell>
              <table:table-cell office:value-type="float" office:value="217.25">
                <text:p>217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27">
                <text:p>227</text:p>
              </table:table-cell>
              <table:table-cell office:value-type="float" office:value="208.25">
                <text:p>208.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91">
                <text:p>191</text:p>
              </table:table-cell>
              <table:table-cell office:value-type="float" office:value="201.375">
                <text:p>201.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06">
                <text:p>206</text:p>
              </table:table-cell>
              <table:table-cell office:value-type="float" office:value="195.75">
                <text:p>195.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90">
                <text:p>190</text:p>
              </table:table-cell>
              <table:table-cell office:value-type="float" office:value="189.625">
                <text:p>189.6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57">
                <text:p>157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90">
                <text:p>190</text:p>
              </table:table-cell>
              <table:table-cell office:value-type="float" office:value="176.75">
                <text:p>176.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81">
                <text:p>181</text:p>
              </table:table-cell>
              <table:table-cell office:value-type="float" office:value="175.625">
                <text:p>175.6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70">
                <text:p>170</text:p>
              </table:table-cell>
              <table:table-cell office:value-type="float" office:value="177.625">
                <text:p>177.6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55">
                <text:p>155</text:p>
              </table:table-cell>
              <table:table-cell office:value-type="float" office:value="176.125">
                <text:p>176.1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96">
                <text:p>196</text:p>
              </table:table-cell>
              <table:table-cell office:value-type="float" office:value="174.875">
                <text:p>174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81">
                <text:p>1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80">
                <text:p>180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42">
                <text:p>142</text:p>
              </table:table-cell>
              <table:table-cell office:value-type="float" office:value="151.375">
                <text:p>151.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38">
                <text:p>138</text:p>
              </table:table-cell>
              <table:table-cell office:value-type="float" office:value="145.625">
                <text:p>145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39">
                <text:p>139</text:p>
              </table:table-cell>
              <table:table-cell office:value-type="float" office:value="140.875">
                <text:p>140.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37">
                <text:p>137</text:p>
              </table:table-cell>
              <table:table-cell office:value-type="float" office:value="135.875">
                <text:p>135.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39">
                <text:p>139</text:p>
              </table:table-cell>
              <table:table-cell office:value-type="float" office:value="135.625">
                <text:p>135.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27">
                <text:p>127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25">
                <text:p>125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40">
                <text:p>14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10">
                <text:p>11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20">
                <text:p>120</text:p>
              </table:table-cell>
              <table:table-cell office:value-type="float" office:value="115.625">
                <text:p>115.6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23">
                <text:p>123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05">
                <text:p>105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00">
                <text:p>100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93">
                <text:p>93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14">
                <text:p>114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92">
                <text:p>92</text:p>
              </table:table-cell>
              <table:table-cell office:value-type="float" office:value="93.625">
                <text:p>93.6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92">
                <text:p>92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81">
                <text:p>81</text:p>
              </table:table-cell>
              <table:table-cell office:value-type="float" office:value="79.375">
                <text:p>79.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73">
                <text:p>73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76">
                <text:p>76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73">
                <text:p>73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67">
                <text:p>67</text:p>
              </table:table-cell>
              <table:table-cell office:value-type="float" office:value="66.625">
                <text:p>66.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56">
                <text:p>56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8">
                <text:p>68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66">
                <text:p>66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3">
                <text:p>63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62">
                <text:p>6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54">
                <text:p>54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3">
                <text:p>43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51">
                <text:p>5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5">
                <text:p>5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3">
                <text:p>53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46">
                <text:p>46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43">
                <text:p>43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54">
                <text:p>54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40">
                <text:p>40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43">
                <text:p>4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0">
                <text:p>40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8">
                <text:p>38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2">
                <text:p>32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5">
                <text:p>2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8">
                <text:p>28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3">
                <text:p>2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2">
                <text:p>3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6">
                <text:p>2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7">
                <text:p>1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8">
                <text:p>28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2">
                <text:p>2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7">
                <text:p>1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A Preliminary Check'.E22:'Annex B Coincidence Limit'.E36 'Annex B Coincidence Limit'.K21:'Annex B Coincidence Limit'.L21 'Annex A Preliminary Check'.L22:'Annex B Coincidence Limit'.L36 'Annex B Coincidence Limit'.K22:'Annex B Coincidence Limit'.K36 'Annex B Coincidence Limit'.I20:'Annex B Coincidence Limit'.I20 'Annex B Coincidence Limit'.I22:'Annex B Coincidence Limit'.I36" chart:data-source-has-labels="row" svg:x="1.468cm" svg:y="0.304cm" svg:width="22.005cm" svg:height="13.673cm">
          <chart:coordinate-region svg:x="3.095cm" svg:y="0.502cm" svg:width="20.27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A Preliminary Check'.L22:'Annex B Coincidence Limit'.L36" chart:label-cell-address="'Annex B Coincidence Limit'.L21:'Annex B Coincidence Limit'.L21" chart:class="chart:scatter">
            <chart:domain table:cell-range-address="'Annex A Preliminary Check'.E22:'Annex B Coincidence Limit'.E36"/>
            <chart:data-point chart:repeated="30"/>
          </chart:series>
          <chart:series chart:style-name="ch9" chart:values-cell-range-address="'Annex B Coincidence Limit'.K22:'Annex B Coincidence Limit'.K36" chart:label-cell-address="'Annex B Coincidence Limit'.K21:'Annex B Coincidence Limit'.K21" chart:class="chart:scatter">
            <chart:domain table:cell-range-address="'Annex B Coincidence Limit'.E22:'Annex B Coincidence Limit'.E36"/>
            <chart:data-point chart:repeated="15"/>
          </chart:series>
          <chart:series chart:style-name="ch10" chart:values-cell-range-address="'Annex B Coincidence Limit'.I22:'Annex B Coincidence Limit'.I36" chart:label-cell-address="'Annex B Coincidence Limit'.I20:'Annex B Coincidence Limit'.I20" chart:class="chart:scatter">
            <chart:domain table:cell-range-address="'Annex B Coincidence Limit'.E22:'Annex B Coincidence Limit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  <draw:g>
                  <svg:desc>'Annex B Coincidence Limit'.L21:'Annex B Coincidence Limit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95%</text:p>
                <draw:g>
                  <svg:desc>'Annex B Coincidence Limit'.K21:'Annex B Coincidence Limit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ression</text:p>
                <draw:g>
                  <svg:desc>'Annex B Coincidence Limit'.I20:'Annex B Coincidence Limit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E22:'Annex B Coincidence Limit'.E36</svg:desc>
                </draw:g>
              </table:table-cell>
              <table:table-cell office:value-type="float" office:value="NaN">
                <text:p>NaN</text:p>
                <draw:g>
                  <svg:desc>'Annex A Preliminary Check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46863.622038757">
                <text:p>146863.622038757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54593.286356587">
                <text:p>154593.28635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87736.94647438">
                <text:p>287736.94647438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302880.996288821">
                <text:p>302880.99628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28384.50130143">
                <text:p>428384.50130143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50931.054001505">
                <text:p>450931.05400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68806.828827374">
                <text:p>568806.828827374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98744.030344604">
                <text:p>598744.0303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09004.469624212">
                <text:p>709004.469624212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46320.494341276">
                <text:p>746320.494341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48977.962535409">
                <text:p>848977.962535409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93661.013195168">
                <text:p>893661.01319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88727.844682814">
                <text:p>988727.844682814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1040766.1522977">
                <text:p>1040766.15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28254.65147349">
                <text:p>1128254.65147349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87636.47523525">
                <text:p>1187636.4752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267558.91660661">
                <text:p>1267558.91660661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334272.54379644">
                <text:p>1334272.5437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545501.948198">
                <text:p>1545501.948198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626844.15599789">
                <text:p>1626844.1559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684141.77357606">
                <text:p>1684141.77357606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772780.81429059">
                <text:p>1772780.814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822561.1751496">
                <text:p>1822561.1751496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918485.44752589">
                <text:p>1918485.44752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960760.67817959">
                <text:p>1960760.67817959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2063958.60861009">
                <text:p>2063958.60861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098740.80625944">
                <text:p>2098740.80625944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209200.84869415">
                <text:p>2209200.84869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397569245385">
                <text:p>0.18397569245385</text:p>
              </table:table-cell>
              <table:table-cell office:value-type="float" office:value="169243">
                <text:p>16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47354064375">
                <text:p>0.360447354064375</text:p>
              </table:table-cell>
              <table:table-cell office:value-type="float" office:value="294743">
                <text:p>29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636194650226">
                <text:p>0.536636194650226</text:p>
              </table:table-cell>
              <table:table-cell office:value-type="float" office:value="452854">
                <text:p>45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2542893558613">
                <text:p>0.712542893558613</text:p>
              </table:table-cell>
              <table:table-cell office:value-type="float" office:value="597630">
                <text:p>597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816812796273">
                <text:p>0.88816812796273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351257287044">
                <text:p>1.0635125728704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857690113294">
                <text:p>1.2385769011329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336178345332">
                <text:p>1.41336178345332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786788839521">
                <text:p>1.58786788839521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604642975144">
                <text:p>1.93604642975144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72019267197">
                <text:p>2.10972019267197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311783124321">
                <text:p>2.28311783124321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624000345826">
                <text:p>2.45624000345826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2908736522129">
                <text:p>2.62908736522129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I22:'Annex B Coincidence Limit'.I36 'ISO 11171_2020 Summary'.A1:'ISO 11171_2020 Summary'.A1 'Annex A Preliminary Check'.M22:'Annex B Coincidence Limit'.M36" chart:data-source-has-labels="row" svg:x="1.395cm" svg:y="2.51cm" svg:width="18.548cm" svg:height="11.466cm">
          <chart:coordinate-region svg:x="2.13cm" svg:y="2.708cm" svg:width="17.123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36" chart:label-cell-address="'ISO 11171_2020 Summary'.A1:'ISO 11171_2020 Summary'.A1" chart:class="chart:scatter">
            <chart:domain table:cell-range-address="'Annex A Preliminary Check'.I22:'Annex B Coincidence Limit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65">
                <text:p>1210565</text:p>
                <draw:g>
                  <svg:desc>'Annex A Preliminary Check'.I22:'Annex B Coincidence Limit'.I36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940">
                <text:p>122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2389">
                <text:p>122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577">
                <text:p>12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566.8">
                <text:p>121956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49.90458388598">
                <text:p>8349.9045838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4661519474454">
                <text:p>0.0068466151947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4593.286356587">
                <text:p>154593.286356587</text:p>
              </table:table-cell>
              <table:table-cell office:value-type="float" office:value="1.09476293562724">
                <text:p>1.09476293562724</text:p>
              </table:table-cell>
            </table:table-row>
            <table:table-row>
              <table:table-cell office:value-type="string"/>
              <table:table-cell office:value-type="float" office:value="302880.996288821">
                <text:p>302880.996288821</text:p>
              </table:table-cell>
              <table:table-cell office:value-type="float" office:value="0.973131373745677">
                <text:p>0.973131373745677</text:p>
              </table:table-cell>
            </table:table-row>
            <table:table-row>
              <table:table-cell office:value-type="string"/>
              <table:table-cell office:value-type="float" office:value="450931.054001505">
                <text:p>450931.054001505</text:p>
              </table:table-cell>
              <table:table-cell office:value-type="float" office:value="1.0042643902686">
                <text:p>1.0042643902686</text:p>
              </table:table-cell>
            </table:table-row>
            <table:table-row>
              <table:table-cell office:value-type="string"/>
              <table:table-cell office:value-type="float" office:value="598744.030344604">
                <text:p>598744.030344604</text:p>
              </table:table-cell>
              <table:table-cell office:value-type="float" office:value="0.998139387971914">
                <text:p>0.998139387971914</text:p>
              </table:table-cell>
            </table:table-row>
            <table:table-row>
              <table:table-cell office:value-type="string"/>
              <table:table-cell office:value-type="float" office:value="746320.494341276">
                <text:p>746320.494341276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/>
              <table:table-cell office:value-type="float" office:value="893661.013195168">
                <text:p>893661.013195168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/>
              <table:table-cell office:value-type="float" office:value="1040766.1522977">
                <text:p>1040766.1522977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/>
              <table:table-cell office:value-type="float" office:value="1187636.47523525">
                <text:p>1187636.47523525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/>
              <table:table-cell office:value-type="float" office:value="1334272.54379644">
                <text:p>1334272.54379644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/>
              <table:table-cell office:value-type="float" office:value="1626844.15599789">
                <text:p>1626844.15599789</text:p>
              </table:table-cell>
              <table:table-cell office:value-type="float" office:value="0.994392829519741">
                <text:p>0.994392829519741</text:p>
              </table:table-cell>
            </table:table-row>
            <table:table-row>
              <table:table-cell office:value-type="string"/>
              <table:table-cell office:value-type="float" office:value="1772780.81429059">
                <text:p>1772780.81429059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/>
              <table:table-cell office:value-type="float" office:value="1918485.44752589">
                <text:p>1918485.44752589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/>
              <table:table-cell office:value-type="float" office:value="2063958.60861009">
                <text:p>2063958.60861009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/>
              <table:table-cell office:value-type="float" office:value="2209200.84869415">
                <text:p>2209200.8486941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