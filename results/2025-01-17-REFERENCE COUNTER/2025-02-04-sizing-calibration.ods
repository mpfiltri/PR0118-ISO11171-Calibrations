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C0000022180CD1462.png" manifest:media-type="image/png"/>
  <manifest:file-entry manifest:full-path="Pictures/10000001000002C9000001C9241C46E7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369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>
      <style:table-cell-properties fo:background-color="#ccf4c6"/>
      <style:map style:condition="cell-content()&lt;[.J50]" style:apply-style-name="Accent" style:base-cell-address="'Clause 6 Sizing Calibration'.J49"/>
    </style:style>
    <style:style style:name="ce7" style:family="table-cell" style:parent-style-name="Default" style:data-style-name="N11"/>
    <style:style style:name="ce8" style:family="table-cell" style:parent-style-name="Default">
      <style:map style:condition="cell-content()=&quot;&lt;3% = PASS&quot;" style:apply-style-name="Good" style:base-cell-address="'Clause 6 Sizing Calibration'.K54"/>
      <style:map style:condition="cell-content()!=&quot;&lt;3% = PASS&quot;" style:apply-style-name="Bad" style:base-cell-address="'Clause 6 Sizing Calibration'.K54"/>
    </style:style>
    <style:style style:name="ce9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Clause 6 Sizing Calibra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&gt;1000 particles per bottle at max certified size</text:p>
            <text:p>Sample Cv per Table C.2</text:p>
          </table:table-cell>
          <table:table-cell table:style-name="ce2" office:value-type="string" calcext:value-type="string">
            <text:p>SRM2806/RM8631x</text:p>
          </table:table-cell>
          <table:table-cell table:style-name="ce1" office:value-type="string" calcext:value-type="string" table:number-columns-spanned="5" table:number-rows-spanned="1">
            <text:p>Clause 6. Sizing Calibration. 3 separate bottles, 5 sub-samples from each.</text:p>
          </table:table-cell>
          <table:covered-table-cell table:number-columns-repeated="4" table:style-name="ce2"/>
          <table:table-cell table:style-name="ce2" table:number-columns-repeated="1017"/>
        </table:table-row>
        <table:table-row table:style-name="ro2">
          <table:table-cell>
            <draw:frame draw:z-index="0" draw:name="Image 4" draw:style-name="gr1" draw:text-style-name="P1" svg:width="14.684cm" svg:height="5.975cm" svg:x="0.235cm" svg:y="-2.302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Analysis using Bottle Sampler and MTD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3" office:value-type="string" calcext:value-type="string">
            <text:p>Bottle Sampler</text:p>
          </table:table-cell>
          <table:table-cell table:number-columns-repeated="2"/>
          <table:table-cell table:style-name="ce4" office:value-type="string" calcext:value-type="string">
            <text:p>BS-500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APC Model</text:p>
          </table:table-cell>
          <table:table-cell table:number-columns-repeated="2"/>
          <table:table-cell table:style-name="ce4" office:value-type="string" calcext:value-type="string">
            <text:p>LPA3 Reference Counter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APC S/N</text:p>
          </table:table-cell>
          <table:table-cell table:number-columns-repeated="2"/>
          <table:table-cell table:style-name="ce4" office:value-type="float" office:value="999999" calcext:value-type="float">
            <text:p>999999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Sensor Model</text:p>
          </table:table-cell>
          <table:table-cell table:number-columns-repeated="2"/>
          <table:table-cell table:style-name="ce4" office:value-type="string" calcext:value-type="string">
            <text:p>Reference Counter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Sensor S/N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Date</text:p>
          </table:table-cell>
          <table:table-cell table:number-columns-repeated="2"/>
          <table:table-cell table:style-name="ce9" office:value-type="date" office:date-value="2025-02-24" calcext:value-type="date">
            <text:p>2025-02-24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Operator</text:p>
          </table:table-cell>
          <table:table-cell table:number-columns-repeated="2"/>
          <table:table-cell table:style-name="ce9" office:value-type="string" calcext:value-type="string">
            <text:p>JMD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Threshold Noise</text:p>
          </table:table-cell>
          <table:table-cell table:number-columns-repeated="2"/>
          <table:table-cell table:style-name="ce10" office:value-type="float" office:value="135" calcext:value-type="float">
            <text:p>135</text:p>
          </table:table-cell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4"/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MTD mg/l</text:p>
          </table:table-cell>
          <table:table-cell table:number-columns-repeated="2"/>
          <table:table-cell office:value-type="float" office:value="5.442" calcext:value-type="float">
            <text:p>5.44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>
            <draw:frame draw:z-index="1" draw:name="Image 5" draw:style-name="gr1" draw:text-style-name="P1" svg:width="12.951cm" svg:height="8.301cm" svg:x="0.726cm" svg:y="-10.1cm">
              <draw:image xlink:href="Pictures/10000001000002C9000001C9241C46E7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"/>
          <table:table-cell table:style-name="ce3" office:value-type="string" calcext:value-type="string">
            <text:p>5ml samples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 office:value-type="string" calcext:value-type="string">
            <text:p>&gt;4μm(c)/100ml</text:p>
          </table:table-cell>
          <table:table-cell table:style-name="ce4" office:value-type="string" calcext:value-type="string">
            <text:p>Deviation</text:p>
          </table:table-cell>
          <table:table-cell table:style-name="ce4" office:value-type="string" calcext:value-type="string">
            <text:p>6μm</text:p>
          </table:table-cell>
          <table:table-cell/>
          <table:table-cell table:style-name="ce4" office:value-type="string" calcext:value-type="string">
            <text:p>14um</text:p>
          </table:table-cell>
          <table:table-cell/>
          <table:table-cell table:style-name="ce4" office:value-type="string" calcext:value-type="string">
            <text:p>21μm</text:p>
          </table:table-cell>
          <table:table-cell/>
          <table:table-cell table:style-name="ce4" office:value-type="string" calcext:value-type="string">
            <text:p>25μm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Portion 1</text:p>
          </table:table-cell>
          <table:table-cell office:value-type="float" office:value="1319366" calcext:value-type="float">
            <text:p>1319366</text:p>
          </table:table-cell>
          <table:table-cell table:style-name="ce7" table:formula="of:=([.J40]-[.J$46])/[.J$46]" office:value-type="percentage" office:value="0.0352403515921879" calcext:value-type="percentage">
            <text:p>3.52%</text:p>
          </table:table-cell>
          <table:table-cell office:value-type="float" office:value="504590" calcext:value-type="float">
            <text:p>504590</text:p>
          </table:table-cell>
          <table:table-cell table:style-name="ce7" table:formula="of:=([.L40]-[.L$46])/[.L$46]" office:value-type="percentage" office:value="0.00510209976085033" calcext:value-type="percentage">
            <text:p>0.51%</text:p>
          </table:table-cell>
          <table:table-cell office:value-type="float" office:value="40101" calcext:value-type="float">
            <text:p>40101</text:p>
          </table:table-cell>
          <table:table-cell table:style-name="ce7" table:formula="of:=([.N40]-[.N$46])/[.N$46]" office:value-type="percentage" office:value="-0.0351940871623866" calcext:value-type="percentage">
            <text:p>-3.52%</text:p>
          </table:table-cell>
          <table:table-cell office:value-type="float" office:value="7960" calcext:value-type="float">
            <text:p>7960</text:p>
          </table:table-cell>
          <table:table-cell table:style-name="ce7" table:formula="of:=([.P40]-[.P$46])/[.P$46]" office:value-type="percentage" office:value="-0.0646298472385429" calcext:value-type="percentage">
            <text:p>-6.46%</text:p>
          </table:table-cell>
          <table:table-cell office:value-type="float" office:value="3907" calcext:value-type="float">
            <text:p>3907</text:p>
          </table:table-cell>
          <table:table-cell table:style-name="ce7" table:formula="of:=([.R40]-[.R$46])/[.R$46]" office:value-type="percentage" office:value="-0.0527910782471665" calcext:value-type="percentage">
            <text:p>-5.28%</text:p>
          </table:table-cell>
          <table:table-cell table:number-columns-repeated="1005"/>
        </table:table-row>
        <table:table-row table:style-name="ro2">
          <table:table-cell table:number-columns-repeated="8"/>
          <table:table-cell office:value-type="string" calcext:value-type="string">
            <text:p>Portion 2</text:p>
          </table:table-cell>
          <table:table-cell office:value-type="float" office:value="1264547" calcext:value-type="float">
            <text:p>1264547</text:p>
          </table:table-cell>
          <table:table-cell table:style-name="ce7" table:formula="of:=([.J41]-[.J$46])/[.J$46]" office:value-type="percentage" office:value="-0.00777336926611231" calcext:value-type="percentage">
            <text:p>-0.78%</text:p>
          </table:table-cell>
          <table:table-cell office:value-type="float" office:value="496968" calcext:value-type="float">
            <text:p>496968</text:p>
          </table:table-cell>
          <table:table-cell table:style-name="ce7" table:formula="of:=([.L41]-[.L$46])/[.L$46]" office:value-type="percentage" office:value="-0.0100803021979225" calcext:value-type="percentage">
            <text:p>-1.01%</text:p>
          </table:table-cell>
          <table:table-cell office:value-type="float" office:value="41958" calcext:value-type="float">
            <text:p>41958</text:p>
          </table:table-cell>
          <table:table-cell table:style-name="ce7" table:formula="of:=([.N41]-[.N$46])/[.N$46]" office:value-type="percentage" office:value="0.00948421462907619" calcext:value-type="percentage">
            <text:p>0.95%</text:p>
          </table:table-cell>
          <table:table-cell/>
          <table:table-cell table:style-name="ce7"/>
          <table:table-cell/>
          <table:table-cell table:style-name="ce7"/>
          <table:table-cell table:number-columns-repeated="1005"/>
        </table:table-row>
        <table:table-row table:style-name="ro2">
          <table:table-cell office:value-type="string" calcext:value-type="string">
            <text:p>Need &gt;10000 particles <text:span text:style-name="T1">at the smallest threshold setting</text:span><text:span text:style-name="T2"> for each sub-sample / test portion. </text:span></text:p>
          </table:table-cell>
          <table:table-cell table:number-columns-repeated="7"/>
          <table:table-cell office:value-type="string" calcext:value-type="string">
            <text:p>Portion 3</text:p>
          </table:table-cell>
          <table:table-cell office:value-type="float" office:value="1237296" calcext:value-type="float">
            <text:p>1237296</text:p>
          </table:table-cell>
          <table:table-cell table:style-name="ce7" table:formula="of:=([.J42]-[.J$46])/[.J$46]" office:value-type="percentage" office:value="-0.0291558626919234" calcext:value-type="percentage">
            <text:p>-2.92%</text:p>
          </table:table-cell>
          <table:table-cell office:value-type="float" office:value="493550" calcext:value-type="float">
            <text:p>493550</text:p>
          </table:table-cell>
          <table:table-cell table:style-name="ce7" table:formula="of:=([.L42]-[.L$46])/[.L$46]" office:value-type="percentage" office:value="-0.0168886792505446" calcext:value-type="percentage">
            <text:p>-1.69%</text:p>
          </table:table-cell>
          <table:table-cell office:value-type="float" office:value="41992" calcext:value-type="float">
            <text:p>41992</text:p>
          </table:table-cell>
          <table:table-cell table:style-name="ce7" table:formula="of:=([.N42]-[.N$46])/[.N$46]" office:value-type="percentage" office:value="0.0103022341556835" calcext:value-type="percentage">
            <text:p>1.03%</text:p>
          </table:table-cell>
          <table:table-cell office:value-type="float" office:value="8518" calcext:value-type="float">
            <text:p>8518</text:p>
          </table:table-cell>
          <table:table-cell table:style-name="ce7" table:formula="of:=([.P42]-[.P$46])/[.P$46]" office:value-type="percentage" office:value="0.000940070505287897" calcext:value-type="percentage">
            <text:p>0.09%</text:p>
          </table:table-cell>
          <table:table-cell office:value-type="float" office:value="4153" calcext:value-type="float">
            <text:p>4153</text:p>
          </table:table-cell>
          <table:table-cell table:style-name="ce7" table:formula="of:=([.R42]-[.R$46])/[.R$46]" office:value-type="percentage" office:value="0.00684889993332929" calcext:value-type="percentage">
            <text:p>0.68%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 &gt;1000 particles <text:span text:style-name="T1">counted</text:span> at each calibrated size, for each of the three calibration tests.</text:p>
          </table:table-cell>
          <table:table-cell table:number-columns-repeated="7"/>
          <table:table-cell office:value-type="string" calcext:value-type="string">
            <text:p>Portion 4</text:p>
          </table:table-cell>
          <table:table-cell office:value-type="float" office:value="1282331" calcext:value-type="float">
            <text:p>1282331</text:p>
          </table:table-cell>
          <table:table-cell table:style-name="ce7" table:formula="of:=([.J43]-[.J$46])/[.J$46]" office:value-type="percentage" office:value="0.00618084390348238" calcext:value-type="percentage">
            <text:p>0.62%</text:p>
          </table:table-cell>
          <table:table-cell office:value-type="float" office:value="507867" calcext:value-type="float">
            <text:p>507867</text:p>
          </table:table-cell>
          <table:table-cell table:style-name="ce7" table:formula="of:=([.L43]-[.L$46])/[.L$46]" office:value-type="percentage" office:value="0.0116296163206639" calcext:value-type="percentage">
            <text:p>1.16%</text:p>
          </table:table-cell>
          <table:table-cell office:value-type="float" office:value="42135" calcext:value-type="float">
            <text:p>42135</text:p>
          </table:table-cell>
          <table:table-cell table:style-name="ce7" table:formula="of:=([.N43]-[.N$46])/[.N$46]" office:value-type="percentage" office:value="0.0137427280470024" calcext:value-type="percentage">
            <text:p>1.37%</text:p>
          </table:table-cell>
          <table:table-cell office:value-type="float" office:value="8785" calcext:value-type="float">
            <text:p>8785</text:p>
          </table:table-cell>
          <table:table-cell table:style-name="ce7" table:formula="of:=([.P43]-[.P$46])/[.P$46]" office:value-type="percentage" office:value="0.0323149236192714" calcext:value-type="percentage">
            <text:p>3.23%</text:p>
          </table:table-cell>
          <table:table-cell office:value-type="float" office:value="4187" calcext:value-type="float">
            <text:p>4187</text:p>
          </table:table-cell>
          <table:table-cell table:style-name="ce7" table:formula="of:=([.R43]-[.R$46])/[.R$46]" office:value-type="percentage" office:value="0.0150918237468938" calcext:value-type="percentage">
            <text:p>1.51%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RM2806D has 14/ml at 30um</text:p>
          </table:table-cell>
          <table:table-cell table:number-columns-repeated="7"/>
          <table:table-cell office:value-type="string" calcext:value-type="string">
            <text:p>Portion 5</text:p>
          </table:table-cell>
          <table:table-cell office:value-type="float" office:value="1268729" calcext:value-type="float">
            <text:p>1268729</text:p>
          </table:table-cell>
          <table:table-cell table:style-name="ce7" table:formula="of:=([.J44]-[.J$46])/[.J$46]" office:value-type="percentage" office:value="-0.00449196353763475" calcext:value-type="percentage">
            <text:p>-0.45%</text:p>
          </table:table-cell>
          <table:table-cell office:value-type="float" office:value="507168" calcext:value-type="float">
            <text:p>507168</text:p>
          </table:table-cell>
          <table:table-cell table:style-name="ce7" table:formula="of:=([.L44]-[.L$46])/[.L$46]" office:value-type="percentage" office:value="0.0102372653669532" calcext:value-type="percentage">
            <text:p>1.02%</text:p>
          </table:table-cell>
          <table:table-cell office:value-type="float" office:value="41633" calcext:value-type="float">
            <text:p>41633</text:p>
          </table:table-cell>
          <table:table-cell table:style-name="ce7" table:formula="of:=([.N44]-[.N$46])/[.N$46]" office:value-type="percentage" office:value="0.00166491033062418" calcext:value-type="percentage">
            <text:p>0.17%</text:p>
          </table:table-cell>
          <table:table-cell office:value-type="float" office:value="8777" calcext:value-type="float">
            <text:p>8777</text:p>
          </table:table-cell>
          <table:table-cell table:style-name="ce7" table:formula="of:=([.P44]-[.P$46])/[.P$46]" office:value-type="percentage" office:value="0.0313748531139835" calcext:value-type="percentage">
            <text:p>3.14%</text:p>
          </table:table-cell>
          <table:table-cell office:value-type="float" office:value="4252" calcext:value-type="float">
            <text:p>4252</text:p>
          </table:table-cell>
          <table:table-cell table:style-name="ce7" table:formula="of:=([.R44]-[.R$46])/[.R$46]" office:value-type="percentage" office:value="0.0308503545669435" calcext:value-type="percentage">
            <text:p>3.09%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his implies we need at least 1000/14 = 71ml per test.</text:p>
          </table:table-cell>
          <table:table-cell table:number-columns-repeated="1023"/>
        </table:table-row>
        <table:table-row table:style-name="ro2">
          <table:table-cell table:number-columns-repeated="8"/>
          <table:table-cell office:value-type="string" calcext:value-type="string">
            <text:p>Mean</text:p>
          </table:table-cell>
          <table:table-cell table:style-name="ce5" table:formula="of:=AVERAGE([.J40:.J44])" office:value-type="float" office:value="1274453.8" calcext:value-type="float">
            <text:p>1274454</text:p>
          </table:table-cell>
          <table:table-cell/>
          <table:table-cell table:style-name="ce5" table:formula="of:=AVERAGE([.L40:.L44])" office:value-type="float" office:value="502028.6" calcext:value-type="float">
            <text:p>502029</text:p>
          </table:table-cell>
          <table:table-cell/>
          <table:table-cell table:style-name="ce5" table:formula="of:=AVERAGE([.N40:.N44])" office:value-type="float" office:value="41563.8" calcext:value-type="float">
            <text:p>41564</text:p>
          </table:table-cell>
          <table:table-cell/>
          <table:table-cell table:style-name="ce5" table:formula="of:=AVERAGE([.P40:.P44])" office:value-type="float" office:value="8510" calcext:value-type="float">
            <text:p>8510</text:p>
          </table:table-cell>
          <table:table-cell/>
          <table:table-cell table:style-name="ce5" table:formula="of:=AVERAGE([.R40:.R44])" office:value-type="float" office:value="4124.75" calcext:value-type="float">
            <text:p>412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t 21um we have 88.64/ml requiring 11.28ml counted volume per test which is more practical. </text:p>
          </table:table-cell>
          <table:table-cell table:number-columns-repeated="7"/>
          <table:table-cell office:value-type="string" calcext:value-type="string">
            <text:p>Sample StdDev</text:p>
          </table:table-cell>
          <table:table-cell table:style-name="ce5" table:formula="of:=STDEVP([.J40:.J44])" office:value-type="float" office:value="26798.4182772043" calcext:value-type="float">
            <text:p>26798</text:p>
          </table:table-cell>
          <table:table-cell/>
          <table:table-cell table:style-name="ce5" table:formula="of:=STDEVP([.L40:.L44])" office:value-type="float" office:value="5736.85361849159" calcext:value-type="float">
            <text:p>5737</text:p>
          </table:table-cell>
          <table:table-cell/>
          <table:table-cell table:style-name="ce5" table:formula="of:=STDEVP([.N40:.N44])" office:value-type="float" office:value="749.612006307263" calcext:value-type="float">
            <text:p>750</text:p>
          </table:table-cell>
          <table:table-cell/>
          <table:table-cell table:style-name="ce5" table:formula="of:=STDEVP([.P40:.P44])" office:value-type="float" office:value="335.215602262186" calcext:value-type="float">
            <text:p>335</text:p>
          </table:table-cell>
          <table:table-cell/>
          <table:table-cell table:style-name="ce5" table:formula="of:=STDEVP([.R40:.R44])" office:value-type="float" office:value="130.652927636544" calcext:value-type="float">
            <text:p>131</text:p>
          </table:table-cell>
          <table:table-cell table:number-columns-repeated="1006"/>
        </table:table-row>
        <table:table-row table:style-name="ro2">
          <table:table-cell table:number-columns-repeated="9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D<text:span text:style-name="T3">Q</text:span></text:p>
          </table:table-cell>
          <table:table-cell table:style-name="ce6" table:formula="of:=(MAX([.J40:.J44])-MIN([.J40:.J44]))/[.J46]" office:value-type="percentage" office:value="0.0643962142841114" calcext:value-type="percentage">
            <text:p>6.44%</text:p>
          </table:table-cell>
          <table:table-cell/>
          <table:table-cell table:style-name="ce6" table:formula="of:=(MAX([.L40:.L44])-MIN([.L40:.L44]))/[.L46]" office:value-type="percentage" office:value="0.0285182955712085" calcext:value-type="percentage">
            <text:p>2.85%</text:p>
          </table:table-cell>
          <table:table-cell/>
          <table:table-cell table:style-name="ce6" table:formula="of:=(MAX([.N40:.N44])-MIN([.N40:.N44]))/[.N46]" office:value-type="percentage" office:value="0.0489368152093889" calcext:value-type="percentage">
            <text:p>4.89%</text:p>
          </table:table-cell>
          <table:table-cell/>
          <table:table-cell table:style-name="ce6" table:formula="of:=(MAX([.P40:.P44])-MIN([.P40:.P44]))/[.P46]" office:value-type="percentage" office:value="0.0969447708578143" calcext:value-type="percentage">
            <text:p>9.69%</text:p>
          </table:table-cell>
          <table:table-cell/>
          <table:table-cell table:style-name="ce6" table:formula="of:=(MAX([.R40:.R44])-MIN([.R40:.R44]))/[.R46]" office:value-type="percentage" office:value="0.08364143281411" calcext:value-type="percentage">
            <text:p>8.36%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riteria &lt;%</text:p>
          </table:table-cell>
          <table:table-cell table:style-name="ce7" office:value-type="percentage" office:value="0.11" calcext:value-type="percentage">
            <text:p>11.00%</text:p>
          </table:table-cell>
          <table:table-cell/>
          <table:table-cell table:style-name="ce7" office:value-type="percentage" office:value="0.11" calcext:value-type="percentage">
            <text:p>11.00%</text:p>
          </table:table-cell>
          <table:table-cell/>
          <table:table-cell table:style-name="ce7" office:value-type="percentage" office:value="0.11" calcext:value-type="percentage">
            <text:p>11.00%</text:p>
          </table:table-cell>
          <table:table-cell/>
          <table:table-cell table:style-name="ce7" office:value-type="percentage" office:value="0.113" calcext:value-type="percentage">
            <text:p>11.30%</text:p>
          </table:table-cell>
          <table:table-cell/>
          <table:table-cell table:style-name="ce7" office:value-type="percentage" office:value="0.119" calcext:value-type="percentage">
            <text:p>11.90%</text:p>
          </table:table-cell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CV<text:span text:style-name="T3">VOL</text:span></text:p>
          </table:table-cell>
          <table:table-cell table:style-name="ce7" table:formula="of:=[.J47]/[.J46]" office:value-type="percentage" office:value="0.0210273752388704" calcext:value-type="percentage">
            <text:p>2.10%</text:p>
          </table:table-cell>
          <table:table-cell table:style-name="ce8" table:formula="of:=IF([.J54]&lt;0.03;&quot;&lt;3% = PASS&quot;;&quot;&gt;3% = FAIL&quot;)" office:value-type="string" office:string-value="&lt;3% = PASS" calcext:value-type="string">
            <text:p>&lt;3% = PASS</text:p>
          </table:table-cell>
          <table:table-cell table:style-name="ce7" table:formula="of:=[.L47]/[.L46]" office:value-type="percentage" office:value="0.0114273442160299" calcext:value-type="percentage">
            <text:p>1.14%</text:p>
          </table:table-cell>
          <table:table-cell table:style-name="ce8" table:formula="of:=IF([.L54]&lt;0.03;&quot;&lt;3% = PASS&quot;;&quot;&gt;3% = FAIL&quot;)" office:value-type="string" office:string-value="&lt;3% = PASS" calcext:value-type="string">
            <text:p>&lt;3% = PASS</text:p>
          </table:table-cell>
          <table:table-cell table:style-name="ce7" table:formula="of:=[.N47]/[.N46]" office:value-type="percentage" office:value="0.0180352134864296" calcext:value-type="percentage">
            <text:p>1.80%</text:p>
          </table:table-cell>
          <table:table-cell table:style-name="ce8" table:formula="of:=IF([.N54]&lt;0.03;&quot;&lt;3% = PASS&quot;;&quot;&gt;3% = FAIL&quot;)" office:value-type="string" office:string-value="&lt;3% = PASS" calcext:value-type="string">
            <text:p>&lt;3% = PASS</text:p>
          </table:table-cell>
          <table:table-cell table:style-name="ce7"/>
          <table:table-cell/>
          <table:table-cell table:style-name="ce7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4" office:value-type="string" calcext:value-type="string">
            <text:p>&gt;4μm(c)/100m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float" office:value="1239489" calcext:value-type="float">
            <text:p>1239489</text:p>
          </table:table-cell>
          <table:table-cell table:style-name="ce7" table:formula="of:=([.J59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35922" calcext:value-type="float">
            <text:p>1235922</text:p>
          </table:table-cell>
          <table:table-cell table:style-name="ce7" table:formula="of:=([.J60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13694" calcext:value-type="float">
            <text:p>1213694</text:p>
          </table:table-cell>
          <table:table-cell table:style-name="ce7" table:formula="of:=([.J61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59898" calcext:value-type="float">
            <text:p>1259898</text:p>
          </table:table-cell>
          <table:table-cell table:style-name="ce7" table:formula="of:=([.J62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37332" calcext:value-type="float">
            <text:p>1237332</text:p>
          </table:table-cell>
          <table:table-cell table:style-name="ce7" table:formula="of:=([.J63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5" table:formula="of:=AVERAGE([.J59:.J63])" office:value-type="float" office:value="1237267" calcext:value-type="float">
            <text:p>1237267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5" table:formula="of:=STDEVP([.J59:.J63])" office:value-type="float" office:value="14660.1434099398" calcext:value-type="float">
            <text:p>1466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7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9"/>
          <table:table-cell table:style-name="ce7" table:formula="of:=[.J66]/[.J65]" office:value-type="percentage" office:value="0.0118488114610183" calcext:value-type="percentage">
            <text:p>1.18%</text:p>
          </table:table-cell>
          <table:table-cell table:style-name="ce8" table:formula="of:=IF([.J73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1013"/>
        </table:table-row>
        <calcext:conditional-formats>
          <calcext:conditional-format calcext:target-range-address="'Clause 6 Sizing Calibration'.K54:'Clause 6 Sizing Calibration'.K54 'Clause 6 Sizing Calibration'.K73:'Clause 6 Sizing Calibration'.K73 'Clause 6 Sizing Calibration'.M54:'Clause 6 Sizing Calibration'.M54 'Clause 6 Sizing Calibration'.O54:'Clause 6 Sizing Calibration'.O54">
            <calcext:condition calcext:apply-style-name="Good" calcext:value="=&quot;&lt;3% = PASS&quot;" calcext:base-cell-address="'Clause 6 Sizing Calibration'.K54"/>
            <calcext:condition calcext:apply-style-name="Bad" calcext:value="!=&quot;&lt;3% = PASS&quot;" calcext:base-cell-address="'Clause 6 Sizing Calibration'.K54"/>
          </calcext:conditional-format>
          <calcext:conditional-format calcext:target-range-address="'Clause 6 Sizing Calibration'.K54:'Clause 6 Sizing Calibration'.K54 'Clause 6 Sizing Calibration'.K73:'Clause 6 Sizing Calibration'.K73 'Clause 6 Sizing Calibration'.M54:'Clause 6 Sizing Calibration'.M54 'Clause 6 Sizing Calibration'.O54:'Clause 6 Sizing Calibration'.O54">
            <calcext:condition calcext:apply-style-name="Good" calcext:value="&lt;0.03" calcext:base-cell-address="'Clause 6 Sizing Calibration'.K54"/>
            <calcext:condition calcext:apply-style-name="Bad" calcext:value="&gt;=0.03" calcext:base-cell-address="'Clause 6 Sizing Calibration'.K54"/>
          </calcext:conditional-format>
          <calcext:conditional-format calcext:target-range-address="'Clause 6 Sizing Calibration'.J49:'Clause 6 Sizing Calibration'.J49 'Clause 6 Sizing Calibration'.L49:'Clause 6 Sizing Calibration'.L49 'Clause 6 Sizing Calibration'.N49:'Clause 6 Sizing Calibration'.N49 'Clause 6 Sizing Calibration'.P49:'Clause 6 Sizing Calibration'.P49 'Clause 6 Sizing Calibration'.R49:'Clause 6 Sizing Calibration'.R49">
            <calcext:condition calcext:apply-style-name="Accent" calcext:value="&lt;[.J50]" calcext:base-cell-address="'Clause 6 Sizing Calibration'.J4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5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1" number:min-decimal-places="1"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9" number:min-decimal-places="9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7" number:min-decimal-places="7" number:min-integer-digits="1"/>
    </number:number-style>
    <number:number-style style:name="N148">
      <number:number number:decimal-places="8" number:min-decimal-places="8" number:min-integer-digits="1"/>
    </number:number-style>
    <number:number-style style:name="N149">
      <number:number number:decimal-places="14" number:min-decimal-places="14" number:min-integer-digits="1"/>
    </number:number-style>
    <number:number-style style:name="N150">
      <number:number number:decimal-places="13" number:min-decimal-places="13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5" number:min-decimal-places="5" number:min-integer-digits="1"/>
    </number:number-style>
    <number:number-style style:name="N154">
      <number:number number:decimal-places="4" number:min-decimal-places="4" number:min-integer-digits="1"/>
    </number:number-style>
    <number:number-style style:name="N155">
      <number:number number:decimal-places="3" number:min-decimal-places="3" number:min-integer-digits="1" number:grouping="true"/>
    </number:number-style>
    <number:number-style style:name="N156">
      <number:number number:decimal-places="4" number:min-decimal-places="4" number:min-integer-digits="1" number:grouping="true"/>
    </number:number-style>
    <number:number-style style:name="N157">
      <number:number number:decimal-places="5" number:min-decimal-places="5" number:min-integer-digits="1" number:grouping="true"/>
    </number:number-style>
    <number:number-style style:name="N158">
      <number:number number:decimal-places="6" number:min-decimal-places="6" number:min-integer-digits="1" number:grouping="true"/>
    </number:number-style>
    <number:number-style style:name="N159">
      <number:number number:decimal-places="7" number:min-decimal-places="7" number:min-integer-digits="1" number:grouping="true"/>
    </number:number-style>
    <number:number-style style:name="N160">
      <number:number number:decimal-places="8" number:min-decimal-places="8" number:min-integer-digits="1" number:grouping="true"/>
    </number:number-style>
    <number:number-style style:name="N161">
      <number:number number:decimal-places="17" number:min-decimal-places="17" number:min-integer-digits="1"/>
    </number:number-style>
    <number:number-style style:name="N162">
      <number:number number:decimal-places="16" number:min-decimal-places="16" number:min-integer-digits="1"/>
    </number:number-style>
    <number:number-style style:name="N163">
      <number:number number:decimal-places="15" number:min-decimal-places="15" number:min-integer-digits="1"/>
    </number:number-style>
    <number:number-style style:name="N164">
      <number:number number:decimal-places="18" number:min-decimal-places="18" number:min-integer-digits="1"/>
    </number:number-style>
    <number:number-style style:name="N165">
      <number:number number:decimal-places="19" number:min-decimal-places="19" number:min-integer-digits="1"/>
    </number:number-style>
    <number:number-style style:name="N166">
      <number:number number:decimal-places="20" number:min-decimal-places="20" number:min-integer-digits="1"/>
    </number:number-style>
    <number:number-style style:name="N16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6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6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7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5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76">
      <number:day number:style="long"/>
      <number:text>-</number:text>
      <number:month number:textual="true"/>
      <number:text>-</number:text>
      <number:year/>
    </number:date-style>
    <number:date-style style:name="N177">
      <number:day number:style="long"/>
      <number:text>-</number:text>
      <number:month number:textual="true"/>
    </number:date-style>
    <number:date-style style:name="N178">
      <number:month number:textual="true"/>
      <number:text>-</number:text>
      <number:year/>
    </number:date-style>
    <number:time-style style:name="N179">
      <number:hours/>
      <number:text>:</number:text>
      <number:minutes number:style="long"/>
      <number:text> </number:text>
      <number:am-pm/>
    </number:time-style>
    <number:time-style style:name="N18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2" style:volatile="true">
      <number:text> £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86">
      <number:number number:decimal-places="1" number:min-decimal-places="1" number:min-integer-digits="1"/>
      <number:text>%</number:text>
    </number:percentage-style>
    <number:number-style style:name="N187P0" style:volatile="true">
      <number:text>£</number:text>
      <number:number number:decimal-places="0" number:min-decimal-places="0" number:min-integer-digits="1" number:grouping="true"/>
    </number:number-style>
    <number:number-style style:name="N187">
      <number:text>-£</number:text>
      <number:number number:decimal-places="0" number:min-decimal-places="0" number:min-integer-digits="1" number:grouping="true"/>
      <style:map style:condition="value()&gt;=0" style:apply-style-name="N187P0"/>
    </number:number-style>
    <number:number-style style:name="N188P0" style:volatile="true">
      <number:text>£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88P0"/>
    </number:number-style>
    <number:number-style style:name="N189P0" style:volatile="true">
      <number:text>£</number:text>
      <number:number number:decimal-places="2" number:min-decimal-places="2" number:min-integer-digits="1" number:grouping="true"/>
    </number:number-style>
    <number:number-style style:name="N189">
      <number:text>-£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0P0" style:volatile="true">
      <number:text>£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9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9T10:16:17.315000000</meta:creation-date>
    <dc:date>2025-04-29T10:17:02.472000000</dc:date>
    <meta:editing-duration>PT45S</meta:editing-duration>
    <meta:editing-cycles>1</meta:editing-cycles>
    <meta:document-statistic meta:table-count="1" meta:cell-count="130" meta:object-count="2"/>
    <meta:generator>LibreOffice/7.6.4.1$Windows_X86_64 LibreOffice_project/e19e193f88cd6c0525a17fb7a176ed8e6a3e2aa1</meta:generator>
  </office:meta>
</office:document-meta>
</file>