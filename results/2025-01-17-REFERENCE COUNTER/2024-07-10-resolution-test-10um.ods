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sp_height_10um" table:style-name="ta1">
        <table:shapes>
          <draw:frame draw:z-index="0" draw:style-name="gr1" draw:text-style-name="P1" svg:width="15.999cm" svg:height="8.999cm" svg:x="7.106cm" svg:y="1.22cm">
            <draw:object draw:notify-on-update-of-ranges="dsp_height_10um.B1:dsp_height_10um.B1 dsp_height_10um.B2:dsp_height_10um.B301 dsp_height_10um.C1:dsp_height_10um.C1 dsp_height_10um.C2:dsp_height_10um.C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[.A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A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A4])" office:value-type="float" office:value="1.4142135623731" calcext:value-type="float">
            <text:p>1.4142135623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A5])" office:value-type="float" office:value="1.73205080756888" calcext:value-type="float">
            <text:p>1.73205080756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A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A7])" office:value-type="float" office:value="2.23606797749979" calcext:value-type="float">
            <text:p>2.2360679774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A8])" office:value-type="float" office:value="2.44948974278318" calcext:value-type="float">
            <text:p>2.44948974278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[.A9])" office:value-type="float" office:value="2.64575131106459" calcext:value-type="float">
            <text:p>2.64575131106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A10])" office:value-type="float" office:value="2.82842712474619" calcext:value-type="float">
            <text:p>2.82842712474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[.A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A12])" office:value-type="float" office:value="3.16227766016838" calcext:value-type="float">
            <text:p>3.16227766016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[.A13])" office:value-type="float" office:value="3.3166247903554" calcext:value-type="float">
            <text:p>3.316624790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A14])" office:value-type="float" office:value="3.46410161513775" calcext:value-type="float">
            <text:p>3.4641016151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[.A15])" office:value-type="float" office:value="3.60555127546399" calcext:value-type="float">
            <text:p>3.60555127546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[.A16])" office:value-type="float" office:value="3.74165738677394" calcext:value-type="float">
            <text:p>3.7416573867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A17])" office:value-type="float" office:value="3.87298334620742" calcext:value-type="float">
            <text:p>3.8729833462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[.A1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QRT([.A19])" office:value-type="float" office:value="4.12310562561766" calcext:value-type="float">
            <text:p>4.1231056256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QRT([.A20])" office:value-type="float" office:value="4.24264068711929" calcext:value-type="float">
            <text:p>4.2426406871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QRT([.A21])" office:value-type="float" office:value="4.35889894354067" calcext:value-type="float">
            <text:p>4.35889894354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A22])" office:value-type="float" office:value="4.47213595499958" calcext:value-type="float">
            <text:p>4.472135954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QRT([.A23])" office:value-type="float" office:value="4.58257569495584" calcext:value-type="float">
            <text:p>4.58257569495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QRT([.A24])" office:value-type="float" office:value="4.69041575982343" calcext:value-type="float">
            <text:p>4.6904157598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QRT([.A25])" office:value-type="float" office:value="4.79583152331272" calcext:value-type="float">
            <text:p>4.7958315233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QRT([.A26])" office:value-type="float" office:value="4.89897948556636" calcext:value-type="float">
            <text:p>4.89897948556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[.A2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QRT([.A28])" office:value-type="float" office:value="5.09901951359278" calcext:value-type="float">
            <text:p>5.09901951359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QRT([.A29])" office:value-type="float" office:value="5.19615242270663" calcext:value-type="float">
            <text:p>5.1961524227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QRT([.A30])" office:value-type="float" office:value="5.29150262212918" calcext:value-type="float">
            <text:p>5.2915026221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QRT([.A31])" office:value-type="float" office:value="5.3851648071345" calcext:value-type="float">
            <text:p>5.385164807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32])" office:value-type="float" office:value="5.47722557505166" calcext:value-type="float">
            <text:p>5.477225575051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QRT([.A33])" office:value-type="float" office:value="5.56776436283002" calcext:value-type="float">
            <text:p>5.56776436283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QRT([.A34])" office:value-type="float" office:value="5.65685424949238" calcext:value-type="float">
            <text:p>5.656854249492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QRT([.A35])" office:value-type="float" office:value="5.74456264653803" calcext:value-type="float">
            <text:p>5.744562646538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QRT([.A36])" office:value-type="float" office:value="5.8309518948453" calcext:value-type="float">
            <text:p>5.83095189484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QRT([.A37])" office:value-type="float" office:value="5.91607978309962" calcext:value-type="float">
            <text:p>5.916079783099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QRT([.A38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QRT([.A39])" office:value-type="float" office:value="6.08276253029822" calcext:value-type="float">
            <text:p>6.082762530298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QRT([.A40])" office:value-type="float" office:value="6.16441400296898" calcext:value-type="float">
            <text:p>6.164414002968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QRT([.A41])" office:value-type="float" office:value="6.2449979983984" calcext:value-type="float">
            <text:p>6.2449979983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42])" office:value-type="float" office:value="6.32455532033676" calcext:value-type="float">
            <text:p>6.324555320336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QRT([.A43])" office:value-type="float" office:value="6.40312423743285" calcext:value-type="float">
            <text:p>6.40312423743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QRT([.A44])" office:value-type="float" office:value="6.48074069840786" calcext:value-type="float">
            <text:p>6.480740698407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QRT([.A45])" office:value-type="float" office:value="6.557438524302" calcext:value-type="float">
            <text:p>6.557438524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QRT([.A46])" office:value-type="float" office:value="6.6332495807108" calcext:value-type="float">
            <text:p>6.6332495807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QRT([.A47])" office:value-type="float" office:value="6.70820393249937" calcext:value-type="float">
            <text:p>6.708203932499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QRT([.A48])" office:value-type="float" office:value="6.78232998312527" calcext:value-type="float">
            <text:p>6.782329983125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QRT([.A49])" office:value-type="float" office:value="6.85565460040104" calcext:value-type="float">
            <text:p>6.85565460040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QRT([.A50])" office:value-type="float" office:value="6.92820323027551" calcext:value-type="float">
            <text:p>6.928203230275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QRT([.A51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52])" office:value-type="float" office:value="7.07106781186548" calcext:value-type="float">
            <text:p>7.07106781186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QRT([.A53])" office:value-type="float" office:value="7.14142842854285" calcext:value-type="float">
            <text:p>7.14142842854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QRT([.A54])" office:value-type="float" office:value="7.21110255092798" calcext:value-type="float">
            <text:p>7.211102550927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QRT([.A55])" office:value-type="float" office:value="7.28010988928052" calcext:value-type="float">
            <text:p>7.28010988928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QRT([.A56])" office:value-type="float" office:value="7.34846922834953" calcext:value-type="float">
            <text:p>7.348469228349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QRT([.A57])" office:value-type="float" office:value="7.41619848709566" calcext:value-type="float">
            <text:p>7.41619848709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QRT([.A58])" office:value-type="float" office:value="7.48331477354788" calcext:value-type="float">
            <text:p>7.483314773547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QRT([.A59])" office:value-type="float" office:value="7.54983443527075" calcext:value-type="float">
            <text:p>7.549834435270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QRT([.A60])" office:value-type="float" office:value="7.61577310586391" calcext:value-type="float">
            <text:p>7.61577310586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QRT([.A61])" office:value-type="float" office:value="7.68114574786861" calcext:value-type="float">
            <text:p>7.68114574786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62])" office:value-type="float" office:value="7.74596669241483" calcext:value-type="float">
            <text:p>7.74596669241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QRT([.A63])" office:value-type="float" office:value="7.81024967590665" calcext:value-type="float">
            <text:p>7.81024967590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QRT([.A64])" office:value-type="float" office:value="7.87400787401181" calcext:value-type="float">
            <text:p>7.874007874011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QRT([.A65])" office:value-type="float" office:value="7.93725393319377" calcext:value-type="float">
            <text:p>7.93725393319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QRT([.A66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QRT([.A67])" office:value-type="float" office:value="8.06225774829855" calcext:value-type="float">
            <text:p>8.062257748298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QRT([.A68])" office:value-type="float" office:value="8.12403840463596" calcext:value-type="float">
            <text:p>8.124038404635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QRT([.A69])" office:value-type="float" office:value="8.18535277187245" calcext:value-type="float">
            <text:p>8.18535277187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QRT([.A70])" office:value-type="float" office:value="8.24621125123532" calcext:value-type="float">
            <text:p>8.24621125123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QRT([.A71])" office:value-type="float" office:value="8.30662386291808" calcext:value-type="float">
            <text:p>8.30662386291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QRT([.A72])" office:value-type="float" office:value="8.36660026534076" calcext:value-type="float">
            <text:p>8.36660026534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QRT([.A73])" office:value-type="float" office:value="8.42614977317636" calcext:value-type="float">
            <text:p>8.42614977317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QRT([.A74])" office:value-type="float" office:value="8.48528137423857" calcext:value-type="float">
            <text:p>8.48528137423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QRT([.A75])" office:value-type="float" office:value="8.54400374531753" calcext:value-type="float">
            <text:p>8.54400374531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QRT([.A76])" office:value-type="float" office:value="8.60232526704263" calcext:value-type="float">
            <text:p>8.602325267042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77])" office:value-type="float" office:value="8.66025403784439" calcext:value-type="float">
            <text:p>8.66025403784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QRT([.A78])" office:value-type="float" office:value="8.71779788708135" calcext:value-type="float">
            <text:p>8.71779788708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QRT([.A79])" office:value-type="float" office:value="8.77496438739212" calcext:value-type="float">
            <text:p>8.77496438739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QRT([.A80])" office:value-type="float" office:value="8.83176086632785" calcext:value-type="float">
            <text:p>8.831760866327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QRT([.A81])" office:value-type="float" office:value="8.88819441731559" calcext:value-type="float">
            <text:p>8.888194417315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[.A82])" office:value-type="float" office:value="8.94427190999916" calcext:value-type="float">
            <text:p>8.94427190999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QRT([.A83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QRT([.A84])" office:value-type="float" office:value="9.05538513813742" calcext:value-type="float">
            <text:p>9.055385138137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QRT([.A85])" office:value-type="float" office:value="9.1104335791443" calcext:value-type="float">
            <text:p>9.1104335791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QRT([.A86])" office:value-type="float" office:value="9.16515138991168" calcext:value-type="float">
            <text:p>9.165151389911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QRT([.A87])" office:value-type="float" office:value="9.21954445729289" calcext:value-type="float">
            <text:p>9.21954445729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QRT([.A88])" office:value-type="float" office:value="9.2736184954957" calcext:value-type="float">
            <text:p>9.27361849549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QRT([.A89])" office:value-type="float" office:value="9.32737905308882" calcext:value-type="float">
            <text:p>9.327379053088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QRT([.A90])" office:value-type="float" office:value="9.38083151964686" calcext:value-type="float">
            <text:p>9.380831519646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QRT([.A91])" office:value-type="float" office:value="9.4339811320566" calcext:value-type="float">
            <text:p>9.43398113205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QRT([.A92])" office:value-type="float" office:value="9.48683298050514" calcext:value-type="float">
            <text:p>9.486832980505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QRT([.A93])" office:value-type="float" office:value="9.53939201416946" calcext:value-type="float">
            <text:p>9.539392014169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QRT([.A94])" office:value-type="float" office:value="9.59166304662544" calcext:value-type="float">
            <text:p>9.591663046625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QRT([.A95])" office:value-type="float" office:value="9.64365076099296" calcext:value-type="float">
            <text:p>9.643650760992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QRT([.A96])" office:value-type="float" office:value="9.69535971483266" calcext:value-type="float">
            <text:p>9.695359714832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QRT([.A97])" office:value-type="float" office:value="9.74679434480896" calcext:value-type="float">
            <text:p>9.746794344808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QRT([.A98])" office:value-type="float" office:value="9.79795897113271" calcext:value-type="float">
            <text:p>9.797958971132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QRT([.A99])" office:value-type="float" office:value="9.8488578017961" calcext:value-type="float">
            <text:p>9.84885780179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QRT([.A100])" office:value-type="float" office:value="9.89949493661167" calcext:value-type="float">
            <text:p>9.899494936611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QRT([.A101])" office:value-type="float" office:value="9.9498743710662" calcext:value-type="float">
            <text:p>9.94987437106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102]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QRT([.A103])" office:value-type="float" office:value="10.0498756211209" calcext:value-type="float">
            <text:p>10.0498756211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QRT([.A104])" office:value-type="float" office:value="10.0995049383621" calcext:value-type="float">
            <text:p>10.09950493836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QRT([.A105])" office:value-type="float" office:value="10.1488915650922" calcext:value-type="float">
            <text:p>10.14889156509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QRT([.A106])" office:value-type="float" office:value="10.1980390271856" calcext:value-type="float">
            <text:p>10.19803902718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QRT([.A107])" office:value-type="float" office:value="10.2469507659596" calcext:value-type="float">
            <text:p>10.24695076595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QRT([.A108])" office:value-type="float" office:value="10.295630140987" calcext:value-type="float">
            <text:p>10.2956301409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QRT([.A109])" office:value-type="float" office:value="10.3440804327886" calcext:value-type="float">
            <text:p>10.34408043278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QRT([.A110])" office:value-type="float" office:value="10.3923048454133" calcext:value-type="float">
            <text:p>10.39230484541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QRT([.A111])" office:value-type="float" office:value="10.4403065089106" calcext:value-type="float">
            <text:p>10.44030650891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QRT([.A112])" office:value-type="float" office:value="10.4880884817015" calcext:value-type="float">
            <text:p>10.4880884817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QRT([.A113])" office:value-type="float" office:value="10.5356537528527" calcext:value-type="float">
            <text:p>10.53565375285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QRT([.A114])" office:value-type="float" office:value="10.5830052442584" calcext:value-type="float">
            <text:p>10.58300524425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QRT([.A115])" office:value-type="float" office:value="10.6301458127347" calcext:value-type="float">
            <text:p>10.63014581273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QRT([.A116])" office:value-type="float" office:value="10.6770782520313" calcext:value-type="float">
            <text:p>10.67707825203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QRT([.A117])" office:value-type="float" office:value="10.7238052947636" calcext:value-type="float">
            <text:p>10.72380529476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QRT([.A118])" office:value-type="float" office:value="10.770329614269" calcext:value-type="float">
            <text:p>10.7703296142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QRT([.A119])" office:value-type="float" office:value="10.816653826392" calcext:value-type="float">
            <text:p>10.8166538263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QRT([.A120])" office:value-type="float" office:value="10.8627804912002" calcext:value-type="float">
            <text:p>10.86278049120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QRT([.A121])" office:value-type="float" office:value="10.9087121146357" calcext:value-type="float">
            <text:p>10.90871211463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QRT([.A122])" office:value-type="float" office:value="10.9544511501033" calcext:value-type="float">
            <text:p>10.95445115010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QRT([.A123])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QRT([.A124])" office:value-type="float" office:value="11.0453610171873" calcext:value-type="float">
            <text:p>11.04536101718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QRT([.A125])" office:value-type="float" office:value="11.0905365064094" calcext:value-type="float">
            <text:p>11.09053650640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QRT([.A126])" office:value-type="float" office:value="11.13552872566" calcext:value-type="float">
            <text:p>11.135528725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QRT([.A127])" office:value-type="float" office:value="11.1803398874989" calcext:value-type="float">
            <text:p>11.18033988749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QRT([.A128])" office:value-type="float" office:value="11.2249721603218" calcext:value-type="float">
            <text:p>11.22497216032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QRT([.A129])" office:value-type="float" office:value="11.2694276695846" calcext:value-type="float">
            <text:p>11.26942766958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QRT([.A130])" office:value-type="float" office:value="11.3137084989848" calcext:value-type="float">
            <text:p>11.31370849898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QRT([.A131])" office:value-type="float" office:value="11.3578166916005" calcext:value-type="float">
            <text:p>11.3578166916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QRT([.A132])" office:value-type="float" office:value="11.4017542509914" calcext:value-type="float">
            <text:p>11.40175425099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QRT([.A133])" office:value-type="float" office:value="11.4455231422596" calcext:value-type="float">
            <text:p>11.44552314225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QRT([.A134])" office:value-type="float" office:value="11.4891252930761" calcext:value-type="float">
            <text:p>11.48912529307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QRT([.A135])" office:value-type="float" office:value="11.5325625946708" calcext:value-type="float">
            <text:p>11.53256259467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QRT([.A136])" office:value-type="float" office:value="11.5758369027902" calcext:value-type="float">
            <text:p>11.57583690279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QRT([.A137])" office:value-type="float" office:value="11.6189500386223" calcext:value-type="float">
            <text:p>11.61895003862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QRT([.A138])" office:value-type="float" office:value="11.6619037896906" calcext:value-type="float">
            <text:p>11.66190378969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QRT([.A139])" office:value-type="float" office:value="11.7046999107196" calcext:value-type="float">
            <text:p>11.70469991071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QRT([.A140])" office:value-type="float" office:value="11.7473401244707" calcext:value-type="float">
            <text:p>11.74734012447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QRT([.A141])" office:value-type="float" office:value="11.7898261225516" calcext:value-type="float">
            <text:p>11.78982612255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QRT([.A142])" office:value-type="float" office:value="11.8321595661992" calcext:value-type="float">
            <text:p>11.83215956619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QRT([.A143])" office:value-type="float" office:value="11.8743420870379" calcext:value-type="float">
            <text:p>11.87434208703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QRT([.A144])" office:value-type="float" office:value="11.916375287813" calcext:value-type="float">
            <text:p>11.9163752878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QRT([.A145])" office:value-type="float" office:value="11.9582607431014" calcext:value-type="float">
            <text:p>11.95826074310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QRT([.A146])"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QRT([.A147])" office:value-type="float" office:value="12.0415945787923" calcext:value-type="float">
            <text:p>12.04159457879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QRT([.A148])" office:value-type="float" office:value="12.0830459735946" calcext:value-type="float">
            <text:p>12.08304597359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QRT([.A149])" office:value-type="float" office:value="12.1243556529821" calcext:value-type="float">
            <text:p>12.12435565298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QRT([.A150])" office:value-type="float" office:value="12.1655250605964" calcext:value-type="float">
            <text:p>12.16552506059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QRT([.A151])" office:value-type="float" office:value="12.2065556157337" calcext:value-type="float">
            <text:p>12.20655561573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52])" office:value-type="float" office:value="12.2474487139159" calcext:value-type="float">
            <text:p>12.24744871391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QRT([.A153])" office:value-type="float" office:value="12.2882057274445" calcext:value-type="float">
            <text:p>12.28820572744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QRT([.A154])" office:value-type="float" office:value="12.328828005938" calcext:value-type="float">
            <text:p>12.3288280059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QRT([.A155])" office:value-type="float" office:value="12.369316876853" calcext:value-type="float">
            <text:p>12.36931687685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QRT([.A156])" office:value-type="float" office:value="12.4096736459909" calcext:value-type="float">
            <text:p>12.409673645990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QRT([.A157])" office:value-type="float" office:value="12.4498995979887" calcext:value-type="float">
            <text:p>12.44989959798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QRT([.A158])" office:value-type="float" office:value="12.4899959967968" calcext:value-type="float">
            <text:p>12.48999599679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QRT([.A159])" office:value-type="float" office:value="12.5299640861417" calcext:value-type="float">
            <text:p>12.529964086141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QRT([.A160])" office:value-type="float" office:value="12.5698050899765" calcext:value-type="float">
            <text:p>12.569805089976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QRT([.A161])" office:value-type="float" office:value="12.6095202129185" calcext:value-type="float">
            <text:p>12.609520212918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QRT([.A162])" office:value-type="float" office:value="12.6491106406735" calcext:value-type="float">
            <text:p>12.649110640673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QRT([.A163])" office:value-type="float" office:value="12.6885775404495" calcext:value-type="float">
            <text:p>12.688577540449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QRT([.A164])" office:value-type="float" office:value="12.7279220613579" calcext:value-type="float">
            <text:p>12.727922061357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QRT([.A165])" office:value-type="float" office:value="12.7671453348037" calcext:value-type="float">
            <text:p>12.76714533480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QRT([.A166])" office:value-type="float" office:value="12.8062484748657" calcext:value-type="float">
            <text:p>12.806248474865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QRT([.A167])" office:value-type="float" office:value="12.8452325786651" calcext:value-type="float">
            <text:p>12.845232578665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QRT([.A168])" office:value-type="float" office:value="12.8840987267251" calcext:value-type="float">
            <text:p>12.884098726725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QRT([.A169])" office:value-type="float" office:value="12.9228479833201" calcext:value-type="float">
            <text:p>12.92284798332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QRT([.A170])" office:value-type="float" office:value="12.9614813968157" calcext:value-type="float">
            <text:p>12.961481396815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QRT([.A171])" office:value-type="float" office:value="13" calcext:value-type="float">
            <text:p>1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QRT([.A172])" office:value-type="float" office:value="13.0384048104053" calcext:value-type="float">
            <text:p>13.038404810405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QRT([.A173])" office:value-type="float" office:value="13.076696830622" calcext:value-type="float">
            <text:p>13.07669683062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QRT([.A174])" office:value-type="float" office:value="13.114877048604" calcext:value-type="float">
            <text:p>13.11487704860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QRT([.A175])" office:value-type="float" office:value="13.1529464379659" calcext:value-type="float">
            <text:p>13.15294643796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QRT([.A176])" office:value-type="float" office:value="13.1909059582729" calcext:value-type="float">
            <text:p>13.190905958272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QRT([.A177])" office:value-type="float" office:value="13.228756555323" calcext:value-type="float">
            <text:p>13.2287565553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QRT([.A178])" office:value-type="float" office:value="13.2664991614216" calcext:value-type="float">
            <text:p>13.26649916142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QRT([.A179])" office:value-type="float" office:value="13.3041346956501" calcext:value-type="float">
            <text:p>13.30413469565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QRT([.A180])" office:value-type="float" office:value="13.3416640641263" calcext:value-type="float">
            <text:p>13.341664064126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QRT([.A181])" office:value-type="float" office:value="13.3790881602597" calcext:value-type="float">
            <text:p>13.379088160259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QRT([.A182])" office:value-type="float" office:value="13.4164078649987" calcext:value-type="float">
            <text:p>13.416407864998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QRT([.A183])" office:value-type="float" office:value="13.4536240470737" calcext:value-type="float">
            <text:p>13.453624047073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QRT([.A184])" office:value-type="float" office:value="13.490737563232" calcext:value-type="float">
            <text:p>13.49073756323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QRT([.A185])" office:value-type="float" office:value="13.5277492584687" calcext:value-type="float">
            <text:p>13.527749258468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QRT([.A186])" office:value-type="float" office:value="13.5646599662505" calcext:value-type="float">
            <text:p>13.564659966250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QRT([.A187])" office:value-type="float" office:value="13.6014705087354" calcext:value-type="float">
            <text:p>13.601470508735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QRT([.A188])" office:value-type="float" office:value="13.6381816969859" calcext:value-type="float">
            <text:p>13.63818169698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QRT([.A189])" office:value-type="float" office:value="13.6747943311773" calcext:value-type="float">
            <text:p>13.674794331177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QRT([.A190])" office:value-type="float" office:value="13.7113092008021" calcext:value-type="float">
            <text:p>13.711309200802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QRT([.A191])" office:value-type="float" office:value="13.7477270848675" calcext:value-type="float">
            <text:p>13.747727084867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QRT([.A192])" office:value-type="float" office:value="13.7840487520902" calcext:value-type="float">
            <text:p>13.784048752090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QRT([.A193])" office:value-type="float" office:value="13.8202749610853" calcext:value-type="float">
            <text:p>13.820274961085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QRT([.A194])" office:value-type="float" office:value="13.856406460551" calcext:value-type="float">
            <text:p>13.85640646055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QRT([.A195])" office:value-type="float" office:value="13.8924439894498" calcext:value-type="float">
            <text:p>13.892443989449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QRT([.A196])" office:value-type="float" office:value="13.9283882771841" calcext:value-type="float">
            <text:p>13.928388277184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QRT([.A197])" office:value-type="float" office:value="13.9642400437689" calcext:value-type="float">
            <text:p>13.964240043768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QRT([.A198])" office:value-type="float" office:value="14" calcext:value-type="float">
            <text:p>1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QRT([.A199])" office:value-type="float" office:value="14.0356688476182" calcext:value-type="float">
            <text:p>14.035668847618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QRT([.A200])" office:value-type="float" office:value="14.0712472794703" calcext:value-type="float">
            <text:p>14.071247279470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QRT([.A201])" office:value-type="float" office:value="14.1067359796659" calcext:value-type="float">
            <text:p>14.106735979665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202])" office:value-type="float" office:value="14.142135623731" calcext:value-type="float">
            <text:p>14.14213562373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QRT([.A203])" office:value-type="float" office:value="14.1774468787578" calcext:value-type="float">
            <text:p>14.177446878757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QRT([.A204])" office:value-type="float" office:value="14.2126704035519" calcext:value-type="float">
            <text:p>14.212670403551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QRT([.A205])" office:value-type="float" office:value="14.247806848775" calcext:value-type="float">
            <text:p>14.24780684877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QRT([.A206])" office:value-type="float" office:value="14.2828568570857" calcext:value-type="float">
            <text:p>14.282856857085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QRT([.A207])" office:value-type="float" office:value="14.3178210632764" calcext:value-type="float">
            <text:p>14.317821063276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QRT([.A208])" office:value-type="float" office:value="14.3527000944073" calcext:value-type="float">
            <text:p>14.352700094407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QRT([.A209])" office:value-type="float" office:value="14.3874945699382" calcext:value-type="float">
            <text:p>14.387494569938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QRT([.A210])" office:value-type="float" office:value="14.422205101856" calcext:value-type="float">
            <text:p>14.4222051018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QRT([.A211])" office:value-type="float" office:value="14.456832294801" calcext:value-type="float">
            <text:p>14.45683229480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QRT([.A212])" office:value-type="float" office:value="14.4913767461894" calcext:value-type="float">
            <text:p>14.491376746189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QRT([.A213])" office:value-type="float" office:value="14.525839046334" calcext:value-type="float">
            <text:p>14.52583904633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QRT([.A214])" office:value-type="float" office:value="14.560219778561" calcext:value-type="float">
            <text:p>14.56021977856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QRT([.A215])" office:value-type="float" office:value="14.5945195193264" calcext:value-type="float">
            <text:p>14.594519519326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QRT([.A216])" office:value-type="float" office:value="14.6287388383278" calcext:value-type="float">
            <text:p>14.628738838327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QRT([.A217])" office:value-type="float" office:value="14.6628782986152" calcext:value-type="float">
            <text:p>14.662878298615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QRT([.A218])" office:value-type="float" office:value="14.6969384566991" calcext:value-type="float">
            <text:p>14.696938456699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QRT([.A219])" office:value-type="float" office:value="14.7309198626562" calcext:value-type="float">
            <text:p>14.73091986265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QRT([.A220])" office:value-type="float" office:value="14.7648230602334" calcext:value-type="float">
            <text:p>14.764823060233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QRT([.A221])" office:value-type="float" office:value="14.7986485869487" calcext:value-type="float">
            <text:p>14.798648586948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QRT([.A222])" office:value-type="float" office:value="14.8323969741913" calcext:value-type="float">
            <text:p>14.832396974191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QRT([.A223])" office:value-type="float" office:value="14.8660687473185" calcext:value-type="float">
            <text:p>14.866068747318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QRT([.A224])" office:value-type="float" office:value="14.8996644257513" calcext:value-type="float">
            <text:p>14.899664425751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QRT([.A225])" office:value-type="float" office:value="14.9331845230681" calcext:value-type="float">
            <text:p>14.933184523068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QRT([.A226])" office:value-type="float" office:value="14.9666295470958" calcext:value-type="float">
            <text:p>14.966629547095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QRT([.A227])" office:value-type="float" office:value="15" calcext:value-type="float">
            <text:p>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QRT([.A228])" office:value-type="float" office:value="15.0332963783729" calcext:value-type="float">
            <text:p>15.033296378372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QRT([.A229])" office:value-type="float" office:value="15.0665191733194" calcext:value-type="float">
            <text:p>15.066519173319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QRT([.A230])" office:value-type="float" office:value="15.0996688705415" calcext:value-type="float">
            <text:p>15.09966887054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QRT([.A231])" office:value-type="float" office:value="15.1327459504216" calcext:value-type="float">
            <text:p>15.132745950421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QRT([.A232])" office:value-type="float" office:value="15.1657508881031" calcext:value-type="float">
            <text:p>15.165750888103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QRT([.A233])" office:value-type="float" office:value="15.1986841535707" calcext:value-type="float">
            <text:p>15.19868415357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QRT([.A234])" office:value-type="float" office:value="15.2315462117278" calcext:value-type="float">
            <text:p>15.231546211727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QRT([.A235])" office:value-type="float" office:value="15.2643375224737" calcext:value-type="float">
            <text:p>15.26433752247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QRT([.A236])" office:value-type="float" office:value="15.2970585407784" calcext:value-type="float">
            <text:p>15.29705854077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QRT([.A237])" office:value-type="float" office:value="15.3297097167559" calcext:value-type="float">
            <text:p>15.329709716755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QRT([.A238])" office:value-type="float" office:value="15.3622914957372" calcext:value-type="float">
            <text:p>15.36229149573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QRT([.A239])" office:value-type="float" office:value="15.3948043183407" calcext:value-type="float">
            <text:p>15.39480431834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QRT([.A240])" office:value-type="float" office:value="15.4272486205415" calcext:value-type="float">
            <text:p>15.42724862054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QRT([.A241])" office:value-type="float" office:value="15.4596248337403" calcext:value-type="float">
            <text:p>15.45962483374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QRT([.A242])" office:value-type="float" office:value="15.4919333848297" calcext:value-type="float">
            <text:p>15.491933384829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QRT([.A243])" office:value-type="float" office:value="15.52417469626" calcext:value-type="float">
            <text:p>15.524174696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QRT([.A244])" office:value-type="float" office:value="15.556349186104" calcext:value-type="float">
            <text:p>15.5563491861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QRT([.A245])" office:value-type="float" office:value="15.5884572681199" calcext:value-type="float">
            <text:p>15.588457268119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QRT([.A246])" office:value-type="float" office:value="15.6204993518133" calcext:value-type="float">
            <text:p>15.62049935181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QRT([.A247])" office:value-type="float" office:value="15.6524758424985" calcext:value-type="float">
            <text:p>15.65247584249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QRT([.A248])" office:value-type="float" office:value="15.6843871413581" calcext:value-type="float">
            <text:p>15.68438714135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QRT([.A249])" office:value-type="float" office:value="15.7162336455017" calcext:value-type="float">
            <text:p>15.71623364550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QRT([.A250])" office:value-type="float" office:value="15.7480157480236" calcext:value-type="float">
            <text:p>15.74801574802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QRT([.A251])" office:value-type="float" office:value="15.7797338380595" calcext:value-type="float">
            <text:p>15.77973383805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252])" office:value-type="float" office:value="15.8113883008419" calcext:value-type="float">
            <text:p>15.81138830084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QRT([.A253])" office:value-type="float" office:value="15.8429795177549" calcext:value-type="float">
            <text:p>15.84297951775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QRT([.A254])" office:value-type="float" office:value="15.8745078663875" calcext:value-type="float">
            <text:p>15.87450786638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QRT([.A255])" office:value-type="float" office:value="15.9059737205869" calcext:value-type="float">
            <text:p>15.90597372058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QRT([.A256])" office:value-type="float" office:value="15.9373774505092" calcext:value-type="float">
            <text:p>15.93737745050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QRT([.A257])" office:value-type="float" office:value="15.9687194226713" calcext:value-type="float">
            <text:p>15.96871942267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QRT([.A258])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SQRT([.A259])" office:value-type="float" office:value="16.0312195418814" calcext:value-type="float">
            <text:p>16.03121954188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QRT([.A260])" office:value-type="float" office:value="16.062378404209" calcext:value-type="float">
            <text:p>16.062378404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QRT([.A261])" office:value-type="float" office:value="16.0934769394311" calcext:value-type="float">
            <text:p>16.09347693943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QRT([.A262])" office:value-type="float" office:value="16.1245154965971" calcext:value-type="float">
            <text:p>16.12451549659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SQRT([.A263])" office:value-type="float" office:value="16.1554944214035" calcext:value-type="float">
            <text:p>16.15549442140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SQRT([.A264])" office:value-type="float" office:value="16.1864140562386" calcext:value-type="float">
            <text:p>16.18641405623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SQRT([.A265])" office:value-type="float" office:value="16.2172747402269" calcext:value-type="float">
            <text:p>16.21727474022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SQRT([.A266])" office:value-type="float" office:value="16.2480768092719" calcext:value-type="float">
            <text:p>16.24807680927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SQRT([.A267])" office:value-type="float" office:value="16.2788205960997" calcext:value-type="float">
            <text:p>16.2788205960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SQRT([.A268])" office:value-type="float" office:value="16.3095064303001" calcext:value-type="float">
            <text:p>16.3095064303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SQRT([.A269])" office:value-type="float" office:value="16.3401346383682" calcext:value-type="float">
            <text:p>16.34013463836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SQRT([.A270])" office:value-type="float" office:value="16.3707055437449" calcext:value-type="float">
            <text:p>16.37070554374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SQRT([.A271])" office:value-type="float" office:value="16.4012194668567" calcext:value-type="float">
            <text:p>16.40121946685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QRT([.A272])" office:value-type="float" office:value="16.431676725155" calcext:value-type="float">
            <text:p>16.4316767251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SQRT([.A273])" office:value-type="float" office:value="16.4620776331543" calcext:value-type="float">
            <text:p>16.46207763315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SQRT([.A274])" office:value-type="float" office:value="16.4924225024706" calcext:value-type="float">
            <text:p>16.49242250247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SQRT([.A275])" office:value-type="float" office:value="16.5227116418583" calcext:value-type="float">
            <text:p>16.52271164185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SQRT([.A276])" office:value-type="float" office:value="16.5529453572469" calcext:value-type="float">
            <text:p>16.55294535724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SQRT([.A277])" office:value-type="float" office:value="16.583123951777" calcext:value-type="float">
            <text:p>16.5831239517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SQRT([.A278])" office:value-type="float" office:value="16.6132477258362" calcext:value-type="float">
            <text:p>16.61324772583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SQRT([.A279])" office:value-type="float" office:value="16.6433169770932" calcext:value-type="float">
            <text:p>16.6433169770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SQRT([.A280])" office:value-type="float" office:value="16.6733320005331" calcext:value-type="float">
            <text:p>16.67333200053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SQRT([.A281])" office:value-type="float" office:value="16.7032930884901" calcext:value-type="float">
            <text:p>16.7032930884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SQRT([.A282])" office:value-type="float" office:value="16.7332005306815" calcext:value-type="float">
            <text:p>16.7332005306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SQRT([.A283])" office:value-type="float" office:value="16.7630546142402" calcext:value-type="float">
            <text:p>16.76305461424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SQRT([.A284])" office:value-type="float" office:value="16.7928556237467" calcext:value-type="float">
            <text:p>16.79285562374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SQRT([.A285])" office:value-type="float" office:value="16.8226038412607" calcext:value-type="float">
            <text:p>16.82260384126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SQRT([.A286])" office:value-type="float" office:value="16.8522995463527" calcext:value-type="float">
            <text:p>16.85229954635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SQRT([.A287])" office:value-type="float" office:value="16.8819430161341" calcext:value-type="float">
            <text:p>16.88194301613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SQRT([.A288])" office:value-type="float" office:value="16.9115345252878" calcext:value-type="float">
            <text:p>16.9115345252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SQRT([.A289])" office:value-type="float" office:value="16.9410743460974" calcext:value-type="float">
            <text:p>16.9410743460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SQRT([.A290])" office:value-type="float" office:value="16.9705627484771" calcext:value-type="float">
            <text:p>16.97056274847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SQRT([.A291]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SQRT([.A292])" office:value-type="float" office:value="17.0293863659264" calcext:value-type="float">
            <text:p>17.0293863659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SQRT([.A293])" office:value-type="float" office:value="17.058722109232" calcext:value-type="float">
            <text:p>17.058722109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SQRT([.A294])" office:value-type="float" office:value="17.0880074906351" calcext:value-type="float">
            <text:p>17.0880074906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SQRT([.A295])" office:value-type="float" office:value="17.1172427686237" calcext:value-type="float">
            <text:p>17.1172427686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SQRT([.A296])" office:value-type="float" office:value="17.1464281994822" calcext:value-type="float">
            <text:p>17.1464281994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SQRT([.A297])" office:value-type="float" office:value="17.1755640373177" calcext:value-type="float">
            <text:p>17.1755640373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SQRT([.A298])" office:value-type="float" office:value="17.2046505340853" calcext:value-type="float">
            <text:p>17.20465053408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SQRT([.A299])" office:value-type="float" office:value="17.2336879396141" calcext:value-type="float">
            <text:p>17.2336879396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SQRT([.A300])" office:value-type="float" office:value="17.2626765016321" calcext:value-type="float">
            <text:p>17.2626765016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SQRT([.A301])" office:value-type="float" office:value="17.2916164657906" calcext:value-type="float">
            <text:p>17.2916164657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SQRT([.A302])" office:value-type="float" office:value="17.3205080756888" calcext:value-type="float">
            <text:p>17.32050807568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SQRT([.A303])" office:value-type="float" office:value="17.3493515728975" calcext:value-type="float">
            <text:p>17.3493515728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SQRT([.A304])" office:value-type="float" office:value="17.3781471969828" calcext:value-type="float">
            <text:p>17.3781471969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SQRT([.A305])" office:value-type="float" office:value="17.4068951855292" calcext:value-type="float">
            <text:p>17.40689518552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SQRT([.A306])" office:value-type="float" office:value="17.4355957741627" calcext:value-type="float">
            <text:p>17.4355957741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SQRT([.A307])" office:value-type="float" office:value="17.464249196573" calcext:value-type="float">
            <text:p>17.4642491965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SQRT([.A308])" office:value-type="float" office:value="17.4928556845359" calcext:value-type="float">
            <text:p>17.49285568453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SQRT([.A309])" office:value-type="float" office:value="17.5214154679352" calcext:value-type="float">
            <text:p>17.5214154679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SQRT([.A310])" office:value-type="float" office:value="17.5499287747842" calcext:value-type="float">
            <text:p>17.5499287747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SQRT([.A311])" office:value-type="float" office:value="17.5783958312469" calcext:value-type="float">
            <text:p>17.5783958312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SQRT([.A312])" office:value-type="float" office:value="17.606816861659" calcext:value-type="float">
            <text:p>17.6068168616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SQRT([.A313])" office:value-type="float" office:value="17.6351920885484" calcext:value-type="float">
            <text:p>17.6351920885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SQRT([.A314])" office:value-type="float" office:value="17.6635217326557" calcext:value-type="float">
            <text:p>17.6635217326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SQRT([.A315])" office:value-type="float" office:value="17.6918060129541" calcext:value-type="float">
            <text:p>17.6918060129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SQRT([.A316])" office:value-type="float" office:value="17.7200451466694" calcext:value-type="float">
            <text:p>17.72004514666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SQRT([.A317])" office:value-type="float" office:value="17.7482393492989" calcext:value-type="float">
            <text:p>17.7482393492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SQRT([.A318])" office:value-type="float" office:value="17.7763888346312" calcext:value-type="float">
            <text:p>17.77638883463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SQRT([.A319])" office:value-type="float" office:value="17.8044938147649" calcext:value-type="float">
            <text:p>17.8044938147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SQRT([.A320])" office:value-type="float" office:value="17.832554500127" calcext:value-type="float">
            <text:p>17.832554500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SQRT([.A321])" office:value-type="float" office:value="17.8605710994918" calcext:value-type="float">
            <text:p>17.86057109949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SQRT([.A322])" office:value-type="float" office:value="17.8885438199983" calcext:value-type="float">
            <text:p>17.88854381999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SQRT([.A323])" office:value-type="float" office:value="17.9164728671689" calcext:value-type="float">
            <text:p>17.9164728671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SQRT([.A324])" office:value-type="float" office:value="17.9443584449264" calcext:value-type="float">
            <text:p>17.94435844492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SQRT([.A325])" office:value-type="float" office:value="17.9722007556114" calcext:value-type="float">
            <text:p>17.9722007556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SQRT([.A326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SQRT([.A327])" office:value-type="float" office:value="18.0277563773199" calcext:value-type="float">
            <text:p>18.0277563773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SQRT([.A328])" office:value-type="float" office:value="18.0554700852678" calcext:value-type="float">
            <text:p>18.0554700852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SQRT([.A329])" office:value-type="float" office:value="18.0831413200251" calcext:value-type="float">
            <text:p>18.0831413200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SQRT([.A330])" office:value-type="float" office:value="18.1107702762748" calcext:value-type="float">
            <text:p>18.11077027627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SQRT([.A331])" office:value-type="float" office:value="18.1383571472171" calcext:value-type="float">
            <text:p>18.1383571472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SQRT([.A332])" office:value-type="float" office:value="18.165902124585" calcext:value-type="float">
            <text:p>18.1659021245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SQRT([.A333])" office:value-type="float" office:value="18.1934053986603" calcext:value-type="float">
            <text:p>18.1934053986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SQRT([.A334])" office:value-type="float" office:value="18.2208671582886" calcext:value-type="float">
            <text:p>18.22086715828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SQRT([.A335])" office:value-type="float" office:value="18.2482875908947" calcext:value-type="float">
            <text:p>18.248287590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SQRT([.A336])" office:value-type="float" office:value="18.2756668824971" calcext:value-type="float">
            <text:p>18.2756668824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SQRT([.A337])" office:value-type="float" office:value="18.3030052177231" calcext:value-type="float">
            <text:p>18.30300521772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SQRT([.A338])" office:value-type="float" office:value="18.3303027798234" calcext:value-type="float">
            <text:p>18.3303027798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SQRT([.A339])" office:value-type="float" office:value="18.3575597506858" calcext:value-type="float">
            <text:p>18.357559750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SQRT([.A340])" office:value-type="float" office:value="18.3847763108502" calcext:value-type="float">
            <text:p>18.3847763108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SQRT([.A341])" office:value-type="float" office:value="18.411952639522" calcext:value-type="float">
            <text:p>18.411952639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SQRT([.A342])" office:value-type="float" office:value="18.4390889145858" calcext:value-type="float">
            <text:p>18.43908891458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SQRT([.A343])" office:value-type="float" office:value="18.4661853126194" calcext:value-type="float">
            <text:p>18.4661853126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SQRT([.A344])" office:value-type="float" office:value="18.4932420089069" calcext:value-type="float">
            <text:p>18.4932420089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SQRT([.A345])" office:value-type="float" office:value="18.5202591774521" calcext:value-type="float">
            <text:p>18.5202591774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SQRT([.A346])" office:value-type="float" office:value="18.5472369909914" calcext:value-type="float">
            <text:p>18.5472369909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SQRT([.A347])" office:value-type="float" office:value="18.5741756210067" calcext:value-type="float">
            <text:p>18.5741756210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SQRT([.A348])" office:value-type="float" office:value="18.6010752377383" calcext:value-type="float">
            <text:p>18.6010752377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SQRT([.A349])" office:value-type="float" office:value="18.6279360101972" calcext:value-type="float">
            <text:p>18.6279360101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SQRT([.A350])" office:value-type="float" office:value="18.6547581061776" calcext:value-type="float">
            <text:p>18.6547581061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SQRT([.A351])" office:value-type="float" office:value="18.6815416922694" calcext:value-type="float">
            <text:p>18.68154169226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QRT([.A352])" office:value-type="float" office:value="18.7082869338697" calcext:value-type="float">
            <text:p>18.70828693386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SQRT([.A353])" office:value-type="float" office:value="18.7349939951952" calcext:value-type="float">
            <text:p>18.73499399519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SQRT([.A354])" office:value-type="float" office:value="18.7616630392937" calcext:value-type="float">
            <text:p>18.7616630392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SQRT([.A355])" office:value-type="float" office:value="18.7882942280559" calcext:value-type="float">
            <text:p>18.7882942280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SQRT([.A356])" office:value-type="float" office:value="18.8148877222268" calcext:value-type="float">
            <text:p>18.8148877222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SQRT([.A357])" office:value-type="float" office:value="18.8414436814168" calcext:value-type="float">
            <text:p>18.8414436814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SQRT([.A358])" office:value-type="float" office:value="18.8679622641132" calcext:value-type="float">
            <text:p>18.8679622641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SQRT([.A359])" office:value-type="float" office:value="18.8944436276912" calcext:value-type="float">
            <text:p>18.8944436276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SQRT([.A360])" office:value-type="float" office:value="18.9208879284245" calcext:value-type="float">
            <text:p>18.9208879284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SQRT([.A361])" office:value-type="float" office:value="18.9472953214964" calcext:value-type="float">
            <text:p>18.94729532149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SQRT([.A362])" office:value-type="float" office:value="18.9736659610103" calcext:value-type="float">
            <text:p>18.9736659610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SQRT([.A363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SQRT([.A364])" office:value-type="float" office:value="19.0262975904404" calcext:value-type="float">
            <text:p>19.0262975904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SQRT([.A365])" office:value-type="float" office:value="19.0525588832577" calcext:value-type="float">
            <text:p>19.05255888325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SQRT([.A366])" office:value-type="float" office:value="19.0787840283389" calcext:value-type="float">
            <text:p>19.0787840283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SQRT([.A367])" office:value-type="float" office:value="19.1049731745428" calcext:value-type="float">
            <text:p>19.1049731745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SQRT([.A368])" office:value-type="float" office:value="19.131126469709" calcext:value-type="float">
            <text:p>19.131126469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SQRT([.A369])" office:value-type="float" office:value="19.157244060668" calcext:value-type="float">
            <text:p>19.157244060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SQRT([.A370])" office:value-type="float" office:value="19.1833260932509" calcext:value-type="float">
            <text:p>19.1833260932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SQRT([.A371])" office:value-type="float" office:value="19.2093727122985" calcext:value-type="float">
            <text:p>19.2093727122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QRT([.A372])" office:value-type="float" office:value="19.2353840616713" calcext:value-type="float">
            <text:p>19.23538406167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SQRT([.A373])" office:value-type="float" office:value="19.2613602842582" calcext:value-type="float">
            <text:p>19.2613602842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SQRT([.A374])" office:value-type="float" office:value="19.2873015219859" calcext:value-type="float">
            <text:p>19.28730152198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SQRT([.A375])" office:value-type="float" office:value="19.313207915828" calcext:value-type="float">
            <text:p>19.3132079158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SQRT([.A376])" office:value-type="float" office:value="19.3390796058137" calcext:value-type="float">
            <text:p>19.3390796058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377])" office:value-type="float" office:value="19.3649167310371" calcext:value-type="float">
            <text:p>19.3649167310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SQRT([.A378])" office:value-type="float" office:value="19.3907194296653" calcext:value-type="float">
            <text:p>19.39071942966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SQRT([.A379])" office:value-type="float" office:value="19.4164878389476" calcext:value-type="float">
            <text:p>19.4164878389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SQRT([.A380])" office:value-type="float" office:value="19.4422220952236" calcext:value-type="float">
            <text:p>19.4422220952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SQRT([.A381])" office:value-type="float" office:value="19.4679223339318" calcext:value-type="float">
            <text:p>19.467922333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SQRT([.A382])" office:value-type="float" office:value="19.4935886896179" calcext:value-type="float">
            <text:p>19.4935886896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SQRT([.A383])" office:value-type="float" office:value="19.5192212959431" calcext:value-type="float">
            <text:p>19.5192212959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SQRT([.A384])" office:value-type="float" office:value="19.5448202856921" calcext:value-type="float">
            <text:p>19.54482028569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SQRT([.A385])" office:value-type="float" office:value="19.5703857907809" calcext:value-type="float">
            <text:p>19.5703857907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SQRT([.A386])" office:value-type="float" office:value="19.5959179422654" calcext:value-type="float">
            <text:p>19.5959179422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SQRT([.A387])" office:value-type="float" office:value="19.6214168703486" calcext:value-type="float">
            <text:p>19.6214168703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SQRT([.A388])" office:value-type="float" office:value="19.6468827043885" calcext:value-type="float">
            <text:p>19.6468827043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SQRT([.A389])" office:value-type="float" office:value="19.672315572906" calcext:value-type="float">
            <text:p>19.672315572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SQRT([.A390])" office:value-type="float" office:value="19.6977156035922" calcext:value-type="float">
            <text:p>19.6977156035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SQRT([.A391])" office:value-type="float" office:value="19.723082923316" calcext:value-type="float">
            <text:p>19.723082923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SQRT([.A392])" office:value-type="float" office:value="19.7484176581315" calcext:value-type="float">
            <text:p>19.7484176581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SQRT([.A393])" office:value-type="float" office:value="19.7737199332852" calcext:value-type="float">
            <text:p>19.7737199332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SQRT([.A394])" office:value-type="float" office:value="19.7989898732233" calcext:value-type="float">
            <text:p>19.7989898732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SQRT([.A395])" office:value-type="float" office:value="19.824227601599" calcext:value-type="float">
            <text:p>19.8242276015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SQRT([.A396])" office:value-type="float" office:value="19.8494332412792" calcext:value-type="float">
            <text:p>19.8494332412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SQRT([.A397])" office:value-type="float" office:value="19.8746069143518" calcext:value-type="float">
            <text:p>19.8746069143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SQRT([.A398])" office:value-type="float" office:value="19.8997487421324" calcext:value-type="float">
            <text:p>19.8997487421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SQRT([.A399])" office:value-type="float" office:value="19.9248588451713" calcext:value-type="float">
            <text:p>19.92485884517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SQRT([.A400])" office:value-type="float" office:value="19.94993734326" calcext:value-type="float">
            <text:p>19.949937343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SQRT([.A401])" office:value-type="float" office:value="19.9749843554382" calcext:value-type="float">
            <text:p>19.9749843554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SQRT([.A402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SQRT([.A403])" office:value-type="float" office:value="20.0249843945008" calcext:value-type="float">
            <text:p>20.0249843945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SQRT([.A404])" office:value-type="float" office:value="20.0499376557634" calcext:value-type="float">
            <text:p>20.0499376557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SQRT([.A405])" office:value-type="float" office:value="20.0748598998847" calcext:value-type="float">
            <text:p>20.0748598998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SQRT([.A406])" office:value-type="float" office:value="20.0997512422418" calcext:value-type="float">
            <text:p>20.0997512422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SQRT([.A407])" office:value-type="float" office:value="20.1246117974981" calcext:value-type="float">
            <text:p>20.1246117974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SQRT([.A408])" office:value-type="float" office:value="20.1494416796099" calcext:value-type="float">
            <text:p>20.1494416796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SQRT([.A409])" office:value-type="float" office:value="20.174241001832" calcext:value-type="float">
            <text:p>20.174241001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SQRT([.A410])" office:value-type="float" office:value="20.1990098767242" calcext:value-type="float">
            <text:p>20.1990098767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SQRT([.A411])" office:value-type="float" office:value="20.2237484161567" calcext:value-type="float">
            <text:p>20.22374841615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SQRT([.A412])" office:value-type="float" office:value="20.2484567313166" calcext:value-type="float">
            <text:p>20.2484567313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SQRT([.A413])" office:value-type="float" office:value="20.2731349327133" calcext:value-type="float">
            <text:p>20.2731349327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SQRT([.A414])" office:value-type="float" office:value="20.2977831301844" calcext:value-type="float">
            <text:p>20.2977831301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SQRT([.A415])" office:value-type="float" office:value="20.3224014329016" calcext:value-type="float">
            <text:p>20.322401432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SQRT([.A416])" office:value-type="float" office:value="20.3469899493758" calcext:value-type="float">
            <text:p>20.3469899493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SQRT([.A417])" office:value-type="float" office:value="20.3715487874634" calcext:value-type="float">
            <text:p>20.3715487874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SQRT([.A418])" office:value-type="float" office:value="20.3960780543711" calcext:value-type="float">
            <text:p>20.3960780543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SQRT([.A419])" office:value-type="float" office:value="20.4205778566621" calcext:value-type="float">
            <text:p>20.4205778566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SQRT([.A420])" office:value-type="float" office:value="20.4450483002609" calcext:value-type="float">
            <text:p>20.4450483002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SQRT([.A421])" office:value-type="float" office:value="20.4694894904587" calcext:value-type="float">
            <text:p>20.4694894904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SQRT([.A422])" office:value-type="float" office:value="20.4939015319192" calcext:value-type="float">
            <text:p>20.4939015319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SQRT([.A423])" office:value-type="float" office:value="20.5182845286832" calcext:value-type="float">
            <text:p>20.5182845286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SQRT([.A424])" office:value-type="float" office:value="20.5426385841741" calcext:value-type="float">
            <text:p>20.5426385841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SQRT([.A425])" office:value-type="float" office:value="20.5669638012031" calcext:value-type="float">
            <text:p>20.5669638012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SQRT([.A426])" office:value-type="float" office:value="20.591260281974" calcext:value-type="float">
            <text:p>20.59126028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SQRT([.A427])" office:value-type="float" office:value="20.6155281280883" calcext:value-type="float">
            <text:p>20.6155281280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SQRT([.A428])" office:value-type="float" office:value="20.6397674405503" calcext:value-type="float">
            <text:p>20.6397674405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SQRT([.A429])" office:value-type="float" office:value="20.6639783197718" calcext:value-type="float">
            <text:p>20.6639783197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SQRT([.A430])" office:value-type="float" office:value="20.6881608655772" calcext:value-type="float">
            <text:p>20.6881608655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SQRT([.A431])" office:value-type="float" office:value="20.712315177208" calcext:value-type="float">
            <text:p>20.712315177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SQRT([.A432])" office:value-type="float" office:value="20.7364413533277" calcext:value-type="float">
            <text:p>20.7364413533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SQRT([.A433])" office:value-type="float" office:value="20.7605394920267" calcext:value-type="float">
            <text:p>20.7605394920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SQRT([.A434])" office:value-type="float" office:value="20.7846096908265" calcext:value-type="float">
            <text:p>20.7846096908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SQRT([.A435])" office:value-type="float" office:value="20.8086520466848" calcext:value-type="float">
            <text:p>20.8086520466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SQRT([.A436])" office:value-type="float" office:value="20.8326666559997" calcext:value-type="float">
            <text:p>20.8326666559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SQRT([.A437])" office:value-type="float" office:value="20.8566536146142" calcext:value-type="float">
            <text:p>20.8566536146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SQRT([.A438])" office:value-type="float" office:value="20.8806130178211" calcext:value-type="float">
            <text:p>20.8806130178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SQRT([.A439])" office:value-type="float" office:value="20.9045449603669" calcext:value-type="float">
            <text:p>20.9045449603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SQRT([.A440])" office:value-type="float" office:value="20.9284495364564" calcext:value-type="float">
            <text:p>20.9284495364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SQRT([.A441])" office:value-type="float" office:value="20.952326839757" calcext:value-type="float">
            <text:p>20.952326839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SQRT([.A442])" office:value-type="float" office:value="20.976176963403" calcext:value-type="float">
            <text:p>20.976176963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SQRT([.A443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SQRT([.A444])" office:value-type="float" office:value="21.0237960416286" calcext:value-type="float">
            <text:p>21.0237960416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SQRT([.A445])" office:value-type="float" office:value="21.0475651798492" calcext:value-type="float">
            <text:p>21.0475651798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SQRT([.A446])" office:value-type="float" office:value="21.0713075057055" calcext:value-type="float">
            <text:p>21.0713075057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SQRT([.A447])" office:value-type="float" office:value="21.095023109729" calcext:value-type="float">
            <text:p>21.095023109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SQRT([.A448])" office:value-type="float" office:value="21.1187120819429" calcext:value-type="float">
            <text:p>21.1187120819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SQRT([.A449])" office:value-type="float" office:value="21.142374511866" calcext:value-type="float">
            <text:p>21.142374511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SQRT([.A450])" office:value-type="float" office:value="21.1660104885167" calcext:value-type="float">
            <text:p>21.1660104885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SQRT([.A451])" office:value-type="float" office:value="21.1896201004171" calcext:value-type="float">
            <text:p>21.1896201004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SQRT([.A452])" office:value-type="float" office:value="21.2132034355964" calcext:value-type="float">
            <text:p>21.2132034355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SQRT([.A453])" office:value-type="float" office:value="21.2367605815953" calcext:value-type="float">
            <text:p>21.2367605815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SQRT([.A454])" office:value-type="float" office:value="21.2602916254693" calcext:value-type="float">
            <text:p>21.2602916254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SQRT([.A455])" office:value-type="float" office:value="21.2837966537928" calcext:value-type="float">
            <text:p>21.2837966537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SQRT([.A456])" office:value-type="float" office:value="21.3072757526625" calcext:value-type="float">
            <text:p>21.3072757526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SQRT([.A457])" office:value-type="float" office:value="21.3307290077015" calcext:value-type="float">
            <text:p>21.3307290077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SQRT([.A458])" office:value-type="float" office:value="21.3541565040626" calcext:value-type="float">
            <text:p>21.3541565040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SQRT([.A459])" office:value-type="float" office:value="21.377558326432" calcext:value-type="float">
            <text:p>21.377558326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SQRT([.A460])" office:value-type="float" office:value="21.4009345590327" calcext:value-type="float">
            <text:p>21.40093455903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SQRT([.A461])" office:value-type="float" office:value="21.4242852856286" calcext:value-type="float">
            <text:p>21.424285285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SQRT([.A462])" office:value-type="float" office:value="21.4476105895272" calcext:value-type="float">
            <text:p>21.4476105895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SQRT([.A463])" office:value-type="float" office:value="21.4709105535839" calcext:value-type="float">
            <text:p>21.4709105535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SQRT([.A464])" office:value-type="float" office:value="21.4941852602047" calcext:value-type="float">
            <text:p>21.494185260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SQRT([.A465])" office:value-type="float" office:value="21.51743479135" calcext:value-type="float">
            <text:p>21.51743479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SQRT([.A466])" office:value-type="float" office:value="21.540659228538" calcext:value-type="float">
            <text:p>21.540659228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SQRT([.A467])" office:value-type="float" office:value="21.5638586528478" calcext:value-type="float">
            <text:p>21.5638586528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SQRT([.A468])" office:value-type="float" office:value="21.5870331449229" calcext:value-type="float">
            <text:p>21.587033144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SQRT([.A469])" office:value-type="float" office:value="21.6101827849743" calcext:value-type="float">
            <text:p>21.610182784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SQRT([.A470])" office:value-type="float" office:value="21.6333076527839" calcext:value-type="float">
            <text:p>21.6333076527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SQRT([.A471])" office:value-type="float" office:value="21.6564078277077" calcext:value-type="float">
            <text:p>21.6564078277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SQRT([.A472])" office:value-type="float" office:value="21.6794833886788" calcext:value-type="float">
            <text:p>21.6794833886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SQRT([.A473])" office:value-type="float" office:value="21.7025344142107" calcext:value-type="float">
            <text:p>21.702534414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SQRT([.A474])" office:value-type="float" office:value="21.7255609824004" calcext:value-type="float">
            <text:p>21.7255609824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SQRT([.A475])" office:value-type="float" office:value="21.7485631709315" calcext:value-type="float">
            <text:p>21.7485631709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SQRT([.A476])" office:value-type="float" office:value="21.7715410570772" calcext:value-type="float">
            <text:p>21.7715410570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SQRT([.A477])" office:value-type="float" office:value="21.7944947177034" calcext:value-type="float">
            <text:p>21.7944947177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SQRT([.A478])" office:value-type="float" office:value="21.8174242292714" calcext:value-type="float">
            <text:p>21.8174242292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SQRT([.A479])" office:value-type="float" office:value="21.8403296678416" calcext:value-type="float">
            <text:p>21.8403296678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SQRT([.A480])" office:value-type="float" office:value="21.8632111090754" calcext:value-type="float">
            <text:p>21.863211109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SQRT([.A481])" office:value-type="float" office:value="21.8860686282393" calcext:value-type="float">
            <text:p>21.886068628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SQRT([.A482])" office:value-type="float" office:value="21.9089023002066" calcext:value-type="float">
            <text:p>21.908902300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SQRT([.A483])" office:value-type="float" office:value="21.9317121994613" calcext:value-type="float">
            <text:p>21.9317121994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SQRT([.A484])" office:value-type="float" office:value="21.9544984001002" calcext:value-type="float">
            <text:p>21.954498400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SQRT([.A485])" office:value-type="float" office:value="21.9772609758359" calcext:value-type="float">
            <text:p>21.9772609758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SQRT([.A486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SQRT([.A487])" office:value-type="float" office:value="22.0227155455452" calcext:value-type="float">
            <text:p>22.0227155455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SQRT([.A488])" office:value-type="float" office:value="22.0454076850486" calcext:value-type="float">
            <text:p>22.045407685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SQRT([.A489])" office:value-type="float" office:value="22.0680764907139" calcext:value-type="float">
            <text:p>22.0680764907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SQRT([.A490])" office:value-type="float" office:value="22.0907220343745" calcext:value-type="float">
            <text:p>22.0907220343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SQRT([.A491])" office:value-type="float" office:value="22.113344387496" calcext:value-type="float">
            <text:p>22.113344387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SQRT([.A492])" office:value-type="float" office:value="22.1359436211787" calcext:value-type="float">
            <text:p>22.135943621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SQRT([.A493])" office:value-type="float" office:value="22.1585198061603" calcext:value-type="float">
            <text:p>22.1585198061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SQRT([.A494])" office:value-type="float" office:value="22.1810730128188" calcext:value-type="float">
            <text:p>22.181073012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SQRT([.A495])" office:value-type="float" office:value="22.2036033111745" calcext:value-type="float">
            <text:p>22.203603311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SQRT([.A496])" office:value-type="float" office:value="22.2261107708929" calcext:value-type="float">
            <text:p>22.2261107708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SQRT([.A497])" office:value-type="float" office:value="22.248595461287" calcext:value-type="float">
            <text:p>22.248595461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SQRT([.A498])" office:value-type="float" office:value="22.2710574513201" calcext:value-type="float">
            <text:p>22.2710574513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SQRT([.A499])" office:value-type="float" office:value="22.293496809608" calcext:value-type="float">
            <text:p>22.293496809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SQRT([.A500])" office:value-type="float" office:value="22.3159136044214" calcext:value-type="float">
            <text:p>22.3159136044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SQRT([.A501])" office:value-type="float" office:value="22.3383079036887" calcext:value-type="float">
            <text:p>22.3383079036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502])" office:value-type="float" office:value="22.3606797749979" calcext:value-type="float">
            <text:p>22.3606797749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SQRT([.A503])" office:value-type="float" office:value="22.3830292855994" calcext:value-type="float">
            <text:p>22.3830292855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SQRT([.A504])" office:value-type="float" office:value="22.4053565024081" calcext:value-type="float">
            <text:p>22.4053565024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SQRT([.A505])" office:value-type="float" office:value="22.4276614920058" calcext:value-type="float">
            <text:p>22.427661492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SQRT([.A506])" office:value-type="float" office:value="22.4499443206437" calcext:value-type="float">
            <text:p>22.4499443206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SQRT([.A507])" office:value-type="float" office:value="22.4722050542442" calcext:value-type="float">
            <text:p>22.4722050542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SQRT([.A508])" office:value-type="float" office:value="22.494443758404" calcext:value-type="float">
            <text:p>22.494443758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SQRT([.A509])" office:value-type="float" office:value="22.5166604983954" calcext:value-type="float">
            <text:p>22.5166604983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SQRT([.A510])" office:value-type="float" office:value="22.5388553391693" calcext:value-type="float">
            <text:p>22.5388553391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SQRT([.A511])" office:value-type="float" office:value="22.561028345357" calcext:value-type="float">
            <text:p>22.561028345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SQRT([.A512])" office:value-type="float" office:value="22.5831795812724" calcext:value-type="float">
            <text:p>22.5831795812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SQRT([.A513])" office:value-type="float" office:value="22.6053091109146" calcext:value-type="float">
            <text:p>22.6053091109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SQRT([.A514])" office:value-type="float" office:value="22.6274169979695" calcext:value-type="float">
            <text:p>22.627416997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SQRT([.A515])" office:value-type="float" office:value="22.6495033058123" calcext:value-type="float">
            <text:p>22.6495033058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SQRT([.A516])" office:value-type="float" office:value="22.6715680975093" calcext:value-type="float">
            <text:p>22.6715680975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SQRT([.A517])" office:value-type="float" office:value="22.6936114358204" calcext:value-type="float">
            <text:p>22.693611435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SQRT([.A518])" office:value-type="float" office:value="22.7156333832011" calcext:value-type="float">
            <text:p>22.715633383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QRT([.A519])" office:value-type="float" office:value="22.7376340018041" calcext:value-type="float">
            <text:p>22.7376340018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SQRT([.A520])" office:value-type="float" office:value="22.7596133534821" calcext:value-type="float">
            <text:p>22.7596133534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SQRT([.A521])" office:value-type="float" office:value="22.781571499789" calcext:value-type="float">
            <text:p>22.781571499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SQRT([.A522])" office:value-type="float" office:value="22.8035085019828" calcext:value-type="float">
            <text:p>22.8035085019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SQRT([.A523])" office:value-type="float" office:value="22.8254244210267" calcext:value-type="float">
            <text:p>22.8254244210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SQRT([.A524])" office:value-type="float" office:value="22.8473193175917" calcext:value-type="float">
            <text:p>22.8473193175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SQRT([.A525])" office:value-type="float" office:value="22.8691932520585" calcext:value-type="float">
            <text:p>22.8691932520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SQRT([.A526])" office:value-type="float" office:value="22.8910462845192" calcext:value-type="float">
            <text:p>22.8910462845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SQRT([.A527])" office:value-type="float" office:value="22.9128784747792" calcext:value-type="float">
            <text:p>22.9128784747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SQRT([.A528])" office:value-type="float" office:value="22.9346898823594" calcext:value-type="float">
            <text:p>22.9346898823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SQRT([.A529])" office:value-type="float" office:value="22.956480566498" calcext:value-type="float">
            <text:p>22.956480566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SQRT([.A530])" office:value-type="float" office:value="22.9782505861521" calcext:value-type="float">
            <text:p>22.978250586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SQRT([.A531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SQRT([.A532])" office:value-type="float" office:value="23.0217288664427" calcext:value-type="float">
            <text:p>23.0217288664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SQRT([.A533])" office:value-type="float" office:value="23.0434372436058" calcext:value-type="float">
            <text:p>23.043437243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SQRT([.A534])" office:value-type="float" office:value="23.0651251893416" calcext:value-type="float">
            <text:p>23.065125189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SQRT([.A535])" office:value-type="float" office:value="23.0867927612304" calcext:value-type="float">
            <text:p>23.0867927612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SQRT([.A536])" office:value-type="float" office:value="23.1084400165827" calcext:value-type="float">
            <text:p>23.1084400165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SQRT([.A537])" office:value-type="float" office:value="23.1300670124408" calcext:value-type="float">
            <text:p>23.1300670124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SQRT([.A538])" office:value-type="float" office:value="23.1516738055805" calcext:value-type="float">
            <text:p>23.1516738055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SQRT([.A539])" office:value-type="float" office:value="23.1732604525129" calcext:value-type="float">
            <text:p>23.1732604525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SQRT([.A540])" office:value-type="float" office:value="23.1948270094864" calcext:value-type="float">
            <text:p>23.1948270094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SQRT([.A541])" office:value-type="float" office:value="23.2163735324878" calcext:value-type="float">
            <text:p>23.2163735324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SQRT([.A542])" office:value-type="float" office:value="23.2379000772445" calcext:value-type="float">
            <text:p>23.237900077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SQRT([.A543])" office:value-type="float" office:value="23.259406699226" calcext:value-type="float">
            <text:p>23.259406699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SQRT([.A544])" office:value-type="float" office:value="23.2808934536456" calcext:value-type="float">
            <text:p>23.2808934536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SQRT([.A545])" office:value-type="float" office:value="23.3023603954621" calcext:value-type="float">
            <text:p>23.302360395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SQRT([.A546])" office:value-type="float" office:value="23.3238075793812" calcext:value-type="float">
            <text:p>23.3238075793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SQRT([.A547])" office:value-type="float" office:value="23.3452350598575" calcext:value-type="float">
            <text:p>23.3452350598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SQRT([.A548])" office:value-type="float" office:value="23.3666428910958" calcext:value-type="float">
            <text:p>23.3666428910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SQRT([.A549])" office:value-type="float" office:value="23.388031127053" calcext:value-type="float">
            <text:p>23.388031127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SQRT([.A550])" office:value-type="float" office:value="23.4093998214393" calcext:value-type="float">
            <text:p>23.4093998214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SQRT([.A551])" office:value-type="float" office:value="23.43074902772" calcext:value-type="float">
            <text:p>23.43074902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SQRT([.A552])" office:value-type="float" office:value="23.4520787991172" calcext:value-type="float">
            <text:p>23.452078799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SQRT([.A553])" office:value-type="float" office:value="23.473389188611" calcext:value-type="float">
            <text:p>23.473389188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SQRT([.A554])" office:value-type="float" office:value="23.4946802489415" calcext:value-type="float">
            <text:p>23.4946802489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SQRT([.A555])" office:value-type="float" office:value="23.5159520326097" calcext:value-type="float">
            <text:p>23.5159520326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SQRT([.A556])" office:value-type="float" office:value="23.5372045918796" calcext:value-type="float">
            <text:p>23.5372045918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SQRT([.A557])" office:value-type="float" office:value="23.5584379787795" calcext:value-type="float">
            <text:p>23.5584379787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SQRT([.A558])" office:value-type="float" office:value="23.5796522451032" calcext:value-type="float">
            <text:p>23.579652245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SQRT([.A559])" office:value-type="float" office:value="23.6008474424119" calcext:value-type="float">
            <text:p>23.6008474424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SQRT([.A560])" office:value-type="float" office:value="23.6220236220354" calcext:value-type="float">
            <text:p>23.6220236220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SQRT([.A561])" office:value-type="float" office:value="23.6431808350738" calcext:value-type="float">
            <text:p>23.6431808350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SQRT([.A562])" office:value-type="float" office:value="23.6643191323985" calcext:value-type="float">
            <text:p>23.6643191323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SQRT([.A563])" office:value-type="float" office:value="23.685438564654" calcext:value-type="float">
            <text:p>23.685438564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SQRT([.A564])" office:value-type="float" office:value="23.7065391822594" calcext:value-type="float">
            <text:p>23.706539182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SQRT([.A565])" office:value-type="float" office:value="23.7276210354093" calcext:value-type="float">
            <text:p>23.7276210354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SQRT([.A566])" office:value-type="float" office:value="23.7486841740758" calcext:value-type="float">
            <text:p>23.748684174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SQRT([.A567])" office:value-type="float" office:value="23.7697286480094" calcext:value-type="float">
            <text:p>23.7697286480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SQRT([.A568])" office:value-type="float" office:value="23.7907545067406" calcext:value-type="float">
            <text:p>23.790754506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SQRT([.A569])" office:value-type="float" office:value="23.8117617995813" calcext:value-type="float">
            <text:p>23.8117617995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SQRT([.A570])" office:value-type="float" office:value="23.832750575626" calcext:value-type="float">
            <text:p>23.832750575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SQRT([.A571])" office:value-type="float" office:value="23.8537208837531" calcext:value-type="float">
            <text:p>23.8537208837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SQRT([.A572])" office:value-type="float" office:value="23.8746727726266" calcext:value-type="float">
            <text:p>23.874672772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SQRT([.A573])" office:value-type="float" office:value="23.895606290697" calcext:value-type="float">
            <text:p>23.895606290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SQRT([.A574])" office:value-type="float" office:value="23.9165214862028" calcext:value-type="float">
            <text:p>23.916521486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SQRT([.A575])" office:value-type="float" office:value="23.9374184071717" calcext:value-type="float">
            <text:p>23.9374184071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SQRT([.A576])" office:value-type="float" office:value="23.9582971014219" calcext:value-type="float">
            <text:p>23.9582971014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SQRT([.A577])" office:value-type="float" office:value="23.9791576165636" calcext:value-type="float">
            <text:p>23.9791576165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SQRT([.A57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SQRT([.A579])" office:value-type="float" office:value="24.0208242989286" calcext:value-type="float">
            <text:p>24.0208242989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SQRT([.A580])" office:value-type="float" office:value="24.0416305603426" calcext:value-type="float">
            <text:p>24.0416305603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SQRT([.A581])" office:value-type="float" office:value="24.0624188310319" calcext:value-type="float">
            <text:p>24.0624188310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SQRT([.A582])" office:value-type="float" office:value="24.0831891575846" calcext:value-type="float">
            <text:p>24.0831891575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SQRT([.A583])" office:value-type="float" office:value="24.1039415863879" calcext:value-type="float">
            <text:p>24.103941586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SQRT([.A584])" office:value-type="float" office:value="24.1246761636296" calcext:value-type="float">
            <text:p>24.1246761636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SQRT([.A585])" office:value-type="float" office:value="24.1453929352993" calcext:value-type="float">
            <text:p>24.145392935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SQRT([.A586])" office:value-type="float" office:value="24.1660919471891" calcext:value-type="float">
            <text:p>24.1660919471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SQRT([.A587])" office:value-type="float" office:value="24.1867732448956" calcext:value-type="float">
            <text:p>24.1867732448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SQRT([.A588])" office:value-type="float" office:value="24.2074368738204" calcext:value-type="float">
            <text:p>24.2074368738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SQRT([.A589])" office:value-type="float" office:value="24.2280828791714" calcext:value-type="float">
            <text:p>24.2280828791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SQRT([.A590])" office:value-type="float" office:value="24.2487113059643" calcext:value-type="float">
            <text:p>24.248711305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SQRT([.A591])" office:value-type="float" office:value="24.2693221990232" calcext:value-type="float">
            <text:p>24.2693221990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SQRT([.A592])" office:value-type="float" office:value="24.2899156029822" calcext:value-type="float">
            <text:p>24.2899156029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SQRT([.A593])" office:value-type="float" office:value="24.3104915622864" calcext:value-type="float">
            <text:p>24.310491562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SQRT([.A594])" office:value-type="float" office:value="24.3310501211929" calcext:value-type="float">
            <text:p>24.3310501211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SQRT([.A595])" office:value-type="float" office:value="24.3515913237718" calcext:value-type="float">
            <text:p>24.3515913237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SQRT([.A596])" office:value-type="float" office:value="24.3721152139079" calcext:value-type="float">
            <text:p>24.372115213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SQRT([.A597])" office:value-type="float" office:value="24.3926218353009" calcext:value-type="float">
            <text:p>24.392621835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SQRT([.A598])" office:value-type="float" office:value="24.4131112314674" calcext:value-type="float">
            <text:p>24.4131112314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SQRT([.A599])" office:value-type="float" office:value="24.4335834457412" calcext:value-type="float">
            <text:p>24.4335834457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SQRT([.A600])" office:value-type="float" office:value="24.454038521275" calcext:value-type="float">
            <text:p>24.454038521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SQRT([.A601])" office:value-type="float" office:value="24.4744765010408" calcext:value-type="float">
            <text:p>24.4744765010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SQRT([.A602])" office:value-type="float" office:value="24.4948974278318" calcext:value-type="float">
            <text:p>24.4948974278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SQRT([.A603])" office:value-type="float" office:value="24.5153013442625" calcext:value-type="float">
            <text:p>24.5153013442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SQRT([.A604])" office:value-type="float" office:value="24.5356882927706" calcext:value-type="float">
            <text:p>24.5356882927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SQRT([.A605])" office:value-type="float" office:value="24.5560583156174" calcext:value-type="float">
            <text:p>24.5560583156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SQRT([.A606])" office:value-type="float" office:value="24.576411454889" calcext:value-type="float">
            <text:p>24.576411454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SQRT([.A607])" office:value-type="float" office:value="24.5967477524977" calcext:value-type="float">
            <text:p>24.5967477524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SQRT([.A608])" office:value-type="float" office:value="24.6170672501823" calcext:value-type="float">
            <text:p>24.617067250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SQRT([.A609])" office:value-type="float" office:value="24.6373699895098" calcext:value-type="float">
            <text:p>24.6373699895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SQRT([.A610])" office:value-type="float" office:value="24.6576560118759" calcext:value-type="float">
            <text:p>24.6576560118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SQRT([.A611])" office:value-type="float" office:value="24.6779253585061" calcext:value-type="float">
            <text:p>24.6779253585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SQRT([.A612])" office:value-type="float" office:value="24.6981780704569" calcext:value-type="float">
            <text:p>24.6981780704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SQRT([.A613])" office:value-type="float" office:value="24.7184141886166" calcext:value-type="float">
            <text:p>24.7184141886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SQRT([.A614])" office:value-type="float" office:value="24.738633753706" calcext:value-type="float">
            <text:p>24.738633753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SQRT([.A615])" office:value-type="float" office:value="24.7588368062799" calcext:value-type="float">
            <text:p>24.7588368062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SQRT([.A616])" office:value-type="float" office:value="24.7790233867277" calcext:value-type="float">
            <text:p>24.7790233867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SQRT([.A617])" office:value-type="float" office:value="24.7991935352745" calcext:value-type="float">
            <text:p>24.799193535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SQRT([.A618])" office:value-type="float" office:value="24.8193472919817" calcext:value-type="float">
            <text:p>24.8193472919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SQRT([.A619])" office:value-type="float" office:value="24.8394846967484" calcext:value-type="float">
            <text:p>24.8394846967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SQRT([.A620])" office:value-type="float" office:value="24.8596057893121" calcext:value-type="float">
            <text:p>24.8596057893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SQRT([.A621])" office:value-type="float" office:value="24.8797106092495" calcext:value-type="float">
            <text:p>24.879710609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SQRT([.A622])" office:value-type="float" office:value="24.8997991959775" calcext:value-type="float">
            <text:p>24.8997991959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SQRT([.A623])" office:value-type="float" office:value="24.9198715887542" calcext:value-type="float">
            <text:p>24.9198715887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SQRT([.A624])" office:value-type="float" office:value="24.9399278266799" calcext:value-type="float">
            <text:p>24.9399278266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SQRT([.A625])" office:value-type="float" office:value="24.9599679486974" calcext:value-type="float">
            <text:p>24.959967948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SQRT([.A626])" office:value-type="float" office:value="24.9799919935936" calcext:value-type="float">
            <text:p>24.9799919935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SQRT([.A627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SQRT([.A628])" office:value-type="float" office:value="25.0199920063936" calcext:value-type="float">
            <text:p>25.0199920063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SQRT([.A629])" office:value-type="float" office:value="25.0399680510978" calcext:value-type="float">
            <text:p>25.039968051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SQRT([.A630])" office:value-type="float" office:value="25.0599281722833" calcext:value-type="float">
            <text:p>25.059928172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SQRT([.A631])" office:value-type="float" office:value="25.0798724079689" calcext:value-type="float">
            <text:p>25.0798724079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SQRT([.A632])" office:value-type="float" office:value="25.0998007960223" calcext:value-type="float">
            <text:p>25.099800796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SQRT([.A633])" office:value-type="float" office:value="25.1197133741609" calcext:value-type="float">
            <text:p>25.119713374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SQRT([.A634])" office:value-type="float" office:value="25.1396101799531" calcext:value-type="float">
            <text:p>25.1396101799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SQRT([.A635])" office:value-type="float" office:value="25.1594912508183" calcext:value-type="float">
            <text:p>25.159491250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SQRT([.A636])" office:value-type="float" office:value="25.1793566240283" calcext:value-type="float">
            <text:p>25.1793566240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SQRT([.A637])" office:value-type="float" office:value="25.1992063367083" calcext:value-type="float">
            <text:p>25.1992063367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SQRT([.A638])" office:value-type="float" office:value="25.219040425837" calcext:value-type="float">
            <text:p>25.219040425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SQRT([.A639])" office:value-type="float" office:value="25.2388589282479" calcext:value-type="float">
            <text:p>25.238858928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SQRT([.A640])" office:value-type="float" office:value="25.2586618806302" calcext:value-type="float">
            <text:p>25.2586618806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SQRT([.A641])" office:value-type="float" office:value="25.2784493195291" calcext:value-type="float">
            <text:p>25.2784493195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SQRT([.A642])" office:value-type="float" office:value="25.298221281347" calcext:value-type="float">
            <text:p>25.2982212813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SQRT([.A643])" office:value-type="float" office:value="25.3179778023443" calcext:value-type="float">
            <text:p>25.3179778023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SQRT([.A644])" office:value-type="float" office:value="25.3377189186399" calcext:value-type="float">
            <text:p>25.3377189186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SQRT([.A645])" office:value-type="float" office:value="25.3574446662119" calcext:value-type="float">
            <text:p>25.3574446662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SQRT([.A646])" office:value-type="float" office:value="25.377155080899" calcext:value-type="float">
            <text:p>25.37715508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SQRT([.A647])" office:value-type="float" office:value="25.3968501984006" calcext:value-type="float">
            <text:p>25.3968501984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SQRT([.A648])" office:value-type="float" office:value="25.4165300542777" calcext:value-type="float">
            <text:p>25.416530054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SQRT([.A649])" office:value-type="float" office:value="25.4361946839538" calcext:value-type="float">
            <text:p>25.4361946839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SQRT([.A650])" office:value-type="float" office:value="25.4558441227157" calcext:value-type="float">
            <text:p>25.4558441227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SQRT([.A651])" office:value-type="float" office:value="25.475478405714" calcext:value-type="float">
            <text:p>25.47547840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SQRT([.A652])" office:value-type="float" office:value="25.4950975679639" calcext:value-type="float">
            <text:p>25.4950975679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SQRT([.A653])" office:value-type="float" office:value="25.5147016443461" calcext:value-type="float">
            <text:p>25.5147016443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SQRT([.A654])" office:value-type="float" office:value="25.5342906696074" calcext:value-type="float">
            <text:p>25.5342906696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SQRT([.A655])" office:value-type="float" office:value="25.5538646783613" calcext:value-type="float">
            <text:p>25.5538646783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SQRT([.A656])" office:value-type="float" office:value="25.5734237050888" calcext:value-type="float">
            <text:p>25.573423705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SQRT([.A657])" office:value-type="float" office:value="25.5929677841395" calcext:value-type="float">
            <text:p>25.5929677841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SQRT([.A658])" office:value-type="float" office:value="25.6124969497314" calcext:value-type="float">
            <text:p>25.6124969497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SQRT([.A659])" office:value-type="float" office:value="25.6320112359526" calcext:value-type="float">
            <text:p>25.6320112359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SQRT([.A660])" office:value-type="float" office:value="25.6515106767613" calcext:value-type="float">
            <text:p>25.6515106767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SQRT([.A661])" office:value-type="float" office:value="25.6709953059869" calcext:value-type="float">
            <text:p>25.6709953059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SQRT([.A662])" office:value-type="float" office:value="25.6904651573303" calcext:value-type="float">
            <text:p>25.6904651573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SQRT([.A663])" office:value-type="float" office:value="25.7099202643649" calcext:value-type="float">
            <text:p>25.7099202643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SQRT([.A664])" office:value-type="float" office:value="25.7293606605372" calcext:value-type="float">
            <text:p>25.7293606605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SQRT([.A665])" office:value-type="float" office:value="25.7487863791675" calcext:value-type="float">
            <text:p>25.748786379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SQRT([.A666])" office:value-type="float" office:value="25.7681974534503" calcext:value-type="float">
            <text:p>25.7681974534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SQRT([.A667])" office:value-type="float" office:value="25.7875939164553" calcext:value-type="float">
            <text:p>25.7875939164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SQRT([.A668])" office:value-type="float" office:value="25.8069758011279" calcext:value-type="float">
            <text:p>25.8069758011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SQRT([.A669])" office:value-type="float" office:value="25.8263431402899" calcext:value-type="float">
            <text:p>25.82634314028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SQRT([.A670])" office:value-type="float" office:value="25.8456959666402" calcext:value-type="float">
            <text:p>25.8456959666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SQRT([.A671])" office:value-type="float" office:value="25.8650343127551" calcext:value-type="float">
            <text:p>25.8650343127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SQRT([.A672])" office:value-type="float" office:value="25.8843582110896" calcext:value-type="float">
            <text:p>25.8843582110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SQRT([.A673])" office:value-type="float" office:value="25.9036676939772" calcext:value-type="float">
            <text:p>25.9036676939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SQRT([.A674])" office:value-type="float" office:value="25.9229627936314" calcext:value-type="float">
            <text:p>25.9229627936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SQRT([.A675])" office:value-type="float" office:value="25.9422435421457" calcext:value-type="float">
            <text:p>25.9422435421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SQRT([.A676])" office:value-type="float" office:value="25.9615099714943" calcext:value-type="float">
            <text:p>25.9615099714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SQRT([.A677])" office:value-type="float" office:value="25.9807621135332" calcext:value-type="float">
            <text:p>25.9807621135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SQRT([.A678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SQRT([.A679])" office:value-type="float" office:value="26.0192236625154" calcext:value-type="float">
            <text:p>26.0192236625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SQRT([.A680])" office:value-type="float" office:value="26.0384331325831" calcext:value-type="float">
            <text:p>26.0384331325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SQRT([.A681])" office:value-type="float" office:value="26.0576284415908" calcext:value-type="float">
            <text:p>26.0576284415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SQRT([.A682])" office:value-type="float" office:value="26.0768096208106" calcext:value-type="float">
            <text:p>26.0768096208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SQRT([.A683])" office:value-type="float" office:value="26.0959767013998" calcext:value-type="float">
            <text:p>26.0959767013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SQRT([.A684])" office:value-type="float" office:value="26.1151297144012" calcext:value-type="float">
            <text:p>26.1151297144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SQRT([.A685])" office:value-type="float" office:value="26.134268690744" calcext:value-type="float">
            <text:p>26.13426869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SQRT([.A686])" office:value-type="float" office:value="26.153393661244" calcext:value-type="float">
            <text:p>26.153393661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SQRT([.A687])" office:value-type="float" office:value="26.1725046566048" calcext:value-type="float">
            <text:p>26.1725046566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SQRT([.A688])" office:value-type="float" office:value="26.1916017074176" calcext:value-type="float">
            <text:p>26.1916017074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SQRT([.A689])" office:value-type="float" office:value="26.2106848441623" calcext:value-type="float">
            <text:p>26.210684844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SQRT([.A690])" office:value-type="float" office:value="26.229754097208" calcext:value-type="float">
            <text:p>26.229754097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SQRT([.A691])" office:value-type="float" office:value="26.2488094968134" calcext:value-type="float">
            <text:p>26.2488094968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SQRT([.A692])" office:value-type="float" office:value="26.2678510731274" calcext:value-type="float">
            <text:p>26.2678510731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SQRT([.A693])" office:value-type="float" office:value="26.2868788561898" calcext:value-type="float">
            <text:p>26.2868788561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SQRT([.A694])" office:value-type="float" office:value="26.3058928759318" calcext:value-type="float">
            <text:p>26.305892875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SQRT([.A695])" office:value-type="float" office:value="26.3248931621764" calcext:value-type="float">
            <text:p>26.3248931621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SQRT([.A696])" office:value-type="float" office:value="26.343879744639" calcext:value-type="float">
            <text:p>26.343879744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SQRT([.A697])" office:value-type="float" office:value="26.3628526529281" calcext:value-type="float">
            <text:p>26.3628526529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SQRT([.A698])" office:value-type="float" office:value="26.3818119165458" calcext:value-type="float">
            <text:p>26.3818119165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SQRT([.A699])" office:value-type="float" office:value="26.4007575648882" calcext:value-type="float">
            <text:p>26.4007575648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SQRT([.A700])" office:value-type="float" office:value="26.4196896272458" calcext:value-type="float">
            <text:p>26.419689627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SQRT([.A701])" office:value-type="float" office:value="26.4386081328046" calcext:value-type="float">
            <text:p>26.438608132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SQRT([.A702])" office:value-type="float" office:value="26.4575131106459" calcext:value-type="float">
            <text:p>26.4575131106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SQRT([.A703])" office:value-type="float" office:value="26.4764045897475" calcext:value-type="float">
            <text:p>26.4764045897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SQRT([.A704])" office:value-type="float" office:value="26.4952825989835" calcext:value-type="float">
            <text:p>26.4952825989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SQRT([.A705])" office:value-type="float" office:value="26.5141471671257" calcext:value-type="float">
            <text:p>26.5141471671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SQRT([.A706])" office:value-type="float" office:value="26.5329983228432" calcext:value-type="float">
            <text:p>26.532998322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SQRT([.A707])" office:value-type="float" office:value="26.5518360947035" calcext:value-type="float">
            <text:p>26.5518360947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SQRT([.A708])" office:value-type="float" office:value="26.5706605111728" calcext:value-type="float">
            <text:p>26.5706605111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SQRT([.A709])" office:value-type="float" office:value="26.5894716006167" calcext:value-type="float">
            <text:p>26.5894716006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SQRT([.A710])" office:value-type="float" office:value="26.6082693913001" calcext:value-type="float">
            <text:p>26.608269391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SQRT([.A711])" office:value-type="float" office:value="26.6270539113887" calcext:value-type="float">
            <text:p>26.6270539113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SQRT([.A712])" office:value-type="float" office:value="26.6458251889485" calcext:value-type="float">
            <text:p>26.6458251889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SQRT([.A713])" office:value-type="float" office:value="26.6645832519468" calcext:value-type="float">
            <text:p>26.6645832519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SQRT([.A714])" office:value-type="float" office:value="26.6833281282527" calcext:value-type="float">
            <text:p>26.6833281282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SQRT([.A715])" office:value-type="float" office:value="26.7020598456374" calcext:value-type="float">
            <text:p>26.7020598456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SQRT([.A716])" office:value-type="float" office:value="26.7207784317748" calcext:value-type="float">
            <text:p>26.7207784317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SQRT([.A717])" office:value-type="float" office:value="26.7394839142419" calcext:value-type="float">
            <text:p>26.7394839142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SQRT([.A718])" office:value-type="float" office:value="26.7581763205193" calcext:value-type="float">
            <text:p>26.7581763205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SQRT([.A719])" office:value-type="float" office:value="26.7768556779918" calcext:value-type="float">
            <text:p>26.7768556779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SQRT([.A720])" office:value-type="float" office:value="26.7955220139485" calcext:value-type="float">
            <text:p>26.7955220139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SQRT([.A721])" office:value-type="float" office:value="26.8141753555838" calcext:value-type="float">
            <text:p>26.8141753555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SQRT([.A722])" office:value-type="float" office:value="26.8328157299975" calcext:value-type="float">
            <text:p>26.83281572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SQRT([.A723])" office:value-type="float" office:value="26.8514431641951" calcext:value-type="float">
            <text:p>26.8514431641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SQRT([.A724])" office:value-type="float" office:value="26.8700576850888" calcext:value-type="float">
            <text:p>26.8700576850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SQRT([.A725])" office:value-type="float" office:value="26.8886593194975" calcext:value-type="float">
            <text:p>26.888659319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SQRT([.A726])" office:value-type="float" office:value="26.9072480941474" calcext:value-type="float">
            <text:p>26.9072480941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SQRT([.A727])" office:value-type="float" office:value="26.9258240356725" calcext:value-type="float">
            <text:p>26.9258240356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SQRT([.A728])" office:value-type="float" office:value="26.944387170615" calcext:value-type="float">
            <text:p>26.94438717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SQRT([.A729])" office:value-type="float" office:value="26.9629375254255" calcext:value-type="float">
            <text:p>26.9629375254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SQRT([.A730])" office:value-type="float" office:value="26.9814751264641" calcext:value-type="float">
            <text:p>26.9814751264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SQRT([.A731]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SQRT([.A732])" office:value-type="float" office:value="27.0185121722126" calcext:value-type="float">
            <text:p>27.018512172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SQRT([.A733])" office:value-type="float" office:value="27.0370116691916" calcext:value-type="float">
            <text:p>27.037011669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SQRT([.A734])" office:value-type="float" office:value="27.0554985169374" calcext:value-type="float">
            <text:p>27.0554985169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SQRT([.A735])" office:value-type="float" office:value="27.0739727413618" calcext:value-type="float">
            <text:p>27.0739727413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SQRT([.A736])" office:value-type="float" office:value="27.0924343682881" calcext:value-type="float">
            <text:p>27.092434368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SQRT([.A737])" office:value-type="float" office:value="27.1108834234519" calcext:value-type="float">
            <text:p>27.1108834234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SQRT([.A738])" office:value-type="float" office:value="27.1293199325011" calcext:value-type="float">
            <text:p>27.1293199325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SQRT([.A739])" office:value-type="float" office:value="27.1477439209965" calcext:value-type="float">
            <text:p>27.147743920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SQRT([.A740])" office:value-type="float" office:value="27.1661554144123" calcext:value-type="float">
            <text:p>27.166155414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SQRT([.A741])" office:value-type="float" office:value="27.1845544381364" calcext:value-type="float">
            <text:p>27.184554438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SQRT([.A742])" office:value-type="float" office:value="27.2029410174709" calcext:value-type="float">
            <text:p>27.2029410174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SQRT([.A743])" office:value-type="float" office:value="27.2213151776324" calcext:value-type="float">
            <text:p>27.2213151776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SQRT([.A744])" office:value-type="float" office:value="27.2396769437525" calcext:value-type="float">
            <text:p>27.2396769437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SQRT([.A745])" office:value-type="float" office:value="27.258026340878" calcext:value-type="float">
            <text:p>27.25802634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SQRT([.A746])" office:value-type="float" office:value="27.2763633939717" calcext:value-type="float">
            <text:p>27.2763633939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SQRT([.A747])" office:value-type="float" office:value="27.2946881279124" calcext:value-type="float">
            <text:p>27.2946881279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SQRT([.A748])" office:value-type="float" office:value="27.3130005674953" calcext:value-type="float">
            <text:p>27.3130005674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SQRT([.A749])" office:value-type="float" office:value="27.3313007374329" calcext:value-type="float">
            <text:p>27.3313007374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SQRT([.A750])" office:value-type="float" office:value="27.3495886623547" calcext:value-type="float">
            <text:p>27.349588662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SQRT([.A751])" office:value-type="float" office:value="27.367864366808" calcext:value-type="float">
            <text:p>27.367864366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SQRT([.A752])" office:value-type="float" office:value="27.3861278752583" calcext:value-type="float">
            <text:p>27.3861278752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SQRT([.A753])" office:value-type="float" office:value="27.4043792120894" calcext:value-type="float">
            <text:p>27.404379212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SQRT([.A754])" office:value-type="float" office:value="27.4226184016042" calcext:value-type="float">
            <text:p>27.4226184016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SQRT([.A755])" office:value-type="float" office:value="27.4408454680245" calcext:value-type="float">
            <text:p>27.4408454680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SQRT([.A756])" office:value-type="float" office:value="27.459060435492" calcext:value-type="float">
            <text:p>27.459060435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SQRT([.A757])" office:value-type="float" office:value="27.4772633280682" calcext:value-type="float">
            <text:p>27.4772633280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SQRT([.A758])" office:value-type="float" office:value="27.495454169735" calcext:value-type="float">
            <text:p>27.495454169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SQRT([.A759])" office:value-type="float" office:value="27.5136329843952" calcext:value-type="float">
            <text:p>27.5136329843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SQRT([.A760])" office:value-type="float" office:value="27.5317997958724" calcext:value-type="float">
            <text:p>27.5317997958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SQRT([.A761])" office:value-type="float" office:value="27.5499546279118" calcext:value-type="float">
            <text:p>27.5499546279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SQRT([.A762])" office:value-type="float" office:value="27.5680975041804" calcext:value-type="float">
            <text:p>27.5680975041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SQRT([.A763])" office:value-type="float" office:value="27.5862284482674" calcext:value-type="float">
            <text:p>27.586228448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SQRT([.A764])" office:value-type="float" office:value="27.6043474836845" calcext:value-type="float">
            <text:p>27.6043474836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SQRT([.A765])" office:value-type="float" office:value="27.6224546338663" calcext:value-type="float">
            <text:p>27.6224546338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SQRT([.A766])" office:value-type="float" office:value="27.6405499221705" calcext:value-type="float">
            <text:p>27.6405499221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SQRT([.A767])" office:value-type="float" office:value="27.6586333718787" calcext:value-type="float">
            <text:p>27.6586333718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SQRT([.A768])" office:value-type="float" office:value="27.6767050061961" calcext:value-type="float">
            <text:p>27.6767050061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SQRT([.A769])" office:value-type="float" office:value="27.6947648482525" calcext:value-type="float">
            <text:p>27.6947648482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SQRT([.A770])" office:value-type="float" office:value="27.712812921102" calcext:value-type="float">
            <text:p>27.71281292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SQRT([.A771])" office:value-type="float" office:value="27.7308492477241" calcext:value-type="float">
            <text:p>27.7308492477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SQRT([.A772])" office:value-type="float" office:value="27.7488738510232" calcext:value-type="float">
            <text:p>27.748873851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SQRT([.A773])" office:value-type="float" office:value="27.7668867538296" calcext:value-type="float">
            <text:p>27.7668867538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SQRT([.A774])" office:value-type="float" office:value="27.7848879788996" calcext:value-type="float">
            <text:p>27.784887978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SQRT([.A775])" office:value-type="float" office:value="27.8028775489157" calcext:value-type="float">
            <text:p>27.8028775489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SQRT([.A776])" office:value-type="float" office:value="27.8208554864871" calcext:value-type="float">
            <text:p>27.820855486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SQRT([.A777])" office:value-type="float" office:value="27.8388218141501" calcext:value-type="float">
            <text:p>27.838821814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SQRT([.A778])" office:value-type="float" office:value="27.8567765543682" calcext:value-type="float">
            <text:p>27.8567765543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SQRT([.A779])" office:value-type="float" office:value="27.8747197295327" calcext:value-type="float">
            <text:p>27.8747197295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SQRT([.A780])" office:value-type="float" office:value="27.8926513619627" calcext:value-type="float">
            <text:p>27.8926513619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SQRT([.A781])" office:value-type="float" office:value="27.9105714739057" calcext:value-type="float">
            <text:p>27.9105714739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SQRT([.A782])" office:value-type="float" office:value="27.9284800875379" calcext:value-type="float">
            <text:p>27.9284800875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SQRT([.A783])" office:value-type="float" office:value="27.9463772249642" calcext:value-type="float">
            <text:p>27.9463772249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SQRT([.A784])" office:value-type="float" office:value="27.9642629082191" calcext:value-type="float">
            <text:p>27.964262908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SQRT([.A785])" office:value-type="float" office:value="27.9821371592664" calcext:value-type="float">
            <text:p>27.982137159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SQRT([.A786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SQRT([.A787])" office:value-type="float" office:value="28.0178514522438" calcext:value-type="float">
            <text:p>28.017851452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SQRT([.A788])" office:value-type="float" office:value="28.0356915377524" calcext:value-type="float">
            <text:p>28.0356915377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SQRT([.A789])" office:value-type="float" office:value="28.0535202782111" calcext:value-type="float">
            <text:p>28.053520278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SQRT([.A790])" office:value-type="float" office:value="28.0713376952364" calcext:value-type="float">
            <text:p>28.071337695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SQRT([.A791])" office:value-type="float" office:value="28.0891438103763" calcext:value-type="float">
            <text:p>28.0891438103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SQRT([.A792])" office:value-type="float" office:value="28.1069386451104" calcext:value-type="float">
            <text:p>28.106938645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SQRT([.A793])" office:value-type="float" office:value="28.1247222208505" calcext:value-type="float">
            <text:p>28.1247222208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SQRT([.A794])" office:value-type="float" office:value="28.1424945589406" calcext:value-type="float">
            <text:p>28.1424945589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SQRT([.A795])" office:value-type="float" office:value="28.1602556806574" calcext:value-type="float">
            <text:p>28.1602556806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SQRT([.A796])" office:value-type="float" office:value="28.1780056072107" calcext:value-type="float">
            <text:p>28.178005607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SQRT([.A797])" office:value-type="float" office:value="28.1957443597434" calcext:value-type="float">
            <text:p>28.1957443597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SQRT([.A798])" office:value-type="float" office:value="28.2134719593318" calcext:value-type="float">
            <text:p>28.213471959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SQRT([.A799])" office:value-type="float" office:value="28.2311884269862" calcext:value-type="float">
            <text:p>28.2311884269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SQRT([.A800])" office:value-type="float" office:value="28.2488937836511" calcext:value-type="float">
            <text:p>28.2488937836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SQRT([.A801])" office:value-type="float" office:value="28.2665880502051" calcext:value-type="float">
            <text:p>28.266588050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SQRT([.A802])" office:value-type="float" office:value="28.2842712474619" calcext:value-type="float">
            <text:p>28.2842712474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SQRT([.A803])" office:value-type="float" office:value="28.3019433961698" calcext:value-type="float">
            <text:p>28.301943396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SQRT([.A804])" office:value-type="float" office:value="28.3196045170126" calcext:value-type="float">
            <text:p>28.319604517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SQRT([.A805])" office:value-type="float" office:value="28.3372546306095" calcext:value-type="float">
            <text:p>28.3372546306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SQRT([.A806])" office:value-type="float" office:value="28.3548937575157" calcext:value-type="float">
            <text:p>28.3548937575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SQRT([.A807])" office:value-type="float" office:value="28.3725219182222" calcext:value-type="float">
            <text:p>28.372521918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SQRT([.A808])" office:value-type="float" office:value="28.3901391331568" calcext:value-type="float">
            <text:p>28.3901391331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SQRT([.A809])" office:value-type="float" office:value="28.4077454226836" calcext:value-type="float">
            <text:p>28.4077454226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SQRT([.A810])" office:value-type="float" office:value="28.4253408071038" calcext:value-type="float">
            <text:p>28.425340807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SQRT([.A811])" office:value-type="float" office:value="28.4429253066558" calcext:value-type="float">
            <text:p>28.4429253066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SQRT([.A812])" office:value-type="float" office:value="28.4604989415154" calcext:value-type="float">
            <text:p>28.4604989415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SQRT([.A813])" office:value-type="float" office:value="28.4780617317963" calcext:value-type="float">
            <text:p>28.478061731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SQRT([.A814])" office:value-type="float" office:value="28.49561369755" calcext:value-type="float">
            <text:p>28.49561369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SQRT([.A815])" office:value-type="float" office:value="28.5131548587665" calcext:value-type="float">
            <text:p>28.5131548587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SQRT([.A816])" office:value-type="float" office:value="28.5306852353742" calcext:value-type="float">
            <text:p>28.5306852353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SQRT([.A817])" office:value-type="float" office:value="28.5482048472404" calcext:value-type="float">
            <text:p>28.5482048472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SQRT([.A818])" office:value-type="float" office:value="28.5657137141714" calcext:value-type="float">
            <text:p>28.5657137141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SQRT([.A819])" office:value-type="float" office:value="28.5832118559129" calcext:value-type="float">
            <text:p>28.5832118559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SQRT([.A820])" office:value-type="float" office:value="28.6006992921502" calcext:value-type="float">
            <text:p>28.600699292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SQRT([.A821])" office:value-type="float" office:value="28.6181760425084" calcext:value-type="float">
            <text:p>28.6181760425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SQRT([.A822])" office:value-type="float" office:value="28.6356421265527" calcext:value-type="float">
            <text:p>28.6356421265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SQRT([.A823])" office:value-type="float" office:value="28.6530975637888" calcext:value-type="float">
            <text:p>28.6530975637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SQRT([.A824])" office:value-type="float" office:value="28.6705423736629" calcext:value-type="float">
            <text:p>28.6705423736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SQRT([.A825])" office:value-type="float" office:value="28.6879765755621" calcext:value-type="float">
            <text:p>28.6879765755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SQRT([.A826])" office:value-type="float" office:value="28.7054001888146" calcext:value-type="float">
            <text:p>28.7054001888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SQRT([.A827])" office:value-type="float" office:value="28.7228132326901" calcext:value-type="float">
            <text:p>28.7228132326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SQRT([.A828])" office:value-type="float" office:value="28.7402157263998" calcext:value-type="float">
            <text:p>28.7402157263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SQRT([.A829])" office:value-type="float" office:value="28.7576076890968" calcext:value-type="float">
            <text:p>28.7576076890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SQRT([.A830])" office:value-type="float" office:value="28.7749891398763" calcext:value-type="float">
            <text:p>28.7749891398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SQRT([.A831])" office:value-type="float" office:value="28.7923600977759" calcext:value-type="float">
            <text:p>28.7923600977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SQRT([.A832])" office:value-type="float" office:value="28.8097205817759" calcext:value-type="float">
            <text:p>28.8097205817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SQRT([.A833])" office:value-type="float" office:value="28.8270706107991" calcext:value-type="float">
            <text:p>28.8270706107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SQRT([.A834])" office:value-type="float" office:value="28.8444102037119" calcext:value-type="float">
            <text:p>28.8444102037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SQRT([.A835])" office:value-type="float" office:value="28.8617393793236" calcext:value-type="float">
            <text:p>28.8617393793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SQRT([.A836])" office:value-type="float" office:value="28.8790581563873" calcext:value-type="float">
            <text:p>28.8790581563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SQRT([.A837])" office:value-type="float" office:value="28.8963665535998" calcext:value-type="float">
            <text:p>28.8963665535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SQRT([.A838])" office:value-type="float" office:value="28.9136645896019" calcext:value-type="float">
            <text:p>28.9136645896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SQRT([.A839])" office:value-type="float" office:value="28.9309522829789" calcext:value-type="float">
            <text:p>28.9309522829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SQRT([.A840])" office:value-type="float" office:value="28.9482296522603" calcext:value-type="float">
            <text:p>28.948229652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SQRT([.A841])" office:value-type="float" office:value="28.9654967159205" calcext:value-type="float">
            <text:p>28.9654967159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SQRT([.A842])" office:value-type="float" office:value="28.9827534923789" calcext:value-type="float">
            <text:p>28.9827534923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SQRT([.A843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SQRT([.A844])" office:value-type="float" office:value="29.0172362570938" calcext:value-type="float">
            <text:p>29.017236257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SQRT([.A845])" office:value-type="float" office:value="29.034462281916" calcext:value-type="float">
            <text:p>29.034462281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SQRT([.A846])" office:value-type="float" office:value="29.0516780926679" calcext:value-type="float">
            <text:p>29.0516780926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SQRT([.A847])" office:value-type="float" office:value="29.0688837074973" calcext:value-type="float">
            <text:p>29.068883707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SQRT([.A848])" office:value-type="float" office:value="29.086079144498" calcext:value-type="float">
            <text:p>29.086079144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SQRT([.A849])" office:value-type="float" office:value="29.1032644217105" calcext:value-type="float">
            <text:p>29.103264421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SQRT([.A850])" office:value-type="float" office:value="29.1204395571221" calcext:value-type="float">
            <text:p>29.1204395571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SQRT([.A851])" office:value-type="float" office:value="29.1376045686669" calcext:value-type="float">
            <text:p>29.1376045686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SQRT([.A852])" office:value-type="float" office:value="29.1547594742265" calcext:value-type="float">
            <text:p>29.154759474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SQRT([.A853])" office:value-type="float" office:value="29.1719042916296" calcext:value-type="float">
            <text:p>29.1719042916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SQRT([.A854])" office:value-type="float" office:value="29.1890390386528" calcext:value-type="float">
            <text:p>29.1890390386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SQRT([.A855])" office:value-type="float" office:value="29.2061637330205" calcext:value-type="float">
            <text:p>29.206163733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SQRT([.A856])" office:value-type="float" office:value="29.2232783924049" calcext:value-type="float">
            <text:p>29.2232783924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SQRT([.A857])" office:value-type="float" office:value="29.2403830344269" calcext:value-type="float">
            <text:p>29.2403830344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SQRT([.A858])" office:value-type="float" office:value="29.2574776766556" calcext:value-type="float">
            <text:p>29.2574776766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SQRT([.A859])" office:value-type="float" office:value="29.2745623366089" calcext:value-type="float">
            <text:p>29.2745623366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SQRT([.A860])" office:value-type="float" office:value="29.2916370317536" calcext:value-type="float">
            <text:p>29.2916370317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SQRT([.A861])" office:value-type="float" office:value="29.3087017795057" calcext:value-type="float">
            <text:p>29.3087017795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SQRT([.A862])" office:value-type="float" office:value="29.3257565972304" calcext:value-type="float">
            <text:p>29.3257565972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SQRT([.A863])" office:value-type="float" office:value="29.3428015022424" calcext:value-type="float">
            <text:p>29.342801502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SQRT([.A864])" office:value-type="float" office:value="29.3598365118064" calcext:value-type="float">
            <text:p>29.359836511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SQRT([.A865])" office:value-type="float" office:value="29.3768616431368" calcext:value-type="float">
            <text:p>29.376861643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SQRT([.A866])" office:value-type="float" office:value="29.3938769133981" calcext:value-type="float">
            <text:p>29.3938769133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SQRT([.A867])" office:value-type="float" office:value="29.4108823397055" calcext:value-type="float">
            <text:p>29.4108823397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SQRT([.A868])" office:value-type="float" office:value="29.4278779391243" calcext:value-type="float">
            <text:p>29.427877939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SQRT([.A869])" office:value-type="float" office:value="29.4448637286709" calcext:value-type="float">
            <text:p>29.4448637286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SQRT([.A870])" office:value-type="float" office:value="29.4618397253125" calcext:value-type="float">
            <text:p>29.461839725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SQRT([.A871])" office:value-type="float" office:value="29.4788059459674" calcext:value-type="float">
            <text:p>29.4788059459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SQRT([.A872])" office:value-type="float" office:value="29.4957624075053" calcext:value-type="float">
            <text:p>29.4957624075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SQRT([.A873])" office:value-type="float" office:value="29.5127091267474" calcext:value-type="float">
            <text:p>29.5127091267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SQRT([.A874])" office:value-type="float" office:value="29.5296461204668" calcext:value-type="float">
            <text:p>29.5296461204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SQRT([.A875])" office:value-type="float" office:value="29.5465734053883" calcext:value-type="float">
            <text:p>29.5465734053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SQRT([.A876])" office:value-type="float" office:value="29.563490998189" calcext:value-type="float">
            <text:p>29.56349099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SQRT([.A877])" office:value-type="float" office:value="29.5803989154981" calcext:value-type="float">
            <text:p>29.5803989154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SQRT([.A878])" office:value-type="float" office:value="29.5972971738975" calcext:value-type="float">
            <text:p>29.5972971738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SQRT([.A879])" office:value-type="float" office:value="29.6141857899217" calcext:value-type="float">
            <text:p>29.6141857899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SQRT([.A880])" office:value-type="float" office:value="29.6310647800581" calcext:value-type="float">
            <text:p>29.631064780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SQRT([.A881])" office:value-type="float" office:value="29.6479341607472" calcext:value-type="float">
            <text:p>29.6479341607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SQRT([.A882])" office:value-type="float" office:value="29.6647939483827" calcext:value-type="float">
            <text:p>29.6647939483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SQRT([.A883])" office:value-type="float" office:value="29.6816441593117" calcext:value-type="float">
            <text:p>29.681644159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SQRT([.A884])" office:value-type="float" office:value="29.698484809835" calcext:value-type="float">
            <text:p>29.69848480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SQRT([.A885])" office:value-type="float" office:value="29.7153159162073" calcext:value-type="float">
            <text:p>29.715315916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SQRT([.A886])" office:value-type="float" office:value="29.732137494637" calcext:value-type="float">
            <text:p>29.732137494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SQRT([.A887])" office:value-type="float" office:value="29.748949561287" calcext:value-type="float">
            <text:p>29.74894956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SQRT([.A888])" office:value-type="float" office:value="29.7657521322744" calcext:value-type="float">
            <text:p>29.765752132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SQRT([.A889])" office:value-type="float" office:value="29.7825452236709" calcext:value-type="float">
            <text:p>29.7825452236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SQRT([.A890])" office:value-type="float" office:value="29.7993288515027" calcext:value-type="float">
            <text:p>29.7993288515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SQRT([.A891])" office:value-type="float" office:value="29.8161030317511" calcext:value-type="float">
            <text:p>29.816103031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SQRT([.A892])" office:value-type="float" office:value="29.8328677803526" calcext:value-type="float">
            <text:p>29.8328677803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SQRT([.A893])" office:value-type="float" office:value="29.8496231131986" calcext:value-type="float">
            <text:p>29.849623113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SQRT([.A894])" office:value-type="float" office:value="29.8663690461362" calcext:value-type="float">
            <text:p>29.866369046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SQRT([.A895])" office:value-type="float" office:value="29.8831055949679" calcext:value-type="float">
            <text:p>29.8831055949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SQRT([.A896])" office:value-type="float" office:value="29.8998327754521" calcext:value-type="float">
            <text:p>29.8998327754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SQRT([.A897])" office:value-type="float" office:value="29.9165506033032" calcext:value-type="float">
            <text:p>29.916550603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SQRT([.A898])" office:value-type="float" office:value="29.9332590941915" calcext:value-type="float">
            <text:p>29.933259094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SQRT([.A899])" office:value-type="float" office:value="29.9499582637439" calcext:value-type="float">
            <text:p>29.9499582637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SQRT([.A900])" office:value-type="float" office:value="29.9666481275434" calcext:value-type="float">
            <text:p>29.96664812754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SQRT([.A901])" office:value-type="float" office:value="29.9833287011299" calcext:value-type="float">
            <text:p>29.983328701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SQRT([.A90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SQRT([.A903])" office:value-type="float" office:value="30.0166620396073" calcext:value-type="float">
            <text:p>30.016662039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SQRT([.A904])" office:value-type="float" office:value="30.0333148353624" calcext:value-type="float">
            <text:p>30.033314835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SQRT([.A905])" office:value-type="float" office:value="30.0499584026334" calcext:value-type="float">
            <text:p>30.0499584026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SQRT([.A906])" office:value-type="float" office:value="30.0665927567458" calcext:value-type="float">
            <text:p>30.0665927567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SQRT([.A907])" office:value-type="float" office:value="30.0832179129826" calcext:value-type="float">
            <text:p>30.0832179129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SQRT([.A908])" office:value-type="float" office:value="30.0998338865848" calcext:value-type="float">
            <text:p>30.0998338865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SQRT([.A909])" office:value-type="float" office:value="30.1164406927512" calcext:value-type="float">
            <text:p>30.116440692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SQRT([.A910])" office:value-type="float" office:value="30.1330383466387" calcext:value-type="float">
            <text:p>30.1330383466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SQRT([.A911])" office:value-type="float" office:value="30.1496268633627" calcext:value-type="float">
            <text:p>30.1496268633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SQRT([.A912])" office:value-type="float" office:value="30.1662062579967" calcext:value-type="float">
            <text:p>30.1662062579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SQRT([.A913])" office:value-type="float" office:value="30.1827765455731" calcext:value-type="float">
            <text:p>30.1827765455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SQRT([.A914])" office:value-type="float" office:value="30.199337741083" calcext:value-type="float">
            <text:p>30.19933774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SQRT([.A915])" office:value-type="float" office:value="30.2158898594763" calcext:value-type="float">
            <text:p>30.2158898594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SQRT([.A916])" office:value-type="float" office:value="30.232432915662" calcext:value-type="float">
            <text:p>30.232432915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SQRT([.A917])" office:value-type="float" office:value="30.2489669245084" calcext:value-type="float">
            <text:p>30.2489669245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SQRT([.A918])" office:value-type="float" office:value="30.2654919008431" calcext:value-type="float">
            <text:p>30.2654919008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SQRT([.A919])" office:value-type="float" office:value="30.2820078594534" calcext:value-type="float">
            <text:p>30.2820078594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SQRT([.A920])" office:value-type="float" office:value="30.2985148150862" calcext:value-type="float">
            <text:p>30.298514815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SQRT([.A921])" office:value-type="float" office:value="30.3150127824482" calcext:value-type="float">
            <text:p>30.3150127824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SQRT([.A922])" office:value-type="float" office:value="30.3315017762062" calcext:value-type="float">
            <text:p>30.33150177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SQRT([.A923])" office:value-type="float" office:value="30.347981810987" calcext:value-type="float">
            <text:p>30.347981810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SQRT([.A924])" office:value-type="float" office:value="30.364452901378" calcext:value-type="float">
            <text:p>30.364452901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SQRT([.A925])" office:value-type="float" office:value="30.3809150619266" calcext:value-type="float">
            <text:p>30.380915061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SQRT([.A926])" office:value-type="float" office:value="30.3973683071413" calcext:value-type="float">
            <text:p>30.3973683071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SQRT([.A927])" office:value-type="float" office:value="30.4138126514911" calcext:value-type="float">
            <text:p>30.4138126514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SQRT([.A928])" office:value-type="float" office:value="30.4302481094059" calcext:value-type="float">
            <text:p>30.4302481094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SQRT([.A929])" office:value-type="float" office:value="30.4466746952767" calcext:value-type="float">
            <text:p>30.446674695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SQRT([.A930])" office:value-type="float" office:value="30.4630924234556" calcext:value-type="float">
            <text:p>30.4630924234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SQRT([.A931])" office:value-type="float" office:value="30.4795013082563" calcext:value-type="float">
            <text:p>30.479501308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SQRT([.A932])" office:value-type="float" office:value="30.4959013639538" calcext:value-type="float">
            <text:p>30.4959013639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SQRT([.A933])" office:value-type="float" office:value="30.5122926047847" calcext:value-type="float">
            <text:p>30.5122926047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SQRT([.A934])" office:value-type="float" office:value="30.5286750449475" calcext:value-type="float">
            <text:p>30.528675044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SQRT([.A935])" office:value-type="float" office:value="30.5450486986025" calcext:value-type="float">
            <text:p>30.545048698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SQRT([.A936])" office:value-type="float" office:value="30.5614135798723" calcext:value-type="float">
            <text:p>30.561413579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SQRT([.A937])" office:value-type="float" office:value="30.5777697028413" calcext:value-type="float">
            <text:p>30.5777697028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SQRT([.A938])" office:value-type="float" office:value="30.5941170815567" calcext:value-type="float">
            <text:p>30.594117081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SQRT([.A939])" office:value-type="float" office:value="30.6104557300279" calcext:value-type="float">
            <text:p>30.610455730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SQRT([.A940])" office:value-type="float" office:value="30.6267856622271" calcext:value-type="float">
            <text:p>30.6267856622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SQRT([.A941])" office:value-type="float" office:value="30.6431068920891" calcext:value-type="float">
            <text:p>30.643106892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SQRT([.A942])" office:value-type="float" office:value="30.6594194335118" calcext:value-type="float">
            <text:p>30.6594194335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SQRT([.A943])" office:value-type="float" office:value="30.6757233003559" calcext:value-type="float">
            <text:p>30.6757233003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SQRT([.A944])" office:value-type="float" office:value="30.6920185064456" calcext:value-type="float">
            <text:p>30.6920185064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SQRT([.A945])" office:value-type="float" office:value="30.7083050655682" calcext:value-type="float">
            <text:p>30.7083050655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SQRT([.A946])" office:value-type="float" office:value="30.7245829914744" calcext:value-type="float">
            <text:p>30.7245829914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SQRT([.A947])" office:value-type="float" office:value="30.7408522978788" calcext:value-type="float">
            <text:p>30.7408522978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SQRT([.A948])" office:value-type="float" office:value="30.7571129984594" calcext:value-type="float">
            <text:p>30.7571129984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SQRT([.A949])" office:value-type="float" office:value="30.7733651068582" calcext:value-type="float">
            <text:p>30.7733651068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SQRT([.A950])" office:value-type="float" office:value="30.7896086366813" calcext:value-type="float">
            <text:p>30.7896086366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SQRT([.A951])" office:value-type="float" office:value="30.8058436014987" calcext:value-type="float">
            <text:p>30.8058436014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SQRT([.A952])" office:value-type="float" office:value="30.8220700148449" calcext:value-type="float">
            <text:p>30.8220700148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SQRT([.A953])" office:value-type="float" office:value="30.8382878902186" calcext:value-type="float">
            <text:p>30.8382878902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SQRT([.A954])" office:value-type="float" office:value="30.854497241083" calcext:value-type="float">
            <text:p>30.854497241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SQRT([.A955])" office:value-type="float" office:value="30.8706980808663" calcext:value-type="float">
            <text:p>30.8706980808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SQRT([.A956])" office:value-type="float" office:value="30.886890422961" calcext:value-type="float">
            <text:p>30.88689042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SQRT([.A957])" office:value-type="float" office:value="30.9030742807249" calcext:value-type="float">
            <text:p>30.9030742807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SQRT([.A958])" office:value-type="float" office:value="30.9192496674806" calcext:value-type="float">
            <text:p>30.9192496674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SQRT([.A959])" office:value-type="float" office:value="30.935416596516" calcext:value-type="float">
            <text:p>30.935416596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SQRT([.A960])" office:value-type="float" office:value="30.9515750810843" calcext:value-type="float">
            <text:p>30.9515750810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SQRT([.A961])" office:value-type="float" office:value="30.967725134404" calcext:value-type="float">
            <text:p>30.967725134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SQRT([.A962])" office:value-type="float" office:value="30.9838667696593" calcext:value-type="float">
            <text:p>30.9838667696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SQRT([.A963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SQRT([.A964])" office:value-type="float" office:value="31.0161248385416" calcext:value-type="float">
            <text:p>31.01612483854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SQRT([.A965])" office:value-type="float" office:value="31.0322412983658" calcext:value-type="float">
            <text:p>31.0322412983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SQRT([.A966])" office:value-type="float" office:value="31.0483493925201" calcext:value-type="float">
            <text:p>31.0483493925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SQRT([.A967])" office:value-type="float" office:value="31.0644491340181" calcext:value-type="float">
            <text:p>31.064449134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SQRT([.A968])" office:value-type="float" office:value="31.0805405358401" calcext:value-type="float">
            <text:p>31.0805405358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SQRT([.A969])" office:value-type="float" office:value="31.0966236109324" calcext:value-type="float">
            <text:p>31.0966236109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SQRT([.A970])" office:value-type="float" office:value="31.1126983722081" calcext:value-type="float">
            <text:p>31.112698372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SQRT([.A971])" office:value-type="float" office:value="31.1287648325468" calcext:value-type="float">
            <text:p>31.128764832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SQRT([.A972])" office:value-type="float" office:value="31.1448230047949" calcext:value-type="float">
            <text:p>31.1448230047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SQRT([.A973])" office:value-type="float" office:value="31.1608729017658" calcext:value-type="float">
            <text:p>31.1608729017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SQRT([.A974])" office:value-type="float" office:value="31.1769145362398" calcext:value-type="float">
            <text:p>31.176914536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SQRT([.A975])" office:value-type="float" office:value="31.1929479209644" calcext:value-type="float">
            <text:p>31.1929479209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SQRT([.A976])" office:value-type="float" office:value="31.2089730686545" calcext:value-type="float">
            <text:p>31.208973068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SQRT([.A977])" office:value-type="float" office:value="31.224989991992" calcext:value-type="float">
            <text:p>31.224989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SQRT([.A978])" office:value-type="float" office:value="31.2409987036266" calcext:value-type="float">
            <text:p>31.240998703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SQRT([.A979])" office:value-type="float" office:value="31.2569992161756" calcext:value-type="float">
            <text:p>31.256999216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SQRT([.A980])" office:value-type="float" office:value="31.2729915422238" calcext:value-type="float">
            <text:p>31.2729915422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SQRT([.A981])" office:value-type="float" office:value="31.288975694324" calcext:value-type="float">
            <text:p>31.288975694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SQRT([.A982])" office:value-type="float" office:value="31.3049516849971" calcext:value-type="float">
            <text:p>31.304951684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SQRT([.A983])" office:value-type="float" office:value="31.3209195267317" calcext:value-type="float">
            <text:p>31.3209195267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SQRT([.A984])" office:value-type="float" office:value="31.3368792319848" calcext:value-type="float">
            <text:p>31.3368792319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SQRT([.A985])" office:value-type="float" office:value="31.3528308131818" calcext:value-type="float">
            <text:p>31.352830813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SQRT([.A986])" office:value-type="float" office:value="31.3687742827162" calcext:value-type="float">
            <text:p>31.3687742827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SQRT([.A987])" office:value-type="float" office:value="31.3847096529504" calcext:value-type="float">
            <text:p>31.3847096529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SQRT([.A988])" office:value-type="float" office:value="31.4006369362152" calcext:value-type="float">
            <text:p>31.400636936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SQRT([.A989])" office:value-type="float" office:value="31.41655614481" calcext:value-type="float">
            <text:p>31.41655614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SQRT([.A990])" office:value-type="float" office:value="31.4324672910034" calcext:value-type="float">
            <text:p>31.432467291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SQRT([.A991])" office:value-type="float" office:value="31.4483703870328" calcext:value-type="float">
            <text:p>31.448370387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SQRT([.A992])" office:value-type="float" office:value="31.4642654451045" calcext:value-type="float">
            <text:p>31.464265445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SQRT([.A993])" office:value-type="float" office:value="31.4801524773944" calcext:value-type="float">
            <text:p>31.4801524773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SQRT([.A994])" office:value-type="float" office:value="31.4960314960472" calcext:value-type="float">
            <text:p>31.4960314960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SQRT([.A995])" office:value-type="float" office:value="31.5119025131775" calcext:value-type="float">
            <text:p>31.5119025131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SQRT([.A996])" office:value-type="float" office:value="31.5277655408689" calcext:value-type="float">
            <text:p>31.527765540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SQRT([.A997])" office:value-type="float" office:value="31.543620591175" calcext:value-type="float">
            <text:p>31.54362059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SQRT([.A998])" office:value-type="float" office:value="31.559467676119" calcext:value-type="float">
            <text:p>31.559467676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SQRT([.A999])" office:value-type="float" office:value="31.5753068076939" calcext:value-type="float">
            <text:p>31.575306807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SQRT([.A1000])" office:value-type="float" office:value="31.5911379978626" calcext:value-type="float">
            <text:p>31.5911379978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SQRT([.A1001])" office:value-type="float" office:value="31.6069612585582" calcext:value-type="float">
            <text:p>31.6069612585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SQRT([.A1002]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SQRT([.A1003])" office:value-type="float" office:value="31.6385840391128" calcext:value-type="float">
            <text:p>31.638584039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SQRT([.A1004])" office:value-type="float" office:value="31.6543835826888" calcext:value-type="float">
            <text:p>31.6543835826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SQRT([.A1005])" office:value-type="float" office:value="31.6701752442262" calcext:value-type="float">
            <text:p>31.670175244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SQRT([.A1006])" office:value-type="float" office:value="31.6859590355097" calcext:value-type="float">
            <text:p>31.6859590355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SQRT([.A1007])" office:value-type="float" office:value="31.7017349682947" calcext:value-type="float">
            <text:p>31.701734968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SQRT([.A1008])" office:value-type="float" office:value="31.7175030543074" calcext:value-type="float">
            <text:p>31.717503054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SQRT([.A1009])" office:value-type="float" office:value="31.7332633052449" calcext:value-type="float">
            <text:p>31.733263305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SQRT([.A1010])" office:value-type="float" office:value="31.7490157327751" calcext:value-type="float">
            <text:p>31.749015732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SQRT([.A1011])" office:value-type="float" office:value="31.7647603485372" calcext:value-type="float">
            <text:p>31.7647603485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SQRT([.A1012])" office:value-type="float" office:value="31.7804971641414" calcext:value-type="float">
            <text:p>31.780497164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SQRT([.A1013])" office:value-type="float" office:value="31.7962261911693" calcext:value-type="float">
            <text:p>31.796226191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SQRT([.A1014])" office:value-type="float" office:value="31.8119474411737" calcext:value-type="float">
            <text:p>31.8119474411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SQRT([.A1015])" office:value-type="float" office:value="31.8276609256791" calcext:value-type="float">
            <text:p>31.827660925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SQRT([.A1016])" office:value-type="float" office:value="31.8433666561813" calcext:value-type="float">
            <text:p>31.8433666561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SQRT([.A1017])" office:value-type="float" office:value="31.859064644148" calcext:value-type="float">
            <text:p>31.859064644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SQRT([.A1018])" office:value-type="float" office:value="31.8747549010185" calcext:value-type="float">
            <text:p>31.8747549010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SQRT([.A1019])" office:value-type="float" office:value="31.890437438204" calcext:value-type="float">
            <text:p>31.89043743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SQRT([.A1020])" office:value-type="float" office:value="31.9061122670876" calcext:value-type="float">
            <text:p>31.906112267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SQRT([.A1021])" office:value-type="float" office:value="31.9217793990247" calcext:value-type="float">
            <text:p>31.921779399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SQRT([.A1022])" office:value-type="float" office:value="31.9374388453426" calcext:value-type="float">
            <text:p>31.9374388453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SQRT([.A1023])" office:value-type="float" office:value="31.9530906173409" calcext:value-type="float">
            <text:p>31.9530906173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SQRT([.A1024])" office:value-type="float" office:value="31.9687347262916" calcext:value-type="float">
            <text:p>31.968734726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SQRT([.A1025])" office:value-type="float" office:value="31.984371183439" calcext:value-type="float">
            <text:p>31.984371183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SQRT([.A1026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SQRT([.A1027])" office:value-type="float" office:value="32.0156211871642" calcext:value-type="float">
            <text:p>32.015621187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SQRT([.A1028])" office:value-type="float" office:value="32.0312347560939" calcext:value-type="float">
            <text:p>32.031234756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SQRT([.A1029])" office:value-type="float" office:value="32.0468407179241" calcext:value-type="float">
            <text:p>32.0468407179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SQRT([.A1030])" office:value-type="float" office:value="32.0624390837628" calcext:value-type="float">
            <text:p>32.0624390837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SQRT([.A1031])" office:value-type="float" office:value="32.0780298646909" calcext:value-type="float">
            <text:p>32.0780298646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SQRT([.A1032])" office:value-type="float" office:value="32.0936130717624" calcext:value-type="float">
            <text:p>32.0936130717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SQRT([.A1033])" office:value-type="float" office:value="32.1091887160046" calcext:value-type="float">
            <text:p>32.109188716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SQRT([.A1034])" office:value-type="float" office:value="32.124756808418" calcext:value-type="float">
            <text:p>32.12475680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SQRT([.A1035])" office:value-type="float" office:value="32.1403173599764" calcext:value-type="float">
            <text:p>32.1403173599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SQRT([.A1036])" office:value-type="float" office:value="32.1558703816271" calcext:value-type="float">
            <text:p>32.1558703816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SQRT([.A1037])" office:value-type="float" office:value="32.1714158842908" calcext:value-type="float">
            <text:p>32.171415884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SQRT([.A1038])" office:value-type="float" office:value="32.1869538788622" calcext:value-type="float">
            <text:p>32.1869538788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SQRT([.A1039])" office:value-type="float" office:value="32.2024843762092" calcext:value-type="float">
            <text:p>32.202484376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SQRT([.A1040])" office:value-type="float" office:value="32.218007387174" calcext:value-type="float">
            <text:p>32.218007387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SQRT([.A1041])" office:value-type="float" office:value="32.2335229225724" calcext:value-type="float">
            <text:p>32.2335229225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SQRT([.A1042])" office:value-type="float" office:value="32.2490309931942" calcext:value-type="float">
            <text:p>32.2490309931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SQRT([.A1043])" office:value-type="float" office:value="32.2645316098034" calcext:value-type="float">
            <text:p>32.264531609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SQRT([.A1044])" office:value-type="float" office:value="32.280024783138" calcext:value-type="float">
            <text:p>32.28002478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SQRT([.A1045])" office:value-type="float" office:value="32.2955105239103" calcext:value-type="float">
            <text:p>32.2955105239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SQRT([.A1046])" office:value-type="float" office:value="32.310988842807" calcext:value-type="float">
            <text:p>32.31098884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SQRT([.A1047])" office:value-type="float" office:value="32.3264597504892" calcext:value-type="float">
            <text:p>32.3264597504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SQRT([.A1048])" office:value-type="float" office:value="32.3419232575925" calcext:value-type="float">
            <text:p>32.3419232575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SQRT([.A1049])" office:value-type="float" office:value="32.3573793747269" calcext:value-type="float">
            <text:p>32.3573793747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SQRT([.A1050])" office:value-type="float" office:value="32.3728281124773" calcext:value-type="float">
            <text:p>32.3728281124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SQRT([.A1051])" office:value-type="float" office:value="32.3882694814033" calcext:value-type="float">
            <text:p>32.3882694814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SQRT([.A1052])" office:value-type="float" office:value="32.4037034920393" calcext:value-type="float">
            <text:p>32.4037034920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SQRT([.A1053])" office:value-type="float" office:value="32.4191301548947" calcext:value-type="float">
            <text:p>32.4191301548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SQRT([.A1054])" office:value-type="float" office:value="32.4345494804537" calcext:value-type="float">
            <text:p>32.4345494804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SQRT([.A1055])" office:value-type="float" office:value="32.4499614791759" calcext:value-type="float">
            <text:p>32.4499614791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SQRT([.A1056])" office:value-type="float" office:value="32.4653661614959" calcext:value-type="float">
            <text:p>32.4653661614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SQRT([.A1057])" office:value-type="float" office:value="32.4807635378234" calcext:value-type="float">
            <text:p>32.4807635378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SQRT([.A1058])" office:value-type="float" office:value="32.4961536185438" calcext:value-type="float">
            <text:p>32.4961536185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SQRT([.A1059])" office:value-type="float" office:value="32.5115364140177" calcext:value-type="float">
            <text:p>32.511536414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SQRT([.A1060])" office:value-type="float" office:value="32.5269119345812" calcext:value-type="float">
            <text:p>32.5269119345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SQRT([.A1061])" office:value-type="float" office:value="32.542280190546" calcext:value-type="float">
            <text:p>32.542280190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SQRT([.A1062])" office:value-type="float" office:value="32.5576411921994" calcext:value-type="float">
            <text:p>32.557641192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SQRT([.A1063])" office:value-type="float" office:value="32.5729949498047" calcext:value-type="float">
            <text:p>32.5729949498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SQRT([.A1064])" office:value-type="float" office:value="32.5883414736007" calcext:value-type="float">
            <text:p>32.5883414736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SQRT([.A1065])" office:value-type="float" office:value="32.6036807738022" calcext:value-type="float">
            <text:p>32.6036807738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SQRT([.A1066])" office:value-type="float" office:value="32.6190128606002" calcext:value-type="float">
            <text:p>32.6190128606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SQRT([.A1067])" office:value-type="float" office:value="32.6343377441614" calcext:value-type="float">
            <text:p>32.6343377441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SQRT([.A1068])" office:value-type="float" office:value="32.649655434629" calcext:value-type="float">
            <text:p>32.649655434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SQRT([.A1069])" office:value-type="float" office:value="32.6649659421222" calcext:value-type="float">
            <text:p>32.664965942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SQRT([.A1070])" office:value-type="float" office:value="32.6802692767364" calcext:value-type="float">
            <text:p>32.6802692767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SQRT([.A1071])" office:value-type="float" office:value="32.6955654485436" calcext:value-type="float">
            <text:p>32.6955654485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SQRT([.A1072])" office:value-type="float" office:value="32.7108544675923" calcext:value-type="float">
            <text:p>32.7108544675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SQRT([.A1073])" office:value-type="float" office:value="32.7261363439071" calcext:value-type="float">
            <text:p>32.7261363439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SQRT([.A1074])" office:value-type="float" office:value="32.7414110874898" calcext:value-type="float">
            <text:p>32.741411087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SQRT([.A1075])" office:value-type="float" office:value="32.7566787083184" calcext:value-type="float">
            <text:p>32.756678708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SQRT([.A1076])" office:value-type="float" office:value="32.7719392163479" calcext:value-type="float">
            <text:p>32.7719392163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SQRT([.A1077])" office:value-type="float" office:value="32.78719262151" calcext:value-type="float">
            <text:p>32.78719262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SQRT([.A1078])" office:value-type="float" office:value="32.8024389337135" calcext:value-type="float">
            <text:p>32.8024389337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SQRT([.A1079])" office:value-type="float" office:value="32.8176781628439" calcext:value-type="float">
            <text:p>32.8176781628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SQRT([.A1080])" office:value-type="float" office:value="32.832910318764" calcext:value-type="float">
            <text:p>32.832910318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SQRT([.A1081])" office:value-type="float" office:value="32.8481354113137" calcext:value-type="float">
            <text:p>32.848135411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SQRT([.A1082])" office:value-type="float" office:value="32.86335345031" calcext:value-type="float">
            <text:p>32.86335345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SQRT([.A1083])" office:value-type="float" office:value="32.8785644455472" calcext:value-type="float">
            <text:p>32.8785644455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SQRT([.A1084])" office:value-type="float" office:value="32.8937684067971" calcext:value-type="float">
            <text:p>32.893768406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SQRT([.A1085])" office:value-type="float" office:value="32.9089653438087" calcext:value-type="float">
            <text:p>32.9089653438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SQRT([.A1086])" office:value-type="float" office:value="32.9241552663087" calcext:value-type="float">
            <text:p>32.924155266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SQRT([.A1087])" office:value-type="float" office:value="32.9393381840012" calcext:value-type="float">
            <text:p>32.939338184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SQRT([.A1088])" office:value-type="float" office:value="32.9545141065682" calcext:value-type="float">
            <text:p>32.9545141065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SQRT([.A1089])" office:value-type="float" office:value="32.9696830436691" calcext:value-type="float">
            <text:p>32.969683043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SQRT([.A1090])" office:value-type="float" office:value="32.9848450049413" calcext:value-type="float">
            <text:p>32.9848450049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SQRT([.A1091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SQRT([.A1092])" office:value-type="float" office:value="33.0151480384384" calcext:value-type="float">
            <text:p>33.015148038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SQRT([.A1093])" office:value-type="float" office:value="33.0302891298275" calcext:value-type="float">
            <text:p>33.0302891298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SQRT([.A1094])" office:value-type="float" office:value="33.0454232837166" calcext:value-type="float">
            <text:p>33.0454232837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SQRT([.A1095])" office:value-type="float" office:value="33.0605505096331" calcext:value-type="float">
            <text:p>33.0605505096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SQRT([.A1096])" office:value-type="float" office:value="33.0756708170825" calcext:value-type="float">
            <text:p>33.075670817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SQRT([.A1097])" office:value-type="float" office:value="33.0907842155486" calcext:value-type="float">
            <text:p>33.0907842155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SQRT([.A1098])" office:value-type="float" office:value="33.1058907144937" calcext:value-type="float">
            <text:p>33.1058907144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SQRT([.A1099])" office:value-type="float" office:value="33.1209903233584" calcext:value-type="float">
            <text:p>33.1209903233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SQRT([.A1100])" office:value-type="float" office:value="33.1360830515618" calcext:value-type="float">
            <text:p>33.136083051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SQRT([.A1101])" office:value-type="float" office:value="33.1511689085016" calcext:value-type="float">
            <text:p>33.1511689085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SQRT([.A1102])" office:value-type="float" office:value="33.166247903554" calcext:value-type="float">
            <text:p>33.16624790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SQRT([.A1103])" office:value-type="float" office:value="33.1813200460741" calcext:value-type="float">
            <text:p>33.1813200460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SQRT([.A1104])" office:value-type="float" office:value="33.1963853453957" calcext:value-type="float">
            <text:p>33.196385345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SQRT([.A1105])" office:value-type="float" office:value="33.2114438108312" calcext:value-type="float">
            <text:p>33.2114438108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SQRT([.A1106])" office:value-type="float" office:value="33.2264954516723" calcext:value-type="float">
            <text:p>33.2264954516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SQRT([.A1107])" office:value-type="float" office:value="33.2415402771893" calcext:value-type="float">
            <text:p>33.241540277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SQRT([.A1108])" office:value-type="float" office:value="33.2565782966318" calcext:value-type="float">
            <text:p>33.2565782966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SQRT([.A1109])" office:value-type="float" office:value="33.2716095192283" calcext:value-type="float">
            <text:p>33.271609519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SQRT([.A1110])" office:value-type="float" office:value="33.2866339541865" calcext:value-type="float">
            <text:p>33.2866339541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SQRT([.A1111])" office:value-type="float" office:value="33.3016516106934" calcext:value-type="float">
            <text:p>33.3016516106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SQRT([.A1112])" office:value-type="float" office:value="33.3166624979154" calcext:value-type="float">
            <text:p>33.316662497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SQRT([.A1113])" office:value-type="float" office:value="33.3316666249979" calcext:value-type="float">
            <text:p>33.3316666249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SQRT([.A1114])" office:value-type="float" office:value="33.3466640010661" calcext:value-type="float">
            <text:p>33.3466640010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SQRT([.A1115])" office:value-type="float" office:value="33.3616546352246" calcext:value-type="float">
            <text:p>33.361654635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SQRT([.A1116])" office:value-type="float" office:value="33.3766385365573" calcext:value-type="float">
            <text:p>33.3766385365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SQRT([.A1117])" office:value-type="float" office:value="33.391615714128" calcext:value-type="float">
            <text:p>33.391615714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SQRT([.A1118])" office:value-type="float" office:value="33.4065861769801" calcext:value-type="float">
            <text:p>33.4065861769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SQRT([.A1119])" office:value-type="float" office:value="33.4215499341368" calcext:value-type="float">
            <text:p>33.421549934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SQRT([.A1120])" office:value-type="float" office:value="33.436506994601" calcext:value-type="float">
            <text:p>33.436506994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SQRT([.A1121])" office:value-type="float" office:value="33.4514573673555" calcext:value-type="float">
            <text:p>33.451457367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SQRT([.A1122])" office:value-type="float" office:value="33.466401061363" calcext:value-type="float">
            <text:p>33.46640106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SQRT([.A1123])" office:value-type="float" office:value="33.4813380855664" calcext:value-type="float">
            <text:p>33.4813380855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SQRT([.A1124])" office:value-type="float" office:value="33.4962684488885" calcext:value-type="float">
            <text:p>33.496268448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SQRT([.A1125])" office:value-type="float" office:value="33.5111921602321" calcext:value-type="float">
            <text:p>33.511192160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SQRT([.A1126])" office:value-type="float" office:value="33.5261092284804" calcext:value-type="float">
            <text:p>33.5261092284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SQRT([.A1127])" office:value-type="float" office:value="33.5410196624968" calcext:value-type="float">
            <text:p>33.5410196624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SQRT([.A1128])" office:value-type="float" office:value="33.555923471125" calcext:value-type="float">
            <text:p>33.55592347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SQRT([.A1129])" office:value-type="float" office:value="33.570820663189" calcext:value-type="float">
            <text:p>33.57082066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SQRT([.A1130])" office:value-type="float" office:value="33.5857112474933" calcext:value-type="float">
            <text:p>33.5857112474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SQRT([.A1131])" office:value-type="float" office:value="33.6005952328229" calcext:value-type="float">
            <text:p>33.6005952328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SQRT([.A1132])" office:value-type="float" office:value="33.6154726279432" calcext:value-type="float">
            <text:p>33.6154726279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SQRT([.A1133])" office:value-type="float" office:value="33.6303434416005" calcext:value-type="float">
            <text:p>33.6303434416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SQRT([.A1134])" office:value-type="float" office:value="33.6452076825214" calcext:value-type="float">
            <text:p>33.6452076825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SQRT([.A1135])" office:value-type="float" office:value="33.6600653594137" calcext:value-type="float">
            <text:p>33.6600653594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SQRT([.A1136])" office:value-type="float" office:value="33.6749164809655" calcext:value-type="float">
            <text:p>33.6749164809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SQRT([.A1137])" office:value-type="float" office:value="33.689761055846" calcext:value-type="float">
            <text:p>33.689761055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SQRT([.A1138])" office:value-type="float" office:value="33.7045990927054" calcext:value-type="float">
            <text:p>33.7045990927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SQRT([.A1139])" office:value-type="float" office:value="33.7194306001747" calcext:value-type="float">
            <text:p>33.719430600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SQRT([.A1140])" office:value-type="float" office:value="33.734255586866" calcext:value-type="float">
            <text:p>33.734255586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SQRT([.A1141])" office:value-type="float" office:value="33.7490740613724" calcext:value-type="float">
            <text:p>33.7490740613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SQRT([.A1142])" office:value-type="float" office:value="33.7638860322683" calcext:value-type="float">
            <text:p>33.763886032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SQRT([.A1143])" office:value-type="float" office:value="33.7786915081091" calcext:value-type="float">
            <text:p>33.7786915081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SQRT([.A1144])" office:value-type="float" office:value="33.7934904974316" calcext:value-type="float">
            <text:p>33.7934904974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SQRT([.A1145])" office:value-type="float" office:value="33.8082830087539" calcext:value-type="float">
            <text:p>33.8082830087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SQRT([.A1146])" office:value-type="float" office:value="33.8230690505755" calcext:value-type="float">
            <text:p>33.8230690505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SQRT([.A1147])" office:value-type="float" office:value="33.8378486313773" calcext:value-type="float">
            <text:p>33.8378486313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SQRT([.A1148])" office:value-type="float" office:value="33.8526217596215" calcext:value-type="float">
            <text:p>33.8526217596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SQRT([.A1149])" office:value-type="float" office:value="33.8673884437522" calcext:value-type="float">
            <text:p>33.8673884437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SQRT([.A1150])" office:value-type="float" office:value="33.8821486921948" calcext:value-type="float">
            <text:p>33.882148692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SQRT([.A1151])" office:value-type="float" office:value="33.8969025133566" calcext:value-type="float">
            <text:p>33.896902513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SQRT([.A1152])" office:value-type="float" office:value="33.9116499156263" calcext:value-type="float">
            <text:p>33.9116499156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SQRT([.A1153])" office:value-type="float" office:value="33.9263909073747" calcext:value-type="float">
            <text:p>33.9263909073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SQRT([.A1154])" office:value-type="float" office:value="33.9411254969543" calcext:value-type="float">
            <text:p>33.9411254969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SQRT([.A1155])" office:value-type="float" office:value="33.9558536926993" calcext:value-type="float">
            <text:p>33.9558536926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SQRT([.A1156])" office:value-type="float" office:value="33.9705755029261" calcext:value-type="float">
            <text:p>33.9705755029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SQRT([.A1157])" office:value-type="float" office:value="33.9852909359329" calcext:value-type="float">
            <text:p>33.9852909359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SQRT([.A1158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SQRT([.A1159])" office:value-type="float" office:value="34.0147027033899" calcext:value-type="float">
            <text:p>34.0147027033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SQRT([.A1160])" office:value-type="float" office:value="34.0293990543471" calcext:value-type="float">
            <text:p>34.029399054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SQRT([.A1161])" office:value-type="float" office:value="34.0440890610984" calcext:value-type="float">
            <text:p>34.044089061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SQRT([.A1162])" office:value-type="float" office:value="34.0587727318528" calcext:value-type="float">
            <text:p>34.0587727318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SQRT([.A1163])" office:value-type="float" office:value="34.0734500748016" calcext:value-type="float">
            <text:p>34.073450074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SQRT([.A1164])" office:value-type="float" office:value="34.0881210981186" calcext:value-type="float">
            <text:p>34.088121098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SQRT([.A1165])" office:value-type="float" office:value="34.1027858099599" calcext:value-type="float">
            <text:p>34.102785809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SQRT([.A1166])" office:value-type="float" office:value="34.117444218464" calcext:value-type="float">
            <text:p>34.117444218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SQRT([.A1167])" office:value-type="float" office:value="34.132096331752" calcext:value-type="float">
            <text:p>34.13209633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SQRT([.A1168])" office:value-type="float" office:value="34.1467421579278" calcext:value-type="float">
            <text:p>34.1467421579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SQRT([.A1169])" office:value-type="float" office:value="34.1613817050774" calcext:value-type="float">
            <text:p>34.161381705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SQRT([.A1170])" office:value-type="float" office:value="34.1760149812701" calcext:value-type="float">
            <text:p>34.176014981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SQRT([.A1171])" office:value-type="float" office:value="34.1906419945575" calcext:value-type="float">
            <text:p>34.1906419945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SQRT([.A1172])" office:value-type="float" office:value="34.2052627529741" calcext:value-type="float">
            <text:p>34.2052627529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SQRT([.A1173])" office:value-type="float" office:value="34.2198772645373" calcext:value-type="float">
            <text:p>34.2198772645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SQRT([.A1174])" office:value-type="float" office:value="34.2344855372474" calcext:value-type="float">
            <text:p>34.234485537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SQRT([.A1175])" office:value-type="float" office:value="34.2490875790874" calcext:value-type="float">
            <text:p>34.2490875790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SQRT([.A1176])" office:value-type="float" office:value="34.2636833980236" calcext:value-type="float">
            <text:p>34.263683398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SQRT([.A1177])" office:value-type="float" office:value="34.2782730020052" calcext:value-type="float">
            <text:p>34.2782730020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SQRT([.A1178])" office:value-type="float" office:value="34.2928563989645" calcext:value-type="float">
            <text:p>34.2928563989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SQRT([.A1179])" office:value-type="float" office:value="34.3074335968169" calcext:value-type="float">
            <text:p>34.307433596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SQRT([.A1180])" office:value-type="float" office:value="34.322004603461" calcext:value-type="float">
            <text:p>34.32200460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SQRT([.A1181])" office:value-type="float" office:value="34.3365694267788" calcext:value-type="float">
            <text:p>34.336569426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SQRT([.A1182])" office:value-type="float" office:value="34.3511280746353" calcext:value-type="float">
            <text:p>34.3511280746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SQRT([.A1183])" office:value-type="float" office:value="34.3656805548792" calcext:value-type="float">
            <text:p>34.3656805548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SQRT([.A1184])" office:value-type="float" office:value="34.3802268753422" calcext:value-type="float">
            <text:p>34.3802268753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SQRT([.A1185])" office:value-type="float" office:value="34.3947670438397" calcext:value-type="float">
            <text:p>34.3947670438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SQRT([.A1186])" office:value-type="float" office:value="34.4093010681705" calcext:value-type="float">
            <text:p>34.409301068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SQRT([.A1187])" office:value-type="float" office:value="34.423828956117" calcext:value-type="float">
            <text:p>34.423828956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SQRT([.A1188])" office:value-type="float" office:value="34.4383507154451" calcext:value-type="float">
            <text:p>34.4383507154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SQRT([.A1189])" office:value-type="float" office:value="34.4528663539044" calcext:value-type="float">
            <text:p>34.4528663539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SQRT([.A1190])" office:value-type="float" office:value="34.4673758792282" calcext:value-type="float">
            <text:p>34.467375879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SQRT([.A1191])" office:value-type="float" office:value="34.4818792991333" calcext:value-type="float">
            <text:p>34.481879299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SQRT([.A1192])" office:value-type="float" office:value="34.4963766213207" calcext:value-type="float">
            <text:p>34.4963766213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SQRT([.A1193])" office:value-type="float" office:value="34.5108678534748" calcext:value-type="float">
            <text:p>34.5108678534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SQRT([.A1194])" office:value-type="float" office:value="34.5253530032641" calcext:value-type="float">
            <text:p>34.5253530032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SQRT([.A1195])" office:value-type="float" office:value="34.5398320783411" calcext:value-type="float">
            <text:p>34.539832078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SQRT([.A1196])" office:value-type="float" office:value="34.554305086342" calcext:value-type="float">
            <text:p>34.554305086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SQRT([.A1197])" office:value-type="float" office:value="34.5687720348872" calcext:value-type="float">
            <text:p>34.5687720348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SQRT([.A1198])" office:value-type="float" office:value="34.5832329315812" calcext:value-type="float">
            <text:p>34.5832329315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SQRT([.A1199])" office:value-type="float" office:value="34.5976877840124" calcext:value-type="float">
            <text:p>34.5976877840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SQRT([.A1200])" office:value-type="float" office:value="34.6121365997536" calcext:value-type="float">
            <text:p>34.6121365997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SQRT([.A1201])" office:value-type="float" office:value="34.6265793863616" calcext:value-type="float">
            <text:p>34.626579386361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0T13:19:36.019000000</dc:date>
    <meta:editing-duration>PT1H50M9S</meta:editing-duration>
    <meta:editing-cycles>2</meta:editing-cycles>
    <meta:generator>LibreOffice/7.6.4.1$Windows_X86_64 LibreOffice_project/e19e193f88cd6c0525a17fb7a176ed8e6a3e2aa1</meta:generator>
    <meta:document-statistic meta:table-count="1" meta:cell-count="360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sp_height_10um.B1:dsp_height_10um.C301" chart:data-source-has-labels="row" svg:x="0.32cm" svg:y="0.18cm" svg:width="15.36cm" svg:height="8.64cm">
          <chart:coordinate-region svg:x="1.161cm" svg:y="0.378cm" svg:width="14.322cm" svg:height="7.79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sp_height_10um.C2:dsp_height_10um.C301" chart:label-cell-address="dsp_height_10um.C1:dsp_height_10um.C1" chart:class="chart:scatter">
            <chart:domain table:cell-range-address="dsp_height_10um.B2:dsp_height_10um.B301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</text:p>
                <draw:g>
                  <svg:desc>dsp_height_10um.C1:dsp_height_10u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sp_height_10um.B2:dsp_height_10um.B301</svg:desc>
                </draw:g>
              </table:table-cell>
              <table:table-cell office:value-type="float" office:value="0">
                <text:p>0</text:p>
                <draw:g>
                  <svg:desc>dsp_height_10um.C2:dsp_height_10um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4165738677394">
                <text:p>3.74165738677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7298334620742">
                <text:p>3.87298334620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2310562561766">
                <text:p>4.1231056256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4264068711929">
                <text:p>4.2426406871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5889894354067">
                <text:p>4.3588989435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7213595499958">
                <text:p>4.4721359549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8257569495584">
                <text:p>4.58257569495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041575982343">
                <text:p>4.6904157598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9583152331272">
                <text:p>4.7958315233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9901951359278">
                <text:p>5.09901951359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19615242270663">
                <text:p>5.19615242270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29150262212918">
                <text:p>5.2915026221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851648071345">
                <text:p>5.385164807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7722557505166">
                <text:p>5.47722557505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6776436283002">
                <text:p>5.567764362830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4456264653803">
                <text:p>5.744562646538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309518948453">
                <text:p>5.8309518948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1607978309962">
                <text:p>5.91607978309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276253029822">
                <text:p>6.082762530298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6441400296898">
                <text:p>6.164414002968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49979983984">
                <text:p>6.24499799839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40312423743285">
                <text:p>6.40312423743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48074069840786">
                <text:p>6.480740698407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57438524302">
                <text:p>6.557438524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6332495807108">
                <text:p>6.6332495807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70820393249937">
                <text:p>6.708203932499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78232998312527">
                <text:p>6.782329983125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85565460040104">
                <text:p>6.855654600401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4142842854285">
                <text:p>7.14142842854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21110255092798">
                <text:p>7.21110255092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28010988928052">
                <text:p>7.28010988928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34846922834953">
                <text:p>7.348469228349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1619848709566">
                <text:p>7.416198487095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48331477354788">
                <text:p>7.48331477354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4983443527075">
                <text:p>7.549834435270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61577310586391">
                <text:p>7.61577310586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68114574786861">
                <text:p>7.68114574786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81024967590665">
                <text:p>7.81024967590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87400787401181">
                <text:p>7.87400787401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3725393319377">
                <text:p>7.93725393319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06225774829855">
                <text:p>8.06225774829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12403840463596">
                <text:p>8.124038404635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8535277187245">
                <text:p>8.18535277187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24621125123532">
                <text:p>8.24621125123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0662386291808">
                <text:p>8.30662386291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36660026534076">
                <text:p>8.366600265340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42614977317636">
                <text:p>8.42614977317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48528137423857">
                <text:p>8.48528137423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54400374531753">
                <text:p>8.54400374531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60232526704263">
                <text:p>8.60232526704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71779788708135">
                <text:p>8.717797887081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7496438739212">
                <text:p>8.77496438739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3176086632785">
                <text:p>8.831760866327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88819441731559">
                <text:p>8.888194417315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05538513813742">
                <text:p>9.055385138137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1104335791443">
                <text:p>9.1104335791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6515138991168">
                <text:p>9.165151389911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1954445729289">
                <text:p>9.21954445729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2736184954957">
                <text:p>9.27361849549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32737905308882">
                <text:p>9.327379053088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8083151964686">
                <text:p>9.38083151964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339811320566">
                <text:p>9.4339811320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48683298050514">
                <text:p>9.486832980505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53939201416946">
                <text:p>9.539392014169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4365076099296">
                <text:p>9.64365076099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9535971483266">
                <text:p>9.695359714832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74679434480896">
                <text:p>9.746794344808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488578017961">
                <text:p>9.84885780179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9949493661167">
                <text:p>9.899494936611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498743710662">
                <text:p>9.94987437106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498756211209">
                <text:p>10.0498756211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0995049383621">
                <text:p>10.0995049383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1488915650922">
                <text:p>10.14889156509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1980390271856">
                <text:p>10.19803902718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2469507659596">
                <text:p>10.2469507659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295630140987">
                <text:p>10.2956301409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3440804327886">
                <text:p>10.34408043278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3923048454133">
                <text:p>10.3923048454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4403065089106">
                <text:p>10.4403065089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4880884817015">
                <text:p>10.48808848170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356537528527">
                <text:p>10.53565375285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830052442584">
                <text:p>10.58300524425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6301458127347">
                <text:p>10.63014581273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770782520313">
                <text:p>10.67707825203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7238052947636">
                <text:p>10.72380529476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70329614269">
                <text:p>10.7703296142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16653826392">
                <text:p>10.8166538263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8627804912002">
                <text:p>10.86278049120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9087121146357">
                <text:p>10.90871211463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9544511501033">
                <text:p>10.95445115010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0453610171873">
                <text:p>11.04536101718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0905365064094">
                <text:p>11.0905365064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13552872566">
                <text:p>11.135528725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1803398874989">
                <text:p>11.18033988749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2249721603218">
                <text:p>11.22497216032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2694276695846">
                <text:p>11.2694276695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3578166916005">
                <text:p>11.35781669160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4017542509914">
                <text:p>11.40175425099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4455231422596">
                <text:p>11.44552314225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4891252930761">
                <text:p>11.48912529307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5325625946708">
                <text:p>11.53256259467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5758369027902">
                <text:p>11.57583690279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6189500386223">
                <text:p>11.61895003862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6619037896906">
                <text:p>11.66190378969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7046999107196">
                <text:p>11.70469991071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7473401244707">
                <text:p>11.74734012447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7898261225516">
                <text:p>11.78982612255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8321595661992">
                <text:p>11.83215956619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8743420870379">
                <text:p>11.87434208703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916375287813">
                <text:p>11.9163752878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582607431014">
                <text:p>11.95826074310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0415945787923">
                <text:p>12.04159457879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0830459735946">
                <text:p>12.08304597359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1243556529821">
                <text:p>12.1243556529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1655250605964">
                <text:p>12.16552506059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2065556157337">
                <text:p>12.20655561573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2882057274445">
                <text:p>12.28820572744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328828005938">
                <text:p>12.3288280059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69316876853">
                <text:p>12.3693168768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4096736459909">
                <text:p>12.409673645990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4498995979887">
                <text:p>12.44989959798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4899959967968">
                <text:p>12.48999599679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5299640861417">
                <text:p>12.529964086141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5698050899765">
                <text:p>12.56980508997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6095202129185">
                <text:p>12.60952021291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6491106406735">
                <text:p>12.64911064067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6885775404495">
                <text:p>12.688577540449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7279220613579">
                <text:p>12.727922061357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7671453348037">
                <text:p>12.767145334803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8062484748657">
                <text:p>12.806248474865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8452325786651">
                <text:p>12.845232578665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8840987267251">
                <text:p>12.884098726725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228479833201">
                <text:p>12.922847983320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9614813968157">
                <text:p>12.961481396815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0384048104053">
                <text:p>13.038404810405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076696830622">
                <text:p>13.0766968306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114877048604">
                <text:p>13.1148770486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1529464379659">
                <text:p>13.152946437965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1909059582729">
                <text:p>13.190905958272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2664991614216">
                <text:p>13.266499161421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3041346956501">
                <text:p>13.304134695650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3416640641263">
                <text:p>13.341664064126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3790881602597">
                <text:p>13.379088160259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4164078649987">
                <text:p>13.416407864998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4536240470737">
                <text:p>13.45362404707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490737563232">
                <text:p>13.49073756323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5277492584687">
                <text:p>13.527749258468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5646599662505">
                <text:p>13.564659966250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6014705087354">
                <text:p>13.601470508735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6381816969859">
                <text:p>13.638181696985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6747943311773">
                <text:p>13.674794331177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7113092008021">
                <text:p>13.711309200802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7477270848675">
                <text:p>13.747727084867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7840487520902">
                <text:p>13.784048752090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8202749610853">
                <text:p>13.82027496108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856406460551">
                <text:p>13.85640646055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8924439894498">
                <text:p>13.892443989449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9283882771841">
                <text:p>13.928388277184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9642400437689">
                <text:p>13.964240043768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">
                <text:p>1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0356688476182">
                <text:p>14.035668847618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0712472794703">
                <text:p>14.071247279470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1067359796659">
                <text:p>14.106735979665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1774468787578">
                <text:p>14.177446878757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2126704035519">
                <text:p>14.212670403551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247806848775">
                <text:p>14.24780684877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2828568570857">
                <text:p>14.282856857085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3178210632764">
                <text:p>14.317821063276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3527000944073">
                <text:p>14.352700094407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3874945699382">
                <text:p>14.387494569938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422205101856">
                <text:p>14.42220510185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456832294801">
                <text:p>14.4568322948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4913767461894">
                <text:p>14.491376746189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525839046334">
                <text:p>14.52583904633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560219778561">
                <text:p>14.56021977856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5945195193264">
                <text:p>14.594519519326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6287388383278">
                <text:p>14.628738838327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6628782986152">
                <text:p>14.662878298615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6969384566991">
                <text:p>14.696938456699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7309198626562">
                <text:p>14.730919862656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7648230602334">
                <text:p>14.764823060233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7986485869487">
                <text:p>14.798648586948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8323969741913">
                <text:p>14.832396974191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8660687473185">
                <text:p>14.866068747318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8996644257513">
                <text:p>14.89966442575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9331845230681">
                <text:p>14.933184523068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9666295470958">
                <text:p>14.966629547095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0332963783729">
                <text:p>15.033296378372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0665191733194">
                <text:p>15.06651917331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0996688705415">
                <text:p>15.0996688705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1327459504216">
                <text:p>15.132745950421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1657508881031">
                <text:p>15.16575088810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1986841535707">
                <text:p>15.198684153570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2315462117278">
                <text:p>15.23154621172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2643375224737">
                <text:p>15.26433752247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2970585407784">
                <text:p>15.29705854077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3297097167559">
                <text:p>15.329709716755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3622914957372">
                <text:p>15.36229149573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3948043183407">
                <text:p>15.39480431834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4272486205415">
                <text:p>15.42724862054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4596248337403">
                <text:p>15.45962483374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919333848297">
                <text:p>15.49193338482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2417469626">
                <text:p>15.524174696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56349186104">
                <text:p>15.5563491861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5884572681199">
                <text:p>15.58845726811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204993518133">
                <text:p>15.6204993518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6524758424985">
                <text:p>15.65247584249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6843871413581">
                <text:p>15.68438714135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7162336455017">
                <text:p>15.71623364550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7480157480236">
                <text:p>15.74801574802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7797338380595">
                <text:p>15.77973383805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8429795177549">
                <text:p>15.84297951775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8745078663875">
                <text:p>15.87450786638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9059737205869">
                <text:p>15.90597372058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9373774505092">
                <text:p>15.9373774505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9687194226713">
                <text:p>15.96871942267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0312195418814">
                <text:p>16.03121954188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062378404209">
                <text:p>16.062378404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0934769394311">
                <text:p>16.09347693943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1245154965971">
                <text:p>16.12451549659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1554944214035">
                <text:p>16.15549442140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1864140562386">
                <text:p>16.1864140562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2172747402269">
                <text:p>16.21727474022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2480768092719">
                <text:p>16.24807680927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2788205960997">
                <text:p>16.2788205960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3095064303001">
                <text:p>16.3095064303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3401346383682">
                <text:p>16.34013463836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3707055437449">
                <text:p>16.37070554374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4012194668567">
                <text:p>16.40121946685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431676725155">
                <text:p>16.4316767251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4620776331543">
                <text:p>16.4620776331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4924225024706">
                <text:p>16.49242250247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5227116418583">
                <text:p>16.52271164185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5529453572469">
                <text:p>16.55294535724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583123951777">
                <text:p>16.5831239517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6132477258362">
                <text:p>16.6132477258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6433169770932">
                <text:p>16.6433169770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6733320005331">
                <text:p>16.6733320005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7032930884901">
                <text:p>16.70329308849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7332005306815">
                <text:p>16.7332005306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7630546142402">
                <text:p>16.7630546142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7928556237467">
                <text:p>16.7928556237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8226038412607">
                <text:p>16.8226038412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8522995463527">
                <text:p>16.8522995463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8819430161341">
                <text:p>16.88194301613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9115345252878">
                <text:p>16.9115345252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9410743460974">
                <text:p>16.9410743460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9705627484771">
                <text:p>16.97056274847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0293863659264">
                <text:p>17.0293863659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058722109232">
                <text:p>17.058722109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0880074906351">
                <text:p>17.0880074906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1172427686237">
                <text:p>17.1172427686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1464281994822">
                <text:p>17.1464281994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755640373177">
                <text:p>17.1755640373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2046505340853">
                <text:p>17.2046505340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336879396141">
                <text:p>17.2336879396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2626765016321">
                <text:p>17.2626765016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2916164657906">
                <text:p>17.29161646579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