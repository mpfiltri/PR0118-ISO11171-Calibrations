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0ffff" fo:wrap-option="wrap" style:vertical-align="middle"/>
    </style:style>
    <style:style style:name="ce2" style:family="table-cell" style:parent-style-name="Default" style:data-style-name="N158"/>
    <style:style style:name="ce3" style:family="table-cell" style:parent-style-name="Default" style:data-style-name="N2"/>
    <style:style style:name="ce1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0ffff"/>
    </style:style>
    <style:style style:name="ce18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20" style:family="table-cell" style:parent-style-name="Default">
      <style:table-cell-properties fo:background-color="#e0ffff" style:vertical-align="middle"/>
    </style:style>
    <style:style style:name="ce21" style:family="table-cell" style:parent-style-name="Default" style:data-style-name="N157">
      <style:table-cell-properties fo:background-color="#e0ffff"/>
    </style:style>
    <style:style style:name="ce22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23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24" style:family="table-cell" style:parent-style-name="Default" style:data-style-name="N158">
      <style:table-cell-properties fo:background-color="#e0ffff"/>
    </style:style>
    <style:style style:name="ce25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26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27" style:family="table-cell" style:parent-style-name="Default" style:data-style-name="N1">
      <style:table-cell-properties fo:background-color="#e0ffff"/>
    </style:style>
    <style:style style:name="ce28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" style:family="table-cell" style:parent-style-name="Default" style:data-style-name="N1"/>
    <style:style style:name="ce31" style:family="table-cell" style:parent-style-name="Default" style:data-style-name="N2">
      <style:table-cell-properties fo:background-color="#e0ffff"/>
    </style:style>
    <style:style style:name="ce32" style:family="table-cell" style:parent-style-name="Default" style:data-style-name="N2">
      <style:table-cell-properties fo:background-color="#e0ffff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e0ffff" fo:border-left="none" fo:border-right="none" fo:border-top="none"/>
    </style:style>
    <style:style style:name="ce34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e0ffff"/>
    </style:style>
    <style:style style:name="ce36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37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e0ffff" style:text-align-source="fix" style:repeat-content="false"/>
      <style:paragraph-properties fo:text-align="start" fo:margin-left="1.411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nex B Coincidence Limit" table:style-name="ta1">
        <table:shapes>
          <draw:frame draw:z-index="0" draw:style-name="gr1" draw:text-style-name="P1" svg:width="23.951cm" svg:height="15.239cm" svg:x="0.186cm" svg:y="18.129cm">
            <draw:object draw:notify-on-update-of-ranges="'Annex B Coincidence Limit'.E22:'Annex B Coincidence Limit'.E36 'Annex B Coincidence Limit'.G22:'Annex B Coincidence Limit'.G36 'Annex B Coincidence Limit'.E22:'Annex B Coincidence Limit'.E36 'Annex B Coincidence Limit'.L22:'Annex B Coincidence Limit'.L36 'Annex B Coincidence Limit'.E22:'Annex B Coincidence Limit'.E35 'Annex B Coincidence Limit'.K22:'Annex B Coincidence Limit'.K36 'Annex B Coincidence Limit'.E22:'Annex B Coincidence Limit'.E36 'Annex B Coincidence Limit'.I22:'Annex B Coincidence Limit'.I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348cm" svg:height="15.238cm" svg:x="24.798cm" svg:y="18.113cm">
            <draw:object draw:notify-on-update-of-ranges="'Annex B Coincidence Limit'.I22:'Annex B Coincidence Limit'.I36 'Annex B Coincidence Limit'.J22:'Annex B Coincidence Limit'.J36 'Annex B Coincidence Limit'.I22:'Annex B Coincidence Limit'.I36 'Annex B Coincidence Limit'.M22:'Annex B Coincidence Limit'.M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Text Frame 1" draw:style-name="gr2" draw:text-style-name="P2" svg:width="19.604cm" svg:height="15.848cm" svg:x="31.597cm" svg:y="1.901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Add successive doses of concentrate, performing fushing and 5-portion tests after each one.</text:p>
              <text:p/>
              <text:p>When the results have stabilized after each addition, record the most recent tests. We are only interested in the 4μm <text:s/>channel counts for this process.</text:p>
              <text:p/>
              <text:p>The optimum flush / stabilization time can be judged by continuously testing and observing the counts. This was about 2 minutes flushing after dosing then perform two 5-portion tests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/>
            </draw:text-box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60" table:default-cell-style-name="Default"/>
        <table:table-row table:style-name="ro1">
          <table:table-cell table:style-name="ce1" office:value-type="string" calcext:value-type="string">
            <text:p>Δ<text:span text:style-name="T1">COUNTS_4um</text:span> &lt; 5%</text:p>
          </table:table-cell>
          <table:table-cell table:style-name="ce20" office:value-type="string" calcext:value-type="string">
            <text:p>RM8632x</text:p>
          </table:table-cell>
          <table:table-cell table:style-name="ce1" office:value-type="string" calcext:value-type="string" table:number-columns-spanned="10" table:number-rows-spanned="1">
            <text:p>Annex B – Coincidence error limit</text:p>
            <text:p>Analyse <text:span text:style-name="T3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20"/>
          <table:table-cell table:style-name="ce38"/>
          <table:table-cell table:number-columns-repeated="2"/>
          <table:table-cell table:style-name="ce38"/>
          <table:table-cell table:number-columns-repeated="128"/>
          <table:table-cell table:style-name="ce38" table:number-columns-repeated="865"/>
          <table:table-cell table:number-columns-repeated="15375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0"/>
          <table:table-cell table:style-name="ce4" office:value-type="string" calcext:value-type="string">
            <text:p>portion</text:p>
          </table:table-cell>
          <table:table-cell table:style-name="ce4"/>
          <table:table-cell table:number-columns-repeated="16359"/>
        </table:table-row>
        <table:table-row table:style-name="ro2">
          <table:table-cell table:number-columns-repeated="23"/>
          <table:table-cell table:style-name="ce4" office:value-type="string" calcext:value-type="string">
            <text:p>counts</text:p>
          </table:table-cell>
          <table:table-cell table:style-name="ce4" office:value-type="string" calcext:value-type="string">
            <text:p>Averaged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167569" calcext:value-type="float">
            <text:p>167569</text:p>
          </table:table-cell>
          <table:table-cell table:style-name="ce38"/>
          <table:table-cell table:number-columns-repeated="16359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0"/>
          <table:table-cell office:value-type="float" office:value="169407" calcext:value-type="float">
            <text:p>169407</text:p>
          </table:table-cell>
          <table:table-cell table:number-columns-repeated="16360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0"/>
          <table:table-cell office:value-type="float" office:value="169243" calcext:value-type="float">
            <text:p>169243</text:p>
          </table:table-cell>
          <table:table-cell table:formula="of:=SUM([.X5:.X7])/3" office:value-type="float" office:value="168739.666666667" calcext:value-type="float">
            <text:p>168739.666666667</text:p>
          </table:table-cell>
          <table:table-cell table:number-columns-repeated="16359"/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0"/>
          <table:table-cell office:value-type="float" office:value="292859" calcext:value-type="float">
            <text:p>292859</text:p>
          </table:table-cell>
          <table:table-cell table:number-columns-repeated="16360"/>
        </table:table-row>
        <table:table-row table:style-name="ro2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0"/>
          <table:table-cell office:value-type="float" office:value="301110" calcext:value-type="float">
            <text:p>301110</text:p>
          </table:table-cell>
          <table:table-cell table:number-columns-repeated="16360"/>
        </table:table-row>
        <table:table-row table:style-name="ro2">
          <table:table-cell table:style-name="ce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0"/>
          <table:table-cell office:value-type="float" office:value="299624" calcext:value-type="float">
            <text:p>299624</text:p>
          </table:table-cell>
          <table:table-cell table:number-columns-repeated="16360"/>
        </table:table-row>
        <table:table-row table:style-name="ro2">
          <table:table-cell table:style-name="ce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0"/>
          <table:table-cell office:value-type="float" office:value="285382" calcext:value-type="float">
            <text:p>285382</text:p>
          </table:table-cell>
          <table:table-cell table:formula="of:=SUM([.X8:.X11])/4" office:value-type="float" office:value="294743.75" calcext:value-type="float">
            <text:p>294743.75</text:p>
          </table:table-cell>
          <table:table-cell table:number-columns-repeated="1635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0"/>
          <table:table-cell office:value-type="float" office:value="458207" calcext:value-type="float">
            <text:p>458207</text:p>
          </table:table-cell>
          <table:table-cell table:number-columns-repeated="16360"/>
        </table:table-row>
        <table:table-row table:style-name="ro2">
          <table:table-cell table:style-name="ce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20"/>
          <table:table-cell office:value-type="float" office:value="465138" calcext:value-type="float">
            <text:p>465138</text:p>
          </table:table-cell>
          <table:table-cell table:number-columns-repeated="16360"/>
        </table:table-row>
        <table:table-row table:style-name="ro2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0"/>
          <table:table-cell office:value-type="float" office:value="454200" calcext:value-type="float">
            <text:p>454200</text:p>
          </table:table-cell>
          <table:table-cell table:number-columns-repeated="16360"/>
        </table:table-row>
        <table:table-row table:style-name="ro2">
          <table:table-cell table:style-name="ce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0"/>
          <table:table-cell office:value-type="float" office:value="445750" calcext:value-type="float">
            <text:p>445750</text:p>
          </table:table-cell>
          <table:table-cell table:number-columns-repeated="16360"/>
        </table:table-row>
        <table:table-row table:style-name="ro2">
          <table:table-cell table:style-name="ce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0"/>
          <table:table-cell office:value-type="float" office:value="443747" calcext:value-type="float">
            <text:p>44374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453143" calcext:value-type="float">
            <text:p>453143</text:p>
          </table:table-cell>
          <table:table-cell table:number-columns-repeated="16360"/>
        </table:table-row>
        <table:table-row table:style-name="ro2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0"/>
          <table:table-cell office:value-type="float" office:value="436276" calcext:value-type="float">
            <text:p>436276</text:p>
          </table:table-cell>
          <table:table-cell table:number-columns-repeated="16360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0"/>
          <table:table-cell office:value-type="float" office:value="454474" calcext:value-type="float">
            <text:p>454474</text:p>
          </table:table-cell>
          <table:table-cell table:number-columns-repeated="16360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dded</text:p>
          </table:table-cell>
          <table:table-cell table:style-name="ce15" office:value-type="string" calcext:value-type="string">
            <text:p>Tank</text:p>
          </table:table-cell>
          <table:table-cell table:style-name="ce15" office:value-type="string" calcext:value-type="string">
            <text:p>Expected</text:p>
          </table:table-cell>
          <table:table-cell table:style-name="ce15" office:value-type="string" calcext:value-type="string">
            <text:p>4μm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Regression</text:p>
          </table:table-cell>
          <table:table-cell table:style-name="ce15" office:value-type="string" calcext:value-type="string">
            <text:p>Relative</text:p>
          </table:table-cell>
          <table:table-cell table:style-name="ce15" table:number-columns-repeated="2"/>
          <table:table-cell table:style-name="ce15" office:value-type="string" calcext:value-type="string">
            <text:p>corrected</text:p>
          </table:table-cell>
          <table:table-cell table:number-columns-repeated="10"/>
          <table:table-cell office:value-type="float" office:value="454993" calcext:value-type="float">
            <text:p>454993</text:p>
          </table:table-cell>
          <table:table-cell table:number-columns-repeated="16360"/>
        </table:table-row>
        <table:table-row table:style-name="ro2">
          <table:table-cell table:style-name="ce16" office:value-type="string" calcext:value-type="string">
            <text:p>Percent</text:p>
          </table:table-cell>
          <table:table-cell table:style-name="ce16" office:value-type="string" calcext:value-type="string">
            <text:p>Added ml</text:p>
          </table:table-cell>
          <table:table-cell table:style-name="ce16" office:value-type="string" calcext:value-type="string">
            <text:p>added</text:p>
          </table:table-cell>
          <table:table-cell table:style-name="ce16" office:value-type="string" calcext:value-type="string">
            <text:p>Dust mg</text:p>
          </table:table-cell>
          <table:table-cell table:style-name="ce16" office:value-type="string" calcext:value-type="string">
            <text:p>Conc mg/l</text:p>
          </table:table-cell>
          <table:table-cell table:style-name="ce16" office:value-type="string" calcext:value-type="string">
            <text:p>4μm/100ml</text:p>
          </table:table-cell>
          <table:table-cell table:style-name="ce16" office:value-type="string" calcext:value-type="string">
            <text:p>Actual</text:p>
          </table:table-cell>
          <table:table-cell table:style-name="ce16" office:value-type="string" calcext:value-type="string">
            <text:p>RM8632a</text:p>
          </table:table-cell>
          <table:table-cell table:style-name="ce16" office:value-type="string" calcext:value-type="string">
            <text:p>Line 0-40%</text:p>
          </table:table-cell>
          <table:table-cell table:style-name="ce16" office:value-type="string" calcext:value-type="string">
            <text:p>Deviation</text:p>
          </table:table-cell>
          <table:table-cell table:style-name="ce34" table:formula="of:=&quot;95%&quot;" office:value-type="string" office:string-value="95%" calcext:value-type="string">
            <text:p>95%</text:p>
          </table:table-cell>
          <table:table-cell table:style-name="ce16" office:value-type="string" calcext:value-type="string">
            <text:p>corrected</text:p>
          </table:table-cell>
          <table:table-cell table:style-name="ce16" office:value-type="string" calcext:value-type="string">
            <text:p>fraction</text:p>
          </table:table-cell>
          <table:table-cell table:number-columns-repeated="10"/>
          <table:table-cell office:value-type="float" office:value="462615" calcext:value-type="float">
            <text:p>462615</text:p>
          </table:table-cell>
          <table:table-cell table:formula="of:=SUM([.X12:.X21])/(17-8+1)" office:value-type="float" office:value="452854.3" calcext:value-type="float">
            <text:p>452854.3</text:p>
          </table:table-cell>
          <table:table-cell table:number-columns-repeated="16359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.0</text:p>
          </table:table-cell>
          <table:table-cell table:number-columns-repeated="2" table:style-name="ce24" office:value-type="float" office:value="0" calcext:value-type="float">
            <text:p>0.00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35" table:formula="of:=[.I22]*0.95" office:value-type="float" office:value="0.95" calcext:value-type="float">
            <text:p>0.95</text:p>
          </table:table-cell>
          <table:table-cell table:style-name="ce36" table:formula="of:=IF([.G22]&lt;[.$A$18]; [.G22]; [.G22]*(1+[.G22]/[.$A$18]*[.$A$19])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  <table:table-cell office:value-type="float" office:value="578672" calcext:value-type="float">
            <text:p>578672</text:p>
          </table:table-cell>
          <table:table-cell table:number-columns-repeated="16360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.2" calcext:value-type="float">
            <text:p>10.2</text:p>
          </table:table-cell>
          <table:table-cell table:style-name="ce21" table:formula="of:=[.B23]" office:value-type="float" office:value="10.2" calcext:value-type="float">
            <text:p>10.2</text:p>
          </table:table-cell>
          <table:table-cell table:style-name="ce24" table:formula="of:=[.C23]*[.$A$15]/1000" office:value-type="float" office:value="2.24638" calcext:value-type="float">
            <text:p>2.246</text:p>
          </table:table-cell>
          <table:table-cell table:style-name="ce24" table:formula="of:=[.D23]/([.$A$7]+[.C23]/1000)" office:value-type="float" office:value="0.18397569245385" calcext:value-type="float">
            <text:p>0.184</text:p>
          </table:table-cell>
          <table:table-cell table:style-name="ce27" table:formula="of:=[.$A$6]*[.E23]*100" office:value-type="float" office:value="115904.686245926" calcext:value-type="float">
            <text:p>115905</text:p>
          </table:table-cell>
          <table:table-cell table:style-name="ce17" office:value-type="float" office:value="169243" calcext:value-type="float">
            <text:p>169243</text:p>
          </table:table-cell>
          <table:table-cell table:style-name="ce31" table:formula="of:=[.G23]/[.F23]" office:value-type="float" office:value="1.46019117502205" calcext:value-type="float">
            <text:p>1.46</text:p>
          </table:table-cell>
          <table:table-cell table:style-name="ce27" table:formula="of:=[.E23]*[.$C$99]" office:value-type="float" office:value="154593.286356587" calcext:value-type="float">
            <text:p>154593</text:p>
          </table:table-cell>
          <table:table-cell table:style-name="ce31" table:formula="of:=[.G23]/[.I23]" office:value-type="float" office:value="1.09476293562724" calcext:value-type="float">
            <text:p>1.09</text:p>
          </table:table-cell>
          <table:table-cell table:style-name="ce27" table:formula="of:=[.I23]*0.95" office:value-type="float" office:value="146863.622038757" calcext:value-type="float">
            <text:p>146864</text:p>
          </table:table-cell>
          <table:table-cell table:style-name="ce36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39" table:formula="of:=[.L23]/[.I23]" office:value-type="float" office:value="1.09476293562724" calcext:value-type="float">
            <text:p>1.09476293562724</text:p>
          </table:table-cell>
          <table:table-cell table:number-columns-repeated="10"/>
          <table:table-cell office:value-type="float" office:value="581090" calcext:value-type="float">
            <text:p>581090</text:p>
          </table:table-cell>
          <table:table-cell table:number-columns-repeated="1636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23]+[.B24]" office:value-type="float" office:value="20" calcext:value-type="float">
            <text:p>20.0</text:p>
          </table:table-cell>
          <table:table-cell table:style-name="ce24" table:formula="of:=[.C24]*[.$A$15]/1000" office:value-type="float" office:value="4.40466666666667" calcext:value-type="float">
            <text:p>4.405</text:p>
          </table:table-cell>
          <table:table-cell table:style-name="ce24" table:formula="of:=[.D24]/([.$A$7]+[.C24]/1000)" office:value-type="float" office:value="0.360447354064375" calcext:value-type="float">
            <text:p>0.360</text:p>
          </table:table-cell>
          <table:table-cell table:style-name="ce27" table:formula="of:=[.$A$6]*[.E24]*100" office:value-type="float" office:value="227081.833060556" calcext:value-type="float">
            <text:p>227082</text:p>
          </table:table-cell>
          <table:table-cell table:style-name="ce17" office:value-type="float" office:value="294743" calcext:value-type="float">
            <text:p>294743</text:p>
          </table:table-cell>
          <table:table-cell table:style-name="ce31" table:formula="of:=[.G24]/[.F24]" office:value-type="float" office:value="1.29795940092398" calcext:value-type="float">
            <text:p>1.30</text:p>
          </table:table-cell>
          <table:table-cell table:style-name="ce27" table:formula="of:=[.E24]*[.$C$99]" office:value-type="float" office:value="302880.996288821" calcext:value-type="float">
            <text:p>302881</text:p>
          </table:table-cell>
          <table:table-cell table:style-name="ce31" table:formula="of:=[.G24]/[.I24]" office:value-type="float" office:value="0.973131373745677" calcext:value-type="float">
            <text:p>0.97</text:p>
          </table:table-cell>
          <table:table-cell table:style-name="ce27" table:formula="of:=[.I24]*0.95" office:value-type="float" office:value="287736.94647438" calcext:value-type="float">
            <text:p>287737</text:p>
          </table:table-cell>
          <table:table-cell table:style-name="ce36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39" table:formula="of:=[.L24]/[.I24]" office:value-type="float" office:value="0.973131373745677" calcext:value-type="float">
            <text:p>0.973131373745677</text:p>
          </table:table-cell>
          <table:table-cell table:number-columns-repeated="10"/>
          <table:table-cell office:value-type="float" office:value="592101" calcext:value-type="float">
            <text:p>592101</text:p>
          </table:table-cell>
          <table:table-cell table:number-columns-repeated="16360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24]+[.B25]" office:value-type="float" office:value="29.8" calcext:value-type="float">
            <text:p>29.8</text:p>
          </table:table-cell>
          <table:table-cell table:style-name="ce24" table:formula="of:=[.C25]*[.$A$15]/1000" office:value-type="float" office:value="6.56295333333333" calcext:value-type="float">
            <text:p>6.563</text:p>
          </table:table-cell>
          <table:table-cell table:style-name="ce24" table:formula="of:=[.D25]/([.$A$7]+[.C25]/1000)" office:value-type="float" office:value="0.536636194650226" calcext:value-type="float">
            <text:p>0.537</text:p>
          </table:table-cell>
          <table:table-cell table:style-name="ce27" table:formula="of:=[.$A$6]*[.E25]*100" office:value-type="float" office:value="338080.802629642" calcext:value-type="float">
            <text:p>338081</text:p>
          </table:table-cell>
          <table:table-cell table:style-name="ce17" office:value-type="float" office:value="452854" calcext:value-type="float">
            <text:p>452854</text:p>
          </table:table-cell>
          <table:table-cell table:style-name="ce31" table:formula="of:=[.G25]/[.F25]" office:value-type="float" office:value="1.33948451517399" calcext:value-type="float">
            <text:p>1.34</text:p>
          </table:table-cell>
          <table:table-cell table:style-name="ce27" table:formula="of:=[.E25]*[.$C$99]" office:value-type="float" office:value="450931.054001505" calcext:value-type="float">
            <text:p>450931</text:p>
          </table:table-cell>
          <table:table-cell table:style-name="ce31" table:formula="of:=[.G25]/[.I25]" office:value-type="float" office:value="1.0042643902686" calcext:value-type="float">
            <text:p>1.00</text:p>
          </table:table-cell>
          <table:table-cell table:style-name="ce27" table:formula="of:=[.I25]*0.95" office:value-type="float" office:value="428384.50130143" calcext:value-type="float">
            <text:p>428385</text:p>
          </table:table-cell>
          <table:table-cell table:style-name="ce36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39" table:formula="of:=[.L25]/[.I25]" office:value-type="float" office:value="1.0042643902686" calcext:value-type="float">
            <text:p>1.0042643902686</text:p>
          </table:table-cell>
          <table:table-cell table:number-columns-repeated="10"/>
          <table:table-cell office:value-type="float" office:value="600145" calcext:value-type="float">
            <text:p>600145</text:p>
          </table:table-cell>
          <table:table-cell table:number-columns-repeated="16360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25]+[.B26]" office:value-type="float" office:value="39.6" calcext:value-type="float">
            <text:p>39.6</text:p>
          </table:table-cell>
          <table:table-cell table:style-name="ce24" table:formula="of:=[.C26]*[.$A$15]/1000" office:value-type="float" office:value="8.72124" calcext:value-type="float">
            <text:p>8.721</text:p>
          </table:table-cell>
          <table:table-cell table:style-name="ce24" table:formula="of:=[.D26]/([.$A$7]+[.C26]/1000)" office:value-type="float" office:value="0.712542893558613" calcext:value-type="float">
            <text:p>0.713</text:p>
          </table:table-cell>
          <table:table-cell table:style-name="ce27" table:formula="of:=[.$A$6]*[.E26]*100" office:value-type="float" office:value="448902.022941926" calcext:value-type="float">
            <text:p>448902</text:p>
          </table:table-cell>
          <table:table-cell table:style-name="ce17" office:value-type="float" office:value="597630" calcext:value-type="float">
            <text:p>597630</text:p>
          </table:table-cell>
          <table:table-cell table:style-name="ce31" table:formula="of:=[.G26]/[.F26]" office:value-type="float" office:value="1.33131500741157" calcext:value-type="float">
            <text:p>1.33</text:p>
          </table:table-cell>
          <table:table-cell table:style-name="ce27" table:formula="of:=[.E26]*[.$C$99]" office:value-type="float" office:value="598744.030344604" calcext:value-type="float">
            <text:p>598744</text:p>
          </table:table-cell>
          <table:table-cell table:style-name="ce31" table:formula="of:=[.G26]/[.I26]" office:value-type="float" office:value="0.998139387971914" calcext:value-type="float">
            <text:p>1.00</text:p>
          </table:table-cell>
          <table:table-cell table:style-name="ce27" table:formula="of:=[.I26]*0.95" office:value-type="float" office:value="568806.828827374" calcext:value-type="float">
            <text:p>568807</text:p>
          </table:table-cell>
          <table:table-cell table:style-name="ce36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3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4" table:number-columns-repeated="2"/>
          <table:table-cell table:number-columns-repeated="6"/>
          <table:table-cell office:value-type="float" office:value="599839" calcext:value-type="float">
            <text:p>599839</text:p>
          </table:table-cell>
          <table:table-cell table:number-columns-repeated="5"/>
          <table:table-cell table:style-name="ce4" table:number-columns-repeated="16355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26]+[.B27]" office:value-type="float" office:value="49.4" calcext:value-type="float">
            <text:p>49.4</text:p>
          </table:table-cell>
          <table:table-cell table:style-name="ce24" table:formula="of:=[.C27]*[.$A$15]/1000" office:value-type="float" office:value="10.8795266666667" calcext:value-type="float">
            <text:p>10.880</text:p>
          </table:table-cell>
          <table:table-cell table:style-name="ce24" table:formula="of:=[.D27]/([.$A$7]+[.C27]/1000)" office:value-type="float" office:value="0.88816812796273" calcext:value-type="float">
            <text:p>0.888</text:p>
          </table:table-cell>
          <table:table-cell table:style-name="ce27" table:formula="of:=[.$A$6]*[.E27]*100" office:value-type="float" office:value="559545.92061652" calcext:value-type="float">
            <text:p>559546</text:p>
          </table:table-cell>
          <table:table-cell table:style-name="ce17" office:value-type="float" office:value="720744" calcext:value-type="float">
            <text:p>720744</text:p>
          </table:table-cell>
          <table:table-cell table:style-name="ce31" table:formula="of:=[.G27]/[.F27]" office:value-type="float" office:value="1.28808731052112" calcext:value-type="float">
            <text:p>1.29</text:p>
          </table:table-cell>
          <table:table-cell table:style-name="ce27" table:formula="of:=[.E27]*[.$C$99]" office:value-type="float" office:value="746320.494341276" calcext:value-type="float">
            <text:p>746320</text:p>
          </table:table-cell>
          <table:table-cell table:style-name="ce31" table:formula="of:=[.G27]/[.I27]" office:value-type="float" office:value="0.965729878068202" calcext:value-type="float">
            <text:p>0.97</text:p>
          </table:table-cell>
          <table:table-cell table:style-name="ce27" table:formula="of:=[.I27]*0.95" office:value-type="float" office:value="709004.469624212" calcext:value-type="float">
            <text:p>709004</text:p>
          </table:table-cell>
          <table:table-cell table:style-name="ce36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39" table:formula="of:=[.L27]/[.I27]" office:value-type="float" office:value="1.03533427959204" calcext:value-type="float">
            <text:p>1.03533427959204</text:p>
          </table:table-cell>
          <table:table-cell table:number-columns-repeated="10"/>
          <table:table-cell office:value-type="float" office:value="606849" calcext:value-type="float">
            <text:p>606849</text:p>
          </table:table-cell>
          <table:table-cell table:number-columns-repeated="16360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9.8" calcext:value-type="float">
            <text:p>9.8</text:p>
          </table:table-cell>
          <table:table-cell table:style-name="ce22" table:formula="of:=[.C27]+[.B28]" office:value-type="float" office:value="59.2" calcext:value-type="float">
            <text:p>59.2</text:p>
          </table:table-cell>
          <table:table-cell table:style-name="ce25" table:formula="of:=[.C28]*[.$A$15]/1000" office:value-type="float" office:value="13.0378133333333" calcext:value-type="float">
            <text:p>13.038</text:p>
          </table:table-cell>
          <table:table-cell table:style-name="ce25" table:formula="of:=[.D28]/([.$A$7]+[.C28]/1000)" office:value-type="float" office:value="1.06351257287044" calcext:value-type="float">
            <text:p>1.064</text:p>
          </table:table-cell>
          <table:table-cell table:style-name="ce28" table:formula="of:=[.$A$6]*[.E28]*100" office:value-type="float" office:value="670012.920908379" calcext:value-type="float">
            <text:p>670013</text:p>
          </table:table-cell>
          <table:table-cell table:style-name="ce18" office:value-type="float" office:value="837754" calcext:value-type="float">
            <text:p>837754</text:p>
          </table:table-cell>
          <table:table-cell table:style-name="ce32" table:formula="of:=[.G28]/[.F28]" office:value-type="float" office:value="1.25035499145927" calcext:value-type="float">
            <text:p>1.25</text:p>
          </table:table-cell>
          <table:table-cell table:style-name="ce28" table:formula="of:=[.E28]*[.$C$99]" office:value-type="float" office:value="893661.013195168" calcext:value-type="float">
            <text:p>893661</text:p>
          </table:table-cell>
          <table:table-cell table:style-name="ce32" table:formula="of:=[.G28]/[.I28]" office:value-type="float" office:value="0.937440469742235" calcext:value-type="float">
            <text:p>0.94</text:p>
          </table:table-cell>
          <table:table-cell table:style-name="ce28" table:formula="of:=[.I28]*0.95" office:value-type="float" office:value="848977.962535409" calcext:value-type="float">
            <text:p>848978</text:p>
          </table:table-cell>
          <table:table-cell table:style-name="ce36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39" table:formula="of:=[.L28]/[.I28]" office:value-type="float" office:value="1.01597492007108" calcext:value-type="float">
            <text:p>1.01597492007108</text:p>
          </table:table-cell>
          <table:table-cell table:number-columns-repeated="10"/>
          <table:table-cell office:value-type="float" office:value="607236" calcext:value-type="float">
            <text:p>607236</text:p>
          </table:table-cell>
          <table:table-cell table:number-columns-repeated="16360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28]+[.B29]" office:value-type="float" office:value="69" calcext:value-type="float">
            <text:p>69.0</text:p>
          </table:table-cell>
          <table:table-cell table:style-name="ce24" table:formula="of:=[.C29]*[.$A$15]/1000" office:value-type="float" office:value="15.1961" calcext:value-type="float">
            <text:p>15.196</text:p>
          </table:table-cell>
          <table:table-cell table:style-name="ce24" table:formula="of:=[.D29]/([.$A$7]+[.C29]/1000)" office:value-type="float" office:value="1.23857690113294" calcext:value-type="float">
            <text:p>1.239</text:p>
          </table:table-cell>
          <table:table-cell table:style-name="ce27" table:formula="of:=[.$A$6]*[.E29]*100" office:value-type="float" office:value="780303.44771375" calcext:value-type="float">
            <text:p>780303</text:p>
          </table:table-cell>
          <table:table-cell table:style-name="ce17" office:value-type="float" office:value="953674" calcext:value-type="float">
            <text:p>953674</text:p>
          </table:table-cell>
          <table:table-cell table:style-name="ce31" table:formula="of:=[.G29]/[.F29]" office:value-type="float" office:value="1.22218350155214" calcext:value-type="float">
            <text:p>1.22</text:p>
          </table:table-cell>
          <table:table-cell table:style-name="ce27" table:formula="of:=[.E29]*[.$C$99]" office:value-type="float" office:value="1040766.1522977" calcext:value-type="float">
            <text:p>1040766</text:p>
          </table:table-cell>
          <table:table-cell table:style-name="ce31" table:formula="of:=[.G29]/[.I29]" office:value-type="float" office:value="0.916319192255219" calcext:value-type="float">
            <text:p>0.92</text:p>
          </table:table-cell>
          <table:table-cell table:style-name="ce27" table:formula="of:=[.I29]*0.95" office:value-type="float" office:value="988727.844682814" calcext:value-type="float">
            <text:p>988728</text:p>
          </table:table-cell>
          <table:table-cell table:style-name="ce36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39" table:formula="of:=[.L29]/[.I29]" office:value-type="float" office:value="1.0037061711907" calcext:value-type="float">
            <text:p>1.0037061711907</text:p>
          </table:table-cell>
          <table:table-cell table:number-columns-repeated="10"/>
          <table:table-cell office:value-type="float" office:value="615108" calcext:value-type="float">
            <text:p>615108</text:p>
          </table:table-cell>
          <table:table-cell table:formula="of:=SUM([.X22:.X29])/8" office:value-type="float" office:value="597630" calcext:value-type="float">
            <text:p>597630</text:p>
          </table:table-cell>
          <table:table-cell table:number-columns-repeated="16359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29]+[.B30]" office:value-type="float" office:value="78.8" calcext:value-type="float">
            <text:p>78.8</text:p>
          </table:table-cell>
          <table:table-cell table:style-name="ce24" table:formula="of:=[.C30]*[.$A$15]/1000" office:value-type="float" office:value="17.3543866666667" calcext:value-type="float">
            <text:p>17.354</text:p>
          </table:table-cell>
          <table:table-cell table:style-name="ce24" table:formula="of:=[.D30]/([.$A$7]+[.C30]/1000)" office:value-type="float" office:value="1.41336178345332" calcext:value-type="float">
            <text:p>1.413</text:p>
          </table:table-cell>
          <table:table-cell table:style-name="ce27" table:formula="of:=[.$A$6]*[.E30]*100" office:value-type="float" office:value="890417.923575594" calcext:value-type="float">
            <text:p>890418</text:p>
          </table:table-cell>
          <table:table-cell table:style-name="ce17" office:value-type="float" office:value="1085924" calcext:value-type="float">
            <text:p>1085924</text:p>
          </table:table-cell>
          <table:table-cell table:style-name="ce31" table:formula="of:=[.G30]/[.F30]" office:value-type="float" office:value="1.2195666453336" calcext:value-type="float">
            <text:p>1.22</text:p>
          </table:table-cell>
          <table:table-cell table:style-name="ce27" table:formula="of:=[.E30]*[.$C$99]" office:value-type="float" office:value="1187636.47523525" calcext:value-type="float">
            <text:p>1187636</text:p>
          </table:table-cell>
          <table:table-cell table:style-name="ce31" table:formula="of:=[.G30]/[.I30]" office:value-type="float" office:value="0.914357231900356" calcext:value-type="float">
            <text:p>0.91</text:p>
          </table:table-cell>
          <table:table-cell table:style-name="ce27" table:formula="of:=[.I30]*0.95" office:value-type="float" office:value="1128254.65147349" calcext:value-type="float">
            <text:p>1128255</text:p>
          </table:table-cell>
          <table:table-cell table:style-name="ce36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39" table:formula="of:=[.L30]/[.I30]" office:value-type="float" office:value="1.01364947816977" calcext:value-type="float">
            <text:p>1.01364947816977</text:p>
          </table:table-cell>
          <table:table-cell table:number-columns-repeated="10"/>
          <table:table-cell table:style-name="ce4" office:value-type="float" office:value="723681" calcext:value-type="float">
            <text:p>723681</text:p>
          </table:table-cell>
          <table:table-cell table:style-name="ce4"/>
          <table:table-cell table:number-columns-repeated="16359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30]+[.B31]" office:value-type="float" office:value="88.6" calcext:value-type="float">
            <text:p>88.6</text:p>
          </table:table-cell>
          <table:table-cell table:style-name="ce24" table:formula="of:=[.C31]*[.$A$15]/1000" office:value-type="float" office:value="19.5126733333333" calcext:value-type="float">
            <text:p>19.513</text:p>
          </table:table-cell>
          <table:table-cell table:style-name="ce24" table:formula="of:=[.D31]/([.$A$7]+[.C31]/1000)" office:value-type="float" office:value="1.58786788839521" calcext:value-type="float">
            <text:p>1.588</text:p>
          </table:table-cell>
          <table:table-cell table:style-name="ce27" table:formula="of:=[.$A$6]*[.E31]*100" office:value-type="float" office:value="1000356.76968898" calcext:value-type="float">
            <text:p>1000357</text:p>
          </table:table-cell>
          <table:table-cell table:style-name="ce17" office:value-type="float" office:value="1199473" calcext:value-type="float">
            <text:p>1199473</text:p>
          </table:table-cell>
          <table:table-cell table:style-name="ce31" table:formula="of:=[.G31]/[.F31]" office:value-type="float" office:value="1.19904521701085" calcext:value-type="float">
            <text:p>1.20</text:p>
          </table:table-cell>
          <table:table-cell table:style-name="ce27" table:formula="of:=[.E31]*[.$C$99]" office:value-type="float" office:value="1334272.54379644" calcext:value-type="float">
            <text:p>1334273</text:p>
          </table:table-cell>
          <table:table-cell table:style-name="ce31" table:formula="of:=[.G31]/[.I31]" office:value-type="float" office:value="0.898971507415653" calcext:value-type="float">
            <text:p>0.90</text:p>
          </table:table-cell>
          <table:table-cell table:style-name="ce27" table:formula="of:=[.I31]*0.95" office:value-type="float" office:value="1267558.91660661" calcext:value-type="float">
            <text:p>1267559</text:p>
          </table:table-cell>
          <table:table-cell table:style-name="ce36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39" table:formula="of:=[.L31]/[.I31]" office:value-type="float" office:value="1.00680071250709" calcext:value-type="float">
            <text:p>1.00680071250709</text:p>
          </table:table-cell>
          <table:table-cell table:number-columns-repeated="10"/>
          <table:table-cell office:value-type="float" office:value="707528" calcext:value-type="float">
            <text:p>707528</text:p>
          </table:table-cell>
          <table:table-cell table:number-columns-repeated="16360"/>
        </table:table-row>
        <table:table-row table:style-name="ro2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.6" calcext:value-type="float">
            <text:p>19.6</text:p>
          </table:table-cell>
          <table:table-cell table:style-name="ce21" table:formula="of:=[.C31]+[.B32]" office:value-type="float" office:value="108.2" calcext:value-type="float">
            <text:p>108.2</text:p>
          </table:table-cell>
          <table:table-cell table:style-name="ce24" table:formula="of:=[.C32]*[.$A$15]/1000" office:value-type="float" office:value="23.8292466666667" calcext:value-type="float">
            <text:p>23.829</text:p>
          </table:table-cell>
          <table:table-cell table:style-name="ce24" table:formula="of:=[.D32]/([.$A$7]+[.C32]/1000)" office:value-type="float" office:value="1.93604642975144" calcext:value-type="float">
            <text:p>1.936</text:p>
          </table:table-cell>
          <table:table-cell table:style-name="ce27" table:formula="of:=[.$A$6]*[.E32]*100" office:value-type="float" office:value="1219709.25074341" calcext:value-type="float">
            <text:p>1219709</text:p>
          </table:table-cell>
          <table:table-cell table:style-name="ce17" office:value-type="float" office:value="1416948" calcext:value-type="float">
            <text:p>1416948</text:p>
          </table:table-cell>
          <table:table-cell table:style-name="ce31" table:formula="of:=[.G32]/[.F32]" office:value-type="float" office:value="1.16170964443893" calcext:value-type="float">
            <text:p>1.16</text:p>
          </table:table-cell>
          <table:table-cell table:style-name="ce27" table:formula="of:=[.E32]*[.$C$99]" office:value-type="float" office:value="1626844.15599789" calcext:value-type="float">
            <text:p>1626844</text:p>
          </table:table-cell>
          <table:table-cell table:style-name="ce31" table:formula="of:=[.G32]/[.I32]" office:value-type="float" office:value="0.870979555586783" calcext:value-type="float">
            <text:p>0.87</text:p>
          </table:table-cell>
          <table:table-cell table:style-name="ce27" table:formula="of:=[.I32]*0.95" office:value-type="float" office:value="1545501.948198" calcext:value-type="float">
            <text:p>1545502</text:p>
          </table:table-cell>
          <table:table-cell table:style-name="ce36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39" table:formula="of:=[.L32]/[.I32]" office:value-type="float" office:value="0.994392829519741" calcext:value-type="float">
            <text:p>0.994392829519741</text:p>
          </table:table-cell>
          <table:table-cell table:number-columns-repeated="10"/>
          <table:table-cell office:value-type="float" office:value="726643" calcext:value-type="float">
            <text:p>726643</text:p>
          </table:table-cell>
          <table:table-cell table:number-columns-repeated="16360"/>
        </table:table-row>
        <table:table-row table:style-name="ro2"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32]+[.B33]" office:value-type="float" office:value="118" calcext:value-type="float">
            <text:p>118.0</text:p>
          </table:table-cell>
          <table:table-cell table:style-name="ce24" table:formula="of:=[.C33]*[.$A$15]/1000" office:value-type="float" office:value="25.9875333333333" calcext:value-type="float">
            <text:p>25.988</text:p>
          </table:table-cell>
          <table:table-cell table:style-name="ce24" table:formula="of:=[.D33]/([.$A$7]+[.C33]/1000)" office:value-type="float" office:value="2.10972019267197" calcext:value-type="float">
            <text:p>2.110</text:p>
          </table:table-cell>
          <table:table-cell table:style-name="ce27" table:formula="of:=[.$A$6]*[.E33]*100" office:value-type="float" office:value="1329123.72138334" calcext:value-type="float">
            <text:p>1329124</text:p>
          </table:table-cell>
          <table:table-cell table:style-name="ce17" office:value-type="float" office:value="1526221" calcext:value-type="float">
            <text:p>1526221</text:p>
          </table:table-cell>
          <table:table-cell table:style-name="ce31" table:formula="of:=[.G33]/[.F33]" office:value-type="float" office:value="1.14829114509485" calcext:value-type="float">
            <text:p>1.15</text:p>
          </table:table-cell>
          <table:table-cell table:style-name="ce27" table:formula="of:=[.E33]*[.$C$99]" office:value-type="float" office:value="1772780.81429059" calcext:value-type="float">
            <text:p>1772781</text:p>
          </table:table-cell>
          <table:table-cell table:style-name="ce31" table:formula="of:=[.G33]/[.I33]" office:value-type="float" office:value="0.860919177202821" calcext:value-type="float">
            <text:p>0.86</text:p>
          </table:table-cell>
          <table:table-cell table:style-name="ce27" table:formula="of:=[.I33]*0.95" office:value-type="float" office:value="1684141.77357606" calcext:value-type="float">
            <text:p>1684142</text:p>
          </table:table-cell>
          <table:table-cell table:style-name="ce36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39" table:formula="of:=[.L33]/[.I33]" office:value-type="float" office:value="0.992314469957788" calcext:value-type="float">
            <text:p>0.992314469957788</text:p>
          </table:table-cell>
          <table:table-cell table:number-columns-repeated="10"/>
          <table:table-cell office:value-type="float" office:value="726839" calcext:value-type="float">
            <text:p>726839</text:p>
          </table:table-cell>
          <table:table-cell table:number-columns-repeated="16360"/>
        </table:table-row>
        <table:table-row table:style-name="ro2"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33]+[.B34]" office:value-type="float" office:value="127.8" calcext:value-type="float">
            <text:p>127.8</text:p>
          </table:table-cell>
          <table:table-cell table:style-name="ce24" table:formula="of:=[.C34]*[.$A$15]/1000" office:value-type="float" office:value="28.14582" calcext:value-type="float">
            <text:p>28.146</text:p>
          </table:table-cell>
          <table:table-cell table:style-name="ce24" table:formula="of:=[.D34]/([.$A$7]+[.C34]/1000)" office:value-type="float" office:value="2.28311783124321" calcext:value-type="float">
            <text:p>2.283</text:p>
          </table:table-cell>
          <table:table-cell table:style-name="ce27" table:formula="of:=[.$A$6]*[.E34]*100" office:value-type="float" office:value="1438364.23368322" calcext:value-type="float">
            <text:p>1438364</text:p>
          </table:table-cell>
          <table:table-cell table:style-name="ce17" office:value-type="float" office:value="1653842" calcext:value-type="float">
            <text:p>1653842</text:p>
          </table:table-cell>
          <table:table-cell table:style-name="ce31" table:formula="of:=[.G34]/[.F34]" office:value-type="float" office:value="1.14980751138744" calcext:value-type="float">
            <text:p>1.15</text:p>
          </table:table-cell>
          <table:table-cell table:style-name="ce27" table:formula="of:=[.E34]*[.$C$99]" office:value-type="float" office:value="1918485.44752589" calcext:value-type="float">
            <text:p>1918485</text:p>
          </table:table-cell>
          <table:table-cell table:style-name="ce31" table:formula="of:=[.G34]/[.I34]" office:value-type="float" office:value="0.862056056840472" calcext:value-type="float">
            <text:p>0.86</text:p>
          </table:table-cell>
          <table:table-cell table:style-name="ce27" table:formula="of:=[.I34]*0.95" office:value-type="float" office:value="1822561.1751496" calcext:value-type="float">
            <text:p>1822561</text:p>
          </table:table-cell>
          <table:table-cell table:style-name="ce36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39" table:formula="of:=[.L34]/[.I34]" office:value-type="float" office:value="1.00462650815619" calcext:value-type="float">
            <text:p>1.00462650815619</text:p>
          </table:table-cell>
          <table:table-cell table:number-columns-repeated="10"/>
          <table:table-cell office:value-type="float" office:value="732858" calcext:value-type="float">
            <text:p>732858</text:p>
          </table:table-cell>
          <table:table-cell table:number-columns-repeated="16360"/>
        </table:table-row>
        <table:table-row table:style-name="ro2"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9.8" calcext:value-type="float">
            <text:p>9.8</text:p>
          </table:table-cell>
          <table:table-cell table:style-name="ce21" table:formula="of:=[.C34]+[.B35]" office:value-type="float" office:value="137.6" calcext:value-type="float">
            <text:p>137.6</text:p>
          </table:table-cell>
          <table:table-cell table:style-name="ce24" table:formula="of:=[.C35]*[.$A$15]/1000" office:value-type="float" office:value="30.3041066666667" calcext:value-type="float">
            <text:p>30.304</text:p>
          </table:table-cell>
          <table:table-cell table:style-name="ce24" table:formula="of:=[.D35]/([.$A$7]+[.C35]/1000)" office:value-type="float" office:value="2.45624000345826" calcext:value-type="float">
            <text:p>2.456</text:p>
          </table:table-cell>
          <table:table-cell table:style-name="ce27" table:formula="of:=[.$A$6]*[.E35]*100" office:value-type="float" office:value="1547431.20217871" calcext:value-type="float">
            <text:p>1547431</text:p>
          </table:table-cell>
          <table:table-cell table:style-name="ce17" office:value-type="float" office:value="1770798" calcext:value-type="float">
            <text:p>1770798</text:p>
          </table:table-cell>
          <table:table-cell table:style-name="ce31" table:formula="of:=[.G35]/[.F35]" office:value-type="float" office:value="1.14434683590896" calcext:value-type="float">
            <text:p>1.14</text:p>
          </table:table-cell>
          <table:table-cell table:style-name="ce27" table:formula="of:=[.E35]*[.$C$99]" office:value-type="float" office:value="2063958.60861009" calcext:value-type="float">
            <text:p>2063959</text:p>
          </table:table-cell>
          <table:table-cell table:style-name="ce31" table:formula="of:=[.G35]/[.I35]" office:value-type="float" office:value="0.857961972983794" calcext:value-type="float">
            <text:p>0.86</text:p>
          </table:table-cell>
          <table:table-cell table:style-name="ce27" table:formula="of:=[.I35]*0.95" office:value-type="float" office:value="1960760.67817959" calcext:value-type="float">
            <text:p>1960761</text:p>
          </table:table-cell>
          <table:table-cell table:style-name="ce36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39" table:formula="of:=[.L35]/[.I35]" office:value-type="float" office:value="1.00988970756737" calcext:value-type="float">
            <text:p>1.00988970756737</text:p>
          </table:table-cell>
          <table:table-cell table:number-columns-repeated="10"/>
          <table:table-cell office:value-type="float" office:value="705786" calcext:value-type="float">
            <text:p>705786</text:p>
          </table:table-cell>
          <table:table-cell table:number-columns-repeated="16360"/>
        </table:table-row>
        <table:table-row table:style-name="ro2"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9.8" calcext:value-type="float">
            <text:p>9.8</text:p>
          </table:table-cell>
          <table:table-cell table:style-name="ce23" table:formula="of:=[.C35]+[.B36]" office:value-type="float" office:value="147.4" calcext:value-type="float">
            <text:p>147.4</text:p>
          </table:table-cell>
          <table:table-cell table:style-name="ce26" table:formula="of:=[.C36]*[.$A$15]/1000" office:value-type="float" office:value="32.4623933333333" calcext:value-type="float">
            <text:p>32.462</text:p>
          </table:table-cell>
          <table:table-cell table:style-name="ce26" table:formula="of:=[.D36]/([.$A$7]+[.C36]/1000)" office:value-type="float" office:value="2.62908736522129" calcext:value-type="float">
            <text:p>2.629</text:p>
          </table:table-cell>
          <table:table-cell table:style-name="ce29" table:formula="of:=[.$A$6]*[.E36]*100" office:value-type="float" office:value="1656325.04008941" calcext:value-type="float">
            <text:p>1656325</text:p>
          </table:table-cell>
          <table:table-cell table:style-name="ce19" office:value-type="float" office:value="1850630" calcext:value-type="float">
            <text:p>1850630</text:p>
          </table:table-cell>
          <table:table-cell table:style-name="ce33" table:formula="of:=[.G36]/[.F36]" office:value-type="float" office:value="1.11731088717955" calcext:value-type="float">
            <text:p>1.12</text:p>
          </table:table-cell>
          <table:table-cell table:style-name="ce29" table:formula="of:=[.E36]*[.$C$99]" office:value-type="float" office:value="2209200.84869415" calcext:value-type="float">
            <text:p>2209201</text:p>
          </table:table-cell>
          <table:table-cell table:style-name="ce33" table:formula="of:=[.G36]/[.I36]" office:value-type="float" office:value="0.837692055520395" calcext:value-type="float">
            <text:p>0.84</text:p>
          </table:table-cell>
          <table:table-cell table:style-name="ce29" table:formula="of:=[.I36]*0.95" office:value-type="float" office:value="2098740.80625944" calcext:value-type="float">
            <text:p>2098741</text:p>
          </table:table-cell>
          <table:table-cell table:style-name="ce37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39" table:formula="of:=[.L36]/[.I36]" office:value-type="float" office:value="0.992717860391166" calcext:value-type="float">
            <text:p>0.992717860391166</text:p>
          </table:table-cell>
          <table:table-cell table:number-columns-repeated="10"/>
          <table:table-cell office:value-type="float" office:value="700985" calcext:value-type="float">
            <text:p>700985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726528" calcext:value-type="float">
            <text:p>726528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735848" calcext:value-type="float">
            <text:p>735848</text:p>
          </table:table-cell>
          <table:table-cell table:formula="of:=SUM([.X30:.X38])/9" office:value-type="float" office:value="720744" calcext:value-type="float">
            <text:p>720744</text:p>
          </table:table-cell>
          <table:table-cell table:number-columns-repeated="16359"/>
        </table:table-row>
        <table:table-row table:style-name="ro2">
          <table:table-cell table:number-columns-repeated="5"/>
          <table:table-cell table:style-name="ce7"/>
          <table:table-cell table:number-columns-repeated="17"/>
          <table:table-cell office:value-type="float" office:value="731747" calcext:value-type="float">
            <text:p>73174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836817" calcext:value-type="float">
            <text:p>83681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827707" calcext:value-type="float">
            <text:p>82770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822322" calcext:value-type="float">
            <text:p>82232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853847" calcext:value-type="float">
            <text:p>85384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848079" calcext:value-type="float">
            <text:p>848079</text:p>
          </table:table-cell>
          <table:table-cell table:formula="of:=SUM([.X40:.X44])/5" office:value-type="float" office:value="837754.4" calcext:value-type="float">
            <text:p>837754.4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954372" calcext:value-type="float">
            <text:p>95437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44582" calcext:value-type="float">
            <text:p>94458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68293" calcext:value-type="float">
            <text:p>968293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55723" calcext:value-type="float">
            <text:p>955723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64172" calcext:value-type="float">
            <text:p>96417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20144" calcext:value-type="float">
            <text:p>920144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49327" calcext:value-type="float">
            <text:p>94932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56910" calcext:value-type="float">
            <text:p>95691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51584" calcext:value-type="float">
            <text:p>951584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971636" calcext:value-type="float">
            <text:p>971636</text:p>
          </table:table-cell>
          <table:table-cell table:formula="of:=SUM([.X45:.X54])/10" office:value-type="float" office:value="953674.3" calcext:value-type="float">
            <text:p>953674.3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1084905" calcext:value-type="float">
            <text:p>1084905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073791" calcext:value-type="float">
            <text:p>1073791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082662" calcext:value-type="float">
            <text:p>108266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095580" calcext:value-type="float">
            <text:p>109558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092684" calcext:value-type="float">
            <text:p>1092684</text:p>
          </table:table-cell>
          <table:table-cell table:formula="of:=SUM([.X55:.X59])/5" office:value-type="float" office:value="1085924.4" calcext:value-type="float">
            <text:p>1085924.4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1205750" calcext:value-type="float">
            <text:p>120575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188471" calcext:value-type="float">
            <text:p>1188471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219844" calcext:value-type="float">
            <text:p>1219844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175662" calcext:value-type="float">
            <text:p>117566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207639" calcext:value-type="float">
            <text:p>1207639</text:p>
          </table:table-cell>
          <table:table-cell table:formula="of:=SUM([.X60:.X64])/5" office:value-type="float" office:value="1199473.2" calcext:value-type="float">
            <text:p>1199473.2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1404845" calcext:value-type="float">
            <text:p>1404845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399177" calcext:value-type="float">
            <text:p>139917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434430" calcext:value-type="float">
            <text:p>143443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417323" calcext:value-type="float">
            <text:p>1417323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428968" calcext:value-type="float">
            <text:p>1428968</text:p>
          </table:table-cell>
          <table:table-cell table:formula="of:=SUM([.X65:.X69])/5" office:value-type="float" office:value="1416948.6" calcext:value-type="float">
            <text:p>1416948.6</text:p>
          </table:table-cell>
          <table:table-cell table:number-columns-repeated="16359"/>
        </table:table-row>
        <table:table-row table:style-name="ro2">
          <table:table-cell table:number-columns-repeated="23"/>
          <table:table-cell office:value-type="float" office:value="1502457" calcext:value-type="float">
            <text:p>1502457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504837" calcext:value-type="float">
            <text:p>1504837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<text:span text:style-name="T2">Regression</text:span></text:p>
          </table:table-cell>
          <table:table-cell table:number-columns-repeated="6"/>
          <table:table-cell office:value-type="string" calcext:value-type="string">
            <text:p><text:span text:style-name="T2">Regression</text:span></text:p>
          </table:table-cell>
          <table:table-cell table:number-columns-repeated="14"/>
          <table:table-cell office:value-type="float" office:value="1524086" calcext:value-type="float">
            <text:p>1524086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3"/>
          <table:table-cell office:value-type="float" office:value="1554010" calcext:value-type="float">
            <text:p>1554010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549983" calcext:value-type="float">
            <text:p>1549983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4"/>
          <table:table-cell office:value-type="float" office:value="1512338" calcext:value-type="float">
            <text:p>1512338</text:p>
          </table:table-cell>
          <table:table-cell table:number-columns-repeated="16360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3"/>
          <table:table-cell office:value-type="float" office:value="1494015" calcext:value-type="float">
            <text:p>149401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3"/>
          <table:table-cell office:value-type="float" office:value="1540956" calcext:value-type="float">
            <text:p>154095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3"/>
          <table:table-cell office:value-type="float" office:value="1535685" calcext:value-type="float">
            <text:p>153568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office:value-type="float" office:value="1543844" calcext:value-type="float">
            <text:p>1543844</text:p>
          </table:table-cell>
          <table:table-cell table:formula="of:=SUM([.X70:.X79])/10" office:value-type="float" office:value="1526221.1" calcext:value-type="float">
            <text:p>1526221.1</text:p>
          </table:table-cell>
          <table:table-cell table:number-columns-repeated="16359"/>
        </table:table-row>
        <table:table-row table:style-name="ro2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3"/>
          <table:table-cell office:value-type="float" office:value="1665079" calcext:value-type="float">
            <text:p>1665079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647703" calcext:value-type="float">
            <text:p>1647703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4"/>
          <table:table-cell office:value-type="float" office:value="1659088" calcext:value-type="float">
            <text:p>1659088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3"/>
          <table:table-cell office:value-type="float" office:value="1647890" calcext:value-type="float">
            <text:p>1647890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3"/>
          <table:table-cell office:value-type="float" office:value="1649454" calcext:value-type="float">
            <text:p>1649454</text:p>
          </table:table-cell>
          <table:table-cell table:formula="of:=SUM([.X80:.X84])/5" office:value-type="float" office:value="1653842.8" calcext:value-type="float">
            <text:p>1653842.8</text:p>
          </table:table-cell>
          <table:table-cell table:number-columns-repeated="16359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  <table:table-cell office:value-type="float" office:value="1793367" calcext:value-type="float">
            <text:p>1793367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3"/>
          <table:table-cell office:value-type="float" office:value="1751541" calcext:value-type="float">
            <text:p>1751541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3"/>
          <table:table-cell office:value-type="float" office:value="1770996" calcext:value-type="float">
            <text:p>1770996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775754" calcext:value-type="float">
            <text:p>1775754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4"/>
          <table:table-cell office:value-type="float" office:value="1762332" calcext:value-type="float">
            <text:p>1762332</text:p>
          </table:table-cell>
          <table:table-cell table:formula="of:=SUM([.X85:.X89])/5" office:value-type="float" office:value="1770798" calcext:value-type="float">
            <text:p>1770798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"/>
          <table:table-cell office:value-type="float" office:value="1847092" calcext:value-type="float">
            <text:p>1847092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9"/>
          <table:table-cell office:value-type="float" office:value="1833359" calcext:value-type="float">
            <text:p>1833359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11"/>
          <table:table-cell office:value-type="float" office:value="1903999" calcext:value-type="float">
            <text:p>1903999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12"/>
          <table:table-cell office:value-type="float" office:value="1839722" calcext:value-type="float">
            <text:p>1839722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879761" calcext:value-type="float">
            <text:p>1879761</text:p>
          </table:table-cell>
          <table:table-cell table:number-columns-repeated="16360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3"/>
          <table:table-cell office:value-type="float" office:value="1826056" calcext:value-type="float">
            <text:p>1826056</text:p>
          </table:table-cell>
          <table:table-cell table:number-columns-repeated="16360"/>
        </table:table-row>
        <table:table-row table:style-name="ro2">
          <table:table-cell table:number-columns-repeated="23"/>
          <table:table-cell office:value-type="float" office:value="1813477" calcext:value-type="float">
            <text:p>1813477</text:p>
          </table:table-cell>
          <table:table-cell table:number-columns-repeated="16360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8"/>
          <table:table-cell office:value-type="float" office:value="1885554" calcext:value-type="float">
            <text:p>1885554</text:p>
          </table:table-cell>
          <table:table-cell table:number-columns-repeated="16360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8"/>
          <table:table-cell office:value-type="float" office:value="1836044" calcext:value-type="float">
            <text:p>1836044</text:p>
          </table:table-cell>
          <table:table-cell table:number-columns-repeated="16360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8"/>
          <table:table-cell office:value-type="float" office:value="1841236" calcext:value-type="float">
            <text:p>1841236</text:p>
          </table:table-cell>
          <table:table-cell table:formula="of:=SUM([.X90:.X99])/10" office:value-type="float" office:value="1850630" calcext:value-type="float">
            <text:p>1850630</text:p>
          </table:table-cell>
          <table:table-cell table:number-columns-repeated="1635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379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379"/>
        </table:table-row>
      </table:table>
      <table:table table:name="CHART" table:style-name="ta1">
        <table:shapes>
          <draw:frame draw:z-index="0" draw:style-name="gr1" draw:text-style-name="P1" svg:width="53.423cm" svg:height="33.991cm" svg:x="0cm" svg:y="0cm">
            <draw:object draw:notify-on-update-of-ranges="'Annex B Coincidence Limit'.E22:'Annex B Coincidence Limit'.E36 'Annex B Coincidence Limit'.A1:'Annex B Coincidence Limit'.A1 'Annex B Coincidence Limit'.G22:'Annex B Coincidence Limit'.G36 'Annex B Coincidence Limit'.E22:'Annex B Coincidence Limit'.E36 'Annex B Coincidence Limit'.A1:'Annex B Coincidence Limit'.A1 'Annex B Coincidence Limit'.L22:'Annex B Coincidence Limit'.L36 'Annex B Coincidence Limit'.E22:'Annex B Coincidence Limit'.E35 'Annex B Coincidence Limit'.A1:'Annex B Coincidence Limit'.A1 'Annex B Coincidence Limit'.K22:'Annex B Coincidence Limit'.K36 'Annex B Coincidence Limit'.E22:'Annex B Coincidence Limit'.E36 'Annex B Coincidence Limit'.A1:'Annex B Coincidence Limit'.A1 'Annex B Coincidence Limit'.I22:'Annex B Coincidence Limit'.I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ATA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Machin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office:value-type="string" calcext:value-type="string">
            <text:p>TotalCount38</text:p>
          </table:table-cell>
          <table:table-cell office:value-type="string" calcext:value-type="string">
            <text:p>TotalCount50</text:p>
          </table:table-cell>
          <table:table-cell office:value-type="string" calcext:value-type="string">
            <text:p>TotalCount68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2025-02-18 16:11:58</text:p>
          </table:table-cell>
          <table:table-cell table:number-columns-repeated="2"/>
          <table:table-cell office:value-type="float" office:value="97126" calcext:value-type="float">
            <text:p>971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45:37</text:p>
          </table:table-cell>
          <table:table-cell table:number-columns-repeated="2"/>
          <table:table-cell office:value-type="float" office:value="167569" calcext:value-type="float">
            <text:p>167569</text:p>
          </table:table-cell>
          <table:table-cell office:value-type="float" office:value="47762" calcext:value-type="float">
            <text:p>47762</text:p>
          </table:table-cell>
          <table:table-cell office:value-type="float" office:value="460" calcext:value-type="float">
            <text:p>460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47:43</text:p>
          </table:table-cell>
          <table:table-cell table:number-columns-repeated="2"/>
          <table:table-cell office:value-type="float" office:value="169407" calcext:value-type="float">
            <text:p>169407</text:p>
          </table:table-cell>
          <table:table-cell office:value-type="float" office:value="48245" calcext:value-type="float">
            <text:p>48245</text:p>
          </table:table-cell>
          <table:table-cell office:value-type="float" office:value="538" calcext:value-type="float">
            <text:p>538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3:50:57</text:p>
          </table:table-cell>
          <table:table-cell table:number-columns-repeated="2"/>
          <table:table-cell office:value-type="float" office:value="169243" calcext:value-type="float">
            <text:p>169243</text:p>
          </table:table-cell>
          <table:table-cell office:value-type="float" office:value="47760" calcext:value-type="float">
            <text:p>47760</text:p>
          </table:table-cell>
          <table:table-cell office:value-type="float" office:value="442" calcext:value-type="float">
            <text:p>44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23</text:p>
          </table:table-cell>
          <table:table-cell table:number-columns-repeated="2"/>
          <table:table-cell office:value-type="float" office:value="292859" calcext:value-type="float">
            <text:p>292859</text:p>
          </table:table-cell>
          <table:table-cell office:value-type="float" office:value="80920" calcext:value-type="float">
            <text:p>80920</text:p>
          </table:table-cell>
          <table:table-cell office:value-type="float" office:value="355" calcext:value-type="float">
            <text:p>355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34</text:p>
          </table:table-cell>
          <table:table-cell table:number-columns-repeated="2"/>
          <table:table-cell office:value-type="float" office:value="301110" calcext:value-type="float">
            <text:p>301110</text:p>
          </table:table-cell>
          <table:table-cell office:value-type="float" office:value="85745" calcext:value-type="float">
            <text:p>85745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45</text:p>
          </table:table-cell>
          <table:table-cell table:number-columns-repeated="2"/>
          <table:table-cell office:value-type="float" office:value="299624" calcext:value-type="float">
            <text:p>299624</text:p>
          </table:table-cell>
          <table:table-cell office:value-type="float" office:value="84913" calcext:value-type="float">
            <text:p>84913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06:56</text:p>
          </table:table-cell>
          <table:table-cell table:number-columns-repeated="2"/>
          <table:table-cell office:value-type="float" office:value="285382" calcext:value-type="float">
            <text:p>285382</text:p>
          </table:table-cell>
          <table:table-cell office:value-type="float" office:value="80226" calcext:value-type="float">
            <text:p>80226</text:p>
          </table:table-cell>
          <table:table-cell office:value-type="float" office:value="749" calcext:value-type="float">
            <text:p>749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07</text:p>
          </table:table-cell>
          <table:table-cell table:number-columns-repeated="2"/>
          <table:table-cell office:value-type="float" office:value="458207" calcext:value-type="float">
            <text:p>458207</text:p>
          </table:table-cell>
          <table:table-cell office:value-type="float" office:value="130538" calcext:value-type="float">
            <text:p>130538</text:p>
          </table:table-cell>
          <table:table-cell office:value-type="float" office:value="778" calcext:value-type="float">
            <text:p>778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19</text:p>
          </table:table-cell>
          <table:table-cell table:number-columns-repeated="2"/>
          <table:table-cell office:value-type="float" office:value="465138" calcext:value-type="float">
            <text:p>465138</text:p>
          </table:table-cell>
          <table:table-cell office:value-type="float" office:value="137763" calcext:value-type="float">
            <text:p>137763</text:p>
          </table:table-cell>
          <table:table-cell office:value-type="float" office:value="822" calcext:value-type="float">
            <text:p>822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31</text:p>
          </table:table-cell>
          <table:table-cell table:number-columns-repeated="2"/>
          <table:table-cell office:value-type="float" office:value="454200" calcext:value-type="float">
            <text:p>454200</text:p>
          </table:table-cell>
          <table:table-cell office:value-type="float" office:value="132370" calcext:value-type="float">
            <text:p>132370</text:p>
          </table:table-cell>
          <table:table-cell office:value-type="float" office:value="898" calcext:value-type="float">
            <text:p>89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43</text:p>
          </table:table-cell>
          <table:table-cell table:number-columns-repeated="2"/>
          <table:table-cell office:value-type="float" office:value="445750" calcext:value-type="float">
            <text:p>445750</text:p>
          </table:table-cell>
          <table:table-cell office:value-type="float" office:value="128188" calcext:value-type="float">
            <text:p>128188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0 14:18:54</text:p>
          </table:table-cell>
          <table:table-cell table:number-columns-repeated="2"/>
          <table:table-cell office:value-type="float" office:value="443747" calcext:value-type="float">
            <text:p>443747</text:p>
          </table:table-cell>
          <table:table-cell office:value-type="float" office:value="127364" calcext:value-type="float">
            <text:p>127364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5:06</text:p>
          </table:table-cell>
          <table:table-cell table:number-columns-repeated="2"/>
          <table:table-cell office:value-type="float" office:value="453143" calcext:value-type="float">
            <text:p>453143</text:p>
          </table:table-cell>
          <table:table-cell office:value-type="float" office:value="126112" calcext:value-type="float">
            <text:p>126112</text:p>
          </table:table-cell>
          <table:table-cell office:value-type="float" office:value="1419" calcext:value-type="float">
            <text:p>1419</text:p>
          </table:table-cell>
          <table:table-cell office:value-type="float" office:value="236" calcext:value-type="float">
            <text:p>236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5:36</text:p>
          </table:table-cell>
          <table:table-cell table:number-columns-repeated="2"/>
          <table:table-cell office:value-type="float" office:value="436276" calcext:value-type="float">
            <text:p>436276</text:p>
          </table:table-cell>
          <table:table-cell office:value-type="float" office:value="123877" calcext:value-type="float">
            <text:p>123877</text:p>
          </table:table-cell>
          <table:table-cell office:value-type="float" office:value="1270" calcext:value-type="float">
            <text:p>1270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6:05</text:p>
          </table:table-cell>
          <table:table-cell table:number-columns-repeated="2"/>
          <table:table-cell office:value-type="float" office:value="454474" calcext:value-type="float">
            <text:p>454474</text:p>
          </table:table-cell>
          <table:table-cell office:value-type="float" office:value="128843" calcext:value-type="float">
            <text:p>128843</text:p>
          </table:table-cell>
          <table:table-cell office:value-type="float" office:value="1278" calcext:value-type="float">
            <text:p>1278</text:p>
          </table:table-cell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6:34</text:p>
          </table:table-cell>
          <table:table-cell table:number-columns-repeated="2"/>
          <table:table-cell office:value-type="float" office:value="454993" calcext:value-type="float">
            <text:p>454993</text:p>
          </table:table-cell>
          <table:table-cell office:value-type="float" office:value="128062" calcext:value-type="float">
            <text:p>128062</text:p>
          </table:table-cell>
          <table:table-cell office:value-type="float" office:value="1368" calcext:value-type="float">
            <text:p>1368</text:p>
          </table:table-cell>
          <table:table-cell office:value-type="float" office:value="218" calcext:value-type="float">
            <text:p>21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07:03</text:p>
          </table:table-cell>
          <table:table-cell table:number-columns-repeated="2"/>
          <table:table-cell office:value-type="float" office:value="462615" calcext:value-type="float">
            <text:p>462615</text:p>
          </table:table-cell>
          <table:table-cell office:value-type="float" office:value="127985" calcext:value-type="float">
            <text:p>127985</text:p>
          </table:table-cell>
          <table:table-cell office:value-type="float" office:value="1529" calcext:value-type="float">
            <text:p>1529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2:08</text:p>
          </table:table-cell>
          <table:table-cell table:number-columns-repeated="2"/>
          <table:table-cell office:value-type="float" office:value="578672" calcext:value-type="float">
            <text:p>578672</text:p>
          </table:table-cell>
          <table:table-cell office:value-type="float" office:value="162688" calcext:value-type="float">
            <text:p>162688</text:p>
          </table:table-cell>
          <table:table-cell office:value-type="float" office:value="1502" calcext:value-type="float">
            <text:p>1502</text:p>
          </table:table-cell>
          <table:table-cell office:value-type="float" office:value="314" calcext:value-type="float">
            <text:p>314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2:37</text:p>
          </table:table-cell>
          <table:table-cell table:number-columns-repeated="2"/>
          <table:table-cell office:value-type="float" office:value="581090" calcext:value-type="float">
            <text:p>581090</text:p>
          </table:table-cell>
          <table:table-cell office:value-type="float" office:value="166955" calcext:value-type="float">
            <text:p>166955</text:p>
          </table:table-cell>
          <table:table-cell office:value-type="float" office:value="1514" calcext:value-type="float">
            <text:p>1514</text:p>
          </table:table-cell>
          <table:table-cell office:value-type="float" office:value="261" calcext:value-type="float">
            <text:p>261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3:06</text:p>
          </table:table-cell>
          <table:table-cell table:number-columns-repeated="2"/>
          <table:table-cell office:value-type="float" office:value="592101" calcext:value-type="float">
            <text:p>592101</text:p>
          </table:table-cell>
          <table:table-cell office:value-type="float" office:value="167382" calcext:value-type="float">
            <text:p>167382</text:p>
          </table:table-cell>
          <table:table-cell office:value-type="float" office:value="1370" calcext:value-type="float">
            <text:p>1370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0:13:35</text:p>
          </table:table-cell>
          <table:table-cell table:number-columns-repeated="2"/>
          <table:table-cell office:value-type="float" office:value="600145" calcext:value-type="float">
            <text:p>600145</text:p>
          </table:table-cell>
          <table:table-cell office:value-type="float" office:value="170635" calcext:value-type="float">
            <text:p>170635</text:p>
          </table:table-cell>
          <table:table-cell office:value-type="float" office:value="1511" calcext:value-type="float">
            <text:p>1511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0:55</text:p>
          </table:table-cell>
          <table:table-cell table:number-columns-repeated="2"/>
          <table:table-cell office:value-type="float" office:value="599839" calcext:value-type="float">
            <text:p>599839</text:p>
          </table:table-cell>
          <table:table-cell office:value-type="float" office:value="170108" calcext:value-type="float">
            <text:p>170108</text:p>
          </table:table-cell>
          <table:table-cell office:value-type="float" office:value="1298" calcext:value-type="float">
            <text:p>1298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1:24</text:p>
          </table:table-cell>
          <table:table-cell table:number-columns-repeated="2"/>
          <table:table-cell office:value-type="float" office:value="606849" calcext:value-type="float">
            <text:p>606849</text:p>
          </table:table-cell>
          <table:table-cell office:value-type="float" office:value="174925" calcext:value-type="float">
            <text:p>174925</text:p>
          </table:table-cell>
          <table:table-cell office:value-type="float" office:value="1831" calcext:value-type="float">
            <text:p>1831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61110029" calcext:value-type="float">
            <text:p>61110029</text:p>
          </table:table-cell>
          <table:table-cell table:style-name="ce13" office:value-type="string" calcext:value-type="string">
            <text:p>2025-02-21 11:21:54</text:p>
          </table:table-cell>
          <table:table-cell table:style-name="ce4" table:number-columns-repeated="2"/>
          <table:table-cell table:style-name="ce4" office:value-type="float" office:value="607236" calcext:value-type="float">
            <text:p>607236</text:p>
          </table:table-cell>
          <table:table-cell table:style-name="ce4" office:value-type="float" office:value="172958" calcext:value-type="float">
            <text:p>172958</text:p>
          </table:table-cell>
          <table:table-cell table:style-name="ce4" office:value-type="float" office:value="1576" calcext:value-type="float">
            <text:p>1576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22:23</text:p>
          </table:table-cell>
          <table:table-cell table:number-columns-repeated="2"/>
          <table:table-cell office:value-type="float" office:value="615108" calcext:value-type="float">
            <text:p>615108</text:p>
          </table:table-cell>
          <table:table-cell office:value-type="float" office:value="179788" calcext:value-type="float">
            <text:p>179788</text:p>
          </table:table-cell>
          <table:table-cell office:value-type="float" office:value="1475" calcext:value-type="float">
            <text:p>1475</text:p>
          </table:table-cell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1:26</text:p>
          </table:table-cell>
          <table:table-cell table:number-columns-repeated="2"/>
          <table:table-cell office:value-type="float" office:value="723681" calcext:value-type="float">
            <text:p>723681</text:p>
          </table:table-cell>
          <table:table-cell office:value-type="float" office:value="206919" calcext:value-type="float">
            <text:p>206919</text:p>
          </table:table-cell>
          <table:table-cell office:value-type="float" office:value="1816" calcext:value-type="float">
            <text:p>1816</text:p>
          </table:table-cell>
          <table:table-cell office:value-type="float" office:value="349" calcext:value-type="float">
            <text:p>34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1:55</text:p>
          </table:table-cell>
          <table:table-cell table:number-columns-repeated="2"/>
          <table:table-cell office:value-type="float" office:value="707528" calcext:value-type="float">
            <text:p>707528</text:p>
          </table:table-cell>
          <table:table-cell office:value-type="float" office:value="205106" calcext:value-type="float">
            <text:p>205106</text:p>
          </table:table-cell>
          <table:table-cell office:value-type="float" office:value="1662" calcext:value-type="float">
            <text:p>1662</text:p>
          </table:table-cell>
          <table:table-cell office:value-type="float" office:value="302" calcext:value-type="float">
            <text:p>30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2:24</text:p>
          </table:table-cell>
          <table:table-cell table:number-columns-repeated="2"/>
          <table:table-cell office:value-type="float" office:value="726643" calcext:value-type="float">
            <text:p>726643</text:p>
          </table:table-cell>
          <table:table-cell office:value-type="float" office:value="213798" calcext:value-type="float">
            <text:p>213798</text:p>
          </table:table-cell>
          <table:table-cell office:value-type="float" office:value="1760" calcext:value-type="float">
            <text:p>1760</text:p>
          </table:table-cell>
          <table:table-cell office:value-type="float" office:value="273" calcext:value-type="float">
            <text:p>27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2:53</text:p>
          </table:table-cell>
          <table:table-cell table:number-columns-repeated="2"/>
          <table:table-cell office:value-type="float" office:value="726839" calcext:value-type="float">
            <text:p>726839</text:p>
          </table:table-cell>
          <table:table-cell office:value-type="float" office:value="210948" calcext:value-type="float">
            <text:p>210948</text:p>
          </table:table-cell>
          <table:table-cell office:value-type="float" office:value="1788" calcext:value-type="float">
            <text:p>1788</text:p>
          </table:table-cell>
          <table:table-cell office:value-type="float" office:value="234" calcext:value-type="float">
            <text:p>23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3:22</text:p>
          </table:table-cell>
          <table:table-cell table:number-columns-repeated="2"/>
          <table:table-cell office:value-type="float" office:value="732858" calcext:value-type="float">
            <text:p>732858</text:p>
          </table:table-cell>
          <table:table-cell office:value-type="float" office:value="213777" calcext:value-type="float">
            <text:p>213777</text:p>
          </table:table-cell>
          <table:table-cell office:value-type="float" office:value="1972" calcext:value-type="float">
            <text:p>1972</text:p>
          </table:table-cell>
          <table:table-cell office:value-type="float" office:value="333" calcext:value-type="float">
            <text:p>333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5:03</text:p>
          </table:table-cell>
          <table:table-cell table:number-columns-repeated="2"/>
          <table:table-cell office:value-type="float" office:value="705786" calcext:value-type="float">
            <text:p>705786</text:p>
          </table:table-cell>
          <table:table-cell office:value-type="float" office:value="200090" calcext:value-type="float">
            <text:p>200090</text:p>
          </table:table-cell>
          <table:table-cell office:value-type="float" office:value="1509" calcext:value-type="float">
            <text:p>1509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5:32</text:p>
          </table:table-cell>
          <table:table-cell table:number-columns-repeated="2"/>
          <table:table-cell office:value-type="float" office:value="700985" calcext:value-type="float">
            <text:p>700985</text:p>
          </table:table-cell>
          <table:table-cell office:value-type="float" office:value="202531" calcext:value-type="float">
            <text:p>202531</text:p>
          </table:table-cell>
          <table:table-cell office:value-type="float" office:value="1512" calcext:value-type="float">
            <text:p>1512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01</text:p>
          </table:table-cell>
          <table:table-cell table:number-columns-repeated="2"/>
          <table:table-cell office:value-type="float" office:value="726528" calcext:value-type="float">
            <text:p>726528</text:p>
          </table:table-cell>
          <table:table-cell office:value-type="float" office:value="212418" calcext:value-type="float">
            <text:p>212418</text:p>
          </table:table-cell>
          <table:table-cell office:value-type="float" office:value="1729" calcext:value-type="float">
            <text:p>1729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30</text:p>
          </table:table-cell>
          <table:table-cell table:number-columns-repeated="2"/>
          <table:table-cell office:value-type="float" office:value="735848" calcext:value-type="float">
            <text:p>735848</text:p>
          </table:table-cell>
          <table:table-cell office:value-type="float" office:value="215092" calcext:value-type="float">
            <text:p>215092</text:p>
          </table:table-cell>
          <table:table-cell office:value-type="float" office:value="1740" calcext:value-type="float">
            <text:p>174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36:59</text:p>
          </table:table-cell>
          <table:table-cell table:number-columns-repeated="2"/>
          <table:table-cell office:value-type="float" office:value="731747" calcext:value-type="float">
            <text:p>731747</text:p>
          </table:table-cell>
          <table:table-cell office:value-type="float" office:value="213716" calcext:value-type="float">
            <text:p>213716</text:p>
          </table:table-cell>
          <table:table-cell office:value-type="float" office:value="1847" calcext:value-type="float">
            <text:p>1847</text:p>
          </table:table-cell>
          <table:table-cell office:value-type="float" office:value="300" calcext:value-type="float">
            <text:p>30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4:09</text:p>
          </table:table-cell>
          <table:table-cell table:number-columns-repeated="2"/>
          <table:table-cell office:value-type="float" office:value="836817" calcext:value-type="float">
            <text:p>836817</text:p>
          </table:table-cell>
          <table:table-cell office:value-type="float" office:value="248954" calcext:value-type="float">
            <text:p>248954</text:p>
          </table:table-cell>
          <table:table-cell office:value-type="float" office:value="1681" calcext:value-type="float">
            <text:p>1681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4:37</text:p>
          </table:table-cell>
          <table:table-cell table:number-columns-repeated="2"/>
          <table:table-cell office:value-type="float" office:value="827707" calcext:value-type="float">
            <text:p>827707</text:p>
          </table:table-cell>
          <table:table-cell office:value-type="float" office:value="245687" calcext:value-type="float">
            <text:p>245687</text:p>
          </table:table-cell>
          <table:table-cell office:value-type="float" office:value="1639" calcext:value-type="float">
            <text:p>1639</text:p>
          </table:table-cell>
          <table:table-cell office:value-type="float" office:value="344" calcext:value-type="float">
            <text:p>344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5:05</text:p>
          </table:table-cell>
          <table:table-cell table:number-columns-repeated="2"/>
          <table:table-cell office:value-type="float" office:value="822322" calcext:value-type="float">
            <text:p>822322</text:p>
          </table:table-cell>
          <table:table-cell office:value-type="float" office:value="242847" calcext:value-type="float">
            <text:p>242847</text:p>
          </table:table-cell>
          <table:table-cell office:value-type="float" office:value="1884" calcext:value-type="float">
            <text:p>1884</text:p>
          </table:table-cell>
          <table:table-cell office:value-type="float" office:value="346" calcext:value-type="float">
            <text:p>346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5:35</text:p>
          </table:table-cell>
          <table:table-cell table:number-columns-repeated="2"/>
          <table:table-cell office:value-type="float" office:value="853847" calcext:value-type="float">
            <text:p>853847</text:p>
          </table:table-cell>
          <table:table-cell office:value-type="float" office:value="254873" calcext:value-type="float">
            <text:p>254873</text:p>
          </table:table-cell>
          <table:table-cell office:value-type="float" office:value="1500" calcext:value-type="float">
            <text:p>1500</text:p>
          </table:table-cell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1:56:04</text:p>
          </table:table-cell>
          <table:table-cell table:number-columns-repeated="2"/>
          <table:table-cell office:value-type="float" office:value="848079" calcext:value-type="float">
            <text:p>848079</text:p>
          </table:table-cell>
          <table:table-cell office:value-type="float" office:value="250478" calcext:value-type="float">
            <text:p>250478</text:p>
          </table:table-cell>
          <table:table-cell office:value-type="float" office:value="1643" calcext:value-type="float">
            <text:p>1643</text:p>
          </table:table-cell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3:51</text:p>
          </table:table-cell>
          <table:table-cell table:number-columns-repeated="2"/>
          <table:table-cell office:value-type="float" office:value="954372" calcext:value-type="float">
            <text:p>954372</text:p>
          </table:table-cell>
          <table:table-cell office:value-type="float" office:value="286482" calcext:value-type="float">
            <text:p>286482</text:p>
          </table:table-cell>
          <table:table-cell office:value-type="float" office:value="2024" calcext:value-type="float">
            <text:p>2024</text:p>
          </table:table-cell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4:21</text:p>
          </table:table-cell>
          <table:table-cell table:number-columns-repeated="2"/>
          <table:table-cell office:value-type="float" office:value="944582" calcext:value-type="float">
            <text:p>944582</text:p>
          </table:table-cell>
          <table:table-cell office:value-type="float" office:value="283347" calcext:value-type="float">
            <text:p>283347</text:p>
          </table:table-cell>
          <table:table-cell office:value-type="float" office:value="1919" calcext:value-type="float">
            <text:p>191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4:50</text:p>
          </table:table-cell>
          <table:table-cell table:number-columns-repeated="2"/>
          <table:table-cell office:value-type="float" office:value="968293" calcext:value-type="float">
            <text:p>968293</text:p>
          </table:table-cell>
          <table:table-cell office:value-type="float" office:value="292998" calcext:value-type="float">
            <text:p>292998</text:p>
          </table:table-cell>
          <table:table-cell office:value-type="float" office:value="2073" calcext:value-type="float">
            <text:p>2073</text:p>
          </table:table-cell>
          <table:table-cell office:value-type="float" office:value="472" calcext:value-type="float">
            <text:p>472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5:19</text:p>
          </table:table-cell>
          <table:table-cell table:number-columns-repeated="2"/>
          <table:table-cell office:value-type="float" office:value="955723" calcext:value-type="float">
            <text:p>955723</text:p>
          </table:table-cell>
          <table:table-cell office:value-type="float" office:value="287275" calcext:value-type="float">
            <text:p>287275</text:p>
          </table:table-cell>
          <table:table-cell office:value-type="float" office:value="1925" calcext:value-type="float">
            <text:p>1925</text:p>
          </table:table-cell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5:48</text:p>
          </table:table-cell>
          <table:table-cell table:number-columns-repeated="2"/>
          <table:table-cell office:value-type="float" office:value="964172" calcext:value-type="float">
            <text:p>964172</text:p>
          </table:table-cell>
          <table:table-cell office:value-type="float" office:value="292546" calcext:value-type="float">
            <text:p>292546</text:p>
          </table:table-cell>
          <table:table-cell office:value-type="float" office:value="1920" calcext:value-type="float">
            <text:p>1920</text:p>
          </table:table-cell>
          <table:table-cell office:value-type="float" office:value="320" calcext:value-type="float">
            <text:p>32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8:23</text:p>
          </table:table-cell>
          <table:table-cell table:number-columns-repeated="2"/>
          <table:table-cell office:value-type="float" office:value="920144" calcext:value-type="float">
            <text:p>920144</text:p>
          </table:table-cell>
          <table:table-cell office:value-type="float" office:value="272065" calcext:value-type="float">
            <text:p>272065</text:p>
          </table:table-cell>
          <table:table-cell office:value-type="float" office:value="1990" calcext:value-type="float">
            <text:p>1990</text:p>
          </table:table-cell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8:53</text:p>
          </table:table-cell>
          <table:table-cell table:number-columns-repeated="2"/>
          <table:table-cell office:value-type="float" office:value="949327" calcext:value-type="float">
            <text:p>949327</text:p>
          </table:table-cell>
          <table:table-cell office:value-type="float" office:value="286976" calcext:value-type="float">
            <text:p>286976</text:p>
          </table:table-cell>
          <table:table-cell office:value-type="float" office:value="2084" calcext:value-type="float">
            <text:p>2084</text:p>
          </table:table-cell>
          <table:table-cell office:value-type="float" office:value="344" calcext:value-type="float">
            <text:p>34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9:22</text:p>
          </table:table-cell>
          <table:table-cell table:number-columns-repeated="2"/>
          <table:table-cell office:value-type="float" office:value="956910" calcext:value-type="float">
            <text:p>956910</text:p>
          </table:table-cell>
          <table:table-cell office:value-type="float" office:value="285842" calcext:value-type="float">
            <text:p>285842</text:p>
          </table:table-cell>
          <table:table-cell office:value-type="float" office:value="2240" calcext:value-type="float">
            <text:p>2240</text:p>
          </table:table-cell>
          <table:table-cell office:value-type="float" office:value="375" calcext:value-type="float">
            <text:p>375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19:50</text:p>
          </table:table-cell>
          <table:table-cell table:number-columns-repeated="2"/>
          <table:table-cell office:value-type="float" office:value="951584" calcext:value-type="float">
            <text:p>951584</text:p>
          </table:table-cell>
          <table:table-cell office:value-type="float" office:value="283014" calcext:value-type="float">
            <text:p>283014</text:p>
          </table:table-cell>
          <table:table-cell office:value-type="float" office:value="1976" calcext:value-type="float">
            <text:p>1976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0:20</text:p>
          </table:table-cell>
          <table:table-cell table:number-columns-repeated="2"/>
          <table:table-cell office:value-type="float" office:value="971636" calcext:value-type="float">
            <text:p>971636</text:p>
          </table:table-cell>
          <table:table-cell office:value-type="float" office:value="294442" calcext:value-type="float">
            <text:p>294442</text:p>
          </table:table-cell>
          <table:table-cell office:value-type="float" office:value="2172" calcext:value-type="float">
            <text:p>2172</text:p>
          </table:table-cell>
          <table:table-cell office:value-type="float" office:value="359" calcext:value-type="float">
            <text:p>35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6:57</text:p>
          </table:table-cell>
          <table:table-cell table:number-columns-repeated="2"/>
          <table:table-cell office:value-type="float" office:value="1084905" calcext:value-type="float">
            <text:p>1084905</text:p>
          </table:table-cell>
          <table:table-cell office:value-type="float" office:value="330799" calcext:value-type="float">
            <text:p>330799</text:p>
          </table:table-cell>
          <table:table-cell office:value-type="float" office:value="2384" calcext:value-type="float">
            <text:p>2384</text:p>
          </table:table-cell>
          <table:table-cell office:value-type="float" office:value="445" calcext:value-type="float">
            <text:p>445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7:26</text:p>
          </table:table-cell>
          <table:table-cell table:number-columns-repeated="2"/>
          <table:table-cell office:value-type="float" office:value="1073791" calcext:value-type="float">
            <text:p>1073791</text:p>
          </table:table-cell>
          <table:table-cell office:value-type="float" office:value="329314" calcext:value-type="float">
            <text:p>329314</text:p>
          </table:table-cell>
          <table:table-cell office:value-type="float" office:value="2581" calcext:value-type="float">
            <text:p>2581</text:p>
          </table:table-cell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7:55</text:p>
          </table:table-cell>
          <table:table-cell table:number-columns-repeated="2"/>
          <table:table-cell office:value-type="float" office:value="1082662" calcext:value-type="float">
            <text:p>1082662</text:p>
          </table:table-cell>
          <table:table-cell office:value-type="float" office:value="330497" calcext:value-type="float">
            <text:p>330497</text:p>
          </table:table-cell>
          <table:table-cell office:value-type="float" office:value="2349" calcext:value-type="float">
            <text:p>2349</text:p>
          </table:table-cell>
          <table:table-cell office:value-type="float" office:value="335" calcext:value-type="float">
            <text:p>33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8:24</text:p>
          </table:table-cell>
          <table:table-cell table:number-columns-repeated="2"/>
          <table:table-cell office:value-type="float" office:value="1095580" calcext:value-type="float">
            <text:p>1095580</text:p>
          </table:table-cell>
          <table:table-cell office:value-type="float" office:value="340622" calcext:value-type="float">
            <text:p>340622</text:p>
          </table:table-cell>
          <table:table-cell office:value-type="float" office:value="2361" calcext:value-type="float">
            <text:p>2361</text:p>
          </table:table-cell>
          <table:table-cell office:value-type="float" office:value="361" calcext:value-type="float">
            <text:p>361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28:53</text:p>
          </table:table-cell>
          <table:table-cell table:number-columns-repeated="2"/>
          <table:table-cell office:value-type="float" office:value="1092684" calcext:value-type="float">
            <text:p>1092684</text:p>
          </table:table-cell>
          <table:table-cell office:value-type="float" office:value="339781" calcext:value-type="float">
            <text:p>339781</text:p>
          </table:table-cell>
          <table:table-cell office:value-type="float" office:value="2342" calcext:value-type="float">
            <text:p>2342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00</text:p>
          </table:table-cell>
          <table:table-cell table:number-columns-repeated="2"/>
          <table:table-cell office:value-type="float" office:value="1205750" calcext:value-type="float">
            <text:p>1205750</text:p>
          </table:table-cell>
          <table:table-cell office:value-type="float" office:value="375301" calcext:value-type="float">
            <text:p>375301</text:p>
          </table:table-cell>
          <table:table-cell office:value-type="float" office:value="2550" calcext:value-type="float">
            <text:p>2550</text:p>
          </table:table-cell>
          <table:table-cell office:value-type="float" office:value="368" calcext:value-type="float">
            <text:p>368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29</text:p>
          </table:table-cell>
          <table:table-cell table:number-columns-repeated="2"/>
          <table:table-cell office:value-type="float" office:value="1188471" calcext:value-type="float">
            <text:p>1188471</text:p>
          </table:table-cell>
          <table:table-cell office:value-type="float" office:value="371401" calcext:value-type="float">
            <text:p>371401</text:p>
          </table:table-cell>
          <table:table-cell office:value-type="float" office:value="2739" calcext:value-type="float">
            <text:p>2739</text:p>
          </table:table-cell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5:58</text:p>
          </table:table-cell>
          <table:table-cell table:number-columns-repeated="2"/>
          <table:table-cell office:value-type="float" office:value="1219844" calcext:value-type="float">
            <text:p>1219844</text:p>
          </table:table-cell>
          <table:table-cell office:value-type="float" office:value="386532" calcext:value-type="float">
            <text:p>386532</text:p>
          </table:table-cell>
          <table:table-cell office:value-type="float" office:value="2536" calcext:value-type="float">
            <text:p>2536</text:p>
          </table:table-cell>
          <table:table-cell office:value-type="float" office:value="420" calcext:value-type="float">
            <text:p>42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39:37</text:p>
          </table:table-cell>
          <table:table-cell table:number-columns-repeated="2"/>
          <table:table-cell office:value-type="float" office:value="1175662" calcext:value-type="float">
            <text:p>1175662</text:p>
          </table:table-cell>
          <table:table-cell office:value-type="float" office:value="374343" calcext:value-type="float">
            <text:p>374343</text:p>
          </table:table-cell>
          <table:table-cell office:value-type="float" office:value="2594" calcext:value-type="float">
            <text:p>2594</text:p>
          </table:table-cell>
          <table:table-cell office:value-type="float" office:value="625" calcext:value-type="float">
            <text:p>62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40:06</text:p>
          </table:table-cell>
          <table:table-cell table:number-columns-repeated="2"/>
          <table:table-cell office:value-type="float" office:value="1207639" calcext:value-type="float">
            <text:p>1207639</text:p>
          </table:table-cell>
          <table:table-cell office:value-type="float" office:value="380490" calcext:value-type="float">
            <text:p>380490</text:p>
          </table:table-cell>
          <table:table-cell office:value-type="float" office:value="2439" calcext:value-type="float">
            <text:p>2439</text:p>
          </table:table-cell>
          <table:table-cell office:value-type="float" office:value="348" calcext:value-type="float">
            <text:p>348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3:02</text:p>
          </table:table-cell>
          <table:table-cell table:number-columns-repeated="2"/>
          <table:table-cell office:value-type="float" office:value="1404845" calcext:value-type="float">
            <text:p>1404845</text:p>
          </table:table-cell>
          <table:table-cell office:value-type="float" office:value="461283" calcext:value-type="float">
            <text:p>461283</text:p>
          </table:table-cell>
          <table:table-cell office:value-type="float" office:value="2899" calcext:value-type="float">
            <text:p>2899</text:p>
          </table:table-cell>
          <table:table-cell office:value-type="float" office:value="557" calcext:value-type="float">
            <text:p>557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3:31</text:p>
          </table:table-cell>
          <table:table-cell table:number-columns-repeated="2"/>
          <table:table-cell office:value-type="float" office:value="1399177" calcext:value-type="float">
            <text:p>1399177</text:p>
          </table:table-cell>
          <table:table-cell office:value-type="float" office:value="460144" calcext:value-type="float">
            <text:p>460144</text:p>
          </table:table-cell>
          <table:table-cell office:value-type="float" office:value="3165" calcext:value-type="float">
            <text:p>3165</text:p>
          </table:table-cell>
          <table:table-cell office:value-type="float" office:value="477" calcext:value-type="float">
            <text:p>477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00</text:p>
          </table:table-cell>
          <table:table-cell table:number-columns-repeated="2"/>
          <table:table-cell office:value-type="float" office:value="1434430" calcext:value-type="float">
            <text:p>1434430</text:p>
          </table:table-cell>
          <table:table-cell office:value-type="float" office:value="463199" calcext:value-type="float">
            <text:p>463199</text:p>
          </table:table-cell>
          <table:table-cell office:value-type="float" office:value="3003" calcext:value-type="float">
            <text:p>3003</text:p>
          </table:table-cell>
          <table:table-cell office:value-type="float" office:value="466" calcext:value-type="float">
            <text:p>46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29</text:p>
          </table:table-cell>
          <table:table-cell table:number-columns-repeated="2"/>
          <table:table-cell office:value-type="float" office:value="1417323" calcext:value-type="float">
            <text:p>1417323</text:p>
          </table:table-cell>
          <table:table-cell office:value-type="float" office:value="471999" calcext:value-type="float">
            <text:p>471999</text:p>
          </table:table-cell>
          <table:table-cell office:value-type="float" office:value="3077" calcext:value-type="float">
            <text:p>3077</text:p>
          </table:table-cell>
          <table:table-cell office:value-type="float" office:value="522" calcext:value-type="float">
            <text:p>522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2:54:58</text:p>
          </table:table-cell>
          <table:table-cell table:number-columns-repeated="2"/>
          <table:table-cell office:value-type="float" office:value="1428968" calcext:value-type="float">
            <text:p>1428968</text:p>
          </table:table-cell>
          <table:table-cell office:value-type="float" office:value="472451" calcext:value-type="float">
            <text:p>472451</text:p>
          </table:table-cell>
          <table:table-cell office:value-type="float" office:value="3377" calcext:value-type="float">
            <text:p>3377</text:p>
          </table:table-cell>
          <table:table-cell office:value-type="float" office:value="646" calcext:value-type="float">
            <text:p>646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8:43</text:p>
          </table:table-cell>
          <table:table-cell table:number-columns-repeated="2"/>
          <table:table-cell office:value-type="float" office:value="1502457" calcext:value-type="float">
            <text:p>1502457</text:p>
          </table:table-cell>
          <table:table-cell office:value-type="float" office:value="497763" calcext:value-type="float">
            <text:p>497763</text:p>
          </table:table-cell>
          <table:table-cell office:value-type="float" office:value="3172" calcext:value-type="float">
            <text:p>3172</text:p>
          </table:table-cell>
          <table:table-cell office:value-type="float" office:value="373" calcext:value-type="float">
            <text:p>37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9:13</text:p>
          </table:table-cell>
          <table:table-cell table:number-columns-repeated="2"/>
          <table:table-cell office:value-type="float" office:value="1504837" calcext:value-type="float">
            <text:p>1504837</text:p>
          </table:table-cell>
          <table:table-cell office:value-type="float" office:value="498834" calcext:value-type="float">
            <text:p>498834</text:p>
          </table:table-cell>
          <table:table-cell office:value-type="float" office:value="3622" calcext:value-type="float">
            <text:p>3622</text:p>
          </table:table-cell>
          <table:table-cell office:value-type="float" office:value="606" calcext:value-type="float">
            <text:p>60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19:41</text:p>
          </table:table-cell>
          <table:table-cell table:number-columns-repeated="2"/>
          <table:table-cell office:value-type="float" office:value="1524086" calcext:value-type="float">
            <text:p>1524086</text:p>
          </table:table-cell>
          <table:table-cell office:value-type="float" office:value="505254" calcext:value-type="float">
            <text:p>505254</text:p>
          </table:table-cell>
          <table:table-cell office:value-type="float" office:value="2913" calcext:value-type="float">
            <text:p>2913</text:p>
          </table:table-cell>
          <table:table-cell office:value-type="float" office:value="427" calcext:value-type="float">
            <text:p>427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0:11</text:p>
          </table:table-cell>
          <table:table-cell table:number-columns-repeated="2"/>
          <table:table-cell office:value-type="float" office:value="1554010" calcext:value-type="float">
            <text:p>1554010</text:p>
          </table:table-cell>
          <table:table-cell office:value-type="float" office:value="519404" calcext:value-type="float">
            <text:p>519404</text:p>
          </table:table-cell>
          <table:table-cell office:value-type="float" office:value="3422" calcext:value-type="float">
            <text:p>3422</text:p>
          </table:table-cell>
          <table:table-cell office:value-type="float" office:value="480" calcext:value-type="float">
            <text:p>48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0:40</text:p>
          </table:table-cell>
          <table:table-cell table:number-columns-repeated="2"/>
          <table:table-cell office:value-type="float" office:value="1549983" calcext:value-type="float">
            <text:p>1549983</text:p>
          </table:table-cell>
          <table:table-cell office:value-type="float" office:value="519969" calcext:value-type="float">
            <text:p>519969</text:p>
          </table:table-cell>
          <table:table-cell office:value-type="float" office:value="3324" calcext:value-type="float">
            <text:p>3324</text:p>
          </table:table-cell>
          <table:table-cell office:value-type="float" office:value="495" calcext:value-type="float">
            <text:p>495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1:58</text:p>
          </table:table-cell>
          <table:table-cell table:number-columns-repeated="2"/>
          <table:table-cell office:value-type="float" office:value="1512338" calcext:value-type="float">
            <text:p>1512338</text:p>
          </table:table-cell>
          <table:table-cell office:value-type="float" office:value="499374" calcext:value-type="float">
            <text:p>499374</text:p>
          </table:table-cell>
          <table:table-cell office:value-type="float" office:value="3439" calcext:value-type="float">
            <text:p>3439</text:p>
          </table:table-cell>
          <table:table-cell office:value-type="float" office:value="618" calcext:value-type="float">
            <text:p>618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2:27</text:p>
          </table:table-cell>
          <table:table-cell table:number-columns-repeated="2"/>
          <table:table-cell office:value-type="float" office:value="1494015" calcext:value-type="float">
            <text:p>1494015</text:p>
          </table:table-cell>
          <table:table-cell office:value-type="float" office:value="500999" calcext:value-type="float">
            <text:p>500999</text:p>
          </table:table-cell>
          <table:table-cell office:value-type="float" office:value="3715" calcext:value-type="float">
            <text:p>3715</text:p>
          </table:table-cell>
          <table:table-cell office:value-type="float" office:value="635" calcext:value-type="float">
            <text:p>635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2:56</text:p>
          </table:table-cell>
          <table:table-cell table:number-columns-repeated="2"/>
          <table:table-cell office:value-type="float" office:value="1540956" calcext:value-type="float">
            <text:p>1540956</text:p>
          </table:table-cell>
          <table:table-cell office:value-type="float" office:value="513020" calcext:value-type="float">
            <text:p>513020</text:p>
          </table:table-cell>
          <table:table-cell office:value-type="float" office:value="3097" calcext:value-type="float">
            <text:p>3097</text:p>
          </table:table-cell>
          <table:table-cell office:value-type="float" office:value="625" calcext:value-type="float">
            <text:p>625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3:25</text:p>
          </table:table-cell>
          <table:table-cell table:number-columns-repeated="2"/>
          <table:table-cell office:value-type="float" office:value="1535685" calcext:value-type="float">
            <text:p>1535685</text:p>
          </table:table-cell>
          <table:table-cell office:value-type="float" office:value="514006" calcext:value-type="float">
            <text:p>514006</text:p>
          </table:table-cell>
          <table:table-cell office:value-type="float" office:value="3353" calcext:value-type="float">
            <text:p>3353</text:p>
          </table:table-cell>
          <table:table-cell office:value-type="float" office:value="452" calcext:value-type="float">
            <text:p>452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3:55</text:p>
          </table:table-cell>
          <table:table-cell table:number-columns-repeated="2"/>
          <table:table-cell office:value-type="float" office:value="1543844" calcext:value-type="float">
            <text:p>1543844</text:p>
          </table:table-cell>
          <table:table-cell office:value-type="float" office:value="512966" calcext:value-type="float">
            <text:p>512966</text:p>
          </table:table-cell>
          <table:table-cell office:value-type="float" office:value="3752" calcext:value-type="float">
            <text:p>3752</text:p>
          </table:table-cell>
          <table:table-cell office:value-type="float" office:value="708" calcext:value-type="float">
            <text:p>708</text:p>
          </table:table-cell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7:17</text:p>
          </table:table-cell>
          <table:table-cell table:number-columns-repeated="2"/>
          <table:table-cell office:value-type="float" office:value="1665079" calcext:value-type="float">
            <text:p>1665079</text:p>
          </table:table-cell>
          <table:table-cell office:value-type="float" office:value="573528" calcext:value-type="float">
            <text:p>573528</text:p>
          </table:table-cell>
          <table:table-cell office:value-type="float" office:value="3836" calcext:value-type="float">
            <text:p>3836</text:p>
          </table:table-cell>
          <table:table-cell office:value-type="float" office:value="656" calcext:value-type="float">
            <text:p>656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7:47</text:p>
          </table:table-cell>
          <table:table-cell table:number-columns-repeated="2"/>
          <table:table-cell office:value-type="float" office:value="1647703" calcext:value-type="float">
            <text:p>1647703</text:p>
          </table:table-cell>
          <table:table-cell office:value-type="float" office:value="566240" calcext:value-type="float">
            <text:p>566240</text:p>
          </table:table-cell>
          <table:table-cell office:value-type="float" office:value="3879" calcext:value-type="float">
            <text:p>3879</text:p>
          </table:table-cell>
          <table:table-cell office:value-type="float" office:value="713" calcext:value-type="float">
            <text:p>713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8:16</text:p>
          </table:table-cell>
          <table:table-cell table:number-columns-repeated="2"/>
          <table:table-cell office:value-type="float" office:value="1659088" calcext:value-type="float">
            <text:p>1659088</text:p>
          </table:table-cell>
          <table:table-cell office:value-type="float" office:value="574006" calcext:value-type="float">
            <text:p>574006</text:p>
          </table:table-cell>
          <table:table-cell office:value-type="float" office:value="4161" calcext:value-type="float">
            <text:p>4161</text:p>
          </table:table-cell>
          <table:table-cell office:value-type="float" office:value="731" calcext:value-type="float">
            <text:p>731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8:45</text:p>
          </table:table-cell>
          <table:table-cell table:number-columns-repeated="2"/>
          <table:table-cell office:value-type="float" office:value="1647890" calcext:value-type="float">
            <text:p>1647890</text:p>
          </table:table-cell>
          <table:table-cell office:value-type="float" office:value="565466" calcext:value-type="float">
            <text:p>565466</text:p>
          </table:table-cell>
          <table:table-cell office:value-type="float" office:value="4081" calcext:value-type="float">
            <text:p>4081</text:p>
          </table:table-cell>
          <table:table-cell office:value-type="float" office:value="726" calcext:value-type="float">
            <text:p>726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29:14</text:p>
          </table:table-cell>
          <table:table-cell table:number-columns-repeated="2"/>
          <table:table-cell office:value-type="float" office:value="1649454" calcext:value-type="float">
            <text:p>1649454</text:p>
          </table:table-cell>
          <table:table-cell office:value-type="float" office:value="561587" calcext:value-type="float">
            <text:p>561587</text:p>
          </table:table-cell>
          <table:table-cell office:value-type="float" office:value="4412" calcext:value-type="float">
            <text:p>4412</text:p>
          </table:table-cell>
          <table:table-cell office:value-type="float" office:value="753" calcext:value-type="float">
            <text:p>753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6:11</text:p>
          </table:table-cell>
          <table:table-cell table:number-columns-repeated="2"/>
          <table:table-cell office:value-type="float" office:value="1793367" calcext:value-type="float">
            <text:p>1793367</text:p>
          </table:table-cell>
          <table:table-cell office:value-type="float" office:value="647667" calcext:value-type="float">
            <text:p>647667</text:p>
          </table:table-cell>
          <table:table-cell office:value-type="float" office:value="4335" calcext:value-type="float">
            <text:p>4335</text:p>
          </table:table-cell>
          <table:table-cell office:value-type="float" office:value="671" calcext:value-type="float">
            <text:p>671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6:40</text:p>
          </table:table-cell>
          <table:table-cell table:number-columns-repeated="2"/>
          <table:table-cell office:value-type="float" office:value="1751541" calcext:value-type="float">
            <text:p>1751541</text:p>
          </table:table-cell>
          <table:table-cell office:value-type="float" office:value="624763" calcext:value-type="float">
            <text:p>624763</text:p>
          </table:table-cell>
          <table:table-cell office:value-type="float" office:value="4085" calcext:value-type="float">
            <text:p>4085</text:p>
          </table:table-cell>
          <table:table-cell office:value-type="float" office:value="559" calcext:value-type="float">
            <text:p>559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7:09</text:p>
          </table:table-cell>
          <table:table-cell table:number-columns-repeated="2"/>
          <table:table-cell office:value-type="float" office:value="1770996" calcext:value-type="float">
            <text:p>1770996</text:p>
          </table:table-cell>
          <table:table-cell office:value-type="float" office:value="635233" calcext:value-type="float">
            <text:p>635233</text:p>
          </table:table-cell>
          <table:table-cell office:value-type="float" office:value="4848" calcext:value-type="float">
            <text:p>4848</text:p>
          </table:table-cell>
          <table:table-cell office:value-type="float" office:value="690" calcext:value-type="float">
            <text:p>690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7:38</text:p>
          </table:table-cell>
          <table:table-cell table:number-columns-repeated="2"/>
          <table:table-cell office:value-type="float" office:value="1775754" calcext:value-type="float">
            <text:p>1775754</text:p>
          </table:table-cell>
          <table:table-cell office:value-type="float" office:value="634683" calcext:value-type="float">
            <text:p>634683</text:p>
          </table:table-cell>
          <table:table-cell office:value-type="float" office:value="4592" calcext:value-type="float">
            <text:p>4592</text:p>
          </table:table-cell>
          <table:table-cell office:value-type="float" office:value="629" calcext:value-type="float">
            <text:p>629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38:07</text:p>
          </table:table-cell>
          <table:table-cell table:number-columns-repeated="2"/>
          <table:table-cell office:value-type="float" office:value="1762332" calcext:value-type="float">
            <text:p>1762332</text:p>
          </table:table-cell>
          <table:table-cell office:value-type="float" office:value="626837" calcext:value-type="float">
            <text:p>626837</text:p>
          </table:table-cell>
          <table:table-cell office:value-type="float" office:value="4313" calcext:value-type="float">
            <text:p>4313</text:p>
          </table:table-cell>
          <table:table-cell office:value-type="float" office:value="571" calcext:value-type="float">
            <text:p>57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5:41</text:p>
          </table:table-cell>
          <table:table-cell table:number-columns-repeated="2"/>
          <table:table-cell office:value-type="float" office:value="1847092" calcext:value-type="float">
            <text:p>1847092</text:p>
          </table:table-cell>
          <table:table-cell office:value-type="float" office:value="679597" calcext:value-type="float">
            <text:p>679597</text:p>
          </table:table-cell>
          <table:table-cell office:value-type="float" office:value="4641" calcext:value-type="float">
            <text:p>4641</text:p>
          </table:table-cell>
          <table:table-cell office:value-type="float" office:value="666" calcext:value-type="float">
            <text:p>666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6:10</text:p>
          </table:table-cell>
          <table:table-cell table:number-columns-repeated="2"/>
          <table:table-cell office:value-type="float" office:value="1833359" calcext:value-type="float">
            <text:p>1833359</text:p>
          </table:table-cell>
          <table:table-cell office:value-type="float" office:value="669740" calcext:value-type="float">
            <text:p>669740</text:p>
          </table:table-cell>
          <table:table-cell office:value-type="float" office:value="4987" calcext:value-type="float">
            <text:p>4987</text:p>
          </table:table-cell>
          <table:table-cell office:value-type="float" office:value="788" calcext:value-type="float">
            <text:p>788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6:39</text:p>
          </table:table-cell>
          <table:table-cell table:number-columns-repeated="2"/>
          <table:table-cell office:value-type="float" office:value="1903999" calcext:value-type="float">
            <text:p>1903999</text:p>
          </table:table-cell>
          <table:table-cell office:value-type="float" office:value="692807" calcext:value-type="float">
            <text:p>692807</text:p>
          </table:table-cell>
          <table:table-cell office:value-type="float" office:value="5075" calcext:value-type="float">
            <text:p>5075</text:p>
          </table:table-cell>
          <table:table-cell office:value-type="float" office:value="732" calcext:value-type="float">
            <text:p>732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7:08</text:p>
          </table:table-cell>
          <table:table-cell table:number-columns-repeated="2"/>
          <table:table-cell office:value-type="float" office:value="1839722" calcext:value-type="float">
            <text:p>1839722</text:p>
          </table:table-cell>
          <table:table-cell office:value-type="float" office:value="666583" calcext:value-type="float">
            <text:p>666583</text:p>
          </table:table-cell>
          <table:table-cell office:value-type="float" office:value="4397" calcext:value-type="float">
            <text:p>4397</text:p>
          </table:table-cell>
          <table:table-cell office:value-type="float" office:value="591" calcext:value-type="float">
            <text:p>591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7:37</text:p>
          </table:table-cell>
          <table:table-cell table:number-columns-repeated="2"/>
          <table:table-cell office:value-type="float" office:value="1879761" calcext:value-type="float">
            <text:p>1879761</text:p>
          </table:table-cell>
          <table:table-cell office:value-type="float" office:value="683050" calcext:value-type="float">
            <text:p>683050</text:p>
          </table:table-cell>
          <table:table-cell office:value-type="float" office:value="4784" calcext:value-type="float">
            <text:p>4784</text:p>
          </table:table-cell>
          <table:table-cell office:value-type="float" office:value="924" calcext:value-type="float">
            <text:p>924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8:56</text:p>
          </table:table-cell>
          <table:table-cell table:number-columns-repeated="2"/>
          <table:table-cell office:value-type="float" office:value="1826056" calcext:value-type="float">
            <text:p>1826056</text:p>
          </table:table-cell>
          <table:table-cell office:value-type="float" office:value="650384" calcext:value-type="float">
            <text:p>650384</text:p>
          </table:table-cell>
          <table:table-cell office:value-type="float" office:value="5012" calcext:value-type="float">
            <text:p>5012</text:p>
          </table:table-cell>
          <table:table-cell office:value-type="float" office:value="868" calcext:value-type="float">
            <text:p>868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9:25</text:p>
          </table:table-cell>
          <table:table-cell table:number-columns-repeated="2"/>
          <table:table-cell office:value-type="float" office:value="1813477" calcext:value-type="float">
            <text:p>1813477</text:p>
          </table:table-cell>
          <table:table-cell office:value-type="float" office:value="655888" calcext:value-type="float">
            <text:p>655888</text:p>
          </table:table-cell>
          <table:table-cell office:value-type="float" office:value="5028" calcext:value-type="float">
            <text:p>5028</text:p>
          </table:table-cell>
          <table:table-cell office:value-type="float" office:value="722" calcext:value-type="float">
            <text:p>722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49:54</text:p>
          </table:table-cell>
          <table:table-cell table:number-columns-repeated="2"/>
          <table:table-cell office:value-type="float" office:value="1885554" calcext:value-type="float">
            <text:p>1885554</text:p>
          </table:table-cell>
          <table:table-cell office:value-type="float" office:value="675819" calcext:value-type="float">
            <text:p>675819</text:p>
          </table:table-cell>
          <table:table-cell office:value-type="float" office:value="5086" calcext:value-type="float">
            <text:p>5086</text:p>
          </table:table-cell>
          <table:table-cell office:value-type="float" office:value="859" calcext:value-type="float">
            <text:p>859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50:23</text:p>
          </table:table-cell>
          <table:table-cell table:number-columns-repeated="2"/>
          <table:table-cell office:value-type="float" office:value="1836044" calcext:value-type="float">
            <text:p>1836044</text:p>
          </table:table-cell>
          <table:table-cell office:value-type="float" office:value="663215" calcext:value-type="float">
            <text:p>663215</text:p>
          </table:table-cell>
          <table:table-cell office:value-type="float" office:value="4146" calcext:value-type="float">
            <text:p>4146</text:p>
          </table:table-cell>
          <table:table-cell office:value-type="float" office:value="606" calcext:value-type="float">
            <text:p>60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110029" calcext:value-type="float">
            <text:p>61110029</text:p>
          </table:table-cell>
          <table:table-cell office:value-type="string" calcext:value-type="string">
            <text:p>2025-02-21 13:50:52</text:p>
          </table:table-cell>
          <table:table-cell table:number-columns-repeated="2"/>
          <table:table-cell office:value-type="float" office:value="1841236" calcext:value-type="float">
            <text:p>1841236</text:p>
          </table:table-cell>
          <table:table-cell office:value-type="float" office:value="669435" calcext:value-type="float">
            <text:p>669435</text:p>
          </table:table-cell>
          <table:table-cell office:value-type="float" office:value="4618" calcext:value-type="float">
            <text:p>4618</text:p>
          </table:table-cell>
          <table:table-cell office:value-type="float" office:value="817" calcext:value-type="float">
            <text:p>817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nnex B Coincidence Limit'.R1:'Annex B Coincidence Limit'.R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5:00:04.1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6:56:43.396000000</meta:creation-date>
    <dc:date>2025-02-24T09:09:46.030000000</dc:date>
    <meta:editing-duration>P1DT17H17M52S</meta:editing-duration>
    <meta:editing-cycles>9</meta:editing-cycles>
    <meta:generator>LibreOffice/7.6.4.1$Windows_X86_64 LibreOffice_project/e19e193f88cd6c0525a17fb7a176ed8e6a3e2aa1</meta:generator>
    <meta:document-statistic meta:table-count="3" meta:cell-count="1499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B Coincidence Limit'.E22:'Annex B Coincidence Limit'.E36 'Annex B Coincidence Limit'.G22:'Annex B Coincidence Limit'.G36 'Annex B Coincidence Limit'.K22:'Annex B Coincidence Limit'.L36 'Annex B Coincidence Limit'.I22:'Annex B Coincidence Limit'.I36" chart:data-source-has-labels="row" svg:x="1.468cm" svg:y="0.304cm" svg:width="22.005cm" svg:height="13.673cm">
          <chart:coordinate-region svg:x="3.095cm" svg:y="0.502cm" svg:width="19.93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'.G22:'Annex B Coincidence Limit'.G36" loext:label-string="&quot;counts&quot;" chart:class="chart:scatter">
            <chart:domain table:cell-range-address="'Annex B Coincidence Limit'.E22:'Annex B Coincidence Limit'.E36"/>
            <chart:data-point chart:repeated="15"/>
          </chart:series>
          <chart:series chart:style-name="ch9" chart:values-cell-range-address="'Annex B Coincidence Limit'.L22:'Annex B Coincidence Limit'.L36" loext:label-string="&quot;corrected&quot;" chart:class="chart:scatter">
            <chart:data-point chart:repeated="15"/>
          </chart:series>
          <chart:series chart:style-name="ch10" chart:values-cell-range-address="'Annex B Coincidence Limit'.K22:'Annex B Coincidence Limit'.K36" loext:label-string="&quot;95% projected&quot;" chart:class="chart:scatter">
            <chart:domain table:cell-range-address="'Annex B Coincidence Limit'.E22:'Annex B Coincidence Limit'.E35"/>
            <chart:data-point chart:repeated="15"/>
          </chart:series>
          <chart:series chart:style-name="ch11" chart:values-cell-range-address="'Annex B Coincidence Limit'.I22:'Annex B Coincidence Limit'.I36" loext:label-string="&quot;projected linear fit&quot;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</table:table-cell>
              <table:table-cell office:value-type="string">
                <text:p>corrected</text:p>
              </table:table-cell>
              <table:table-cell office:value-type="string">
                <text:p>Column E</text:p>
              </table:table-cell>
              <table:table-cell office:value-type="string">
                <text:p>95% projected</text:p>
              </table:table-cell>
              <table:table-cell office:value-type="string">
                <text:p>projected linear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1">
                <text:p>1</text:p>
                <draw:g>
                  <svg:desc>'Annex B Coincidence Limit'.G22:'Annex B Coincidence Limit'.G36</svg:desc>
                </draw:g>
              </table:table-cell>
              <table:table-cell office:value-type="float" office:value="1">
                <text:p>1</text:p>
                <draw:g>
                  <svg:desc>'Annex B Coincidence Limit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5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69243">
                <text:p>169243</text:p>
              </table:table-cell>
              <table:table-cell office:value-type="float" office:value="169243">
                <text:p>169243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46863.622038757">
                <text:p>146863.622038757</text:p>
              </table:table-cell>
              <table:table-cell office:value-type="float" office:value="154593.286356587">
                <text:p>154593.28635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94743">
                <text:p>294743</text:p>
              </table:table-cell>
              <table:table-cell office:value-type="float" office:value="294743">
                <text:p>294743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87736.94647438">
                <text:p>287736.94647438</text:p>
              </table:table-cell>
              <table:table-cell office:value-type="float" office:value="302880.996288821">
                <text:p>302880.99628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52854">
                <text:p>452854</text:p>
              </table:table-cell>
              <table:table-cell office:value-type="float" office:value="452854">
                <text:p>452854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28384.50130143">
                <text:p>428384.50130143</text:p>
              </table:table-cell>
              <table:table-cell office:value-type="float" office:value="450931.054001505">
                <text:p>450931.05400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97630">
                <text:p>597630</text:p>
              </table:table-cell>
              <table:table-cell office:value-type="float" office:value="597630">
                <text:p>597630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68806.828827374">
                <text:p>568806.828827374</text:p>
              </table:table-cell>
              <table:table-cell office:value-type="float" office:value="598744.030344604">
                <text:p>598744.0303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20744">
                <text:p>720744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09004.469624212">
                <text:p>709004.469624212</text:p>
              </table:table-cell>
              <table:table-cell office:value-type="float" office:value="746320.494341276">
                <text:p>746320.494341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37754">
                <text:p>83775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48977.962535409">
                <text:p>848977.962535409</text:p>
              </table:table-cell>
              <table:table-cell office:value-type="float" office:value="893661.013195168">
                <text:p>893661.01319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53674">
                <text:p>95367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88727.844682814">
                <text:p>988727.844682814</text:p>
              </table:table-cell>
              <table:table-cell office:value-type="float" office:value="1040766.1522977">
                <text:p>1040766.15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085924">
                <text:p>1085924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28254.65147349">
                <text:p>1128254.65147349</text:p>
              </table:table-cell>
              <table:table-cell office:value-type="float" office:value="1187636.47523525">
                <text:p>1187636.4752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199473">
                <text:p>1199473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267558.91660661">
                <text:p>1267558.91660661</text:p>
              </table:table-cell>
              <table:table-cell office:value-type="float" office:value="1334272.54379644">
                <text:p>1334272.5437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416948">
                <text:p>1416948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545501.948198">
                <text:p>1545501.948198</text:p>
              </table:table-cell>
              <table:table-cell office:value-type="float" office:value="1626844.15599789">
                <text:p>1626844.1559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526221">
                <text:p>1526221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684141.77357606">
                <text:p>1684141.77357606</text:p>
              </table:table-cell>
              <table:table-cell office:value-type="float" office:value="1772780.81429059">
                <text:p>1772780.814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653842">
                <text:p>1653842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822561.1751496">
                <text:p>1822561.1751496</text:p>
              </table:table-cell>
              <table:table-cell office:value-type="float" office:value="1918485.44752589">
                <text:p>1918485.44752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770798">
                <text:p>1770798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960760.67817959">
                <text:p>1960760.67817959</text:p>
              </table:table-cell>
              <table:table-cell office:value-type="float" office:value="2063958.60861009">
                <text:p>2063958.60861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1850630">
                <text:p>1850630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2098740.80625944">
                <text:p>2098740.80625944</text:p>
              </table:table-cell>
              <table:table-cell office:value-type="float" office:value="2209200.84869415">
                <text:p>2209200.84869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424cm" svg:height="33.992cm" xlink:href=".." xlink:type="simple" chart:class="chart:scatter" chart:style-name="ch1">
        <chart:legend chart:legend-position="end" svg:x="47.818cm" svg:y="15.956cm" style:legend-expansion="high" chart:style-name="ch2"/>
        <chart:plot-area chart:style-name="ch3" table:cell-range-address="'Annex B Coincidence Limit'.E22:'Annex B Coincidence Limit'.E36 'Annex B Coincidence Limit'.A1:'Annex B Coincidence Limit'.A1 'Annex B Coincidence Limit'.G22:'Annex B Coincidence Limit'.G36 'Annex B Coincidence Limit'.K22:'Annex B Coincidence Limit'.L36 'Annex B Coincidence Limit'.I22:'Annex B Coincidence Limit'.I36" chart:data-source-has-labels="row" svg:x="2.057cm" svg:y="0.679cm" svg:width="44.693cm" svg:height="31.675cm">
          <chart:coordinate-region svg:x="3.684cm" svg:y="0.878cm" svg:width="42.626cm" svg:height="30.832cm"/>
          <chart:axis chart:dimension="x" chart:name="primary-x" chart:style-name="ch4">
            <chart:title svg:x="21.511cm" svg:y="33.033cm" chart:style-name="ch5">
              <text:p>Percent of Estimated Coincidence Limit</text:p>
            </chart:title>
          </chart:axis>
          <chart:axis chart:dimension="y" chart:name="primary-y" chart:style-name="ch4">
            <chart:title svg:x="0.451cm" svg:y="17.548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'.G22:'Annex B Coincidence Limit'.G36" chart:label-cell-address="'Annex B Coincidence Limit'.A1:'Annex B Coincidence Limit'.A1" chart:class="chart:scatter">
            <chart:domain table:cell-range-address="'Annex B Coincidence Limit'.E22:'Annex B Coincidence Limit'.E36"/>
            <chart:data-point chart:repeated="15"/>
          </chart:series>
          <chart:series chart:style-name="ch9" chart:values-cell-range-address="'Annex B Coincidence Limit'.L22:'Annex B Coincidence Limit'.L36" chart:label-cell-address="'Annex B Coincidence Limit'.A1:'Annex B Coincidence Limit'.A1" chart:class="chart:scatter">
            <chart:data-point chart:repeated="15"/>
          </chart:series>
          <chart:series chart:style-name="ch10" chart:values-cell-range-address="'Annex B Coincidence Limit'.K22:'Annex B Coincidence Limit'.K36" chart:label-cell-address="'Annex B Coincidence Limit'.A1:'Annex B Coincidence Limit'.A1" chart:class="chart:scatter">
            <chart:domain table:cell-range-address="'Annex B Coincidence Limit'.E22:'Annex B Coincidence Limit'.E35"/>
            <chart:data-point chart:repeated="15"/>
          </chart:series>
          <chart:series chart:style-name="ch11" chart:values-cell-range-address="'Annex B Coincidence Limit'.I22:'Annex B Coincidence Limit'.I36" chart:label-cell-address="'Annex B Coincidence Limit'.A1:'Annex B Coincidence Limit'.A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  <table:table-cell office:value-type="string">
                <text:p>ΔCOUNTS_4um &lt; 5%</text:p>
                <draw:g>
                  <svg:desc>'Annex B Coincidence Limit'.A1:'Annex B Coincidence Lim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1">
                <text:p>1</text:p>
                <draw:g>
                  <svg:desc>'Annex B Coincidence Limit'.G22:'Annex B Coincidence Limit'.G36</svg:desc>
                </draw:g>
              </table:table-cell>
              <table:table-cell office:value-type="float" office:value="1">
                <text:p>1</text:p>
                <draw:g>
                  <svg:desc>'Annex B Coincidence Limit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5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69243">
                <text:p>169243</text:p>
              </table:table-cell>
              <table:table-cell office:value-type="float" office:value="169243">
                <text:p>169243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46863.622038757">
                <text:p>146863.622038757</text:p>
              </table:table-cell>
              <table:table-cell office:value-type="float" office:value="154593.286356587">
                <text:p>154593.28635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94743">
                <text:p>294743</text:p>
              </table:table-cell>
              <table:table-cell office:value-type="float" office:value="294743">
                <text:p>294743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87736.94647438">
                <text:p>287736.94647438</text:p>
              </table:table-cell>
              <table:table-cell office:value-type="float" office:value="302880.996288821">
                <text:p>302880.99628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52854">
                <text:p>452854</text:p>
              </table:table-cell>
              <table:table-cell office:value-type="float" office:value="452854">
                <text:p>452854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28384.50130143">
                <text:p>428384.50130143</text:p>
              </table:table-cell>
              <table:table-cell office:value-type="float" office:value="450931.054001505">
                <text:p>450931.05400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97630">
                <text:p>597630</text:p>
              </table:table-cell>
              <table:table-cell office:value-type="float" office:value="597630">
                <text:p>597630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68806.828827374">
                <text:p>568806.828827374</text:p>
              </table:table-cell>
              <table:table-cell office:value-type="float" office:value="598744.030344604">
                <text:p>598744.0303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20744">
                <text:p>720744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09004.469624212">
                <text:p>709004.469624212</text:p>
              </table:table-cell>
              <table:table-cell office:value-type="float" office:value="746320.494341276">
                <text:p>746320.494341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37754">
                <text:p>83775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48977.962535409">
                <text:p>848977.962535409</text:p>
              </table:table-cell>
              <table:table-cell office:value-type="float" office:value="893661.013195168">
                <text:p>893661.01319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53674">
                <text:p>95367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88727.844682814">
                <text:p>988727.844682814</text:p>
              </table:table-cell>
              <table:table-cell office:value-type="float" office:value="1040766.1522977">
                <text:p>1040766.15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085924">
                <text:p>1085924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28254.65147349">
                <text:p>1128254.65147349</text:p>
              </table:table-cell>
              <table:table-cell office:value-type="float" office:value="1187636.47523525">
                <text:p>1187636.4752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199473">
                <text:p>1199473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267558.91660661">
                <text:p>1267558.91660661</text:p>
              </table:table-cell>
              <table:table-cell office:value-type="float" office:value="1334272.54379644">
                <text:p>1334272.5437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416948">
                <text:p>1416948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545501.948198">
                <text:p>1545501.948198</text:p>
              </table:table-cell>
              <table:table-cell office:value-type="float" office:value="1626844.15599789">
                <text:p>1626844.1559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526221">
                <text:p>1526221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684141.77357606">
                <text:p>1684141.77357606</text:p>
              </table:table-cell>
              <table:table-cell office:value-type="float" office:value="1772780.81429059">
                <text:p>1772780.814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653842">
                <text:p>1653842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822561.1751496">
                <text:p>1822561.1751496</text:p>
              </table:table-cell>
              <table:table-cell office:value-type="float" office:value="1918485.44752589">
                <text:p>1918485.44752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770798">
                <text:p>1770798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960760.67817959">
                <text:p>1960760.67817959</text:p>
              </table:table-cell>
              <table:table-cell office:value-type="float" office:value="2063958.60861009">
                <text:p>2063958.60861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1850630">
                <text:p>1850630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2098740.80625944">
                <text:p>2098740.80625944</text:p>
              </table:table-cell>
              <table:table-cell office:value-type="float" office:value="2209200.84869415">
                <text:p>2209200.84869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B Coincidence Limit'.I22:'Annex B Coincidence Limit'.J36 'Annex B Coincidence Limit'.M22:'Annex B Coincidence Limit'.M36" chart:data-source-has-labels="row" svg:x="1.395cm" svg:y="2.51cm" svg:width="18.548cm" svg:height="11.466cm">
          <chart:coordinate-region svg:x="2.326cm" svg:y="2.708cm" svg:width="16.927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B Coincidence Limit'.J22:'Annex B Coincidence Limit'.J36" loext:label-string="&quot;fractional counts&quot;" chart:class="chart:scatter">
            <chart:domain table:cell-range-address="'Annex B Coincidence Limit'.I22:'Annex B Coincidence Limit'.I36"/>
            <chart:data-point chart:repeated="15"/>
          </chart:series>
          <chart:series chart:style-name="ch13" chart:values-cell-range-address="'Annex B Coincidence Limit'.M22:'Annex B Coincidence Limit'.M36" loext:label-string="&quot;corrected counts&quot;" chart:class="chart:scatter">
            <chart:data-point chart:repeated="10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ractional counts</text:p>
              </table:table-cell>
              <table:table-cell office:value-type="string">
                <text:p>corrected cou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  <table:table-cell office:value-type="float" office:value="1">
                <text:p>1</text:p>
                <draw:g>
                  <svg:desc>'Annex B Coincidence Limit'.J22:'Annex B Coincidence Limit'.J36</svg:desc>
                </draw:g>
              </table:table-cell>
              <table:table-cell office:value-type="float" office:value="1">
                <text:p>1</text:p>
                <draw:g>
                  <svg:desc>'Annex B Coincidence Limit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593.286356587">
                <text:p>154593.286356587</text:p>
              </table:table-cell>
              <table:table-cell office:value-type="float" office:value="1.09476293562724">
                <text:p>1.09476293562724</text:p>
              </table:table-cell>
              <table:table-cell office:value-type="float" office:value="1.09476293562724">
                <text:p>1.09476293562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880.996288821">
                <text:p>302880.996288821</text:p>
              </table:table-cell>
              <table:table-cell office:value-type="float" office:value="0.973131373745677">
                <text:p>0.973131373745677</text:p>
              </table:table-cell>
              <table:table-cell office:value-type="float" office:value="0.973131373745677">
                <text:p>0.973131373745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931.054001505">
                <text:p>450931.054001505</text:p>
              </table:table-cell>
              <table:table-cell office:value-type="float" office:value="1.0042643902686">
                <text:p>1.0042643902686</text:p>
              </table:table-cell>
              <table:table-cell office:value-type="float" office:value="1.0042643902686">
                <text:p>1.0042643902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8744.030344604">
                <text:p>598744.030344604</text:p>
              </table:table-cell>
              <table:table-cell office:value-type="float" office:value="0.998139387971914">
                <text:p>0.998139387971914</text:p>
              </table:table-cell>
              <table:table-cell office:value-type="float" office:value="0.998139387971914">
                <text:p>0.998139387971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6320.494341276">
                <text:p>746320.494341276</text:p>
              </table:table-cell>
              <table:table-cell office:value-type="float" office:value="0.965729878068202">
                <text:p>0.965729878068202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3661.013195168">
                <text:p>893661.013195168</text:p>
              </table:table-cell>
              <table:table-cell office:value-type="float" office:value="0.937440469742235">
                <text:p>0.937440469742235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0766.1522977">
                <text:p>1040766.1522977</text:p>
              </table:table-cell>
              <table:table-cell office:value-type="float" office:value="0.916319192255219">
                <text:p>0.916319192255219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7636.47523525">
                <text:p>1187636.47523525</text:p>
              </table:table-cell>
              <table:table-cell office:value-type="float" office:value="0.914357231900356">
                <text:p>0.914357231900356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4272.54379644">
                <text:p>1334272.54379644</text:p>
              </table:table-cell>
              <table:table-cell office:value-type="float" office:value="0.898971507415653">
                <text:p>0.898971507415653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6844.15599789">
                <text:p>1626844.15599789</text:p>
              </table:table-cell>
              <table:table-cell office:value-type="float" office:value="0.870979555586783">
                <text:p>0.870979555586783</text:p>
              </table:table-cell>
              <table:table-cell office:value-type="float" office:value="0.994392829519741">
                <text:p>0.994392829519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80.81429059">
                <text:p>1772780.81429059</text:p>
              </table:table-cell>
              <table:table-cell office:value-type="float" office:value="0.860919177202821">
                <text:p>0.860919177202821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8485.44752589">
                <text:p>1918485.44752589</text:p>
              </table:table-cell>
              <table:table-cell office:value-type="float" office:value="0.862056056840472">
                <text:p>0.862056056840472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3958.60861009">
                <text:p>2063958.60861009</text:p>
              </table:table-cell>
              <table:table-cell office:value-type="float" office:value="0.857961972983794">
                <text:p>0.857961972983794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9200.84869415">
                <text:p>2209200.84869415</text:p>
              </table:table-cell>
              <table:table-cell office:value-type="float" office:value="0.837692055520395">
                <text:p>0.83769205552039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