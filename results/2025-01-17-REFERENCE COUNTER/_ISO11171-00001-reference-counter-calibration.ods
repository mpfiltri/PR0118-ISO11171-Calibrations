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B0000000A2370564DF.png" manifest:media-type="image/png"/>
  <manifest:file-entry manifest:full-path="Pictures/100000010000010200000225D6430680.png" manifest:media-type="image/png"/>
  <manifest:file-entry manifest:full-path="Pictures/100000000000050C0000022180CD146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15.1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362cm"/>
    </style:style>
    <style:style style:name="co9" style:family="table-column">
      <style:table-column-properties fo:break-before="auto" style:column-width="5.932cm"/>
    </style:style>
    <style:style style:name="co10" style:family="table-column">
      <style:table-column-properties fo:break-before="auto" style:column-width="1.277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4.517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.924cm"/>
    </style:style>
    <style:style style:name="co16" style:family="table-column">
      <style:table-column-properties fo:break-before="auto" style:column-width="5.017cm"/>
    </style:style>
    <style:style style:name="co17" style:family="table-column">
      <style:table-column-properties fo:break-before="auto" style:column-width="2.11cm"/>
    </style:style>
    <style:style style:name="co18" style:family="table-column">
      <style:table-column-properties fo:break-before="auto" style:column-width="5.413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556cm" fo:break-before="auto" style:use-optimal-row-height="fals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8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432cm" fo:break-before="auto" style:use-optimal-row-height="true"/>
    </style:style>
    <style:style style:name="ro10" style:family="table-row">
      <style:table-row-properties style:row-height="1.579cm" fo:break-before="auto" style:use-optimal-row-height="false"/>
    </style:style>
    <style:style style:name="ro11" style:family="table-row">
      <style:table-row-properties style:row-height="1.192cm" fo:break-before="auto" style:use-optimal-row-height="false"/>
    </style:style>
    <style:style style:name="ro12" style:family="table-row">
      <style:table-row-properties style:row-height="1.748cm" fo:break-before="auto" style:use-optimal-row-height="true"/>
    </style:style>
    <style:style style:name="ro13" style:family="table-row">
      <style:table-row-properties style:row-height="0.933cm" fo:break-before="auto" style:use-optimal-row-height="true"/>
    </style:style>
    <style:style style:name="ro14" style:family="table-row">
      <style:table-row-properties style:row-height="3.7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3d3d3"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wrap-option="wrap" style:vertical-align="middle"/>
      <style:text-properties style:font-name="Calibri"/>
    </style:style>
    <style:style style:name="ce33" style:family="table-cell" style:parent-style-name="Default">
      <style:text-properties style:font-name="Calibri"/>
    </style:style>
    <style:style style:name="ce34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vertical-align="middle"/>
      <style:text-properties style:font-name="Calibri"/>
    </style:style>
    <style:style style:name="ce36" style:family="table-cell" style:parent-style-name="Default">
      <style:table-cell-properties fo:wrap-option="wrap" style:vertical-align="middle"/>
      <style:text-properties style:font-name="Calibri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38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2" style:family="table-cell" style:parent-style-name="Default" style:data-style-name="N1">
      <style:text-properties style:font-name="Calibri"/>
    </style:style>
    <style:style style:name="ce44" style:family="table-cell" style:parent-style-name="Default" style:data-style-name="N11">
      <style:text-properties style:font-name="Calibri"/>
    </style:style>
    <style:style style:name="ce45" style:family="table-cell" style:parent-style-name="Default" style:data-style-name="N11">
      <style:text-properties style:font-name="Calibri"/>
      <style:map style:condition="cell-content()&lt;0.03" style:apply-style-name="Good" style:base-cell-address="'Annex A Preliminary Check'.C35"/>
      <style:map style:condition="cell-content()&gt;=0.03" style:apply-style-name="Bad" style:base-cell-address="'Annex A Preliminary Check'.C35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57" style:family="table-cell" style:parent-style-name="Default" style:data-style-name="N158">
      <style:text-properties style:font-name="Calibri"/>
    </style:style>
    <style:style style:name="ce77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5"/>
      <style:map style:condition="cell-content()!=&quot;&lt;3% = PASS&quot;" style:apply-style-name="Bad" style:base-cell-address="'Annex A Preliminary Check'.D35"/>
    </style:style>
    <style:style style:name="ce78" style:family="table-cell" style:parent-style-name="Default">
      <style:text-properties style:font-name="Calibri" fo:font-weight="bold" style:font-weight-asian="bold" style:font-weight-complex="bold"/>
    </style:style>
    <style:style style:name="ce79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5"/>
      <style:map style:condition="cell-content()!=&quot;&lt;3% = PASS&quot;" style:apply-style-name="Bad" style:base-cell-address="'Annex A Preliminary Check'.D35"/>
    </style:style>
    <style:style style:name="ce80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normal" style:font-weight-asian="normal" style:font-weight-complex="normal"/>
    </style:style>
    <style:style style:name="ce81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bold" style:font-weight-asian="bold" style:font-weight-complex="bold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83" style:family="table-cell" style:parent-style-name="Default" style:data-style-name="N2">
      <style:table-cell-properties fo:border-bottom="0.74pt solid #000000" fo:background-color="#ccf4c6" style:text-align-source="fix" style:repeat-content="false" fo:border-left="none" fo:border-right="none" fo:border-top="0.74pt solid #000000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84" style:family="table-cell" style:parent-style-name="Default" style:data-style-name="N11">
      <style:table-cell-properties fo:background-color="#ccf4c6" style:text-align-source="fix" style:repeat-content="false"/>
      <style:paragraph-properties fo:text-align="end" fo:margin-left="0cm"/>
      <style:text-properties style:font-name="Calibri"/>
    </style:style>
    <style:style style:name="ce97" style:family="table-cell" style:parent-style-name="Default" style:data-style-name="N1">
      <style:table-cell-properties style:cell-protect="none" style:print-content="true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e0ffff" fo:wrap-option="wrap" style:vertical-align="middle"/>
    </style:style>
    <style:style style:name="ce32" style:family="table-cell" style:parent-style-name="Default" style:data-style-name="N158"/>
    <style:style style:name="ce53" style:family="table-cell" style:parent-style-name="Default" style:data-style-name="N2"/>
    <style:style style:name="ce4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0ffff"/>
    </style:style>
    <style:style style:name="ce51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108" style:family="table-cell" style:parent-style-name="Default">
      <style:table-cell-properties fo:background-color="#e0ffff" style:vertical-align="middle"/>
    </style:style>
    <style:style style:name="ce58" style:family="table-cell" style:parent-style-name="Default" style:data-style-name="N157">
      <style:table-cell-properties fo:background-color="#e0ffff"/>
    </style:style>
    <style:style style:name="ce59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60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61" style:family="table-cell" style:parent-style-name="Default" style:data-style-name="N158">
      <style:table-cell-properties fo:background-color="#e0ffff"/>
    </style:style>
    <style:style style:name="ce62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63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12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>
      <style:table-cell-properties fo:background-color="#e0ffff"/>
      <style:text-properties style:use-window-font-color="true"/>
    </style:style>
    <style:style style:name="ce134" style:family="table-cell" style:parent-style-name="Default" style:data-style-name="N1">
      <style:table-cell-properties fo:background-color="#e0ffff"/>
      <style:text-properties style:use-window-font-color="true"/>
    </style:style>
    <style:style style:name="ce142" style:family="table-cell" style:parent-style-name="Default" style:data-style-name="N1">
      <style:table-cell-properties fo:background-color="#e0ffff"/>
      <style:text-properties style:use-window-font-color="true" fo:font-weight="bold" style:font-weight-asian="bold" style:font-weight-complex="bold"/>
    </style:style>
    <style:style style:name="ce143" style:family="table-cell" style:parent-style-name="Default" style:data-style-name="N1">
      <style:table-cell-properties fo:border-bottom="0.74pt solid #000000" fo:background-color="#e0ffff" fo:border-left="none" fo:border-right="none" fo:border-top="none"/>
      <style:text-properties style:use-window-font-color="true"/>
    </style:style>
    <style:style style:name="ce20" style:family="table-cell" style:parent-style-name="Default" style:data-style-name="N1"/>
    <style:style style:name="ce14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background-color="#e0ffff"/>
      <style:text-properties style:use-window-font-color="true" fo:font-weight="normal" style:font-weight-asian="normal" style:font-weight-complex="normal"/>
    </style:style>
    <style:style style:name="ce148" style:family="table-cell" style:parent-style-name="Default">
      <style:table-cell-properties fo:border-bottom="0.74pt solid #000000" fo:background-color="#e0ffff" fo:border-left="none" fo:border-right="none" fo:border-top="none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2">
      <style:table-cell-properties fo:background-color="#e0ffff"/>
      <style:text-properties style:use-window-font-color="true"/>
    </style:style>
    <style:style style:name="ce151" style:family="table-cell" style:parent-style-name="Default" style:data-style-name="N2">
      <style:table-cell-properties fo:background-color="#e0ffff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style:use-window-font-color="true"/>
    </style:style>
    <style:style style:name="ce64" style:family="table-cell" style:parent-style-name="Default" style:data-style-name="N1">
      <style:table-cell-properties fo:background-color="#e0ffff"/>
    </style:style>
    <style:style style:name="ce65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12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color="#e0ffff" fo:font-weight="bold" style:font-weight-asian="bold" style:font-weight-complex="bold"/>
    </style:style>
    <style:style style:name="ce12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color="#e0ffff" fo:font-weight="bold" style:font-weight-asian="bold" style:font-weight-complex="bold"/>
    </style:style>
    <style:style style:name="ce130" style:family="table-cell" style:parent-style-name="Default">
      <style:table-cell-properties fo:background-color="#e0ffff"/>
      <style:text-properties fo:color="#e0ffff"/>
    </style:style>
    <style:style style:name="ce139" style:family="table-cell" style:parent-style-name="Default" style:data-style-name="N2">
      <style:table-cell-properties fo:background-color="#e0ffff"/>
      <style:text-properties fo:color="#e0ffff"/>
    </style:style>
    <style:style style:name="ce140" style:family="table-cell" style:parent-style-name="Default" style:data-style-name="N2">
      <style:table-cell-properties fo:background-color="#e0ffff"/>
      <style:text-properties fo:color="#e0ffff" fo:font-weight="bold" style:font-weight-asian="bold" style:font-weight-complex="bold"/>
    </style:style>
    <style:style style:name="ce141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fo:color="#e0ffff"/>
    </style:style>
    <style:style style:name="ce70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e0ffff"/>
    </style:style>
    <style:style style:name="ce72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73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149" style:family="table-cell" style:parent-style-name="Default">
      <style:table-cell-properties fo:background-color="#e0ffff" style:text-align-source="fix" style:repeat-content="false"/>
      <style:paragraph-properties fo:text-align="start" fo:margin-left="1.411cm"/>
      <style:text-properties fo:color="#e0ffff"/>
    </style:style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57"/>
    <style:style style:name="ce184" style:family="table-cell" style:parent-style-name="Default" style:data-style-name="N49">
      <style:text-properties fo:font-weight="bold" style:font-weight-asian="bold" style:font-weight-complex="bold"/>
    </style:style>
    <style:style style:name="ce188" style:family="table-cell" style:parent-style-name="Default" style:data-style-name="N81"/>
    <style:style style:name="ce189" style:family="table-cell" style:parent-style-name="Default">
      <style:table-cell-properties fo:background-color="#e0ffff" style:text-align-source="fix" style:repeat-content="false"/>
      <style:paragraph-properties fo:text-align="start" fo:margin-left="1.411cm"/>
      <style:text-properties style:use-window-font-color="true"/>
    </style:style>
    <style:style style:name="ce190" style:family="table-cell" style:parent-style-name="Default">
      <style:text-properties fo:color="#c9211e" fo:font-size="32pt" fo:font-weight="bold" style:font-size-asian="32pt" style:font-weight-asian="bold" style:font-size-complex="3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28" style:family="table-cell" style:parent-style-name="Default">
      <style:table-cell-properties fo:border-bottom="none" fo:border-left="0.74pt solid #000000" fo:border-right="none" fo:border-top="none"/>
    </style:style>
    <style:style style:name="ce229" style:family="table-cell" style:parent-style-name="Default">
      <style:table-cell-properties fo:border-bottom="0.74pt solid #000000" fo:border-left="0.74pt solid #000000" fo:border-right="none" fo:border-top="none"/>
    </style:style>
    <style:style style:name="ce121" style:family="table-cell" style:parent-style-name="Default">
      <style:text-properties style:text-overline-style="solid" style:text-overline-width="auto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74pt solid #000000" fo:border-left="none" fo:border-right="none" fo:border-top="none"/>
    </style:style>
    <style:style style:name="ce23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7" style:family="table-cell" style:parent-style-name="Default">
      <style:table-cell-properties fo:border-bottom="none" fo:border-left="none" fo:border-right="none" fo:border-top="0.74pt solid #000000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194" style:family="table-cell" style:parent-style-name="Default" style:data-style-name="N157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1"/>
    <style:style style:name="ce200" style:family="table-cell" style:parent-style-name="Default" style:data-style-name="N15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AnnexE_DATA.H7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34" style:family="table-cell" style:parent-style-name="Default">
      <style:table-cell-properties fo:border-bottom="none" fo:border-left="none" fo:border-right="0.74pt solid #000000" fo:border-top="none"/>
    </style:style>
    <style:style style:name="ce235" style:family="table-cell" style:parent-style-name="Default">
      <style:table-cell-properties fo:border-bottom="0.74pt solid #000000" fo:border-left="none" fo:border-right="0.74pt solid #000000" fo:border-top="none"/>
    </style:style>
    <style:style style:name="ce123" style:family="table-cell" style:parent-style-name="Default" style:data-style-name="N11">
      <style:text-properties fo:font-weight="bold" style:font-weight-asian="bold" style:font-weight-complex="bold"/>
    </style:style>
    <style:style style:name="ce203" style:family="table-cell" style:parent-style-name="Default" style:data-style-name="N212"/>
    <style:style style:name="ce205" style:family="table-cell" style:parent-style-name="Default" style:data-style-name="N212">
      <style:map style:condition="cell-content()&lt;[.J7]" style:apply-style-name="Good" style:base-cell-address="AnnexE_DATA.K7"/>
    </style:style>
    <style:style style:name="ce268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66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OTTLE 1'.H11"/>
    </style:style>
    <style:style style:name="ce270" style:family="table-cell" style:parent-style-name="Default">
      <style:map style:condition="cell-content()&gt;1000" style:apply-style-name="Good" style:base-cell-address="'6 - BOTTLE 1'.H11"/>
    </style:style>
    <style:style style:name="ce273" style:family="table-cell" style:parent-style-name="Default" style:data-style-name="N212">
      <style:map style:condition="cell-content()&lt;[.J11]" style:apply-style-name="Good" style:base-cell-address="'6 - BOTTLE 1'.K9"/>
    </style:style>
    <style:style style:name="ce275" style:family="table-cell" style:parent-style-name="Default">
      <style:map style:condition="cell-content()&lt;[.J11]" style:apply-style-name="Good" style:base-cell-address="'6 - BOTTLE 1'.K9"/>
    </style:style>
    <style:style style:name="ce280" style:family="table-cell" style:parent-style-name="Default">
      <style:text-properties fo:font-size="32pt" style:font-size-asian="32pt" style:font-size-complex="32pt"/>
    </style:style>
    <style:style style:name="ce55" style:family="table-cell" style:parent-style-name="Default" style:data-style-name="N49"/>
    <style:style style:name="ce28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2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OTTLE 2'.H9"/>
    </style:style>
    <style:style style:name="ce284" style:family="table-cell" style:parent-style-name="Default">
      <style:map style:condition="cell-content()&gt;1000" style:apply-style-name="Good" style:base-cell-address="'6 - BOTTLE 2'.H9"/>
    </style:style>
    <style:style style:name="ce285" style:family="table-cell" style:parent-style-name="Default" style:data-style-name="N212">
      <style:map style:condition="cell-content()&lt;[.J11]" style:apply-style-name="Good" style:base-cell-address="'6 - BOTTLE 2'.K9"/>
    </style:style>
    <style:style style:name="ce287" style:family="table-cell" style:parent-style-name="Default">
      <style:map style:condition="cell-content()&lt;[.J11]" style:apply-style-name="Good" style:base-cell-address="'6 - BOTTLE 2'.K9"/>
    </style:style>
    <style:style style:name="ce286" style:family="table-cell" style:parent-style-name="Default">
      <style:text-properties fo:color="#c9211e" fo:font-size="32pt" style:font-size-asian="32pt" style:font-size-complex="32pt"/>
    </style:style>
    <style:style style:name="ce241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153" style:family="table-cell" style:parent-style-name="Default" style:data-style-name="N11">
      <style:table-cell-properties fo:background-color="#ccf4c6"/>
      <style:map style:condition="cell-content()&lt;[.J50]" style:apply-style-name="Accent" style:base-cell-address="'Clause 6 Sizing Calibration'.J49"/>
    </style:style>
    <style:style style:name="ce101" style:family="table-cell" style:parent-style-name="Default">
      <style:map style:condition="cell-content()=&quot;&lt;3% = PASS&quot;" style:apply-style-name="Good" style:base-cell-address="'Clause 6 Sizing Calibration'.K54"/>
      <style:map style:condition="cell-content()!=&quot;&lt;3% = PASS&quot;" style:apply-style-name="Bad" style:base-cell-address="'Clause 6 Sizing Calibration'.K54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278" style:family="table-cell" style:parent-style-name="Default">
      <style:table-cell-properties style:vertical-align="middle"/>
      <style:text-properties fo:color="#fc5c00" fo:font-size="32pt" fo:font-weight="bold" style:font-size-asian="32pt" style:font-weight-asian="bold" style:font-size-complex="32pt" style:font-weight-complex="bold"/>
    </style:style>
    <style:style style:name="ce11" style:family="table-cell" style:parent-style-name="Default">
      <style:table-cell-properties style:cell-protect="none" style:print-content="true"/>
    </style:style>
    <style:style style:name="ce257" style:family="table-cell" style:parent-style-name="Default">
      <style:table-cell-properties fo:border-bottom="none" style:cell-protect="none" style:print-content="true" fo:border-left="0.74pt solid #000000" fo:border-right="none" fo:border-top="0.74pt solid #000000"/>
    </style:style>
    <style:style style:name="ce258" style:family="table-cell" style:parent-style-name="Default" style:data-style-name="N120">
      <style:table-cell-properties fo:border-bottom="none" style:cell-protect="none" style:print-content="true" fo:border-left="0.74pt solid #000000" fo:border-right="none" fo:border-top="none"/>
    </style:style>
    <style:style style:name="ce259" style:family="table-cell" style:parent-style-name="Default" style:data-style-name="N0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1" style:family="table-cell" style:parent-style-name="Default" style:data-style-name="N2">
      <style:table-cell-properties fo:border-bottom="none" style:cell-protect="none" style:print-content="true" fo:border-left="0.74pt solid #000000" fo:border-right="none" fo:border-top="none"/>
    </style:style>
    <style:style style:name="ce262" style:family="table-cell" style:parent-style-name="Default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3" style:family="table-cell" style:parent-style-name="Default" style:data-style-name="N1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4" style:family="table-cell" style:parent-style-name="Default" style:data-style-name="N157">
      <style:table-cell-properties fo:border-bottom="none" fo:border-left="0.74pt solid #000000" fo:border-right="none" fo:border-top="none"/>
    </style:style>
    <style:style style:name="ce265" style:family="table-cell" style:parent-style-name="Default">
      <style:table-cell-properties fo:border-bottom="none" style:cell-protect="none" style:print-content="true" fo:border-left="none" fo:border-right="none" fo:border-top="0.74pt solid #000000"/>
    </style:style>
    <style:style style:name="ce248" style:family="table-cell" style:parent-style-name="Default">
      <style:table-cell-properties fo:border-bottom="none" fo:border-left="0.74pt solid #000000" fo:border-right="none" fo:border-top="0.74pt solid #000000"/>
      <style:text-properties fo:font-style="italic" style:font-style-asian="italic" style:font-style-complex="italic"/>
    </style:style>
    <style:style style:name="ce249" style:family="table-cell" style:parent-style-name="Default">
      <style:text-properties fo:font-style="italic" style:font-style-asian="italic" style:font-style-complex="italic"/>
    </style:style>
    <style:style style:name="ce250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border-bottom="none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>
      <style:table-cell-properties fo:border-bottom="none" style:cell-protect="none" style:print-content="true" fo:border-left="none" fo:border-right="0.74pt solid #000000" fo:border-top="0.74pt solid #000000"/>
    </style:style>
    <style:style style:name="ce272" style:family="table-cell" style:parent-style-name="Default">
      <style:table-cell-properties fo:border-bottom="none" style:cell-protect="none" style:print-content="true" fo:border-left="none" fo:border-right="0.74pt solid #000000" fo:border-top="none"/>
    </style:style>
    <style:style style:name="ce252" style:family="table-cell" style:parent-style-name="Default">
      <style:table-cell-properties fo:border-bottom="none" fo:border-left="none" fo:border-right="0.74pt solid #000000" fo:border-top="0.74pt solid #000000"/>
      <style:text-properties fo:font-style="italic" style:font-style-asian="italic" style:font-style-complex="italic"/>
    </style:style>
    <style:style style:name="ce274" style:family="table-cell" style:parent-style-name="Default">
      <style:table-cell-properties fo:border-bottom="none" style:cell-protect="none" style:print-content="true" fo:border-left="0.74pt solid #000000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0ee90" fo:wrap-option="wrap" style:vertical-align="middle"/>
    </style:style>
    <style:style style:name="ce9" style:family="table-cell" style:parent-style-name="Default">
      <style:table-cell-properties fo:background-color="#90ee90"/>
    </style:style>
    <style:style style:name="ce160" style:family="table-cell" style:parent-style-name="Default" style:data-style-name="N2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161" style:family="table-cell" style:parent-style-name="Good">
      <style:table-cell-properties fo:wrap-option="wrap" style:vertical-align="middle"/>
    </style:style>
    <style:style style:name="ce52" style:family="table-cell" style:parent-style-name="Default" style:data-style-name="N81">
      <style:table-cell-properties style:cell-protect="none" style:print-content="true"/>
    </style:style>
    <style:style style:name="ce12" style:family="table-cell" style:parent-style-name="Default" style:data-style-name="N80">
      <style:table-cell-properties style:cell-protect="none" style:print-content="true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cell-protect="none" style:print-content="true"/>
    </style:style>
    <style:style style:name="ce14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cell-protect="none" style:print-content="true"/>
    </style:style>
    <style:style style:name="ce168" style:family="table-cell" style:parent-style-name="Default" style:data-style-name="N11">
      <style:map style:condition="cell-content()&lt;0.3" style:apply-style-name="Good" style:base-cell-address="'Annex D Resolution'.A31"/>
    </style:style>
    <style:style style:name="ce169" style:family="table-cell" style:parent-style-name="Default" style:data-style-name="N11">
      <style:map style:condition="cell-content()&lt;0.15" style:apply-style-name="Good" style:base-cell-address="'Annex D Resolution'.A33"/>
    </style:style>
    <style:style style:name="ce171" style:family="table-cell" style:parent-style-name="Good">
      <style:table-cell-properties fo:background-color="transparent"/>
      <style:text-properties style:use-window-font-color="true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75" style:family="table-cell" style:parent-style-name="Default">
      <style:text-properties fo:font-weight="bold" style:font-weight-asian="bold" style:font-weight-complex="bold"/>
      <style:map style:condition="cell-content-is-between([.$J$23],[.$K$23])" style:apply-style-name="Good" style:base-cell-address="'Annex E Verify Counting Accuracy'.A29"/>
    </style:style>
    <style:style style:name="ce32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0.74pt solid #000000" fo:border-left="none" fo:border-right="none" fo:border-top="0.74pt solid #000000"/>
    </style:style>
    <style:style style:name="ce179" style:family="table-cell" style:parent-style-name="Default">
      <style:text-properties fo:font-weight="bold" style:font-weight-asian="bold" style:font-weight-complex="bold"/>
      <style:map style:condition="cell-content-is-between([.$J$25],[.$K$25])" style:apply-style-name="Good" style:base-cell-address="'Annex E Verify Counting Accuracy'.B29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81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Accuracy'.B55"/>
    </style:style>
    <style:style style:name="ce3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3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33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260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34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157">
      <style:table-cell-properties style:diagonal-bl-tr="none" style:diagonal-tl-br="none" fo:border="0.74pt solid #000000" fo:padding="0.071cm" style:rotation-align="none"/>
    </style:style>
    <style:style style:name="ce211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44" style:family="table-cell" style:parent-style-name="Default" style:data-style-name="N157">
      <style:table-cell-properties fo:background-color="#ffff99" style:diagonal-bl-tr="none" style:diagonal-tl-br="none" fo:border="0.74pt solid #000000" fo:padding="0.071cm" style:rotation-align="none"/>
    </style:style>
    <style:style style:name="ce212" style:family="table-cell" style:parent-style-name="Default">
      <style:table-cell-properties fo:background-color="#ffff99" style:diagonal-bl-tr="none" style:diagonal-tl-br="none" fo:border="0.74pt solid #000000" fo:padding="0.071cm" style:rotation-align="none"/>
    </style:style>
    <style:style style:name="ce267" style:family="table-cell" style:parent-style-name="Default" style:data-style-name="N3">
      <style:table-cell-properties fo:padding="0.071cm"/>
    </style:style>
    <style:style style:name="ce209" style:family="table-cell" style:parent-style-name="Default">
      <style:table-cell-properties fo:background-color="#ffffff" style:diagonal-bl-tr="none" style:diagonal-tl-br="none" fo:border="0.74pt solid #000000" fo:padding="0.071cm" style:rotation-align="none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99ccff" style:diagonal-bl-tr="none" style:diagonal-tl-br="none" fo:border="0.74pt solid #000000" fo:padding="0.071cm" style:rotation-align="none"/>
    </style:style>
    <style:style style:name="ce216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</style:style>
    <style:style style:name="ce237" style:family="table-cell" style:parent-style-name="Default" style:data-style-name="N0"/>
    <style:style style:name="ce35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57">
      <style:table-cell-properties fo:background-color="#cc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ackground-color="#cc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 style:data-style-name="N1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fo:color="#333333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 style:data-style-name="N1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Default">
      <style:graphic-properties draw:stroke="none" svg:stroke-color="#000000" draw:fill="none" draw:fill-color="#ffffff" fo:min-height="5.432cm" loext:decorative="false"/>
      <style:paragraph-properties style:writing-mode="lr-tb"/>
      <style:text-properties style:font-name="Calibri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  <style:text-properties style:font-name="Calibri"/>
    </style:style>
    <style:style style:name="P1" style:family="paragraph">
      <loext:graphic-properties draw:fill="none" draw:fill-color="#ffffff"/>
      <style:text-properties style:font-name="Calibri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8% 58%"/>
    </style:style>
    <style:style style:name="T8" style:family="text">
      <style:text-properties fo:font-weight="bold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14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6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-8% 58%"/>
    </style:style>
    <style:style style:name="T17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ISO 11171_2020 Summary" table:style-name="ta1" table:print-ranges="'ISO 11171_2020 Summary'.A1:'ISO 11171_2020 Summary'.C18">
        <table:table-column table:style-name="co1" table:default-cell-style-name="ce25"/>
        <table:table-column table:style-name="co2" table:default-cell-style-name="Default"/>
        <table:table-column table:style-name="co3" table:default-cell-style-name="ce25"/>
        <table:table-column table:style-name="co4" table:number-columns-repeated="1021" table:default-cell-style-name="Default"/>
        <table:table-row table:style-name="ro1">
          <table:table-cell table:style-name="ce10" office:value-type="string" calcext:value-type="string">
            <text:p>ISO 11171:2020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23" office:value-type="string" calcext:value-type="string">
            <text:p>Requirement</text:p>
          </table:table-cell>
          <table:table-cell table:style-name="ce26" office:value-type="string" calcext:value-type="string">
            <text:p>Material</text:p>
          </table:table-cell>
          <table:table-cell table:style-name="ce23" office:value-type="string" calcext:value-type="string">
            <text:p>Reference</text:p>
          </table:table-cell>
          <table:table-cell table:style-name="ce28" table:number-columns-repeated="1021"/>
        </table:table-row>
        <table:table-row table:style-name="ro3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>
            <text:p>Clause 6. Sizing Calibration. 3 separate bottles, 5 sub-samples from each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v<text:span text:style-name="T3">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Δ<text:span text:style-name="T3">COUNTS_4um</text:span> &lt; 5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table-cell table:style-name="ce27" table:number-columns-repeated="1021"/>
        </table:table-row>
        <table:table-row table:style-name="ro3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 1mg/l</text:p>
          </table:table-cell>
          <table:table-cell table:style-name="ce24" office:value-type="string" calcext:value-type="string">
            <text:p>Annex E – particle counting accuracy. Ensure RM8632x counts in permitted range.</text:p>
          </table:table-cell>
          <table:table-cell table:style-name="ce27" table:number-columns-repeated="1021"/>
        </table:table-row>
        <table:table-row table:style-name="ro2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2">
          <table:table-cell table:style-name="ce24"/>
          <table:table-cell/>
          <table:table-cell table:style-name="Default"/>
          <table:table-cell table:style-name="ce27" table:number-columns-repeated="1021"/>
        </table:table-row>
        <table:table-row table:style-name="ro2" table:number-rows-repeated="8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ticle Counter" table:style-name="ta1">
        <table:table-column table:style-name="co4" table:number-columns-repeated="5" table:default-cell-style-name="Default"/>
        <table:table-row table:style-name="ro2" table:number-rows-repeated="9">
          <table:table-cell table:number-columns-repeated="5"/>
        </table:table-row>
        <table:table-row table:style-name="ro2">
          <table:table-cell office:value-type="string" calcext:value-type="string">
            <text:p>Boxcar_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l/min</text:p>
          </table:table-cell>
        </table:table-row>
        <table:table-row table:style-name="ro2">
          <table:table-cell office:value-type="string" calcext:value-type="string">
            <text:p>Detection Threshol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U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nnex A Preliminary Check" table:style-name="ta1">
        <table:shapes>
          <draw:frame draw:z-index="1" draw:name="Text Frame 2" draw:style-name="gr1" draw:text-style-name="P1" svg:width="11.315cm" svg:height="5.432cm" svg:x="25.55cm" svg:y="4.023cm">
            <draw:text-box>
              <text:p><text:span text:style-name="T1">Used microbalance to weigh 10ml sample of fluid, added using precision digital pipette. Added 10x 10ml I total to plastic sample bottle and weighed result (after taring empty bottle weight).</text:span></text:p>
              <text:p><text:span text:style-name="T1"/></text:p>
              <text:p><text:span text:style-name="T1">Used bottle sampler to sample 15ml pumped flush + 40ml pumped sample.</text:span></text:p>
              <text:p><text:span text:style-name="T1"/></text:p>
              <text:p><text:span text:style-name="T1">Measured final weight of bottle+remaining fluid.</text:span></text:p>
              <text:p><text:span text:style-name="T1"/></text:p>
            </draw:text-box>
          </draw:frame>
        </table:shapes>
        <table:table-column table:style-name="co4" table:default-cell-style-name="ce33"/>
        <table:table-column table:style-name="co5" table:default-cell-style-name="ce33"/>
        <table:table-column table:style-name="co4" table:number-columns-repeated="13" table:default-cell-style-name="ce33"/>
        <table:table-column table:style-name="co4" table:number-columns-repeated="7" table:default-cell-style-name="Default"/>
        <table:table-row table:style-name="ro5">
          <table:table-cell table:style-name="ce29" office:value-type="string" calcext:value-type="string">
            <text:p>Cv<text:span text:style-name="T3">4um</text:span> &lt; 3%</text:p>
          </table:table-cell>
          <table:table-cell table:style-name="ce35" office:value-type="string" calcext:value-type="string">
            <text:p>RM8632x</text:p>
          </table:table-cell>
          <table:table-cell table:style-name="ce36" office:value-type="string" calcext:value-type="string" table:number-columns-spanned="8" table:number-rows-spanned="1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 and a concentration of 25% of coincidence limit.</text:p>
          </table:table-cell>
          <table:covered-table-cell table:number-columns-repeated="7"/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6">
          <table:table-cell table:style-name="ce34" office:value-type="string" calcext:value-type="string">
            <text:p>Analysis using Calibration Rig and RM8632a</text:p>
          </table:table-cell>
          <table:table-cell table:number-columns-repeated="5"/>
          <table:table-cell table:style-name="ce34" office:value-type="string" calcext:value-type="string">
            <text:p>Analysis using Bottle Sampler and MTD</text:p>
          </table:table-cell>
          <table:table-cell table:number-columns-repeated="4"/>
          <table:table-cell table:style-name="ce34" office:value-type="string" calcext:value-type="string">
            <text:p>Volumetric Sampling Accuracy</text:p>
          </table:table-cell>
          <table:table-cell table:number-columns-repeated="6"/>
          <table:table-cell table:style-name="ce28" office:value-type="string" calcext:value-type="string">
            <text:p>Capture Fraction</text:p>
          </table:table-cell>
          <table:table-cell table:number-columns-repeated="3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alibration Rig</text:p>
          </table:table-cell>
          <table:table-cell table:number-columns-repeated="5"/>
          <table:table-cell table:style-name="ce78" office:value-type="string" calcext:value-type="string">
            <text:p>Bottle Sampler</text:p>
          </table:table-cell>
          <table:table-cell table:number-columns-repeated="2"/>
          <table:table-cell table:style-name="ce37" office:value-type="string" calcext:value-type="string">
            <text:p>BS-500 #BS0707</text:p>
          </table:table-cell>
          <table:table-cell table:number-columns-repeated="8"/>
          <table:table-cell office:value-type="string" calcext:value-type="string">
            <text:p>Concentrate</text:p>
          </table:table-cell>
          <table:table-cell/>
          <table:table-cell table:style-name="ce97" office:value-type="float" office:value="253330" calcext:value-type="float">
            <text:p>253330</text:p>
          </table:table-cell>
          <table:table-cell office:value-type="string" calcext:value-type="string">
            <text:p>/ml</text:p>
          </table:table-cell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 Reference Counter</text:p>
          </table:table-cell>
          <table:table-cell table:number-columns-repeated="2"/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 Reference Counter</text:p>
          </table:table-cell>
          <table:table-cell table:number-columns-repeated="8"/>
          <table:table-cell office:value-type="string" calcext:value-type="string">
            <text:p>Diluent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office:value-type="float" office:value="61110029" calcext:value-type="float">
            <text:p>61110029</text:p>
          </table:table-cell>
          <table:table-cell table:number-columns-repeated="2"/>
          <table:table-cell office:value-type="string" calcext:value-type="string">
            <text:p>APC S/N</text:p>
          </table:table-cell>
          <table:table-cell table:number-columns-repeated="2"/>
          <table:table-cell office:value-type="float" office:value="61110029" calcext:value-type="float">
            <text:p>61110029</text:p>
          </table:table-cell>
          <table:table-cell table:number-columns-repeated="8"/>
          <table:table-cell office:value-type="string" calcext:value-type="string">
            <text:p>Adde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Reference Counter</text:p>
          </table:table-cell>
          <table:table-cell table:number-columns-repeated="2"/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Reference Counter</text:p>
          </table:table-cell>
          <table:table-cell table:number-columns-repeated="8"/>
          <table:table-cell office:value-type="string" calcext:value-type="string">
            <text:p>Final Concentration</text:p>
          </table:table-cell>
          <table:table-cell/>
          <table:table-cell table:formula="of:=[.U7]/([.U7]+[.U6])*[.U5]" office:value-type="float" office:value="5066.6" calcext:value-type="float">
            <text:p>5066.6</text:p>
          </table:table-cell>
          <table:table-cell office:value-type="string" calcext:value-type="string">
            <text:p>/ml</text:p>
          </table:table-cell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office:value-type="float" office:value="61110029" calcext:value-type="float">
            <text:p>61110029</text:p>
          </table:table-cell>
          <table:table-cell table:number-columns-repeated="2"/>
          <table:table-cell office:value-type="string" calcext:value-type="string">
            <text:p>Sensor S/N</text:p>
          </table:table-cell>
          <table:table-cell table:number-columns-repeated="2"/>
          <table:table-cell table:style-name="ce37"/>
          <table:table-cell table:number-columns-repeated="12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46" office:value-type="date" office:date-value="2025-01-25" calcext:value-type="date">
            <text:p>2025-01-25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number-columns-repeated="2"/>
          <table:table-cell table:style-name="ce46" office:value-type="date" office:date-value="2025-02-24" calcext:value-type="date">
            <text:p>2025-02-2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 table:number-columns-repeated="2"/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 table:number-columns-repeated="8"/>
          <table:table-cell office:value-type="string" calcext:value-type="string">
            <text:p>counted</text:p>
          </table:table-cell>
          <table:table-cell/>
          <table:table-cell office:value-type="float" office:value="4651" calcext:value-type="float">
            <text:p>4651</text:p>
          </table:table-cell>
          <table:table-cell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135" calcext:value-type="float">
            <text:p>135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7"/>
          <table:table-cell table:number-columns-repeated="5"/>
          <table:table-cell table:style-name="ce37"/>
          <table:table-cell table:number-columns-repeated="12"/>
        </table:table-row>
        <table:table-row table:style-name="ro2">
          <table:table-cell office:value-type="string" calcext:value-type="string">
            <text:p>4um(c) Coincidence Limit /ml</text:p>
          </table:table-cell>
          <table:table-cell table:number-columns-repeated="2"/>
          <table:table-cell table:style-name="ce37" office:value-type="float" office:value="40000" calcext:value-type="float">
            <text:p>40000</text:p>
          </table:table-cell>
          <table:table-cell table:number-columns-repeated="5"/>
          <table:table-cell table:style-name="ce37"/>
          <table:table-cell table:number-columns-repeated="12"/>
        </table:table-row>
        <table:table-row table:style-name="ro2">
          <table:table-cell office:value-type="string" calcext:value-type="string">
            <text:p>A.1 RM8632 4um count/mg/l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table:number-columns-repeated="2"/>
          <table:table-cell office:value-type="string" calcext:value-type="string">
            <text:p>MTD mg/l</text:p>
          </table:table-cell>
          <table:table-cell table:number-columns-repeated="2"/>
          <table:table-cell office:value-type="float" office:value="5.442" calcext:value-type="float">
            <text:p>5.44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M8632x mg/l at 25% coincidence limit</text:p>
          </table:table-cell>
          <table:table-cell table:number-columns-repeated="2"/>
          <table:table-cell table:style-name="ce57" table:formula="of:=[.D14]/[.D15]*0.25" office:value-type="float" office:value="1.58730158730159" calcext:value-type="float">
            <text:p>1.587</text:p>
          </table:table-cell>
          <table:table-cell table:number-columns-repeated="5"/>
          <table:table-cell table:style-name="ce57"/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9"/>
          <table:table-cell table:style-name="ce78" office:value-type="string" calcext:value-type="string">
            <text:p>10ml samples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 table:number-columns-repeated="4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46" office:value-type="date" office:date-value="2025-03-10" calcext:value-type="date">
            <text:p>2025-03-10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string" calcext:value-type="string">
            <text:p>Operator</text:p>
          </table:table-cell>
          <table:table-cell/>
          <table:table-cell table:style-name="ce37" office:value-type="string" calcext:value-type="string">
            <text:p>JMD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1</text:p>
          </table:table-cell>
          <table:table-cell table:style-name="ce38" office:value-type="float" office:value="845948" calcext:value-type="float">
            <text:p>845948</text:p>
          </table:table-cell>
          <table:table-cell table:style-name="ce44" table:formula="of:=([.C21]-[.$C$27])/[.$C$27]" office:value-type="percentage" office:value="0.00821495415319522" calcext:value-type="percentage">
            <text:p>0.82%</text:p>
          </table:table-cell>
          <table:table-cell table:number-columns-repeated="3"/>
          <table:table-cell office:value-type="string" calcext:value-type="string">
            <text:p>Portion 1</text:p>
          </table:table-cell>
          <table:table-cell office:value-type="float" office:value="1210363" calcext:value-type="float">
            <text:p>1210363</text:p>
          </table:table-cell>
          <table:table-cell table:style-name="ce44" table:formula="of:=([.I21]-[.I$27])/[.I$27]" office:value-type="percentage" office:value="-0.00754677808546448" calcext:value-type="percentage">
            <text:p>-0.75%</text:p>
          </table:table-cell>
          <table:table-cell/>
          <table:table-cell office:value-type="string" calcext:value-type="string">
            <text:p>Particle Counter</text:p>
          </table:table-cell>
          <table:table-cell/>
          <table:table-cell table:style-name="ce37" office:value-type="float" office:value="61110029" calcext:value-type="float">
            <text:p>6111002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2</text:p>
          </table:table-cell>
          <table:table-cell table:style-name="ce40" office:value-type="float" office:value="835413" calcext:value-type="float">
            <text:p>835413</text:p>
          </table:table-cell>
          <table:table-cell table:style-name="ce44" table:formula="of:=([.C22]-[.$C$27])/[.$C$27]" office:value-type="percentage" office:value="-0.00434083478655511" calcext:value-type="percentage">
            <text:p>-0.43%</text:p>
          </table:table-cell>
          <table:table-cell table:number-columns-repeated="3"/>
          <table:table-cell office:value-type="string" calcext:value-type="string">
            <text:p>Portion 2</text:p>
          </table:table-cell>
          <table:table-cell office:value-type="float" office:value="1210565" calcext:value-type="float">
            <text:p>1210565</text:p>
          </table:table-cell>
          <table:table-cell table:style-name="ce44" table:formula="of:=([.I22]-[.I$27])/[.I$27]" office:value-type="percentage" office:value="-0.00738114550182905" calcext:value-type="percentage">
            <text:p>-0.74%</text:p>
          </table:table-cell>
          <table:table-cell table:number-columns-repeated="3"/>
          <table:table-cell table:style-name="ce37"/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3</text:p>
          </table:table-cell>
          <table:table-cell table:style-name="ce40" office:value-type="float" office:value="848340" calcext:value-type="float">
            <text:p>848340</text:p>
          </table:table-cell>
          <table:table-cell table:style-name="ce44" table:formula="of:=([.C23]-[.$C$27])/[.$C$27]" office:value-type="percentage" office:value="0.0110657797007873" calcext:value-type="percentage">
            <text:p>1.11%</text:p>
          </table:table-cell>
          <table:table-cell table:number-columns-repeated="3"/>
          <table:table-cell office:value-type="string" calcext:value-type="string">
            <text:p>Portion 3</text:p>
          </table:table-cell>
          <table:table-cell office:value-type="float" office:value="1221940" calcext:value-type="float">
            <text:p>1221940</text:p>
          </table:table-cell>
          <table:table-cell table:style-name="ce44" table:formula="of:=([.I23]-[.I$27])/[.I$27]" office:value-type="percentage" office:value="0.00194593686873073" calcext:value-type="percentage">
            <text:p>0.19%</text:p>
          </table:table-cell>
          <table:table-cell/>
          <table:table-cell office:value-type="string" calcext:value-type="string">
            <text:p>MIL5606 Fluid</text:p>
          </table:table-cell>
          <table:table-cell/>
          <table:table-cell table:style-name="ce37"/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4</text:p>
          </table:table-cell>
          <table:table-cell table:style-name="ce40" office:value-type="float" office:value="830302" calcext:value-type="float">
            <text:p>830302</text:p>
          </table:table-cell>
          <table:table-cell table:style-name="ce44" table:formula="of:=([.C24]-[.$C$27])/[.$C$27]" office:value-type="percentage" office:value="-0.0104322099428023" calcext:value-type="percentage">
            <text:p>-1.04%</text:p>
          </table:table-cell>
          <table:table-cell table:number-columns-repeated="3"/>
          <table:table-cell office:value-type="string" calcext:value-type="string">
            <text:p>Portion 4</text:p>
          </table:table-cell>
          <table:table-cell office:value-type="float" office:value="1222389" calcext:value-type="float">
            <text:p>1222389</text:p>
          </table:table-cell>
          <table:table-cell table:style-name="ce44" table:formula="of:=([.I24]-[.I$27])/[.I$27]" office:value-type="percentage" office:value="0.00231410038384118" calcext:value-type="percentage">
            <text:p>0.23%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table:style-name="ce37" office:value-type="string" calcext:value-type="string">
            <text:p>40'C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ortion 5</text:p>
          </table:table-cell>
          <table:table-cell table:style-name="ce41" office:value-type="float" office:value="835273" calcext:value-type="float">
            <text:p>835273</text:p>
          </table:table-cell>
          <table:table-cell table:style-name="ce44" table:formula="of:=([.C25]-[.$C$27])/[.$C$27]" office:value-type="percentage" office:value="-0.00450768912462488" calcext:value-type="percentage">
            <text:p>-0.45%</text:p>
          </table:table-cell>
          <table:table-cell table:number-columns-repeated="3"/>
          <table:table-cell office:value-type="string" calcext:value-type="string">
            <text:p>Portion 5</text:p>
          </table:table-cell>
          <table:table-cell office:value-type="float" office:value="1232577" calcext:value-type="float">
            <text:p>1232577</text:p>
          </table:table-cell>
          <table:table-cell table:style-name="ce44" table:formula="of:=([.I25]-[.I$27])/[.I$27]" office:value-type="percentage" office:value="0.0106678863347214" calcext:value-type="percentage">
            <text:p>1.07%</text:p>
          </table:table-cell>
          <table:table-cell/>
          <table:table-cell office:value-type="string" calcext:value-type="string">
            <text:p>10ml Weight</text:p>
          </table:table-cell>
          <table:table-cell/>
          <table:table-cell table:style-name="ce82" office:value-type="float" office:value="8.419" calcext:value-type="float">
            <text:p>8.42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string" calcext:value-type="string">
            <text:p>After 100ml</text:p>
          </table:table-cell>
          <table:table-cell/>
          <table:table-cell table:style-name="ce82" office:value-type="float" office:value="86.379" calcext:value-type="float">
            <text:p>86.3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2" table:formula="of:=AVERAGE([.C21:.C25])" office:value-type="float" office:value="839055.2" calcext:value-type="float">
            <text:p>839055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style-name="ce42" table:formula="of:=AVERAGE([.I21:.I25])" office:value-type="float" office:value="1219566.8" calcext:value-type="float">
            <text:p>1219567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ample StdDev</text:p>
          </table:table-cell>
          <table:table-cell table:style-name="ce42" table:formula="of:=STDEVP([.C21:.C25])" office:value-type="float" office:value="6897.93260042457" calcext:value-type="float">
            <text:p>6898</text:p>
          </table:table-cell>
          <table:table-cell table:number-columns-repeated="4"/>
          <table:table-cell office:value-type="string" calcext:value-type="string">
            <text:p>Sample StdDev</text:p>
          </table:table-cell>
          <table:table-cell table:style-name="ce42" table:formula="of:=STDEVP([.I21:.I25])" office:value-type="float" office:value="8349.90458388598" calcext:value-type="float">
            <text:p>8350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2">
            <draw:frame draw:z-index="0" draw:name="Image 3" draw:style-name="gr2" draw:text-style-name="P2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42"/>
          <table:table-cell table:number-columns-repeated="2"/>
          <table:table-cell office:value-type="string" calcext:value-type="string">
            <text:p>Total Fluid</text:p>
          </table:table-cell>
          <table:table-cell/>
          <table:table-cell table:style-name="ce37" table:formula="of:=[.N27]+[.N28]" office:value-type="float" office:value="55" calcext:value-type="float">
            <text:p>55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7">
          <table:table-cell table:number-columns-repeated="11"/>
          <table:table-cell office:value-type="string" calcext:value-type="string">
            <text:p>Final Weight</text:p>
          </table:table-cell>
          <table:table-cell/>
          <table:table-cell table:style-name="ce82" office:value-type="float" office:value="39.51" calcext:value-type="float">
            <text:p>39.51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  <table:table-cell office:value-type="string" calcext:value-type="string">
            <text:p>Fluid Weight Taken</text:p>
          </table:table-cell>
          <table:table-cell/>
          <table:table-cell table:style-name="ce82" table:formula="of:=[.N26]-[.N30]" office:value-type="float" office:value="46.869" calcext:value-type="float">
            <text:p>46.87</text:p>
          </table:table-cell>
          <table:table-cell table:number-columns-repeated="8"/>
        </table:table-row>
        <table:table-row table:style-name="ro2">
          <table:table-cell table:number-columns-repeated="11"/>
          <table:table-cell table:style-name="ce80" office:value-type="string" calcext:value-type="string">
            <text:p>ml taken</text:p>
          </table:table-cell>
          <table:table-cell table:style-name="ce81"/>
          <table:table-cell table:style-name="ce83" table:formula="of:=[.N31]/[.N25]*10" office:value-type="float" office:value="55.6705071861266" calcext:value-type="float">
            <text:p>55.67</text:p>
          </table:table-cell>
          <table:table-cell table:number-columns-repeated="8"/>
        </table:table-row>
        <table:table-row table:style-name="ro2">
          <table:table-cell table:number-columns-repeated="13"/>
          <table:table-cell table:style-name="ce37"/>
          <table:table-cell table:number-columns-repeated="8"/>
        </table:table-row>
        <table:table-row table:style-name="ro2">
          <table:table-cell table:number-columns-repeated="11"/>
          <table:table-cell office:value-type="string" calcext:value-type="string">
            <text:p>Error</text:p>
          </table:table-cell>
          <table:table-cell/>
          <table:table-cell table:style-name="ce84" table:formula="of:=[.N32]/[.N29]-1" office:value-type="percentage" office:value="0.0121910397477569" calcext:value-type="percentage">
            <text:p>1.22%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V<text:span text:style-name="T7">VOL</text:span></text:p>
          </table:table-cell>
          <table:table-cell table:style-name="ce45" table:formula="of:=[.C28]/[.C27]" office:value-type="percentage" office:value="0.00822107127209815" calcext:value-type="percentage">
            <text:p>0.82%</text:p>
          </table:table-cell>
          <table:table-cell table:style-name="ce77" table:formula="of:=IF([.C35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3"/>
          <table:table-cell office:value-type="string" calcext:value-type="string">
            <text:p>CV<text:span text:style-name="T7">VOL</text:span></text:p>
          </table:table-cell>
          <table:table-cell table:style-name="ce44" table:formula="of:=[.I28]/[.I27]" office:value-type="percentage" office:value="0.00684661519474454" calcext:value-type="percentage">
            <text:p>0.68%</text:p>
          </table:table-cell>
          <table:table-cell table:style-name="ce79" table:formula="of:=IF([.I35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2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8"/>
          <table:table-cell table:style-name="ce37" office:value-type="string" calcext:value-type="string">
            <text:p>&gt;4μm(c)/100ml</text:p>
          </table:table-cell>
          <table:table-cell table:number-columns-repeated="13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office:value-type="float" office:value="1228768" calcext:value-type="float">
            <text:p>1228768</text:p>
          </table:table-cell>
          <table:table-cell table:style-name="ce44" table:formula="of:=([.I40]-[.I$27])/[.I$27]" office:value-type="percentage" office:value="0.00754464618092257" calcext:value-type="percentage">
            <text:p>0.75%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float" office:value="1235654" calcext:value-type="float">
            <text:p>1235654</text:p>
          </table:table-cell>
          <table:table-cell table:style-name="ce44" table:formula="of:=([.I41]-[.I$27])/[.I$27]" office:value-type="percentage" office:value="0.0131909133636632" calcext:value-type="percentage">
            <text:p>1.32%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float" office:value="1231619" calcext:value-type="float">
            <text:p>1231619</text:p>
          </table:table-cell>
          <table:table-cell table:style-name="ce44" table:formula="of:=([.I42]-[.I$27])/[.I$27]" office:value-type="percentage" office:value="0.00988236150738111" calcext:value-type="percentage">
            <text:p>0.99%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float" office:value="1234171" calcext:value-type="float">
            <text:p>1234171</text:p>
          </table:table-cell>
          <table:table-cell table:style-name="ce44" table:formula="of:=([.I43]-[.I$27])/[.I$27]" office:value-type="percentage" office:value="0.0119749078115278" calcext:value-type="percentage">
            <text:p>1.20%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float" office:value="1226577" calcext:value-type="float">
            <text:p>1226577</text:p>
          </table:table-cell>
          <table:table-cell table:style-name="ce44" table:formula="of:=([.I44]-[.I$27])/[.I$27]" office:value-type="percentage" office:value="0.00574810662277782" calcext:value-type="percentage">
            <text:p>0.57%</text:p>
          </table:table-cell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table:style-name="ce42" table:formula="of:=AVERAGE([.I40:.I44])" office:value-type="float" office:value="1231357.8" calcext:value-type="float">
            <text:p>1231358</text:p>
          </table:table-cell>
          <table:table-cell table:number-columns-repeated="13"/>
        </table:table-row>
        <table:table-row table:style-name="ro2">
          <table:table-cell table:number-columns-repeated="8"/>
          <table:table-cell table:style-name="ce42" table:formula="of:=STDEVP([.I40:.I44])" office:value-type="float" office:value="3346.72277907806" calcext:value-type="float">
            <text:p>3347</text:p>
          </table:table-cell>
          <table:table-cell table:number-columns-repeated="13"/>
        </table:table-row>
        <table:table-row table:style-name="ro2">
          <table:table-cell table:number-columns-repeated="8"/>
          <table:table-cell table:style-name="ce42"/>
          <table:table-cell table:number-columns-repeated="13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table:style-name="ce44"/>
          <table:table-cell table:number-columns-repeated="13"/>
        </table:table-row>
        <table:table-row table:style-name="ro2" table:number-rows-repeated="3">
          <table:table-cell table:number-columns-repeated="22"/>
        </table:table-row>
        <table:table-row table:style-name="ro2">
          <table:table-cell table:number-columns-repeated="8"/>
          <table:table-cell table:style-name="ce44" table:formula="of:=[.I47]/[.I46]" office:value-type="percentage" office:value="0.00271791251826079" calcext:value-type="percentage">
            <text:p>0.27%</text:p>
          </table:table-cell>
          <table:table-cell table:style-name="ce79" table:formula="of:=IF([.I54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2"/>
        </table:table-row>
        <calcext:conditional-formats>
          <calcext:conditional-format calcext:target-range-address="'Annex A Preliminary Check'.D35:'Annex A Preliminary Check'.D35 'Annex A Preliminary Check'.J35:'Annex A Preliminary Check'.J35 'Annex A Preliminary Check'.J54:'Annex A Preliminary Check'.J54">
            <calcext:condition calcext:apply-style-name="Good" calcext:value="=&quot;&lt;3% = PASS&quot;" calcext:base-cell-address="'Annex A Preliminary Check'.D35"/>
            <calcext:condition calcext:apply-style-name="Bad" calcext:value="!=&quot;&lt;3% = PASS&quot;" calcext:base-cell-address="'Annex A Preliminary Check'.D35"/>
          </calcext:conditional-format>
          <calcext:conditional-format calcext:target-range-address="'Annex A Preliminary Check'.C35:'Annex A Preliminary Check'.C35 'Annex A Preliminary Check'.J35:'Annex A Preliminary Check'.J35 'Annex A Preliminary Check'.J54:'Annex A Preliminary Check'.J54">
            <calcext:condition calcext:apply-style-name="Good" calcext:value="&lt;0.03" calcext:base-cell-address="'Annex A Preliminary Check'.C35"/>
            <calcext:condition calcext:apply-style-name="Bad" calcext:value="&gt;=0.03" calcext:base-cell-address="'Annex A Preliminary Check'.C35"/>
          </calcext:conditional-format>
        </calcext:conditional-formats>
      </table:table>
      <table:table table:name="Annex B Coincidence Limit" table:style-name="ta1">
        <table:shapes>
          <draw:frame draw:z-index="0" draw:style-name="gr3" draw:text-style-name="P2" svg:width="23.951cm" svg:height="15.239cm" svg:x="0.044cm" svg:y="22.62cm">
            <draw:object draw:notify-on-update-of-ranges="'Annex A Preliminary Check'.E22:'Annex B Coincidence Limit'.E36 'Annex B Coincidence Limit'.L21:'Annex B Coincidence Limit'.L21 'Annex A Preliminary Check'.L22:'Annex B Coincidence Limit'.L36 'Annex B Coincidence Limit'.E22:'Annex B Coincidence Limit'.E36 'Annex B Coincidence Limit'.K21:'Annex B Coincidence Limit'.K21 'Annex B Coincidence Limit'.K22:'Annex B Coincidence Limit'.K36 'Annex B Coincidence Limit'.E22:'Annex B Coincidence Limit'.E36 'Annex B Coincidence Limit'.I20:'Annex B Coincidence Limit'.I20 'Annex B Coincidence Limit'.I22:'Annex B Coincidence Limit'.I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3" draw:text-style-name="P2" svg:width="20.348cm" svg:height="15.238cm" svg:x="24.798cm" svg:y="18.113cm">
            <draw:object draw:notify-on-update-of-ranges="'Annex A Preliminary Check'.I22:'Annex B Coincidence Limit'.I36 'ISO 11171_2020 Summary'.A1:'ISO 11171_2020 Summary'.A1 'Annex A Preliminary Check'.M22:'Annex B Coincidence Limit'.M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name="Text Frame 1" draw:style-name="gr4" draw:text-style-name="P1" svg:width="11.201cm" svg:height="15.848cm" svg:x="31.597cm" svg:y="1.901cm">
            <draw:text-box>
              <text:p><text:span text:style-name="T2">Procedure – Using Calibration Rig</text:span></text:p>
              <text:p><text:span text:style-name="T1"/></text:p>
              <text:p><text:span text:style-name="T1">Make up concentrated suspension of RM8632a such that about 10ml of concentrate increases the tank contamination level by 10% of the estimated coincidence limit. Use the calculator in this worksheet to establish and record mass of dust and fluid volumes.</text:span></text:p>
              <text:p><text:span text:style-name="T1"/></text:p>
              <text:p><text:span text:style-name="T1">Add successive doses of concentrate, performing flushing and 5-portion tests after each one.</text:span></text:p>
              <text:p><text:span text:style-name="T1"/></text:p>
              <text:p><text:span text:style-name="T1">When the results have stabilized after each addition, record the most recent tests. We are only interested in the 4μm <text:s/>channel counts for this process.</text:span></text:p>
              <text:p><text:span text:style-name="T1"/></text:p>
              <text:p><text:span text:style-name="T1">The optimum flush / stabilization time can be judged by continuously testing and observing the counts. This was about 2 minutes flushing after dosing then perform two 5-portion tests.</text:span></text:p>
              <text:p><text:span text:style-name="T1"/></text:p>
              <text:p><text:span text:style-name="T1">The results are then imported into this spreadsheet and the portions averaged for each dose level.</text:span></text:p>
              <text:p><text:span text:style-name="T1"/></text:p>
              <text:p><text:span text:style-name="T1">The averages are entered into the table as well as the added ml of concentrate for each dose.</text:span></text:p>
              <text:p><text:span text:style-name="T1"/></text:p>
              <text:p><text:span text:style-name="T1">The counts are plotted in the figure and the first 4 results (10,20,30,40% nominal coincidence limit) used to generate a linear regression line.</text:span></text:p>
              <text:p><text:span text:style-name="T1"/></text:p>
              <text:p><text:span text:style-name="T1"/></text:p>
            </draw:text-box>
          </draw:frame>
        </table:shapes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default-cell-style-name="ce20"/>
        <table:table-column table:style-name="co4" table:default-cell-style-name="ce76"/>
        <table:table-column table:style-name="co4" table:number-columns-repeated="16361" table:default-cell-style-name="Default"/>
        <table:table-row table:style-name="ro8">
          <table:table-cell table:style-name="ce99" office:value-type="string" calcext:value-type="string">
            <text:p>Δ<text:span text:style-name="T3">COUNTS_4um</text:span> &lt; 5%</text:p>
          </table:table-cell>
          <table:table-cell table:style-name="ce108" office:value-type="string" calcext:value-type="string">
            <text:p>RM8632x</text:p>
          </table:table-cell>
          <table:table-cell table:style-name="ce99" office:value-type="string" calcext:value-type="string" table:number-columns-spanned="10" table:number-rows-spanned="1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08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21"/>
          <table:table-cell table:style-name="ce27" table:number-columns-repeated="865"/>
          <table:table-cell table:number-columns-repeated="15375"/>
        </table:table-row>
        <table:table-row table:style-name="ro2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7"/>
          <table:table-cell table:style-name="ce28" office:value-type="string" calcext:value-type="string">
            <text:p>portion</text:p>
          </table:table-cell>
          <table:table-cell table:style-name="ce28"/>
          <table:table-cell table:style-name="Default"/>
          <table:table-cell table:number-columns-repeated="16361"/>
        </table:table-row>
        <table:table-row table:style-name="ro2">
          <table:table-cell table:number-columns-repeated="20"/>
          <table:table-cell table:style-name="ce28" office:value-type="string" calcext:value-type="string">
            <text:p>counts</text:p>
          </table:table-cell>
          <table:table-cell table:style-name="ce28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office:value-type="string" calcext:value-type="string">
            <text:p>D<text:span text:style-name="T7">Q</text:span></text:p>
          </table:table-cell>
          <table:table-cell table:number-columns-repeated="16360"/>
        </table:table-row>
        <table:table-row table:style-name="ro2">
          <table:table-cell table:number-columns-repeated="20"/>
          <table:table-cell office:value-type="float" office:value="167569" calcext:value-type="float">
            <text:p>167569</text:p>
          </table:table-cell>
          <table:table-cell table:style-name="ce27"/>
          <table:table-cell table:style-name="Default"/>
          <table:table-cell table:number-columns-repeated="16361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17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16361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7"/>
          <table:table-cell office:value-type="float" office:value="169243" calcext:value-type="float">
            <text:p>169243</text:p>
          </table:table-cell>
          <table:table-cell table:formula="of:=SUM([.U5:.U7])/3" office:value-type="float" office:value="168739.666666667" calcext:value-type="float">
            <text:p>168740</text:p>
          </table:table-cell>
          <table:table-cell table:formula="of:=(MAX([.U5:.U6])-MIN([.U5:.U6]))/[.V7]*100" office:value-type="float" office:value="1.0892518850537" calcext:value-type="float">
            <text:p>1.1</text:p>
          </table:table-cell>
          <table:table-cell table:number-columns-repeated="16361"/>
        </table:table-row>
        <table:table-row table:style-name="ro2">
          <table:table-cell office:value-type="float" office:value="10900" calcext:value-type="float">
            <text:p>109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17"/>
          <table:table-cell office:value-type="float" office:value="292859" calcext:value-type="float">
            <text:p>292859</text:p>
          </table:table-cell>
          <table:table-cell table:number-columns-repeated="16363"/>
        </table:table-row>
        <table:table-row table:style-name="ro2">
          <table:table-cell table:formula="of:=[.A8]/10" office:value-type="float" office:value="1090" calcext:value-type="float">
            <text:p>109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7"/>
          <table:table-cell office:value-type="float" office:value="301110" calcext:value-type="float">
            <text:p>301110</text:p>
          </table:table-cell>
          <table:table-cell table:number-columns-repeated="16363"/>
        </table:table-row>
        <table:table-row table:style-name="ro2">
          <table:table-cell table:style-name="ce32" table:formula="of:=[.A9]/[.A6]*[.A7]" office:value-type="float" office:value="2.11079365079365" calcext:value-type="float">
            <text:p>2.1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17"/>
          <table:table-cell office:value-type="float" office:value="299624" calcext:value-type="float">
            <text:p>299624</text:p>
          </table:table-cell>
          <table:table-cell table:number-columns-repeated="16363"/>
        </table:table-row>
        <table:table-row table:style-name="ro2">
          <table:table-cell table:style-name="ce53" table:formula="of:=[.A10]*100" office:value-type="float" office:value="211.079365079365" calcext:value-type="float">
            <text:p>211.0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17"/>
          <table:table-cell office:value-type="float" office:value="285382" calcext:value-type="float">
            <text:p>285382</text:p>
          </table:table-cell>
          <table:table-cell table:formula="of:=SUM([.U8:.U11])/4" office:value-type="float" office:value="294743.75" calcext:value-type="float">
            <text:p>294744</text:p>
          </table:table-cell>
          <table:table-cell table:formula="of:=(MAX([.U8:.U10])-MIN([.U8:.U10]))/[.V11]*100" office:value-type="float" office:value="2.7993808180835" calcext:value-type="float">
            <text:p>2.8</text:p>
          </table:table-cell>
          <table:table-cell table:number-columns-repeated="1636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17"/>
          <table:table-cell office:value-type="float" office:value="458207" calcext:value-type="float">
            <text:p>458207</text:p>
          </table:table-cell>
          <table:table-cell table:number-columns-repeated="16363"/>
        </table:table-row>
        <table:table-row table:style-name="ro2">
          <table:table-cell table:style-name="ce53" table:formula="of:=[.A11]*[.A12]/1000" office:value-type="float" office:value="63.3238095238095" calcext:value-type="float">
            <text:p>63.3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17"/>
          <table:table-cell office:value-type="float" office:value="465138" calcext:value-type="float">
            <text:p>465138</text:p>
          </table:table-cell>
          <table:table-cell table:number-columns-repeated="16363"/>
        </table:table-row>
        <table:table-row table:style-name="ro2">
          <table:table-cell office:value-type="float" office:value="66.07" calcext:value-type="float">
            <text:p>66.0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17"/>
          <table:table-cell office:value-type="float" office:value="454200" calcext:value-type="float">
            <text:p>454200</text:p>
          </table:table-cell>
          <table:table-cell table:number-columns-repeated="16363"/>
        </table:table-row>
        <table:table-row table:style-name="ro2">
          <table:table-cell table:style-name="ce53" table:formula="of:=[.A11]*[.A14]/[.A13]" office:value-type="float" office:value="220.233333333333" calcext:value-type="float">
            <text:p>220.23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17"/>
          <table:table-cell office:value-type="float" office:value="445750" calcext:value-type="float">
            <text:p>445750</text:p>
          </table:table-cell>
          <table:table-cell table:number-columns-repeated="16363"/>
        </table:table-row>
        <table:table-row table:style-name="ro2">
          <table:table-cell table:style-name="ce53" table:formula="of:=[.A13]/[.A14]*10" office:value-type="float" office:value="9.58435137336303" calcext:value-type="float">
            <text:p>9.58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17"/>
          <table:table-cell office:value-type="float" office:value="443747" calcext:value-type="float">
            <text:p>44374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453143" calcext:value-type="float">
            <text:p>453143</text:p>
          </table:table-cell>
          <table:table-cell table:number-columns-repeated="988"/>
          <table:table-cell table:style-name="ce28" table:number-columns-repeated="15375"/>
        </table:table-row>
        <table:table-row table:style-name="ro2"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17"/>
          <table:table-cell office:value-type="float" office:value="436276" calcext:value-type="float">
            <text:p>436276</text:p>
          </table:table-cell>
          <table:table-cell table:number-columns-repeated="16363"/>
        </table:table-row>
        <table:table-row table:style-name="ro2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17"/>
          <table:table-cell office:value-type="float" office:value="454474" calcext:value-type="float">
            <text:p>454474</text:p>
          </table:table-cell>
          <table:table-cell table:number-columns-repeated="16363"/>
        </table:table-row>
        <table:table-row table:style-name="ro2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125" office:value-type="string" calcext:value-type="string">
            <text:p>Expected</text:p>
          </table:table-cell>
          <table:table-cell table:style-name="ce145" office:value-type="string" calcext:value-type="string">
            <text:p>4μm</text:p>
          </table:table-cell>
          <table:table-cell table:style-name="ce125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128" office:value-type="string" calcext:value-type="string">
            <text:p>Relative</text:p>
          </table:table-cell>
          <table:table-cell table:style-name="ce48" table:number-columns-repeated="2"/>
          <table:table-cell table:style-name="ce128" office:value-type="string" calcext:value-type="string">
            <text:p>corrected</text:p>
          </table:table-cell>
          <table:table-cell table:number-columns-repeated="7"/>
          <table:table-cell office:value-type="float" office:value="454993" calcext:value-type="float">
            <text:p>454993</text:p>
          </table:table-cell>
          <table:table-cell table:number-columns-repeated="16363"/>
        </table:table-row>
        <table:table-row table:style-name="ro2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126" office:value-type="string" calcext:value-type="string">
            <text:p>4μm/100ml</text:p>
          </table:table-cell>
          <table:table-cell table:style-name="ce146" office:value-type="string" calcext:value-type="string">
            <text:p>Actual</text:p>
          </table:table-cell>
          <table:table-cell table:style-name="ce126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12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unts</text:p>
          </table:table-cell>
          <table:table-cell table:style-name="ce129" office:value-type="string" calcext:value-type="string">
            <text:p>fraction</text:p>
          </table:table-cell>
          <table:table-cell table:number-columns-repeated="7"/>
          <table:table-cell office:value-type="float" office:value="462615" calcext:value-type="float">
            <text:p>462615</text:p>
          </table:table-cell>
          <table:table-cell table:formula="of:=SUM([.U12:.U21])/(17-8+1)" office:value-type="float" office:value="452854.3" calcext:value-type="float">
            <text:p>452854</text:p>
          </table:table-cell>
          <table:table-cell table:formula="of:=(MAX([.U12:.U20])-MIN([.U12:.U20]))/[.V21]*100" office:value-type="float" office:value="6.37335231221168" calcext:value-type="float">
            <text:p>6.4</text:p>
          </table:table-cell>
          <table:table-cell table:number-columns-repeated="16361"/>
        </table:table-row>
        <table:table-row table:style-name="ro2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27"/>
          <table:table-cell table:style-name="ce50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0; [.G22]; [.G22]*(1+[.G22]/[.$A$18]*[.$A$19]))" office:value-type="float" office:value="1.0000001" calcext:value-type="float">
            <text:p>1.000000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7"/>
          <table:table-cell office:value-type="float" office:value="578672" calcext:value-type="float">
            <text:p>578672</text:p>
          </table:table-cell>
          <table:table-cell table:number-columns-repeated="16363"/>
        </table:table-row>
        <table:table-row table:style-name="ro2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0.2" calcext:value-type="float">
            <text:p>10.2</text:p>
          </table:table-cell>
          <table:table-cell table:style-name="ce58" table:formula="of:=[.B23]" office:value-type="float" office:value="10.2" calcext:value-type="float">
            <text:p>10.2</text:p>
          </table:table-cell>
          <table:table-cell table:style-name="ce61" table:formula="of:=[.C23]*[.$A$15]/1000" office:value-type="float" office:value="2.24638" calcext:value-type="float">
            <text:p>2.246</text:p>
          </table:table-cell>
          <table:table-cell table:style-name="ce61" table:formula="of:=[.D23]/([.$A$7]+[.C23]/1000)" office:value-type="float" office:value="0.18397569245385" calcext:value-type="float">
            <text:p>0.184</text:p>
          </table:table-cell>
          <table:table-cell table:style-name="ce134" table:formula="of:=[.$A$6]*[.E23]*100" office:value-type="float" office:value="115904.686245926" calcext:value-type="float">
            <text:p>115905</text:p>
          </table:table-cell>
          <table:table-cell table:style-name="ce147" office:value-type="float" office:value="169243" calcext:value-type="float">
            <text:p>169243</text:p>
          </table:table-cell>
          <table:table-cell table:style-name="ce150" table:formula="of:=[.G23]/[.F23]" office:value-type="float" office:value="1.46019117502205" calcext:value-type="float">
            <text:p>1.46</text:p>
          </table:table-cell>
          <table:table-cell table:style-name="ce64" table:formula="of:=[.E23]*[.$C$99]" office:value-type="float" office:value="154593.286356587" calcext:value-type="float">
            <text:p>154593</text:p>
          </table:table-cell>
          <table:table-cell table:style-name="ce139" table:formula="of:=[.G23]/[.I23]" office:value-type="float" office:value="1.09476293562724" calcext:value-type="float">
            <text:p>1.09</text:p>
          </table:table-cell>
          <table:table-cell table:style-name="ce64" table:formula="of:=[.I23]*0.95" office:value-type="float" office:value="146863.622038757" calcext:value-type="float">
            <text:p>146864</text:p>
          </table:table-cell>
          <table:table-cell table:style-name="ce72" table:formula="of:=IF(0; [.G23]; [.G23]*(1+[.G23]/[.$A$18]*[.$A$19]))" office:value-type="float" office:value="172107.3193049" calcext:value-type="float">
            <text:p>172107.3193049</text:p>
          </table:table-cell>
          <table:table-cell table:style-name="ce149" table:formula="of:=[.L23]/[.I23]" office:value-type="float" office:value="1.11329103197868" calcext:value-type="float">
            <text:p>1.11329103197868</text:p>
          </table:table-cell>
          <table:table-cell table:number-columns-repeated="7"/>
          <table:table-cell office:value-type="float" office:value="581090" calcext:value-type="float">
            <text:p>581090</text:p>
          </table:table-cell>
          <table:table-cell table:number-columns-repeated="16363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3]+[.B24]" office:value-type="float" office:value="20" calcext:value-type="float">
            <text:p>20.0</text:p>
          </table:table-cell>
          <table:table-cell table:style-name="ce61" table:formula="of:=[.C24]*[.$A$15]/1000" office:value-type="float" office:value="4.40466666666667" calcext:value-type="float">
            <text:p>4.405</text:p>
          </table:table-cell>
          <table:table-cell table:style-name="ce61" table:formula="of:=[.D24]/([.$A$7]+[.C24]/1000)" office:value-type="float" office:value="0.360447354064375" calcext:value-type="float">
            <text:p>0.360</text:p>
          </table:table-cell>
          <table:table-cell table:style-name="ce134" table:formula="of:=[.$A$6]*[.E24]*100" office:value-type="float" office:value="227081.833060556" calcext:value-type="float">
            <text:p>227082</text:p>
          </table:table-cell>
          <table:table-cell table:style-name="ce147" office:value-type="float" office:value="294743" calcext:value-type="float">
            <text:p>294743</text:p>
          </table:table-cell>
          <table:table-cell table:style-name="ce150" table:formula="of:=[.G24]/[.F24]" office:value-type="float" office:value="1.29795940092398" calcext:value-type="float">
            <text:p>1.30</text:p>
          </table:table-cell>
          <table:table-cell table:style-name="ce64" table:formula="of:=[.E24]*[.$C$99]" office:value-type="float" office:value="302880.996288821" calcext:value-type="float">
            <text:p>302881</text:p>
          </table:table-cell>
          <table:table-cell table:style-name="ce139" table:formula="of:=[.G24]/[.I24]" office:value-type="float" office:value="0.973131373745677" calcext:value-type="float">
            <text:p>0.97</text:p>
          </table:table-cell>
          <table:table-cell table:style-name="ce64" table:formula="of:=[.I24]*0.95" office:value-type="float" office:value="287736.94647438" calcext:value-type="float">
            <text:p>287737</text:p>
          </table:table-cell>
          <table:table-cell table:style-name="ce72" table:formula="of:=IF(0; [.G24]; [.G24]*(1+[.G24]/[.$A$18]*[.$A$19]))" office:value-type="float" office:value="303430.3436049" calcext:value-type="float">
            <text:p>303430.3436049</text:p>
          </table:table-cell>
          <table:table-cell table:style-name="ce149" table:formula="of:=[.L24]/[.I24]" office:value-type="float" office:value="1.00181373979487" calcext:value-type="float">
            <text:p>1.00181373979487</text:p>
          </table:table-cell>
          <table:table-cell table:number-columns-repeated="7"/>
          <table:table-cell office:value-type="float" office:value="592101" calcext:value-type="float">
            <text:p>592101</text:p>
          </table:table-cell>
          <table:table-cell table:number-columns-repeated="16363"/>
        </table:table-row>
        <table:table-row table:style-name="ro2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4]+[.B25]" office:value-type="float" office:value="29.8" calcext:value-type="float">
            <text:p>29.8</text:p>
          </table:table-cell>
          <table:table-cell table:style-name="ce61" table:formula="of:=[.C25]*[.$A$15]/1000" office:value-type="float" office:value="6.56295333333333" calcext:value-type="float">
            <text:p>6.563</text:p>
          </table:table-cell>
          <table:table-cell table:style-name="ce61" table:formula="of:=[.D25]/([.$A$7]+[.C25]/1000)" office:value-type="float" office:value="0.536636194650226" calcext:value-type="float">
            <text:p>0.537</text:p>
          </table:table-cell>
          <table:table-cell table:style-name="ce134" table:formula="of:=[.$A$6]*[.E25]*100" office:value-type="float" office:value="338080.802629642" calcext:value-type="float">
            <text:p>338081</text:p>
          </table:table-cell>
          <table:table-cell table:style-name="ce147" office:value-type="float" office:value="452854" calcext:value-type="float">
            <text:p>452854</text:p>
          </table:table-cell>
          <table:table-cell table:style-name="ce150" table:formula="of:=[.G25]/[.F25]" office:value-type="float" office:value="1.33948451517399" calcext:value-type="float">
            <text:p>1.34</text:p>
          </table:table-cell>
          <table:table-cell table:style-name="ce64" table:formula="of:=[.E25]*[.$C$99]" office:value-type="float" office:value="450931.054001505" calcext:value-type="float">
            <text:p>450931</text:p>
          </table:table-cell>
          <table:table-cell table:style-name="ce139" table:formula="of:=[.G25]/[.I25]" office:value-type="float" office:value="1.0042643902686" calcext:value-type="float">
            <text:p>1.00</text:p>
          </table:table-cell>
          <table:table-cell table:style-name="ce64" table:formula="of:=[.I25]*0.95" office:value-type="float" office:value="428384.50130143" calcext:value-type="float">
            <text:p>428385</text:p>
          </table:table-cell>
          <table:table-cell table:style-name="ce72" table:formula="of:=IF(0; [.G25]; [.G25]*(1+[.G25]/[.$A$18]*[.$A$19]))" office:value-type="float" office:value="473361.6745316" calcext:value-type="float">
            <text:p>473361.6745316</text:p>
          </table:table-cell>
          <table:table-cell table:style-name="ce149" table:formula="of:=[.L25]/[.I25]" office:value-type="float" office:value="1.04974290488767" calcext:value-type="float">
            <text:p>1.04974290488767</text:p>
          </table:table-cell>
          <table:table-cell table:number-columns-repeated="7"/>
          <table:table-cell office:value-type="float" office:value="600145" calcext:value-type="float">
            <text:p>600145</text:p>
          </table:table-cell>
          <table:table-cell table:number-columns-repeated="16363"/>
        </table:table-row>
        <table:table-row table:style-name="ro2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5]+[.B26]" office:value-type="float" office:value="39.6" calcext:value-type="float">
            <text:p>39.6</text:p>
          </table:table-cell>
          <table:table-cell table:style-name="ce61" table:formula="of:=[.C26]*[.$A$15]/1000" office:value-type="float" office:value="8.72124" calcext:value-type="float">
            <text:p>8.721</text:p>
          </table:table-cell>
          <table:table-cell table:style-name="ce61" table:formula="of:=[.D26]/([.$A$7]+[.C26]/1000)" office:value-type="float" office:value="0.712542893558613" calcext:value-type="float">
            <text:p>0.713</text:p>
          </table:table-cell>
          <table:table-cell table:style-name="ce134" table:formula="of:=[.$A$6]*[.E26]*100" office:value-type="float" office:value="448902.022941926" calcext:value-type="float">
            <text:p>448902</text:p>
          </table:table-cell>
          <table:table-cell table:style-name="ce147" office:value-type="float" office:value="597630" calcext:value-type="float">
            <text:p>597630</text:p>
          </table:table-cell>
          <table:table-cell table:style-name="ce150" table:formula="of:=[.G26]/[.F26]" office:value-type="float" office:value="1.33131500741157" calcext:value-type="float">
            <text:p>1.33</text:p>
          </table:table-cell>
          <table:table-cell table:style-name="ce64" table:formula="of:=[.E26]*[.$C$99]" office:value-type="float" office:value="598744.030344604" calcext:value-type="float">
            <text:p>598744</text:p>
          </table:table-cell>
          <table:table-cell table:style-name="ce139" table:formula="of:=[.G26]/[.I26]" office:value-type="float" office:value="0.998139387971914" calcext:value-type="float">
            <text:p>1.00</text:p>
          </table:table-cell>
          <table:table-cell table:style-name="ce64" table:formula="of:=[.I26]*0.95" office:value-type="float" office:value="568806.828827374" calcext:value-type="float">
            <text:p>568807</text:p>
          </table:table-cell>
          <table:table-cell table:style-name="ce72" table:formula="of:=IF(0; [.G26]; [.G26]*(1+[.G26]/[.$A$18]*[.$A$19]))" office:value-type="float" office:value="633346.16169" calcext:value-type="float">
            <text:p>633346.16169</text:p>
          </table:table-cell>
          <table:table-cell table:style-name="ce149" table:formula="of:=[.L26]/[.I26]" office:value-type="float" office:value="1.05779119221528" calcext:value-type="float">
            <text:p>1.05779119221528</text:p>
          </table:table-cell>
          <table:table-cell table:number-columns-repeated="2"/>
          <table:table-cell table:style-name="ce28" table:number-columns-repeated="2"/>
          <table:table-cell table:number-columns-repeated="3"/>
          <table:table-cell office:value-type="float" office:value="599839" calcext:value-type="float">
            <text:p>599839</text:p>
          </table:table-cell>
          <table:table-cell table:number-columns-repeated="8"/>
          <table:table-cell table:style-name="ce28" table:number-columns-repeated="980"/>
          <table:table-cell table:number-columns-repeated="15375"/>
        </table:table-row>
        <table:table-row table:style-name="ro2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6]+[.B27]" office:value-type="float" office:value="49.4" calcext:value-type="float">
            <text:p>49.4</text:p>
          </table:table-cell>
          <table:table-cell table:style-name="ce61" table:formula="of:=[.C27]*[.$A$15]/1000" office:value-type="float" office:value="10.8795266666667" calcext:value-type="float">
            <text:p>10.880</text:p>
          </table:table-cell>
          <table:table-cell table:style-name="ce61" table:formula="of:=[.D27]/([.$A$7]+[.C27]/1000)" office:value-type="float" office:value="0.88816812796273" calcext:value-type="float">
            <text:p>0.888</text:p>
          </table:table-cell>
          <table:table-cell table:style-name="ce134" table:formula="of:=[.$A$6]*[.E27]*100" office:value-type="float" office:value="559545.92061652" calcext:value-type="float">
            <text:p>559546</text:p>
          </table:table-cell>
          <table:table-cell table:style-name="ce147" office:value-type="float" office:value="720744" calcext:value-type="float">
            <text:p>720744</text:p>
          </table:table-cell>
          <table:table-cell table:style-name="ce150" table:formula="of:=[.G27]/[.F27]" office:value-type="float" office:value="1.28808731052112" calcext:value-type="float">
            <text:p>1.29</text:p>
          </table:table-cell>
          <table:table-cell table:style-name="ce64" table:formula="of:=[.E27]*[.$C$99]" office:value-type="float" office:value="746320.494341276" calcext:value-type="float">
            <text:p>746320</text:p>
          </table:table-cell>
          <table:table-cell table:style-name="ce139" table:formula="of:=[.G27]/[.I27]" office:value-type="float" office:value="0.965729878068202" calcext:value-type="float">
            <text:p>0.97</text:p>
          </table:table-cell>
          <table:table-cell table:style-name="ce64" table:formula="of:=[.I27]*0.95" office:value-type="float" office:value="709004.469624212" calcext:value-type="float">
            <text:p>709004</text:p>
          </table:table-cell>
          <table:table-cell table:style-name="ce72" table:formula="of:=IF(0; [.G27]; [.G27]*(1+[.G27]/[.$A$18]*[.$A$19]))" office:value-type="float" office:value="772691.1913536" calcext:value-type="float">
            <text:p>772691.1913536</text:p>
          </table:table-cell>
          <table:table-cell table:style-name="ce149" table:formula="of:=[.L27]/[.I27]" office:value-type="float" office:value="1.03533427959204" calcext:value-type="float">
            <text:p>1.03533427959204</text:p>
          </table:table-cell>
          <table:table-cell table:number-columns-repeated="7"/>
          <table:table-cell office:value-type="float" office:value="606849" calcext:value-type="float">
            <text:p>606849</text:p>
          </table:table-cell>
          <table:table-cell table:number-columns-repeated="16363"/>
        </table:table-row>
        <table:table-row table:style-name="ro2"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9.8" calcext:value-type="float">
            <text:p>9.8</text:p>
          </table:table-cell>
          <table:table-cell table:style-name="ce59" table:formula="of:=[.C27]+[.B28]" office:value-type="float" office:value="59.2" calcext:value-type="float">
            <text:p>59.2</text:p>
          </table:table-cell>
          <table:table-cell table:style-name="ce62" table:formula="of:=[.C28]*[.$A$15]/1000" office:value-type="float" office:value="13.0378133333333" calcext:value-type="float">
            <text:p>13.038</text:p>
          </table:table-cell>
          <table:table-cell table:style-name="ce62" table:formula="of:=[.D28]/([.$A$7]+[.C28]/1000)" office:value-type="float" office:value="1.06351257287044" calcext:value-type="float">
            <text:p>1.064</text:p>
          </table:table-cell>
          <table:table-cell table:style-name="ce142" table:formula="of:=[.$A$6]*[.E28]*100" office:value-type="float" office:value="670012.920908379" calcext:value-type="float">
            <text:p>670013</text:p>
          </table:table-cell>
          <table:table-cell table:style-name="ce147" office:value-type="float" office:value="837754" calcext:value-type="float">
            <text:p>837754</text:p>
          </table:table-cell>
          <table:table-cell table:style-name="ce151" table:formula="of:=[.G28]/[.F28]" office:value-type="float" office:value="1.25035499145927" calcext:value-type="float">
            <text:p>1.25</text:p>
          </table:table-cell>
          <table:table-cell table:style-name="ce65" table:formula="of:=[.E28]*[.$C$99]" office:value-type="float" office:value="893661.013195168" calcext:value-type="float">
            <text:p>893661</text:p>
          </table:table-cell>
          <table:table-cell table:style-name="ce140" table:formula="of:=[.G28]/[.I28]" office:value-type="float" office:value="0.937440469742235" calcext:value-type="float">
            <text:p>0.94</text:p>
          </table:table-cell>
          <table:table-cell table:style-name="ce65" table:formula="of:=[.I28]*0.95" office:value-type="float" office:value="848977.962535409" calcext:value-type="float">
            <text:p>848978</text:p>
          </table:table-cell>
          <table:table-cell table:style-name="ce72" table:formula="of:=IF(0; [.G28]; [.G28]*(1+[.G28]/[.$A$18]*[.$A$19]))" office:value-type="float" office:value="907937.1764516" calcext:value-type="float">
            <text:p>907937.1764516</text:p>
          </table:table-cell>
          <table:table-cell table:style-name="ce149" table:formula="of:=[.L28]/[.I28]" office:value-type="float" office:value="1.01597492007108" calcext:value-type="float">
            <text:p>1.01597492007108</text:p>
          </table:table-cell>
          <table:table-cell table:number-columns-repeated="7"/>
          <table:table-cell office:value-type="float" office:value="607236" calcext:value-type="float">
            <text:p>607236</text:p>
          </table:table-cell>
          <table:table-cell table:number-columns-repeated="16363"/>
        </table:table-row>
        <table:table-row table:style-name="ro2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8]+[.B29]" office:value-type="float" office:value="69" calcext:value-type="float">
            <text:p>69.0</text:p>
          </table:table-cell>
          <table:table-cell table:style-name="ce61" table:formula="of:=[.C29]*[.$A$15]/1000" office:value-type="float" office:value="15.1961" calcext:value-type="float">
            <text:p>15.196</text:p>
          </table:table-cell>
          <table:table-cell table:style-name="ce61" table:formula="of:=[.D29]/([.$A$7]+[.C29]/1000)" office:value-type="float" office:value="1.23857690113294" calcext:value-type="float">
            <text:p>1.239</text:p>
          </table:table-cell>
          <table:table-cell table:style-name="ce134" table:formula="of:=[.$A$6]*[.E29]*100" office:value-type="float" office:value="780303.44771375" calcext:value-type="float">
            <text:p>780303</text:p>
          </table:table-cell>
          <table:table-cell table:style-name="ce147" office:value-type="float" office:value="953674" calcext:value-type="float">
            <text:p>953674</text:p>
          </table:table-cell>
          <table:table-cell table:style-name="ce150" table:formula="of:=[.G29]/[.F29]" office:value-type="float" office:value="1.22218350155214" calcext:value-type="float">
            <text:p>1.22</text:p>
          </table:table-cell>
          <table:table-cell table:style-name="ce64" table:formula="of:=[.E29]*[.$C$99]" office:value-type="float" office:value="1040766.1522977" calcext:value-type="float">
            <text:p>1040766</text:p>
          </table:table-cell>
          <table:table-cell table:style-name="ce139" table:formula="of:=[.G29]/[.I29]" office:value-type="float" office:value="0.916319192255219" calcext:value-type="float">
            <text:p>0.92</text:p>
          </table:table-cell>
          <table:table-cell table:style-name="ce64" table:formula="of:=[.I29]*0.95" office:value-type="float" office:value="988727.844682814" calcext:value-type="float">
            <text:p>988728</text:p>
          </table:table-cell>
          <table:table-cell table:style-name="ce72" table:formula="of:=IF(0; [.G29]; [.G29]*(1+[.G29]/[.$A$18]*[.$A$19]))" office:value-type="float" office:value="1044623.4098276" calcext:value-type="float">
            <text:p>1044623.4098276</text:p>
          </table:table-cell>
          <table:table-cell table:style-name="ce149" table:formula="of:=[.L29]/[.I29]" office:value-type="float" office:value="1.0037061711907" calcext:value-type="float">
            <text:p>1.0037061711907</text:p>
          </table:table-cell>
          <table:table-cell table:number-columns-repeated="7"/>
          <table:table-cell office:value-type="float" office:value="615108" calcext:value-type="float">
            <text:p>615108</text:p>
          </table:table-cell>
          <table:table-cell table:formula="of:=SUM([.U22:.U29])/8" office:value-type="float" office:value="597630" calcext:value-type="float">
            <text:p>597630</text:p>
          </table:table-cell>
          <table:table-cell table:formula="of:=(MAX([.U22:.U28])-MIN([.U22:.U28]))/[.V29]*100" office:value-type="float" office:value="4.77954587286448" calcext:value-type="float">
            <text:p>4.8</text:p>
          </table:table-cell>
          <table:table-cell table:number-columns-repeated="16361"/>
        </table:table-row>
        <table:table-row table:style-name="ro2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9]+[.B30]" office:value-type="float" office:value="78.8" calcext:value-type="float">
            <text:p>78.8</text:p>
          </table:table-cell>
          <table:table-cell table:style-name="ce61" table:formula="of:=[.C30]*[.$A$15]/1000" office:value-type="float" office:value="17.3543866666667" calcext:value-type="float">
            <text:p>17.354</text:p>
          </table:table-cell>
          <table:table-cell table:style-name="ce61" table:formula="of:=[.D30]/([.$A$7]+[.C30]/1000)" office:value-type="float" office:value="1.41336178345332" calcext:value-type="float">
            <text:p>1.413</text:p>
          </table:table-cell>
          <table:table-cell table:style-name="ce134" table:formula="of:=[.$A$6]*[.E30]*100" office:value-type="float" office:value="890417.923575594" calcext:value-type="float">
            <text:p>890418</text:p>
          </table:table-cell>
          <table:table-cell table:style-name="ce147" office:value-type="float" office:value="1085924" calcext:value-type="float">
            <text:p>1085924</text:p>
          </table:table-cell>
          <table:table-cell table:style-name="ce150" table:formula="of:=[.G30]/[.F30]" office:value-type="float" office:value="1.2195666453336" calcext:value-type="float">
            <text:p>1.22</text:p>
          </table:table-cell>
          <table:table-cell table:style-name="ce64" table:formula="of:=[.E30]*[.$C$99]" office:value-type="float" office:value="1187636.47523525" calcext:value-type="float">
            <text:p>1187636</text:p>
          </table:table-cell>
          <table:table-cell table:style-name="ce139" table:formula="of:=[.G30]/[.I30]" office:value-type="float" office:value="0.914357231900356" calcext:value-type="float">
            <text:p>0.91</text:p>
          </table:table-cell>
          <table:table-cell table:style-name="ce64" table:formula="of:=[.I30]*0.95" office:value-type="float" office:value="1128254.65147349" calcext:value-type="float">
            <text:p>1128255</text:p>
          </table:table-cell>
          <table:table-cell table:style-name="ce72" table:formula="of:=IF(0; [.G30]; [.G30]*(1+[.G30]/[.$A$18]*[.$A$19]))" office:value-type="float" office:value="1203847.0933776" calcext:value-type="float">
            <text:p>1203847.0933776</text:p>
          </table:table-cell>
          <table:table-cell table:style-name="ce149" table:formula="of:=[.L30]/[.I30]" office:value-type="float" office:value="1.01364947816977" calcext:value-type="float">
            <text:p>1.01364947816977</text:p>
          </table:table-cell>
          <table:table-cell table:number-columns-repeated="7"/>
          <table:table-cell table:style-name="ce28" office:value-type="float" office:value="723681" calcext:value-type="float">
            <text:p>723681</text:p>
          </table:table-cell>
          <table:table-cell table:style-name="ce75"/>
          <table:table-cell table:number-columns-repeated="16362"/>
        </table:table-row>
        <table:table-row table:style-name="ro2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0]+[.B31]" office:value-type="float" office:value="88.6" calcext:value-type="float">
            <text:p>88.6</text:p>
          </table:table-cell>
          <table:table-cell table:style-name="ce61" table:formula="of:=[.C31]*[.$A$15]/1000" office:value-type="float" office:value="19.5126733333333" calcext:value-type="float">
            <text:p>19.513</text:p>
          </table:table-cell>
          <table:table-cell table:style-name="ce61" table:formula="of:=[.D31]/([.$A$7]+[.C31]/1000)" office:value-type="float" office:value="1.58786788839521" calcext:value-type="float">
            <text:p>1.588</text:p>
          </table:table-cell>
          <table:table-cell table:style-name="ce134" table:formula="of:=[.$A$6]*[.E31]*100" office:value-type="float" office:value="1000356.76968898" calcext:value-type="float">
            <text:p>1000357</text:p>
          </table:table-cell>
          <table:table-cell table:style-name="ce147" office:value-type="float" office:value="1199473" calcext:value-type="float">
            <text:p>1199473</text:p>
          </table:table-cell>
          <table:table-cell table:style-name="ce150" table:formula="of:=[.G31]/[.F31]" office:value-type="float" office:value="1.19904521701085" calcext:value-type="float">
            <text:p>1.20</text:p>
          </table:table-cell>
          <table:table-cell table:style-name="ce64" table:formula="of:=[.E31]*[.$C$99]" office:value-type="float" office:value="1334272.54379644" calcext:value-type="float">
            <text:p>1334273</text:p>
          </table:table-cell>
          <table:table-cell table:style-name="ce139" table:formula="of:=[.G31]/[.I31]" office:value-type="float" office:value="0.898971507415653" calcext:value-type="float">
            <text:p>0.90</text:p>
          </table:table-cell>
          <table:table-cell table:style-name="ce64" table:formula="of:=[.I31]*0.95" office:value-type="float" office:value="1267558.91660661" calcext:value-type="float">
            <text:p>1267559</text:p>
          </table:table-cell>
          <table:table-cell table:style-name="ce72" table:formula="of:=IF([.G31]&lt;[.$A$18]; [.G31]; [.G31]*(1+[.G31]/[.$A$18]*[.$A$19]))" office:value-type="float" office:value="1343346.5477729" calcext:value-type="float">
            <text:p>1343346.5477729</text:p>
          </table:table-cell>
          <table:table-cell table:style-name="ce149" table:formula="of:=[.L31]/[.I31]" office:value-type="float" office:value="1.00680071250709" calcext:value-type="float">
            <text:p>1.00680071250709</text:p>
          </table:table-cell>
          <table:table-cell table:number-columns-repeated="7"/>
          <table:table-cell office:value-type="float" office:value="707528" calcext:value-type="float">
            <text:p>707528</text:p>
          </table:table-cell>
          <table:table-cell table:number-columns-repeated="16363"/>
        </table:table-row>
        <table:table-row table:style-name="ro2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9.6" calcext:value-type="float">
            <text:p>19.6</text:p>
          </table:table-cell>
          <table:table-cell table:style-name="ce58" table:formula="of:=[.C31]+[.B32]" office:value-type="float" office:value="108.2" calcext:value-type="float">
            <text:p>108.2</text:p>
          </table:table-cell>
          <table:table-cell table:style-name="ce61" table:formula="of:=[.C32]*[.$A$15]/1000" office:value-type="float" office:value="23.8292466666667" calcext:value-type="float">
            <text:p>23.829</text:p>
          </table:table-cell>
          <table:table-cell table:style-name="ce61" table:formula="of:=[.D32]/([.$A$7]+[.C32]/1000)" office:value-type="float" office:value="1.93604642975144" calcext:value-type="float">
            <text:p>1.936</text:p>
          </table:table-cell>
          <table:table-cell table:style-name="ce134" table:formula="of:=[.$A$6]*[.E32]*100" office:value-type="float" office:value="1219709.25074341" calcext:value-type="float">
            <text:p>1219709</text:p>
          </table:table-cell>
          <table:table-cell table:style-name="ce147" office:value-type="float" office:value="1416948" calcext:value-type="float">
            <text:p>1416948</text:p>
          </table:table-cell>
          <table:table-cell table:style-name="ce150" table:formula="of:=[.G32]/[.F32]" office:value-type="float" office:value="1.16170964443893" calcext:value-type="float">
            <text:p>1.16</text:p>
          </table:table-cell>
          <table:table-cell table:style-name="ce64" table:formula="of:=[.E32]*[.$C$99]" office:value-type="float" office:value="1626844.15599789" calcext:value-type="float">
            <text:p>1626844</text:p>
          </table:table-cell>
          <table:table-cell table:style-name="ce139" table:formula="of:=[.G32]/[.I32]" office:value-type="float" office:value="0.870979555586783" calcext:value-type="float">
            <text:p>0.87</text:p>
          </table:table-cell>
          <table:table-cell table:style-name="ce64" table:formula="of:=[.I32]*0.95" office:value-type="float" office:value="1545501.948198" calcext:value-type="float">
            <text:p>1545502</text:p>
          </table:table-cell>
          <table:table-cell table:style-name="ce72" table:formula="of:=IF([.G32]&lt;[.$A$18]; [.G32]; [.G32]*(1+[.G32]/[.$A$18]*[.$A$19]))" office:value-type="float" office:value="1617722.1634704" calcext:value-type="float">
            <text:p>1617722.1634704</text:p>
          </table:table-cell>
          <table:table-cell table:style-name="ce149" table:formula="of:=[.L32]/[.I32]" office:value-type="float" office:value="0.994392829519741" calcext:value-type="float">
            <text:p>0.994392829519741</text:p>
          </table:table-cell>
          <table:table-cell table:number-columns-repeated="7"/>
          <table:table-cell office:value-type="float" office:value="726643" calcext:value-type="float">
            <text:p>726643</text:p>
          </table:table-cell>
          <table:table-cell table:number-columns-repeated="16363"/>
        </table:table-row>
        <table:table-row table:style-name="ro2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2]+[.B33]" office:value-type="float" office:value="118" calcext:value-type="float">
            <text:p>118.0</text:p>
          </table:table-cell>
          <table:table-cell table:style-name="ce61" table:formula="of:=[.C33]*[.$A$15]/1000" office:value-type="float" office:value="25.9875333333333" calcext:value-type="float">
            <text:p>25.988</text:p>
          </table:table-cell>
          <table:table-cell table:style-name="ce61" table:formula="of:=[.D33]/([.$A$7]+[.C33]/1000)" office:value-type="float" office:value="2.10972019267197" calcext:value-type="float">
            <text:p>2.110</text:p>
          </table:table-cell>
          <table:table-cell table:style-name="ce134" table:formula="of:=[.$A$6]*[.E33]*100" office:value-type="float" office:value="1329123.72138334" calcext:value-type="float">
            <text:p>1329124</text:p>
          </table:table-cell>
          <table:table-cell table:style-name="ce147" office:value-type="float" office:value="1526221" calcext:value-type="float">
            <text:p>1526221</text:p>
          </table:table-cell>
          <table:table-cell table:style-name="ce150" table:formula="of:=[.G33]/[.F33]" office:value-type="float" office:value="1.14829114509485" calcext:value-type="float">
            <text:p>1.15</text:p>
          </table:table-cell>
          <table:table-cell table:style-name="ce64" table:formula="of:=[.E33]*[.$C$99]" office:value-type="float" office:value="1772780.81429059" calcext:value-type="float">
            <text:p>1772781</text:p>
          </table:table-cell>
          <table:table-cell table:style-name="ce139" table:formula="of:=[.G33]/[.I33]" office:value-type="float" office:value="0.860919177202821" calcext:value-type="float">
            <text:p>0.86</text:p>
          </table:table-cell>
          <table:table-cell table:style-name="ce64" table:formula="of:=[.I33]*0.95" office:value-type="float" office:value="1684141.77357606" calcext:value-type="float">
            <text:p>1684142</text:p>
          </table:table-cell>
          <table:table-cell table:style-name="ce72" table:formula="of:=IF([.G33]&lt;[.$A$18]; [.G33]; [.G33]*(1+[.G33]/[.$A$18]*[.$A$19]))" office:value-type="float" office:value="1759156.0540841" calcext:value-type="float">
            <text:p>1759156.0540841</text:p>
          </table:table-cell>
          <table:table-cell table:style-name="ce149" table:formula="of:=[.L33]/[.I33]" office:value-type="float" office:value="0.992314469957788" calcext:value-type="float">
            <text:p>0.992314469957788</text:p>
          </table:table-cell>
          <table:table-cell table:number-columns-repeated="7"/>
          <table:table-cell office:value-type="float" office:value="726839" calcext:value-type="float">
            <text:p>726839</text:p>
          </table:table-cell>
          <table:table-cell table:number-columns-repeated="16363"/>
        </table:table-row>
        <table:table-row table:style-name="ro2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3]+[.B34]" office:value-type="float" office:value="127.8" calcext:value-type="float">
            <text:p>127.8</text:p>
          </table:table-cell>
          <table:table-cell table:style-name="ce61" table:formula="of:=[.C34]*[.$A$15]/1000" office:value-type="float" office:value="28.14582" calcext:value-type="float">
            <text:p>28.146</text:p>
          </table:table-cell>
          <table:table-cell table:style-name="ce61" table:formula="of:=[.D34]/([.$A$7]+[.C34]/1000)" office:value-type="float" office:value="2.28311783124321" calcext:value-type="float">
            <text:p>2.283</text:p>
          </table:table-cell>
          <table:table-cell table:style-name="ce134" table:formula="of:=[.$A$6]*[.E34]*100" office:value-type="float" office:value="1438364.23368322" calcext:value-type="float">
            <text:p>1438364</text:p>
          </table:table-cell>
          <table:table-cell table:style-name="ce147" office:value-type="float" office:value="1653842" calcext:value-type="float">
            <text:p>1653842</text:p>
          </table:table-cell>
          <table:table-cell table:style-name="ce150" table:formula="of:=[.G34]/[.F34]" office:value-type="float" office:value="1.14980751138744" calcext:value-type="float">
            <text:p>1.15</text:p>
          </table:table-cell>
          <table:table-cell table:style-name="ce64" table:formula="of:=[.E34]*[.$C$99]" office:value-type="float" office:value="1918485.44752589" calcext:value-type="float">
            <text:p>1918485</text:p>
          </table:table-cell>
          <table:table-cell table:style-name="ce139" table:formula="of:=[.G34]/[.I34]" office:value-type="float" office:value="0.862056056840472" calcext:value-type="float">
            <text:p>0.86</text:p>
          </table:table-cell>
          <table:table-cell table:style-name="ce64" table:formula="of:=[.I34]*0.95" office:value-type="float" office:value="1822561.1751496" calcext:value-type="float">
            <text:p>1822561</text:p>
          </table:table-cell>
          <table:table-cell table:style-name="ce72" table:formula="of:=IF([.G34]&lt;[.$A$18]; [.G34]; [.G34]*(1+[.G34]/[.$A$18]*[.$A$19]))" office:value-type="float" office:value="1927361.3360964" calcext:value-type="float">
            <text:p>1927361.3360964</text:p>
          </table:table-cell>
          <table:table-cell table:style-name="ce149" table:formula="of:=[.L34]/[.I34]" office:value-type="float" office:value="1.00462650815619" calcext:value-type="float">
            <text:p>1.00462650815619</text:p>
          </table:table-cell>
          <table:table-cell table:number-columns-repeated="7"/>
          <table:table-cell office:value-type="float" office:value="732858" calcext:value-type="float">
            <text:p>732858</text:p>
          </table:table-cell>
          <table:table-cell table:number-columns-repeated="16363"/>
        </table:table-row>
        <table:table-row table:style-name="ro2"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4]+[.B35]" office:value-type="float" office:value="137.6" calcext:value-type="float">
            <text:p>137.6</text:p>
          </table:table-cell>
          <table:table-cell table:style-name="ce61" table:formula="of:=[.C35]*[.$A$15]/1000" office:value-type="float" office:value="30.3041066666667" calcext:value-type="float">
            <text:p>30.304</text:p>
          </table:table-cell>
          <table:table-cell table:style-name="ce61" table:formula="of:=[.D35]/([.$A$7]+[.C35]/1000)" office:value-type="float" office:value="2.45624000345826" calcext:value-type="float">
            <text:p>2.456</text:p>
          </table:table-cell>
          <table:table-cell table:style-name="ce134" table:formula="of:=[.$A$6]*[.E35]*100" office:value-type="float" office:value="1547431.20217871" calcext:value-type="float">
            <text:p>1547431</text:p>
          </table:table-cell>
          <table:table-cell table:style-name="ce147" office:value-type="float" office:value="1770798" calcext:value-type="float">
            <text:p>1770798</text:p>
          </table:table-cell>
          <table:table-cell table:style-name="ce150" table:formula="of:=[.G35]/[.F35]" office:value-type="float" office:value="1.14434683590896" calcext:value-type="float">
            <text:p>1.14</text:p>
          </table:table-cell>
          <table:table-cell table:style-name="ce64" table:formula="of:=[.E35]*[.$C$99]" office:value-type="float" office:value="2063958.60861009" calcext:value-type="float">
            <text:p>2063959</text:p>
          </table:table-cell>
          <table:table-cell table:style-name="ce139" table:formula="of:=[.G35]/[.I35]" office:value-type="float" office:value="0.857961972983794" calcext:value-type="float">
            <text:p>0.86</text:p>
          </table:table-cell>
          <table:table-cell table:style-name="ce64" table:formula="of:=[.I35]*0.95" office:value-type="float" office:value="1960760.67817959" calcext:value-type="float">
            <text:p>1960761</text:p>
          </table:table-cell>
          <table:table-cell table:style-name="ce72" table:formula="of:=IF([.G35]&lt;[.$A$18]; [.G35]; [.G35]*(1+[.G35]/[.$A$18]*[.$A$19]))" office:value-type="float" office:value="2084370.5556804" calcext:value-type="float">
            <text:p>2084370.5556804</text:p>
          </table:table-cell>
          <table:table-cell table:style-name="ce149" table:formula="of:=[.L35]/[.I35]" office:value-type="float" office:value="1.00988970756737" calcext:value-type="float">
            <text:p>1.00988970756737</text:p>
          </table:table-cell>
          <table:table-cell table:number-columns-repeated="7"/>
          <table:table-cell office:value-type="float" office:value="705786" calcext:value-type="float">
            <text:p>705786</text:p>
          </table:table-cell>
          <table:table-cell table:number-columns-repeated="16363"/>
        </table:table-row>
        <table:table-row table:style-name="ro2"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9.8" calcext:value-type="float">
            <text:p>9.8</text:p>
          </table:table-cell>
          <table:table-cell table:style-name="ce60" table:formula="of:=[.C35]+[.B36]" office:value-type="float" office:value="147.4" calcext:value-type="float">
            <text:p>147.4</text:p>
          </table:table-cell>
          <table:table-cell table:style-name="ce63" table:formula="of:=[.C36]*[.$A$15]/1000" office:value-type="float" office:value="32.4623933333333" calcext:value-type="float">
            <text:p>32.462</text:p>
          </table:table-cell>
          <table:table-cell table:style-name="ce63" table:formula="of:=[.D36]/([.$A$7]+[.C36]/1000)" office:value-type="float" office:value="2.62908736522129" calcext:value-type="float">
            <text:p>2.629</text:p>
          </table:table-cell>
          <table:table-cell table:style-name="ce143" table:formula="of:=[.$A$6]*[.E36]*100" office:value-type="float" office:value="1656325.04008941" calcext:value-type="float">
            <text:p>1656325</text:p>
          </table:table-cell>
          <table:table-cell table:style-name="ce148" office:value-type="float" office:value="1850630" calcext:value-type="float">
            <text:p>1850630</text:p>
          </table:table-cell>
          <table:table-cell table:style-name="ce152" table:formula="of:=[.G36]/[.F36]" office:value-type="float" office:value="1.11731088717955" calcext:value-type="float">
            <text:p>1.12</text:p>
          </table:table-cell>
          <table:table-cell table:style-name="ce66" table:formula="of:=[.E36]*[.$C$99]" office:value-type="float" office:value="2209200.84869415" calcext:value-type="float">
            <text:p>2209201</text:p>
          </table:table-cell>
          <table:table-cell table:style-name="ce141" table:formula="of:=[.G36]/[.I36]" office:value-type="float" office:value="0.837692055520395" calcext:value-type="float">
            <text:p>0.84</text:p>
          </table:table-cell>
          <table:table-cell table:style-name="ce66" table:formula="of:=[.I36]*0.95" office:value-type="float" office:value="2098740.80625944" calcext:value-type="float">
            <text:p>2098741</text:p>
          </table:table-cell>
          <table:table-cell table:style-name="ce73" table:formula="of:=IF([.G36]&lt;[.$A$18]; [.G36]; [.G36]*(1+[.G36]/[.$A$18]*[.$A$19]))" office:value-type="float" office:value="2193113.13969" calcext:value-type="float">
            <text:p>2193113.13969</text:p>
          </table:table-cell>
          <table:table-cell table:style-name="ce149" table:formula="of:=[.L36]/[.I36]" office:value-type="float" office:value="0.992717860391166" calcext:value-type="float">
            <text:p>0.992717860391166</text:p>
          </table:table-cell>
          <table:table-cell table:number-columns-repeated="7"/>
          <table:table-cell office:value-type="float" office:value="700985" calcext:value-type="float">
            <text:p>700985</text:p>
          </table:table-cell>
          <table:table-cell table:number-columns-repeated="16363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16363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35848" calcext:value-type="float">
            <text:p>735848</text:p>
          </table:table-cell>
          <table:table-cell table:formula="of:=SUM([.U30:.U38])/9" office:value-type="float" office:value="720744" calcext:value-type="float">
            <text:p>720744</text:p>
          </table:table-cell>
          <table:table-cell table:formula="of:=(MAX([.U30:.U37])-MIN([.U30:.U37]))/[.V38]*100" office:value-type="float" office:value="4.42223591178005" calcext:value-type="float">
            <text:p>4.4</text:p>
          </table:table-cell>
          <table:table-cell table:number-columns-repeated="16361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31747" calcext:value-type="float">
            <text:p>73174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36817" calcext:value-type="float">
            <text:p>83681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27707" calcext:value-type="float">
            <text:p>82770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22322" calcext:value-type="float">
            <text:p>82232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53847" calcext:value-type="float">
            <text:p>85384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848079" calcext:value-type="float">
            <text:p>848079</text:p>
          </table:table-cell>
          <table:table-cell table:formula="of:=SUM([.U40:.U44])/5" office:value-type="float" office:value="837754.4" calcext:value-type="float">
            <text:p>837754</text:p>
          </table:table-cell>
          <table:table-cell table:formula="of:=(MAX([.U40:.U43])-MIN([.U40:.U43]))/[.V44]*100" office:value-type="float" office:value="3.76303604015688" calcext:value-type="float">
            <text:p>3.8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954372" calcext:value-type="float">
            <text:p>95437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44582" calcext:value-type="float">
            <text:p>94458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68293" calcext:value-type="float">
            <text:p>968293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55723" calcext:value-type="float">
            <text:p>955723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64172" calcext:value-type="float">
            <text:p>96417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20144" calcext:value-type="float">
            <text:p>920144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49327" calcext:value-type="float">
            <text:p>94932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56910" calcext:value-type="float">
            <text:p>95691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51584" calcext:value-type="float">
            <text:p>951584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971636" calcext:value-type="float">
            <text:p>971636</text:p>
          </table:table-cell>
          <table:table-cell table:formula="of:=SUM([.U45:.U54])/10" office:value-type="float" office:value="953674.3" calcext:value-type="float">
            <text:p>953674</text:p>
          </table:table-cell>
          <table:table-cell table:formula="of:=(MAX([.U45:.U53])-MIN([.U45:.U53]))/[.V54]*100" office:value-type="float" office:value="5.04878866925532" calcext:value-type="float">
            <text:p>5.0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084905" calcext:value-type="float">
            <text:p>1084905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73791" calcext:value-type="float">
            <text:p>1073791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82662" calcext:value-type="float">
            <text:p>108266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95580" calcext:value-type="float">
            <text:p>109558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092684" calcext:value-type="float">
            <text:p>1092684</text:p>
          </table:table-cell>
          <table:table-cell table:formula="of:=SUM([.U55:.U59])/5" office:value-type="float" office:value="1085924.4" calcext:value-type="float">
            <text:p>1085924</text:p>
          </table:table-cell>
          <table:table-cell table:formula="of:=(MAX([.U55:.U58])-MIN([.U55:.U58]))/[.V59]*100" office:value-type="float" office:value="2.00649326969723" calcext:value-type="float">
            <text:p>2.0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205750" calcext:value-type="float">
            <text:p>120575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188471" calcext:value-type="float">
            <text:p>1188471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219844" calcext:value-type="float">
            <text:p>1219844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175662" calcext:value-type="float">
            <text:p>117566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207639" calcext:value-type="float">
            <text:p>1207639</text:p>
          </table:table-cell>
          <table:table-cell table:formula="of:=SUM([.U60:.U64])/5" office:value-type="float" office:value="1199473.2" calcext:value-type="float">
            <text:p>1199473</text:p>
          </table:table-cell>
          <table:table-cell table:formula="of:=(MAX([.U60:.U63])-MIN([.U60:.U63]))/[.V64]*100" office:value-type="float" office:value="3.68345036804491" calcext:value-type="float">
            <text:p>3.7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404845" calcext:value-type="float">
            <text:p>1404845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399177" calcext:value-type="float">
            <text:p>139917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434430" calcext:value-type="float">
            <text:p>143443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417323" calcext:value-type="float">
            <text:p>1417323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428968" calcext:value-type="float">
            <text:p>1428968</text:p>
          </table:table-cell>
          <table:table-cell table:formula="of:=SUM([.U65:.U69])/5" office:value-type="float" office:value="1416948.6" calcext:value-type="float">
            <text:p>1416949</text:p>
          </table:table-cell>
          <table:table-cell table:formula="of:=(MAX([.U65:.U68])-MIN([.U65:.U68]))/[.V69]*100" office:value-type="float" office:value="2.48795192712001" calcext:value-type="float">
            <text:p>2.5</text:p>
          </table:table-cell>
          <table:table-cell table:number-columns-repeated="16361"/>
        </table:table-row>
        <table:table-row table:style-name="ro2">
          <table:table-cell table:number-columns-repeated="20"/>
          <table:table-cell office:value-type="float" office:value="1502457" calcext:value-type="float">
            <text:p>1502457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504837" calcext:value-type="float">
            <text:p>1504837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<text:span text:style-name="T8">Regression</text:span></text:p>
          </table:table-cell>
          <table:table-cell table:number-columns-repeated="6"/>
          <table:table-cell office:value-type="string" calcext:value-type="string">
            <text:p><text:span text:style-name="T8">Regression</text:span></text:p>
          </table:table-cell>
          <table:table-cell table:number-columns-repeated="11"/>
          <table:table-cell office:value-type="float" office:value="1524086" calcext:value-type="float">
            <text:p>1524086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0"/>
          <table:table-cell office:value-type="float" office:value="1554010" calcext:value-type="float">
            <text:p>1554010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549983" calcext:value-type="float">
            <text:p>1549983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1"/>
          <table:table-cell office:value-type="float" office:value="1512338" calcext:value-type="float">
            <text:p>1512338</text:p>
          </table:table-cell>
          <table:table-cell table:number-columns-repeated="16363"/>
        </table:table-row>
        <table:table-row table:style-name="ro2">
          <table:table-cell/>
          <table:table-cell table:number-matrix-columns-spanned="2" table:number-matrix-rows-spanned="5" table:formula="of:=LINEST([.$G$22:.$G$26] ; [.$E$22:.$E$26] ; 0 ; 1)" office:value-type="float" office:value="840291.911907689" calcext:value-type="float">
            <text:p>840291.9119076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-0.00920233630668481" calcext:value-type="float">
            <text:p>-0.00920233630668481</text:p>
          </table:table-cell>
          <table:table-cell office:value-type="float" office:value="0.0450962095380997" calcext:value-type="float">
            <text:p>0.0450962095380997</text:p>
          </table:table-cell>
          <table:table-cell table:number-columns-repeated="10"/>
          <table:table-cell office:value-type="float" office:value="1494015" calcext:value-type="float">
            <text:p>149401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629.21382348937" calcext:value-type="float">
            <text:p>8629.2138234893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53013378982638" calcext:value-type="float">
            <text:p>0.0053013378982638</text:p>
          </table:table-cell>
          <table:table-cell office:value-type="float" office:value="0.0700665834429601" calcext:value-type="float">
            <text:p>0.0700665834429601</text:p>
          </table:table-cell>
          <table:table-cell table:number-columns-repeated="10"/>
          <table:table-cell office:value-type="float" office:value="1540956" calcext:value-type="float">
            <text:p>154095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0.999578343379223" calcext:value-type="float">
            <text:p>0.999578343379223</text:p>
          </table:table-cell>
          <table:table-cell office:value-type="float" office:value="8452.51263460618" calcext:value-type="float">
            <text:p>8452.51263460618</text:p>
          </table:table-cell>
          <table:table-cell table:number-columns-repeated="5"/>
          <table:table-cell office:value-type="float" office:value="0.188168799802697" calcext:value-type="float">
            <text:p>0.188168799802697</text:p>
          </table:table-cell>
          <table:table-cell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535685" calcext:value-type="float">
            <text:p>153568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482.39201402304" calcext:value-type="float">
            <text:p>9482.3920140230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01318106133462" calcext:value-type="float">
            <text:p>3.01318106133462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1543844" calcext:value-type="float">
            <text:p>1543844</text:p>
          </table:table-cell>
          <table:table-cell table:formula="of:=SUM([.U70:.U79])/10" office:value-type="float" office:value="1526221.1" calcext:value-type="float">
            <text:p>1526221</text:p>
          </table:table-cell>
          <table:table-cell table:formula="of:=(MAX([.U70:.U78])-MIN([.U70:.U78]))/[.V79]*100" office:value-type="float" office:value="3.93095076460416" calcext:value-type="float">
            <text:p>3.9</text:p>
          </table:table-cell>
          <table:table-cell table:number-columns-repeated="16361"/>
        </table:table-row>
        <table:table-row table:style-name="ro2">
          <table:table-cell/>
          <table:table-cell office:value-type="float" office:value="677469211435.647" calcext:value-type="float">
            <text:p>677469211435.647</text:p>
          </table:table-cell>
          <table:table-cell office:value-type="float" office:value="285779879.352708" calcext:value-type="float">
            <text:p>285779879.352708</text:p>
          </table:table-cell>
          <table:table-cell table:number-columns-repeated="5"/>
          <table:table-cell office:value-type="float" office:value="0.0153187324275234" calcext:value-type="float">
            <text:p>0.0153187324275234</text:p>
          </table:table-cell>
          <table:table-cell office:value-type="float" office:value="0.0660907915933863" calcext:value-type="float">
            <text:p>0.0660907915933863</text:p>
          </table:table-cell>
          <table:table-cell table:number-columns-repeated="10"/>
          <table:table-cell office:value-type="float" office:value="1665079" calcext:value-type="float">
            <text:p>1665079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647703" calcext:value-type="float">
            <text:p>1647703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1"/>
          <table:table-cell office:value-type="float" office:value="1659088" calcext:value-type="float">
            <text:p>1659088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188168799802697" calcext:value-type="float">
            <text:p>0.188168799802697</text:p>
          </table:table-cell>
          <table:table-cell table:number-columns-repeated="10"/>
          <table:table-cell office:value-type="float" office:value="1647890" calcext:value-type="float">
            <text:p>1647890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8452.51263460618" calcext:value-type="float">
            <text:p>8452.51263460618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649454" calcext:value-type="float">
            <text:p>1649454</text:p>
          </table:table-cell>
          <table:table-cell table:formula="of:=SUM([.U80:.U84])/5" office:value-type="float" office:value="1653842.8" calcext:value-type="float">
            <text:p>1653843</text:p>
          </table:table-cell>
          <table:table-cell table:formula="of:=(MAX([.U80:.U83])-MIN([.U80:.U83]))/[.V84]*100" office:value-type="float" office:value="1.0506439910734" calcext:value-type="float">
            <text:p>1.1</text:p>
          </table:table-cell>
          <table:table-cell table:number-columns-repeated="16361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"/>
          <table:table-cell office:value-type="float" office:value="1793367" calcext:value-type="float">
            <text:p>1793367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0"/>
          <table:table-cell office:value-type="float" office:value="1751541" calcext:value-type="float">
            <text:p>1751541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0.125720245941366" calcext:value-type="float">
            <text:p>0.125720245941366</text:p>
          </table:table-cell>
          <table:table-cell table:number-columns-repeated="10"/>
          <table:table-cell office:value-type="float" office:value="1770996" calcext:value-type="float">
            <text:p>1770996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775754" calcext:value-type="float">
            <text:p>1775754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1"/>
          <table:table-cell office:value-type="float" office:value="1762332" calcext:value-type="float">
            <text:p>1762332</text:p>
          </table:table-cell>
          <table:table-cell table:formula="of:=SUM([.U85:.U89])/5" office:value-type="float" office:value="1770798" calcext:value-type="float">
            <text:p>1770798</text:p>
          </table:table-cell>
          <table:table-cell table:formula="of:=(MAX([.U85:.U88])-MIN([.U85:.U88]))/[.V89]*100" office:value-type="float" office:value="2.36198595209617" calcext:value-type="float">
            <text:p>2.4</text:p>
          </table:table-cell>
          <table:table-cell table:number-columns-repeated="16361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  <table:table-cell office:value-type="float" office:value="1847092" calcext:value-type="float">
            <text:p>1847092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677469211435.647" calcext:value-type="float">
            <text:p>677469211435.647</text:p>
          </table:table-cell>
          <table:table-cell table:formula="of:=[.$B$80] / [.$C$91]" office:value-type="float" office:value="677469211435.647" calcext:value-type="float">
            <text:p>677469211435.647</text:p>
          </table:table-cell>
          <table:table-cell table:formula="of:=[.$B$79]" office:value-type="float" office:value="9482.39201402304" calcext:value-type="float">
            <text:p>9482.39201402304</text:p>
          </table:table-cell>
          <table:table-cell table:formula="of:=LEGACY.FDIST([.$B$79] ; [.$C$91] ; [.$C$79])" office:value-type="float" office:value="0.000000066682237933477" calcext:value-type="float">
            <text:p>6.6682237933477E-08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153187324275234" calcext:value-type="float">
            <text:p>0.0153187324275234</text:p>
          </table:table-cell>
          <table:table-cell table:formula="of:=[.$I$80] / [.$J$91]" office:value-type="float" office:value="0.0153187324275234" calcext:value-type="float">
            <text:p>0.0153187324275234</text:p>
          </table:table-cell>
          <table:table-cell table:formula="of:=[.$I$79]" office:value-type="float" office:value="3.01318106133462" calcext:value-type="float">
            <text:p>3.01318106133462</text:p>
          </table:table-cell>
          <table:table-cell table:formula="of:=LEGACY.FDIST([.$I$79] ; [.$J$91] ; [.$J$79])" office:value-type="float" office:value="0.10621412544065" calcext:value-type="float">
            <text:p>0.10621412544065</text:p>
          </table:table-cell>
          <table:table-cell table:number-columns-repeated="6"/>
          <table:table-cell office:value-type="float" office:value="1833359" calcext:value-type="float">
            <text:p>1833359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285779879.352708" calcext:value-type="float">
            <text:p>285779879.352708</text:p>
          </table:table-cell>
          <table:table-cell table:formula="of:=[.$C$80] / [.$C$79]" office:value-type="float" office:value="71444969.8381771" calcext:value-type="float">
            <text:p>71444969.8381771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0660907915933863" calcext:value-type="float">
            <text:p>0.0660907915933863</text:p>
          </table:table-cell>
          <table:table-cell table:formula="of:=[.$J$80] / [.$J$79]" office:value-type="float" office:value="0.0050839070456451" calcext:value-type="float">
            <text:p>0.0050839070456451</text:p>
          </table:table-cell>
          <table:table-cell table:number-columns-repeated="8"/>
          <table:table-cell office:value-type="float" office:value="1903999" calcext:value-type="float">
            <text:p>1903999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677754991315" calcext:value-type="float">
            <text:p>67775499131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0814095240209097" calcext:value-type="float">
            <text:p>0.0814095240209097</text:p>
          </table:table-cell>
          <table:table-cell table:number-columns-repeated="9"/>
          <table:table-cell office:value-type="float" office:value="1839722" calcext:value-type="float">
            <text:p>1839722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879761" calcext:value-type="float">
            <text:p>1879761</text:p>
          </table:table-cell>
          <table:table-cell table:number-columns-repeated="16363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"/>
          <table:table-cell office:value-type="float" office:value="1826056" calcext:value-type="float">
            <text:p>1826056</text:p>
          </table:table-cell>
          <table:table-cell table:number-columns-repeated="16363"/>
        </table:table-row>
        <table:table-row table:style-name="ro2">
          <table:table-cell table:number-columns-repeated="20"/>
          <table:table-cell office:value-type="float" office:value="1813477" calcext:value-type="float">
            <text:p>1813477</text:p>
          </table:table-cell>
          <table:table-cell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5"/>
          <table:table-cell office:value-type="float" office:value="1885554" calcext:value-type="float">
            <text:p>1885554</text:p>
          </table:table-cell>
          <table:table-cell table:number-columns-repeated="16363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450962095380997" calcext:value-type="float">
            <text:p>0.0450962095380997</text:p>
          </table:table-cell>
          <table:table-cell table:number-matrix-columns-spanned="1" table:number-matrix-rows-spanned="2" table:formula="of:=INDEX([.$I$77:.$J$77]; 1 ; ROW([.$K$99])+1 - ROW())" office:value-type="float" office:value="0.0700665834429601" calcext:value-type="float">
            <text:p>0.0700665834429601</text:p>
          </table:table-cell>
          <table:table-cell table:number-matrix-columns-spanned="1" table:number-matrix-rows-spanned="2" table:formula="of:=[.$J$98:.$J$99] / [.$K$98:.$K$99]" office:value-type="float" office:value="0.643619359217247" calcext:value-type="float">
            <text:p>0.643619359217247</text:p>
          </table:table-cell>
          <table:table-cell table:number-matrix-columns-spanned="1" table:number-matrix-rows-spanned="2" table:formula="of:=LEGACY.TDIST(ABS([.$L$98:.$L$99]) ; [.$J$79] ; 2 )" office:value-type="float" office:value="0.531013167013838" calcext:value-type="float">
            <text:p>0.531013167013838</text:p>
          </table:table-cell>
          <table:table-cell table:number-matrix-columns-spanned="1" table:number-matrix-rows-spanned="2" table:formula="of:=[.$J$98:.$J$99] - [.$K$98:.$K$99] * TINV(1 - [.$J$95] ; [.$J$79])" office:value-type="float" office:value="-0.106273441197506" calcext:value-type="float">
            <text:p>-0.106273441197506</text:p>
          </table:table-cell>
          <table:table-cell table:number-matrix-columns-spanned="1" table:number-matrix-rows-spanned="2" table:formula="of:=[.$J$98:.$J$99] + [.$K$98:.$K$99] * TINV(1 - [.$J$95] ; [.$J$79])" office:value-type="float" office:value="0.196465860273705" calcext:value-type="float">
            <text:p>0.196465860273705</text:p>
          </table:table-cell>
          <table:table-cell table:number-columns-repeated="5"/>
          <table:table-cell office:value-type="float" office:value="1836044" calcext:value-type="float">
            <text:p>1836044</text:p>
          </table:table-cell>
          <table:table-cell table:number-columns-repeated="16363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840291.911907689" calcext:value-type="float">
            <text:p>840291.911907689</text:p>
          </table:table-cell>
          <table:table-cell office:value-type="float" office:value="8629.21382348937" calcext:value-type="float">
            <text:p>8629.21382348937</text:p>
          </table:table-cell>
          <table:table-cell office:value-type="float" office:value="97.3775744924007" calcext:value-type="float">
            <text:p>97.3775744924007</text:p>
          </table:table-cell>
          <table:table-cell office:value-type="float" office:value="0.000000066682237933477" calcext:value-type="float">
            <text:p>6.6682237933477E-08</text:p>
          </table:table-cell>
          <table:table-cell office:value-type="float" office:value="816333.373425757" calcext:value-type="float">
            <text:p>816333.373425757</text:p>
          </table:table-cell>
          <table:table-cell office:value-type="float" office:value="864250.450389621" calcext:value-type="float">
            <text:p>864250.450389621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-0.00920233630668481" calcext:value-type="float">
            <text:p>-0.00920233630668481</text:p>
          </table:table-cell>
          <table:table-cell office:value-type="float" office:value="0.0053013378982638" calcext:value-type="float">
            <text:p>0.0053013378982638</text:p>
          </table:table-cell>
          <table:table-cell office:value-type="float" office:value="-1.7358516818365" calcext:value-type="float">
            <text:p>-1.7358516818365</text:p>
          </table:table-cell>
          <table:table-cell office:value-type="float" office:value="0.10621412544065" calcext:value-type="float">
            <text:p>0.10621412544065</text:p>
          </table:table-cell>
          <table:table-cell office:value-type="float" office:value="-0.0206551805394123" calcext:value-type="float">
            <text:p>-0.0206551805394123</text:p>
          </table:table-cell>
          <table:table-cell office:value-type="float" office:value="0.00225050792604263" calcext:value-type="float">
            <text:p>0.00225050792604263</text:p>
          </table:table-cell>
          <table:table-cell table:number-columns-repeated="5"/>
          <table:table-cell office:value-type="float" office:value="1841236" calcext:value-type="float">
            <text:p>1841236</text:p>
          </table:table-cell>
          <table:table-cell table:formula="of:=SUM([.U90:.U99])/10" office:value-type="float" office:value="1850630" calcext:value-type="float">
            <text:p>1850630</text:p>
          </table:table-cell>
          <table:table-cell table:formula="of:=(MAX([.U90:.U98])-MIN([.U90:.U98]))/[.V99]*100" office:value-type="float" office:value="4.89141535585179" calcext:value-type="float">
            <text:p>4.9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402919.11907689" calcext:value-type="float">
            <text:p>8402919.11907689</text:p>
          </table:table-cell>
          <table:table-cell office:value-type="float" office:value="169243" calcext:value-type="float">
            <text:p>169243</text:p>
          </table:table-cell>
          <table:table-cell office:value-type="float" office:value="-8233676.11907689" calcext:value-type="float">
            <text:p>-8233676.11907689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6805838.2381538" calcext:value-type="float">
            <text:p>16805838.2381538</text:p>
          </table:table-cell>
          <table:table-cell office:value-type="float" office:value="294743" calcext:value-type="float">
            <text:p>294743</text:p>
          </table:table-cell>
          <table:table-cell office:value-type="float" office:value="-16511095.2381538" calcext:value-type="float">
            <text:p>-16511095.2381538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5208757.3572307" calcext:value-type="float">
            <text:p>25208757.3572307</text:p>
          </table:table-cell>
          <table:table-cell office:value-type="float" office:value="452854" calcext:value-type="float">
            <text:p>452854</text:p>
          </table:table-cell>
          <table:table-cell office:value-type="float" office:value="-24755903.3572307" calcext:value-type="float">
            <text:p>-24755903.3572307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33611676.4763076" calcext:value-type="float">
            <text:p>33611676.4763076</text:p>
          </table:table-cell>
          <table:table-cell office:value-type="float" office:value="597630" calcext:value-type="float">
            <text:p>597630</text:p>
          </table:table-cell>
          <table:table-cell office:value-type="float" office:value="-33014046.4763076" calcext:value-type="float">
            <text:p>-33014046.4763076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</table:table>
      <table:table table:name="Annex B Coincidence Limit_2" table:style-name="ta1">
        <table:shapes>
          <draw:frame draw:z-index="0" draw:style-name="gr3" draw:text-style-name="P2" svg:width="23.951cm" svg:height="15.239cm" svg:x="0.044cm" svg:y="22.62cm">
            <draw:object draw:notify-on-update-of-ranges="'Annex A Preliminary Check'.E22:'Annex B Coincidence Limit'.E36 'Annex B Coincidence Limit_2'.L21:'Annex B Coincidence Limit_2'.L21 'Annex A Preliminary Check'.L22:'Annex B Coincidence Limit'.L36 'Annex B Coincidence Limit_2'.E22:'Annex B Coincidence Limit_2'.E36 'Annex B Coincidence Limit_2'.K21:'Annex B Coincidence Limit_2'.K21 'Annex B Coincidence Limit_2'.K22:'Annex B Coincidence Limit_2'.K36 'Annex B Coincidence Limit_2'.E22:'Annex B Coincidence Limit_2'.E36 'Annex B Coincidence Limit_2'.I20:'Annex B Coincidence Limit_2'.I20 'Annex B Coincidence Limit_2'.I22:'Annex B Coincidence Limit_2'.I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3" draw:text-style-name="P2" svg:width="20.348cm" svg:height="15.238cm" svg:x="24.908cm" svg:y="23.146cm">
            <draw:object draw:notify-on-update-of-ranges="'Annex A Preliminary Check'.I22:'Annex B Coincidence Limit'.I36 'ISO 11171_2020 Summary'.A1:'ISO 11171_2020 Summary'.A1 'Annex A Preliminary Check'.M22:'Annex B Coincidence Limit'.M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name="Text Frame 1" draw:style-name="gr4" draw:text-style-name="P1" svg:width="11.201cm" svg:height="15.848cm" svg:x="31.597cm" svg:y="1.901cm">
            <draw:text-box>
              <text:p><text:span text:style-name="T2">Procedure – Using Calibration Rig</text:span></text:p>
              <text:p><text:span text:style-name="T1"/></text:p>
              <text:p><text:span text:style-name="T1">Make up concentrated suspension of RM8632a such that about 10ml of concentrate increases the tank contamination level by 10% of the estimated coincidence limit. Use the calculator in this worksheet to establish and record mass of dust and fluid volumes.</text:span></text:p>
              <text:p><text:span text:style-name="T1"/></text:p>
              <text:p><text:span text:style-name="T1">Add successive doses of concentrate, performing flushing and 5-portion tests after each one.</text:span></text:p>
              <text:p><text:span text:style-name="T1"/></text:p>
              <text:p><text:span text:style-name="T1">When the results have stabilized after each addition, record the most recent tests. We are only interested in the 4μm <text:s/>channel counts for this process.</text:span></text:p>
              <text:p><text:span text:style-name="T1"/></text:p>
              <text:p><text:span text:style-name="T1">The optimum flush / stabilization time can be judged by continuously testing and observing the counts. This was about 2 minutes flushing after dosing then perform two 5-portion tests.</text:span></text:p>
              <text:p><text:span text:style-name="T1"/></text:p>
              <text:p><text:span text:style-name="T1">The results are then imported into this spreadsheet and the portions averaged for each dose level.</text:span></text:p>
              <text:p><text:span text:style-name="T1"/></text:p>
              <text:p><text:span text:style-name="T1">The averages are entered into the table as well as the added ml of concentrate for each dose.</text:span></text:p>
              <text:p><text:span text:style-name="T1"/></text:p>
              <text:p><text:span text:style-name="T1">The counts are plotted in the figure and the first 4 results (10,20,30,40% nominal coincidence limit) used to generate a linear regression line.</text:span></text:p>
              <text:p><text:span text:style-name="T1"/></text:p>
              <text:p><text:span text:style-name="T1"/></text:p>
            </draw:text-box>
          </draw:frame>
        </table:shapes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default-cell-style-name="ce20"/>
        <table:table-column table:style-name="co4" table:default-cell-style-name="ce76"/>
        <table:table-column table:style-name="co4" table:number-columns-repeated="986" table:default-cell-style-name="Default"/>
        <table:table-row table:style-name="ro8">
          <table:table-cell table:style-name="ce99" office:value-type="string" calcext:value-type="string">
            <text:p>Δ<text:span text:style-name="T3">COUNTS_4um</text:span> &lt; 5%</text:p>
          </table:table-cell>
          <table:table-cell table:style-name="ce108" office:value-type="string" calcext:value-type="string">
            <text:p>RM8632x</text:p>
          </table:table-cell>
          <table:table-cell table:style-name="ce99" office:value-type="string" calcext:value-type="string" table:number-columns-spanned="10" table:number-rows-spanned="1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08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21"/>
          <table:table-cell table:style-name="ce27" table:number-columns-repeated="865"/>
        </table:table-row>
        <table:table-row table:style-name="ro2">
          <table:table-cell table:style-name="ce184" office:value-type="date" office:date-value="2025-05-08" calcext:value-type="date">
            <text:p>2025-05-08</text:p>
          </table:table-cell>
          <table:table-cell table:number-columns-repeated="20"/>
          <table:table-cell table:style-name="Default" table:number-columns-repeated="2"/>
          <table:table-cell table:number-columns-repeated="986"/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7"/>
          <table:table-cell table:style-name="ce28" office:value-type="string" calcext:value-type="string">
            <text:p>portion</text:p>
          </table:table-cell>
          <table:table-cell table:style-name="ce28"/>
          <table:table-cell table:style-name="Default"/>
          <table:table-cell table:number-columns-repeated="986"/>
        </table:table-row>
        <table:table-row table:style-name="ro2">
          <table:table-cell table:number-columns-repeated="20"/>
          <table:table-cell table:style-name="ce28" office:value-type="string" calcext:value-type="string">
            <text:p>counts</text:p>
          </table:table-cell>
          <table:table-cell table:style-name="ce28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office:value-type="string" calcext:value-type="string">
            <text:p>D<text:span text:style-name="T7">Q</text:span></text:p>
          </table:table-cell>
          <table:table-cell table:number-columns-repeated="985"/>
        </table:table-row>
        <table:table-row table:style-name="ro2">
          <table:table-cell table:number-columns-repeated="20"/>
          <table:table-cell office:value-type="float" office:value="167569" calcext:value-type="float">
            <text:p>167569</text:p>
          </table:table-cell>
          <table:table-cell table:style-name="ce27"/>
          <table:table-cell table:style-name="Default"/>
          <table:table-cell table:number-columns-repeated="986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17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986"/>
        </table:table-row>
        <table:table-row table:style-name="ro2">
          <table:table-cell office:value-type="float" office:value="10.27" calcext:value-type="float">
            <text:p>10.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7"/>
          <table:table-cell office:value-type="float" office:value="169243" calcext:value-type="float">
            <text:p>169243</text:p>
          </table:table-cell>
          <table:table-cell table:formula="of:=SUM([.U5:.U7])/3" office:value-type="float" office:value="168739.666666667" calcext:value-type="float">
            <text:p>168740</text:p>
          </table:table-cell>
          <table:table-cell table:formula="of:=(MAX([.U5:.U6])-MIN([.U5:.U6]))/[.V7]*100" office:value-type="float" office:value="1.0892518850537" calcext:value-type="float">
            <text:p>1.1</text:p>
          </table:table-cell>
          <table:table-cell table:number-columns-repeated="986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17"/>
          <table:table-cell office:value-type="float" office:value="292859" calcext:value-type="float">
            <text:p>292859</text:p>
          </table:table-cell>
          <table:table-cell table:number-columns-repeated="988"/>
        </table:table-row>
        <table:table-row table:style-name="ro2">
          <table:table-cell table:formula="of:=[.A8]/10" office:value-type="float" office:value="2000" calcext:value-type="float">
            <text:p>2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7"/>
          <table:table-cell office:value-type="float" office:value="301110" calcext:value-type="float">
            <text:p>301110</text:p>
          </table:table-cell>
          <table:table-cell table:number-columns-repeated="988"/>
        </table:table-row>
        <table:table-row table:style-name="ro2">
          <table:table-cell table:style-name="ce32" table:formula="of:=[.A9]/[.A6]*[.A7]" office:value-type="float" office:value="3.26031746031746" calcext:value-type="float">
            <text:p>3.26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17"/>
          <table:table-cell office:value-type="float" office:value="299624" calcext:value-type="float">
            <text:p>299624</text:p>
          </table:table-cell>
          <table:table-cell table:number-columns-repeated="988"/>
        </table:table-row>
        <table:table-row table:style-name="ro2">
          <table:table-cell table:style-name="ce53" table:formula="of:=[.A10]*100" office:value-type="float" office:value="326.031746031746" calcext:value-type="float">
            <text:p>326.03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17"/>
          <table:table-cell office:value-type="float" office:value="285382" calcext:value-type="float">
            <text:p>285382</text:p>
          </table:table-cell>
          <table:table-cell table:formula="of:=SUM([.U8:.U11])/4" office:value-type="float" office:value="294743.75" calcext:value-type="float">
            <text:p>294744</text:p>
          </table:table-cell>
          <table:table-cell table:formula="of:=(MAX([.U8:.U10])-MIN([.U8:.U10]))/[.V11]*100" office:value-type="float" office:value="2.7993808180835" calcext:value-type="float">
            <text:p>2.8</text:p>
          </table:table-cell>
          <table:table-cell table:number-columns-repeated="98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17"/>
          <table:table-cell office:value-type="float" office:value="458207" calcext:value-type="float">
            <text:p>458207</text:p>
          </table:table-cell>
          <table:table-cell table:number-columns-repeated="988"/>
        </table:table-row>
        <table:table-row table:style-name="ro2">
          <table:table-cell table:style-name="ce53" table:formula="of:=[.A11]*[.A12]/1000" office:value-type="float" office:value="81.5079365079365" calcext:value-type="float">
            <text:p>81.5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17"/>
          <table:table-cell office:value-type="float" office:value="465138" calcext:value-type="float">
            <text:p>465138</text:p>
          </table:table-cell>
          <table:table-cell table:number-columns-repeated="988"/>
        </table:table-row>
        <table:table-row table:style-name="ro2">
          <table:table-cell office:value-type="float" office:value="44.52" calcext:value-type="float">
            <text:p>44.5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17"/>
          <table:table-cell office:value-type="float" office:value="454200" calcext:value-type="float">
            <text:p>454200</text:p>
          </table:table-cell>
          <table:table-cell table:number-columns-repeated="988"/>
        </table:table-row>
        <table:table-row table:style-name="ro2">
          <table:table-cell table:style-name="ce53" table:formula="of:=[.A14]/[.A12]*1000" office:value-type="float" office:value="178.08" calcext:value-type="float">
            <text:p>178.0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17"/>
          <table:table-cell office:value-type="float" office:value="445750" calcext:value-type="float">
            <text:p>445750</text:p>
          </table:table-cell>
          <table:table-cell table:number-columns-repeated="988"/>
        </table:table-row>
        <table:table-row table:style-name="ro2">
          <table:table-cell table:style-name="ce53" table:formula="of:=[.A13]/[.A14]*10" office:value-type="float" office:value="18.3081618391591" calcext:value-type="float">
            <text:p>18.31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17"/>
          <table:table-cell office:value-type="float" office:value="443747" calcext:value-type="float">
            <text:p>443747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453143" calcext:value-type="float">
            <text:p>453143</text:p>
          </table:table-cell>
          <table:table-cell table:number-columns-repeated="988"/>
        </table:table-row>
        <table:table-row table:style-name="ro2"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17"/>
          <table:table-cell office:value-type="float" office:value="436276" calcext:value-type="float">
            <text:p>436276</text:p>
          </table:table-cell>
          <table:table-cell table:number-columns-repeated="988"/>
        </table:table-row>
        <table:table-row table:style-name="ro2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17"/>
          <table:table-cell office:value-type="float" office:value="454474" calcext:value-type="float">
            <text:p>454474</text:p>
          </table:table-cell>
          <table:table-cell table:number-columns-repeated="988"/>
        </table:table-row>
        <table:table-row table:style-name="ro2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125" office:value-type="string" calcext:value-type="string">
            <text:p>Expected</text:p>
          </table:table-cell>
          <table:table-cell table:style-name="ce145" office:value-type="string" calcext:value-type="string">
            <text:p>4μm</text:p>
          </table:table-cell>
          <table:table-cell table:style-name="ce125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128" office:value-type="string" calcext:value-type="string">
            <text:p>Relative</text:p>
          </table:table-cell>
          <table:table-cell table:style-name="ce48" table:number-columns-repeated="2"/>
          <table:table-cell table:style-name="ce128" office:value-type="string" calcext:value-type="string">
            <text:p>corrected</text:p>
          </table:table-cell>
          <table:table-cell table:number-columns-repeated="7"/>
          <table:table-cell office:value-type="float" office:value="454993" calcext:value-type="float">
            <text:p>454993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126" office:value-type="string" calcext:value-type="string">
            <text:p>4μm/100ml</text:p>
          </table:table-cell>
          <table:table-cell table:style-name="ce146" office:value-type="string" calcext:value-type="string">
            <text:p>Actual</text:p>
          </table:table-cell>
          <table:table-cell table:style-name="ce126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12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unts</text:p>
          </table:table-cell>
          <table:table-cell table:style-name="ce129" office:value-type="string" calcext:value-type="string">
            <text:p>fraction</text:p>
          </table:table-cell>
          <table:table-cell table:number-columns-repeated="7"/>
          <table:table-cell office:value-type="float" office:value="462615" calcext:value-type="float">
            <text:p>462615</text:p>
          </table:table-cell>
          <table:table-cell table:formula="of:=SUM([.U12:.U21])/(17-8+1)" office:value-type="float" office:value="452854.3" calcext:value-type="float">
            <text:p>452854</text:p>
          </table:table-cell>
          <table:table-cell table:formula="of:=(MAX([.U12:.U20])-MIN([.U12:.U20]))/[.V21]*100" office:value-type="float" office:value="6.37335231221168" calcext:value-type="float">
            <text:p>6.4</text:p>
          </table:table-cell>
          <table:table-cell table:number-columns-repeated="986"/>
        </table:table-row>
        <table:table-row table:style-name="ro2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27"/>
          <table:table-cell table:style-name="ce50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7"/>
          <table:table-cell office:value-type="float" office:value="578672" calcext:value-type="float">
            <text:p>578672</text:p>
          </table:table-cell>
          <table:table-cell table:number-columns-repeated="988"/>
        </table:table-row>
        <table:table-row table:style-name="ro2">
          <table:table-cell table:number-columns-repeated="2" table:style-name="ce50" office:value-type="float" office:value="10" calcext:value-type="float">
            <text:p>10</text:p>
          </table:table-cell>
          <table:table-cell table:style-name="ce58" table:formula="of:=[.B23]" office:value-type="float" office:value="10" calcext:value-type="float">
            <text:p>10.0</text:p>
          </table:table-cell>
          <table:table-cell table:style-name="ce61" table:formula="of:=[.C23]*[.$A$15]/1000" office:value-type="float" office:value="1.7808" calcext:value-type="float">
            <text:p>1.781</text:p>
          </table:table-cell>
          <table:table-cell table:style-name="ce61" table:formula="of:=[.D23]/([.$A$7]+[.C23]/1000)" office:value-type="float" office:value="0.173229571984436" calcext:value-type="float">
            <text:p>0.173</text:p>
          </table:table-cell>
          <table:table-cell table:style-name="ce134" table:formula="of:=[.$A$6]*[.E23]*100" office:value-type="float" office:value="109134.630350195" calcext:value-type="float">
            <text:p>109135</text:p>
          </table:table-cell>
          <table:table-cell office:value-type="float" office:value="85330" calcext:value-type="float">
            <text:p>85330</text:p>
          </table:table-cell>
          <table:table-cell table:style-name="ce150" table:formula="of:=[.G23]/[.F23]" office:value-type="float" office:value="0.781878306878307" calcext:value-type="float">
            <text:p>0.78</text:p>
          </table:table-cell>
          <table:table-cell table:style-name="ce64" table:formula="of:=[.E23]*[.$C$99]" office:value-type="float" office:value="85500.2258835599" calcext:value-type="float">
            <text:p>85500</text:p>
          </table:table-cell>
          <table:table-cell table:style-name="ce139" table:formula="of:=[.G23]/[.I23]" office:value-type="float" office:value="0.998009059253344" calcext:value-type="float">
            <text:p>1.00</text:p>
          </table:table-cell>
          <table:table-cell table:style-name="ce64" table:formula="of:=[.I23]*0.95" office:value-type="float" office:value="81225.2145893819" calcext:value-type="float">
            <text:p>81225</text:p>
          </table:table-cell>
          <table:table-cell table:style-name="ce72" table:formula="of:=IF([.G23]&lt;[.$A$18]; [.G23]; [.G23]*(1+[.G23]/[.$A$18]*[.$A$19]))" office:value-type="float" office:value="85330" calcext:value-type="float">
            <text:p>85330</text:p>
          </table:table-cell>
          <table:table-cell table:style-name="ce149" table:formula="of:=[.L23]/[.I23]" office:value-type="float" office:value="0.998009059253344" calcext:value-type="float">
            <text:p>0.998009059253344</text:p>
          </table:table-cell>
          <table:table-cell table:number-columns-repeated="7"/>
          <table:table-cell office:value-type="float" office:value="581090" calcext:value-type="float">
            <text:p>581090</text:p>
          </table:table-cell>
          <table:table-cell table:number-columns-repeated="988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23]+[.B24]" office:value-type="float" office:value="20" calcext:value-type="float">
            <text:p>20.0</text:p>
          </table:table-cell>
          <table:table-cell table:style-name="ce61" table:formula="of:=[.C24]*[.$A$15]/1000" office:value-type="float" office:value="3.5616" calcext:value-type="float">
            <text:p>3.562</text:p>
          </table:table-cell>
          <table:table-cell table:style-name="ce61" table:formula="of:=[.D24]/([.$A$7]+[.C24]/1000)" office:value-type="float" office:value="0.346122448979592" calcext:value-type="float">
            <text:p>0.346</text:p>
          </table:table-cell>
          <table:table-cell table:style-name="ce134" table:formula="of:=[.$A$6]*[.E24]*100" office:value-type="float" office:value="218057.142857143" calcext:value-type="float">
            <text:p>218057</text:p>
          </table:table-cell>
          <table:table-cell office:value-type="float" office:value="169766" calcext:value-type="float">
            <text:p>169766</text:p>
          </table:table-cell>
          <table:table-cell table:style-name="ce150" table:formula="of:=[.G24]/[.F24]" office:value-type="float" office:value="0.778539046121593" calcext:value-type="float">
            <text:p>0.78</text:p>
          </table:table-cell>
          <table:table-cell table:style-name="ce64" table:formula="of:=[.E24]*[.$C$99]" office:value-type="float" office:value="170834.270570067" calcext:value-type="float">
            <text:p>170834</text:p>
          </table:table-cell>
          <table:table-cell table:style-name="ce139" table:formula="of:=[.G24]/[.I24]" office:value-type="float" office:value="0.993746743165161" calcext:value-type="float">
            <text:p>0.99</text:p>
          </table:table-cell>
          <table:table-cell table:style-name="ce64" table:formula="of:=[.I24]*0.95" office:value-type="float" office:value="162292.557041564" calcext:value-type="float">
            <text:p>162293</text:p>
          </table:table-cell>
          <table:table-cell table:style-name="ce72" table:formula="of:=IF([.G24]&lt;[.$A$18]; [.G24]; [.G24]*(1+[.G24]/[.$A$18]*[.$A$19]))" office:value-type="float" office:value="169766" calcext:value-type="float">
            <text:p>169766</text:p>
          </table:table-cell>
          <table:table-cell table:style-name="ce149" table:formula="of:=[.L24]/[.I24]" office:value-type="float" office:value="0.993746743165161" calcext:value-type="float">
            <text:p>0.993746743165161</text:p>
          </table:table-cell>
          <table:table-cell table:number-columns-repeated="7"/>
          <table:table-cell office:value-type="float" office:value="592101" calcext:value-type="float">
            <text:p>592101</text:p>
          </table:table-cell>
          <table:table-cell table:number-columns-repeated="988"/>
        </table:table-row>
        <table:table-row table:style-name="ro2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24]+[.B25]" office:value-type="float" office:value="30" calcext:value-type="float">
            <text:p>30.0</text:p>
          </table:table-cell>
          <table:table-cell table:style-name="ce61" table:formula="of:=[.C25]*[.$A$15]/1000" office:value-type="float" office:value="5.3424" calcext:value-type="float">
            <text:p>5.342</text:p>
          </table:table-cell>
          <table:table-cell table:style-name="ce61" table:formula="of:=[.D25]/([.$A$7]+[.C25]/1000)" office:value-type="float" office:value="0.518679611650486" calcext:value-type="float">
            <text:p>0.519</text:p>
          </table:table-cell>
          <table:table-cell table:style-name="ce134" table:formula="of:=[.$A$6]*[.E25]*100" office:value-type="float" office:value="326768.155339806" calcext:value-type="float">
            <text:p>326768</text:p>
          </table:table-cell>
          <table:table-cell office:value-type="float" office:value="255753" calcext:value-type="float">
            <text:p>255753</text:p>
          </table:table-cell>
          <table:table-cell table:style-name="ce150" table:formula="of:=[.G25]/[.F25]" office:value-type="float" office:value="0.782674186026612" calcext:value-type="float">
            <text:p>0.78</text:p>
          </table:table-cell>
          <table:table-cell table:style-name="ce64" table:formula="of:=[.E25]*[.$C$99]" office:value-type="float" office:value="256002.618082426" calcext:value-type="float">
            <text:p>256003</text:p>
          </table:table-cell>
          <table:table-cell table:style-name="ce139" table:formula="of:=[.G25]/[.I25]" office:value-type="float" office:value="0.999024939337356" calcext:value-type="float">
            <text:p>1.00</text:p>
          </table:table-cell>
          <table:table-cell table:style-name="ce64" table:formula="of:=[.I25]*0.95" office:value-type="float" office:value="243202.487178305" calcext:value-type="float">
            <text:p>243202</text:p>
          </table:table-cell>
          <table:table-cell table:style-name="ce72" table:formula="of:=IF([.G25]&lt;[.$A$18]; [.G25]; [.G25]*(1+[.G25]/[.$A$18]*[.$A$19]))" office:value-type="float" office:value="255753" calcext:value-type="float">
            <text:p>255753</text:p>
          </table:table-cell>
          <table:table-cell table:style-name="ce149" table:formula="of:=[.L25]/[.I25]" office:value-type="float" office:value="0.999024939337356" calcext:value-type="float">
            <text:p>0.999024939337356</text:p>
          </table:table-cell>
          <table:table-cell table:number-columns-repeated="7"/>
          <table:table-cell office:value-type="float" office:value="600145" calcext:value-type="float">
            <text:p>600145</text:p>
          </table:table-cell>
          <table:table-cell table:number-columns-repeated="988"/>
        </table:table-row>
        <table:table-row table:style-name="ro2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25]+[.B26]" office:value-type="float" office:value="40" calcext:value-type="float">
            <text:p>40.0</text:p>
          </table:table-cell>
          <table:table-cell table:style-name="ce61" table:formula="of:=[.C26]*[.$A$15]/1000" office:value-type="float" office:value="7.1232" calcext:value-type="float">
            <text:p>7.123</text:p>
          </table:table-cell>
          <table:table-cell table:style-name="ce61" table:formula="of:=[.D26]/([.$A$7]+[.C26]/1000)" office:value-type="float" office:value="0.69090203685742" calcext:value-type="float">
            <text:p>0.691</text:p>
          </table:table-cell>
          <table:table-cell table:style-name="ce134" table:formula="of:=[.$A$6]*[.E26]*100" office:value-type="float" office:value="435268.283220175" calcext:value-type="float">
            <text:p>435268</text:p>
          </table:table-cell>
          <table:table-cell office:value-type="float" office:value="341771" calcext:value-type="float">
            <text:p>341771</text:p>
          </table:table-cell>
          <table:table-cell table:style-name="ce150" table:formula="of:=[.G26]/[.F26]" office:value-type="float" office:value="0.785196195485532" calcext:value-type="float">
            <text:p>0.79</text:p>
          </table:table-cell>
          <table:table-cell table:style-name="ce64" table:formula="of:=[.E26]*[.$C$99]" office:value-type="float" office:value="341005.750565662" calcext:value-type="float">
            <text:p>341006</text:p>
          </table:table-cell>
          <table:table-cell table:style-name="ce139" table:formula="of:=[.G26]/[.I26]" office:value-type="float" office:value="1.00224409539449" calcext:value-type="float">
            <text:p>1.00</text:p>
          </table:table-cell>
          <table:table-cell table:style-name="ce64" table:formula="of:=[.I26]*0.95" office:value-type="float" office:value="323955.463037379" calcext:value-type="float">
            <text:p>323955</text:p>
          </table:table-cell>
          <table:table-cell table:style-name="ce72" table:formula="of:=IF([.G26]&lt;[.$A$18]; [.G26]; [.G26]*(1+[.G26]/[.$A$18]*[.$A$19]))" office:value-type="float" office:value="341771" calcext:value-type="float">
            <text:p>341771</text:p>
          </table:table-cell>
          <table:table-cell table:style-name="ce149" table:formula="of:=[.L26]/[.I26]" office:value-type="float" office:value="1.00224409539449" calcext:value-type="float">
            <text:p>1.00224409539449</text:p>
          </table:table-cell>
          <table:table-cell table:number-columns-repeated="2"/>
          <table:table-cell table:style-name="ce28" table:number-columns-repeated="2"/>
          <table:table-cell table:number-columns-repeated="3"/>
          <table:table-cell office:value-type="float" office:value="599839" calcext:value-type="float">
            <text:p>599839</text:p>
          </table:table-cell>
          <table:table-cell table:number-columns-repeated="8"/>
          <table:table-cell table:style-name="ce28" table:number-columns-repeated="980"/>
        </table:table-row>
        <table:table-row table:style-name="ro2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26]+[.B27]" office:value-type="float" office:value="50" calcext:value-type="float">
            <text:p>50.0</text:p>
          </table:table-cell>
          <table:table-cell table:style-name="ce61" table:formula="of:=[.C27]*[.$A$15]/1000" office:value-type="float" office:value="8.904" calcext:value-type="float">
            <text:p>8.904</text:p>
          </table:table-cell>
          <table:table-cell table:style-name="ce61" table:formula="of:=[.D27]/([.$A$7]+[.C27]/1000)" office:value-type="float" office:value="0.862790697674419" calcext:value-type="float">
            <text:p>0.863</text:p>
          </table:table-cell>
          <table:table-cell table:style-name="ce134" table:formula="of:=[.$A$6]*[.E27]*100" office:value-type="float" office:value="543558.139534884" calcext:value-type="float">
            <text:p>543558</text:p>
          </table:table-cell>
          <table:table-cell office:value-type="float" office:value="422013" calcext:value-type="float">
            <text:p>422013</text:p>
          </table:table-cell>
          <table:table-cell table:style-name="ce150" table:formula="of:=[.G27]/[.F27]" office:value-type="float" office:value="0.77638980875369" calcext:value-type="float">
            <text:p>0.78</text:p>
          </table:table-cell>
          <table:table-cell table:style-name="ce64" table:formula="of:=[.E27]*[.$C$99]" office:value-type="float" office:value="425844.148296025" calcext:value-type="float">
            <text:p>425844</text:p>
          </table:table-cell>
          <table:table-cell table:style-name="ce139" table:formula="of:=[.G27]/[.I27]" office:value-type="float" office:value="0.991003402744044" calcext:value-type="float">
            <text:p>0.99</text:p>
          </table:table-cell>
          <table:table-cell table:style-name="ce64" table:formula="of:=[.I27]*0.95" office:value-type="float" office:value="404551.940881224" calcext:value-type="float">
            <text:p>404552</text:p>
          </table:table-cell>
          <table:table-cell table:style-name="ce72" table:formula="of:=IF([.G27]&lt;[.$A$18]; [.G27]; [.G27]*(1+[.G27]/[.$A$18]*[.$A$19]))" office:value-type="float" office:value="422013" calcext:value-type="float">
            <text:p>422013</text:p>
          </table:table-cell>
          <table:table-cell table:style-name="ce149" table:formula="of:=[.L27]/[.I27]" office:value-type="float" office:value="0.991003402744044" calcext:value-type="float">
            <text:p>0.991003402744044</text:p>
          </table:table-cell>
          <table:table-cell table:number-columns-repeated="7"/>
          <table:table-cell office:value-type="float" office:value="606849" calcext:value-type="float">
            <text:p>606849</text:p>
          </table:table-cell>
          <table:table-cell table:number-columns-repeated="988"/>
        </table:table-row>
        <table:table-row table:style-name="ro2">
          <table:table-cell table:style-name="ce51" office:value-type="float" office:value="60" calcext:value-type="float">
            <text:p>60</text:p>
          </table:table-cell>
          <table:table-cell table:style-name="ce50" office:value-type="float" office:value="10" calcext:value-type="float">
            <text:p>10</text:p>
          </table:table-cell>
          <table:table-cell table:style-name="ce59" table:formula="of:=[.C27]+[.B28]" office:value-type="float" office:value="60" calcext:value-type="float">
            <text:p>60.0</text:p>
          </table:table-cell>
          <table:table-cell table:style-name="ce62" table:formula="of:=[.C28]*[.$A$15]/1000" office:value-type="float" office:value="10.6848" calcext:value-type="float">
            <text:p>10.685</text:p>
          </table:table-cell>
          <table:table-cell table:style-name="ce62" table:formula="of:=[.D28]/([.$A$7]+[.C28]/1000)" office:value-type="float" office:value="1.03434656340755" calcext:value-type="float">
            <text:p>1.034</text:p>
          </table:table-cell>
          <table:table-cell table:style-name="ce142" table:formula="of:=[.$A$6]*[.E28]*100" office:value-type="float" office:value="651638.334946757" calcext:value-type="float">
            <text:p>651638</text:p>
          </table:table-cell>
          <table:table-cell office:value-type="float" office:value="504557" calcext:value-type="float">
            <text:p>504557</text:p>
          </table:table-cell>
          <table:table-cell table:style-name="ce151" table:formula="of:=[.G28]/[.F28]" office:value-type="float" office:value="0.77428992884715" calcext:value-type="float">
            <text:p>0.77</text:p>
          </table:table-cell>
          <table:table-cell table:style-name="ce65" table:formula="of:=[.E28]*[.$C$99]" office:value-type="float" office:value="510518.289690026" calcext:value-type="float">
            <text:p>510518</text:p>
          </table:table-cell>
          <table:table-cell table:style-name="ce140" table:formula="of:=[.G28]/[.I28]" office:value-type="float" office:value="0.988323063423163" calcext:value-type="float">
            <text:p>0.99</text:p>
          </table:table-cell>
          <table:table-cell table:style-name="ce65" table:formula="of:=[.I28]*0.95" office:value-type="float" office:value="484992.375205524" calcext:value-type="float">
            <text:p>484992</text:p>
          </table:table-cell>
          <table:table-cell table:style-name="ce72" table:formula="of:=IF([.G28]&lt;[.$A$18]; [.G28]; [.G28]*(1+[.G28]/[.$A$18]*[.$A$19]))" office:value-type="float" office:value="504557" calcext:value-type="float">
            <text:p>504557</text:p>
          </table:table-cell>
          <table:table-cell table:style-name="ce149" table:formula="of:=[.L28]/[.I28]" office:value-type="float" office:value="0.988323063423163" calcext:value-type="float">
            <text:p>0.988323063423163</text:p>
          </table:table-cell>
          <table:table-cell table:number-columns-repeated="7"/>
          <table:table-cell office:value-type="float" office:value="607236" calcext:value-type="float">
            <text:p>607236</text:p>
          </table:table-cell>
          <table:table-cell table:number-columns-repeated="988"/>
        </table:table-row>
        <table:table-row table:style-name="ro2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28]+[.B29]" office:value-type="float" office:value="70" calcext:value-type="float">
            <text:p>70.0</text:p>
          </table:table-cell>
          <table:table-cell table:style-name="ce61" table:formula="of:=[.C29]*[.$A$15]/1000" office:value-type="float" office:value="12.4656" calcext:value-type="float">
            <text:p>12.466</text:p>
          </table:table-cell>
          <table:table-cell table:style-name="ce61" table:formula="of:=[.D29]/([.$A$7]+[.C29]/1000)" office:value-type="float" office:value="1.20557059961315" calcext:value-type="float">
            <text:p>1.206</text:p>
          </table:table-cell>
          <table:table-cell table:style-name="ce134" table:formula="of:=[.$A$6]*[.E29]*100" office:value-type="float" office:value="759509.477756286" calcext:value-type="float">
            <text:p>759509</text:p>
          </table:table-cell>
          <table:table-cell office:value-type="float" office:value="590597" calcext:value-type="float">
            <text:p>590597</text:p>
          </table:table-cell>
          <table:table-cell table:style-name="ce150" table:formula="of:=[.G29]/[.F29]" office:value-type="float" office:value="0.777603199560747" calcext:value-type="float">
            <text:p>0.78</text:p>
          </table:table-cell>
          <table:table-cell table:style-name="ce64" table:formula="of:=[.E29]*[.$C$99]" office:value-type="float" office:value="595028.651313438" calcext:value-type="float">
            <text:p>595029</text:p>
          </table:table-cell>
          <table:table-cell table:style-name="ce139" table:formula="of:=[.G29]/[.I29]" office:value-type="float" office:value="0.992552205169187" calcext:value-type="float">
            <text:p>0.99</text:p>
          </table:table-cell>
          <table:table-cell table:style-name="ce64" table:formula="of:=[.I29]*0.95" office:value-type="float" office:value="565277.218747766" calcext:value-type="float">
            <text:p>565277</text:p>
          </table:table-cell>
          <table:table-cell table:style-name="ce72" table:formula="of:=IF([.G29]&lt;[.$A$18]; [.G29]; [.G29]*(1+[.G29]/[.$A$18]*[.$A$19]))" office:value-type="float" office:value="590597" calcext:value-type="float">
            <text:p>590597</text:p>
          </table:table-cell>
          <table:table-cell table:style-name="ce149" table:formula="of:=[.L29]/[.I29]" office:value-type="float" office:value="0.992552205169187" calcext:value-type="float">
            <text:p>0.992552205169187</text:p>
          </table:table-cell>
          <table:table-cell table:number-columns-repeated="7"/>
          <table:table-cell office:value-type="float" office:value="615108" calcext:value-type="float">
            <text:p>615108</text:p>
          </table:table-cell>
          <table:table-cell table:formula="of:=SUM([.U22:.U29])/8" office:value-type="float" office:value="597630" calcext:value-type="float">
            <text:p>597630</text:p>
          </table:table-cell>
          <table:table-cell table:formula="of:=(MAX([.U22:.U28])-MIN([.U22:.U28]))/[.V29]*100" office:value-type="float" office:value="4.77954587286448" calcext:value-type="float">
            <text:p>4.8</text:p>
          </table:table-cell>
          <table:table-cell table:number-columns-repeated="986"/>
        </table:table-row>
        <table:table-row table:style-name="ro2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29]+[.B30]" office:value-type="float" office:value="80" calcext:value-type="float">
            <text:p>80.0</text:p>
          </table:table-cell>
          <table:table-cell table:style-name="ce61" table:formula="of:=[.C30]*[.$A$15]/1000" office:value-type="float" office:value="14.2464" calcext:value-type="float">
            <text:p>14.246</text:p>
          </table:table-cell>
          <table:table-cell table:style-name="ce61" table:formula="of:=[.D30]/([.$A$7]+[.C30]/1000)" office:value-type="float" office:value="1.37646376811594" calcext:value-type="float">
            <text:p>1.376</text:p>
          </table:table-cell>
          <table:table-cell table:style-name="ce134" table:formula="of:=[.$A$6]*[.E30]*100" office:value-type="float" office:value="867172.173913044" calcext:value-type="float">
            <text:p>867172</text:p>
          </table:table-cell>
          <table:table-cell office:value-type="float" office:value="717141" calcext:value-type="float">
            <text:p>717141</text:p>
          </table:table-cell>
          <table:table-cell table:style-name="ce150" table:formula="of:=[.G30]/[.F30]" office:value-type="float" office:value="0.826988021033885" calcext:value-type="float">
            <text:p>0.83</text:p>
          </table:table-cell>
          <table:table-cell table:style-name="ce64" table:formula="of:=[.E30]*[.$C$99]" office:value-type="float" office:value="679375.707890237" calcext:value-type="float">
            <text:p>679376</text:p>
          </table:table-cell>
          <table:table-cell table:style-name="ce139" table:formula="of:=[.G30]/[.I30]" office:value-type="float" office:value="1.05558822853269" calcext:value-type="float">
            <text:p>1.06</text:p>
          </table:table-cell>
          <table:table-cell table:style-name="ce64" table:formula="of:=[.I30]*0.95" office:value-type="float" office:value="645406.922495725" calcext:value-type="float">
            <text:p>645407</text:p>
          </table:table-cell>
          <table:table-cell table:style-name="ce72" table:formula="of:=IF([.G30]&lt;[.$A$18]; [.G30]; [.G30]*(1+[.G30]/[.$A$18]*[.$A$19]))" office:value-type="float" office:value="768570.1213881" calcext:value-type="float">
            <text:p>768570.1213881</text:p>
          </table:table-cell>
          <table:table-cell table:style-name="ce149" table:formula="of:=[.L30]/[.I30]" office:value-type="float" office:value="1.13128878831251" calcext:value-type="float">
            <text:p>1.13128878831251</text:p>
          </table:table-cell>
          <table:table-cell table:number-columns-repeated="7"/>
          <table:table-cell table:style-name="ce28" office:value-type="float" office:value="723681" calcext:value-type="float">
            <text:p>723681</text:p>
          </table:table-cell>
          <table:table-cell table:style-name="ce75"/>
          <table:table-cell table:number-columns-repeated="987"/>
        </table:table-row>
        <table:table-row table:style-name="ro2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30]+[.B31]" office:value-type="float" office:value="90" calcext:value-type="float">
            <text:p>90.0</text:p>
          </table:table-cell>
          <table:table-cell table:style-name="ce61" table:formula="of:=[.C31]*[.$A$15]/1000" office:value-type="float" office:value="16.0272" calcext:value-type="float">
            <text:p>16.027</text:p>
          </table:table-cell>
          <table:table-cell table:style-name="ce61" table:formula="of:=[.D31]/([.$A$7]+[.C31]/1000)" office:value-type="float" office:value="1.54702702702703" calcext:value-type="float">
            <text:p>1.547</text:p>
          </table:table-cell>
          <table:table-cell table:style-name="ce134" table:formula="of:=[.$A$6]*[.E31]*100" office:value-type="float" office:value="974627.027027027" calcext:value-type="float">
            <text:p>974627</text:p>
          </table:table-cell>
          <table:table-cell table:style-name="ce147"/>
          <table:table-cell table:style-name="ce150" table:formula="of:=[.G31]/[.F31]" office:value-type="float" office:value="0" calcext:value-type="float">
            <text:p>0.00</text:p>
          </table:table-cell>
          <table:table-cell table:style-name="ce64" table:formula="of:=[.E31]*[.$C$99]" office:value-type="float" office:value="763559.932311483" calcext:value-type="float">
            <text:p>763560</text:p>
          </table:table-cell>
          <table:table-cell table:style-name="ce139" table:formula="of:=[.G31]/[.I31]" office:value-type="float" office:value="0" calcext:value-type="float">
            <text:p>0.00</text:p>
          </table:table-cell>
          <table:table-cell table:style-name="ce64" table:formula="of:=[.I31]*0.95" office:value-type="float" office:value="725381.935695909" calcext:value-type="float">
            <text:p>725382</text:p>
          </table:table-cell>
          <table:table-cell table:style-name="ce72" table:formula="of:=IF([.G31]&lt;[.$A$18]; [.G31]; [.G31]*(1+[.G31]/[.$A$18]*[.$A$19]))" office:value-type="float" office:value="0" calcext:value-type="float">
            <text:p>0</text:p>
          </table:table-cell>
          <table:table-cell table:style-name="ce149" table:formula="of:=[.L31]/[.I31]" office:value-type="float" office:value="0" calcext:value-type="float">
            <text:p>0</text:p>
          </table:table-cell>
          <table:table-cell table:number-columns-repeated="7"/>
          <table:table-cell office:value-type="float" office:value="707528" calcext:value-type="float">
            <text:p>707528</text:p>
          </table:table-cell>
          <table:table-cell table:number-columns-repeated="988"/>
        </table:table-row>
        <table:table-row table:style-name="ro2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31]+[.B32]" office:value-type="float" office:value="100" calcext:value-type="float">
            <text:p>100.0</text:p>
          </table:table-cell>
          <table:table-cell table:style-name="ce61" table:formula="of:=[.C32]*[.$A$15]/1000" office:value-type="float" office:value="17.808" calcext:value-type="float">
            <text:p>17.808</text:p>
          </table:table-cell>
          <table:table-cell table:style-name="ce61" table:formula="of:=[.D32]/([.$A$7]+[.C32]/1000)" office:value-type="float" office:value="1.71726133076181" calcext:value-type="float">
            <text:p>1.717</text:p>
          </table:table-cell>
          <table:table-cell table:style-name="ce134" table:formula="of:=[.$A$6]*[.E32]*100" office:value-type="float" office:value="1081874.63837994" calcext:value-type="float">
            <text:p>1081875</text:p>
          </table:table-cell>
          <table:table-cell table:style-name="ce147"/>
          <table:table-cell table:style-name="ce150" table:formula="of:=[.G32]/[.F32]" office:value-type="float" office:value="0" calcext:value-type="float">
            <text:p>0.00</text:p>
          </table:table-cell>
          <table:table-cell table:style-name="ce64" table:formula="of:=[.E32]*[.$C$99]" office:value-type="float" office:value="847581.795644159" calcext:value-type="float">
            <text:p>847582</text:p>
          </table:table-cell>
          <table:table-cell table:style-name="ce139" table:formula="of:=[.G32]/[.I32]" office:value-type="float" office:value="0" calcext:value-type="float">
            <text:p>0.00</text:p>
          </table:table-cell>
          <table:table-cell table:style-name="ce64" table:formula="of:=[.I32]*0.95" office:value-type="float" office:value="805202.705861952" calcext:value-type="float">
            <text:p>805203</text:p>
          </table:table-cell>
          <table:table-cell table:style-name="ce72" table:formula="of:=IF([.G32]&lt;[.$A$18]; [.G32]; [.G32]*(1+[.G32]/[.$A$18]*[.$A$19]))" office:value-type="float" office:value="0" calcext:value-type="float">
            <text:p>0</text:p>
          </table:table-cell>
          <table:table-cell table:style-name="ce149" table:formula="of:=[.L32]/[.I32]" office:value-type="float" office:value="0" calcext:value-type="float">
            <text:p>0</text:p>
          </table:table-cell>
          <table:table-cell table:number-columns-repeated="7"/>
          <table:table-cell office:value-type="float" office:value="726643" calcext:value-type="float">
            <text:p>726643</text:p>
          </table:table-cell>
          <table:table-cell table:number-columns-repeated="988"/>
        </table:table-row>
        <table:table-row table:style-name="ro2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32]+[.B33]" office:value-type="float" office:value="110" calcext:value-type="float">
            <text:p>110.0</text:p>
          </table:table-cell>
          <table:table-cell table:style-name="ce61" table:formula="of:=[.C33]*[.$A$15]/1000" office:value-type="float" office:value="19.5888" calcext:value-type="float">
            <text:p>19.589</text:p>
          </table:table-cell>
          <table:table-cell table:style-name="ce61" table:formula="of:=[.D33]/([.$A$7]+[.C33]/1000)" office:value-type="float" office:value="1.8871676300578" calcext:value-type="float">
            <text:p>1.887</text:p>
          </table:table-cell>
          <table:table-cell table:style-name="ce134" table:formula="of:=[.$A$6]*[.E33]*100" office:value-type="float" office:value="1188915.60693642" calcext:value-type="float">
            <text:p>1188916</text:p>
          </table:table-cell>
          <table:table-cell table:style-name="ce147"/>
          <table:table-cell table:style-name="ce150" table:formula="of:=[.G33]/[.F33]" office:value-type="float" office:value="0" calcext:value-type="float">
            <text:p>0.00</text:p>
          </table:table-cell>
          <table:table-cell table:style-name="ce64" table:formula="of:=[.E33]*[.$C$99]" office:value-type="float" office:value="931441.767139974" calcext:value-type="float">
            <text:p>931442</text:p>
          </table:table-cell>
          <table:table-cell table:style-name="ce139" table:formula="of:=[.G33]/[.I33]" office:value-type="float" office:value="0" calcext:value-type="float">
            <text:p>0.00</text:p>
          </table:table-cell>
          <table:table-cell table:style-name="ce64" table:formula="of:=[.I33]*0.95" office:value-type="float" office:value="884869.678782975" calcext:value-type="float">
            <text:p>884870</text:p>
          </table:table-cell>
          <table:table-cell table:style-name="ce72" table:formula="of:=IF([.G33]&lt;[.$A$18]; [.G33]; [.G33]*(1+[.G33]/[.$A$18]*[.$A$19]))" office:value-type="float" office:value="0" calcext:value-type="float">
            <text:p>0</text:p>
          </table:table-cell>
          <table:table-cell table:style-name="ce149" table:formula="of:=[.L33]/[.I33]" office:value-type="float" office:value="0" calcext:value-type="float">
            <text:p>0</text:p>
          </table:table-cell>
          <table:table-cell table:number-columns-repeated="7"/>
          <table:table-cell office:value-type="float" office:value="726839" calcext:value-type="float">
            <text:p>726839</text:p>
          </table:table-cell>
          <table:table-cell table:number-columns-repeated="988"/>
        </table:table-row>
        <table:table-row table:style-name="ro2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33]+[.B34]" office:value-type="float" office:value="120" calcext:value-type="float">
            <text:p>120.0</text:p>
          </table:table-cell>
          <table:table-cell table:style-name="ce61" table:formula="of:=[.C34]*[.$A$15]/1000" office:value-type="float" office:value="21.3696" calcext:value-type="float">
            <text:p>21.370</text:p>
          </table:table-cell>
          <table:table-cell table:style-name="ce61" table:formula="of:=[.D34]/([.$A$7]+[.C34]/1000)" office:value-type="float" office:value="2.0567468719923" calcext:value-type="float">
            <text:p>2.057</text:p>
          </table:table-cell>
          <table:table-cell table:style-name="ce134" table:formula="of:=[.$A$6]*[.E34]*100" office:value-type="float" office:value="1295750.52935515" calcext:value-type="float">
            <text:p>1295751</text:p>
          </table:table-cell>
          <table:table-cell table:style-name="ce147"/>
          <table:table-cell table:style-name="ce150" table:formula="of:=[.G34]/[.F34]" office:value-type="float" office:value="0" calcext:value-type="float">
            <text:p>0.00</text:p>
          </table:table-cell>
          <table:table-cell table:style-name="ce64" table:formula="of:=[.E34]*[.$C$99]" office:value-type="float" office:value="1015140.31424407" calcext:value-type="float">
            <text:p>1015140</text:p>
          </table:table-cell>
          <table:table-cell table:style-name="ce139" table:formula="of:=[.G34]/[.I34]" office:value-type="float" office:value="0" calcext:value-type="float">
            <text:p>0.00</text:p>
          </table:table-cell>
          <table:table-cell table:style-name="ce64" table:formula="of:=[.I34]*0.95" office:value-type="float" office:value="964383.298531871" calcext:value-type="float">
            <text:p>964383</text:p>
          </table:table-cell>
          <table:table-cell table:style-name="ce72" table:formula="of:=IF([.G34]&lt;[.$A$18]; [.G34]; [.G34]*(1+[.G34]/[.$A$18]*[.$A$19]))" office:value-type="float" office:value="0" calcext:value-type="float">
            <text:p>0</text:p>
          </table:table-cell>
          <table:table-cell table:style-name="ce149" table:formula="of:=[.L34]/[.I34]" office:value-type="float" office:value="0" calcext:value-type="float">
            <text:p>0</text:p>
          </table:table-cell>
          <table:table-cell table:number-columns-repeated="7"/>
          <table:table-cell office:value-type="float" office:value="732858" calcext:value-type="float">
            <text:p>732858</text:p>
          </table:table-cell>
          <table:table-cell table:number-columns-repeated="988"/>
        </table:table-row>
        <table:table-row table:style-name="ro2"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34]+[.B35]" office:value-type="float" office:value="130" calcext:value-type="float">
            <text:p>130.0</text:p>
          </table:table-cell>
          <table:table-cell table:style-name="ce61" table:formula="of:=[.C35]*[.$A$15]/1000" office:value-type="float" office:value="23.1504" calcext:value-type="float">
            <text:p>23.150</text:p>
          </table:table-cell>
          <table:table-cell table:style-name="ce61" table:formula="of:=[.D35]/([.$A$7]+[.C35]/1000)" office:value-type="float" office:value="2.226" calcext:value-type="float">
            <text:p>2.226</text:p>
          </table:table-cell>
          <table:table-cell table:style-name="ce134" table:formula="of:=[.$A$6]*[.E35]*100" office:value-type="float" office:value="1402380" calcext:value-type="float">
            <text:p>1402380</text:p>
          </table:table-cell>
          <table:table-cell table:style-name="ce147"/>
          <table:table-cell table:style-name="ce150" table:formula="of:=[.G35]/[.F35]" office:value-type="float" office:value="0" calcext:value-type="float">
            <text:p>0.00</text:p>
          </table:table-cell>
          <table:table-cell table:style-name="ce64" table:formula="of:=[.E35]*[.$C$99]" office:value-type="float" office:value="1098677.90260374" calcext:value-type="float">
            <text:p>1098678</text:p>
          </table:table-cell>
          <table:table-cell table:style-name="ce139" table:formula="of:=[.G35]/[.I35]" office:value-type="float" office:value="0" calcext:value-type="float">
            <text:p>0.00</text:p>
          </table:table-cell>
          <table:table-cell table:style-name="ce64" table:formula="of:=[.I35]*0.95" office:value-type="float" office:value="1043744.00747356" calcext:value-type="float">
            <text:p>1043744</text:p>
          </table:table-cell>
          <table:table-cell table:style-name="ce72" table:formula="of:=IF([.G35]&lt;[.$A$18]; [.G35]; [.G35]*(1+[.G35]/[.$A$18]*[.$A$19]))" office:value-type="float" office:value="0" calcext:value-type="float">
            <text:p>0</text:p>
          </table:table-cell>
          <table:table-cell table:style-name="ce149" table:formula="of:=[.L35]/[.I35]" office:value-type="float" office:value="0" calcext:value-type="float">
            <text:p>0</text:p>
          </table:table-cell>
          <table:table-cell table:number-columns-repeated="7"/>
          <table:table-cell office:value-type="float" office:value="705786" calcext:value-type="float">
            <text:p>705786</text:p>
          </table:table-cell>
          <table:table-cell table:number-columns-repeated="988"/>
        </table:table-row>
        <table:table-row table:style-name="ro2">
          <table:table-cell table:style-name="ce56" office:value-type="float" office:value="150" calcext:value-type="float">
            <text:p>150</text:p>
          </table:table-cell>
          <table:table-cell table:style-name="ce50" office:value-type="float" office:value="10" calcext:value-type="float">
            <text:p>10</text:p>
          </table:table-cell>
          <table:table-cell table:style-name="ce60" table:formula="of:=[.C35]+[.B36]" office:value-type="float" office:value="140" calcext:value-type="float">
            <text:p>140.0</text:p>
          </table:table-cell>
          <table:table-cell table:style-name="ce63" table:formula="of:=[.C36]*[.$A$15]/1000" office:value-type="float" office:value="24.9312" calcext:value-type="float">
            <text:p>24.931</text:p>
          </table:table-cell>
          <table:table-cell table:style-name="ce63" table:formula="of:=[.D36]/([.$A$7]+[.C36]/1000)" office:value-type="float" office:value="2.39492795389049" calcext:value-type="float">
            <text:p>2.395</text:p>
          </table:table-cell>
          <table:table-cell table:style-name="ce143" table:formula="of:=[.$A$6]*[.E36]*100" office:value-type="float" office:value="1508804.61095101" calcext:value-type="float">
            <text:p>1508805</text:p>
          </table:table-cell>
          <table:table-cell table:style-name="ce148"/>
          <table:table-cell table:style-name="ce152" table:formula="of:=[.G36]/[.F36]" office:value-type="float" office:value="0" calcext:value-type="float">
            <text:p>0.00</text:p>
          </table:table-cell>
          <table:table-cell table:style-name="ce66" table:formula="of:=[.E36]*[.$C$99]" office:value-type="float" office:value="1182054.99607703" calcext:value-type="float">
            <text:p>1182055</text:p>
          </table:table-cell>
          <table:table-cell table:style-name="ce141" table:formula="of:=[.G36]/[.I36]" office:value-type="float" office:value="0" calcext:value-type="float">
            <text:p>0.00</text:p>
          </table:table-cell>
          <table:table-cell table:style-name="ce66" table:formula="of:=[.I36]*0.95" office:value-type="float" office:value="1122952.24627318" calcext:value-type="float">
            <text:p>1122952</text:p>
          </table:table-cell>
          <table:table-cell table:style-name="ce73" table:formula="of:=IF([.G36]&lt;[.$A$18]; [.G36]; [.G36]*(1+[.G36]/[.$A$18]*[.$A$19]))" office:value-type="float" office:value="0" calcext:value-type="float">
            <text:p>0</text:p>
          </table:table-cell>
          <table:table-cell table:style-name="ce149" table:formula="of:=[.L36]/[.I36]" office:value-type="float" office:value="0" calcext:value-type="float">
            <text:p>0</text:p>
          </table:table-cell>
          <table:table-cell table:number-columns-repeated="7"/>
          <table:table-cell office:value-type="float" office:value="700985" calcext:value-type="float">
            <text:p>700985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35848" calcext:value-type="float">
            <text:p>735848</text:p>
          </table:table-cell>
          <table:table-cell table:formula="of:=SUM([.U30:.U38])/9" office:value-type="float" office:value="720744" calcext:value-type="float">
            <text:p>720744</text:p>
          </table:table-cell>
          <table:table-cell table:formula="of:=(MAX([.U30:.U37])-MIN([.U30:.U37]))/[.V38]*100" office:value-type="float" office:value="4.42223591178005" calcext:value-type="float">
            <text:p>4.4</text:p>
          </table:table-cell>
          <table:table-cell table:number-columns-repeated="986"/>
        </table:table-row>
        <table:table-row table:style-name="ro2">
          <table:table-cell table:number-columns-repeated="5"/>
          <table:table-cell table:style-name="ce20"/>
          <table:table-cell table:number-columns-repeated="14"/>
          <table:table-cell office:value-type="float" office:value="731747" calcext:value-type="float">
            <text:p>731747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836817" calcext:value-type="float">
            <text:p>836817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827707" calcext:value-type="float">
            <text:p>827707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822322" calcext:value-type="float">
            <text:p>822322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853847" calcext:value-type="float">
            <text:p>853847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848079" calcext:value-type="float">
            <text:p>848079</text:p>
          </table:table-cell>
          <table:table-cell table:formula="of:=SUM([.U40:.U44])/5" office:value-type="float" office:value="837754.4" calcext:value-type="float">
            <text:p>837754</text:p>
          </table:table-cell>
          <table:table-cell table:formula="of:=(MAX([.U40:.U43])-MIN([.U40:.U43]))/[.V44]*100" office:value-type="float" office:value="3.76303604015688" calcext:value-type="float">
            <text:p>3.8</text:p>
          </table:table-cell>
          <table:table-cell table:number-columns-repeated="986"/>
        </table:table-row>
        <table:table-row table:style-name="ro2">
          <table:table-cell table:number-columns-repeated="20"/>
          <table:table-cell office:value-type="float" office:value="954372" calcext:value-type="float">
            <text:p>954372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944582" calcext:value-type="float">
            <text:p>944582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968293" calcext:value-type="float">
            <text:p>968293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955723" calcext:value-type="float">
            <text:p>955723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964172" calcext:value-type="float">
            <text:p>964172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920144" calcext:value-type="float">
            <text:p>920144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949327" calcext:value-type="float">
            <text:p>949327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956910" calcext:value-type="float">
            <text:p>956910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951584" calcext:value-type="float">
            <text:p>951584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971636" calcext:value-type="float">
            <text:p>971636</text:p>
          </table:table-cell>
          <table:table-cell table:formula="of:=SUM([.U45:.U54])/10" office:value-type="float" office:value="953674.3" calcext:value-type="float">
            <text:p>953674</text:p>
          </table:table-cell>
          <table:table-cell table:formula="of:=(MAX([.U45:.U53])-MIN([.U45:.U53]))/[.V54]*100" office:value-type="float" office:value="5.04878866925532" calcext:value-type="float">
            <text:p>5.0</text:p>
          </table:table-cell>
          <table:table-cell table:number-columns-repeated="986"/>
        </table:table-row>
        <table:table-row table:style-name="ro2">
          <table:table-cell table:number-columns-repeated="20"/>
          <table:table-cell office:value-type="float" office:value="1084905" calcext:value-type="float">
            <text:p>1084905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073791" calcext:value-type="float">
            <text:p>1073791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082662" calcext:value-type="float">
            <text:p>1082662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095580" calcext:value-type="float">
            <text:p>1095580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092684" calcext:value-type="float">
            <text:p>1092684</text:p>
          </table:table-cell>
          <table:table-cell table:formula="of:=SUM([.U55:.U59])/5" office:value-type="float" office:value="1085924.4" calcext:value-type="float">
            <text:p>1085924</text:p>
          </table:table-cell>
          <table:table-cell table:formula="of:=(MAX([.U55:.U58])-MIN([.U55:.U58]))/[.V59]*100" office:value-type="float" office:value="2.00649326969723" calcext:value-type="float">
            <text:p>2.0</text:p>
          </table:table-cell>
          <table:table-cell table:number-columns-repeated="986"/>
        </table:table-row>
        <table:table-row table:style-name="ro2">
          <table:table-cell table:number-columns-repeated="20"/>
          <table:table-cell office:value-type="float" office:value="1205750" calcext:value-type="float">
            <text:p>1205750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188471" calcext:value-type="float">
            <text:p>1188471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219844" calcext:value-type="float">
            <text:p>1219844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175662" calcext:value-type="float">
            <text:p>1175662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207639" calcext:value-type="float">
            <text:p>1207639</text:p>
          </table:table-cell>
          <table:table-cell table:formula="of:=SUM([.U60:.U64])/5" office:value-type="float" office:value="1199473.2" calcext:value-type="float">
            <text:p>1199473</text:p>
          </table:table-cell>
          <table:table-cell table:formula="of:=(MAX([.U60:.U63])-MIN([.U60:.U63]))/[.V64]*100" office:value-type="float" office:value="3.68345036804491" calcext:value-type="float">
            <text:p>3.7</text:p>
          </table:table-cell>
          <table:table-cell table:number-columns-repeated="986"/>
        </table:table-row>
        <table:table-row table:style-name="ro2">
          <table:table-cell table:number-columns-repeated="20"/>
          <table:table-cell office:value-type="float" office:value="1404845" calcext:value-type="float">
            <text:p>1404845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399177" calcext:value-type="float">
            <text:p>1399177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434430" calcext:value-type="float">
            <text:p>1434430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417323" calcext:value-type="float">
            <text:p>1417323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428968" calcext:value-type="float">
            <text:p>1428968</text:p>
          </table:table-cell>
          <table:table-cell table:formula="of:=SUM([.U65:.U69])/5" office:value-type="float" office:value="1416948.6" calcext:value-type="float">
            <text:p>1416949</text:p>
          </table:table-cell>
          <table:table-cell table:formula="of:=(MAX([.U65:.U68])-MIN([.U65:.U68]))/[.V69]*100" office:value-type="float" office:value="2.48795192712001" calcext:value-type="float">
            <text:p>2.5</text:p>
          </table:table-cell>
          <table:table-cell table:number-columns-repeated="986"/>
        </table:table-row>
        <table:table-row table:style-name="ro2">
          <table:table-cell table:number-columns-repeated="20"/>
          <table:table-cell office:value-type="float" office:value="1502457" calcext:value-type="float">
            <text:p>1502457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504837" calcext:value-type="float">
            <text:p>1504837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<text:span text:style-name="T8">Regression</text:span></text:p>
          </table:table-cell>
          <table:table-cell table:number-columns-repeated="6"/>
          <table:table-cell office:value-type="string" calcext:value-type="string">
            <text:p><text:span text:style-name="T8">Regression</text:span></text:p>
          </table:table-cell>
          <table:table-cell table:number-columns-repeated="11"/>
          <table:table-cell office:value-type="float" office:value="1524086" calcext:value-type="float">
            <text:p>1524086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0"/>
          <table:table-cell office:value-type="float" office:value="1554010" calcext:value-type="float">
            <text:p>1554010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549983" calcext:value-type="float">
            <text:p>1549983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1"/>
          <table:table-cell office:value-type="float" office:value="1512338" calcext:value-type="float">
            <text:p>1512338</text:p>
          </table:table-cell>
          <table:table-cell table:number-columns-repeated="988"/>
        </table:table-row>
        <table:table-row table:style-name="ro2">
          <table:table-cell/>
          <table:table-cell table:number-matrix-columns-spanned="2" table:number-matrix-rows-spanned="5" table:formula="of:=LINEST([.$G$22:.$G$26] ; [.$E$22:.$E$26] ; 0 ; 1)" office:value-type="float" office:value="493565.993981915" calcext:value-type="float">
            <text:p>493565.99398191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0"/>
          <table:table-cell office:value-type="float" office:value="1494015" calcext:value-type="float">
            <text:p>149401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712.16386261881" calcext:value-type="float">
            <text:p>712.16386261881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0"/>
          <table:table-cell office:value-type="float" office:value="1540956" calcext:value-type="float">
            <text:p>1540956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0.999991672286416" calcext:value-type="float">
            <text:p>0.999991672286416</text:p>
          </table:table-cell>
          <table:table-cell office:value-type="float" office:value="674.18390408946" calcext:value-type="float">
            <text:p>674.18390408946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0"/>
          <table:table-cell office:value-type="float" office:value="1535685" calcext:value-type="float">
            <text:p>153568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480319.915990291" calcext:value-type="float">
            <text:p>480319.91599029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1543844" calcext:value-type="float">
            <text:p>1543844</text:p>
          </table:table-cell>
          <table:table-cell table:formula="of:=SUM([.U70:.U79])/10" office:value-type="float" office:value="1526221.1" calcext:value-type="float">
            <text:p>1526221</text:p>
          </table:table-cell>
          <table:table-cell table:formula="of:=(MAX([.U70:.U78])-MIN([.U70:.U78]))/[.V79]*100" office:value-type="float" office:value="3.93095076460416" calcext:value-type="float">
            <text:p>3.9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218316899011.254" calcext:value-type="float">
            <text:p>218316899011.254</text:p>
          </table:table-cell>
          <table:table-cell office:value-type="float" office:value="1818095.74613323" calcext:value-type="float">
            <text:p>1818095.74613323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0"/>
          <table:table-cell office:value-type="float" office:value="1665079" calcext:value-type="float">
            <text:p>1665079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647703" calcext:value-type="float">
            <text:p>1647703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1"/>
          <table:table-cell office:value-type="float" office:value="1659088" calcext:value-type="float">
            <text:p>1659088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991672286416" calcext:value-type="float">
            <text:p>0.999991672286416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string" office:string-value="" calcext:value-type="error">
            <text:p>Err:502</text:p>
          </table:table-cell>
          <table:table-cell table:number-columns-repeated="10"/>
          <table:table-cell office:value-type="float" office:value="1647890" calcext:value-type="float">
            <text:p>1647890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674.18390408946" calcext:value-type="float">
            <text:p>674.18390408946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string" office:string-value="" calcext:value-type="error">
            <text:p>Err:502</text:p>
          </table:table-cell>
          <table:table-cell table:number-columns-repeated="10"/>
          <table:table-cell office:value-type="float" office:value="1649454" calcext:value-type="float">
            <text:p>1649454</text:p>
          </table:table-cell>
          <table:table-cell table:formula="of:=SUM([.U80:.U84])/5" office:value-type="float" office:value="1653842.8" calcext:value-type="float">
            <text:p>1653843</text:p>
          </table:table-cell>
          <table:table-cell table:formula="of:=(MAX([.U80:.U83])-MIN([.U80:.U83]))/[.V84]*100" office:value-type="float" office:value="1.0506439910734" calcext:value-type="float">
            <text:p>1.1</text:p>
          </table:table-cell>
          <table:table-cell table:number-columns-repeated="986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"/>
          <table:table-cell office:value-type="float" office:value="1793367" calcext:value-type="float">
            <text:p>1793367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0"/>
          <table:table-cell office:value-type="float" office:value="1751541" calcext:value-type="float">
            <text:p>1751541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991672286416" calcext:value-type="float">
            <text:p>0.999991672286416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string" office:string-value="" calcext:value-type="error">
            <text:p>Err:502</text:p>
          </table:table-cell>
          <table:table-cell table:number-columns-repeated="10"/>
          <table:table-cell office:value-type="float" office:value="1770996" calcext:value-type="float">
            <text:p>1770996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775754" calcext:value-type="float">
            <text:p>1775754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1"/>
          <table:table-cell office:value-type="float" office:value="1762332" calcext:value-type="float">
            <text:p>1762332</text:p>
          </table:table-cell>
          <table:table-cell table:formula="of:=SUM([.U85:.U89])/5" office:value-type="float" office:value="1770798" calcext:value-type="float">
            <text:p>1770798</text:p>
          </table:table-cell>
          <table:table-cell table:formula="of:=(MAX([.U85:.U88])-MIN([.U85:.U88]))/[.V89]*100" office:value-type="float" office:value="2.36198595209617" calcext:value-type="float">
            <text:p>2.4</text:p>
          </table:table-cell>
          <table:table-cell table:number-columns-repeated="986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  <table:table-cell office:value-type="float" office:value="1847092" calcext:value-type="float">
            <text:p>1847092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218316899011.254" calcext:value-type="float">
            <text:p>218316899011.254</text:p>
          </table:table-cell>
          <table:table-cell table:formula="of:=[.$B$80] / [.$C$91]" office:value-type="float" office:value="218316899011.254" calcext:value-type="float">
            <text:p>218316899011.254</text:p>
          </table:table-cell>
          <table:table-cell table:formula="of:=[.$B$79]" office:value-type="float" office:value="480319.915990291" calcext:value-type="float">
            <text:p>480319.915990291</text:p>
          </table:table-cell>
          <table:table-cell table:formula="of:=LEGACY.FDIST([.$B$79] ; [.$C$91] ; [.$C$79])" office:value-type="float" office:value="0.0000000000260066272696178" calcext:value-type="float">
            <text:p>2.60066272696178E-11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string" office:string-value="" calcext:value-type="error">
            <text:p>Err:502</text:p>
          </table:table-cell>
          <table:table-cell table:formula="of:=[.$I$80] / [.$J$91]" office:value-type="string" office:string-value="" calcext:value-type="error">
            <text:p>Err:502</text:p>
          </table:table-cell>
          <table:table-cell table:formula="of:=[.$I$79]" office:value-type="string" office:string-value="" calcext:value-type="error">
            <text:p>Err:502</text:p>
          </table:table-cell>
          <table:table-cell table:formula="of:=LEGACY.FDIST([.$I$79] ; [.$J$91] ; [.$J$79])" office:value-type="string" office:string-value="" calcext:value-type="error">
            <text:p>Err:502</text:p>
          </table:table-cell>
          <table:table-cell table:number-columns-repeated="6"/>
          <table:table-cell office:value-type="float" office:value="1833359" calcext:value-type="float">
            <text:p>1833359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1818095.74613323" calcext:value-type="float">
            <text:p>1818095.74613323</text:p>
          </table:table-cell>
          <table:table-cell table:formula="of:=[.$C$80] / [.$C$79]" office:value-type="float" office:value="454523.936533306" calcext:value-type="float">
            <text:p>454523.936533306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string" office:string-value="" calcext:value-type="error">
            <text:p>Err:502</text:p>
          </table:table-cell>
          <table:table-cell table:formula="of:=[.$J$80] / [.$J$79]" office:value-type="string" office:string-value="" calcext:value-type="error">
            <text:p>Err:502</text:p>
          </table:table-cell>
          <table:table-cell table:number-columns-repeated="8"/>
          <table:table-cell office:value-type="float" office:value="1903999" calcext:value-type="float">
            <text:p>1903999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218318717107" calcext:value-type="float">
            <text:p>218318717107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string" office:string-value="" calcext:value-type="error">
            <text:p>Err:502</text:p>
          </table:table-cell>
          <table:table-cell table:number-columns-repeated="9"/>
          <table:table-cell office:value-type="float" office:value="1839722" calcext:value-type="float">
            <text:p>1839722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879761" calcext:value-type="float">
            <text:p>1879761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"/>
          <table:table-cell office:value-type="float" office:value="1826056" calcext:value-type="float">
            <text:p>1826056</text:p>
          </table:table-cell>
          <table:table-cell table:number-columns-repeated="988"/>
        </table:table-row>
        <table:table-row table:style-name="ro2">
          <table:table-cell table:number-columns-repeated="20"/>
          <table:table-cell office:value-type="float" office:value="1813477" calcext:value-type="float">
            <text:p>1813477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5"/>
          <table:table-cell office:value-type="float" office:value="1885554" calcext:value-type="float">
            <text:p>1885554</text:p>
          </table:table-cell>
          <table:table-cell table:number-columns-repeated="988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INDEX([.$I$77:.$J$77]; 1 ; ROW([.$K$99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[.$J$98:.$J$99] / [.$K$98:.$K$99]" office:value-type="string" office:string-value="" calcext:value-type="error">
            <text:p>Err:502</text:p>
          </table:table-cell>
          <table:table-cell table:number-matrix-columns-spanned="1" table:number-matrix-rows-spanned="2" table:formula="of:=LEGACY.TDIST(ABS([.$L$98:.$L$99]) ; [.$J$79] ; 2 )" office:value-type="string" office:string-value="" calcext:value-type="error">
            <text:p>Err:502</text:p>
          </table:table-cell>
          <table:table-cell table:number-matrix-columns-spanned="1" table:number-matrix-rows-spanned="2" table:formula="of:=[.$J$98:.$J$99] - [.$K$98:.$K$99] * TINV(1 - [.$J$95] ; [.$J$79])" office:value-type="string" office:string-value="" calcext:value-type="error">
            <text:p>Err:502</text:p>
          </table:table-cell>
          <table:table-cell table:number-matrix-columns-spanned="1" table:number-matrix-rows-spanned="2" table:formula="of:=[.$J$98:.$J$99] + [.$K$98:.$K$99] * TINV(1 - [.$J$95] ; [.$J$79]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1836044" calcext:value-type="float">
            <text:p>1836044</text:p>
          </table:table-cell>
          <table:table-cell table:number-columns-repeated="988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493565.993981915" calcext:value-type="float">
            <text:p>493565.993981915</text:p>
          </table:table-cell>
          <table:table-cell office:value-type="float" office:value="712.16386261881" calcext:value-type="float">
            <text:p>712.16386261881</text:p>
          </table:table-cell>
          <table:table-cell office:value-type="float" office:value="693.051164049445" calcext:value-type="float">
            <text:p>693.051164049445</text:p>
          </table:table-cell>
          <table:table-cell office:value-type="float" office:value="0.0000000000260066272696178" calcext:value-type="float">
            <text:p>2.60066272696178E-11</text:p>
          </table:table-cell>
          <table:table-cell office:value-type="float" office:value="491588.710111449" calcext:value-type="float">
            <text:p>491588.710111449</text:p>
          </table:table-cell>
          <table:table-cell office:value-type="float" office:value="495543.277852382" calcext:value-type="float">
            <text:p>495543.277852382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5"/>
          <table:table-cell office:value-type="float" office:value="1841236" calcext:value-type="float">
            <text:p>1841236</text:p>
          </table:table-cell>
          <table:table-cell table:formula="of:=SUM([.U90:.U99])/10" office:value-type="float" office:value="1850630" calcext:value-type="float">
            <text:p>1850630</text:p>
          </table:table-cell>
          <table:table-cell table:formula="of:=(MAX([.U90:.U98])-MIN([.U90:.U98]))/[.V99]*100" office:value-type="float" office:value="4.89141535585179" calcext:value-type="float">
            <text:p>4.9</text:p>
          </table:table-cell>
          <table:table-cell table:number-columns-repeated="986"/>
        </table:table-row>
        <table:table-row table:style-name="ro2">
          <table:table-cell table:number-columns-repeated="21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6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935659.93981915" calcext:value-type="float">
            <text:p>4935659.93981915</text:p>
          </table:table-cell>
          <table:table-cell office:value-type="float" office:value="85330" calcext:value-type="float">
            <text:p>85330</text:p>
          </table:table-cell>
          <table:table-cell office:value-type="float" office:value="-4850329.93981915" calcext:value-type="float">
            <text:p>-4850329.93981915</text:p>
          </table:table-cell>
          <table:table-cell table:number-columns-repeated="16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9871319.87963831" calcext:value-type="float">
            <text:p>9871319.87963831</text:p>
          </table:table-cell>
          <table:table-cell office:value-type="float" office:value="169766" calcext:value-type="float">
            <text:p>169766</text:p>
          </table:table-cell>
          <table:table-cell office:value-type="float" office:value="-9701553.87963831" calcext:value-type="float">
            <text:p>-9701553.87963831</text:p>
          </table:table-cell>
          <table:table-cell table:number-columns-repeated="16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4806979.8194575" calcext:value-type="float">
            <text:p>14806979.8194575</text:p>
          </table:table-cell>
          <table:table-cell office:value-type="float" office:value="255753" calcext:value-type="float">
            <text:p>255753</text:p>
          </table:table-cell>
          <table:table-cell office:value-type="float" office:value="-14551226.8194575" calcext:value-type="float">
            <text:p>-14551226.8194575</text:p>
          </table:table-cell>
          <table:table-cell table:number-columns-repeated="16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9742639.7592766" calcext:value-type="float">
            <text:p>19742639.7592766</text:p>
          </table:table-cell>
          <table:table-cell office:value-type="float" office:value="341771" calcext:value-type="float">
            <text:p>341771</text:p>
          </table:table-cell>
          <table:table-cell office:value-type="float" office:value="-19400868.7592766" calcext:value-type="float">
            <text:p>-19400868.7592766</text:p>
          </table:table-cell>
          <table:table-cell table:number-columns-repeated="16"/>
          <table:table-cell table:style-name="Default" table:number-columns-repeated="2"/>
          <table:table-cell table:number-columns-repeated="986"/>
        </table:table-row>
      </table:table>
      <table:table table:name="Annex B Coincidence Limit_3" table:style-name="ta1">
        <table:shapes>
          <draw:frame draw:z-index="0" draw:style-name="gr3" draw:text-style-name="P2" svg:width="20.348cm" svg:height="15.238cm" svg:x="24.908cm" svg:y="23.146cm">
            <draw:object draw:notify-on-update-of-ranges="'Annex A Preliminary Check'.I22:'Annex B Coincidence Limit'.I36 'ISO 11171_2020 Summary'.A1:'ISO 11171_2020 Summary'.A1 'Annex A Preliminary Check'.M22:'Annex B Coincidence Limit'.M3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name="Text Frame 1" draw:style-name="gr4" draw:text-style-name="P1" svg:width="11.201cm" svg:height="15.848cm" svg:x="31.597cm" svg:y="1.901cm">
            <draw:text-box>
              <text:p><text:span text:style-name="T2">Procedure – Using Calibration Rig</text:span></text:p>
              <text:p><text:span text:style-name="T1"/></text:p>
              <text:p><text:span text:style-name="T1">Make up concentrated suspension of RM8632a such that about 10ml of concentrate increases the tank contamination level by 10% of the estimated coincidence limit. Use the calculator in this worksheet to establish and record mass of dust and fluid volumes.</text:span></text:p>
              <text:p><text:span text:style-name="T1"/></text:p>
              <text:p><text:span text:style-name="T1">Add successive doses of concentrate, performing flushing and 5-portion tests after each one.</text:span></text:p>
              <text:p><text:span text:style-name="T1"/></text:p>
              <text:p><text:span text:style-name="T1">When the results have stabilized after each addition, record the most recent tests. We are only interested in the 4μm <text:s/>channel counts for this process.</text:span></text:p>
              <text:p><text:span text:style-name="T1"/></text:p>
              <text:p><text:span text:style-name="T1">The optimum flush / stabilization time can be judged by continuously testing and observing the counts. This was about 2 minutes flushing after dosing then perform two 5-portion tests.</text:span></text:p>
              <text:p><text:span text:style-name="T1"/></text:p>
              <text:p><text:span text:style-name="T1">The results are then imported into this spreadsheet and the portions averaged for each dose level.</text:span></text:p>
              <text:p><text:span text:style-name="T1"/></text:p>
              <text:p><text:span text:style-name="T1">The averages are entered into the table as well as the added ml of concentrate for each dose.</text:span></text:p>
              <text:p><text:span text:style-name="T1"/></text:p>
              <text:p><text:span text:style-name="T1">The counts are plotted in the figure and the first 4 results (10,20,30,40% nominal coincidence limit) used to generate a linear regression line.</text:span></text:p>
              <text:p><text:span text:style-name="T1"/></text:p>
              <text:p><text:span text:style-name="T1"/></text:p>
            </draw:text-box>
          </draw:frame>
        </table:shapes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981" table:default-cell-style-name="Default"/>
        <table:table-row table:style-name="ro8">
          <table:table-cell table:style-name="ce99" office:value-type="string" calcext:value-type="string">
            <text:p>Δ<text:span text:style-name="T3">COUNTS_4um</text:span> &lt; 5%</text:p>
          </table:table-cell>
          <table:table-cell table:style-name="ce108" office:value-type="string" calcext:value-type="string">
            <text:p>RM8632x</text:p>
          </table:table-cell>
          <table:table-cell table:style-name="ce99" office:value-type="string" calcext:value-type="string" table:number-columns-spanned="10" table:number-rows-spanned="1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08"/>
          <table:table-cell table:style-name="ce27"/>
          <table:table-cell/>
          <table:table-cell table:style-name="ce190" office:value-type="string" calcext:value-type="string">
            <text:p>REFERENCE COUNTER</text:p>
          </table:table-cell>
          <table:table-cell table:style-name="ce27"/>
          <table:table-cell table:number-columns-repeated="128"/>
          <table:table-cell table:style-name="ce27" table:number-columns-repeated="865"/>
        </table:table-row>
        <table:table-row table:style-name="ro2">
          <table:table-cell table:style-name="ce184" office:value-type="date" office:date-value="2025-05-09" calcext:value-type="date">
            <text:p>2025-05-09</text:p>
          </table:table-cell>
          <table:table-cell table:number-columns-repeated="1008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24"/>
          <table:table-cell table:style-name="ce28" office:value-type="string" calcext:value-type="string">
            <text:p>portion</text:p>
          </table:table-cell>
          <table:table-cell table:style-name="ce28"/>
          <table:table-cell table:number-columns-repeated="980"/>
        </table:table-row>
        <table:table-row table:style-name="ro2">
          <table:table-cell table:number-columns-repeated="27"/>
          <table:table-cell table:style-name="ce28" office:value-type="string" calcext:value-type="string">
            <text:p>counts</text:p>
          </table:table-cell>
          <table:table-cell table:style-name="ce28" office:value-type="string" calcext:value-type="string">
            <text:p>Averaged</text:p>
          </table:table-cell>
          <table:table-cell office:value-type="string" calcext:value-type="string">
            <text:p>Dq % (&lt;11%)</text:p>
          </table:table-cell>
          <table:table-cell office:value-type="string" calcext:value-type="string">
            <text:p>D<text:span text:style-name="T7">Q</text:span></text:p>
          </table:table-cell>
          <table:table-cell office:value-type="string" calcext:value-type="string">
            <text:p>RAW DATA</text:p>
          </table:table-cell>
          <table:table-cell table:number-columns-repeated="977"/>
        </table:table-row>
        <table:table-row table:style-name="ro2">
          <table:table-cell table:number-columns-repeated="27"/>
          <table:table-cell office:value-type="float" office:value="290033" calcext:value-type="float">
            <text:p>290033</text:p>
          </table:table-cell>
          <table:table-cell table:style-name="ce27"/>
          <table:table-cell table:number-columns-repeated="2"/>
          <table:table-cell office:value-type="string" calcext:value-type="string">
            <text:p>portion</text:p>
          </table:table-cell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946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24"/>
          <table:table-cell office:value-type="float" office:value="283581" calcext:value-type="float">
            <text:p>2835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.459429" calcext:value-type="float">
            <text:p>7.459429</text:p>
          </table:table-cell>
          <table:table-cell office:value-type="float" office:value="21635" calcext:value-type="float">
            <text:p>21635</text:p>
          </table:table-cell>
          <table:table-cell office:value-type="float" office:value="11699" calcext:value-type="float">
            <text:p>11699</text:p>
          </table:table-cell>
          <table:table-cell office:value-type="float" office:value="6142" calcext:value-type="float">
            <text:p>6142</text:p>
          </table:table-cell>
          <table:table-cell office:value-type="float" office:value="2802" calcext:value-type="float">
            <text:p>2802</text:p>
          </table:table-cell>
          <table:table-cell office:value-type="float" office:value="1351" calcext:value-type="float">
            <text:p>1351</text:p>
          </table:table-cell>
          <table:table-cell office:value-type="float" office:value="653" calcext:value-type="float">
            <text:p>653</text:p>
          </table:table-cell>
          <table:table-cell office:value-type="float" office:value="281" calcext:value-type="float">
            <text:p>281</text:p>
          </table:table-cell>
          <table:table-cell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office:value-type="float" office:value="10.33" calcext:value-type="float">
            <text:p>10.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24"/>
          <table:table-cell office:value-type="float" office:value="295745" calcext:value-type="float">
            <text:p>295745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7.769633" calcext:value-type="float">
            <text:p>7.769633</text:p>
          </table:table-cell>
          <table:table-cell office:value-type="float" office:value="22033" calcext:value-type="float">
            <text:p>22033</text:p>
          </table:table-cell>
          <table:table-cell office:value-type="float" office:value="11761" calcext:value-type="float">
            <text:p>11761</text:p>
          </table:table-cell>
          <table:table-cell office:value-type="float" office:value="6287" calcext:value-type="float">
            <text:p>6287</text:p>
          </table:table-cell>
          <table:table-cell office:value-type="float" office:value="2944" calcext:value-type="float">
            <text:p>2944</text:p>
          </table:table-cell>
          <table:table-cell office:value-type="float" office:value="1444" calcext:value-type="float">
            <text:p>1444</text:p>
          </table:table-cell>
          <table:table-cell office:value-type="float" office:value="677" calcext:value-type="float">
            <text:p>677</text:p>
          </table:table-cell>
          <table:table-cell office:value-type="float" office:value="298" calcext:value-type="float">
            <text:p>298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formula="of:=[.A3]" office:value-type="float" office:value="40000" calcext:value-type="float">
            <text:p>4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24"/>
          <table:table-cell office:value-type="float" office:value="286737" calcext:value-type="float">
            <text:p>286737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7.714024" calcext:value-type="float">
            <text:p>7.714024</text:p>
          </table:table-cell>
          <table:table-cell office:value-type="float" office:value="22814" calcext:value-type="float">
            <text:p>22814</text:p>
          </table:table-cell>
          <table:table-cell office:value-type="float" office:value="12215" calcext:value-type="float">
            <text:p>12215</text:p>
          </table:table-cell>
          <table:table-cell office:value-type="float" office:value="6418" calcext:value-type="float">
            <text:p>6418</text:p>
          </table:table-cell>
          <table:table-cell office:value-type="float" office:value="2877" calcext:value-type="float">
            <text:p>2877</text:p>
          </table:table-cell>
          <table:table-cell office:value-type="float" office:value="1410" calcext:value-type="float">
            <text:p>1410</text:p>
          </table:table-cell>
          <table:table-cell office:value-type="float" office:value="688" calcext:value-type="float">
            <text:p>688</text:p>
          </table:table-cell>
          <table:table-cell office:value-type="float" office:value="329" calcext:value-type="float">
            <text:p>329</text:p>
          </table:table-cell>
          <table:table-cell office:value-type="float" office:value="158" calcext:value-type="float">
            <text:p>158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formula="of:=[.A8]/10" office:value-type="float" office:value="4000" calcext:value-type="float">
            <text:p>4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24"/>
          <table:table-cell office:value-type="float" office:value="289232" calcext:value-type="float">
            <text:p>289232</text:p>
          </table:table-cell>
          <table:table-cell table:style-name="ce20" table:formula="of:=SUM([.AB5:.AB9])/5" office:value-type="float" office:value="289065.6" calcext:value-type="float">
            <text:p>289066</text:p>
          </table:table-cell>
          <table:table-cell table:style-name="ce76" table:formula="of:=(MAX([.AB5:.AB9])-MIN([.AB5:.AB9]))/[.AC9]*100" office:value-type="float" office:value="4.20804135808619" calcext:value-type="float">
            <text:p>4.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774587" calcext:value-type="float">
            <text:p>7.774587</text:p>
          </table:table-cell>
          <table:table-cell office:value-type="float" office:value="22293" calcext:value-type="float">
            <text:p>22293</text:p>
          </table:table-cell>
          <table:table-cell office:value-type="float" office:value="12053" calcext:value-type="float">
            <text:p>12053</text:p>
          </table:table-cell>
          <table:table-cell office:value-type="float" office:value="6278" calcext:value-type="float">
            <text:p>6278</text:p>
          </table:table-cell>
          <table:table-cell office:value-type="float" office:value="2889" calcext:value-type="float">
            <text:p>2889</text:p>
          </table:table-cell>
          <table:table-cell office:value-type="float" office:value="1440" calcext:value-type="float">
            <text:p>1440</text:p>
          </table:table-cell>
          <table:table-cell office:value-type="float" office:value="649" calcext:value-type="float">
            <text:p>649</text:p>
          </table:table-cell>
          <table:table-cell office:value-type="float" office:value="264" calcext:value-type="float">
            <text:p>264</text:p>
          </table:table-cell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32" table:formula="of:=[.A9]/[.A6]*[.A7]" office:value-type="float" office:value="6.55873015873016" calcext:value-type="float">
            <text:p>6.55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24"/>
          <table:table-cell office:value-type="float" office:value="289048" calcext:value-type="float">
            <text:p>289048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7.753153" calcext:value-type="float">
            <text:p>7.753153</text:p>
          </table:table-cell>
          <table:table-cell office:value-type="float" office:value="22425" calcext:value-type="float">
            <text:p>22425</text:p>
          </table:table-cell>
          <table:table-cell office:value-type="float" office:value="11967" calcext:value-type="float">
            <text:p>11967</text:p>
          </table:table-cell>
          <table:table-cell office:value-type="float" office:value="6341" calcext:value-type="float">
            <text:p>6341</text:p>
          </table:table-cell>
          <table:table-cell office:value-type="float" office:value="2914" calcext:value-type="float">
            <text:p>2914</text:p>
          </table:table-cell>
          <table:table-cell office:value-type="float" office:value="1440" calcext:value-type="float">
            <text:p>1440</text:p>
          </table:table-cell>
          <table:table-cell office:value-type="float" office:value="679" calcext:value-type="float">
            <text:p>679</text:p>
          </table:table-cell>
          <table:table-cell office:value-type="float" office:value="269" calcext:value-type="float">
            <text:p>269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3" table:formula="of:=[.A10]*100" office:value-type="float" office:value="655.873015873016" calcext:value-type="float">
            <text:p>655.87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24"/>
          <table:table-cell office:value-type="float" office:value="620858" calcext:value-type="float">
            <text:p>620858</text:p>
          </table:table-cell>
          <table:table-cell table:style-name="ce20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8.470829" calcext:value-type="float">
            <text:p>38.470829</text:p>
          </table:table-cell>
          <table:table-cell office:value-type="float" office:value="111199" calcext:value-type="float">
            <text:p>111199</text:p>
          </table:table-cell>
          <table:table-cell office:value-type="float" office:value="59695" calcext:value-type="float">
            <text:p>59695</text:p>
          </table:table-cell>
          <table:table-cell office:value-type="float" office:value="31466" calcext:value-type="float">
            <text:p>31466</text:p>
          </table:table-cell>
          <table:table-cell office:value-type="float" office:value="14425" calcext:value-type="float">
            <text:p>14425</text:p>
          </table:table-cell>
          <table:table-cell office:value-type="float" office:value="7085" calcext:value-type="float">
            <text:p>7085</text:p>
          </table:table-cell>
          <table:table-cell office:value-type="float" office:value="3345" calcext:value-type="float">
            <text:p>3345</text:p>
          </table:table-cell>
          <table:table-cell office:value-type="float" office:value="1439" calcext:value-type="float">
            <text:p>1439</text:p>
          </table:table-cell>
          <table:table-cell office:value-type="float" office:value="643" calcext:value-type="float">
            <text:p>643</text:p>
          </table:table-cell>
          <table:table-cell office:value-type="float" office:value="348" calcext:value-type="float">
            <text:p>348</text:p>
          </table:table-cell>
          <table:table-cell office:value-type="float" office:value="187" calcext:value-type="float">
            <text:p>187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24"/>
          <table:table-cell office:value-type="float" office:value="592927" calcext:value-type="float">
            <text:p>592927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7.45814" calcext:value-type="float">
            <text:p>7.45814</text:p>
          </table:table-cell>
          <table:table-cell office:value-type="float" office:value="46305" calcext:value-type="float">
            <text:p>46305</text:p>
          </table:table-cell>
          <table:table-cell office:value-type="float" office:value="25502" calcext:value-type="float">
            <text:p>25502</text:p>
          </table:table-cell>
          <table:table-cell office:value-type="float" office:value="13692" calcext:value-type="float">
            <text:p>13692</text:p>
          </table:table-cell>
          <table:table-cell office:value-type="float" office:value="6477" calcext:value-type="float">
            <text:p>6477</text:p>
          </table:table-cell>
          <table:table-cell office:value-type="float" office:value="3200" calcext:value-type="float">
            <text:p>3200</text:p>
          </table:table-cell>
          <table:table-cell office:value-type="float" office:value="1508" calcext:value-type="float">
            <text:p>1508</text:p>
          </table:table-cell>
          <table:table-cell office:value-type="float" office:value="653" calcext:value-type="float">
            <text:p>653</text:p>
          </table:table-cell>
          <table:table-cell office:value-type="float" office:value="308" calcext:value-type="float">
            <text:p>308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3" table:formula="of:=[.A11]*[.A12]/1000" office:value-type="float" office:value="131.174603174603" calcext:value-type="float">
            <text:p>131.1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24"/>
          <table:table-cell office:value-type="float" office:value="604163" calcext:value-type="float">
            <text:p>604163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7.772765" calcext:value-type="float">
            <text:p>7.772765</text:p>
          </table:table-cell>
          <table:table-cell office:value-type="float" office:value="46087" calcext:value-type="float">
            <text:p>46087</text:p>
          </table:table-cell>
          <table:table-cell office:value-type="float" office:value="25486" calcext:value-type="float">
            <text:p>25486</text:p>
          </table:table-cell>
          <table:table-cell office:value-type="float" office:value="13770" calcext:value-type="float">
            <text:p>13770</text:p>
          </table:table-cell>
          <table:table-cell office:value-type="float" office:value="6551" calcext:value-type="float">
            <text:p>6551</text:p>
          </table:table-cell>
          <table:table-cell office:value-type="float" office:value="3329" calcext:value-type="float">
            <text:p>3329</text:p>
          </table:table-cell>
          <table:table-cell office:value-type="float" office:value="1565" calcext:value-type="float">
            <text:p>1565</text:p>
          </table:table-cell>
          <table:table-cell office:value-type="float" office:value="707" calcext:value-type="float">
            <text:p>707</text:p>
          </table:table-cell>
          <table:table-cell office:value-type="float" office:value="327" calcext:value-type="float">
            <text:p>327</text:p>
          </table:table-cell>
          <table:table-cell office:value-type="float" office:value="167" calcext:value-type="float">
            <text:p>167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24"/>
          <table:table-cell office:value-type="float" office:value="595968" calcext:value-type="float">
            <text:p>595968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7.728792" calcext:value-type="float">
            <text:p>7.728792</text:p>
          </table:table-cell>
          <table:table-cell office:value-type="float" office:value="46695" calcext:value-type="float">
            <text:p>46695</text:p>
          </table:table-cell>
          <table:table-cell office:value-type="float" office:value="25926" calcext:value-type="float">
            <text:p>25926</text:p>
          </table:table-cell>
          <table:table-cell office:value-type="float" office:value="14082" calcext:value-type="float">
            <text:p>14082</text:p>
          </table:table-cell>
          <table:table-cell office:value-type="float" office:value="6705" calcext:value-type="float">
            <text:p>6705</text:p>
          </table:table-cell>
          <table:table-cell office:value-type="float" office:value="3411" calcext:value-type="float">
            <text:p>3411</text:p>
          </table:table-cell>
          <table:table-cell office:value-type="float" office:value="1634" calcext:value-type="float">
            <text:p>1634</text:p>
          </table:table-cell>
          <table:table-cell office:value-type="float" office:value="713" calcext:value-type="float">
            <text:p>713</text:p>
          </table:table-cell>
          <table:table-cell office:value-type="float" office:value="319" calcext:value-type="float">
            <text:p>319</text:p>
          </table:table-cell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3" table:formula="of:=[.A11]*[.A14]/[.A13]" office:value-type="float" office:value="1295" calcext:value-type="float">
            <text:p>1295.00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24"/>
          <table:table-cell office:value-type="float" office:value="591255" calcext:value-type="float">
            <text:p>591255</text:p>
          </table:table-cell>
          <table:table-cell table:style-name="ce20" table:formula="of:=SUM([.AB11:.AB15])/5" office:value-type="float" office:value="601034.2" calcext:value-type="float">
            <text:p>601034</text:p>
          </table:table-cell>
          <table:table-cell table:style-name="ce76" table:formula="of:=(MAX([.AB11:.AB15])-MIN([.AB11:.AB15]))/[.AC15]*100" office:value-type="float" office:value="4.92534368260575" calcext:value-type="float">
            <text:p>4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780654" calcext:value-type="float">
            <text:p>7.780654</text:p>
          </table:table-cell>
          <table:table-cell office:value-type="float" office:value="46370" calcext:value-type="float">
            <text:p>46370</text:p>
          </table:table-cell>
          <table:table-cell office:value-type="float" office:value="25765" calcext:value-type="float">
            <text:p>25765</text:p>
          </table:table-cell>
          <table:table-cell office:value-type="float" office:value="13872" calcext:value-type="float">
            <text:p>13872</text:p>
          </table:table-cell>
          <table:table-cell office:value-type="float" office:value="6578" calcext:value-type="float">
            <text:p>6578</text:p>
          </table:table-cell>
          <table:table-cell office:value-type="float" office:value="3360" calcext:value-type="float">
            <text:p>3360</text:p>
          </table:table-cell>
          <table:table-cell office:value-type="float" office:value="1540" calcext:value-type="float">
            <text:p>1540</text:p>
          </table:table-cell>
          <table:table-cell office:value-type="float" office:value="682" calcext:value-type="float">
            <text:p>682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3" table:formula="of:=[.A13]/[.A14]*10" office:value-type="float" office:value="5.06465649322792" calcext:value-type="float">
            <text:p>5.0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24"/>
          <table:table-cell office:value-type="float" office:value="600868" calcext:value-type="float">
            <text:p>600868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7.772749" calcext:value-type="float">
            <text:p>7.772749</text:p>
          </table:table-cell>
          <table:table-cell office:value-type="float" office:value="45957" calcext:value-type="float">
            <text:p>45957</text:p>
          </table:table-cell>
          <table:table-cell office:value-type="float" office:value="25443" calcext:value-type="float">
            <text:p>25443</text:p>
          </table:table-cell>
          <table:table-cell office:value-type="float" office:value="13725" calcext:value-type="float">
            <text:p>13725</text:p>
          </table:table-cell>
          <table:table-cell office:value-type="float" office:value="6570" calcext:value-type="float">
            <text:p>6570</text:p>
          </table:table-cell>
          <table:table-cell office:value-type="float" office:value="3387" calcext:value-type="float">
            <text:p>3387</text:p>
          </table:table-cell>
          <table:table-cell office:value-type="float" office:value="1566" calcext:value-type="float">
            <text:p>1566</text:p>
          </table:table-cell>
          <table:table-cell office:value-type="float" office:value="690" calcext:value-type="float">
            <text:p>690</text:p>
          </table:table-cell>
          <table:table-cell office:value-type="float" office:value="311" calcext:value-type="float">
            <text:p>311</text:p>
          </table:table-cell>
          <table:table-cell office:value-type="float" office:value="157" calcext:value-type="float">
            <text:p>157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904994" calcext:value-type="float">
            <text:p>904994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38.5131" calcext:value-type="float">
            <text:p>38.5131</text:p>
          </table:table-cell>
          <table:table-cell office:value-type="float" office:value="231413" calcext:value-type="float">
            <text:p>231413</text:p>
          </table:table-cell>
          <table:table-cell office:value-type="float" office:value="128122" calcext:value-type="float">
            <text:p>128122</text:p>
          </table:table-cell>
          <table:table-cell office:value-type="float" office:value="69140" calcext:value-type="float">
            <text:p>69140</text:p>
          </table:table-cell>
          <table:table-cell office:value-type="float" office:value="32881" calcext:value-type="float">
            <text:p>32881</text:p>
          </table:table-cell>
          <table:table-cell office:value-type="float" office:value="16687" calcext:value-type="float">
            <text:p>16687</text:p>
          </table:table-cell>
          <table:table-cell office:value-type="float" office:value="7813" calcext:value-type="float">
            <text:p>7813</text:p>
          </table:table-cell>
          <table:table-cell office:value-type="float" office:value="3445" calcext:value-type="float">
            <text:p>3445</text:p>
          </table:table-cell>
          <table:table-cell office:value-type="float" office:value="1584" calcext:value-type="float">
            <text:p>1584</text:p>
          </table:table-cell>
          <table:table-cell office:value-type="float" office:value="801" calcext:value-type="float">
            <text:p>801</text:p>
          </table:table-cell>
          <table:table-cell office:value-type="float" office:value="457" calcext:value-type="float">
            <text:p>457</text:p>
          </table:table-cell>
          <table:table-cell office:value-type="float" office:value="287" calcext:value-type="float">
            <text:p>287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188" office:value-type="float" office:value="800000" calcext:value-type="float">
            <text:p>8.00E+05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24"/>
          <table:table-cell office:value-type="float" office:value="886236" calcext:value-type="float">
            <text:p>886236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7.352702" calcext:value-type="float">
            <text:p>7.352702</text:p>
          </table:table-cell>
          <table:table-cell office:value-type="float" office:value="66542" calcext:value-type="float">
            <text:p>66542</text:p>
          </table:table-cell>
          <table:table-cell office:value-type="float" office:value="37684" calcext:value-type="float">
            <text:p>37684</text:p>
          </table:table-cell>
          <table:table-cell office:value-type="float" office:value="20969" calcext:value-type="float">
            <text:p>20969</text:p>
          </table:table-cell>
          <table:table-cell office:value-type="float" office:value="9944" calcext:value-type="float">
            <text:p>9944</text:p>
          </table:table-cell>
          <table:table-cell office:value-type="float" office:value="5146" calcext:value-type="float">
            <text:p>5146</text:p>
          </table:table-cell>
          <table:table-cell office:value-type="float" office:value="2503" calcext:value-type="float">
            <text:p>2503</text:p>
          </table:table-cell>
          <table:table-cell office:value-type="float" office:value="1075" calcext:value-type="float">
            <text:p>1075</text:p>
          </table:table-cell>
          <table:table-cell office:value-type="float" office:value="466" calcext:value-type="float">
            <text:p>466</text:p>
          </table:table-cell>
          <table:table-cell office:value-type="float" office:value="235" calcext:value-type="float">
            <text:p>235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24"/>
          <table:table-cell office:value-type="float" office:value="897089" calcext:value-type="float">
            <text:p>897089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7.70041" calcext:value-type="float">
            <text:p>7.70041</text:p>
          </table:table-cell>
          <table:table-cell office:value-type="float" office:value="68244" calcext:value-type="float">
            <text:p>68244</text:p>
          </table:table-cell>
          <table:table-cell office:value-type="float" office:value="39062" calcext:value-type="float">
            <text:p>39062</text:p>
          </table:table-cell>
          <table:table-cell office:value-type="float" office:value="21708" calcext:value-type="float">
            <text:p>21708</text:p>
          </table:table-cell>
          <table:table-cell office:value-type="float" office:value="10451" calcext:value-type="float">
            <text:p>10451</text:p>
          </table:table-cell>
          <table:table-cell office:value-type="float" office:value="5276" calcext:value-type="float">
            <text:p>5276</text:p>
          </table:table-cell>
          <table:table-cell office:value-type="float" office:value="2451" calcext:value-type="float">
            <text:p>2451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125" office:value-type="string" calcext:value-type="string">
            <text:p>Expected</text:p>
          </table:table-cell>
          <table:table-cell table:style-name="ce145" office:value-type="string" calcext:value-type="string">
            <text:p>4μm</text:p>
          </table:table-cell>
          <table:table-cell table:style-name="ce125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125" office:value-type="string" calcext:value-type="string">
            <text:p>Relative</text:p>
          </table:table-cell>
          <table:table-cell table:style-name="ce125" table:number-columns-repeated="2"/>
          <table:table-cell table:style-name="ce125" office:value-type="string" calcext:value-type="string">
            <text:p>corrected</text:p>
          </table:table-cell>
          <table:table-cell table:number-columns-repeated="14"/>
          <table:table-cell office:value-type="float" office:value="866753" calcext:value-type="float">
            <text:p>866753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7.637308" calcext:value-type="float">
            <text:p>7.637308</text:p>
          </table:table-cell>
          <table:table-cell office:value-type="float" office:value="68514" calcext:value-type="float">
            <text:p>68514</text:p>
          </table:table-cell>
          <table:table-cell office:value-type="float" office:value="39231" calcext:value-type="float">
            <text:p>39231</text:p>
          </table:table-cell>
          <table:table-cell office:value-type="float" office:value="21670" calcext:value-type="float">
            <text:p>21670</text:p>
          </table:table-cell>
          <table:table-cell office:value-type="float" office:value="10461" calcext:value-type="float">
            <text:p>10461</text:p>
          </table:table-cell>
          <table:table-cell office:value-type="float" office:value="5368" calcext:value-type="float">
            <text:p>5368</text:p>
          </table:table-cell>
          <table:table-cell office:value-type="float" office:value="2483" calcext:value-type="float">
            <text:p>2483</text:p>
          </table:table-cell>
          <table:table-cell office:value-type="float" office:value="1064" calcext:value-type="float">
            <text:p>1064</text:p>
          </table:table-cell>
          <table:table-cell office:value-type="float" office:value="501" calcext:value-type="float">
            <text:p>501</text:p>
          </table:table-cell>
          <table:table-cell office:value-type="float" office:value="275" calcext:value-type="float">
            <text:p>275</text:p>
          </table:table-cell>
          <table:table-cell office:value-type="float" office:value="158" calcext:value-type="float">
            <text:p>158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126" office:value-type="string" calcext:value-type="string">
            <text:p>4μm/100ml</text:p>
          </table:table-cell>
          <table:table-cell table:style-name="ce146" office:value-type="string" calcext:value-type="string">
            <text:p>Actual</text:p>
          </table:table-cell>
          <table:table-cell table:style-name="ce126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126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unts</text:p>
          </table:table-cell>
          <table:table-cell table:style-name="ce126" office:value-type="string" calcext:value-type="string">
            <text:p>fraction</text:p>
          </table:table-cell>
          <table:table-cell table:number-columns-repeated="14"/>
          <table:table-cell office:value-type="float" office:value="880408" calcext:value-type="float">
            <text:p>880408</text:p>
          </table:table-cell>
          <table:table-cell table:style-name="ce20" table:formula="of:=SUM([.AB17:.AB21])/5" office:value-type="float" office:value="887096" calcext:value-type="float">
            <text:p>887096</text:p>
          </table:table-cell>
          <table:table-cell table:style-name="ce76" table:formula="of:=(MAX([.AB17:.AB21])-MIN([.AB17:.AB21]))/[.AC21]*100" office:value-type="float" office:value="4.31080739852282" calcext:value-type="float">
            <text:p>4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683317" calcext:value-type="float">
            <text:p>7.683317</text:p>
          </table:table-cell>
          <table:table-cell office:value-type="float" office:value="66595" calcext:value-type="float">
            <text:p>66595</text:p>
          </table:table-cell>
          <table:table-cell office:value-type="float" office:value="37976" calcext:value-type="float">
            <text:p>37976</text:p>
          </table:table-cell>
          <table:table-cell office:value-type="float" office:value="21159" calcext:value-type="float">
            <text:p>21159</text:p>
          </table:table-cell>
          <table:table-cell office:value-type="float" office:value="10166" calcext:value-type="float">
            <text:p>10166</text:p>
          </table:table-cell>
          <table:table-cell office:value-type="float" office:value="5175" calcext:value-type="float">
            <text:p>5175</text:p>
          </table:table-cell>
          <table:table-cell office:value-type="float" office:value="2460" calcext:value-type="float">
            <text:p>2460</text:p>
          </table:table-cell>
          <table:table-cell office:value-type="float" office:value="1065" calcext:value-type="float">
            <text:p>1065</text:p>
          </table:table-cell>
          <table:table-cell office:value-type="float" office:value="482" calcext:value-type="float">
            <text:p>482</text:p>
          </table:table-cell>
          <table:table-cell office:value-type="float" office:value="245" calcext:value-type="float">
            <text:p>245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27"/>
          <table:table-cell table:style-name="ce50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189" office:value-type="float" office:value="1" calcext:value-type="float">
            <text:p>1</text:p>
          </table:table-cell>
          <table:table-cell table:number-columns-repeated="14"/>
          <table:table-cell office:value-type="float" office:value="886929" calcext:value-type="float">
            <text:p>886929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7.674962" calcext:value-type="float">
            <text:p>7.674962</text:p>
          </table:table-cell>
          <table:table-cell office:value-type="float" office:value="67571" calcext:value-type="float">
            <text:p>67571</text:p>
          </table:table-cell>
          <table:table-cell office:value-type="float" office:value="38749" calcext:value-type="float">
            <text:p>38749</text:p>
          </table:table-cell>
          <table:table-cell office:value-type="float" office:value="21630" calcext:value-type="float">
            <text:p>21630</text:p>
          </table:table-cell>
          <table:table-cell office:value-type="float" office:value="10404" calcext:value-type="float">
            <text:p>10404</text:p>
          </table:table-cell>
          <table:table-cell office:value-type="float" office:value="5385" calcext:value-type="float">
            <text:p>5385</text:p>
          </table:table-cell>
          <table:table-cell office:value-type="float" office:value="2509" calcext:value-type="float">
            <text:p>2509</text:p>
          </table:table-cell>
          <table:table-cell office:value-type="float" office:value="1061" calcext:value-type="float">
            <text:p>1061</text:p>
          </table:table-cell>
          <table:table-cell office:value-type="float" office:value="502" calcext:value-type="float">
            <text:p>502</text:p>
          </table:table-cell>
          <table:table-cell office:value-type="float" office:value="257" calcext:value-type="float">
            <text:p>257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5" calcext:value-type="float">
            <text:p>5</text:p>
          </table:table-cell>
          <table:table-cell table:style-name="ce58" table:formula="of:=[.B23]" office:value-type="float" office:value="5" calcext:value-type="float">
            <text:p>5.0</text:p>
          </table:table-cell>
          <table:table-cell table:style-name="ce61" table:formula="of:=[.C23]*[.$A$15]/1000" office:value-type="float" office:value="6.475" calcext:value-type="float">
            <text:p>6.475</text:p>
          </table:table-cell>
          <table:table-cell table:style-name="ce61" table:formula="of:=[.D23]/([.$A$7]+[.C23]/1000)" office:value-type="float" office:value="0.626511852926947" calcext:value-type="float">
            <text:p>0.627</text:p>
          </table:table-cell>
          <table:table-cell table:style-name="ce134" table:formula="of:=[.$A$6]*[.E23]*100" office:value-type="float" office:value="394702.467343977" calcext:value-type="float">
            <text:p>394702</text:p>
          </table:table-cell>
          <table:table-cell table:style-name="ce20" office:value-type="float" office:value="289065.6" calcext:value-type="float">
            <text:p>289066</text:p>
          </table:table-cell>
          <table:table-cell table:style-name="ce150" table:formula="of:=[.G23]/[.F23]" office:value-type="float" office:value="0.732363296194153" calcext:value-type="float">
            <text:p>0.73</text:p>
          </table:table-cell>
          <table:table-cell table:style-name="ce64" table:formula="of:=[.E23]*[.$C$99]" office:value-type="float" office:value="292195.674951406" calcext:value-type="float">
            <text:p>292196</text:p>
          </table:table-cell>
          <table:table-cell table:style-name="ce150" table:formula="of:=[.G23]/[.I23]" office:value-type="float" office:value="0.989287743728834" calcext:value-type="float">
            <text:p>0.99</text:p>
          </table:table-cell>
          <table:table-cell table:style-name="ce64" table:formula="of:=[.I23]*0.95" office:value-type="float" office:value="277585.891203836" calcext:value-type="float">
            <text:p>277586</text:p>
          </table:table-cell>
          <table:table-cell table:style-name="ce72" table:formula="of:=IF([.G23]&lt;[.$A$18]; [.G23]; [.G23]*(1+[.G23]/[.$A$18]*[.$A$19]))" office:value-type="float" office:value="289065.6" calcext:value-type="float">
            <text:p>289065.6</text:p>
          </table:table-cell>
          <table:table-cell table:style-name="ce189" table:formula="of:=[.L23]/[.I23]" office:value-type="float" office:value="0.989287743728834" calcext:value-type="float">
            <text:p>0.989287743728834</text:p>
          </table:table-cell>
          <table:table-cell table:number-columns-repeated="14"/>
          <table:table-cell office:value-type="float" office:value="1176391" calcext:value-type="float">
            <text:p>1176391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38.048698" calcext:value-type="float">
            <text:p>38.048698</text:p>
          </table:table-cell>
          <table:table-cell office:value-type="float" office:value="337465" calcext:value-type="float">
            <text:p>337465</text:p>
          </table:table-cell>
          <table:table-cell office:value-type="float" office:value="192702" calcext:value-type="float">
            <text:p>192702</text:p>
          </table:table-cell>
          <table:table-cell office:value-type="float" office:value="107135" calcext:value-type="float">
            <text:p>107135</text:p>
          </table:table-cell>
          <table:table-cell office:value-type="float" office:value="51426" calcext:value-type="float">
            <text:p>51426</text:p>
          </table:table-cell>
          <table:table-cell office:value-type="float" office:value="26350" calcext:value-type="float">
            <text:p>26350</text:p>
          </table:table-cell>
          <table:table-cell office:value-type="float" office:value="12406" calcext:value-type="float">
            <text:p>12406</text:p>
          </table:table-cell>
          <table:table-cell office:value-type="float" office:value="5317" calcext:value-type="float">
            <text:p>5317</text:p>
          </table:table-cell>
          <table:table-cell office:value-type="float" office:value="2445" calcext:value-type="float">
            <text:p>2445</text:p>
          </table:table-cell>
          <table:table-cell office:value-type="float" office:value="1264" calcext:value-type="float">
            <text:p>1264</text:p>
          </table:table-cell>
          <table:table-cell office:value-type="float" office:value="730" calcext:value-type="float">
            <text:p>730</text:p>
          </table:table-cell>
          <table:table-cell office:value-type="float" office:value="451" calcext:value-type="float">
            <text:p>451</text:p>
          </table:table-cell>
          <table:table-cell office:value-type="float" office:value="316" calcext:value-type="float">
            <text:p>316</text:p>
          </table:table-cell>
          <table:table-cell office:value-type="float" office:value="252" calcext:value-type="float">
            <text:p>252</text:p>
          </table:table-cell>
          <table:table-cell office:value-type="float" office:value="217" calcext:value-type="float">
            <text:p>217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5" calcext:value-type="float">
            <text:p>5</text:p>
          </table:table-cell>
          <table:table-cell table:style-name="ce58" table:formula="of:=[.C23]+[.B24]" office:value-type="float" office:value="10" calcext:value-type="float">
            <text:p>10.0</text:p>
          </table:table-cell>
          <table:table-cell table:style-name="ce61" table:formula="of:=[.C24]*[.$A$15]/1000" office:value-type="float" office:value="12.95" calcext:value-type="float">
            <text:p>12.950</text:p>
          </table:table-cell>
          <table:table-cell table:style-name="ce61" table:formula="of:=[.D24]/([.$A$7]+[.C24]/1000)" office:value-type="float" office:value="1.25241779497099" calcext:value-type="float">
            <text:p>1.252</text:p>
          </table:table-cell>
          <table:table-cell table:style-name="ce134" table:formula="of:=[.$A$6]*[.E24]*100" office:value-type="float" office:value="789023.210831721" calcext:value-type="float">
            <text:p>789023</text:p>
          </table:table-cell>
          <table:table-cell table:style-name="ce20" office:value-type="float" office:value="601034.2" calcext:value-type="float">
            <text:p>601034</text:p>
          </table:table-cell>
          <table:table-cell table:style-name="ce150" table:formula="of:=[.G24]/[.F24]" office:value-type="float" office:value="0.761744637862352" calcext:value-type="float">
            <text:p>0.76</text:p>
          </table:table-cell>
          <table:table-cell table:style-name="ce64" table:formula="of:=[.E24]*[.$C$99]" office:value-type="float" office:value="584108.762209437" calcext:value-type="float">
            <text:p>584109</text:p>
          </table:table-cell>
          <table:table-cell table:style-name="ce150" table:formula="of:=[.G24]/[.I24]" office:value-type="float" office:value="1.02897651753509" calcext:value-type="float">
            <text:p>1.03</text:p>
          </table:table-cell>
          <table:table-cell table:style-name="ce64" table:formula="of:=[.I24]*0.95" office:value-type="float" office:value="554903.324098965" calcext:value-type="float">
            <text:p>554903</text:p>
          </table:table-cell>
          <table:table-cell table:style-name="ce72" table:formula="of:=IF([.G24]&lt;[.$A$18]; [.G24]; [.G24]*(1+[.G24]/[.$A$18]*[.$A$19]))" office:value-type="float" office:value="601034.2" calcext:value-type="float">
            <text:p>601034.2</text:p>
          </table:table-cell>
          <table:table-cell table:style-name="ce189" table:formula="of:=[.L24]/[.I24]" office:value-type="float" office:value="1.02897651753509" calcext:value-type="float">
            <text:p>1.02897651753509</text:p>
          </table:table-cell>
          <table:table-cell table:number-columns-repeated="14"/>
          <table:table-cell office:value-type="float" office:value="1142329" calcext:value-type="float">
            <text:p>1142329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7.227338" calcext:value-type="float">
            <text:p>7.227338</text:p>
          </table:table-cell>
          <table:table-cell office:value-type="float" office:value="85022" calcext:value-type="float">
            <text:p>85022</text:p>
          </table:table-cell>
          <table:table-cell office:value-type="float" office:value="49810" calcext:value-type="float">
            <text:p>49810</text:p>
          </table:table-cell>
          <table:table-cell office:value-type="float" office:value="28130" calcext:value-type="float">
            <text:p>28130</text:p>
          </table:table-cell>
          <table:table-cell office:value-type="float" office:value="13794" calcext:value-type="float">
            <text:p>13794</text:p>
          </table:table-cell>
          <table:table-cell office:value-type="float" office:value="7227" calcext:value-type="float">
            <text:p>7227</text:p>
          </table:table-cell>
          <table:table-cell office:value-type="float" office:value="3492" calcext:value-type="float">
            <text:p>3492</text:p>
          </table:table-cell>
          <table:table-cell office:value-type="float" office:value="1581" calcext:value-type="float">
            <text:p>1581</text:p>
          </table:table-cell>
          <table:table-cell office:value-type="float" office:value="716" calcext:value-type="float">
            <text:p>716</text:p>
          </table:table-cell>
          <table:table-cell office:value-type="float" office:value="371" calcext:value-type="float">
            <text:p>371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5" calcext:value-type="float">
            <text:p>5</text:p>
          </table:table-cell>
          <table:table-cell table:style-name="ce58" table:formula="of:=[.C24]+[.B25]" office:value-type="float" office:value="15" calcext:value-type="float">
            <text:p>15.0</text:p>
          </table:table-cell>
          <table:table-cell table:style-name="ce61" table:formula="of:=[.C25]*[.$A$15]/1000" office:value-type="float" office:value="19.425" calcext:value-type="float">
            <text:p>19.425</text:p>
          </table:table-cell>
          <table:table-cell table:style-name="ce61" table:formula="of:=[.D25]/([.$A$7]+[.C25]/1000)" office:value-type="float" office:value="1.87771870468826" calcext:value-type="float">
            <text:p>1.878</text:p>
          </table:table-cell>
          <table:table-cell table:style-name="ce134" table:formula="of:=[.$A$6]*[.E25]*100" office:value-type="float" office:value="1182962.7839536" calcext:value-type="float">
            <text:p>1182963</text:p>
          </table:table-cell>
          <table:table-cell table:style-name="ce20" office:value-type="float" office:value="887096" calcext:value-type="float">
            <text:p>887096</text:p>
          </table:table-cell>
          <table:table-cell table:style-name="ce150" table:formula="of:=[.G25]/[.F25]" office:value-type="float" office:value="0.749893413413413" calcext:value-type="float">
            <text:p>0.75</text:p>
          </table:table-cell>
          <table:table-cell table:style-name="ce64" table:formula="of:=[.E25]*[.$C$99]" office:value-type="float" office:value="875739.671519417" calcext:value-type="float">
            <text:p>875740</text:p>
          </table:table-cell>
          <table:table-cell table:style-name="ce150" table:formula="of:=[.G25]/[.I25]" office:value-type="float" office:value="1.01296769902051" calcext:value-type="float">
            <text:p>1.01</text:p>
          </table:table-cell>
          <table:table-cell table:style-name="ce64" table:formula="of:=[.I25]*0.95" office:value-type="float" office:value="831952.687943446" calcext:value-type="float">
            <text:p>831953</text:p>
          </table:table-cell>
          <table:table-cell table:style-name="ce72" table:formula="of:=IF([.G25]&lt;[.$A$18]; [.G25]; [.G25]*(1+[.G25]/[.$A$18]*[.$A$19]))" office:value-type="float" office:value="946116.4484912" calcext:value-type="float">
            <text:p>946116.4484912</text:p>
          </table:table-cell>
          <table:table-cell table:style-name="ce189" table:formula="of:=[.L25]/[.I25]" office:value-type="float" office:value="1.08036266856528" calcext:value-type="float">
            <text:p>1.08036266856528</text:p>
          </table:table-cell>
          <table:table-cell table:number-columns-repeated="14"/>
          <table:table-cell office:value-type="float" office:value="1158629" calcext:value-type="float">
            <text:p>1158629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7.582444" calcext:value-type="float">
            <text:p>7.582444</text:p>
          </table:table-cell>
          <table:table-cell office:value-type="float" office:value="86616" calcext:value-type="float">
            <text:p>86616</text:p>
          </table:table-cell>
          <table:table-cell office:value-type="float" office:value="51334" calcext:value-type="float">
            <text:p>51334</text:p>
          </table:table-cell>
          <table:table-cell office:value-type="float" office:value="29306" calcext:value-type="float">
            <text:p>29306</text:p>
          </table:table-cell>
          <table:table-cell office:value-type="float" office:value="14208" calcext:value-type="float">
            <text:p>14208</text:p>
          </table:table-cell>
          <table:table-cell office:value-type="float" office:value="7293" calcext:value-type="float">
            <text:p>7293</text:p>
          </table:table-cell>
          <table:table-cell office:value-type="float" office:value="3495" calcext:value-type="float">
            <text:p>3495</text:p>
          </table:table-cell>
          <table:table-cell office:value-type="float" office:value="1544" calcext:value-type="float">
            <text:p>1544</text:p>
          </table:table-cell>
          <table:table-cell office:value-type="float" office:value="710" calcext:value-type="float">
            <text:p>710</text:p>
          </table:table-cell>
          <table:table-cell office:value-type="float" office:value="362" calcext:value-type="float">
            <text:p>36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5" calcext:value-type="float">
            <text:p>5</text:p>
          </table:table-cell>
          <table:table-cell table:style-name="ce58" table:formula="of:=[.C25]+[.B26]" office:value-type="float" office:value="20" calcext:value-type="float">
            <text:p>20.0</text:p>
          </table:table-cell>
          <table:table-cell table:style-name="ce61" table:formula="of:=[.C26]*[.$A$15]/1000" office:value-type="float" office:value="25.9" calcext:value-type="float">
            <text:p>25.900</text:p>
          </table:table-cell>
          <table:table-cell table:style-name="ce61" table:formula="of:=[.D26]/([.$A$7]+[.C26]/1000)" office:value-type="float" office:value="2.5024154589372" calcext:value-type="float">
            <text:p>2.502</text:p>
          </table:table-cell>
          <table:table-cell table:style-name="ce134" table:formula="of:=[.$A$6]*[.E26]*100" office:value-type="float" office:value="1576521.73913043" calcext:value-type="float">
            <text:p>1576522</text:p>
          </table:table-cell>
          <table:table-cell table:style-name="ce20" office:value-type="float" office:value="1150880.2" calcext:value-type="float">
            <text:p>1150880</text:p>
          </table:table-cell>
          <table:table-cell table:style-name="ce150" table:formula="of:=[.G26]/[.F26]" office:value-type="float" office:value="0.730012261445119" calcext:value-type="float">
            <text:p>0.73</text:p>
          </table:table-cell>
          <table:table-cell table:style-name="ce64" table:formula="of:=[.E26]*[.$C$99]" office:value-type="float" office:value="1167088.81183489" calcext:value-type="float">
            <text:p>1167089</text:p>
          </table:table-cell>
          <table:table-cell table:style-name="ce150" table:formula="of:=[.G26]/[.I26]" office:value-type="float" office:value="0.986111929383156" calcext:value-type="float">
            <text:p>0.99</text:p>
          </table:table-cell>
          <table:table-cell table:style-name="ce64" table:formula="of:=[.I26]*0.95" office:value-type="float" office:value="1108734.37124315" calcext:value-type="float">
            <text:p>1108734</text:p>
          </table:table-cell>
          <table:table-cell table:style-name="ce72" table:formula="of:=IF([.G26]&lt;[.$A$18]; [.G26]; [.G26]*(1+[.G26]/[.$A$18]*[.$A$19]))" office:value-type="float" office:value="1250219.5926064" calcext:value-type="float">
            <text:p>1250219.5926064</text:p>
          </table:table-cell>
          <table:table-cell table:style-name="ce189" table:formula="of:=[.L26]/[.I26]" office:value-type="float" office:value="1.07122918147147" calcext:value-type="float">
            <text:p>1.07122918147147</text:p>
          </table:table-cell>
          <table:table-cell table:number-columns-repeated="2"/>
          <table:table-cell table:style-name="ce28" table:number-columns-repeated="2"/>
          <table:table-cell table:number-columns-repeated="10"/>
          <table:table-cell office:value-type="float" office:value="1144207" calcext:value-type="float">
            <text:p>1144207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7.515553" calcext:value-type="float">
            <text:p>7.515553</text:p>
          </table:table-cell>
          <table:table-cell office:value-type="float" office:value="87077" calcext:value-type="float">
            <text:p>87077</text:p>
          </table:table-cell>
          <table:table-cell office:value-type="float" office:value="50924" calcext:value-type="float">
            <text:p>50924</text:p>
          </table:table-cell>
          <table:table-cell office:value-type="float" office:value="28727" calcext:value-type="float">
            <text:p>28727</text:p>
          </table:table-cell>
          <table:table-cell office:value-type="float" office:value="14138" calcext:value-type="float">
            <text:p>14138</text:p>
          </table:table-cell>
          <table:table-cell office:value-type="float" office:value="7423" calcext:value-type="float">
            <text:p>7423</text:p>
          </table:table-cell>
          <table:table-cell office:value-type="float" office:value="3572" calcext:value-type="float">
            <text:p>3572</text:p>
          </table:table-cell>
          <table:table-cell office:value-type="float" office:value="1605" calcext:value-type="float">
            <text:p>1605</text:p>
          </table:table-cell>
          <table:table-cell office:value-type="float" office:value="755" calcext:value-type="float">
            <text:p>755</text:p>
          </table:table-cell>
          <table:table-cell office:value-type="float" office:value="393" calcext:value-type="float">
            <text:p>393</text:p>
          </table:table-cell>
          <table:table-cell office:value-type="float" office:value="193" calcext:value-type="float">
            <text:p>193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" table:number-columns-repeated="946"/>
        </table:table-row>
        <table:table-row table:style-name="ro2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" calcext:value-type="float">
            <text:p>5</text:p>
          </table:table-cell>
          <table:table-cell table:style-name="ce58" table:formula="of:=[.C26]+[.B27]" office:value-type="float" office:value="25" calcext:value-type="float">
            <text:p>25.0</text:p>
          </table:table-cell>
          <table:table-cell table:style-name="ce61" table:formula="of:=[.C27]*[.$A$15]/1000" office:value-type="float" office:value="32.375" calcext:value-type="float">
            <text:p>32.375</text:p>
          </table:table-cell>
          <table:table-cell table:style-name="ce61" table:formula="of:=[.D27]/([.$A$7]+[.C27]/1000)" office:value-type="float" office:value="3.12650893288267" calcext:value-type="float">
            <text:p>3.127</text:p>
          </table:table-cell>
          <table:table-cell table:style-name="ce134" table:formula="of:=[.$A$6]*[.E27]*100" office:value-type="float" office:value="1969700.62771608" calcext:value-type="float">
            <text:p>1969701</text:p>
          </table:table-cell>
          <table:table-cell table:style-name="ce20" office:value-type="float" office:value="1393972.2" calcext:value-type="float">
            <text:p>1393972</text:p>
          </table:table-cell>
          <table:table-cell table:style-name="ce150" table:formula="of:=[.G27]/[.F27]" office:value-type="float" office:value="0.707707648758963" calcext:value-type="float">
            <text:p>0.71</text:p>
          </table:table-cell>
          <table:table-cell table:style-name="ce64" table:formula="of:=[.E27]*[.$C$99]" office:value-type="float" office:value="1458156.59131955" calcext:value-type="float">
            <text:p>1458157</text:p>
          </table:table-cell>
          <table:table-cell table:style-name="ce150" table:formula="of:=[.G27]/[.I27]" office:value-type="float" office:value="0.955982511273727" calcext:value-type="float">
            <text:p>0.96</text:p>
          </table:table-cell>
          <table:table-cell table:style-name="ce64" table:formula="of:=[.I27]*0.95" office:value-type="float" office:value="1385248.76175357" calcext:value-type="float">
            <text:p>1385249</text:p>
          </table:table-cell>
          <table:table-cell table:style-name="ce72" table:formula="of:=IF([.G27]&lt;[.$A$18]; [.G27]; [.G27]*(1+[.G27]/[.$A$18]*[.$A$19]))" office:value-type="float" office:value="1539709.08707796" calcext:value-type="float">
            <text:p>1539709.08707796</text:p>
          </table:table-cell>
          <table:table-cell table:style-name="ce189" table:formula="of:=[.L27]/[.I27]" office:value-type="float" office:value="1.05592848960386" calcext:value-type="float">
            <text:p>1.05592848960386</text:p>
          </table:table-cell>
          <table:table-cell table:number-columns-repeated="14"/>
          <table:table-cell office:value-type="float" office:value="1132845" calcext:value-type="float">
            <text:p>1132845</text:p>
          </table:table-cell>
          <table:table-cell table:style-name="ce20" table:formula="of:=SUM([.AB23:.AB27])/5" office:value-type="float" office:value="1150880.2" calcext:value-type="float">
            <text:p>1150880</text:p>
          </table:table-cell>
          <table:table-cell table:style-name="ce76" table:formula="of:=(MAX([.AB23:.AB27])-MIN([.AB23:.AB27]))/[.AC27]*100" office:value-type="float" office:value="3.78371267487268" calcext:value-type="float">
            <text:p>3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551795" calcext:value-type="float">
            <text:p>7.551795</text:p>
          </table:table-cell>
          <table:table-cell office:value-type="float" office:value="86408" calcext:value-type="float">
            <text:p>86408</text:p>
          </table:table-cell>
          <table:table-cell office:value-type="float" office:value="50882" calcext:value-type="float">
            <text:p>50882</text:p>
          </table:table-cell>
          <table:table-cell office:value-type="float" office:value="28994" calcext:value-type="float">
            <text:p>28994</text:p>
          </table:table-cell>
          <table:table-cell office:value-type="float" office:value="14159" calcext:value-type="float">
            <text:p>14159</text:p>
          </table:table-cell>
          <table:table-cell office:value-type="float" office:value="7497" calcext:value-type="float">
            <text:p>7497</text:p>
          </table:table-cell>
          <table:table-cell office:value-type="float" office:value="3566" calcext:value-type="float">
            <text:p>3566</text:p>
          </table:table-cell>
          <table:table-cell office:value-type="float" office:value="1551" calcext:value-type="float">
            <text:p>1551</text:p>
          </table:table-cell>
          <table:table-cell office:value-type="float" office:value="690" calcext:value-type="float">
            <text:p>690</text:p>
          </table:table-cell>
          <table:table-cell office:value-type="float" office:value="358" calcext:value-type="float">
            <text:p>358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1" office:value-type="float" office:value="60" calcext:value-type="float">
            <text:p>60</text:p>
          </table:table-cell>
          <table:table-cell table:style-name="ce50" office:value-type="float" office:value="5" calcext:value-type="float">
            <text:p>5</text:p>
          </table:table-cell>
          <table:table-cell table:style-name="ce59" table:formula="of:=[.C27]+[.B28]" office:value-type="float" office:value="30" calcext:value-type="float">
            <text:p>30.0</text:p>
          </table:table-cell>
          <table:table-cell table:style-name="ce62" table:formula="of:=[.C28]*[.$A$15]/1000" office:value-type="float" office:value="38.85" calcext:value-type="float">
            <text:p>38.850</text:p>
          </table:table-cell>
          <table:table-cell table:style-name="ce62" table:formula="of:=[.D28]/([.$A$7]+[.C28]/1000)" office:value-type="float" office:value="3.75" calcext:value-type="float">
            <text:p>3.750</text:p>
          </table:table-cell>
          <table:table-cell table:style-name="ce142" table:formula="of:=[.$A$6]*[.E28]*100" office:value-type="float" office:value="2362500" calcext:value-type="float">
            <text:p>2362500</text:p>
          </table:table-cell>
          <table:table-cell table:style-name="ce20" office:value-type="float" office:value="1622014.2" calcext:value-type="float">
            <text:p>1622014</text:p>
          </table:table-cell>
          <table:table-cell table:style-name="ce151" table:formula="of:=[.G28]/[.F28]" office:value-type="float" office:value="0.686566857142857" calcext:value-type="float">
            <text:p>0.69</text:p>
          </table:table-cell>
          <table:table-cell table:style-name="ce65" table:formula="of:=[.E28]*[.$C$99]" office:value-type="float" office:value="1748943.4173491" calcext:value-type="float">
            <text:p>1748943</text:p>
          </table:table-cell>
          <table:table-cell table:style-name="ce151" table:formula="of:=[.G28]/[.I28]" office:value-type="float" office:value="0.927425200786948" calcext:value-type="float">
            <text:p>0.93</text:p>
          </table:table-cell>
          <table:table-cell table:style-name="ce65" table:formula="of:=[.I28]*0.95" office:value-type="float" office:value="1661496.24648165" calcext:value-type="float">
            <text:p>1661496</text:p>
          </table:table-cell>
          <table:table-cell table:style-name="ce72" table:formula="of:=IF([.G28]&lt;[.$A$18]; [.G28]; [.G28]*(1+[.G28]/[.$A$18]*[.$A$19]))" office:value-type="float" office:value="1819333.95487512" calcext:value-type="float">
            <text:p>1819333.95487512</text:p>
          </table:table-cell>
          <table:table-cell table:style-name="ce189" table:formula="of:=[.L28]/[.I28]" office:value-type="float" office:value="1.04024746417052" calcext:value-type="float">
            <text:p>1.04024746417052</text:p>
          </table:table-cell>
          <table:table-cell table:number-columns-repeated="14"/>
          <table:table-cell office:value-type="float" office:value="1150648" calcext:value-type="float">
            <text:p>1150648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7.545417" calcext:value-type="float">
            <text:p>7.545417</text:p>
          </table:table-cell>
          <table:table-cell office:value-type="float" office:value="85478" calcext:value-type="float">
            <text:p>85478</text:p>
          </table:table-cell>
          <table:table-cell office:value-type="float" office:value="50553" calcext:value-type="float">
            <text:p>50553</text:p>
          </table:table-cell>
          <table:table-cell office:value-type="float" office:value="28519" calcext:value-type="float">
            <text:p>28519</text:p>
          </table:table-cell>
          <table:table-cell office:value-type="float" office:value="14080" calcext:value-type="float">
            <text:p>14080</text:p>
          </table:table-cell>
          <table:table-cell office:value-type="float" office:value="7292" calcext:value-type="float">
            <text:p>7292</text:p>
          </table:table-cell>
          <table:table-cell office:value-type="float" office:value="3546" calcext:value-type="float">
            <text:p>3546</text:p>
          </table:table-cell>
          <table:table-cell office:value-type="float" office:value="1608" calcext:value-type="float">
            <text:p>1608</text:p>
          </table:table-cell>
          <table:table-cell office:value-type="float" office:value="737" calcext:value-type="float">
            <text:p>737</text:p>
          </table:table-cell>
          <table:table-cell office:value-type="float" office:value="374" calcext:value-type="float">
            <text:p>374</text:p>
          </table:table-cell>
          <table:table-cell office:value-type="float" office:value="198" calcext:value-type="float">
            <text:p>198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5" calcext:value-type="float">
            <text:p>5</text:p>
          </table:table-cell>
          <table:table-cell table:style-name="ce58" table:formula="of:=[.C28]+[.B29]" office:value-type="float" office:value="35" calcext:value-type="float">
            <text:p>35.0</text:p>
          </table:table-cell>
          <table:table-cell table:style-name="ce61" table:formula="of:=[.C29]*[.$A$15]/1000" office:value-type="float" office:value="45.325" calcext:value-type="float">
            <text:p>45.325</text:p>
          </table:table-cell>
          <table:table-cell table:style-name="ce61" table:formula="of:=[.D29]/([.$A$7]+[.C29]/1000)" office:value-type="float" office:value="4.37288953207911" calcext:value-type="float">
            <text:p>4.373</text:p>
          </table:table-cell>
          <table:table-cell table:style-name="ce134" table:formula="of:=[.$A$6]*[.E29]*100" office:value-type="float" office:value="2754920.40520984" calcext:value-type="float">
            <text:p>2754920</text:p>
          </table:table-cell>
          <table:table-cell table:style-name="ce20" office:value-type="float" office:value="1828643" calcext:value-type="float">
            <text:p>1828643</text:p>
          </table:table-cell>
          <table:table-cell table:style-name="ce150" table:formula="of:=[.G29]/[.F29]" office:value-type="float" office:value="0.663773442071809" calcext:value-type="float">
            <text:p>0.66</text:p>
          </table:table-cell>
          <table:table-cell table:style-name="ce64" table:formula="of:=[.E29]*[.$C$99]" office:value-type="float" office:value="2039449.69651321" calcext:value-type="float">
            <text:p>2039450</text:p>
          </table:table-cell>
          <table:table-cell table:style-name="ce150" table:formula="of:=[.G29]/[.I29]" office:value-type="float" office:value="0.896635500805132" calcext:value-type="float">
            <text:p>0.90</text:p>
          </table:table-cell>
          <table:table-cell table:style-name="ce64" table:formula="of:=[.I29]*0.95" office:value-type="float" office:value="1937477.21168755" calcext:value-type="float">
            <text:p>1937477</text:p>
          </table:table-cell>
          <table:table-cell table:style-name="ce72" table:formula="of:=IF([.G29]&lt;[.$A$18]; [.G29]; [.G29]*(1+[.G29]/[.$A$18]*[.$A$19]))" office:value-type="float" office:value="2079438.14160868" calcext:value-type="float">
            <text:p>2079438.14160868</text:p>
          </table:table-cell>
          <table:table-cell table:style-name="ce189" table:formula="of:=[.L29]/[.I29]" office:value-type="float" office:value="1.01960746821254" calcext:value-type="float">
            <text:p>1.01960746821254</text:p>
          </table:table-cell>
          <table:table-cell table:number-columns-repeated="14"/>
          <table:table-cell office:value-type="float" office:value="1419690" calcext:value-type="float">
            <text:p>1419690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37.422546" calcext:value-type="float">
            <text:p>37.422546</text:p>
          </table:table-cell>
          <table:table-cell office:value-type="float" office:value="430602" calcext:value-type="float">
            <text:p>430602</text:p>
          </table:table-cell>
          <table:table-cell office:value-type="float" office:value="253503" calcext:value-type="float">
            <text:p>253503</text:p>
          </table:table-cell>
          <table:table-cell office:value-type="float" office:value="143676" calcext:value-type="float">
            <text:p>143676</text:p>
          </table:table-cell>
          <table:table-cell office:value-type="float" office:value="70379" calcext:value-type="float">
            <text:p>70379</text:p>
          </table:table-cell>
          <table:table-cell office:value-type="float" office:value="36732" calcext:value-type="float">
            <text:p>36732</text:p>
          </table:table-cell>
          <table:table-cell office:value-type="float" office:value="17670" calcext:value-type="float">
            <text:p>17670</text:p>
          </table:table-cell>
          <table:table-cell office:value-type="float" office:value="7888" calcext:value-type="float">
            <text:p>7888</text:p>
          </table:table-cell>
          <table:table-cell office:value-type="float" office:value="3609" calcext:value-type="float">
            <text:p>3609</text:p>
          </table:table-cell>
          <table:table-cell office:value-type="float" office:value="1858" calcext:value-type="float">
            <text:p>1858</text:p>
          </table:table-cell>
          <table:table-cell office:value-type="float" office:value="979" calcext:value-type="float">
            <text:p>979</text:p>
          </table:table-cell>
          <table:table-cell office:value-type="float" office:value="595" calcext:value-type="float">
            <text:p>595</text:p>
          </table:table-cell>
          <table:table-cell office:value-type="float" office:value="400" calcext:value-type="float">
            <text:p>400</text:p>
          </table:table-cell>
          <table:table-cell office:value-type="float" office:value="299" calcext:value-type="float">
            <text:p>299</text:p>
          </table:table-cell>
          <table:table-cell office:value-type="float" office:value="245" calcext:value-type="float">
            <text:p>245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5" calcext:value-type="float">
            <text:p>5</text:p>
          </table:table-cell>
          <table:table-cell table:style-name="ce58" table:formula="of:=[.C29]+[.B30]" office:value-type="float" office:value="40" calcext:value-type="float">
            <text:p>40.0</text:p>
          </table:table-cell>
          <table:table-cell table:style-name="ce61" table:formula="of:=[.C30]*[.$A$15]/1000" office:value-type="float" office:value="51.8" calcext:value-type="float">
            <text:p>51.800</text:p>
          </table:table-cell>
          <table:table-cell table:style-name="ce61" table:formula="of:=[.D30]/([.$A$7]+[.C30]/1000)" office:value-type="float" office:value="4.99517839922854" calcext:value-type="float">
            <text:p>4.995</text:p>
          </table:table-cell>
          <table:table-cell table:style-name="ce134" table:formula="of:=[.$A$6]*[.E30]*100" office:value-type="float" office:value="3146962.39151398" calcext:value-type="float">
            <text:p>3146962</text:p>
          </table:table-cell>
          <table:table-cell table:style-name="ce20" office:value-type="float" office:value="2018251" calcext:value-type="float">
            <text:p>2018251</text:p>
          </table:table-cell>
          <table:table-cell table:style-name="ce150" table:formula="of:=[.G30]/[.F30]" office:value-type="float" office:value="0.641333053563768" calcext:value-type="float">
            <text:p>0.64</text:p>
          </table:table-cell>
          <table:table-cell table:style-name="ce64" table:formula="of:=[.E30]*[.$C$99]" office:value-type="float" office:value="2329675.83461738" calcext:value-type="float">
            <text:p>2329676</text:p>
          </table:table-cell>
          <table:table-cell table:style-name="ce150" table:formula="of:=[.G30]/[.I30]" office:value-type="float" office:value="0.86632267460141" calcext:value-type="float">
            <text:p>0.87</text:p>
          </table:table-cell>
          <table:table-cell table:style-name="ce64" table:formula="of:=[.I30]*0.95" office:value-type="float" office:value="2213192.04288651" calcext:value-type="float">
            <text:p>2213192</text:p>
          </table:table-cell>
          <table:table-cell table:style-name="ce72" table:formula="of:=IF([.G30]&lt;[.$A$18]; [.G30]; [.G30]*(1+[.G30]/[.$A$18]*[.$A$19]))" office:value-type="float" office:value="2323751.28242508" calcext:value-type="float">
            <text:p>2323751.28242508</text:p>
          </table:table-cell>
          <table:table-cell table:style-name="ce189" table:formula="of:=[.L30]/[.I30]" office:value-type="float" office:value="0.997456919926685" calcext:value-type="float">
            <text:p>0.997456919926685</text:p>
          </table:table-cell>
          <table:table-cell table:number-columns-repeated="14"/>
          <table:table-cell office:value-type="float" office:value="1380452" calcext:value-type="float">
            <text:p>1380452</text:p>
          </table:table-cell>
          <table:table-cell table:style-name="ce75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7.043152" calcext:value-type="float">
            <text:p>7.043152</text:p>
          </table:table-cell>
          <table:table-cell office:value-type="float" office:value="99991" calcext:value-type="float">
            <text:p>99991</text:p>
          </table:table-cell>
          <table:table-cell office:value-type="float" office:value="60108" calcext:value-type="float">
            <text:p>60108</text:p>
          </table:table-cell>
          <table:table-cell office:value-type="float" office:value="34899" calcext:value-type="float">
            <text:p>34899</text:p>
          </table:table-cell>
          <table:table-cell office:value-type="float" office:value="17489" calcext:value-type="float">
            <text:p>17489</text:p>
          </table:table-cell>
          <table:table-cell office:value-type="float" office:value="9227" calcext:value-type="float">
            <text:p>9227</text:p>
          </table:table-cell>
          <table:table-cell office:value-type="float" office:value="4467" calcext:value-type="float">
            <text:p>4467</text:p>
          </table:table-cell>
          <table:table-cell office:value-type="float" office:value="2009" calcext:value-type="float">
            <text:p>2009</text:p>
          </table:table-cell>
          <table:table-cell office:value-type="float" office:value="924" calcext:value-type="float">
            <text:p>924</text:p>
          </table:table-cell>
          <table:table-cell office:value-type="float" office:value="419" calcext:value-type="float">
            <text:p>419</text:p>
          </table:table-cell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5" calcext:value-type="float">
            <text:p>5</text:p>
          </table:table-cell>
          <table:table-cell table:style-name="ce58" table:formula="of:=[.C30]+[.B31]" office:value-type="float" office:value="45" calcext:value-type="float">
            <text:p>45.0</text:p>
          </table:table-cell>
          <table:table-cell table:style-name="ce61" table:formula="of:=[.C31]*[.$A$15]/1000" office:value-type="float" office:value="58.275" calcext:value-type="float">
            <text:p>58.275</text:p>
          </table:table-cell>
          <table:table-cell table:style-name="ce61" table:formula="of:=[.D31]/([.$A$7]+[.C31]/1000)" office:value-type="float" office:value="5.61686746987952" calcext:value-type="float">
            <text:p>5.617</text:p>
          </table:table-cell>
          <table:table-cell table:style-name="ce134" table:formula="of:=[.$A$6]*[.E31]*100" office:value-type="float" office:value="3538626.5060241" calcext:value-type="float">
            <text:p>3538627</text:p>
          </table:table-cell>
          <table:table-cell table:style-name="ce20" office:value-type="float" office:value="2192765.2" calcext:value-type="float">
            <text:p>2192765</text:p>
          </table:table-cell>
          <table:table-cell table:style-name="ce150" table:formula="of:=[.G31]/[.F31]" office:value-type="float" office:value="0.619665623446576" calcext:value-type="float">
            <text:p>0.62</text:p>
          </table:table-cell>
          <table:table-cell table:style-name="ce64" table:formula="of:=[.E31]*[.$C$99]" office:value-type="float" office:value="2619622.23668482" calcext:value-type="float">
            <text:p>2619622</text:p>
          </table:table-cell>
          <table:table-cell table:style-name="ce150" table:formula="of:=[.G31]/[.I31]" office:value-type="float" office:value="0.83705397262736" calcext:value-type="float">
            <text:p>0.84</text:p>
          </table:table-cell>
          <table:table-cell table:style-name="ce64" table:formula="of:=[.I31]*0.95" office:value-type="float" office:value="2488641.12485058" calcext:value-type="float">
            <text:p>2488641</text:p>
          </table:table-cell>
          <table:table-cell table:style-name="ce72" table:formula="of:=IF([.G31]&lt;[.$A$18]; [.G31]; [.G31]*(1+[.G31]/[.$A$18]*[.$A$19]))" office:value-type="float" office:value="2553381.64167483" calcext:value-type="float">
            <text:p>2553381.64167483</text:p>
          </table:table-cell>
          <table:table-cell table:style-name="ce189" table:formula="of:=[.L31]/[.I31]" office:value-type="float" office:value="0.974713684254787" calcext:value-type="float">
            <text:p>0.974713684254787</text:p>
          </table:table-cell>
          <table:table-cell table:number-columns-repeated="14"/>
          <table:table-cell office:value-type="float" office:value="1414340" calcext:value-type="float">
            <text:p>1414340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7.420444" calcext:value-type="float">
            <text:p>7.420444</text:p>
          </table:table-cell>
          <table:table-cell office:value-type="float" office:value="102436" calcext:value-type="float">
            <text:p>102436</text:p>
          </table:table-cell>
          <table:table-cell office:value-type="float" office:value="62257" calcext:value-type="float">
            <text:p>62257</text:p>
          </table:table-cell>
          <table:table-cell office:value-type="float" office:value="36172" calcext:value-type="float">
            <text:p>36172</text:p>
          </table:table-cell>
          <table:table-cell office:value-type="float" office:value="18150" calcext:value-type="float">
            <text:p>18150</text:p>
          </table:table-cell>
          <table:table-cell office:value-type="float" office:value="9644" calcext:value-type="float">
            <text:p>9644</text:p>
          </table:table-cell>
          <table:table-cell office:value-type="float" office:value="4696" calcext:value-type="float">
            <text:p>4696</text:p>
          </table:table-cell>
          <table:table-cell office:value-type="float" office:value="2024" calcext:value-type="float">
            <text:p>2024</text:p>
          </table:table-cell>
          <table:table-cell office:value-type="float" office:value="905" calcext:value-type="float">
            <text:p>905</text:p>
          </table:table-cell>
          <table:table-cell office:value-type="float" office:value="442" calcext:value-type="float">
            <text:p>442</text:p>
          </table:table-cell>
          <table:table-cell office:value-type="float" office:value="255" calcext:value-type="float">
            <text:p>255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5" calcext:value-type="float">
            <text:p>5</text:p>
          </table:table-cell>
          <table:table-cell table:style-name="ce58" table:formula="of:=[.C31]+[.B32]" office:value-type="float" office:value="50" calcext:value-type="float">
            <text:p>50.0</text:p>
          </table:table-cell>
          <table:table-cell table:style-name="ce61" table:formula="of:=[.C32]*[.$A$15]/1000" office:value-type="float" office:value="64.75" calcext:value-type="float">
            <text:p>64.750</text:p>
          </table:table-cell>
          <table:table-cell table:style-name="ce61" table:formula="of:=[.D32]/([.$A$7]+[.C32]/1000)" office:value-type="float" office:value="6.23795761078998" calcext:value-type="float">
            <text:p>6.238</text:p>
          </table:table-cell>
          <table:table-cell table:style-name="ce134" table:formula="of:=[.$A$6]*[.E32]*100" office:value-type="float" office:value="3929913.29479769" calcext:value-type="float">
            <text:p>3929913</text:p>
          </table:table-cell>
          <table:table-cell table:style-name="ce20" office:value-type="float" office:value="2352493.6" calcext:value-type="float">
            <text:p>2352494</text:p>
          </table:table-cell>
          <table:table-cell table:style-name="ce150" table:formula="of:=[.G32]/[.F32]" office:value-type="float" office:value="0.598612087221916" calcext:value-type="float">
            <text:p>0.60</text:p>
          </table:table-cell>
          <table:table-cell table:style-name="ce64" table:formula="of:=[.E32]*[.$C$99]" office:value-type="float" office:value="2909289.30695836" calcext:value-type="float">
            <text:p>2909289</text:p>
          </table:table-cell>
          <table:table-cell table:style-name="ce150" table:formula="of:=[.G32]/[.I32]" office:value-type="float" office:value="0.80861452808195" calcext:value-type="float">
            <text:p>0.81</text:p>
          </table:table-cell>
          <table:table-cell table:style-name="ce64" table:formula="of:=[.I32]*0.95" office:value-type="float" office:value="2763824.84161044" calcext:value-type="float">
            <text:p>2763825</text:p>
          </table:table-cell>
          <table:table-cell table:style-name="ce72" table:formula="of:=IF([.G32]&lt;[.$A$18]; [.G32]; [.G32]*(1+[.G32]/[.$A$18]*[.$A$19]))" office:value-type="float" office:value="2767560.56035307" calcext:value-type="float">
            <text:p>2767560.56035307</text:p>
          </table:table-cell>
          <table:table-cell table:style-name="ce189" table:formula="of:=[.L32]/[.I32]" office:value-type="float" office:value="0.951284065745435" calcext:value-type="float">
            <text:p>0.951284065745435</text:p>
          </table:table-cell>
          <table:table-cell table:number-columns-repeated="14"/>
          <table:table-cell office:value-type="float" office:value="1389571" calcext:value-type="float">
            <text:p>1389571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7.339494" calcext:value-type="float">
            <text:p>7.339494</text:p>
          </table:table-cell>
          <table:table-cell office:value-type="float" office:value="103805" calcext:value-type="float">
            <text:p>103805</text:p>
          </table:table-cell>
          <table:table-cell office:value-type="float" office:value="62781" calcext:value-type="float">
            <text:p>62781</text:p>
          </table:table-cell>
          <table:table-cell office:value-type="float" office:value="36067" calcext:value-type="float">
            <text:p>36067</text:p>
          </table:table-cell>
          <table:table-cell office:value-type="float" office:value="17978" calcext:value-type="float">
            <text:p>17978</text:p>
          </table:table-cell>
          <table:table-cell office:value-type="float" office:value="9466" calcext:value-type="float">
            <text:p>9466</text:p>
          </table:table-cell>
          <table:table-cell office:value-type="float" office:value="4571" calcext:value-type="float">
            <text:p>4571</text:p>
          </table:table-cell>
          <table:table-cell office:value-type="float" office:value="2004" calcext:value-type="float">
            <text:p>2004</text:p>
          </table:table-cell>
          <table:table-cell office:value-type="float" office:value="911" calcext:value-type="float">
            <text:p>911</text:p>
          </table:table-cell>
          <table:table-cell office:value-type="float" office:value="438" calcext:value-type="float">
            <text:p>438</text:p>
          </table:table-cell>
          <table:table-cell office:value-type="float" office:value="256" calcext:value-type="float">
            <text:p>256</text:p>
          </table:table-cell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5" calcext:value-type="float">
            <text:p>5</text:p>
          </table:table-cell>
          <table:table-cell table:style-name="ce58" table:formula="of:=[.C32]+[.B33]" office:value-type="float" office:value="55" calcext:value-type="float">
            <text:p>55.0</text:p>
          </table:table-cell>
          <table:table-cell table:style-name="ce61" table:formula="of:=[.C33]*[.$A$15]/1000" office:value-type="float" office:value="71.225" calcext:value-type="float">
            <text:p>71.225</text:p>
          </table:table-cell>
          <table:table-cell table:style-name="ce61" table:formula="of:=[.D33]/([.$A$7]+[.C33]/1000)" office:value-type="float" office:value="6.85844968704863" calcext:value-type="float">
            <text:p>6.858</text:p>
          </table:table-cell>
          <table:table-cell table:style-name="ce134" table:formula="of:=[.$A$6]*[.E33]*100" office:value-type="float" office:value="4320823.30284064" calcext:value-type="float">
            <text:p>4320823</text:p>
          </table:table-cell>
          <table:table-cell table:style-name="ce20" office:value-type="float" office:value="2492461.4" calcext:value-type="float">
            <text:p>2492461</text:p>
          </table:table-cell>
          <table:table-cell table:style-name="ce150" table:formula="of:=[.G33]/[.F33]" office:value-type="float" office:value="0.576848721946436" calcext:value-type="float">
            <text:p>0.58</text:p>
          </table:table-cell>
          <table:table-cell table:style-name="ce64" table:formula="of:=[.E33]*[.$C$99]" office:value-type="float" office:value="3198677.44890232" calcext:value-type="float">
            <text:p>3198677</text:p>
          </table:table-cell>
          <table:table-cell table:style-name="ce150" table:formula="of:=[.G33]/[.I33]" office:value-type="float" office:value="0.779216235402332" calcext:value-type="float">
            <text:p>0.78</text:p>
          </table:table-cell>
          <table:table-cell table:style-name="ce64" table:formula="of:=[.I33]*0.95" office:value-type="float" office:value="3038743.5764572" calcext:value-type="float">
            <text:p>3038744</text:p>
          </table:table-cell>
          <table:table-cell table:style-name="ce72" table:formula="of:=IF([.G33]&lt;[.$A$18]; [.G33]; [.G33]*(1+[.G33]/[.$A$18]*[.$A$19]))" office:value-type="float" office:value="2958388.68728675" calcext:value-type="float">
            <text:p>2958388.68728675</text:p>
          </table:table-cell>
          <table:table-cell table:style-name="ce189" table:formula="of:=[.L33]/[.I33]" office:value-type="float" office:value="0.924878714576854" calcext:value-type="float">
            <text:p>0.924878714576854</text:p>
          </table:table-cell>
          <table:table-cell table:number-columns-repeated="14"/>
          <table:table-cell office:value-type="float" office:value="1365808" calcext:value-type="float">
            <text:p>1365808</text:p>
          </table:table-cell>
          <table:table-cell table:style-name="ce20" table:formula="of:=SUM([.AB29:.AB33])/5" office:value-type="float" office:value="1393972.2" calcext:value-type="float">
            <text:p>1393972</text:p>
          </table:table-cell>
          <table:table-cell table:style-name="ce76" table:formula="of:=(MAX([.AB29:.AB33])-MIN([.AB29:.AB33]))/[.AC33]*100" office:value-type="float" office:value="3.86535685575365" calcext:value-type="float">
            <text:p>3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376755" calcext:value-type="float">
            <text:p>7.376755</text:p>
          </table:table-cell>
          <table:table-cell office:value-type="float" office:value="102505" calcext:value-type="float">
            <text:p>102505</text:p>
          </table:table-cell>
          <table:table-cell office:value-type="float" office:value="61859" calcext:value-type="float">
            <text:p>61859</text:p>
          </table:table-cell>
          <table:table-cell office:value-type="float" office:value="35857" calcext:value-type="float">
            <text:p>35857</text:p>
          </table:table-cell>
          <table:table-cell office:value-type="float" office:value="18011" calcext:value-type="float">
            <text:p>18011</text:p>
          </table:table-cell>
          <table:table-cell office:value-type="float" office:value="9483" calcext:value-type="float">
            <text:p>9483</text:p>
          </table:table-cell>
          <table:table-cell office:value-type="float" office:value="4496" calcext:value-type="float">
            <text:p>4496</text:p>
          </table:table-cell>
          <table:table-cell office:value-type="float" office:value="1970" calcext:value-type="float">
            <text:p>1970</text:p>
          </table:table-cell>
          <table:table-cell office:value-type="float" office:value="912" calcext:value-type="float">
            <text:p>912</text:p>
          </table:table-cell>
          <table:table-cell office:value-type="float" office:value="434" calcext:value-type="float">
            <text:p>434</text:p>
          </table:table-cell>
          <table:table-cell office:value-type="float" office:value="237" calcext:value-type="float">
            <text:p>237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5" calcext:value-type="float">
            <text:p>5</text:p>
          </table:table-cell>
          <table:table-cell table:style-name="ce58" table:formula="of:=[.C33]+[.B34]" office:value-type="float" office:value="60" calcext:value-type="float">
            <text:p>60.0</text:p>
          </table:table-cell>
          <table:table-cell table:style-name="ce61" table:formula="of:=[.C34]*[.$A$15]/1000" office:value-type="float" office:value="77.7" calcext:value-type="float">
            <text:p>77.700</text:p>
          </table:table-cell>
          <table:table-cell table:style-name="ce61" table:formula="of:=[.D34]/([.$A$7]+[.C34]/1000)" office:value-type="float" office:value="7.47834456207892" calcext:value-type="float">
            <text:p>7.478</text:p>
          </table:table-cell>
          <table:table-cell table:style-name="ce134" table:formula="of:=[.$A$6]*[.E34]*100" office:value-type="float" office:value="4711357.07410972" calcext:value-type="float">
            <text:p>4711357</text:p>
          </table:table-cell>
          <table:table-cell table:style-name="ce20" office:value-type="float" office:value="2626818.4" calcext:value-type="float">
            <text:p>2626818</text:p>
          </table:table-cell>
          <table:table-cell table:style-name="ce150" table:formula="of:=[.G34]/[.F34]" office:value-type="float" office:value="0.557550268145697" calcext:value-type="float">
            <text:p>0.56</text:p>
          </table:table-cell>
          <table:table-cell table:style-name="ce64" table:formula="of:=[.E34]*[.$C$99]" office:value-type="float" office:value="3487787.06520437" calcext:value-type="float">
            <text:p>3487787</text:p>
          </table:table-cell>
          <table:table-cell table:style-name="ce150" table:formula="of:=[.G34]/[.I34]" office:value-type="float" office:value="0.753147583522586" calcext:value-type="float">
            <text:p>0.75</text:p>
          </table:table-cell>
          <table:table-cell table:style-name="ce64" table:formula="of:=[.I34]*0.95" office:value-type="float" office:value="3313397.71194415" calcext:value-type="float">
            <text:p>3313398</text:p>
          </table:table-cell>
          <table:table-cell table:style-name="ce72" table:formula="of:=IF([.G34]&lt;[.$A$18]; [.G34]; [.G34]*(1+[.G34]/[.$A$18]*[.$A$19]))" office:value-type="float" office:value="3144331.51799339" calcext:value-type="float">
            <text:p>3144331.51799339</text:p>
          </table:table-cell>
          <table:table-cell table:style-name="ce189" table:formula="of:=[.L34]/[.I34]" office:value-type="float" office:value="0.901526228296035" calcext:value-type="float">
            <text:p>0.901526228296035</text:p>
          </table:table-cell>
          <table:table-cell table:number-columns-repeated="14"/>
          <table:table-cell office:value-type="float" office:value="1393702" calcext:value-type="float">
            <text:p>1393702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7.375134" calcext:value-type="float">
            <text:p>7.375134</text:p>
          </table:table-cell>
          <table:table-cell office:value-type="float" office:value="100730" calcext:value-type="float">
            <text:p>100730</text:p>
          </table:table-cell>
          <table:table-cell office:value-type="float" office:value="60697" calcext:value-type="float">
            <text:p>60697</text:p>
          </table:table-cell>
          <table:table-cell office:value-type="float" office:value="35216" calcext:value-type="float">
            <text:p>35216</text:p>
          </table:table-cell>
          <table:table-cell office:value-type="float" office:value="17781" calcext:value-type="float">
            <text:p>17781</text:p>
          </table:table-cell>
          <table:table-cell office:value-type="float" office:value="9513" calcext:value-type="float">
            <text:p>9513</text:p>
          </table:table-cell>
          <table:table-cell office:value-type="float" office:value="4621" calcext:value-type="float">
            <text:p>4621</text:p>
          </table:table-cell>
          <table:table-cell office:value-type="float" office:value="2006" calcext:value-type="float">
            <text:p>2006</text:p>
          </table:table-cell>
          <table:table-cell office:value-type="float" office:value="942" calcext:value-type="float">
            <text:p>942</text:p>
          </table:table-cell>
          <table:table-cell office:value-type="float" office:value="460" calcext:value-type="float">
            <text:p>460</text:p>
          </table:table-cell>
          <table:table-cell office:value-type="float" office:value="237" calcext:value-type="float">
            <text:p>237</text:p>
          </table:table-cell>
          <table:table-cell office:value-type="float" office:value="144" calcext:value-type="float">
            <text:p>144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5" calcext:value-type="float">
            <text:p>5</text:p>
          </table:table-cell>
          <table:table-cell table:style-name="ce58" table:formula="of:=[.C34]+[.B35]" office:value-type="float" office:value="65" calcext:value-type="float">
            <text:p>65.0</text:p>
          </table:table-cell>
          <table:table-cell table:style-name="ce61" table:formula="of:=[.C35]*[.$A$15]/1000" office:value-type="float" office:value="84.175" calcext:value-type="float">
            <text:p>84.175</text:p>
          </table:table-cell>
          <table:table-cell table:style-name="ce61" table:formula="of:=[.D35]/([.$A$7]+[.C35]/1000)" office:value-type="float" office:value="8.0976430976431" calcext:value-type="float">
            <text:p>8.098</text:p>
          </table:table-cell>
          <table:table-cell table:style-name="ce134" table:formula="of:=[.$A$6]*[.E35]*100" office:value-type="float" office:value="5101515.15151515" calcext:value-type="float">
            <text:p>5101515</text:p>
          </table:table-cell>
          <table:table-cell table:style-name="ce20" office:value-type="float" office:value="2765729.4" calcext:value-type="float">
            <text:p>2765729</text:p>
          </table:table-cell>
          <table:table-cell table:style-name="ce150" table:formula="of:=[.G35]/[.F35]" office:value-type="float" office:value="0.542138819126819" calcext:value-type="float">
            <text:p>0.54</text:p>
          </table:table-cell>
          <table:table-cell table:style-name="ce64" table:formula="of:=[.E35]*[.$C$99]" office:value-type="float" office:value="3776618.55777741" calcext:value-type="float">
            <text:p>3776619</text:p>
          </table:table-cell>
          <table:table-cell table:style-name="ce150" table:formula="of:=[.G35]/[.I35]" office:value-type="float" office:value="0.732329558224612" calcext:value-type="float">
            <text:p>0.73</text:p>
          </table:table-cell>
          <table:table-cell table:style-name="ce64" table:formula="of:=[.I35]*0.95" office:value-type="float" office:value="3587787.62988854" calcext:value-type="float">
            <text:p>3587788</text:p>
          </table:table-cell>
          <table:table-cell table:style-name="ce72" table:formula="of:=IF([.G35]&lt;[.$A$18]; [.G35]; [.G35]*(1+[.G35]/[.$A$18]*[.$A$19]))" office:value-type="float" office:value="3339423.83355183" calcext:value-type="float">
            <text:p>3339423.83355183</text:p>
          </table:table-cell>
          <table:table-cell table:style-name="ce189" table:formula="of:=[.L35]/[.I35]" office:value-type="float" office:value="0.884236462449924" calcext:value-type="float">
            <text:p>0.884236462449924</text:p>
          </table:table-cell>
          <table:table-cell table:number-columns-repeated="14"/>
          <table:table-cell office:value-type="float" office:value="1654326" calcext:value-type="float">
            <text:p>1654326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36.554977" calcext:value-type="float">
            <text:p>36.554977</text:p>
          </table:table-cell>
          <table:table-cell office:value-type="float" office:value="509468" calcext:value-type="float">
            <text:p>509468</text:p>
          </table:table-cell>
          <table:table-cell office:value-type="float" office:value="307703" calcext:value-type="float">
            <text:p>307703</text:p>
          </table:table-cell>
          <table:table-cell office:value-type="float" office:value="178212" calcext:value-type="float">
            <text:p>178212</text:p>
          </table:table-cell>
          <table:table-cell office:value-type="float" office:value="89409" calcext:value-type="float">
            <text:p>89409</text:p>
          </table:table-cell>
          <table:table-cell office:value-type="float" office:value="47332" calcext:value-type="float">
            <text:p>47332</text:p>
          </table:table-cell>
          <table:table-cell office:value-type="float" office:value="22849" calcext:value-type="float">
            <text:p>22849</text:p>
          </table:table-cell>
          <table:table-cell office:value-type="float" office:value="10013" calcext:value-type="float">
            <text:p>10013</text:p>
          </table:table-cell>
          <table:table-cell office:value-type="float" office:value="4593" calcext:value-type="float">
            <text:p>4593</text:p>
          </table:table-cell>
          <table:table-cell office:value-type="float" office:value="2194" calcext:value-type="float">
            <text:p>2194</text:p>
          </table:table-cell>
          <table:table-cell office:value-type="float" office:value="1217" calcext:value-type="float">
            <text:p>1217</text:p>
          </table:table-cell>
          <table:table-cell office:value-type="float" office:value="713" calcext:value-type="float">
            <text:p>713</text:p>
          </table:table-cell>
          <table:table-cell office:value-type="float" office:value="467" calcext:value-type="float">
            <text:p>467</text:p>
          </table:table-cell>
          <table:table-cell office:value-type="float" office:value="346" calcext:value-type="float">
            <text:p>346</text:p>
          </table:table-cell>
          <table:table-cell office:value-type="float" office:value="290" calcext:value-type="float">
            <text:p>290</text:p>
          </table:table-cell>
          <table:table-cell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style-name="ce56" office:value-type="float" office:value="140" calcext:value-type="float">
            <text:p>140</text:p>
          </table:table-cell>
          <table:table-cell table:style-name="ce50" office:value-type="float" office:value="5" calcext:value-type="float">
            <text:p>5</text:p>
          </table:table-cell>
          <table:table-cell table:style-name="ce60" table:formula="of:=[.C35]+[.B36]" office:value-type="float" office:value="70" calcext:value-type="float">
            <text:p>70.0</text:p>
          </table:table-cell>
          <table:table-cell table:style-name="ce63" table:formula="of:=[.C36]*[.$A$15]/1000" office:value-type="float" office:value="90.65" calcext:value-type="float">
            <text:p>90.650</text:p>
          </table:table-cell>
          <table:table-cell table:style-name="ce63" table:formula="of:=[.D36]/([.$A$7]+[.C36]/1000)" office:value-type="float" office:value="8.71634615384615" calcext:value-type="float">
            <text:p>8.716</text:p>
          </table:table-cell>
          <table:table-cell table:style-name="ce143" table:formula="of:=[.$A$6]*[.E36]*100" office:value-type="float" office:value="5491298.07692308" calcext:value-type="float">
            <text:p>5491298</text:p>
          </table:table-cell>
          <table:table-cell table:style-name="ce20" office:value-type="float" office:value="2848620" calcext:value-type="float">
            <text:p>2848620</text:p>
          </table:table-cell>
          <table:table-cell table:style-name="ce152" table:formula="of:=[.G36]/[.F36]" office:value-type="float" office:value="0.518751661282274" calcext:value-type="float">
            <text:p>0.52</text:p>
          </table:table-cell>
          <table:table-cell table:style-name="ce66" table:formula="of:=[.E36]*[.$C$99]" office:value-type="float" office:value="4065172.32776143" calcext:value-type="float">
            <text:p>4065172</text:p>
          </table:table-cell>
          <table:table-cell table:style-name="ce152" table:formula="of:=[.G36]/[.I36]" office:value-type="float" office:value="0.700737821259511" calcext:value-type="float">
            <text:p>0.70</text:p>
          </table:table-cell>
          <table:table-cell table:style-name="ce66" table:formula="of:=[.I36]*0.95" office:value-type="float" office:value="3861913.71137336" calcext:value-type="float">
            <text:p>3861914</text:p>
          </table:table-cell>
          <table:table-cell table:style-name="ce73" table:formula="of:=IF([.G36]&lt;[.$A$18]; [.G36]; [.G36]*(1+[.G36]/[.$A$18]*[.$A$19]))" office:value-type="float" office:value="3457217.69283" calcext:value-type="float">
            <text:p>3457217.69283</text:p>
          </table:table-cell>
          <table:table-cell table:style-name="ce189" table:formula="of:=[.L36]/[.I36]" office:value-type="float" office:value="0.850448004189231" calcext:value-type="float">
            <text:p>0.850448004189231</text:p>
          </table:table-cell>
          <table:table-cell table:number-columns-repeated="14"/>
          <table:table-cell office:value-type="float" office:value="1621713" calcext:value-type="float">
            <text:p>1621713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6.869307" calcext:value-type="float">
            <text:p>6.869307</text:p>
          </table:table-cell>
          <table:table-cell office:value-type="float" office:value="113641" calcext:value-type="float">
            <text:p>113641</text:p>
          </table:table-cell>
          <table:table-cell office:value-type="float" office:value="69912" calcext:value-type="float">
            <text:p>69912</text:p>
          </table:table-cell>
          <table:table-cell office:value-type="float" office:value="41652" calcext:value-type="float">
            <text:p>41652</text:p>
          </table:table-cell>
          <table:table-cell office:value-type="float" office:value="21377" calcext:value-type="float">
            <text:p>21377</text:p>
          </table:table-cell>
          <table:table-cell office:value-type="float" office:value="11493" calcext:value-type="float">
            <text:p>11493</text:p>
          </table:table-cell>
          <table:table-cell office:value-type="float" office:value="5556" calcext:value-type="float">
            <text:p>5556</text:p>
          </table:table-cell>
          <table:table-cell office:value-type="float" office:value="2485" calcext:value-type="float">
            <text:p>2485</text:p>
          </table:table-cell>
          <table:table-cell office:value-type="float" office:value="1126" calcext:value-type="float">
            <text:p>1126</text:p>
          </table:table-cell>
          <table:table-cell office:value-type="float" office:value="553" calcext:value-type="float">
            <text:p>553</text:p>
          </table:table-cell>
          <table:table-cell office:value-type="float" office:value="301" calcext:value-type="float">
            <text:p>301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60" table:formula="of:=[.C36]+[.B37]" office:value-type="float" office:value="75" calcext:value-type="float">
            <text:p>75.0</text:p>
          </table:table-cell>
          <table:table-cell table:style-name="ce63" table:formula="of:=[.C37]*[.$A$15]/1000" office:value-type="float" office:value="97.125" calcext:value-type="float">
            <text:p>97.125</text:p>
          </table:table-cell>
          <table:table-cell table:style-name="ce63" table:formula="of:=[.D37]/([.$A$7]+[.C37]/1000)" office:value-type="float" office:value="9.33445458913984" calcext:value-type="float">
            <text:p>9.334</text:p>
          </table:table-cell>
          <table:table-cell table:style-name="ce143" table:formula="of:=[.$A$6]*[.E37]*100" office:value-type="float" office:value="5880706.3911581" calcext:value-type="float">
            <text:p>5880706</text:p>
          </table:table-cell>
          <table:table-cell table:style-name="ce20" office:value-type="float" office:value="2966413.8" calcext:value-type="float">
            <text:p>2966414</text:p>
          </table:table-cell>
          <table:table-cell table:style-name="ce152" table:formula="of:=[.G37]/[.F37]" office:value-type="float" office:value="0.504431543200343" calcext:value-type="float">
            <text:p>0.50</text:p>
          </table:table-cell>
          <table:table-cell table:style-name="ce66" table:formula="of:=[.E37]*[.$C$99]" office:value-type="float" office:value="4353448.77552539" calcext:value-type="float">
            <text:p>4353449</text:p>
          </table:table-cell>
          <table:table-cell table:style-name="ce152" table:formula="of:=[.G37]/[.I37]" office:value-type="float" office:value="0.681393982783684" calcext:value-type="float">
            <text:p>0.68</text:p>
          </table:table-cell>
          <table:table-cell table:style-name="ce66" table:formula="of:=[.I37]*0.95" office:value-type="float" office:value="4135776.33674912" calcext:value-type="float">
            <text:p>4135776</text:p>
          </table:table-cell>
          <table:table-cell table:style-name="ce73" table:formula="of:=IF([.G37]&lt;[.$A$18]; [.G37]; [.G37]*(1+[.G37]/[.$A$18]*[.$A$19]))" office:value-type="float" office:value="3626384.61246228" calcext:value-type="float">
            <text:p>3626384.61246228</text:p>
          </table:table-cell>
          <table:table-cell table:style-name="ce189" table:formula="of:=[.L37]/[.I37]" office:value-type="float" office:value="0.832991221316169" calcext:value-type="float">
            <text:p>0.832991221316169</text:p>
          </table:table-cell>
          <table:table-cell table:number-columns-repeated="14"/>
          <table:table-cell office:value-type="float" office:value="1641092" calcext:value-type="float">
            <text:p>1641092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7.210417" calcext:value-type="float">
            <text:p>7.210417</text:p>
          </table:table-cell>
          <table:table-cell office:value-type="float" office:value="116932" calcext:value-type="float">
            <text:p>116932</text:p>
          </table:table-cell>
          <table:table-cell office:value-type="float" office:value="72753" calcext:value-type="float">
            <text:p>72753</text:p>
          </table:table-cell>
          <table:table-cell office:value-type="float" office:value="43148" calcext:value-type="float">
            <text:p>43148</text:p>
          </table:table-cell>
          <table:table-cell office:value-type="float" office:value="22218" calcext:value-type="float">
            <text:p>22218</text:p>
          </table:table-cell>
          <table:table-cell office:value-type="float" office:value="12020" calcext:value-type="float">
            <text:p>12020</text:p>
          </table:table-cell>
          <table:table-cell office:value-type="float" office:value="5836" calcext:value-type="float">
            <text:p>5836</text:p>
          </table:table-cell>
          <table:table-cell office:value-type="float" office:value="2554" calcext:value-type="float">
            <text:p>2554</text:p>
          </table:table-cell>
          <table:table-cell office:value-type="float" office:value="1164" calcext:value-type="float">
            <text:p>1164</text:p>
          </table:table-cell>
          <table:table-cell office:value-type="float" office:value="580" calcext:value-type="float">
            <text:p>580</text:p>
          </table:table-cell>
          <table:table-cell office:value-type="float" office:value="296" calcext:value-type="float">
            <text:p>296</text:p>
          </table:table-cell>
          <table:table-cell office:value-type="float" office:value="158" calcext:value-type="float">
            <text:p>158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style-name="ce60" table:formula="of:=[.C37]+[.B38]" office:value-type="float" office:value="80" calcext:value-type="float">
            <text:p>80.0</text:p>
          </table:table-cell>
          <table:table-cell table:style-name="ce63" table:formula="of:=[.C38]*[.$A$15]/1000" office:value-type="float" office:value="103.6" calcext:value-type="float">
            <text:p>103.600</text:p>
          </table:table-cell>
          <table:table-cell table:style-name="ce63" table:formula="of:=[.D38]/([.$A$7]+[.C38]/1000)" office:value-type="float" office:value="9.95196926032661" calcext:value-type="float">
            <text:p>9.952</text:p>
          </table:table-cell>
          <table:table-cell table:style-name="ce143" table:formula="of:=[.$A$6]*[.E38]*100" office:value-type="float" office:value="6269740.63400576" calcext:value-type="float">
            <text:p>6269741</text:p>
          </table:table-cell>
          <table:table-cell table:style-name="ce20" office:value-type="float" office:value="3059154" calcext:value-type="float">
            <text:p>3059154</text:p>
          </table:table-cell>
          <table:table-cell table:style-name="ce152" table:formula="of:=[.G38]/[.F38]" office:value-type="float" office:value="0.487923532818533" calcext:value-type="float">
            <text:p>0.49</text:p>
          </table:table-cell>
          <table:table-cell table:style-name="ce66" table:formula="of:=[.E38]*[.$C$99]" office:value-type="float" office:value="4641448.30066902" calcext:value-type="float">
            <text:p>4641448</text:p>
          </table:table-cell>
          <table:table-cell table:style-name="ce152" table:formula="of:=[.G38]/[.I38]" office:value-type="float" office:value="0.659094705322701" calcext:value-type="float">
            <text:p>0.66</text:p>
          </table:table-cell>
          <table:table-cell table:style-name="ce66" table:formula="of:=[.I38]*0.95" office:value-type="float" office:value="4409375.88563557" calcext:value-type="float">
            <text:p>4409376</text:p>
          </table:table-cell>
          <table:table-cell table:style-name="ce73" table:formula="of:=IF([.G38]&lt;[.$A$18]; [.G38]; [.G38]*(1+[.G38]/[.$A$18]*[.$A$19]))" office:value-type="float" office:value="3761035.7396787" calcext:value-type="float">
            <text:p>3761035.7396787</text:p>
          </table:table-cell>
          <table:table-cell table:style-name="ce189" table:formula="of:=[.L38]/[.I38]" office:value-type="float" office:value="0.810315120635208" calcext:value-type="float">
            <text:p>0.810315120635208</text:p>
          </table:table-cell>
          <table:table-cell table:number-columns-repeated="14"/>
          <table:table-cell office:value-type="float" office:value="1604994" calcext:value-type="float">
            <text:p>1604994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7.157043" calcext:value-type="float">
            <text:p>7.157043</text:p>
          </table:table-cell>
          <table:table-cell office:value-type="float" office:value="117454" calcext:value-type="float">
            <text:p>117454</text:p>
          </table:table-cell>
          <table:table-cell office:value-type="float" office:value="72930" calcext:value-type="float">
            <text:p>72930</text:p>
          </table:table-cell>
          <table:table-cell office:value-type="float" office:value="43071" calcext:value-type="float">
            <text:p>43071</text:p>
          </table:table-cell>
          <table:table-cell office:value-type="float" office:value="21929" calcext:value-type="float">
            <text:p>21929</text:p>
          </table:table-cell>
          <table:table-cell office:value-type="float" office:value="11750" calcext:value-type="float">
            <text:p>11750</text:p>
          </table:table-cell>
          <table:table-cell office:value-type="float" office:value="5690" calcext:value-type="float">
            <text:p>5690</text:p>
          </table:table-cell>
          <table:table-cell office:value-type="float" office:value="2496" calcext:value-type="float">
            <text:p>2496</text:p>
          </table:table-cell>
          <table:table-cell office:value-type="float" office:value="1133" calcext:value-type="float">
            <text:p>1133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166" calcext:value-type="float">
            <text:p>166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5"/>
          <table:table-cell table:style-name="ce20"/>
          <table:table-cell table:number-columns-repeated="21"/>
          <table:table-cell office:value-type="float" office:value="1587946" calcext:value-type="float">
            <text:p>1587946</text:p>
          </table:table-cell>
          <table:table-cell table:style-name="ce20" table:formula="of:=SUM([.AB35:.AB39])/5" office:value-type="float" office:value="1622014.2" calcext:value-type="float">
            <text:p>1622014</text:p>
          </table:table-cell>
          <table:table-cell table:style-name="ce76" table:formula="of:=(MAX([.AB35:.AB39])-MIN([.AB35:.AB39]))/[.AC39]*100" office:value-type="float" office:value="4.09244259390577" calcext:value-type="float">
            <text:p>4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193069" calcext:value-type="float">
            <text:p>7.193069</text:p>
          </table:table-cell>
          <table:table-cell office:value-type="float" office:value="115448" calcext:value-type="float">
            <text:p>115448</text:p>
          </table:table-cell>
          <table:table-cell office:value-type="float" office:value="71654" calcext:value-type="float">
            <text:p>71654</text:p>
          </table:table-cell>
          <table:table-cell office:value-type="float" office:value="42515" calcext:value-type="float">
            <text:p>42515</text:p>
          </table:table-cell>
          <table:table-cell office:value-type="float" office:value="21842" calcext:value-type="float">
            <text:p>21842</text:p>
          </table:table-cell>
          <table:table-cell office:value-type="float" office:value="11839" calcext:value-type="float">
            <text:p>11839</text:p>
          </table:table-cell>
          <table:table-cell office:value-type="float" office:value="5676" calcext:value-type="float">
            <text:p>5676</text:p>
          </table:table-cell>
          <table:table-cell office:value-type="float" office:value="2515" calcext:value-type="float">
            <text:p>2515</text:p>
          </table:table-cell>
          <table:table-cell office:value-type="float" office:value="1171" calcext:value-type="float">
            <text:p>1171</text:p>
          </table:table-cell>
          <table:table-cell office:value-type="float" office:value="590" calcext:value-type="float">
            <text:p>590</text:p>
          </table:table-cell>
          <table:table-cell office:value-type="float" office:value="307" calcext:value-type="float">
            <text:p>307</text:p>
          </table:table-cell>
          <table:table-cell office:value-type="float" office:value="181" calcext:value-type="float">
            <text:p>181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1621709" calcext:value-type="float">
            <text:p>1621709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7.184628" calcext:value-type="float">
            <text:p>7.184628</text:p>
          </table:table-cell>
          <table:table-cell office:value-type="float" office:value="114088" calcext:value-type="float">
            <text:p>114088</text:p>
          </table:table-cell>
          <table:table-cell office:value-type="float" office:value="71037" calcext:value-type="float">
            <text:p>71037</text:p>
          </table:table-cell>
          <table:table-cell office:value-type="float" office:value="42105" calcext:value-type="float">
            <text:p>42105</text:p>
          </table:table-cell>
          <table:table-cell office:value-type="float" office:value="21467" calcext:value-type="float">
            <text:p>21467</text:p>
          </table:table-cell>
          <table:table-cell office:value-type="float" office:value="11436" calcext:value-type="float">
            <text:p>11436</text:p>
          </table:table-cell>
          <table:table-cell office:value-type="float" office:value="5576" calcext:value-type="float">
            <text:p>5576</text:p>
          </table:table-cell>
          <table:table-cell office:value-type="float" office:value="2484" calcext:value-type="float">
            <text:p>2484</text:p>
          </table:table-cell>
          <table:table-cell office:value-type="float" office:value="1118" calcext:value-type="float">
            <text:p>1118</text:p>
          </table:table-cell>
          <table:table-cell office:value-type="float" office:value="556" calcext:value-type="float">
            <text:p>556</text:p>
          </table:table-cell>
          <table:table-cell office:value-type="float" office:value="288" calcext:value-type="float">
            <text:p>288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1865238" calcext:value-type="float">
            <text:p>1865238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35.614464" calcext:value-type="float">
            <text:p>35.614464</text:p>
          </table:table-cell>
          <table:table-cell office:value-type="float" office:value="577563" calcext:value-type="float">
            <text:p>577563</text:p>
          </table:table-cell>
          <table:table-cell office:value-type="float" office:value="358287" calcext:value-type="float">
            <text:p>358287</text:p>
          </table:table-cell>
          <table:table-cell office:value-type="float" office:value="212491" calcext:value-type="float">
            <text:p>212491</text:p>
          </table:table-cell>
          <table:table-cell office:value-type="float" office:value="108833" calcext:value-type="float">
            <text:p>108833</text:p>
          </table:table-cell>
          <table:table-cell office:value-type="float" office:value="58537" calcext:value-type="float">
            <text:p>58537</text:p>
          </table:table-cell>
          <table:table-cell office:value-type="float" office:value="28335" calcext:value-type="float">
            <text:p>28335</text:p>
          </table:table-cell>
          <table:table-cell office:value-type="float" office:value="12533" calcext:value-type="float">
            <text:p>12533</text:p>
          </table:table-cell>
          <table:table-cell office:value-type="float" office:value="5712" calcext:value-type="float">
            <text:p>5712</text:p>
          </table:table-cell>
          <table:table-cell office:value-type="float" office:value="2816" calcext:value-type="float">
            <text:p>2816</text:p>
          </table:table-cell>
          <table:table-cell office:value-type="float" office:value="1488" calcext:value-type="float">
            <text:p>1488</text:p>
          </table:table-cell>
          <table:table-cell office:value-type="float" office:value="838" calcext:value-type="float">
            <text:p>838</text:p>
          </table:table-cell>
          <table:table-cell office:value-type="float" office:value="559" calcext:value-type="float">
            <text:p>559</text:p>
          </table:table-cell>
          <table:table-cell office:value-type="float" office:value="421" calcext:value-type="float">
            <text:p>421</text:p>
          </table:table-cell>
          <table:table-cell office:value-type="float" office:value="354" calcext:value-type="float">
            <text:p>354</text:p>
          </table:table-cell>
          <table:table-cell office:value-type="float" office:value="262" calcext:value-type="float">
            <text:p>262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1820189" calcext:value-type="float">
            <text:p>1820189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6.658946" calcext:value-type="float">
            <text:p>6.658946</text:p>
          </table:table-cell>
          <table:table-cell office:value-type="float" office:value="124205" calcext:value-type="float">
            <text:p>124205</text:p>
          </table:table-cell>
          <table:table-cell office:value-type="float" office:value="79362" calcext:value-type="float">
            <text:p>79362</text:p>
          </table:table-cell>
          <table:table-cell office:value-type="float" office:value="48070" calcext:value-type="float">
            <text:p>48070</text:p>
          </table:table-cell>
          <table:table-cell office:value-type="float" office:value="25240" calcext:value-type="float">
            <text:p>25240</text:p>
          </table:table-cell>
          <table:table-cell office:value-type="float" office:value="13674" calcext:value-type="float">
            <text:p>13674</text:p>
          </table:table-cell>
          <table:table-cell office:value-type="float" office:value="6690" calcext:value-type="float">
            <text:p>6690</text:p>
          </table:table-cell>
          <table:table-cell office:value-type="float" office:value="2969" calcext:value-type="float">
            <text:p>2969</text:p>
          </table:table-cell>
          <table:table-cell office:value-type="float" office:value="1302" calcext:value-type="float">
            <text:p>1302</text:p>
          </table:table-cell>
          <table:table-cell office:value-type="float" office:value="645" calcext:value-type="float">
            <text:p>645</text:p>
          </table:table-cell>
          <table:table-cell office:value-type="float" office:value="346" calcext:value-type="float">
            <text:p>346</text:p>
          </table:table-cell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1841870" calcext:value-type="float">
            <text:p>1841870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6.989881" calcext:value-type="float">
            <text:p>6.989881</text:p>
          </table:table-cell>
          <table:table-cell office:value-type="float" office:value="127229" calcext:value-type="float">
            <text:p>127229</text:p>
          </table:table-cell>
          <table:table-cell office:value-type="float" office:value="81490" calcext:value-type="float">
            <text:p>81490</text:p>
          </table:table-cell>
          <table:table-cell office:value-type="float" office:value="49547" calcext:value-type="float">
            <text:p>49547</text:p>
          </table:table-cell>
          <table:table-cell office:value-type="float" office:value="25730" calcext:value-type="float">
            <text:p>25730</text:p>
          </table:table-cell>
          <table:table-cell office:value-type="float" office:value="14037" calcext:value-type="float">
            <text:p>14037</text:p>
          </table:table-cell>
          <table:table-cell office:value-type="float" office:value="6917" calcext:value-type="float">
            <text:p>6917</text:p>
          </table:table-cell>
          <table:table-cell office:value-type="float" office:value="3049" calcext:value-type="float">
            <text:p>3049</text:p>
          </table:table-cell>
          <table:table-cell office:value-type="float" office:value="1366" calcext:value-type="float">
            <text:p>1366</text:p>
          </table:table-cell>
          <table:table-cell office:value-type="float" office:value="666" calcext:value-type="float">
            <text:p>666</text:p>
          </table:table-cell>
          <table:table-cell office:value-type="float" office:value="354" calcext:value-type="float">
            <text:p>354</text:p>
          </table:table-cell>
          <table:table-cell office:value-type="float" office:value="219" calcext:value-type="float">
            <text:p>219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1822598" calcext:value-type="float">
            <text:p>1822598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6.941223" calcext:value-type="float">
            <text:p>6.941223</text:p>
          </table:table-cell>
          <table:table-cell office:value-type="float" office:value="127848" calcext:value-type="float">
            <text:p>127848</text:p>
          </table:table-cell>
          <table:table-cell office:value-type="float" office:value="81619" calcext:value-type="float">
            <text:p>81619</text:p>
          </table:table-cell>
          <table:table-cell office:value-type="float" office:value="49248" calcext:value-type="float">
            <text:p>49248</text:p>
          </table:table-cell>
          <table:table-cell office:value-type="float" office:value="25627" calcext:value-type="float">
            <text:p>25627</text:p>
          </table:table-cell>
          <table:table-cell office:value-type="float" office:value="13880" calcext:value-type="float">
            <text:p>13880</text:p>
          </table:table-cell>
          <table:table-cell office:value-type="float" office:value="6812" calcext:value-type="float">
            <text:p>6812</text:p>
          </table:table-cell>
          <table:table-cell office:value-type="float" office:value="3034" calcext:value-type="float">
            <text:p>3034</text:p>
          </table:table-cell>
          <table:table-cell office:value-type="float" office:value="1381" calcext:value-type="float">
            <text:p>1381</text:p>
          </table:table-cell>
          <table:table-cell office:value-type="float" office:value="652" calcext:value-type="float">
            <text:p>652</text:p>
          </table:table-cell>
          <table:table-cell office:value-type="float" office:value="338" calcext:value-type="float">
            <text:p>338</text:p>
          </table:table-cell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1793320" calcext:value-type="float">
            <text:p>1793320</text:p>
          </table:table-cell>
          <table:table-cell table:style-name="ce20" table:formula="of:=SUM([.AB41:.AB45])/5" office:value-type="float" office:value="1828643" calcext:value-type="float">
            <text:p>1828643</text:p>
          </table:table-cell>
          <table:table-cell table:style-name="ce76" table:formula="of:=(MAX([.AB41:.AB45])-MIN([.AB41:.AB45]))/[.AC45]*100" office:value-type="float" office:value="3.9328616903354" calcext:value-type="float">
            <text:p>3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993397" calcext:value-type="float">
            <text:p>6.993397</text:p>
          </table:table-cell>
          <table:table-cell office:value-type="float" office:value="127462" calcext:value-type="float">
            <text:p>127462</text:p>
          </table:table-cell>
          <table:table-cell office:value-type="float" office:value="81342" calcext:value-type="float">
            <text:p>81342</text:p>
          </table:table-cell>
          <table:table-cell office:value-type="float" office:value="49339" calcext:value-type="float">
            <text:p>49339</text:p>
          </table:table-cell>
          <table:table-cell office:value-type="float" office:value="25863" calcext:value-type="float">
            <text:p>25863</text:p>
          </table:table-cell>
          <table:table-cell office:value-type="float" office:value="13984" calcext:value-type="float">
            <text:p>13984</text:p>
          </table:table-cell>
          <table:table-cell office:value-type="float" office:value="6904" calcext:value-type="float">
            <text:p>6904</text:p>
          </table:table-cell>
          <table:table-cell office:value-type="float" office:value="2980" calcext:value-type="float">
            <text:p>2980</text:p>
          </table:table-cell>
          <table:table-cell office:value-type="float" office:value="1356" calcext:value-type="float">
            <text:p>1356</text:p>
          </table:table-cell>
          <table:table-cell office:value-type="float" office:value="672" calcext:value-type="float">
            <text:p>672</text:p>
          </table:table-cell>
          <table:table-cell office:value-type="float" office:value="338" calcext:value-type="float">
            <text:p>338</text:p>
          </table:table-cell>
          <table:table-cell office:value-type="float" office:value="192" calcext:value-type="float">
            <text:p>192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1828290" calcext:value-type="float">
            <text:p>1828290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6.973424" calcext:value-type="float">
            <text:p>6.973424</text:p>
          </table:table-cell>
          <table:table-cell office:value-type="float" office:value="125056" calcext:value-type="float">
            <text:p>125056</text:p>
          </table:table-cell>
          <table:table-cell office:value-type="float" office:value="79466" calcext:value-type="float">
            <text:p>79466</text:p>
          </table:table-cell>
          <table:table-cell office:value-type="float" office:value="48172" calcext:value-type="float">
            <text:p>48172</text:p>
          </table:table-cell>
          <table:table-cell office:value-type="float" office:value="25213" calcext:value-type="float">
            <text:p>25213</text:p>
          </table:table-cell>
          <table:table-cell office:value-type="float" office:value="13821" calcext:value-type="float">
            <text:p>13821</text:p>
          </table:table-cell>
          <table:table-cell office:value-type="float" office:value="6815" calcext:value-type="float">
            <text:p>6815</text:p>
          </table:table-cell>
          <table:table-cell office:value-type="float" office:value="3007" calcext:value-type="float">
            <text:p>3007</text:p>
          </table:table-cell>
          <table:table-cell office:value-type="float" office:value="1302" calcext:value-type="float">
            <text:p>1302</text:p>
          </table:table-cell>
          <table:table-cell office:value-type="float" office:value="636" calcext:value-type="float">
            <text:p>636</text:p>
          </table:table-cell>
          <table:table-cell office:value-type="float" office:value="330" calcext:value-type="float">
            <text:p>330</text:p>
          </table:table-cell>
          <table:table-cell office:value-type="float" office:value="194" calcext:value-type="float">
            <text:p>194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058531" calcext:value-type="float">
            <text:p>2058531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34.55687" calcext:value-type="float">
            <text:p>34.55687</text:p>
          </table:table-cell>
          <table:table-cell office:value-type="float" office:value="631800" calcext:value-type="float">
            <text:p>631800</text:p>
          </table:table-cell>
          <table:table-cell office:value-type="float" office:value="403280" calcext:value-type="float">
            <text:p>403280</text:p>
          </table:table-cell>
          <table:table-cell office:value-type="float" office:value="244376" calcext:value-type="float">
            <text:p>244376</text:p>
          </table:table-cell>
          <table:table-cell office:value-type="float" office:value="127672" calcext:value-type="float">
            <text:p>127672</text:p>
          </table:table-cell>
          <table:table-cell office:value-type="float" office:value="69396" calcext:value-type="float">
            <text:p>69396</text:p>
          </table:table-cell>
          <table:table-cell office:value-type="float" office:value="34139" calcext:value-type="float">
            <text:p>34139</text:p>
          </table:table-cell>
          <table:table-cell office:value-type="float" office:value="15039" calcext:value-type="float">
            <text:p>15039</text:p>
          </table:table-cell>
          <table:table-cell office:value-type="float" office:value="6706" calcext:value-type="float">
            <text:p>6706</text:p>
          </table:table-cell>
          <table:table-cell office:value-type="float" office:value="3270" calcext:value-type="float">
            <text:p>3270</text:p>
          </table:table-cell>
          <table:table-cell office:value-type="float" office:value="1706" calcext:value-type="float">
            <text:p>1706</text:p>
          </table:table-cell>
          <table:table-cell office:value-type="float" office:value="1013" calcext:value-type="float">
            <text:p>1013</text:p>
          </table:table-cell>
          <table:table-cell office:value-type="float" office:value="659" calcext:value-type="float">
            <text:p>659</text:p>
          </table:table-cell>
          <table:table-cell office:value-type="float" office:value="483" calcext:value-type="float">
            <text:p>483</text:p>
          </table:table-cell>
          <table:table-cell office:value-type="float" office:value="396" calcext:value-type="float">
            <text:p>396</text:p>
          </table:table-cell>
          <table:table-cell office:value-type="float" office:value="310" calcext:value-type="float">
            <text:p>310</text:p>
          </table:table-cell>
          <table:table-cell office:value-type="float" office:value="245" calcext:value-type="float">
            <text:p>245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000184" calcext:value-type="float">
            <text:p>2000184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6.457036" calcext:value-type="float">
            <text:p>6.457036</text:p>
          </table:table-cell>
          <table:table-cell office:value-type="float" office:value="132920" calcext:value-type="float">
            <text:p>132920</text:p>
          </table:table-cell>
          <table:table-cell office:value-type="float" office:value="86592" calcext:value-type="float">
            <text:p>86592</text:p>
          </table:table-cell>
          <table:table-cell office:value-type="float" office:value="53459" calcext:value-type="float">
            <text:p>53459</text:p>
          </table:table-cell>
          <table:table-cell office:value-type="float" office:value="28468" calcext:value-type="float">
            <text:p>28468</text:p>
          </table:table-cell>
          <table:table-cell office:value-type="float" office:value="15760" calcext:value-type="float">
            <text:p>15760</text:p>
          </table:table-cell>
          <table:table-cell office:value-type="float" office:value="7909" calcext:value-type="float">
            <text:p>7909</text:p>
          </table:table-cell>
          <table:table-cell office:value-type="float" office:value="3608" calcext:value-type="float">
            <text:p>3608</text:p>
          </table:table-cell>
          <table:table-cell office:value-type="float" office:value="1621" calcext:value-type="float">
            <text:p>1621</text:p>
          </table:table-cell>
          <table:table-cell office:value-type="float" office:value="794" calcext:value-type="float">
            <text:p>794</text:p>
          </table:table-cell>
          <table:table-cell office:value-type="float" office:value="408" calcext:value-type="float">
            <text:p>408</text:p>
          </table:table-cell>
          <table:table-cell office:value-type="float" office:value="230" calcext:value-type="float">
            <text:p>230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043183" calcext:value-type="float">
            <text:p>2043183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6.780585" calcext:value-type="float">
            <text:p>6.780585</text:p>
          </table:table-cell>
          <table:table-cell office:value-type="float" office:value="135624" calcext:value-type="float">
            <text:p>135624</text:p>
          </table:table-cell>
          <table:table-cell office:value-type="float" office:value="88874" calcext:value-type="float">
            <text:p>88874</text:p>
          </table:table-cell>
          <table:table-cell office:value-type="float" office:value="55241" calcext:value-type="float">
            <text:p>55241</text:p>
          </table:table-cell>
          <table:table-cell office:value-type="float" office:value="29505" calcext:value-type="float">
            <text:p>29505</text:p>
          </table:table-cell>
          <table:table-cell office:value-type="float" office:value="16273" calcext:value-type="float">
            <text:p>16273</text:p>
          </table:table-cell>
          <table:table-cell office:value-type="float" office:value="8069" calcext:value-type="float">
            <text:p>8069</text:p>
          </table:table-cell>
          <table:table-cell office:value-type="float" office:value="3517" calcext:value-type="float">
            <text:p>3517</text:p>
          </table:table-cell>
          <table:table-cell office:value-type="float" office:value="1544" calcext:value-type="float">
            <text:p>1544</text:p>
          </table:table-cell>
          <table:table-cell office:value-type="float" office:value="767" calcext:value-type="float">
            <text:p>767</text:p>
          </table:table-cell>
          <table:table-cell office:value-type="float" office:value="393" calcext:value-type="float">
            <text:p>393</text:p>
          </table:table-cell>
          <table:table-cell office:value-type="float" office:value="226" calcext:value-type="float">
            <text:p>226</text:p>
          </table:table-cell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012589" calcext:value-type="float">
            <text:p>2012589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6.726848" calcext:value-type="float">
            <text:p>6.726848</text:p>
          </table:table-cell>
          <table:table-cell office:value-type="float" office:value="137442" calcext:value-type="float">
            <text:p>137442</text:p>
          </table:table-cell>
          <table:table-cell office:value-type="float" office:value="89566" calcext:value-type="float">
            <text:p>89566</text:p>
          </table:table-cell>
          <table:table-cell office:value-type="float" office:value="54960" calcext:value-type="float">
            <text:p>54960</text:p>
          </table:table-cell>
          <table:table-cell office:value-type="float" office:value="29314" calcext:value-type="float">
            <text:p>29314</text:p>
          </table:table-cell>
          <table:table-cell office:value-type="float" office:value="16221" calcext:value-type="float">
            <text:p>16221</text:p>
          </table:table-cell>
          <table:table-cell office:value-type="float" office:value="7943" calcext:value-type="float">
            <text:p>7943</text:p>
          </table:table-cell>
          <table:table-cell office:value-type="float" office:value="3479" calcext:value-type="float">
            <text:p>3479</text:p>
          </table:table-cell>
          <table:table-cell office:value-type="float" office:value="1522" calcext:value-type="float">
            <text:p>1522</text:p>
          </table:table-cell>
          <table:table-cell office:value-type="float" office:value="756" calcext:value-type="float">
            <text:p>756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1976768" calcext:value-type="float">
            <text:p>1976768</text:p>
          </table:table-cell>
          <table:table-cell table:style-name="ce20" table:formula="of:=SUM([.AB47:.AB51])/5" office:value-type="float" office:value="2018251" calcext:value-type="float">
            <text:p>2018251</text:p>
          </table:table-cell>
          <table:table-cell table:style-name="ce76" table:formula="of:=(MAX([.AB47:.AB51])-MIN([.AB47:.AB51]))/[.AC51]*100" office:value-type="float" office:value="4.05118094825668" calcext:value-type="float">
            <text:p>4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768715" calcext:value-type="float">
            <text:p>6.768715</text:p>
          </table:table-cell>
          <table:table-cell office:value-type="float" office:value="136226" calcext:value-type="float">
            <text:p>136226</text:p>
          </table:table-cell>
          <table:table-cell office:value-type="float" office:value="89040" calcext:value-type="float">
            <text:p>89040</text:p>
          </table:table-cell>
          <table:table-cell office:value-type="float" office:value="55131" calcext:value-type="float">
            <text:p>55131</text:p>
          </table:table-cell>
          <table:table-cell office:value-type="float" office:value="29454" calcext:value-type="float">
            <text:p>29454</text:p>
          </table:table-cell>
          <table:table-cell office:value-type="float" office:value="16239" calcext:value-type="float">
            <text:p>16239</text:p>
          </table:table-cell>
          <table:table-cell office:value-type="float" office:value="8133" calcext:value-type="float">
            <text:p>8133</text:p>
          </table:table-cell>
          <table:table-cell office:value-type="float" office:value="3598" calcext:value-type="float">
            <text:p>3598</text:p>
          </table:table-cell>
          <table:table-cell office:value-type="float" office:value="1643" calcext:value-type="float">
            <text:p>1643</text:p>
          </table:table-cell>
          <table:table-cell office:value-type="float" office:value="748" calcext:value-type="float">
            <text:p>748</text:p>
          </table:table-cell>
          <table:table-cell office:value-type="float" office:value="413" calcext:value-type="float">
            <text:p>413</text:p>
          </table:table-cell>
          <table:table-cell office:value-type="float" office:value="244" calcext:value-type="float">
            <text:p>244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017846" calcext:value-type="float">
            <text:p>2017846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6.762537" calcext:value-type="float">
            <text:p>6.762537</text:p>
          </table:table-cell>
          <table:table-cell office:value-type="float" office:value="133680" calcext:value-type="float">
            <text:p>133680</text:p>
          </table:table-cell>
          <table:table-cell office:value-type="float" office:value="87241" calcext:value-type="float">
            <text:p>87241</text:p>
          </table:table-cell>
          <table:table-cell office:value-type="float" office:value="53754" calcext:value-type="float">
            <text:p>53754</text:p>
          </table:table-cell>
          <table:table-cell office:value-type="float" office:value="28819" calcext:value-type="float">
            <text:p>28819</text:p>
          </table:table-cell>
          <table:table-cell office:value-type="float" office:value="15938" calcext:value-type="float">
            <text:p>15938</text:p>
          </table:table-cell>
          <table:table-cell office:value-type="float" office:value="7890" calcext:value-type="float">
            <text:p>7890</text:p>
          </table:table-cell>
          <table:table-cell office:value-type="float" office:value="3484" calcext:value-type="float">
            <text:p>3484</text:p>
          </table:table-cell>
          <table:table-cell office:value-type="float" office:value="1614" calcext:value-type="float">
            <text:p>1614</text:p>
          </table:table-cell>
          <table:table-cell office:value-type="float" office:value="784" calcext:value-type="float">
            <text:p>784</text:p>
          </table:table-cell>
          <table:table-cell office:value-type="float" office:value="406" calcext:value-type="float">
            <text:p>406</text:p>
          </table:table-cell>
          <table:table-cell office:value-type="float" office:value="258" calcext:value-type="float">
            <text:p>258</text:p>
          </table:table-cell>
          <table:table-cell office:value-type="float" office:value="176" calcext:value-type="float">
            <text:p>176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229476" calcext:value-type="float">
            <text:p>2229476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33.495724" calcext:value-type="float">
            <text:p>33.495724</text:p>
          </table:table-cell>
          <table:table-cell office:value-type="float" office:value="675892" calcext:value-type="float">
            <text:p>675892</text:p>
          </table:table-cell>
          <table:table-cell office:value-type="float" office:value="441313" calcext:value-type="float">
            <text:p>441313</text:p>
          </table:table-cell>
          <table:table-cell office:value-type="float" office:value="272546" calcext:value-type="float">
            <text:p>272546</text:p>
          </table:table-cell>
          <table:table-cell office:value-type="float" office:value="145560" calcext:value-type="float">
            <text:p>145560</text:p>
          </table:table-cell>
          <table:table-cell office:value-type="float" office:value="80430" calcext:value-type="float">
            <text:p>80430</text:p>
          </table:table-cell>
          <table:table-cell office:value-type="float" office:value="39943" calcext:value-type="float">
            <text:p>39943</text:p>
          </table:table-cell>
          <table:table-cell office:value-type="float" office:value="17686" calcext:value-type="float">
            <text:p>17686</text:p>
          </table:table-cell>
          <table:table-cell office:value-type="float" office:value="7945" calcext:value-type="float">
            <text:p>7945</text:p>
          </table:table-cell>
          <table:table-cell office:value-type="float" office:value="3849" calcext:value-type="float">
            <text:p>3849</text:p>
          </table:table-cell>
          <table:table-cell office:value-type="float" office:value="2010" calcext:value-type="float">
            <text:p>2010</text:p>
          </table:table-cell>
          <table:table-cell office:value-type="float" office:value="1196" calcext:value-type="float">
            <text:p>1196</text:p>
          </table:table-cell>
          <table:table-cell office:value-type="float" office:value="789" calcext:value-type="float">
            <text:p>789</text:p>
          </table:table-cell>
          <table:table-cell office:value-type="float" office:value="597" calcext:value-type="float">
            <text:p>597</text:p>
          </table:table-cell>
          <table:table-cell office:value-type="float" office:value="513" calcext:value-type="float">
            <text:p>513</text:p>
          </table:table-cell>
          <table:table-cell office:value-type="float" office:value="366" calcext:value-type="float">
            <text:p>366</text:p>
          </table:table-cell>
          <table:table-cell office:value-type="float" office:value="282" calcext:value-type="float">
            <text:p>282</text:p>
          </table:table-cell>
          <table:table-cell office:value-type="float" office:value="240" calcext:value-type="float">
            <text:p>240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183720" calcext:value-type="float">
            <text:p>2183720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6.241434" calcext:value-type="float">
            <text:p>6.241434</text:p>
          </table:table-cell>
          <table:table-cell office:value-type="float" office:value="139151" calcext:value-type="float">
            <text:p>139151</text:p>
          </table:table-cell>
          <table:table-cell office:value-type="float" office:value="93275" calcext:value-type="float">
            <text:p>93275</text:p>
          </table:table-cell>
          <table:table-cell office:value-type="float" office:value="58790" calcext:value-type="float">
            <text:p>58790</text:p>
          </table:table-cell>
          <table:table-cell office:value-type="float" office:value="32267" calcext:value-type="float">
            <text:p>32267</text:p>
          </table:table-cell>
          <table:table-cell office:value-type="float" office:value="18062" calcext:value-type="float">
            <text:p>18062</text:p>
          </table:table-cell>
          <table:table-cell office:value-type="float" office:value="9192" calcext:value-type="float">
            <text:p>9192</text:p>
          </table:table-cell>
          <table:table-cell office:value-type="float" office:value="4149" calcext:value-type="float">
            <text:p>4149</text:p>
          </table:table-cell>
          <table:table-cell office:value-type="float" office:value="1897" calcext:value-type="float">
            <text:p>1897</text:p>
          </table:table-cell>
          <table:table-cell office:value-type="float" office:value="925" calcext:value-type="float">
            <text:p>925</text:p>
          </table:table-cell>
          <table:table-cell office:value-type="float" office:value="474" calcext:value-type="float">
            <text:p>474</text:p>
          </table:table-cell>
          <table:table-cell office:value-type="float" office:value="261" calcext:value-type="float">
            <text:p>261</text:p>
          </table:table-cell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212955" calcext:value-type="float">
            <text:p>2212955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6.564009" calcext:value-type="float">
            <text:p>6.564009</text:p>
          </table:table-cell>
          <table:table-cell office:value-type="float" office:value="143340" calcext:value-type="float">
            <text:p>143340</text:p>
          </table:table-cell>
          <table:table-cell office:value-type="float" office:value="96400" calcext:value-type="float">
            <text:p>96400</text:p>
          </table:table-cell>
          <table:table-cell office:value-type="float" office:value="61013" calcext:value-type="float">
            <text:p>61013</text:p>
          </table:table-cell>
          <table:table-cell office:value-type="float" office:value="33412" calcext:value-type="float">
            <text:p>33412</text:p>
          </table:table-cell>
          <table:table-cell office:value-type="float" office:value="18801" calcext:value-type="float">
            <text:p>18801</text:p>
          </table:table-cell>
          <table:table-cell office:value-type="float" office:value="9416" calcext:value-type="float">
            <text:p>9416</text:p>
          </table:table-cell>
          <table:table-cell office:value-type="float" office:value="4252" calcext:value-type="float">
            <text:p>4252</text:p>
          </table:table-cell>
          <table:table-cell office:value-type="float" office:value="1895" calcext:value-type="float">
            <text:p>1895</text:p>
          </table:table-cell>
          <table:table-cell office:value-type="float" office:value="892" calcext:value-type="float">
            <text:p>892</text:p>
          </table:table-cell>
          <table:table-cell office:value-type="float" office:value="471" calcext:value-type="float">
            <text:p>471</text:p>
          </table:table-cell>
          <table:table-cell office:value-type="float" office:value="274" calcext:value-type="float">
            <text:p>274</text:p>
          </table:table-cell>
          <table:table-cell office:value-type="float" office:value="192" calcext:value-type="float">
            <text:p>192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191335" calcext:value-type="float">
            <text:p>2191335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6.501047" calcext:value-type="float">
            <text:p>6.501047</text:p>
          </table:table-cell>
          <table:table-cell office:value-type="float" office:value="143865" calcext:value-type="float">
            <text:p>143865</text:p>
          </table:table-cell>
          <table:table-cell office:value-type="float" office:value="96331" calcext:value-type="float">
            <text:p>96331</text:p>
          </table:table-cell>
          <table:table-cell office:value-type="float" office:value="60739" calcext:value-type="float">
            <text:p>60739</text:p>
          </table:table-cell>
          <table:table-cell office:value-type="float" office:value="32980" calcext:value-type="float">
            <text:p>32980</text:p>
          </table:table-cell>
          <table:table-cell office:value-type="float" office:value="18463" calcext:value-type="float">
            <text:p>18463</text:p>
          </table:table-cell>
          <table:table-cell office:value-type="float" office:value="9356" calcext:value-type="float">
            <text:p>9356</text:p>
          </table:table-cell>
          <table:table-cell office:value-type="float" office:value="4174" calcext:value-type="float">
            <text:p>4174</text:p>
          </table:table-cell>
          <table:table-cell office:value-type="float" office:value="1905" calcext:value-type="float">
            <text:p>1905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283" calcext:value-type="float">
            <text:p>283</text:p>
          </table:table-cell>
          <table:table-cell office:value-type="float" office:value="169" calcext:value-type="float">
            <text:p>169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146340" calcext:value-type="float">
            <text:p>2146340</text:p>
          </table:table-cell>
          <table:table-cell table:style-name="ce20" table:formula="of:=SUM([.AB53:.AB57])/5" office:value-type="float" office:value="2192765.2" calcext:value-type="float">
            <text:p>2192765</text:p>
          </table:table-cell>
          <table:table-cell table:style-name="ce76" table:formula="of:=(MAX([.AB53:.AB57])-MIN([.AB53:.AB57]))/[.AC57]*100" office:value-type="float" office:value="3.79137720719026" calcext:value-type="float">
            <text:p>3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558389" calcext:value-type="float">
            <text:p>6.558389</text:p>
          </table:table-cell>
          <table:table-cell office:value-type="float" office:value="143716" calcext:value-type="float">
            <text:p>143716</text:p>
          </table:table-cell>
          <table:table-cell office:value-type="float" office:value="95761" calcext:value-type="float">
            <text:p>95761</text:p>
          </table:table-cell>
          <table:table-cell office:value-type="float" office:value="60142" calcext:value-type="float">
            <text:p>60142</text:p>
          </table:table-cell>
          <table:table-cell office:value-type="float" office:value="32863" calcext:value-type="float">
            <text:p>32863</text:p>
          </table:table-cell>
          <table:table-cell office:value-type="float" office:value="18399" calcext:value-type="float">
            <text:p>18399</text:p>
          </table:table-cell>
          <table:table-cell office:value-type="float" office:value="9203" calcext:value-type="float">
            <text:p>9203</text:p>
          </table:table-cell>
          <table:table-cell office:value-type="float" office:value="4179" calcext:value-type="float">
            <text:p>4179</text:p>
          </table:table-cell>
          <table:table-cell office:value-type="float" office:value="1832" calcext:value-type="float">
            <text:p>1832</text:p>
          </table:table-cell>
          <table:table-cell office:value-type="float" office:value="897" calcext:value-type="float">
            <text:p>897</text:p>
          </table:table-cell>
          <table:table-cell office:value-type="float" office:value="441" calcext:value-type="float">
            <text:p>441</text:p>
          </table:table-cell>
          <table:table-cell office:value-type="float" office:value="261" calcext:value-type="float">
            <text:p>261</text:p>
          </table:table-cell>
          <table:table-cell office:value-type="float" office:value="171" calcext:value-type="float">
            <text:p>171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192394" calcext:value-type="float">
            <text:p>2192394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6.541145" calcext:value-type="float">
            <text:p>6.541145</text:p>
          </table:table-cell>
          <table:table-cell office:value-type="float" office:value="140395" calcext:value-type="float">
            <text:p>140395</text:p>
          </table:table-cell>
          <table:table-cell office:value-type="float" office:value="93463" calcext:value-type="float">
            <text:p>93463</text:p>
          </table:table-cell>
          <table:table-cell office:value-type="float" office:value="58945" calcext:value-type="float">
            <text:p>58945</text:p>
          </table:table-cell>
          <table:table-cell office:value-type="float" office:value="32115" calcext:value-type="float">
            <text:p>32115</text:p>
          </table:table-cell>
          <table:table-cell office:value-type="float" office:value="17901" calcext:value-type="float">
            <text:p>17901</text:p>
          </table:table-cell>
          <table:table-cell office:value-type="float" office:value="8982" calcext:value-type="float">
            <text:p>8982</text:p>
          </table:table-cell>
          <table:table-cell office:value-type="float" office:value="4070" calcext:value-type="float">
            <text:p>4070</text:p>
          </table:table-cell>
          <table:table-cell office:value-type="float" office:value="1855" calcext:value-type="float">
            <text:p>1855</text:p>
          </table:table-cell>
          <table:table-cell office:value-type="float" office:value="893" calcext:value-type="float">
            <text:p>893</text:p>
          </table:table-cell>
          <table:table-cell office:value-type="float" office:value="493" calcext:value-type="float">
            <text:p>493</text:p>
          </table:table-cell>
          <table:table-cell office:value-type="float" office:value="290" calcext:value-type="float">
            <text:p>290</text:p>
          </table:table-cell>
          <table:table-cell office:value-type="float" office:value="199" calcext:value-type="float">
            <text:p>199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395465" calcext:value-type="float">
            <text:p>2395465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32.406025" calcext:value-type="float">
            <text:p>32.406025</text:p>
          </table:table-cell>
          <table:table-cell office:value-type="float" office:value="710468" calcext:value-type="float">
            <text:p>710468</text:p>
          </table:table-cell>
          <table:table-cell office:value-type="float" office:value="475230" calcext:value-type="float">
            <text:p>475230</text:p>
          </table:table-cell>
          <table:table-cell office:value-type="float" office:value="299630" calcext:value-type="float">
            <text:p>299630</text:p>
          </table:table-cell>
          <table:table-cell office:value-type="float" office:value="163636" calcext:value-type="float">
            <text:p>163636</text:p>
          </table:table-cell>
          <table:table-cell office:value-type="float" office:value="91627" calcext:value-type="float">
            <text:p>91627</text:p>
          </table:table-cell>
          <table:table-cell office:value-type="float" office:value="46149" calcext:value-type="float">
            <text:p>46149</text:p>
          </table:table-cell>
          <table:table-cell office:value-type="float" office:value="20824" calcext:value-type="float">
            <text:p>20824</text:p>
          </table:table-cell>
          <table:table-cell office:value-type="float" office:value="9383" calcext:value-type="float">
            <text:p>9383</text:p>
          </table:table-cell>
          <table:table-cell office:value-type="float" office:value="4533" calcext:value-type="float">
            <text:p>4533</text:p>
          </table:table-cell>
          <table:table-cell office:value-type="float" office:value="2360" calcext:value-type="float">
            <text:p>2360</text:p>
          </table:table-cell>
          <table:table-cell office:value-type="float" office:value="1369" calcext:value-type="float">
            <text:p>1369</text:p>
          </table:table-cell>
          <table:table-cell office:value-type="float" office:value="887" calcext:value-type="float">
            <text:p>887</text:p>
          </table:table-cell>
          <table:table-cell office:value-type="float" office:value="674" calcext:value-type="float">
            <text:p>674</text:p>
          </table:table-cell>
          <table:table-cell office:value-type="float" office:value="557" calcext:value-type="float">
            <text:p>557</text:p>
          </table:table-cell>
          <table:table-cell office:value-type="float" office:value="386" calcext:value-type="float">
            <text:p>386</text:p>
          </table:table-cell>
          <table:table-cell office:value-type="float" office:value="300" calcext:value-type="float">
            <text:p>300</text:p>
          </table:table-cell>
          <table:table-cell office:value-type="float" office:value="258" calcext:value-type="float">
            <text:p>258</text:p>
          </table:table-cell>
          <table:table-cell office:value-type="float" office:value="209" calcext:value-type="float">
            <text:p>209</text:p>
          </table:table-cell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349200" calcext:value-type="float">
            <text:p>2349200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6.028164" calcext:value-type="float">
            <text:p>6.028164</text:p>
          </table:table-cell>
          <table:table-cell office:value-type="float" office:value="144403" calcext:value-type="float">
            <text:p>144403</text:p>
          </table:table-cell>
          <table:table-cell office:value-type="float" office:value="98358" calcext:value-type="float">
            <text:p>98358</text:p>
          </table:table-cell>
          <table:table-cell office:value-type="float" office:value="63344" calcext:value-type="float">
            <text:p>63344</text:p>
          </table:table-cell>
          <table:table-cell office:value-type="float" office:value="35158" calcext:value-type="float">
            <text:p>35158</text:p>
          </table:table-cell>
          <table:table-cell office:value-type="float" office:value="19983" calcext:value-type="float">
            <text:p>19983</text:p>
          </table:table-cell>
          <table:table-cell office:value-type="float" office:value="10107" calcext:value-type="float">
            <text:p>10107</text:p>
          </table:table-cell>
          <table:table-cell office:value-type="float" office:value="4584" calcext:value-type="float">
            <text:p>4584</text:p>
          </table:table-cell>
          <table:table-cell office:value-type="float" office:value="2039" calcext:value-type="float">
            <text:p>2039</text:p>
          </table:table-cell>
          <table:table-cell office:value-type="float" office:value="984" calcext:value-type="float">
            <text:p>984</text:p>
          </table:table-cell>
          <table:table-cell office:value-type="float" office:value="504" calcext:value-type="float">
            <text:p>504</text:p>
          </table:table-cell>
          <table:table-cell office:value-type="float" office:value="296" calcext:value-type="float">
            <text:p>296</text:p>
          </table:table-cell>
          <table:table-cell office:value-type="float" office:value="206" calcext:value-type="float">
            <text:p>206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383526" calcext:value-type="float">
            <text:p>2383526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6.334214" calcext:value-type="float">
            <text:p>6.334214</text:p>
          </table:table-cell>
          <table:table-cell office:value-type="float" office:value="148803" calcext:value-type="float">
            <text:p>148803</text:p>
          </table:table-cell>
          <table:table-cell office:value-type="float" office:value="101889" calcext:value-type="float">
            <text:p>101889</text:p>
          </table:table-cell>
          <table:table-cell office:value-type="float" office:value="65746" calcext:value-type="float">
            <text:p>65746</text:p>
          </table:table-cell>
          <table:table-cell office:value-type="float" office:value="36643" calcext:value-type="float">
            <text:p>36643</text:p>
          </table:table-cell>
          <table:table-cell office:value-type="float" office:value="20898" calcext:value-type="float">
            <text:p>20898</text:p>
          </table:table-cell>
          <table:table-cell office:value-type="float" office:value="10647" calcext:value-type="float">
            <text:p>10647</text:p>
          </table:table-cell>
          <table:table-cell office:value-type="float" office:value="4884" calcext:value-type="float">
            <text:p>4884</text:p>
          </table:table-cell>
          <table:table-cell office:value-type="float" office:value="2201" calcext:value-type="float">
            <text:p>2201</text:p>
          </table:table-cell>
          <table:table-cell office:value-type="float" office:value="1056" calcext:value-type="float">
            <text:p>1056</text:p>
          </table:table-cell>
          <table:table-cell office:value-type="float" office:value="533" calcext:value-type="float">
            <text:p>533</text:p>
          </table:table-cell>
          <table:table-cell office:value-type="float" office:value="311" calcext:value-type="float">
            <text:p>311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339375" calcext:value-type="float">
            <text:p>2339375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6.316863" calcext:value-type="float">
            <text:p>6.316863</text:p>
          </table:table-cell>
          <table:table-cell office:value-type="float" office:value="150564" calcext:value-type="float">
            <text:p>150564</text:p>
          </table:table-cell>
          <table:table-cell office:value-type="float" office:value="102447" calcext:value-type="float">
            <text:p>102447</text:p>
          </table:table-cell>
          <table:table-cell office:value-type="float" office:value="65685" calcext:value-type="float">
            <text:p>65685</text:p>
          </table:table-cell>
          <table:table-cell office:value-type="float" office:value="36280" calcext:value-type="float">
            <text:p>36280</text:p>
          </table:table-cell>
          <table:table-cell office:value-type="float" office:value="20538" calcext:value-type="float">
            <text:p>20538</text:p>
          </table:table-cell>
          <table:table-cell office:value-type="float" office:value="10460" calcext:value-type="float">
            <text:p>10460</text:p>
          </table:table-cell>
          <table:table-cell office:value-type="float" office:value="4734" calcext:value-type="float">
            <text:p>4734</text:p>
          </table:table-cell>
          <table:table-cell office:value-type="float" office:value="2113" calcext:value-type="float">
            <text:p>2113</text:p>
          </table:table-cell>
          <table:table-cell office:value-type="float" office:value="1031" calcext:value-type="float">
            <text:p>1031</text:p>
          </table:table-cell>
          <table:table-cell office:value-type="float" office:value="542" calcext:value-type="float">
            <text:p>542</text:p>
          </table:table-cell>
          <table:table-cell office:value-type="float" office:value="288" calcext:value-type="float">
            <text:p>288</text:p>
          </table:table-cell>
          <table:table-cell office:value-type="float" office:value="186" calcext:value-type="float">
            <text:p>186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294902" calcext:value-type="float">
            <text:p>2294902</text:p>
          </table:table-cell>
          <table:table-cell table:style-name="ce20" table:formula="of:=SUM([.AB59:.AB63])/5" office:value-type="float" office:value="2352493.6" calcext:value-type="float">
            <text:p>2352494</text:p>
          </table:table-cell>
          <table:table-cell table:style-name="ce76" table:formula="of:=(MAX([.AB59:.AB63])-MIN([.AB59:.AB63]))/[.AC63]*100" office:value-type="float" office:value="4.27474064116476" calcext:value-type="float">
            <text:p>4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345085" calcext:value-type="float">
            <text:p>6.345085</text:p>
          </table:table-cell>
          <table:table-cell office:value-type="float" office:value="148435" calcext:value-type="float">
            <text:p>148435</text:p>
          </table:table-cell>
          <table:table-cell office:value-type="float" office:value="101251" calcext:value-type="float">
            <text:p>101251</text:p>
          </table:table-cell>
          <table:table-cell office:value-type="float" office:value="64883" calcext:value-type="float">
            <text:p>64883</text:p>
          </table:table-cell>
          <table:table-cell office:value-type="float" office:value="35922" calcext:value-type="float">
            <text:p>35922</text:p>
          </table:table-cell>
          <table:table-cell office:value-type="float" office:value="20588" calcext:value-type="float">
            <text:p>20588</text:p>
          </table:table-cell>
          <table:table-cell office:value-type="float" office:value="10554" calcext:value-type="float">
            <text:p>10554</text:p>
          </table:table-cell>
          <table:table-cell office:value-type="float" office:value="4834" calcext:value-type="float">
            <text:p>4834</text:p>
          </table:table-cell>
          <table:table-cell office:value-type="float" office:value="2196" calcext:value-type="float">
            <text:p>2196</text:p>
          </table:table-cell>
          <table:table-cell office:value-type="float" office:value="1060" calcext:value-type="float">
            <text:p>1060</text:p>
          </table:table-cell>
          <table:table-cell office:value-type="float" office:value="523" calcext:value-type="float">
            <text:p>523</text:p>
          </table:table-cell>
          <table:table-cell office:value-type="float" office:value="299" calcext:value-type="float">
            <text:p>299</text:p>
          </table:table-cell>
          <table:table-cell office:value-type="float" office:value="174" calcext:value-type="float">
            <text:p>174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352054" calcext:value-type="float">
            <text:p>2352054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6.333574" calcext:value-type="float">
            <text:p>6.333574</text:p>
          </table:table-cell>
          <table:table-cell office:value-type="float" office:value="145349" calcext:value-type="float">
            <text:p>145349</text:p>
          </table:table-cell>
          <table:table-cell office:value-type="float" office:value="99196" calcext:value-type="float">
            <text:p>99196</text:p>
          </table:table-cell>
          <table:table-cell office:value-type="float" office:value="63784" calcext:value-type="float">
            <text:p>63784</text:p>
          </table:table-cell>
          <table:table-cell office:value-type="float" office:value="35453" calcext:value-type="float">
            <text:p>35453</text:p>
          </table:table-cell>
          <table:table-cell office:value-type="float" office:value="20038" calcext:value-type="float">
            <text:p>20038</text:p>
          </table:table-cell>
          <table:table-cell office:value-type="float" office:value="10248" calcext:value-type="float">
            <text:p>10248</text:p>
          </table:table-cell>
          <table:table-cell office:value-type="float" office:value="4635" calcext:value-type="float">
            <text:p>4635</text:p>
          </table:table-cell>
          <table:table-cell office:value-type="float" office:value="2094" calcext:value-type="float">
            <text:p>2094</text:p>
          </table:table-cell>
          <table:table-cell office:value-type="float" office:value="1039" calcext:value-type="float">
            <text:p>1039</text:p>
          </table:table-cell>
          <table:table-cell office:value-type="float" office:value="527" calcext:value-type="float">
            <text:p>527</text:p>
          </table:table-cell>
          <table:table-cell office:value-type="float" office:value="309" calcext:value-type="float">
            <text:p>309</text:p>
          </table:table-cell>
          <table:table-cell office:value-type="float" office:value="207" calcext:value-type="float">
            <text:p>207</text:p>
          </table:table-cell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555162" calcext:value-type="float">
            <text:p>2555162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31.357901" calcext:value-type="float">
            <text:p>31.357901</text:p>
          </table:table-cell>
          <table:table-cell office:value-type="float" office:value="737555" calcext:value-type="float">
            <text:p>737555</text:p>
          </table:table-cell>
          <table:table-cell office:value-type="float" office:value="503140" calcext:value-type="float">
            <text:p>503140</text:p>
          </table:table-cell>
          <table:table-cell office:value-type="float" office:value="323441" calcext:value-type="float">
            <text:p>323441</text:p>
          </table:table-cell>
          <table:table-cell office:value-type="float" office:value="179456" calcext:value-type="float">
            <text:p>179456</text:p>
          </table:table-cell>
          <table:table-cell office:value-type="float" office:value="102044" calcext:value-type="float">
            <text:p>102044</text:p>
          </table:table-cell>
          <table:table-cell office:value-type="float" office:value="52017" calcext:value-type="float">
            <text:p>52017</text:p>
          </table:table-cell>
          <table:table-cell office:value-type="float" office:value="23670" calcext:value-type="float">
            <text:p>23670</text:p>
          </table:table-cell>
          <table:table-cell office:value-type="float" office:value="10643" calcext:value-type="float">
            <text:p>10643</text:p>
          </table:table-cell>
          <table:table-cell office:value-type="float" office:value="5170" calcext:value-type="float">
            <text:p>5170</text:p>
          </table:table-cell>
          <table:table-cell office:value-type="float" office:value="2629" calcext:value-type="float">
            <text:p>2629</text:p>
          </table:table-cell>
          <table:table-cell office:value-type="float" office:value="1502" calcext:value-type="float">
            <text:p>1502</text:p>
          </table:table-cell>
          <table:table-cell office:value-type="float" office:value="980" calcext:value-type="float">
            <text:p>980</text:p>
          </table:table-cell>
          <table:table-cell office:value-type="float" office:value="739" calcext:value-type="float">
            <text:p>739</text:p>
          </table:table-cell>
          <table:table-cell office:value-type="float" office:value="595" calcext:value-type="float">
            <text:p>595</text:p>
          </table:table-cell>
          <table:table-cell office:value-type="float" office:value="422" calcext:value-type="float">
            <text:p>422</text:p>
          </table:table-cell>
          <table:table-cell office:value-type="float" office:value="329" calcext:value-type="float">
            <text:p>329</text:p>
          </table:table-cell>
          <table:table-cell office:value-type="float" office:value="276" calcext:value-type="float">
            <text:p>276</text:p>
          </table:table-cell>
          <table:table-cell office:value-type="float" office:value="235" calcext:value-type="float">
            <text:p>235</text:p>
          </table:table-cell>
          <table:table-cell office:value-type="float" office:value="201" calcext:value-type="float">
            <text:p>201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486786" calcext:value-type="float">
            <text:p>2486786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5.850598" calcext:value-type="float">
            <text:p>5.850598</text:p>
          </table:table-cell>
          <table:table-cell office:value-type="float" office:value="149492" calcext:value-type="float">
            <text:p>149492</text:p>
          </table:table-cell>
          <table:table-cell office:value-type="float" office:value="104150" calcext:value-type="float">
            <text:p>104150</text:p>
          </table:table-cell>
          <table:table-cell office:value-type="float" office:value="68114" calcext:value-type="float">
            <text:p>68114</text:p>
          </table:table-cell>
          <table:table-cell office:value-type="float" office:value="38455" calcext:value-type="float">
            <text:p>38455</text:p>
          </table:table-cell>
          <table:table-cell office:value-type="float" office:value="22332" calcext:value-type="float">
            <text:p>22332</text:p>
          </table:table-cell>
          <table:table-cell office:value-type="float" office:value="11473" calcext:value-type="float">
            <text:p>11473</text:p>
          </table:table-cell>
          <table:table-cell office:value-type="float" office:value="5243" calcext:value-type="float">
            <text:p>5243</text:p>
          </table:table-cell>
          <table:table-cell office:value-type="float" office:value="2326" calcext:value-type="float">
            <text:p>2326</text:p>
          </table:table-cell>
          <table:table-cell office:value-type="float" office:value="1075" calcext:value-type="float">
            <text:p>1075</text:p>
          </table:table-cell>
          <table:table-cell office:value-type="float" office:value="549" calcext:value-type="float">
            <text:p>549</text:p>
          </table:table-cell>
          <table:table-cell office:value-type="float" office:value="316" calcext:value-type="float">
            <text:p>316</text:p>
          </table:table-cell>
          <table:table-cell office:value-type="float" office:value="211" calcext:value-type="float">
            <text:p>211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541502" calcext:value-type="float">
            <text:p>2541502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6.135354" calcext:value-type="float">
            <text:p>6.135354</text:p>
          </table:table-cell>
          <table:table-cell office:value-type="float" office:value="152573" calcext:value-type="float">
            <text:p>152573</text:p>
          </table:table-cell>
          <table:table-cell office:value-type="float" office:value="106722" calcext:value-type="float">
            <text:p>106722</text:p>
          </table:table-cell>
          <table:table-cell office:value-type="float" office:value="69977" calcext:value-type="float">
            <text:p>69977</text:p>
          </table:table-cell>
          <table:table-cell office:value-type="float" office:value="39539" calcext:value-type="float">
            <text:p>39539</text:p>
          </table:table-cell>
          <table:table-cell office:value-type="float" office:value="22699" calcext:value-type="float">
            <text:p>22699</text:p>
          </table:table-cell>
          <table:table-cell office:value-type="float" office:value="11722" calcext:value-type="float">
            <text:p>11722</text:p>
          </table:table-cell>
          <table:table-cell office:value-type="float" office:value="5442" calcext:value-type="float">
            <text:p>5442</text:p>
          </table:table-cell>
          <table:table-cell office:value-type="float" office:value="2450" calcext:value-type="float">
            <text:p>2450</text:p>
          </table:table-cell>
          <table:table-cell office:value-type="float" office:value="1179" calcext:value-type="float">
            <text:p>1179</text:p>
          </table:table-cell>
          <table:table-cell office:value-type="float" office:value="617" calcext:value-type="float">
            <text:p>617</text:p>
          </table:table-cell>
          <table:table-cell office:value-type="float" office:value="333" calcext:value-type="float">
            <text:p>333</text:p>
          </table:table-cell>
          <table:table-cell office:value-type="float" office:value="218" calcext:value-type="float">
            <text:p>218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488490" calcext:value-type="float">
            <text:p>2488490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6.091284" calcext:value-type="float">
            <text:p>6.091284</text:p>
          </table:table-cell>
          <table:table-cell office:value-type="float" office:value="154810" calcext:value-type="float">
            <text:p>154810</text:p>
          </table:table-cell>
          <table:table-cell office:value-type="float" office:value="107759" calcext:value-type="float">
            <text:p>107759</text:p>
          </table:table-cell>
          <table:table-cell office:value-type="float" office:value="70444" calcext:value-type="float">
            <text:p>70444</text:p>
          </table:table-cell>
          <table:table-cell office:value-type="float" office:value="39882" calcext:value-type="float">
            <text:p>39882</text:p>
          </table:table-cell>
          <table:table-cell office:value-type="float" office:value="22789" calcext:value-type="float">
            <text:p>22789</text:p>
          </table:table-cell>
          <table:table-cell office:value-type="float" office:value="11594" calcext:value-type="float">
            <text:p>11594</text:p>
          </table:table-cell>
          <table:table-cell office:value-type="float" office:value="5308" calcext:value-type="float">
            <text:p>5308</text:p>
          </table:table-cell>
          <table:table-cell office:value-type="float" office:value="2423" calcext:value-type="float">
            <text:p>2423</text:p>
          </table:table-cell>
          <table:table-cell office:value-type="float" office:value="1188" calcext:value-type="float">
            <text:p>1188</text:p>
          </table:table-cell>
          <table:table-cell office:value-type="float" office:value="601" calcext:value-type="float">
            <text:p>601</text:p>
          </table:table-cell>
          <table:table-cell office:value-type="float" office:value="316" calcext:value-type="float">
            <text:p>316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390367" calcext:value-type="float">
            <text:p>2390367</text:p>
          </table:table-cell>
          <table:table-cell table:style-name="ce20" table:formula="of:=SUM([.AB65:.AB69])/5" office:value-type="float" office:value="2492461.4" calcext:value-type="float">
            <text:p>2492461</text:p>
          </table:table-cell>
          <table:table-cell table:style-name="ce76" table:formula="of:=(MAX([.AB65:.AB69])-MIN([.AB65:.AB69]))/[.AC69]*100" office:value-type="float" office:value="6.61173729711521" calcext:value-type="float">
            <text:p>6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157987" calcext:value-type="float">
            <text:p>6.157987</text:p>
          </table:table-cell>
          <table:table-cell office:value-type="float" office:value="153241" calcext:value-type="float">
            <text:p>153241</text:p>
          </table:table-cell>
          <table:table-cell office:value-type="float" office:value="106628" calcext:value-type="float">
            <text:p>106628</text:p>
          </table:table-cell>
          <table:table-cell office:value-type="float" office:value="69814" calcext:value-type="float">
            <text:p>69814</text:p>
          </table:table-cell>
          <table:table-cell office:value-type="float" office:value="39570" calcext:value-type="float">
            <text:p>39570</text:p>
          </table:table-cell>
          <table:table-cell office:value-type="float" office:value="22653" calcext:value-type="float">
            <text:p>22653</text:p>
          </table:table-cell>
          <table:table-cell office:value-type="float" office:value="11627" calcext:value-type="float">
            <text:p>11627</text:p>
          </table:table-cell>
          <table:table-cell office:value-type="float" office:value="5356" calcext:value-type="float">
            <text:p>5356</text:p>
          </table:table-cell>
          <table:table-cell office:value-type="float" office:value="2405" calcext:value-type="float">
            <text:p>2405</text:p>
          </table:table-cell>
          <table:table-cell office:value-type="float" office:value="1152" calcext:value-type="float">
            <text:p>1152</text:p>
          </table:table-cell>
          <table:table-cell office:value-type="float" office:value="587" calcext:value-type="float">
            <text:p>587</text:p>
          </table:table-cell>
          <table:table-cell office:value-type="float" office:value="358" calcext:value-type="float">
            <text:p>358</text:p>
          </table:table-cell>
          <table:table-cell office:value-type="float" office:value="216" calcext:value-type="float">
            <text:p>216</text:p>
          </table:table-cell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491755" calcext:value-type="float">
            <text:p>2491755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6.148718" calcext:value-type="float">
            <text:p>6.148718</text:p>
          </table:table-cell>
          <table:table-cell office:value-type="float" office:value="146977" calcext:value-type="float">
            <text:p>146977</text:p>
          </table:table-cell>
          <table:table-cell office:value-type="float" office:value="102424" calcext:value-type="float">
            <text:p>102424</text:p>
          </table:table-cell>
          <table:table-cell office:value-type="float" office:value="66962" calcext:value-type="float">
            <text:p>66962</text:p>
          </table:table-cell>
          <table:table-cell office:value-type="float" office:value="37821" calcext:value-type="float">
            <text:p>37821</text:p>
          </table:table-cell>
          <table:table-cell office:value-type="float" office:value="21843" calcext:value-type="float">
            <text:p>21843</text:p>
          </table:table-cell>
          <table:table-cell office:value-type="float" office:value="11438" calcext:value-type="float">
            <text:p>11438</text:p>
          </table:table-cell>
          <table:table-cell office:value-type="float" office:value="5268" calcext:value-type="float">
            <text:p>5268</text:p>
          </table:table-cell>
          <table:table-cell office:value-type="float" office:value="2338" calcext:value-type="float">
            <text:p>2338</text:p>
          </table:table-cell>
          <table:table-cell office:value-type="float" office:value="1110" calcext:value-type="float">
            <text:p>1110</text:p>
          </table:table-cell>
          <table:table-cell office:value-type="float" office:value="570" calcext:value-type="float">
            <text:p>570</text:p>
          </table:table-cell>
          <table:table-cell office:value-type="float" office:value="321" calcext:value-type="float">
            <text:p>321</text:p>
          </table:table-cell>
          <table:table-cell office:value-type="float" office:value="203" calcext:value-type="float">
            <text:p>203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687908" calcext:value-type="float">
            <text:p>2687908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30.383942" calcext:value-type="float">
            <text:p>30.383942</text:p>
          </table:table-cell>
          <table:table-cell office:value-type="float" office:value="757093" calcext:value-type="float">
            <text:p>757093</text:p>
          </table:table-cell>
          <table:table-cell office:value-type="float" office:value="527683" calcext:value-type="float">
            <text:p>527683</text:p>
          </table:table-cell>
          <table:table-cell office:value-type="float" office:value="345310" calcext:value-type="float">
            <text:p>345310</text:p>
          </table:table-cell>
          <table:table-cell office:value-type="float" office:value="195267" calcext:value-type="float">
            <text:p>195267</text:p>
          </table:table-cell>
          <table:table-cell office:value-type="float" office:value="112316" calcext:value-type="float">
            <text:p>112316</text:p>
          </table:table-cell>
          <table:table-cell office:value-type="float" office:value="57853" calcext:value-type="float">
            <text:p>57853</text:p>
          </table:table-cell>
          <table:table-cell office:value-type="float" office:value="26617" calcext:value-type="float">
            <text:p>26617</text:p>
          </table:table-cell>
          <table:table-cell office:value-type="float" office:value="11942" calcext:value-type="float">
            <text:p>11942</text:p>
          </table:table-cell>
          <table:table-cell office:value-type="float" office:value="5704" calcext:value-type="float">
            <text:p>5704</text:p>
          </table:table-cell>
          <table:table-cell office:value-type="float" office:value="2923" calcext:value-type="float">
            <text:p>2923</text:p>
          </table:table-cell>
          <table:table-cell office:value-type="float" office:value="1644" calcext:value-type="float">
            <text:p>1644</text:p>
          </table:table-cell>
          <table:table-cell office:value-type="float" office:value="1051" calcext:value-type="float">
            <text:p>1051</text:p>
          </table:table-cell>
          <table:table-cell office:value-type="float" office:value="750" calcext:value-type="float">
            <text:p>750</text:p>
          </table:table-cell>
          <table:table-cell office:value-type="float" office:value="605" calcext:value-type="float">
            <text:p>605</text:p>
          </table:table-cell>
          <table:table-cell office:value-type="float" office:value="450" calcext:value-type="float">
            <text:p>450</text:p>
          </table:table-cell>
          <table:table-cell office:value-type="float" office:value="346" calcext:value-type="float">
            <text:p>346</text:p>
          </table:table-cell>
          <table:table-cell office:value-type="float" office:value="286" calcext:value-type="float">
            <text:p>286</text:p>
          </table:table-cell>
          <table:table-cell office:value-type="float" office:value="233" calcext:value-type="float">
            <text:p>233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<text:span text:style-name="T8">Regression</text:span></text:p>
          </table:table-cell>
          <table:table-cell table:number-columns-repeated="6"/>
          <table:table-cell office:value-type="string" calcext:value-type="string">
            <text:p><text:span text:style-name="T8">Regression</text:span></text:p>
          </table:table-cell>
          <table:table-cell table:number-columns-repeated="18"/>
          <table:table-cell office:value-type="float" office:value="2614076" calcext:value-type="float">
            <text:p>2614076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5.651697" calcext:value-type="float">
            <text:p>5.651697</text:p>
          </table:table-cell>
          <table:table-cell office:value-type="float" office:value="151912" calcext:value-type="float">
            <text:p>151912</text:p>
          </table:table-cell>
          <table:table-cell office:value-type="float" office:value="108108" calcext:value-type="float">
            <text:p>108108</text:p>
          </table:table-cell>
          <table:table-cell office:value-type="float" office:value="72089" calcext:value-type="float">
            <text:p>72089</text:p>
          </table:table-cell>
          <table:table-cell office:value-type="float" office:value="41426" calcext:value-type="float">
            <text:p>41426</text:p>
          </table:table-cell>
          <table:table-cell office:value-type="float" office:value="24120" calcext:value-type="float">
            <text:p>24120</text:p>
          </table:table-cell>
          <table:table-cell office:value-type="float" office:value="12668" calcext:value-type="float">
            <text:p>12668</text:p>
          </table:table-cell>
          <table:table-cell office:value-type="float" office:value="5912" calcext:value-type="float">
            <text:p>5912</text:p>
          </table:table-cell>
          <table:table-cell office:value-type="float" office:value="2691" calcext:value-type="float">
            <text:p>2691</text:p>
          </table:table-cell>
          <table:table-cell office:value-type="float" office:value="1300" calcext:value-type="float">
            <text:p>1300</text:p>
          </table:table-cell>
          <table:table-cell office:value-type="float" office:value="651" calcext:value-type="float">
            <text:p>651</text:p>
          </table:table-cell>
          <table:table-cell office:value-type="float" office:value="362" calcext:value-type="float">
            <text:p>362</text:p>
          </table:table-cell>
          <table:table-cell office:value-type="float" office:value="222" calcext:value-type="float">
            <text:p>222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7"/>
          <table:table-cell office:value-type="float" office:value="2662439" calcext:value-type="float">
            <text:p>2662439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5.94167" calcext:value-type="float">
            <text:p>5.94167</text:p>
          </table:table-cell>
          <table:table-cell office:value-type="float" office:value="155320" calcext:value-type="float">
            <text:p>155320</text:p>
          </table:table-cell>
          <table:table-cell office:value-type="float" office:value="110557" calcext:value-type="float">
            <text:p>110557</text:p>
          </table:table-cell>
          <table:table-cell office:value-type="float" office:value="73690" calcext:value-type="float">
            <text:p>73690</text:p>
          </table:table-cell>
          <table:table-cell office:value-type="float" office:value="42687" calcext:value-type="float">
            <text:p>42687</text:p>
          </table:table-cell>
          <table:table-cell office:value-type="float" office:value="25075" calcext:value-type="float">
            <text:p>25075</text:p>
          </table:table-cell>
          <table:table-cell office:value-type="float" office:value="13117" calcext:value-type="float">
            <text:p>13117</text:p>
          </table:table-cell>
          <table:table-cell office:value-type="float" office:value="5989" calcext:value-type="float">
            <text:p>5989</text:p>
          </table:table-cell>
          <table:table-cell office:value-type="float" office:value="2722" calcext:value-type="float">
            <text:p>2722</text:p>
          </table:table-cell>
          <table:table-cell office:value-type="float" office:value="1327" calcext:value-type="float">
            <text:p>1327</text:p>
          </table:table-cell>
          <table:table-cell office:value-type="float" office:value="670" calcext:value-type="float">
            <text:p>670</text:p>
          </table:table-cell>
          <table:table-cell office:value-type="float" office:value="385" calcext:value-type="float">
            <text:p>385</text:p>
          </table:table-cell>
          <table:table-cell office:value-type="float" office:value="237" calcext:value-type="float">
            <text:p>237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628762" calcext:value-type="float">
            <text:p>2628762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5.919905" calcext:value-type="float">
            <text:p>5.919905</text:p>
          </table:table-cell>
          <table:table-cell office:value-type="float" office:value="157614" calcext:value-type="float">
            <text:p>157614</text:p>
          </table:table-cell>
          <table:table-cell office:value-type="float" office:value="112055" calcext:value-type="float">
            <text:p>112055</text:p>
          </table:table-cell>
          <table:table-cell office:value-type="float" office:value="74484" calcext:value-type="float">
            <text:p>74484</text:p>
          </table:table-cell>
          <table:table-cell office:value-type="float" office:value="42911" calcext:value-type="float">
            <text:p>42911</text:p>
          </table:table-cell>
          <table:table-cell office:value-type="float" office:value="24990" calcext:value-type="float">
            <text:p>24990</text:p>
          </table:table-cell>
          <table:table-cell office:value-type="float" office:value="13014" calcext:value-type="float">
            <text:p>13014</text:p>
          </table:table-cell>
          <table:table-cell office:value-type="float" office:value="5975" calcext:value-type="float">
            <text:p>5975</text:p>
          </table:table-cell>
          <table:table-cell office:value-type="float" office:value="2678" calcext:value-type="float">
            <text:p>2678</text:p>
          </table:table-cell>
          <table:table-cell office:value-type="float" office:value="1270" calcext:value-type="float">
            <text:p>1270</text:p>
          </table:table-cell>
          <table:table-cell office:value-type="float" office:value="622" calcext:value-type="float">
            <text:p>622</text:p>
          </table:table-cell>
          <table:table-cell office:value-type="float" office:value="323" calcext:value-type="float">
            <text:p>323</text:p>
          </table:table-cell>
          <table:table-cell office:value-type="float" office:value="201" calcext:value-type="float">
            <text:p>201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8"/>
          <table:table-cell office:value-type="float" office:value="2540907" calcext:value-type="float">
            <text:p>2540907</text:p>
          </table:table-cell>
          <table:table-cell table:style-name="ce20" table:formula="of:=SUM([.AB71:.AB75])/5" office:value-type="float" office:value="2626818.4" calcext:value-type="float">
            <text:p>2626818</text:p>
          </table:table-cell>
          <table:table-cell table:style-name="ce76" table:formula="of:=(MAX([.AB71:.AB75])-MIN([.AB71:.AB75]))/[.AC75]*100" office:value-type="float" office:value="5.59616150092447" calcext:value-type="float">
            <text:p>5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958016" calcext:value-type="float">
            <text:p>5.958016</text:p>
          </table:table-cell>
          <table:table-cell office:value-type="float" office:value="156622" calcext:value-type="float">
            <text:p>156622</text:p>
          </table:table-cell>
          <table:table-cell office:value-type="float" office:value="110775" calcext:value-type="float">
            <text:p>110775</text:p>
          </table:table-cell>
          <table:table-cell office:value-type="float" office:value="73719" calcext:value-type="float">
            <text:p>73719</text:p>
          </table:table-cell>
          <table:table-cell office:value-type="float" office:value="42434" calcext:value-type="float">
            <text:p>42434</text:p>
          </table:table-cell>
          <table:table-cell office:value-type="float" office:value="24500" calcext:value-type="float">
            <text:p>24500</text:p>
          </table:table-cell>
          <table:table-cell office:value-type="float" office:value="12715" calcext:value-type="float">
            <text:p>12715</text:p>
          </table:table-cell>
          <table:table-cell office:value-type="float" office:value="5833" calcext:value-type="float">
            <text:p>5833</text:p>
          </table:table-cell>
          <table:table-cell office:value-type="float" office:value="2649" calcext:value-type="float">
            <text:p>2649</text:p>
          </table:table-cell>
          <table:table-cell office:value-type="float" office:value="1261" calcext:value-type="float">
            <text:p>1261</text:p>
          </table:table-cell>
          <table:table-cell office:value-type="float" office:value="618" calcext:value-type="float">
            <text:p>618</text:p>
          </table:table-cell>
          <table:table-cell office:value-type="float" office:value="353" calcext:value-type="float">
            <text:p>353</text:p>
          </table:table-cell>
          <table:table-cell office:value-type="float" office:value="229" calcext:value-type="float">
            <text:p>229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table:number-matrix-columns-spanned="2" table:number-matrix-rows-spanned="5" table:formula="of:=LINEST([.$G$22:.$G$26] ; [.$E$22:.$E$26] ; 0 ; 1)" office:value-type="float" office:value="466384.911293094" calcext:value-type="float">
            <text:p>466384.911293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-0.0141105849447175" calcext:value-type="float">
            <text:p>-0.0141105849447175</text:p>
          </table:table-cell>
          <table:table-cell office:value-type="float" office:value="0.0577918697573219" calcext:value-type="float">
            <text:p>0.0577918697573219</text:p>
          </table:table-cell>
          <table:table-cell table:number-columns-repeated="17"/>
          <table:table-cell office:value-type="float" office:value="2626145" calcext:value-type="float">
            <text:p>2626145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5.957586" calcext:value-type="float">
            <text:p>5.957586</text:p>
          </table:table-cell>
          <table:table-cell office:value-type="float" office:value="151377" calcext:value-type="float">
            <text:p>151377</text:p>
          </table:table-cell>
          <table:table-cell office:value-type="float" office:value="107388" calcext:value-type="float">
            <text:p>107388</text:p>
          </table:table-cell>
          <table:table-cell office:value-type="float" office:value="71611" calcext:value-type="float">
            <text:p>71611</text:p>
          </table:table-cell>
          <table:table-cell office:value-type="float" office:value="41357" calcext:value-type="float">
            <text:p>41357</text:p>
          </table:table-cell>
          <table:table-cell office:value-type="float" office:value="24360" calcext:value-type="float">
            <text:p>24360</text:p>
          </table:table-cell>
          <table:table-cell office:value-type="float" office:value="12814" calcext:value-type="float">
            <text:p>12814</text:p>
          </table:table-cell>
          <table:table-cell office:value-type="float" office:value="5780" calcext:value-type="float">
            <text:p>5780</text:p>
          </table:table-cell>
          <table:table-cell office:value-type="float" office:value="2607" calcext:value-type="float">
            <text:p>2607</text:p>
          </table:table-cell>
          <table:table-cell office:value-type="float" office:value="1231" calcext:value-type="float">
            <text:p>1231</text:p>
          </table:table-cell>
          <table:table-cell office:value-type="float" office:value="620" calcext:value-type="float">
            <text:p>620</text:p>
          </table:table-cell>
          <table:table-cell office:value-type="float" office:value="340" calcext:value-type="float">
            <text:p>340</text:p>
          </table:table-cell>
          <table:table-cell office:value-type="float" office:value="224" calcext:value-type="float">
            <text:p>224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float" office:value="3826.03885356173" calcext:value-type="float">
            <text:p>3826.03885356173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872206495335319" calcext:value-type="float">
            <text:p>0.00872206495335319</text:p>
          </table:table-cell>
          <table:table-cell office:value-type="float" office:value="0.120131684824981" calcext:value-type="float">
            <text:p>0.120131684824981</text:p>
          </table:table-cell>
          <table:table-cell table:number-columns-repeated="17"/>
          <table:table-cell office:value-type="float" office:value="2798926" calcext:value-type="float">
            <text:p>2798926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29.428873" calcext:value-type="float">
            <text:p>29.428873</text:p>
          </table:table-cell>
          <table:table-cell office:value-type="float" office:value="772845" calcext:value-type="float">
            <text:p>772845</text:p>
          </table:table-cell>
          <table:table-cell office:value-type="float" office:value="548884" calcext:value-type="float">
            <text:p>548884</text:p>
          </table:table-cell>
          <table:table-cell office:value-type="float" office:value="365593" calcext:value-type="float">
            <text:p>365593</text:p>
          </table:table-cell>
          <table:table-cell office:value-type="float" office:value="210815" calcext:value-type="float">
            <text:p>210815</text:p>
          </table:table-cell>
          <table:table-cell office:value-type="float" office:value="123045" calcext:value-type="float">
            <text:p>123045</text:p>
          </table:table-cell>
          <table:table-cell office:value-type="float" office:value="64329" calcext:value-type="float">
            <text:p>64329</text:p>
          </table:table-cell>
          <table:table-cell office:value-type="float" office:value="29490" calcext:value-type="float">
            <text:p>29490</text:p>
          </table:table-cell>
          <table:table-cell office:value-type="float" office:value="13348" calcext:value-type="float">
            <text:p>13348</text:p>
          </table:table-cell>
          <table:table-cell office:value-type="float" office:value="6389" calcext:value-type="float">
            <text:p>6389</text:p>
          </table:table-cell>
          <table:table-cell office:value-type="float" office:value="3181" calcext:value-type="float">
            <text:p>3181</text:p>
          </table:table-cell>
          <table:table-cell office:value-type="float" office:value="1762" calcext:value-type="float">
            <text:p>1762</text:p>
          </table:table-cell>
          <table:table-cell office:value-type="float" office:value="1113" calcext:value-type="float">
            <text:p>1113</text:p>
          </table:table-cell>
          <table:table-cell office:value-type="float" office:value="790" calcext:value-type="float">
            <text:p>790</text:p>
          </table:table-cell>
          <table:table-cell office:value-type="float" office:value="650" calcext:value-type="float">
            <text:p>650</text:p>
          </table:table-cell>
          <table:table-cell office:value-type="float" office:value="463" calcext:value-type="float">
            <text:p>463</text:p>
          </table:table-cell>
          <table:table-cell office:value-type="float" office:value="366" calcext:value-type="float">
            <text:p>366</text:p>
          </table:table-cell>
          <table:table-cell office:value-type="float" office:value="310" calcext:value-type="float">
            <text:p>310</text:p>
          </table:table-cell>
          <table:table-cell office:value-type="float" office:value="249" calcext:value-type="float">
            <text:p>249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float" office:value="0.999730875729609" calcext:value-type="float">
            <text:p>0.999730875729609</text:p>
          </table:table-cell>
          <table:table-cell office:value-type="float" office:value="13114.4301132068" calcext:value-type="float">
            <text:p>13114.4301132068</text:p>
          </table:table-cell>
          <table:table-cell table:number-columns-repeated="5"/>
          <table:table-cell office:value-type="float" office:value="0.167589112648309" calcext:value-type="float">
            <text:p>0.167589112648309</text:p>
          </table:table-cell>
          <table:table-cell office:value-type="float" office:value="0.121813340044043" calcext:value-type="float">
            <text:p>0.121813340044043</text:p>
          </table:table-cell>
          <table:table-cell table:number-columns-repeated="17"/>
          <table:table-cell office:value-type="float" office:value="2766730" calcext:value-type="float">
            <text:p>2766730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5.493929" calcext:value-type="float">
            <text:p>5.493929</text:p>
          </table:table-cell>
          <table:table-cell office:value-type="float" office:value="153771" calcext:value-type="float">
            <text:p>153771</text:p>
          </table:table-cell>
          <table:table-cell office:value-type="float" office:value="111156" calcext:value-type="float">
            <text:p>111156</text:p>
          </table:table-cell>
          <table:table-cell office:value-type="float" office:value="75378" calcext:value-type="float">
            <text:p>75378</text:p>
          </table:table-cell>
          <table:table-cell office:value-type="float" office:value="44182" calcext:value-type="float">
            <text:p>44182</text:p>
          </table:table-cell>
          <table:table-cell office:value-type="float" office:value="26335" calcext:value-type="float">
            <text:p>26335</text:p>
          </table:table-cell>
          <table:table-cell office:value-type="float" office:value="13914" calcext:value-type="float">
            <text:p>13914</text:p>
          </table:table-cell>
          <table:table-cell office:value-type="float" office:value="6546" calcext:value-type="float">
            <text:p>6546</text:p>
          </table:table-cell>
          <table:table-cell office:value-type="float" office:value="3003" calcext:value-type="float">
            <text:p>3003</text:p>
          </table:table-cell>
          <table:table-cell office:value-type="float" office:value="1478" calcext:value-type="float">
            <text:p>1478</text:p>
          </table:table-cell>
          <table:table-cell office:value-type="float" office:value="745" calcext:value-type="float">
            <text:p>745</text:p>
          </table:table-cell>
          <table:table-cell office:value-type="float" office:value="415" calcext:value-type="float">
            <text:p>415</text:p>
          </table:table-cell>
          <table:table-cell office:value-type="float" office:value="256" calcext:value-type="float">
            <text:p>256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float" office:value="14859.0221800284" calcext:value-type="float">
            <text:p>14859.022180028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728732472422" calcext:value-type="float">
            <text:p>2.61728732472422</text:p>
          </table:table-cell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2805639" calcext:value-type="float">
            <text:p>2805639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5.782846" calcext:value-type="float">
            <text:p>5.782846</text:p>
          </table:table-cell>
          <table:table-cell office:value-type="float" office:value="159996" calcext:value-type="float">
            <text:p>159996</text:p>
          </table:table-cell>
          <table:table-cell office:value-type="float" office:value="115653" calcext:value-type="float">
            <text:p>115653</text:p>
          </table:table-cell>
          <table:table-cell office:value-type="float" office:value="78657" calcext:value-type="float">
            <text:p>78657</text:p>
          </table:table-cell>
          <table:table-cell office:value-type="float" office:value="46472" calcext:value-type="float">
            <text:p>46472</text:p>
          </table:table-cell>
          <table:table-cell office:value-type="float" office:value="27654" calcext:value-type="float">
            <text:p>27654</text:p>
          </table:table-cell>
          <table:table-cell office:value-type="float" office:value="14664" calcext:value-type="float">
            <text:p>14664</text:p>
          </table:table-cell>
          <table:table-cell office:value-type="float" office:value="6926" calcext:value-type="float">
            <text:p>6926</text:p>
          </table:table-cell>
          <table:table-cell office:value-type="float" office:value="3141" calcext:value-type="float">
            <text:p>3141</text:p>
          </table:table-cell>
          <table:table-cell office:value-type="float" office:value="1441" calcext:value-type="float">
            <text:p>1441</text:p>
          </table:table-cell>
          <table:table-cell office:value-type="float" office:value="723" calcext:value-type="float">
            <text:p>723</text:p>
          </table:table-cell>
          <table:table-cell office:value-type="float" office:value="381" calcext:value-type="float">
            <text:p>381</text:p>
          </table:table-cell>
          <table:table-cell office:value-type="float" office:value="239" calcext:value-type="float">
            <text:p>239</text:p>
          </table:table-cell>
          <table:table-cell office:value-type="float" office:value="167" calcext:value-type="float">
            <text:p>167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float" office:value="2555577625533.26" calcext:value-type="float">
            <text:p>2555577625533.26</text:p>
          </table:table-cell>
          <table:table-cell office:value-type="float" office:value="687953108.776741" calcext:value-type="float">
            <text:p>687953108.776741</text:p>
          </table:table-cell>
          <table:table-cell table:number-columns-repeated="5"/>
          <table:table-cell office:value-type="float" office:value="0.0388365913047918" calcext:value-type="float">
            <text:p>0.0388365913047918</text:p>
          </table:table-cell>
          <table:table-cell office:value-type="float" office:value="0.192900367564914" calcext:value-type="float">
            <text:p>0.192900367564914</text:p>
          </table:table-cell>
          <table:table-cell table:number-columns-repeated="17"/>
          <table:table-cell office:value-type="float" office:value="2767482" calcext:value-type="float">
            <text:p>2767482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5.766916" calcext:value-type="float">
            <text:p>5.766916</text:p>
          </table:table-cell>
          <table:table-cell office:value-type="float" office:value="161799" calcext:value-type="float">
            <text:p>161799</text:p>
          </table:table-cell>
          <table:table-cell office:value-type="float" office:value="116986" calcext:value-type="float">
            <text:p>116986</text:p>
          </table:table-cell>
          <table:table-cell office:value-type="float" office:value="79643" calcext:value-type="float">
            <text:p>79643</text:p>
          </table:table-cell>
          <table:table-cell office:value-type="float" office:value="47018" calcext:value-type="float">
            <text:p>47018</text:p>
          </table:table-cell>
          <table:table-cell office:value-type="float" office:value="27863" calcext:value-type="float">
            <text:p>27863</text:p>
          </table:table-cell>
          <table:table-cell office:value-type="float" office:value="14739" calcext:value-type="float">
            <text:p>14739</text:p>
          </table:table-cell>
          <table:table-cell office:value-type="float" office:value="6976" calcext:value-type="float">
            <text:p>6976</text:p>
          </table:table-cell>
          <table:table-cell office:value-type="float" office:value="3179" calcext:value-type="float">
            <text:p>3179</text:p>
          </table:table-cell>
          <table:table-cell office:value-type="float" office:value="1502" calcext:value-type="float">
            <text:p>1502</text:p>
          </table:table-cell>
          <table:table-cell office:value-type="float" office:value="783" calcext:value-type="float">
            <text:p>783</text:p>
          </table:table-cell>
          <table:table-cell office:value-type="float" office:value="450" calcext:value-type="float">
            <text:p>450</text:p>
          </table:table-cell>
          <table:table-cell office:value-type="float" office:value="269" calcext:value-type="float">
            <text:p>269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689870" calcext:value-type="float">
            <text:p>2689870</text:p>
          </table:table-cell>
          <table:table-cell table:style-name="ce20" table:formula="of:=SUM([.AB77:.AB81])/5" office:value-type="float" office:value="2765729.4" calcext:value-type="float">
            <text:p>2765729</text:p>
          </table:table-cell>
          <table:table-cell table:style-name="ce76" table:formula="of:=(MAX([.AB77:.AB81])-MIN([.AB77:.AB81]))/[.AC81]*100" office:value-type="float" office:value="4.18583972821058" calcext:value-type="float">
            <text:p>4.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812509" calcext:value-type="float">
            <text:p>5.812509</text:p>
          </table:table-cell>
          <table:table-cell office:value-type="float" office:value="160860" calcext:value-type="float">
            <text:p>160860</text:p>
          </table:table-cell>
          <table:table-cell office:value-type="float" office:value="115794" calcext:value-type="float">
            <text:p>115794</text:p>
          </table:table-cell>
          <table:table-cell office:value-type="float" office:value="78293" calcext:value-type="float">
            <text:p>78293</text:p>
          </table:table-cell>
          <table:table-cell office:value-type="float" office:value="45928" calcext:value-type="float">
            <text:p>45928</text:p>
          </table:table-cell>
          <table:table-cell office:value-type="float" office:value="27071" calcext:value-type="float">
            <text:p>27071</text:p>
          </table:table-cell>
          <table:table-cell office:value-type="float" office:value="14235" calcext:value-type="float">
            <text:p>14235</text:p>
          </table:table-cell>
          <table:table-cell office:value-type="float" office:value="6617" calcext:value-type="float">
            <text:p>6617</text:p>
          </table:table-cell>
          <table:table-cell office:value-type="float" office:value="3007" calcext:value-type="float">
            <text:p>3007</text:p>
          </table:table-cell>
          <table:table-cell office:value-type="float" office:value="1502" calcext:value-type="float">
            <text:p>1502</text:p>
          </table:table-cell>
          <table:table-cell office:value-type="float" office:value="714" calcext:value-type="float">
            <text:p>714</text:p>
          </table:table-cell>
          <table:table-cell office:value-type="float" office:value="397" calcext:value-type="float">
            <text:p>397</text:p>
          </table:table-cell>
          <table:table-cell office:value-type="float" office:value="242" calcext:value-type="float">
            <text:p>242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8"/>
          <table:table-cell office:value-type="float" office:value="2765335" calcext:value-type="float">
            <text:p>2765335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5.797771" calcext:value-type="float">
            <text:p>5.797771</text:p>
          </table:table-cell>
          <table:table-cell office:value-type="float" office:value="155953" calcext:value-type="float">
            <text:p>155953</text:p>
          </table:table-cell>
          <table:table-cell office:value-type="float" office:value="112621" calcext:value-type="float">
            <text:p>112621</text:p>
          </table:table-cell>
          <table:table-cell office:value-type="float" office:value="76391" calcext:value-type="float">
            <text:p>76391</text:p>
          </table:table-cell>
          <table:table-cell office:value-type="float" office:value="44882" calcext:value-type="float">
            <text:p>44882</text:p>
          </table:table-cell>
          <table:table-cell office:value-type="float" office:value="26718" calcext:value-type="float">
            <text:p>26718</text:p>
          </table:table-cell>
          <table:table-cell office:value-type="float" office:value="14179" calcext:value-type="float">
            <text:p>14179</text:p>
          </table:table-cell>
          <table:table-cell office:value-type="float" office:value="6614" calcext:value-type="float">
            <text:p>6614</text:p>
          </table:table-cell>
          <table:table-cell office:value-type="float" office:value="3002" calcext:value-type="float">
            <text:p>3002</text:p>
          </table:table-cell>
          <table:table-cell office:value-type="float" office:value="1457" calcext:value-type="float">
            <text:p>1457</text:p>
          </table:table-cell>
          <table:table-cell office:value-type="float" office:value="775" calcext:value-type="float">
            <text:p>775</text:p>
          </table:table-cell>
          <table:table-cell office:value-type="float" office:value="425" calcext:value-type="float">
            <text:p>425</text:p>
          </table:table-cell>
          <table:table-cell office:value-type="float" office:value="266" calcext:value-type="float">
            <text:p>266</text:p>
          </table:table-cell>
          <table:table-cell office:value-type="float" office:value="202" calcext:value-type="float">
            <text:p>202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730875729609" calcext:value-type="float">
            <text:p>0.999730875729609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167589112648309" calcext:value-type="float">
            <text:p>0.167589112648309</text:p>
          </table:table-cell>
          <table:table-cell table:number-columns-repeated="17"/>
          <table:table-cell office:value-type="float" office:value="2884836" calcext:value-type="float">
            <text:p>2884836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28.653973" calcext:value-type="float">
            <text:p>28.653973</text:p>
          </table:table-cell>
          <table:table-cell office:value-type="float" office:value="792378" calcext:value-type="float">
            <text:p>792378</text:p>
          </table:table-cell>
          <table:table-cell office:value-type="float" office:value="572209" calcext:value-type="float">
            <text:p>572209</text:p>
          </table:table-cell>
          <table:table-cell office:value-type="float" office:value="388363" calcext:value-type="float">
            <text:p>388363</text:p>
          </table:table-cell>
          <table:table-cell office:value-type="float" office:value="228482" calcext:value-type="float">
            <text:p>228482</text:p>
          </table:table-cell>
          <table:table-cell office:value-type="float" office:value="135642" calcext:value-type="float">
            <text:p>135642</text:p>
          </table:table-cell>
          <table:table-cell office:value-type="float" office:value="71730" calcext:value-type="float">
            <text:p>71730</text:p>
          </table:table-cell>
          <table:table-cell office:value-type="float" office:value="33680" calcext:value-type="float">
            <text:p>33680</text:p>
          </table:table-cell>
          <table:table-cell office:value-type="float" office:value="15332" calcext:value-type="float">
            <text:p>15332</text:p>
          </table:table-cell>
          <table:table-cell office:value-type="float" office:value="7379" calcext:value-type="float">
            <text:p>7379</text:p>
          </table:table-cell>
          <table:table-cell office:value-type="float" office:value="3741" calcext:value-type="float">
            <text:p>3741</text:p>
          </table:table-cell>
          <table:table-cell office:value-type="float" office:value="2067" calcext:value-type="float">
            <text:p>2067</text:p>
          </table:table-cell>
          <table:table-cell office:value-type="float" office:value="1272" calcext:value-type="float">
            <text:p>1272</text:p>
          </table:table-cell>
          <table:table-cell office:value-type="float" office:value="940" calcext:value-type="float">
            <text:p>940</text:p>
          </table:table-cell>
          <table:table-cell office:value-type="float" office:value="763" calcext:value-type="float">
            <text:p>763</text:p>
          </table:table-cell>
          <table:table-cell office:value-type="float" office:value="535" calcext:value-type="float">
            <text:p>535</text:p>
          </table:table-cell>
          <table:table-cell office:value-type="float" office:value="422" calcext:value-type="float">
            <text:p>422</text:p>
          </table:table-cell>
          <table:table-cell office:value-type="float" office:value="346" calcext:value-type="float">
            <text:p>346</text:p>
          </table:table-cell>
          <table:table-cell office:value-type="float" office:value="287" calcext:value-type="float">
            <text:p>287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13114.4301132068" calcext:value-type="float">
            <text:p>13114.4301132068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121813340044043" calcext:value-type="float">
            <text:p>0.121813340044043</text:p>
          </table:table-cell>
          <table:table-cell table:number-columns-repeated="17"/>
          <table:table-cell office:value-type="float" office:value="2838044" calcext:value-type="float">
            <text:p>2838044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5.369851" calcext:value-type="float">
            <text:p>5.369851</text:p>
          </table:table-cell>
          <table:table-cell office:value-type="float" office:value="154911" calcext:value-type="float">
            <text:p>154911</text:p>
          </table:table-cell>
          <table:table-cell office:value-type="float" office:value="113778" calcext:value-type="float">
            <text:p>113778</text:p>
          </table:table-cell>
          <table:table-cell office:value-type="float" office:value="78689" calcext:value-type="float">
            <text:p>78689</text:p>
          </table:table-cell>
          <table:table-cell office:value-type="float" office:value="47146" calcext:value-type="float">
            <text:p>47146</text:p>
          </table:table-cell>
          <table:table-cell office:value-type="float" office:value="28259" calcext:value-type="float">
            <text:p>28259</text:p>
          </table:table-cell>
          <table:table-cell office:value-type="float" office:value="15204" calcext:value-type="float">
            <text:p>15204</text:p>
          </table:table-cell>
          <table:table-cell office:value-type="float" office:value="7258" calcext:value-type="float">
            <text:p>7258</text:p>
          </table:table-cell>
          <table:table-cell office:value-type="float" office:value="3313" calcext:value-type="float">
            <text:p>3313</text:p>
          </table:table-cell>
          <table:table-cell office:value-type="float" office:value="1578" calcext:value-type="float">
            <text:p>1578</text:p>
          </table:table-cell>
          <table:table-cell office:value-type="float" office:value="795" calcext:value-type="float">
            <text:p>795</text:p>
          </table:table-cell>
          <table:table-cell office:value-type="float" office:value="450" calcext:value-type="float">
            <text:p>450</text:p>
          </table:table-cell>
          <table:table-cell office:value-type="float" office:value="261" calcext:value-type="float">
            <text:p>261</text:p>
          </table:table-cell>
          <table:table-cell office:value-type="float" office:value="185" calcext:value-type="float">
            <text:p>185</text:p>
          </table:table-cell>
          <table:table-cell office:value-type="float" office:value="149" calcext:value-type="float">
            <text:p>149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  <table:table-cell office:value-type="float" office:value="2900683" calcext:value-type="float">
            <text:p>2900683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5.633148" calcext:value-type="float">
            <text:p>5.633148</text:p>
          </table:table-cell>
          <table:table-cell office:value-type="float" office:value="159871" calcext:value-type="float">
            <text:p>159871</text:p>
          </table:table-cell>
          <table:table-cell office:value-type="float" office:value="117719" calcext:value-type="float">
            <text:p>117719</text:p>
          </table:table-cell>
          <table:table-cell office:value-type="float" office:value="81419" calcext:value-type="float">
            <text:p>81419</text:p>
          </table:table-cell>
          <table:table-cell office:value-type="float" office:value="48899" calcext:value-type="float">
            <text:p>48899</text:p>
          </table:table-cell>
          <table:table-cell office:value-type="float" office:value="29527" calcext:value-type="float">
            <text:p>29527</text:p>
          </table:table-cell>
          <table:table-cell office:value-type="float" office:value="15908" calcext:value-type="float">
            <text:p>15908</text:p>
          </table:table-cell>
          <table:table-cell office:value-type="float" office:value="7467" calcext:value-type="float">
            <text:p>7467</text:p>
          </table:table-cell>
          <table:table-cell office:value-type="float" office:value="3430" calcext:value-type="float">
            <text:p>3430</text:p>
          </table:table-cell>
          <table:table-cell office:value-type="float" office:value="1637" calcext:value-type="float">
            <text:p>1637</text:p>
          </table:table-cell>
          <table:table-cell office:value-type="float" office:value="846" calcext:value-type="float">
            <text:p>846</text:p>
          </table:table-cell>
          <table:table-cell office:value-type="float" office:value="455" calcext:value-type="float">
            <text:p>455</text:p>
          </table:table-cell>
          <table:table-cell office:value-type="float" office:value="283" calcext:value-type="float">
            <text:p>283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7"/>
          <table:table-cell office:value-type="float" office:value="2861347" calcext:value-type="float">
            <text:p>2861347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5.600069" calcext:value-type="float">
            <text:p>5.600069</text:p>
          </table:table-cell>
          <table:table-cell office:value-type="float" office:value="162440" calcext:value-type="float">
            <text:p>162440</text:p>
          </table:table-cell>
          <table:table-cell office:value-type="float" office:value="119096" calcext:value-type="float">
            <text:p>119096</text:p>
          </table:table-cell>
          <table:table-cell office:value-type="float" office:value="81959" calcext:value-type="float">
            <text:p>81959</text:p>
          </table:table-cell>
          <table:table-cell office:value-type="float" office:value="49319" calcext:value-type="float">
            <text:p>49319</text:p>
          </table:table-cell>
          <table:table-cell office:value-type="float" office:value="29589" calcext:value-type="float">
            <text:p>29589</text:p>
          </table:table-cell>
          <table:table-cell office:value-type="float" office:value="15880" calcext:value-type="float">
            <text:p>15880</text:p>
          </table:table-cell>
          <table:table-cell office:value-type="float" office:value="7466" calcext:value-type="float">
            <text:p>7466</text:p>
          </table:table-cell>
          <table:table-cell office:value-type="float" office:value="3400" calcext:value-type="float">
            <text:p>3400</text:p>
          </table:table-cell>
          <table:table-cell office:value-type="float" office:value="1615" calcext:value-type="float">
            <text:p>1615</text:p>
          </table:table-cell>
          <table:table-cell office:value-type="float" office:value="830" calcext:value-type="float">
            <text:p>830</text:p>
          </table:table-cell>
          <table:table-cell office:value-type="float" office:value="454" calcext:value-type="float">
            <text:p>454</text:p>
          </table:table-cell>
          <table:table-cell office:value-type="float" office:value="279" calcext:value-type="float">
            <text:p>279</text:p>
          </table:table-cell>
          <table:table-cell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730875729609" calcext:value-type="float">
            <text:p>0.999730875729609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0.103557505928949" calcext:value-type="float">
            <text:p>0.103557505928949</text:p>
          </table:table-cell>
          <table:table-cell table:number-columns-repeated="17"/>
          <table:table-cell office:value-type="float" office:value="2758190" calcext:value-type="float">
            <text:p>2758190</text:p>
          </table:table-cell>
          <table:table-cell table:style-name="ce20" table:formula="of:=SUM([.AB83:.AB87])/5" office:value-type="float" office:value="2848620" calcext:value-type="float">
            <text:p>2848620</text:p>
          </table:table-cell>
          <table:table-cell table:style-name="ce76" table:formula="of:=(MAX([.AB83:.AB87])-MIN([.AB83:.AB87]))/[.AC87]*100" office:value-type="float" office:value="5.00217649247706" calcext:value-type="float">
            <text:p>5.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654902" calcext:value-type="float">
            <text:p>5.654902</text:p>
          </table:table-cell>
          <table:table-cell office:value-type="float" office:value="161806" calcext:value-type="float">
            <text:p>161806</text:p>
          </table:table-cell>
          <table:table-cell office:value-type="float" office:value="118796" calcext:value-type="float">
            <text:p>118796</text:p>
          </table:table-cell>
          <table:table-cell office:value-type="float" office:value="81949" calcext:value-type="float">
            <text:p>81949</text:p>
          </table:table-cell>
          <table:table-cell office:value-type="float" office:value="48826" calcext:value-type="float">
            <text:p>48826</text:p>
          </table:table-cell>
          <table:table-cell office:value-type="float" office:value="29227" calcext:value-type="float">
            <text:p>29227</text:p>
          </table:table-cell>
          <table:table-cell office:value-type="float" office:value="15561" calcext:value-type="float">
            <text:p>15561</text:p>
          </table:table-cell>
          <table:table-cell office:value-type="float" office:value="7366" calcext:value-type="float">
            <text:p>7366</text:p>
          </table:table-cell>
          <table:table-cell office:value-type="float" office:value="3366" calcext:value-type="float">
            <text:p>3366</text:p>
          </table:table-cell>
          <table:table-cell office:value-type="float" office:value="1588" calcext:value-type="float">
            <text:p>1588</text:p>
          </table:table-cell>
          <table:table-cell office:value-type="float" office:value="786" calcext:value-type="float">
            <text:p>786</text:p>
          </table:table-cell>
          <table:table-cell office:value-type="float" office:value="415" calcext:value-type="float">
            <text:p>415</text:p>
          </table:table-cell>
          <table:table-cell office:value-type="float" office:value="253" calcext:value-type="float">
            <text:p>253</text:p>
          </table:table-cell>
          <table:table-cell office:value-type="float" office:value="166" calcext:value-type="float">
            <text:p>166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848102" calcext:value-type="float">
            <text:p>2848102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5.67172" calcext:value-type="float">
            <text:p>5.67172</text:p>
          </table:table-cell>
          <table:table-cell office:value-type="float" office:value="156437" calcext:value-type="float">
            <text:p>156437</text:p>
          </table:table-cell>
          <table:table-cell office:value-type="float" office:value="114294" calcext:value-type="float">
            <text:p>114294</text:p>
          </table:table-cell>
          <table:table-cell office:value-type="float" office:value="78936" calcext:value-type="float">
            <text:p>78936</text:p>
          </table:table-cell>
          <table:table-cell office:value-type="float" office:value="47362" calcext:value-type="float">
            <text:p>47362</text:p>
          </table:table-cell>
          <table:table-cell office:value-type="float" office:value="28269" calcext:value-type="float">
            <text:p>28269</text:p>
          </table:table-cell>
          <table:table-cell office:value-type="float" office:value="15084" calcext:value-type="float">
            <text:p>15084</text:p>
          </table:table-cell>
          <table:table-cell office:value-type="float" office:value="7152" calcext:value-type="float">
            <text:p>7152</text:p>
          </table:table-cell>
          <table:table-cell office:value-type="float" office:value="3320" calcext:value-type="float">
            <text:p>3320</text:p>
          </table:table-cell>
          <table:table-cell office:value-type="float" office:value="1647" calcext:value-type="float">
            <text:p>1647</text:p>
          </table:table-cell>
          <table:table-cell office:value-type="float" office:value="798" calcext:value-type="float">
            <text:p>798</text:p>
          </table:table-cell>
          <table:table-cell office:value-type="float" office:value="423" calcext:value-type="float">
            <text:p>423</text:p>
          </table:table-cell>
          <table:table-cell office:value-type="float" office:value="257" calcext:value-type="float">
            <text:p>257</text:p>
          </table:table-cell>
          <table:table-cell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8"/>
          <table:table-cell office:value-type="float" office:value="3037884" calcext:value-type="float">
            <text:p>3037884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27.929688" calcext:value-type="float">
            <text:p>27.929688</text:p>
          </table:table-cell>
          <table:table-cell office:value-type="float" office:value="795466" calcext:value-type="float">
            <text:p>795466</text:p>
          </table:table-cell>
          <table:table-cell office:value-type="float" office:value="583683" calcext:value-type="float">
            <text:p>583683</text:p>
          </table:table-cell>
          <table:table-cell office:value-type="float" office:value="402952" calcext:value-type="float">
            <text:p>402952</text:p>
          </table:table-cell>
          <table:table-cell office:value-type="float" office:value="241552" calcext:value-type="float">
            <text:p>241552</text:p>
          </table:table-cell>
          <table:table-cell office:value-type="float" office:value="144871" calcext:value-type="float">
            <text:p>144871</text:p>
          </table:table-cell>
          <table:table-cell office:value-type="float" office:value="77638" calcext:value-type="float">
            <text:p>77638</text:p>
          </table:table-cell>
          <table:table-cell office:value-type="float" office:value="36708" calcext:value-type="float">
            <text:p>36708</text:p>
          </table:table-cell>
          <table:table-cell office:value-type="float" office:value="16829" calcext:value-type="float">
            <text:p>16829</text:p>
          </table:table-cell>
          <table:table-cell office:value-type="float" office:value="8066" calcext:value-type="float">
            <text:p>8066</text:p>
          </table:table-cell>
          <table:table-cell office:value-type="float" office:value="4055" calcext:value-type="float">
            <text:p>4055</text:p>
          </table:table-cell>
          <table:table-cell office:value-type="float" office:value="2196" calcext:value-type="float">
            <text:p>2196</text:p>
          </table:table-cell>
          <table:table-cell office:value-type="float" office:value="1333" calcext:value-type="float">
            <text:p>1333</text:p>
          </table:table-cell>
          <table:table-cell office:value-type="float" office:value="937" calcext:value-type="float">
            <text:p>937</text:p>
          </table:table-cell>
          <table:table-cell office:value-type="float" office:value="754" calcext:value-type="float">
            <text:p>754</text:p>
          </table:table-cell>
          <table:table-cell office:value-type="float" office:value="536" calcext:value-type="float">
            <text:p>536</text:p>
          </table:table-cell>
          <table:table-cell office:value-type="float" office:value="407" calcext:value-type="float">
            <text:p>407</text:p>
          </table:table-cell>
          <table:table-cell office:value-type="float" office:value="339" calcext:value-type="float">
            <text:p>339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196" calcext:value-type="float">
            <text:p>196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3"/>
          <table:table-cell office:value-type="float" office:value="2952069" calcext:value-type="float">
            <text:p>2952069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5.256095" calcext:value-type="float">
            <text:p>5.256095</text:p>
          </table:table-cell>
          <table:table-cell office:value-type="float" office:value="159674" calcext:value-type="float">
            <text:p>159674</text:p>
          </table:table-cell>
          <table:table-cell office:value-type="float" office:value="118873" calcext:value-type="float">
            <text:p>118873</text:p>
          </table:table-cell>
          <table:table-cell office:value-type="float" office:value="83033" calcext:value-type="float">
            <text:p>83033</text:p>
          </table:table-cell>
          <table:table-cell office:value-type="float" office:value="50541" calcext:value-type="float">
            <text:p>50541</text:p>
          </table:table-cell>
          <table:table-cell office:value-type="float" office:value="30748" calcext:value-type="float">
            <text:p>30748</text:p>
          </table:table-cell>
          <table:table-cell office:value-type="float" office:value="16554" calcext:value-type="float">
            <text:p>16554</text:p>
          </table:table-cell>
          <table:table-cell office:value-type="float" office:value="7880" calcext:value-type="float">
            <text:p>7880</text:p>
          </table:table-cell>
          <table:table-cell office:value-type="float" office:value="3687" calcext:value-type="float">
            <text:p>3687</text:p>
          </table:table-cell>
          <table:table-cell office:value-type="float" office:value="1719" calcext:value-type="float">
            <text:p>1719</text:p>
          </table:table-cell>
          <table:table-cell office:value-type="float" office:value="833" calcext:value-type="float">
            <text:p>833</text:p>
          </table:table-cell>
          <table:table-cell office:value-type="float" office:value="445" calcext:value-type="float">
            <text:p>445</text:p>
          </table:table-cell>
          <table:table-cell office:value-type="float" office:value="283" calcext:value-type="float">
            <text:p>283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2555577625533.26" calcext:value-type="float">
            <text:p>2555577625533.26</text:p>
          </table:table-cell>
          <table:table-cell table:formula="of:=[.$B$80] / [.$C$91]" office:value-type="float" office:value="2555577625533.26" calcext:value-type="float">
            <text:p>2555577625533.26</text:p>
          </table:table-cell>
          <table:table-cell table:formula="of:=[.$B$79]" office:value-type="float" office:value="14859.0221800284" calcext:value-type="float">
            <text:p>14859.0221800284</text:p>
          </table:table-cell>
          <table:table-cell table:formula="of:=LEGACY.FDIST([.$B$79] ; [.$C$91] ; [.$C$79])" office:value-type="float" office:value="0.0000000271628892237029" calcext:value-type="float">
            <text:p>2.71628892237029E-08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388365913047918" calcext:value-type="float">
            <text:p>0.0388365913047918</text:p>
          </table:table-cell>
          <table:table-cell table:formula="of:=[.$I$80] / [.$J$91]" office:value-type="float" office:value="0.0388365913047918" calcext:value-type="float">
            <text:p>0.0388365913047918</text:p>
          </table:table-cell>
          <table:table-cell table:formula="of:=[.$I$79]" office:value-type="float" office:value="2.61728732472422" calcext:value-type="float">
            <text:p>2.61728732472422</text:p>
          </table:table-cell>
          <table:table-cell table:formula="of:=LEGACY.FDIST([.$I$79] ; [.$J$91] ; [.$J$79])" office:value-type="float" office:value="0.129700291043515" calcext:value-type="float">
            <text:p>0.129700291043515</text:p>
          </table:table-cell>
          <table:table-cell table:number-columns-repeated="13"/>
          <table:table-cell office:value-type="float" office:value="3018992" calcext:value-type="float">
            <text:p>3018992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5.520187" calcext:value-type="float">
            <text:p>5.520187</text:p>
          </table:table-cell>
          <table:table-cell office:value-type="float" office:value="162960" calcext:value-type="float">
            <text:p>162960</text:p>
          </table:table-cell>
          <table:table-cell office:value-type="float" office:value="121467" calcext:value-type="float">
            <text:p>121467</text:p>
          </table:table-cell>
          <table:table-cell office:value-type="float" office:value="85050" calcext:value-type="float">
            <text:p>85050</text:p>
          </table:table-cell>
          <table:table-cell office:value-type="float" office:value="51824" calcext:value-type="float">
            <text:p>51824</text:p>
          </table:table-cell>
          <table:table-cell office:value-type="float" office:value="31745" calcext:value-type="float">
            <text:p>31745</text:p>
          </table:table-cell>
          <table:table-cell office:value-type="float" office:value="17251" calcext:value-type="float">
            <text:p>17251</text:p>
          </table:table-cell>
          <table:table-cell office:value-type="float" office:value="8116" calcext:value-type="float">
            <text:p>8116</text:p>
          </table:table-cell>
          <table:table-cell office:value-type="float" office:value="3636" calcext:value-type="float">
            <text:p>3636</text:p>
          </table:table-cell>
          <table:table-cell office:value-type="float" office:value="1763" calcext:value-type="float">
            <text:p>1763</text:p>
          </table:table-cell>
          <table:table-cell office:value-type="float" office:value="868" calcext:value-type="float">
            <text:p>868</text:p>
          </table:table-cell>
          <table:table-cell office:value-type="float" office:value="452" calcext:value-type="float">
            <text:p>452</text:p>
          </table:table-cell>
          <table:table-cell office:value-type="float" office:value="276" calcext:value-type="float">
            <text:p>276</text:p>
          </table:table-cell>
          <table:table-cell office:value-type="float" office:value="192" calcext:value-type="float">
            <text:p>192</text:p>
          </table:table-cell>
          <table:table-cell office:value-type="float" office:value="169" calcext:value-type="float">
            <text:p>169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687953108.776741" calcext:value-type="float">
            <text:p>687953108.776741</text:p>
          </table:table-cell>
          <table:table-cell table:formula="of:=[.$C$80] / [.$C$79]" office:value-type="float" office:value="171988277.194185" calcext:value-type="float">
            <text:p>171988277.194185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192900367564914" calcext:value-type="float">
            <text:p>0.192900367564914</text:p>
          </table:table-cell>
          <table:table-cell table:formula="of:=[.$J$80] / [.$J$79]" office:value-type="float" office:value="0.0148384898126857" calcext:value-type="float">
            <text:p>0.0148384898126857</text:p>
          </table:table-cell>
          <table:table-cell table:number-columns-repeated="15"/>
          <table:table-cell office:value-type="float" office:value="2971650" calcext:value-type="float">
            <text:p>2971650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5.495807" calcext:value-type="float">
            <text:p>5.495807</text:p>
          </table:table-cell>
          <table:table-cell office:value-type="float" office:value="165918" calcext:value-type="float">
            <text:p>165918</text:p>
          </table:table-cell>
          <table:table-cell office:value-type="float" office:value="123201" calcext:value-type="float">
            <text:p>123201</text:p>
          </table:table-cell>
          <table:table-cell office:value-type="float" office:value="86077" calcext:value-type="float">
            <text:p>86077</text:p>
          </table:table-cell>
          <table:table-cell office:value-type="float" office:value="52343" calcext:value-type="float">
            <text:p>52343</text:p>
          </table:table-cell>
          <table:table-cell office:value-type="float" office:value="31776" calcext:value-type="float">
            <text:p>31776</text:p>
          </table:table-cell>
          <table:table-cell office:value-type="float" office:value="17195" calcext:value-type="float">
            <text:p>17195</text:p>
          </table:table-cell>
          <table:table-cell office:value-type="float" office:value="8222" calcext:value-type="float">
            <text:p>8222</text:p>
          </table:table-cell>
          <table:table-cell office:value-type="float" office:value="3806" calcext:value-type="float">
            <text:p>3806</text:p>
          </table:table-cell>
          <table:table-cell office:value-type="float" office:value="1818" calcext:value-type="float">
            <text:p>1818</text:p>
          </table:table-cell>
          <table:table-cell office:value-type="float" office:value="888" calcext:value-type="float">
            <text:p>888</text:p>
          </table:table-cell>
          <table:table-cell office:value-type="float" office:value="468" calcext:value-type="float">
            <text:p>468</text:p>
          </table:table-cell>
          <table:table-cell office:value-type="float" office:value="304" calcext:value-type="float">
            <text:p>304</text:p>
          </table:table-cell>
          <table:table-cell office:value-type="float" office:value="210" calcext:value-type="float">
            <text:p>210</text:p>
          </table:table-cell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2556265578642.04" calcext:value-type="float">
            <text:p>2556265578642.04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231736958869706" calcext:value-type="float">
            <text:p>0.231736958869706</text:p>
          </table:table-cell>
          <table:table-cell table:number-columns-repeated="16"/>
          <table:table-cell office:value-type="float" office:value="2851474" calcext:value-type="float">
            <text:p>2851474</text:p>
          </table:table-cell>
          <table:table-cell table:style-name="ce20" table:formula="of:=SUM([.AB89:.AB93])/5" office:value-type="float" office:value="2966413.8" calcext:value-type="float">
            <text:p>2966414</text:p>
          </table:table-cell>
          <table:table-cell table:style-name="ce76" table:formula="of:=(MAX([.AB89:.AB93])-MIN([.AB89:.AB93]))/[.AC93]*100" office:value-type="float" office:value="6.2840187704089" calcext:value-type="float">
            <text:p>6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540464" calcext:value-type="float">
            <text:p>5.540464</text:p>
          </table:table-cell>
          <table:table-cell office:value-type="float" office:value="164643" calcext:value-type="float">
            <text:p>164643</text:p>
          </table:table-cell>
          <table:table-cell office:value-type="float" office:value="122117" calcext:value-type="float">
            <text:p>122117</text:p>
          </table:table-cell>
          <table:table-cell office:value-type="float" office:value="85246" calcext:value-type="float">
            <text:p>85246</text:p>
          </table:table-cell>
          <table:table-cell office:value-type="float" office:value="52001" calcext:value-type="float">
            <text:p>52001</text:p>
          </table:table-cell>
          <table:table-cell office:value-type="float" office:value="31437" calcext:value-type="float">
            <text:p>31437</text:p>
          </table:table-cell>
          <table:table-cell office:value-type="float" office:value="16988" calcext:value-type="float">
            <text:p>16988</text:p>
          </table:table-cell>
          <table:table-cell office:value-type="float" office:value="8117" calcext:value-type="float">
            <text:p>8117</text:p>
          </table:table-cell>
          <table:table-cell office:value-type="float" office:value="3766" calcext:value-type="float">
            <text:p>3766</text:p>
          </table:table-cell>
          <table:table-cell office:value-type="float" office:value="1802" calcext:value-type="float">
            <text:p>1802</text:p>
          </table:table-cell>
          <table:table-cell office:value-type="float" office:value="914" calcext:value-type="float">
            <text:p>914</text:p>
          </table:table-cell>
          <table:table-cell office:value-type="float" office:value="459" calcext:value-type="float">
            <text:p>459</text:p>
          </table:table-cell>
          <table:table-cell office:value-type="float" office:value="298" calcext:value-type="float">
            <text:p>298</text:p>
          </table:table-cell>
          <table:table-cell office:value-type="float" office:value="197" calcext:value-type="float">
            <text:p>197</text:p>
          </table:table-cell>
          <table:table-cell office:value-type="float" office:value="159" calcext:value-type="float">
            <text:p>159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2965554" calcext:value-type="float">
            <text:p>2965554</text:p>
          </table:table-cell>
          <table:table-cell table:style-name="ce20"/>
          <table:table-cell table:style-name="ce76"/>
          <table:table-cell/>
          <table:table-cell office:value-type="float" office:value="5" calcext:value-type="float">
            <text:p>5</text:p>
          </table:table-cell>
          <table:table-cell office:value-type="float" office:value="5.550356" calcext:value-type="float">
            <text:p>5.550356</text:p>
          </table:table-cell>
          <table:table-cell office:value-type="float" office:value="158267" calcext:value-type="float">
            <text:p>158267</text:p>
          </table:table-cell>
          <table:table-cell office:value-type="float" office:value="117748" calcext:value-type="float">
            <text:p>117748</text:p>
          </table:table-cell>
          <table:table-cell office:value-type="float" office:value="82217" calcext:value-type="float">
            <text:p>82217</text:p>
          </table:table-cell>
          <table:table-cell office:value-type="float" office:value="50047" calcext:value-type="float">
            <text:p>50047</text:p>
          </table:table-cell>
          <table:table-cell office:value-type="float" office:value="30450" calcext:value-type="float">
            <text:p>30450</text:p>
          </table:table-cell>
          <table:table-cell office:value-type="float" office:value="16626" calcext:value-type="float">
            <text:p>16626</text:p>
          </table:table-cell>
          <table:table-cell office:value-type="float" office:value="7959" calcext:value-type="float">
            <text:p>7959</text:p>
          </table:table-cell>
          <table:table-cell office:value-type="float" office:value="3752" calcext:value-type="float">
            <text:p>3752</text:p>
          </table:table-cell>
          <table:table-cell office:value-type="float" office:value="1767" calcext:value-type="float">
            <text:p>1767</text:p>
          </table:table-cell>
          <table:table-cell office:value-type="float" office:value="900" calcext:value-type="float">
            <text:p>900</text:p>
          </table:table-cell>
          <table:table-cell office:value-type="float" office:value="489" calcext:value-type="float">
            <text:p>489</text:p>
          </table:table-cell>
          <table:table-cell office:value-type="float" office:value="303" calcext:value-type="float">
            <text:p>303</text:p>
          </table:table-cell>
          <table:table-cell office:value-type="float" office:value="191" calcext:value-type="float">
            <text:p>191</text:p>
          </table:table-cell>
          <table:table-cell office:value-type="float" office:value="154" calcext:value-type="float">
            <text:p>154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7"/>
          <table:table-cell office:value-type="float" office:value="3136458" calcext:value-type="float">
            <text:p>3136458</text:p>
          </table:table-cell>
          <table:table-cell table:style-name="ce20"/>
          <table:table-cell table:style-name="ce76"/>
          <table:table-cell/>
          <table:table-cell office:value-type="float" office:value="0" calcext:value-type="float">
            <text:p>0</text:p>
          </table:table-cell>
          <table:table-cell office:value-type="float" office:value="27.362909" calcext:value-type="float">
            <text:p>27.362909</text:p>
          </table:table-cell>
          <table:table-cell office:value-type="float" office:value="811462" calcext:value-type="float">
            <text:p>811462</text:p>
          </table:table-cell>
          <table:table-cell office:value-type="float" office:value="603406" calcext:value-type="float">
            <text:p>603406</text:p>
          </table:table-cell>
          <table:table-cell office:value-type="float" office:value="421624" calcext:value-type="float">
            <text:p>421624</text:p>
          </table:table-cell>
          <table:table-cell office:value-type="float" office:value="256755" calcext:value-type="float">
            <text:p>256755</text:p>
          </table:table-cell>
          <table:table-cell office:value-type="float" office:value="156157" calcext:value-type="float">
            <text:p>156157</text:p>
          </table:table-cell>
          <table:table-cell office:value-type="float" office:value="84613" calcext:value-type="float">
            <text:p>84613</text:p>
          </table:table-cell>
          <table:table-cell office:value-type="float" office:value="40294" calcext:value-type="float">
            <text:p>40294</text:p>
          </table:table-cell>
          <table:table-cell office:value-type="float" office:value="18646" calcext:value-type="float">
            <text:p>18646</text:p>
          </table:table-cell>
          <table:table-cell office:value-type="float" office:value="8870" calcext:value-type="float">
            <text:p>8870</text:p>
          </table:table-cell>
          <table:table-cell office:value-type="float" office:value="4403" calcext:value-type="float">
            <text:p>4403</text:p>
          </table:table-cell>
          <table:table-cell office:value-type="float" office:value="2313" calcext:value-type="float">
            <text:p>2313</text:p>
          </table:table-cell>
          <table:table-cell office:value-type="float" office:value="1463" calcext:value-type="float">
            <text:p>1463</text:p>
          </table:table-cell>
          <table:table-cell office:value-type="float" office:value="980" calcext:value-type="float">
            <text:p>980</text:p>
          </table:table-cell>
          <table:table-cell office:value-type="float" office:value="797" calcext:value-type="float">
            <text:p>797</text:p>
          </table:table-cell>
          <table:table-cell office:value-type="float" office:value="515" calcext:value-type="float">
            <text:p>515</text:p>
          </table:table-cell>
          <table:table-cell office:value-type="float" office:value="393" calcext:value-type="float">
            <text:p>393</text:p>
          </table:table-cell>
          <table:table-cell office:value-type="float" office:value="341" calcext:value-type="float">
            <text:p>341</text:p>
          </table:table-cell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3058129" calcext:value-type="float">
            <text:p>3058129</text:p>
          </table:table-cell>
          <table:table-cell table:style-name="ce20"/>
          <table:table-cell table:style-name="ce76"/>
          <table:table-cell/>
          <table:table-cell office:value-type="float" office:value="1" calcext:value-type="float">
            <text:p>1</text:p>
          </table:table-cell>
          <table:table-cell office:value-type="float" office:value="5.157377" calcext:value-type="float">
            <text:p>5.157377</text:p>
          </table:table-cell>
          <table:table-cell office:value-type="float" office:value="161759" calcext:value-type="float">
            <text:p>161759</text:p>
          </table:table-cell>
          <table:table-cell office:value-type="float" office:value="121801" calcext:value-type="float">
            <text:p>121801</text:p>
          </table:table-cell>
          <table:table-cell office:value-type="float" office:value="85907" calcext:value-type="float">
            <text:p>85907</text:p>
          </table:table-cell>
          <table:table-cell office:value-type="float" office:value="53176" calcext:value-type="float">
            <text:p>53176</text:p>
          </table:table-cell>
          <table:table-cell office:value-type="float" office:value="32846" calcext:value-type="float">
            <text:p>32846</text:p>
          </table:table-cell>
          <table:table-cell office:value-type="float" office:value="17948" calcext:value-type="float">
            <text:p>17948</text:p>
          </table:table-cell>
          <table:table-cell office:value-type="float" office:value="8820" calcext:value-type="float">
            <text:p>8820</text:p>
          </table:table-cell>
          <table:table-cell office:value-type="float" office:value="4090" calcext:value-type="float">
            <text:p>4090</text:p>
          </table:table-cell>
          <table:table-cell office:value-type="float" office:value="1932" calcext:value-type="float">
            <text:p>1932</text:p>
          </table:table-cell>
          <table:table-cell office:value-type="float" office:value="980" calcext:value-type="float">
            <text:p>980</text:p>
          </table:table-cell>
          <table:table-cell office:value-type="float" office:value="558" calcext:value-type="float">
            <text:p>558</text:p>
          </table:table-cell>
          <table:table-cell office:value-type="float" office:value="340" calcext:value-type="float">
            <text:p>340</text:p>
          </table:table-cell>
          <table:table-cell office:value-type="float" office:value="251" calcext:value-type="float">
            <text:p>251</text:p>
          </table:table-cell>
          <table:table-cell office:value-type="float" office:value="197" calcext:value-type="float">
            <text:p>197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12"/>
          <table:table-cell office:value-type="float" office:value="3099191" calcext:value-type="float">
            <text:p>3099191</text:p>
          </table:table-cell>
          <table:table-cell table:style-name="ce20"/>
          <table:table-cell table:style-name="ce76"/>
          <table:table-cell/>
          <table:table-cell office:value-type="float" office:value="2" calcext:value-type="float">
            <text:p>2</text:p>
          </table:table-cell>
          <table:table-cell office:value-type="float" office:value="5.378276" calcext:value-type="float">
            <text:p>5.378276</text:p>
          </table:table-cell>
          <table:table-cell office:value-type="float" office:value="164475" calcext:value-type="float">
            <text:p>164475</text:p>
          </table:table-cell>
          <table:table-cell office:value-type="float" office:value="124484" calcext:value-type="float">
            <text:p>124484</text:p>
          </table:table-cell>
          <table:table-cell office:value-type="float" office:value="88615" calcext:value-type="float">
            <text:p>88615</text:p>
          </table:table-cell>
          <table:table-cell office:value-type="float" office:value="54910" calcext:value-type="float">
            <text:p>54910</text:p>
          </table:table-cell>
          <table:table-cell office:value-type="float" office:value="33955" calcext:value-type="float">
            <text:p>33955</text:p>
          </table:table-cell>
          <table:table-cell office:value-type="float" office:value="18626" calcext:value-type="float">
            <text:p>18626</text:p>
          </table:table-cell>
          <table:table-cell office:value-type="float" office:value="8991" calcext:value-type="float">
            <text:p>8991</text:p>
          </table:table-cell>
          <table:table-cell office:value-type="float" office:value="4266" calcext:value-type="float">
            <text:p>4266</text:p>
          </table:table-cell>
          <table:table-cell office:value-type="float" office:value="2054" calcext:value-type="float">
            <text:p>2054</text:p>
          </table:table-cell>
          <table:table-cell office:value-type="float" office:value="1030" calcext:value-type="float">
            <text:p>1030</text:p>
          </table:table-cell>
          <table:table-cell office:value-type="float" office:value="553" calcext:value-type="float">
            <text:p>553</text:p>
          </table:table-cell>
          <table:table-cell office:value-type="float" office:value="342" calcext:value-type="float">
            <text:p>342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577918697573219" calcext:value-type="float">
            <text:p>0.0577918697573219</text:p>
          </table:table-cell>
          <table:table-cell table:number-matrix-columns-spanned="1" table:number-matrix-rows-spanned="2" table:formula="of:=INDEX([.$I$77:.$J$77]; 1 ; ROW([.$K$99])+1 - ROW())" office:value-type="float" office:value="0.120131684824981" calcext:value-type="float">
            <text:p>0.120131684824981</text:p>
          </table:table-cell>
          <table:table-cell table:number-matrix-columns-spanned="1" table:number-matrix-rows-spanned="2" table:formula="of:=[.$J$98:.$J$99] / [.$K$98:.$K$99]" office:value-type="float" office:value="0.481071000057298" calcext:value-type="float">
            <text:p>0.481071000057298</text:p>
          </table:table-cell>
          <table:table-cell table:number-matrix-columns-spanned="1" table:number-matrix-rows-spanned="2" table:formula="of:=LEGACY.TDIST(ABS([.$L$98:.$L$99]) ; [.$J$79] ; 2 )" office:value-type="float" office:value="0.638461907073729" calcext:value-type="float">
            <text:p>0.638461907073729</text:p>
          </table:table-cell>
          <table:table-cell table:number-matrix-columns-spanned="1" table:number-matrix-rows-spanned="2" table:formula="of:=[.$J$98:.$J$99] - [.$K$98:.$K$99] * TINV(1 - [.$J$95] ; [.$J$79])" office:value-type="float" office:value="-0.201736856786634" calcext:value-type="float">
            <text:p>-0.201736856786634</text:p>
          </table:table-cell>
          <table:table-cell table:number-matrix-columns-spanned="1" table:number-matrix-rows-spanned="2" table:formula="of:=[.$J$98:.$J$99] + [.$K$98:.$K$99] * TINV(1 - [.$J$95] ; [.$J$79])" office:value-type="float" office:value="0.317320596301278" calcext:value-type="float">
            <text:p>0.317320596301278</text:p>
          </table:table-cell>
          <table:table-cell table:number-columns-repeated="12"/>
          <table:table-cell office:value-type="float" office:value="3087352" calcext:value-type="float">
            <text:p>3087352</text:p>
          </table:table-cell>
          <table:table-cell table:style-name="ce20"/>
          <table:table-cell table:style-name="ce76"/>
          <table:table-cell/>
          <table:table-cell office:value-type="float" office:value="3" calcext:value-type="float">
            <text:p>3</text:p>
          </table:table-cell>
          <table:table-cell office:value-type="float" office:value="5.438173" calcext:value-type="float">
            <text:p>5.438173</text:p>
          </table:table-cell>
          <table:table-cell office:value-type="float" office:value="168539" calcext:value-type="float">
            <text:p>168539</text:p>
          </table:table-cell>
          <table:table-cell office:value-type="float" office:value="126692" calcext:value-type="float">
            <text:p>126692</text:p>
          </table:table-cell>
          <table:table-cell office:value-type="float" office:value="89263" calcext:value-type="float">
            <text:p>89263</text:p>
          </table:table-cell>
          <table:table-cell office:value-type="float" office:value="55102" calcext:value-type="float">
            <text:p>55102</text:p>
          </table:table-cell>
          <table:table-cell office:value-type="float" office:value="33857" calcext:value-type="float">
            <text:p>33857</text:p>
          </table:table-cell>
          <table:table-cell office:value-type="float" office:value="18480" calcext:value-type="float">
            <text:p>18480</text:p>
          </table:table-cell>
          <table:table-cell office:value-type="float" office:value="8889" calcext:value-type="float">
            <text:p>8889</text:p>
          </table:table-cell>
          <table:table-cell office:value-type="float" office:value="4125" calcext:value-type="float">
            <text:p>4125</text:p>
          </table:table-cell>
          <table:table-cell office:value-type="float" office:value="1970" calcext:value-type="float">
            <text:p>1970</text:p>
          </table:table-cell>
          <table:table-cell office:value-type="float" office:value="989" calcext:value-type="float">
            <text:p>989</text:p>
          </table:table-cell>
          <table:table-cell office:value-type="float" office:value="503" calcext:value-type="float">
            <text:p>503</text:p>
          </table:table-cell>
          <table:table-cell office:value-type="float" office:value="293" calcext:value-type="float">
            <text:p>293</text:p>
          </table:table-cell>
          <table:table-cell office:value-type="float" office:value="213" calcext:value-type="float">
            <text:p>213</text:p>
          </table:table-cell>
          <table:table-cell office:value-type="float" office:value="164" calcext:value-type="float">
            <text:p>164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466384.911293094" calcext:value-type="float">
            <text:p>466384.911293094</text:p>
          </table:table-cell>
          <table:table-cell office:value-type="float" office:value="3826.03885356173" calcext:value-type="float">
            <text:p>3826.03885356173</text:p>
          </table:table-cell>
          <table:table-cell office:value-type="float" office:value="121.89758890162" calcext:value-type="float">
            <text:p>121.89758890162</text:p>
          </table:table-cell>
          <table:table-cell office:value-type="float" office:value="0.0000000271628892237029" calcext:value-type="float">
            <text:p>2.71628892237029E-08</text:p>
          </table:table-cell>
          <table:table-cell office:value-type="float" office:value="455762.124445825" calcext:value-type="float">
            <text:p>455762.124445825</text:p>
          </table:table-cell>
          <table:table-cell office:value-type="float" office:value="477007.698140362" calcext:value-type="float">
            <text:p>477007.698140362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-0.0141105849447175" calcext:value-type="float">
            <text:p>-0.0141105849447175</text:p>
          </table:table-cell>
          <table:table-cell office:value-type="float" office:value="0.00872206495335319" calcext:value-type="float">
            <text:p>0.00872206495335319</text:p>
          </table:table-cell>
          <table:table-cell office:value-type="float" office:value="-1.61780324042333" calcext:value-type="float">
            <text:p>-1.61780324042333</text:p>
          </table:table-cell>
          <table:table-cell office:value-type="float" office:value="0.129700291043515" calcext:value-type="float">
            <text:p>0.129700291043515</text:p>
          </table:table-cell>
          <table:table-cell office:value-type="float" office:value="-0.0329534606895744" calcext:value-type="float">
            <text:p>-0.0329534606895744</text:p>
          </table:table-cell>
          <table:table-cell office:value-type="float" office:value="0.0047322908001393" calcext:value-type="float">
            <text:p>0.0047322908001393</text:p>
          </table:table-cell>
          <table:table-cell table:number-columns-repeated="12"/>
          <table:table-cell office:value-type="float" office:value="2914640" calcext:value-type="float">
            <text:p>2914640</text:p>
          </table:table-cell>
          <table:table-cell table:style-name="ce20" table:formula="of:=SUM([.AB95:.AB99])/5" office:value-type="float" office:value="3059154" calcext:value-type="float">
            <text:p>3059154</text:p>
          </table:table-cell>
          <table:table-cell table:style-name="ce76" table:formula="of:=(MAX([.AB95:.AB99])-MIN([.AB95:.AB99]))/[.AC99]*100" office:value-type="float" office:value="7.25095892524535" calcext:value-type="float">
            <text:p>7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437773" calcext:value-type="float">
            <text:p>5.437773</text:p>
          </table:table-cell>
          <table:table-cell office:value-type="float" office:value="167883" calcext:value-type="float">
            <text:p>167883</text:p>
          </table:table-cell>
          <table:table-cell office:value-type="float" office:value="126347" calcext:value-type="float">
            <text:p>126347</text:p>
          </table:table-cell>
          <table:table-cell office:value-type="float" office:value="89142" calcext:value-type="float">
            <text:p>89142</text:p>
          </table:table-cell>
          <table:table-cell office:value-type="float" office:value="54989" calcext:value-type="float">
            <text:p>54989</text:p>
          </table:table-cell>
          <table:table-cell office:value-type="float" office:value="33723" calcext:value-type="float">
            <text:p>33723</text:p>
          </table:table-cell>
          <table:table-cell office:value-type="float" office:value="18376" calcext:value-type="float">
            <text:p>18376</text:p>
          </table:table-cell>
          <table:table-cell office:value-type="float" office:value="8887" calcext:value-type="float">
            <text:p>8887</text:p>
          </table:table-cell>
          <table:table-cell office:value-type="float" office:value="4214" calcext:value-type="float">
            <text:p>4214</text:p>
          </table:table-cell>
          <table:table-cell office:value-type="float" office:value="2046" calcext:value-type="float">
            <text:p>2046</text:p>
          </table:table-cell>
          <table:table-cell office:value-type="float" office:value="956" calcext:value-type="float">
            <text:p>956</text:p>
          </table:table-cell>
          <table:table-cell office:value-type="float" office:value="534" calcext:value-type="float">
            <text:p>534</text:p>
          </table:table-cell>
          <table:table-cell office:value-type="float" office:value="316" calcext:value-type="float">
            <text:p>316</text:p>
          </table:table-cell>
          <table:table-cell office:value-type="float" office:value="216" calcext:value-type="float">
            <text:p>216</text:p>
          </table:table-cell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 table:number-columns-repeated="27"/>
          <table:table-cell office:value-type="float" office:value="3058438" calcext:value-type="float">
            <text:p>305843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.421284" calcext:value-type="float">
            <text:p>5.421284</text:p>
          </table:table-cell>
          <table:table-cell office:value-type="float" office:value="158011" calcext:value-type="float">
            <text:p>158011</text:p>
          </table:table-cell>
          <table:table-cell office:value-type="float" office:value="119125" calcext:value-type="float">
            <text:p>119125</text:p>
          </table:table-cell>
          <table:table-cell office:value-type="float" office:value="84678" calcext:value-type="float">
            <text:p>84678</text:p>
          </table:table-cell>
          <table:table-cell office:value-type="float" office:value="52269" calcext:value-type="float">
            <text:p>52269</text:p>
          </table:table-cell>
          <table:table-cell office:value-type="float" office:value="32289" calcext:value-type="float">
            <text:p>32289</text:p>
          </table:table-cell>
          <table:table-cell office:value-type="float" office:value="17715" calcext:value-type="float">
            <text:p>17715</text:p>
          </table:table-cell>
          <table:table-cell office:value-type="float" office:value="8572" calcext:value-type="float">
            <text:p>8572</text:p>
          </table:table-cell>
          <table:table-cell office:value-type="float" office:value="4048" calcext:value-type="float">
            <text:p>4048</text:p>
          </table:table-cell>
          <table:table-cell office:value-type="float" office:value="1962" calcext:value-type="float">
            <text:p>1962</text:p>
          </table:table-cell>
          <table:table-cell office:value-type="float" office:value="977" calcext:value-type="float">
            <text:p>977</text:p>
          </table:table-cell>
          <table:table-cell office:value-type="float" office:value="514" calcext:value-type="float">
            <text:p>514</text:p>
          </table:table-cell>
          <table:table-cell office:value-type="float" office:value="310" calcext:value-type="float">
            <text:p>310</text:p>
          </table:table-cell>
          <table:table-cell office:value-type="float" office:value="212" calcext:value-type="float">
            <text:p>212</text:p>
          </table:table-cell>
          <table:table-cell office:value-type="float" office:value="174" calcext:value-type="float">
            <text:p>174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26.832882" calcext:value-type="float">
            <text:p>26.832882</text:p>
          </table:table-cell>
          <table:table-cell office:value-type="float" office:value="820667" calcext:value-type="float">
            <text:p>820667</text:p>
          </table:table-cell>
          <table:table-cell office:value-type="float" office:value="618448" calcext:value-type="float">
            <text:p>618448</text:p>
          </table:table-cell>
          <table:table-cell office:value-type="float" office:value="437606" calcext:value-type="float">
            <text:p>437606</text:p>
          </table:table-cell>
          <table:table-cell office:value-type="float" office:value="270447" calcext:value-type="float">
            <text:p>270447</text:p>
          </table:table-cell>
          <table:table-cell office:value-type="float" office:value="166671" calcext:value-type="float">
            <text:p>166671</text:p>
          </table:table-cell>
          <table:table-cell office:value-type="float" office:value="91146" calcext:value-type="float">
            <text:p>91146</text:p>
          </table:table-cell>
          <table:table-cell office:value-type="float" office:value="44160" calcext:value-type="float">
            <text:p>44160</text:p>
          </table:table-cell>
          <table:table-cell office:value-type="float" office:value="20743" calcext:value-type="float">
            <text:p>20743</text:p>
          </table:table-cell>
          <table:table-cell office:value-type="float" office:value="9965" calcext:value-type="float">
            <text:p>9965</text:p>
          </table:table-cell>
          <table:table-cell office:value-type="float" office:value="4931" calcext:value-type="float">
            <text:p>4931</text:p>
          </table:table-cell>
          <table:table-cell office:value-type="float" office:value="2661" calcext:value-type="float">
            <text:p>2661</text:p>
          </table:table-cell>
          <table:table-cell office:value-type="float" office:value="1601" calcext:value-type="float">
            <text:p>1601</text:p>
          </table:table-cell>
          <table:table-cell office:value-type="float" office:value="1123" calcext:value-type="float">
            <text:p>1123</text:p>
          </table:table-cell>
          <table:table-cell office:value-type="float" office:value="899" calcext:value-type="float">
            <text:p>899</text:p>
          </table:table-cell>
          <table:table-cell office:value-type="float" office:value="618" calcext:value-type="float">
            <text:p>618</text:p>
          </table:table-cell>
          <table:table-cell office:value-type="float" office:value="468" calcext:value-type="float">
            <text:p>468</text:p>
          </table:table-cell>
          <table:table-cell office:value-type="float" office:value="385" calcext:value-type="float">
            <text:p>385</text:p>
          </table:table-cell>
          <table:table-cell office:value-type="float" office:value="309" calcext:value-type="float">
            <text:p>309</text:p>
          </table:table-cell>
          <table:table-cell office:value-type="float" office:value="259" calcext:value-type="float">
            <text:p>259</text:p>
          </table:table-cell>
          <table:table-cell office:value-type="float" office:value="211" calcext:value-type="float">
            <text:p>211</text:p>
          </table:table-cell>
          <table:table-cell office:value-type="float" office:value="186" calcext:value-type="float">
            <text:p>186</text:p>
          </table:table-cell>
          <table:table-cell office:value-type="float" office:value="162" calcext:value-type="float">
            <text:p>162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6"/>
        </table:table-row>
        <table:table-row table:style-name="ro2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663849.11293094" calcext:value-type="float">
            <text:p>4663849.11293094</text:p>
          </table:table-cell>
          <table:table-cell office:value-type="float" office:value="289065.6" calcext:value-type="float">
            <text:p>289065.6</text:p>
          </table:table-cell>
          <table:table-cell office:value-type="float" office:value="-4374783.51293094" calcext:value-type="float">
            <text:p>-4374783.5129309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9327698.22586187" calcext:value-type="float">
            <text:p>9327698.22586187</text:p>
          </table:table-cell>
          <table:table-cell office:value-type="float" office:value="601034.2" calcext:value-type="float">
            <text:p>601034.2</text:p>
          </table:table-cell>
          <table:table-cell office:value-type="float" office:value="-8726664.02586187" calcext:value-type="float">
            <text:p>-8726664.0258618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3991547.3387928" calcext:value-type="float">
            <text:p>13991547.3387928</text:p>
          </table:table-cell>
          <table:table-cell office:value-type="float" office:value="887096" calcext:value-type="float">
            <text:p>887096</text:p>
          </table:table-cell>
          <table:table-cell office:value-type="float" office:value="-13104451.3387928" calcext:value-type="float">
            <text:p>-13104451.338792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8655396.4517237" calcext:value-type="float">
            <text:p>18655396.4517237</text:p>
          </table:table-cell>
          <table:table-cell office:value-type="float" office:value="1150880.2" calcext:value-type="float">
            <text:p>1150880.2</text:p>
          </table:table-cell>
          <table:table-cell office:value-type="float" office:value="-17504516.2517237" calcext:value-type="float">
            <text:p>-17504516.2517237</text:p>
          </table:table-cell>
          <table:table-cell table:number-columns-repeated="1004"/>
        </table:table-row>
        <table:table-row table:style-name="ro2" table:number-rows-repeated="1048469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AnnexE_DATA" table:style-name="ta1">
        <table:table-column table:style-name="co4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2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table:number-columns-repeated="5"/>
          <table:table-cell table:style-name="ce194"/>
          <table:table-cell table:style-name="ce200" table:formula="of:=SUM([.B6:.F6])" office:value-type="float" office:value="0" calcext:value-type="float">
            <text:p>0.0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 table:number-columns-repeated="5"/>
          <table:table-cell table:style-name="ce76" table:formula="of:=SUMPRODUCT(([.B7:.F7]&lt;&gt;&quot;&quot;)*([.B7:.F7]/[.B$6:.F$6]) / SUM([.B7:.F7]&lt;&gt;&quot;&quot;))" office:value-type="string" office:string-value="" calcext:value-type="error">
            <text:p>#DIV/0!</text:p>
          </table:table-cell>
          <table:table-cell table:style-name="ce201" table:formula="of:=[.G7]*[.H$6]" office:value-type="string" office:string-value="" calcext:value-type="error">
            <text:p>#DIV/0!</text:p>
          </table:table-cell>
          <table:table-cell table:style-name="ce203" table:formula="of:=STDEVP([.B7:.F7])/AVERAGE([.B7:.F7])" office:value-type="string" office:string-value="" calcext:value-type="error">
            <text:p>#DIV/0!</text:p>
          </table:table-cell>
          <table:table-cell table:style-name="ce203" table:formula="of:=IF([.H7]&gt;[.$A$41]; [.$C$41]; IF([.H7]&gt;[.$A$42]; [.$C$42]; IF([.H7]&gt;[.$A$43];[.$C$43];IF([.H7]&gt;[.$A$44];[.$C$44]; IF([.H7]&gt;[.$A$45];[.$C$45];IF([.H7]&gt;[.$A$46];[.$C$46];[.$C$47]))))))/100" office:value-type="string" office:string-value="" calcext:value-type="error">
            <text:p>#DIV/0!</text:p>
          </table:table-cell>
          <table:table-cell table:style-name="ce205" table:formula="of:=(MAX([.B7:.F7])-MIN([.B7:.F7]))/[.H7]*5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 table:number-columns-repeated="5"/>
          <table:table-cell table:style-name="ce76" table:formula="of:=SUMPRODUCT(([.B8:.F8]&lt;&gt;&quot;&quot;)*([.B8:.F8]/[.B$6:.F$6]) / SUM([.B8:.F8]&lt;&gt;&quot;&quot;))" office:value-type="string" office:string-value="" calcext:value-type="error">
            <text:p>#DIV/0!</text:p>
          </table:table-cell>
          <table:table-cell table:style-name="ce201" table:formula="of:=[.G8]*[.H$6]" office:value-type="string" office:string-value="" calcext:value-type="error">
            <text:p>#DIV/0!</text:p>
          </table:table-cell>
          <table:table-cell table:style-name="ce203" table:formula="of:=STDEVP([.B8:.F8])/AVERAGE([.B8:.F8])" office:value-type="string" office:string-value="" calcext:value-type="error">
            <text:p>#DIV/0!</text:p>
          </table:table-cell>
          <table:table-cell table:style-name="ce203" table:formula="of:=IF([.H8]&gt;[.$A$41]; [.$C$41]; IF([.H8]&gt;[.$A$42]; [.$C$42]; IF([.H8]&gt;[.$A$43];[.$C$43];IF([.H8]&gt;[.$A$44];[.$C$44]; IF([.H8]&gt;[.$A$45];[.$C$45];IF([.H8]&gt;[.$A$46];[.$C$46];[.$C$47]))))))/100" office:value-type="string" office:string-value="" calcext:value-type="error">
            <text:p>#DIV/0!</text:p>
          </table:table-cell>
          <table:table-cell table:style-name="ce205" table:formula="of:=(MAX([.B8:.F8])-MIN([.B8:.F8]))/[.H8]*5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table:number-columns-repeated="5"/>
          <table:table-cell table:style-name="ce76" table:formula="of:=SUMPRODUCT(([.B9:.F9]&lt;&gt;&quot;&quot;)*([.B9:.F9]/[.B$6:.F$6]) / SUM([.B9:.F9]&lt;&gt;&quot;&quot;))" office:value-type="string" office:string-value="" calcext:value-type="error">
            <text:p>#DIV/0!</text:p>
          </table:table-cell>
          <table:table-cell table:style-name="ce201" table:formula="of:=[.G9]*[.H$6]" office:value-type="string" office:string-value="" calcext:value-type="error">
            <text:p>#DIV/0!</text:p>
          </table:table-cell>
          <table:table-cell table:style-name="ce203" table:formula="of:=STDEVP([.B9:.F9])/AVERAGE([.B9:.F9])" office:value-type="string" office:string-value="" calcext:value-type="error">
            <text:p>#DIV/0!</text:p>
          </table:table-cell>
          <table:table-cell table:style-name="ce203" table:formula="of:=IF([.H9]&gt;[.$A$41]; [.$C$41]; IF([.H9]&gt;[.$A$42]; [.$C$42]; IF([.H9]&gt;[.$A$43];[.$C$43];IF([.H9]&gt;[.$A$44];[.$C$44]; IF([.H9]&gt;[.$A$45];[.$C$45];IF([.H9]&gt;[.$A$46];[.$C$46];[.$C$47]))))))/100" office:value-type="string" office:string-value="" calcext:value-type="error">
            <text:p>#DIV/0!</text:p>
          </table:table-cell>
          <table:table-cell table:style-name="ce205" table:formula="of:=(MAX([.B9:.F9])-MIN([.B9:.F9]))/[.H9]*5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table:number-columns-repeated="5"/>
          <table:table-cell table:style-name="ce76" table:formula="of:=SUMPRODUCT(([.B10:.F10]&lt;&gt;&quot;&quot;)*([.B10:.F10]/[.B$6:.F$6]) / SUM([.B10:.F10]&lt;&gt;&quot;&quot;))" office:value-type="string" office:string-value="" calcext:value-type="error">
            <text:p>#DIV/0!</text:p>
          </table:table-cell>
          <table:table-cell table:style-name="ce201" table:formula="of:=[.G10]*[.H$6]" office:value-type="string" office:string-value="" calcext:value-type="error">
            <text:p>#DIV/0!</text:p>
          </table:table-cell>
          <table:table-cell table:style-name="ce203" table:formula="of:=STDEVP([.B10:.F10])/AVERAGE([.B10:.F10])" office:value-type="string" office:string-value="" calcext:value-type="error">
            <text:p>#DIV/0!</text:p>
          </table:table-cell>
          <table:table-cell table:style-name="ce203" table:formula="of:=IF([.H10]&gt;[.$A$41]; [.$C$41]; IF([.H10]&gt;[.$A$42]; [.$C$42]; IF([.H10]&gt;[.$A$43];[.$C$43];IF([.H10]&gt;[.$A$44];[.$C$44]; IF([.H10]&gt;[.$A$45];[.$C$45];IF([.H10]&gt;[.$A$46];[.$C$46];[.$C$47]))))))/100" office:value-type="string" office:string-value="" calcext:value-type="error">
            <text:p>#DIV/0!</text:p>
          </table:table-cell>
          <table:table-cell table:style-name="ce205" table:formula="of:=(MAX([.B10:.F10])-MIN([.B10:.F10]))/[.H10]*5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table:number-columns-repeated="5"/>
          <table:table-cell table:style-name="ce76" table:formula="of:=SUMPRODUCT(([.B11:.F11]&lt;&gt;&quot;&quot;)*([.B11:.F11]/[.B$6:.F$6]) / SUM([.B11:.F11]&lt;&gt;&quot;&quot;))" office:value-type="string" office:string-value="" calcext:value-type="error">
            <text:p>#DIV/0!</text:p>
          </table:table-cell>
          <table:table-cell table:style-name="ce201" table:formula="of:=[.G11]*[.H$6]" office:value-type="string" office:string-value="" calcext:value-type="error">
            <text:p>#DIV/0!</text:p>
          </table:table-cell>
          <table:table-cell table:style-name="ce203" table:formula="of:=STDEVP([.B11:.F11])/AVERAGE([.B11:.F11])" office:value-type="string" office:string-value="" calcext:value-type="error">
            <text:p>#DIV/0!</text:p>
          </table:table-cell>
          <table:table-cell table:style-name="ce203" table:formula="of:=IF([.H11]&gt;[.$A$41]; [.$C$41]; IF([.H11]&gt;[.$A$42]; [.$C$42]; IF([.H11]&gt;[.$A$43];[.$C$43];IF([.H11]&gt;[.$A$44];[.$C$44]; IF([.H11]&gt;[.$A$45];[.$C$45];IF([.H11]&gt;[.$A$46];[.$C$46];[.$C$47]))))))/100" office:value-type="string" office:string-value="" calcext:value-type="error">
            <text:p>#DIV/0!</text:p>
          </table:table-cell>
          <table:table-cell table:style-name="ce205" table:formula="of:=(MAX([.B11:.F11])-MIN([.B11:.F11]))/[.H11]*5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table:number-columns-repeated="5"/>
          <table:table-cell table:style-name="ce76" table:formula="of:=SUMPRODUCT(([.B12:.F12]&lt;&gt;&quot;&quot;)*([.B12:.F12]/[.B$6:.F$6]) / SUM([.B12:.F12]&lt;&gt;&quot;&quot;))" office:value-type="string" office:string-value="" calcext:value-type="error">
            <text:p>#DIV/0!</text:p>
          </table:table-cell>
          <table:table-cell table:style-name="ce201" table:formula="of:=[.G12]*[.H$6]" office:value-type="string" office:string-value="" calcext:value-type="error">
            <text:p>#DIV/0!</text:p>
          </table:table-cell>
          <table:table-cell table:style-name="ce203" table:formula="of:=STDEVP([.B12:.F12])/AVERAGE([.B12:.F12])" office:value-type="string" office:string-value="" calcext:value-type="error">
            <text:p>#DIV/0!</text:p>
          </table:table-cell>
          <table:table-cell table:style-name="ce203" table:formula="of:=IF([.H12]&gt;[.$A$41]; [.$C$41]; IF([.H12]&gt;[.$A$42]; [.$C$42]; IF([.H12]&gt;[.$A$43];[.$C$43];IF([.H12]&gt;[.$A$44];[.$C$44]; IF([.H12]&gt;[.$A$45];[.$C$45];IF([.H12]&gt;[.$A$46];[.$C$46];[.$C$47]))))))/100" office:value-type="string" office:string-value="" calcext:value-type="error">
            <text:p>#DIV/0!</text:p>
          </table:table-cell>
          <table:table-cell table:style-name="ce205" table:formula="of:=(MAX([.B12:.F12])-MIN([.B12:.F12]))/[.H12]*5" office:value-type="string" office:string-value="" calcext:value-type="error">
            <text:p>#DIV/0!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table:number-columns-repeated="5"/>
          <table:table-cell table:style-name="ce76" table:formula="of:=SUMPRODUCT(([.B13:.F13]&lt;&gt;&quot;&quot;)*([.B13:.F13]/[.B$6:.F$6]) / SUM([.B13:.F13]&lt;&gt;&quot;&quot;))" office:value-type="string" office:string-value="" calcext:value-type="error">
            <text:p>#DIV/0!</text:p>
          </table:table-cell>
          <table:table-cell table:style-name="ce201" table:formula="of:=[.G13]*[.H$6]" office:value-type="string" office:string-value="" calcext:value-type="error">
            <text:p>#DIV/0!</text:p>
          </table:table-cell>
          <table:table-cell table:style-name="ce203" table:formula="of:=STDEVP([.B13:.F13])/AVERAGE([.B13:.F13])" office:value-type="string" office:string-value="" calcext:value-type="error">
            <text:p>#DIV/0!</text:p>
          </table:table-cell>
          <table:table-cell table:style-name="ce203" table:formula="of:=IF([.H13]&gt;[.$A$41]; [.$C$41]; IF([.H13]&gt;[.$A$42]; [.$C$42]; IF([.H13]&gt;[.$A$43];[.$C$43];IF([.H13]&gt;[.$A$44];[.$C$44]; IF([.H13]&gt;[.$A$45];[.$C$45];IF([.H13]&gt;[.$A$46];[.$C$46];[.$C$47]))))))/100" office:value-type="string" office:string-value="" calcext:value-type="error">
            <text:p>#DIV/0!</text:p>
          </table:table-cell>
          <table:table-cell table:style-name="ce205" table:formula="of:=(MAX([.B13:.F13])-MIN([.B13:.F13]))/[.H13]*5" office:value-type="string" office:string-value="" calcext:value-type="error">
            <text:p>#DIV/0!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 table:number-columns-repeated="5"/>
          <table:table-cell table:style-name="ce76" table:formula="of:=SUMPRODUCT(([.B14:.F14]&lt;&gt;&quot;&quot;)*([.B14:.F14]/[.B$6:.F$6]) / SUM([.B14:.F14]&lt;&gt;&quot;&quot;))" office:value-type="string" office:string-value="" calcext:value-type="error">
            <text:p>#DIV/0!</text:p>
          </table:table-cell>
          <table:table-cell table:style-name="ce201" table:formula="of:=[.G14]*[.H$6]" office:value-type="string" office:string-value="" calcext:value-type="error">
            <text:p>#DIV/0!</text:p>
          </table:table-cell>
          <table:table-cell table:style-name="ce203" table:formula="of:=STDEVP([.B14:.F14])/AVERAGE([.B14:.F14])" office:value-type="string" office:string-value="" calcext:value-type="error">
            <text:p>#DIV/0!</text:p>
          </table:table-cell>
          <table:table-cell table:style-name="ce203" table:formula="of:=IF([.H14]&gt;[.$A$41]; [.$C$41]; IF([.H14]&gt;[.$A$42]; [.$C$42]; IF([.H14]&gt;[.$A$43];[.$C$43];IF([.H14]&gt;[.$A$44];[.$C$44]; IF([.H14]&gt;[.$A$45];[.$C$45];IF([.H14]&gt;[.$A$46];[.$C$46];[.$C$47]))))))/100" office:value-type="string" office:string-value="" calcext:value-type="error">
            <text:p>#DIV/0!</text:p>
          </table:table-cell>
          <table:table-cell table:style-name="ce205" table:formula="of:=(MAX([.B14:.F14])-MIN([.B14:.F14]))/[.H14]*5" office:value-type="string" office:string-value="" calcext:value-type="error">
            <text:p>#DIV/0!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 table:number-columns-repeated="5"/>
          <table:table-cell table:style-name="ce76" table:formula="of:=SUMPRODUCT(([.B15:.F15]&lt;&gt;&quot;&quot;)*([.B15:.F15]/[.B$6:.F$6]) / SUM([.B15:.F15]&lt;&gt;&quot;&quot;))" office:value-type="string" office:string-value="" calcext:value-type="error">
            <text:p>#DIV/0!</text:p>
          </table:table-cell>
          <table:table-cell table:style-name="ce201" table:formula="of:=[.G15]*[.H$6]" office:value-type="string" office:string-value="" calcext:value-type="error">
            <text:p>#DIV/0!</text:p>
          </table:table-cell>
          <table:table-cell table:style-name="ce203" table:formula="of:=STDEVP([.B15:.F15])/AVERAGE([.B15:.F15])" office:value-type="string" office:string-value="" calcext:value-type="error">
            <text:p>#DIV/0!</text:p>
          </table:table-cell>
          <table:table-cell table:style-name="ce203" table:formula="of:=IF([.H15]&gt;[.$A$41]; [.$C$41]; IF([.H15]&gt;[.$A$42]; [.$C$42]; IF([.H15]&gt;[.$A$43];[.$C$43];IF([.H15]&gt;[.$A$44];[.$C$44]; IF([.H15]&gt;[.$A$45];[.$C$45];IF([.H15]&gt;[.$A$46];[.$C$46];[.$C$47]))))))/100" office:value-type="string" office:string-value="" calcext:value-type="error">
            <text:p>#DIV/0!</text:p>
          </table:table-cell>
          <table:table-cell table:style-name="ce205" table:formula="of:=(MAX([.B15:.F15])-MIN([.B15:.F15]))/[.H15]*5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4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 table:number-columns-repeated="5"/>
          <table:table-cell table:style-name="ce76" table:formula="of:=SUMPRODUCT(([.B16:.F16]&lt;&gt;&quot;&quot;)*([.B16:.F16]/[.B$6:.F$6]) / SUM([.B16:.F16]&lt;&gt;&quot;&quot;))" office:value-type="string" office:string-value="" calcext:value-type="error">
            <text:p>#DIV/0!</text:p>
          </table:table-cell>
          <table:table-cell table:style-name="ce201" table:formula="of:=[.G16]*[.H$6]" office:value-type="string" office:string-value="" calcext:value-type="error">
            <text:p>#DIV/0!</text:p>
          </table:table-cell>
          <table:table-cell table:style-name="ce203" table:formula="of:=STDEVP([.B16:.F16])/AVERAGE([.B16:.F16])" office:value-type="string" office:string-value="" calcext:value-type="error">
            <text:p>#DIV/0!</text:p>
          </table:table-cell>
          <table:table-cell table:style-name="ce203" table:formula="of:=IF([.H16]&gt;[.$A$41]; [.$C$41]; IF([.H16]&gt;[.$A$42]; [.$C$42]; IF([.H16]&gt;[.$A$43];[.$C$43];IF([.H16]&gt;[.$A$44];[.$C$44]; IF([.H16]&gt;[.$A$45];[.$C$45];IF([.H16]&gt;[.$A$46];[.$C$46];[.$C$47]))))))/100" office:value-type="string" office:string-value="" calcext:value-type="error">
            <text:p>#DIV/0!</text:p>
          </table:table-cell>
          <table:table-cell table:style-name="ce205" table:formula="of:=(MAX([.B16:.F16])-MIN([.B16:.F16]))/[.H16]*5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 table:number-columns-repeated="5"/>
          <table:table-cell table:style-name="ce76" table:formula="of:=SUMPRODUCT(([.B17:.F17]&lt;&gt;&quot;&quot;)*([.B17:.F17]/[.B$6:.F$6]) / SUM([.B17:.F17]&lt;&gt;&quot;&quot;))" office:value-type="string" office:string-value="" calcext:value-type="error">
            <text:p>#DIV/0!</text:p>
          </table:table-cell>
          <table:table-cell table:style-name="ce201" table:formula="of:=[.G17]*[.H$6]" office:value-type="string" office:string-value="" calcext:value-type="error">
            <text:p>#DIV/0!</text:p>
          </table:table-cell>
          <table:table-cell table:style-name="ce203" table:formula="of:=STDEVP([.B17:.F17])/AVERAGE([.B17:.F17])" office:value-type="string" office:string-value="" calcext:value-type="error">
            <text:p>#DIV/0!</text:p>
          </table:table-cell>
          <table:table-cell table:style-name="ce203" table:formula="of:=IF([.H17]&gt;[.$A$41]; [.$C$41]; IF([.H17]&gt;[.$A$42]; [.$C$42]; IF([.H17]&gt;[.$A$43];[.$C$43];IF([.H17]&gt;[.$A$44];[.$C$44]; IF([.H17]&gt;[.$A$45];[.$C$45];IF([.H17]&gt;[.$A$46];[.$C$46];[.$C$47]))))))/100" office:value-type="string" office:string-value="" calcext:value-type="error">
            <text:p>#DIV/0!</text:p>
          </table:table-cell>
          <table:table-cell table:style-name="ce205" table:formula="of:=(MAX([.B17:.F17])-MIN([.B17:.F17]))/[.H17]*5" office:value-type="string" office:string-value="" calcext:value-type="error">
            <text:p>#DIV/0!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 table:number-columns-repeated="5"/>
          <table:table-cell table:style-name="ce76" table:formula="of:=SUMPRODUCT(([.B18:.F18]&lt;&gt;&quot;&quot;)*([.B18:.F18]/[.B$6:.F$6]) / SUM([.B18:.F18]&lt;&gt;&quot;&quot;))" office:value-type="string" office:string-value="" calcext:value-type="error">
            <text:p>#DIV/0!</text:p>
          </table:table-cell>
          <table:table-cell table:style-name="ce201" table:formula="of:=[.G18]*[.H$6]" office:value-type="string" office:string-value="" calcext:value-type="error">
            <text:p>#DIV/0!</text:p>
          </table:table-cell>
          <table:table-cell table:style-name="ce203" table:formula="of:=STDEVP([.B18:.F18])/AVERAGE([.B18:.F18])" office:value-type="string" office:string-value="" calcext:value-type="error">
            <text:p>#DIV/0!</text:p>
          </table:table-cell>
          <table:table-cell table:style-name="ce203" table:formula="of:=IF([.H18]&gt;[.$A$41]; [.$C$41]; IF([.H18]&gt;[.$A$42]; [.$C$42]; IF([.H18]&gt;[.$A$43];[.$C$43];IF([.H18]&gt;[.$A$44];[.$C$44]; IF([.H18]&gt;[.$A$45];[.$C$45];IF([.H18]&gt;[.$A$46];[.$C$46];[.$C$47]))))))/100" office:value-type="string" office:string-value="" calcext:value-type="error">
            <text:p>#DIV/0!</text:p>
          </table:table-cell>
          <table:table-cell table:style-name="ce205" table:formula="of:=(MAX([.B18:.F18])-MIN([.B18:.F18]))/[.H18]*5" office:value-type="string" office:string-value="" calcext:value-type="error">
            <text:p>#DIV/0!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 table:number-columns-repeated="5"/>
          <table:table-cell table:style-name="ce76" table:formula="of:=SUMPRODUCT(([.B19:.F19]&lt;&gt;&quot;&quot;)*([.B19:.F19]/[.B$6:.F$6]) / SUM([.B19:.F19]&lt;&gt;&quot;&quot;))" office:value-type="string" office:string-value="" calcext:value-type="error">
            <text:p>#DIV/0!</text:p>
          </table:table-cell>
          <table:table-cell table:style-name="ce201" table:formula="of:=[.G19]*[.H$6]" office:value-type="string" office:string-value="" calcext:value-type="error">
            <text:p>#DIV/0!</text:p>
          </table:table-cell>
          <table:table-cell table:style-name="ce203" table:formula="of:=STDEVP([.B19:.F19])/AVERAGE([.B19:.F19])" office:value-type="string" office:string-value="" calcext:value-type="error">
            <text:p>#DIV/0!</text:p>
          </table:table-cell>
          <table:table-cell table:style-name="ce203" table:formula="of:=IF([.H19]&gt;[.$A$41]; [.$C$41]; IF([.H19]&gt;[.$A$42]; [.$C$42]; IF([.H19]&gt;[.$A$43];[.$C$43];IF([.H19]&gt;[.$A$44];[.$C$44]; IF([.H19]&gt;[.$A$45];[.$C$45];IF([.H19]&gt;[.$A$46];[.$C$46];[.$C$47]))))))/100" office:value-type="string" office:string-value="" calcext:value-type="error">
            <text:p>#DIV/0!</text:p>
          </table:table-cell>
          <table:table-cell table:style-name="ce205" table:formula="of:=(MAX([.B19:.F19])-MIN([.B19:.F19]))/[.H19]*5" office:value-type="string" office:string-value="" calcext:value-type="error">
            <text:p>#DIV/0!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 table:number-columns-repeated="5"/>
          <table:table-cell table:style-name="ce76" table:formula="of:=SUMPRODUCT(([.B20:.F20]&lt;&gt;&quot;&quot;)*([.B20:.F20]/[.B$6:.F$6]) / SUM([.B20:.F20]&lt;&gt;&quot;&quot;))" office:value-type="string" office:string-value="" calcext:value-type="error">
            <text:p>#DIV/0!</text:p>
          </table:table-cell>
          <table:table-cell table:style-name="ce201" table:formula="of:=[.G20]*[.H$6]" office:value-type="string" office:string-value="" calcext:value-type="error">
            <text:p>#DIV/0!</text:p>
          </table:table-cell>
          <table:table-cell table:style-name="ce203" table:formula="of:=STDEVP([.B20:.F20])/AVERAGE([.B20:.F20])" office:value-type="string" office:string-value="" calcext:value-type="error">
            <text:p>#DIV/0!</text:p>
          </table:table-cell>
          <table:table-cell table:style-name="ce203" table:formula="of:=IF([.H20]&gt;[.$A$41]; [.$C$41]; IF([.H20]&gt;[.$A$42]; [.$C$42]; IF([.H20]&gt;[.$A$43];[.$C$43];IF([.H20]&gt;[.$A$44];[.$C$44]; IF([.H20]&gt;[.$A$45];[.$C$45];IF([.H20]&gt;[.$A$46];[.$C$46];[.$C$47]))))))/100" office:value-type="string" office:string-value="" calcext:value-type="error">
            <text:p>#DIV/0!</text:p>
          </table:table-cell>
          <table:table-cell table:style-name="ce205" table:formula="of:=(MAX([.B20:.F20])-MIN([.B20:.F20]))/[.H20]*5" office:value-type="string" office:string-value="" calcext:value-type="error">
            <text:p>#DIV/0!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 table:number-columns-repeated="5"/>
          <table:table-cell table:style-name="ce76" table:formula="of:=SUMPRODUCT(([.B21:.F21]&lt;&gt;&quot;&quot;)*([.B21:.F21]/[.B$6:.F$6]) / SUM([.B21:.F21]&lt;&gt;&quot;&quot;))" office:value-type="string" office:string-value="" calcext:value-type="error">
            <text:p>#DIV/0!</text:p>
          </table:table-cell>
          <table:table-cell table:style-name="ce201" table:formula="of:=[.G21]*[.H$6]" office:value-type="string" office:string-value="" calcext:value-type="error">
            <text:p>#DIV/0!</text:p>
          </table:table-cell>
          <table:table-cell table:style-name="ce203" table:formula="of:=STDEVP([.B21:.F21])/AVERAGE([.B21:.F21])" office:value-type="string" office:string-value="" calcext:value-type="error">
            <text:p>#DIV/0!</text:p>
          </table:table-cell>
          <table:table-cell table:style-name="ce203" table:formula="of:=IF([.H21]&gt;[.$A$41]; [.$C$41]; IF([.H21]&gt;[.$A$42]; [.$C$42]; IF([.H21]&gt;[.$A$43];[.$C$43];IF([.H21]&gt;[.$A$44];[.$C$44]; IF([.H21]&gt;[.$A$45];[.$C$45];IF([.H21]&gt;[.$A$46];[.$C$46];[.$C$47]))))))/100" office:value-type="string" office:string-value="" calcext:value-type="error">
            <text:p>#DIV/0!</text:p>
          </table:table-cell>
          <table:table-cell table:style-name="ce205" table:formula="of:=(MAX([.B21:.F21])-MIN([.B21:.F21]))/[.H21]*5" office:value-type="string" office:string-value="" calcext:value-type="error">
            <text:p>#DIV/0!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 table:number-columns-repeated="5"/>
          <table:table-cell table:style-name="ce76" table:formula="of:=SUMPRODUCT(([.B22:.F22]&lt;&gt;&quot;&quot;)*([.B22:.F22]/[.B$6:.F$6]) / SUM([.B22:.F22]&lt;&gt;&quot;&quot;))" office:value-type="string" office:string-value="" calcext:value-type="error">
            <text:p>#DIV/0!</text:p>
          </table:table-cell>
          <table:table-cell table:style-name="ce201" table:formula="of:=[.G22]*[.H$6]" office:value-type="string" office:string-value="" calcext:value-type="error">
            <text:p>#DIV/0!</text:p>
          </table:table-cell>
          <table:table-cell table:style-name="ce203" table:formula="of:=STDEVP([.B22:.F22])/AVERAGE([.B22:.F22])" office:value-type="string" office:string-value="" calcext:value-type="error">
            <text:p>#DIV/0!</text:p>
          </table:table-cell>
          <table:table-cell table:style-name="ce203" table:formula="of:=IF([.H22]&gt;[.$A$41]; [.$C$41]; IF([.H22]&gt;[.$A$42]; [.$C$42]; IF([.H22]&gt;[.$A$43];[.$C$43];IF([.H22]&gt;[.$A$44];[.$C$44]; IF([.H22]&gt;[.$A$45];[.$C$45];IF([.H22]&gt;[.$A$46];[.$C$46];[.$C$47]))))))/100" office:value-type="string" office:string-value="" calcext:value-type="error">
            <text:p>#DIV/0!</text:p>
          </table:table-cell>
          <table:table-cell table:style-name="ce205" table:formula="of:=(MAX([.B22:.F22])-MIN([.B22:.F22]))/[.H22]*5" office:value-type="string" office:string-value="" calcext:value-type="error">
            <text:p>#DIV/0!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 table:number-columns-repeated="5"/>
          <table:table-cell table:style-name="ce76" table:formula="of:=SUMPRODUCT(([.B23:.F23]&lt;&gt;&quot;&quot;)*([.B23:.F23]/[.B$6:.F$6]) / SUM([.B23:.F23]&lt;&gt;&quot;&quot;))" office:value-type="string" office:string-value="" calcext:value-type="error">
            <text:p>#DIV/0!</text:p>
          </table:table-cell>
          <table:table-cell table:style-name="ce201" table:formula="of:=[.G23]*[.H$6]" office:value-type="string" office:string-value="" calcext:value-type="error">
            <text:p>#DIV/0!</text:p>
          </table:table-cell>
          <table:table-cell table:style-name="ce203" table:formula="of:=STDEVP([.B23:.F23])/AVERAGE([.B23:.F23])" office:value-type="string" office:string-value="" calcext:value-type="error">
            <text:p>#DIV/0!</text:p>
          </table:table-cell>
          <table:table-cell table:style-name="ce203" table:formula="of:=IF([.H23]&gt;[.$A$41]; [.$C$41]; IF([.H23]&gt;[.$A$42]; [.$C$42]; IF([.H23]&gt;[.$A$43];[.$C$43];IF([.H23]&gt;[.$A$44];[.$C$44]; IF([.H23]&gt;[.$A$45];[.$C$45];IF([.H23]&gt;[.$A$46];[.$C$46];[.$C$47]))))))/100" office:value-type="string" office:string-value="" calcext:value-type="error">
            <text:p>#DIV/0!</text:p>
          </table:table-cell>
          <table:table-cell table:style-name="ce205" table:formula="of:=(MAX([.B23:.F23])-MIN([.B23:.F23]))/[.H23]*5" office:value-type="string" office:string-value="" calcext:value-type="error">
            <text:p>#DIV/0!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 table:number-columns-repeated="5"/>
          <table:table-cell table:style-name="ce76" table:formula="of:=SUMPRODUCT(([.B24:.F24]&lt;&gt;&quot;&quot;)*([.B24:.F24]/[.B$6:.F$6]) / SUM([.B24:.F24]&lt;&gt;&quot;&quot;))" office:value-type="string" office:string-value="" calcext:value-type="error">
            <text:p>#DIV/0!</text:p>
          </table:table-cell>
          <table:table-cell table:style-name="ce201" table:formula="of:=[.G24]*[.H$6]" office:value-type="string" office:string-value="" calcext:value-type="error">
            <text:p>#DIV/0!</text:p>
          </table:table-cell>
          <table:table-cell table:style-name="ce203" table:formula="of:=STDEVP([.B24:.F24])/AVERAGE([.B24:.F24])" office:value-type="string" office:string-value="" calcext:value-type="error">
            <text:p>#DIV/0!</text:p>
          </table:table-cell>
          <table:table-cell table:style-name="ce203" table:formula="of:=IF([.H24]&gt;[.$A$41]; [.$C$41]; IF([.H24]&gt;[.$A$42]; [.$C$42]; IF([.H24]&gt;[.$A$43];[.$C$43];IF([.H24]&gt;[.$A$44];[.$C$44]; IF([.H24]&gt;[.$A$45];[.$C$45];IF([.H24]&gt;[.$A$46];[.$C$46];[.$C$47]))))))/100" office:value-type="string" office:string-value="" calcext:value-type="error">
            <text:p>#DIV/0!</text:p>
          </table:table-cell>
          <table:table-cell table:style-name="ce205" table:formula="of:=(MAX([.B24:.F24])-MIN([.B24:.F24]))/[.H24]*5" office:value-type="string" office:string-value="" calcext:value-type="error">
            <text:p>#DIV/0!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 table:number-columns-repeated="5"/>
          <table:table-cell table:style-name="ce76" table:formula="of:=SUMPRODUCT(([.B25:.F25]&lt;&gt;&quot;&quot;)*([.B25:.F25]/[.B$6:.F$6]) / SUM([.B25:.F25]&lt;&gt;&quot;&quot;))" office:value-type="string" office:string-value="" calcext:value-type="error">
            <text:p>#DIV/0!</text:p>
          </table:table-cell>
          <table:table-cell table:style-name="ce201" table:formula="of:=[.G25]*[.H$6]" office:value-type="string" office:string-value="" calcext:value-type="error">
            <text:p>#DIV/0!</text:p>
          </table:table-cell>
          <table:table-cell table:style-name="ce203" table:formula="of:=STDEVP([.B25:.F25])/AVERAGE([.B25:.F25])" office:value-type="string" office:string-value="" calcext:value-type="error">
            <text:p>#DIV/0!</text:p>
          </table:table-cell>
          <table:table-cell table:style-name="ce203" table:formula="of:=IF([.H25]&gt;[.$A$41]; [.$C$41]; IF([.H25]&gt;[.$A$42]; [.$C$42]; IF([.H25]&gt;[.$A$43];[.$C$43];IF([.H25]&gt;[.$A$44];[.$C$44]; IF([.H25]&gt;[.$A$45];[.$C$45];IF([.H25]&gt;[.$A$46];[.$C$46];[.$C$47]))))))/100" office:value-type="string" office:string-value="" calcext:value-type="error">
            <text:p>#DIV/0!</text:p>
          </table:table-cell>
          <table:table-cell table:style-name="ce205" table:formula="of:=(MAX([.B25:.F25])-MIN([.B25:.F25]))/[.H25]*5" office:value-type="string" office:string-value="" calcext:value-type="error">
            <text:p>#DIV/0!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 table:number-columns-repeated="5"/>
          <table:table-cell table:style-name="ce76" table:formula="of:=SUMPRODUCT(([.B26:.F26]&lt;&gt;&quot;&quot;)*([.B26:.F26]/[.B$6:.F$6]) / SUM([.B26:.F26]&lt;&gt;&quot;&quot;))" office:value-type="string" office:string-value="" calcext:value-type="error">
            <text:p>#DIV/0!</text:p>
          </table:table-cell>
          <table:table-cell table:style-name="ce201" table:formula="of:=[.G26]*[.H$6]" office:value-type="string" office:string-value="" calcext:value-type="error">
            <text:p>#DIV/0!</text:p>
          </table:table-cell>
          <table:table-cell table:style-name="ce203" table:formula="of:=STDEVP([.B26:.F26])/AVERAGE([.B26:.F26])" office:value-type="string" office:string-value="" calcext:value-type="error">
            <text:p>#DIV/0!</text:p>
          </table:table-cell>
          <table:table-cell table:style-name="ce203" table:formula="of:=IF([.H26]&gt;[.$A$41]; [.$C$41]; IF([.H26]&gt;[.$A$42]; [.$C$42]; IF([.H26]&gt;[.$A$43];[.$C$43];IF([.H26]&gt;[.$A$44];[.$C$44]; IF([.H26]&gt;[.$A$45];[.$C$45];IF([.H26]&gt;[.$A$46];[.$C$46];[.$C$47]))))))/100" office:value-type="string" office:string-value="" calcext:value-type="error">
            <text:p>#DIV/0!</text:p>
          </table:table-cell>
          <table:table-cell table:style-name="ce205" table:formula="of:=(MAX([.B26:.F26])-MIN([.B26:.F26]))/[.H26]*5" office:value-type="string" office:string-value="" calcext:value-type="error">
            <text:p>#DIV/0!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table:number-columns-repeated="5"/>
          <table:table-cell table:style-name="ce76" table:formula="of:=SUMPRODUCT(([.B27:.F27]&lt;&gt;&quot;&quot;)*([.B27:.F27]/[.B$6:.F$6]) / SUM([.B27:.F27]&lt;&gt;&quot;&quot;))" office:value-type="string" office:string-value="" calcext:value-type="error">
            <text:p>#DIV/0!</text:p>
          </table:table-cell>
          <table:table-cell table:style-name="ce201" table:formula="of:=[.G27]*[.H$6]" office:value-type="string" office:string-value="" calcext:value-type="error">
            <text:p>#DIV/0!</text:p>
          </table:table-cell>
          <table:table-cell table:style-name="ce203" table:formula="of:=STDEVP([.B27:.F27])/AVERAGE([.B27:.F27])" office:value-type="string" office:string-value="" calcext:value-type="error">
            <text:p>#DIV/0!</text:p>
          </table:table-cell>
          <table:table-cell table:style-name="ce203" table:formula="of:=IF([.H27]&gt;[.$A$41]; [.$C$41]; IF([.H27]&gt;[.$A$42]; [.$C$42]; IF([.H27]&gt;[.$A$43];[.$C$43];IF([.H27]&gt;[.$A$44];[.$C$44]; IF([.H27]&gt;[.$A$45];[.$C$45];IF([.H27]&gt;[.$A$46];[.$C$46];[.$C$47]))))))/100" office:value-type="string" office:string-value="" calcext:value-type="error">
            <text:p>#DIV/0!</text:p>
          </table:table-cell>
          <table:table-cell table:style-name="ce205" table:formula="of:=(MAX([.B27:.F27])-MIN([.B27:.F27]))/[.H27]*5" office:value-type="string" office:string-value="" calcext:value-type="error">
            <text:p>#DIV/0!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table:number-columns-repeated="5"/>
          <table:table-cell table:style-name="ce76" table:formula="of:=SUMPRODUCT(([.B28:.F28]&lt;&gt;&quot;&quot;)*([.B28:.F28]/[.B$6:.F$6]) / SUM([.B28:.F28]&lt;&gt;&quot;&quot;))" office:value-type="string" office:string-value="" calcext:value-type="error">
            <text:p>#DIV/0!</text:p>
          </table:table-cell>
          <table:table-cell table:style-name="ce201" table:formula="of:=[.G28]*[.H$6]" office:value-type="string" office:string-value="" calcext:value-type="error">
            <text:p>#DIV/0!</text:p>
          </table:table-cell>
          <table:table-cell table:style-name="ce203" table:formula="of:=STDEVP([.B28:.F28])/AVERAGE([.B28:.F28])" office:value-type="string" office:string-value="" calcext:value-type="error">
            <text:p>#DIV/0!</text:p>
          </table:table-cell>
          <table:table-cell table:style-name="ce203" table:formula="of:=IF([.H28]&gt;[.$A$41]; [.$C$41]; IF([.H28]&gt;[.$A$42]; [.$C$42]; IF([.H28]&gt;[.$A$43];[.$C$43];IF([.H28]&gt;[.$A$44];[.$C$44]; IF([.H28]&gt;[.$A$45];[.$C$45];IF([.H28]&gt;[.$A$46];[.$C$46];[.$C$47]))))))/100" office:value-type="string" office:string-value="" calcext:value-type="error">
            <text:p>#DIV/0!</text:p>
          </table:table-cell>
          <table:table-cell table:style-name="ce205" table:formula="of:=(MAX([.B28:.F28])-MIN([.B28:.F28]))/[.H28]*5" office:value-type="string" office:string-value="" calcext:value-type="error">
            <text:p>#DIV/0!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table:number-columns-repeated="5"/>
          <table:table-cell table:style-name="ce76" table:formula="of:=SUMPRODUCT(([.B29:.F29]&lt;&gt;&quot;&quot;)*([.B29:.F29]/[.B$6:.F$6]) / SUM([.B29:.F29]&lt;&gt;&quot;&quot;))" office:value-type="string" office:string-value="" calcext:value-type="error">
            <text:p>#DIV/0!</text:p>
          </table:table-cell>
          <table:table-cell table:style-name="ce201" table:formula="of:=[.G29]*[.H$6]" office:value-type="string" office:string-value="" calcext:value-type="error">
            <text:p>#DIV/0!</text:p>
          </table:table-cell>
          <table:table-cell table:style-name="ce203" table:formula="of:=STDEVP([.B29:.F29])/AVERAGE([.B29:.F29])" office:value-type="string" office:string-value="" calcext:value-type="error">
            <text:p>#DIV/0!</text:p>
          </table:table-cell>
          <table:table-cell table:style-name="ce203" table:formula="of:=IF([.H29]&gt;[.$A$41]; [.$C$41]; IF([.H29]&gt;[.$A$42]; [.$C$42]; IF([.H29]&gt;[.$A$43];[.$C$43];IF([.H29]&gt;[.$A$44];[.$C$44]; IF([.H29]&gt;[.$A$45];[.$C$45];IF([.H29]&gt;[.$A$46];[.$C$46];[.$C$47]))))))/100" office:value-type="string" office:string-value="" calcext:value-type="error">
            <text:p>#DIV/0!</text:p>
          </table:table-cell>
          <table:table-cell table:style-name="ce205" table:formula="of:=(MAX([.B29:.F29])-MIN([.B29:.F29]))/[.H29]*5" office:value-type="string" office:string-value="" calcext:value-type="error">
            <text:p>#DIV/0!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table:number-columns-repeated="5"/>
          <table:table-cell table:style-name="ce76" table:formula="of:=SUMPRODUCT(([.B30:.F30]&lt;&gt;&quot;&quot;)*([.B30:.F30]/[.B$6:.F$6]) / SUM([.B30:.F30]&lt;&gt;&quot;&quot;))" office:value-type="string" office:string-value="" calcext:value-type="error">
            <text:p>#DIV/0!</text:p>
          </table:table-cell>
          <table:table-cell table:style-name="ce201" table:formula="of:=[.G30]*[.H$6]" office:value-type="string" office:string-value="" calcext:value-type="error">
            <text:p>#DIV/0!</text:p>
          </table:table-cell>
          <table:table-cell table:style-name="ce203" table:formula="of:=STDEVP([.B30:.F30])/AVERAGE([.B30:.F30])" office:value-type="string" office:string-value="" calcext:value-type="error">
            <text:p>#DIV/0!</text:p>
          </table:table-cell>
          <table:table-cell table:style-name="ce203" table:formula="of:=IF([.H30]&gt;[.$A$41]; [.$C$41]; IF([.H30]&gt;[.$A$42]; [.$C$42]; IF([.H30]&gt;[.$A$43];[.$C$43];IF([.H30]&gt;[.$A$44];[.$C$44]; IF([.H30]&gt;[.$A$45];[.$C$45];IF([.H30]&gt;[.$A$46];[.$C$46];[.$C$47]))))))/100" office:value-type="string" office:string-value="" calcext:value-type="error">
            <text:p>#DIV/0!</text:p>
          </table:table-cell>
          <table:table-cell table:style-name="ce205" table:formula="of:=(MAX([.B30:.F30])-MIN([.B30:.F30]))/[.H30]*5" office:value-type="string" office:string-value="" calcext:value-type="error">
            <text:p>#DIV/0!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table:number-columns-repeated="5"/>
          <table:table-cell table:style-name="ce76" table:formula="of:=SUMPRODUCT(([.B31:.F31]&lt;&gt;&quot;&quot;)*([.B31:.F31]/[.B$6:.F$6]) / SUM([.B31:.F31]&lt;&gt;&quot;&quot;))" office:value-type="string" office:string-value="" calcext:value-type="error">
            <text:p>#DIV/0!</text:p>
          </table:table-cell>
          <table:table-cell table:style-name="ce201" table:formula="of:=[.G31]*[.H$6]" office:value-type="string" office:string-value="" calcext:value-type="error">
            <text:p>#DIV/0!</text:p>
          </table:table-cell>
          <table:table-cell table:style-name="ce203" table:formula="of:=STDEVP([.B31:.F31])/AVERAGE([.B31:.F31])" office:value-type="string" office:string-value="" calcext:value-type="error">
            <text:p>#DIV/0!</text:p>
          </table:table-cell>
          <table:table-cell table:style-name="ce203" table:formula="of:=IF([.H31]&gt;[.$A$41]; [.$C$41]; IF([.H31]&gt;[.$A$42]; [.$C$42]; IF([.H31]&gt;[.$A$43];[.$C$43];IF([.H31]&gt;[.$A$44];[.$C$44]; IF([.H31]&gt;[.$A$45];[.$C$45];IF([.H31]&gt;[.$A$46];[.$C$46];[.$C$47]))))))/100" office:value-type="string" office:string-value="" calcext:value-type="error">
            <text:p>#DIV/0!</text:p>
          </table:table-cell>
          <table:table-cell table:style-name="ce205" table:formula="of:=(MAX([.B31:.F31])-MIN([.B31:.F31]))/[.H31]*5" office:value-type="string" office:string-value="" calcext:value-type="error">
            <text:p>#DIV/0!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table:number-columns-repeated="5"/>
          <table:table-cell table:style-name="ce76" table:formula="of:=SUMPRODUCT(([.B32:.F32]&lt;&gt;&quot;&quot;)*([.B32:.F32]/[.B$6:.F$6]) / SUM([.B32:.F32]&lt;&gt;&quot;&quot;))" office:value-type="string" office:string-value="" calcext:value-type="error">
            <text:p>#DIV/0!</text:p>
          </table:table-cell>
          <table:table-cell table:style-name="ce201" table:formula="of:=[.G32]*[.H$6]" office:value-type="string" office:string-value="" calcext:value-type="error">
            <text:p>#DIV/0!</text:p>
          </table:table-cell>
          <table:table-cell table:style-name="ce203" table:formula="of:=STDEVP([.B32:.F32])/AVERAGE([.B32:.F32])" office:value-type="string" office:string-value="" calcext:value-type="error">
            <text:p>#DIV/0!</text:p>
          </table:table-cell>
          <table:table-cell table:style-name="ce203" table:formula="of:=IF([.H32]&gt;[.$A$41]; [.$C$41]; IF([.H32]&gt;[.$A$42]; [.$C$42]; IF([.H32]&gt;[.$A$43];[.$C$43];IF([.H32]&gt;[.$A$44];[.$C$44]; IF([.H32]&gt;[.$A$45];[.$C$45];IF([.H32]&gt;[.$A$46];[.$C$46];[.$C$47]))))))/100" office:value-type="string" office:string-value="" calcext:value-type="error">
            <text:p>#DIV/0!</text:p>
          </table:table-cell>
          <table:table-cell table:style-name="ce205" table:formula="of:=(MAX([.B32:.F32])-MIN([.B32:.F32]))/[.H32]*5" office:value-type="string" office:string-value="" calcext:value-type="error">
            <text:p>#DIV/0!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table:number-columns-repeated="5"/>
          <table:table-cell table:style-name="ce76" table:formula="of:=SUMPRODUCT(([.B33:.F33]&lt;&gt;&quot;&quot;)*([.B33:.F33]/[.B$6:.F$6]) / SUM([.B33:.F33]&lt;&gt;&quot;&quot;))" office:value-type="string" office:string-value="" calcext:value-type="error">
            <text:p>#DIV/0!</text:p>
          </table:table-cell>
          <table:table-cell table:style-name="ce201" table:formula="of:=[.G33]*[.H$6]" office:value-type="string" office:string-value="" calcext:value-type="error">
            <text:p>#DIV/0!</text:p>
          </table:table-cell>
          <table:table-cell table:style-name="ce203" table:formula="of:=STDEVP([.B33:.F33])/AVERAGE([.B33:.F33])" office:value-type="string" office:string-value="" calcext:value-type="error">
            <text:p>#DIV/0!</text:p>
          </table:table-cell>
          <table:table-cell table:style-name="ce203" table:formula="of:=IF([.H33]&gt;[.$A$41]; [.$C$41]; IF([.H33]&gt;[.$A$42]; [.$C$42]; IF([.H33]&gt;[.$A$43];[.$C$43];IF([.H33]&gt;[.$A$44];[.$C$44]; IF([.H33]&gt;[.$A$45];[.$C$45];IF([.H33]&gt;[.$A$46];[.$C$46];[.$C$47]))))))/100" office:value-type="string" office:string-value="" calcext:value-type="error">
            <text:p>#DIV/0!</text:p>
          </table:table-cell>
          <table:table-cell table:style-name="ce205" table:formula="of:=(MAX([.B33:.F33])-MIN([.B33:.F33]))/[.H33]*5" office:value-type="string" office:string-value="" calcext:value-type="error">
            <text:p>#DIV/0!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table:number-columns-repeated="5"/>
          <table:table-cell table:style-name="ce76" table:formula="of:=SUMPRODUCT(([.B34:.F34]&lt;&gt;&quot;&quot;)*([.B34:.F34]/[.B$6:.F$6]) / SUM([.B34:.F34]&lt;&gt;&quot;&quot;))" office:value-type="string" office:string-value="" calcext:value-type="error">
            <text:p>#DIV/0!</text:p>
          </table:table-cell>
          <table:table-cell table:style-name="ce201" table:formula="of:=[.G34]*[.H$6]" office:value-type="string" office:string-value="" calcext:value-type="error">
            <text:p>#DIV/0!</text:p>
          </table:table-cell>
          <table:table-cell table:style-name="ce203" table:formula="of:=STDEVP([.B34:.F34])/AVERAGE([.B34:.F34])" office:value-type="string" office:string-value="" calcext:value-type="error">
            <text:p>#DIV/0!</text:p>
          </table:table-cell>
          <table:table-cell table:style-name="ce203" table:formula="of:=IF([.H34]&gt;[.$A$41]; [.$C$41]; IF([.H34]&gt;[.$A$42]; [.$C$42]; IF([.H34]&gt;[.$A$43];[.$C$43];IF([.H34]&gt;[.$A$44];[.$C$44]; IF([.H34]&gt;[.$A$45];[.$C$45];IF([.H34]&gt;[.$A$46];[.$C$46];[.$C$47]))))))/100" office:value-type="string" office:string-value="" calcext:value-type="error">
            <text:p>#DIV/0!</text:p>
          </table:table-cell>
          <table:table-cell table:style-name="ce205" table:formula="of:=(MAX([.B34:.F34])-MIN([.B34:.F34]))/[.H34]*5" office:value-type="string" office:string-value="" calcext:value-type="error">
            <text:p>#DIV/0!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table:number-columns-repeated="5"/>
          <table:table-cell table:style-name="ce76" table:formula="of:=SUMPRODUCT(([.B35:.F35]&lt;&gt;&quot;&quot;)*([.B35:.F35]/[.B$6:.F$6]) / SUM([.B35:.F35]&lt;&gt;&quot;&quot;))" office:value-type="string" office:string-value="" calcext:value-type="error">
            <text:p>#DIV/0!</text:p>
          </table:table-cell>
          <table:table-cell table:style-name="ce201" table:formula="of:=[.G35]*[.H$6]" office:value-type="string" office:string-value="" calcext:value-type="error">
            <text:p>#DIV/0!</text:p>
          </table:table-cell>
          <table:table-cell table:style-name="ce203" table:formula="of:=STDEVP([.B35:.F35])/AVERAGE([.B35:.F35])" office:value-type="string" office:string-value="" calcext:value-type="error">
            <text:p>#DIV/0!</text:p>
          </table:table-cell>
          <table:table-cell table:style-name="ce203" table:formula="of:=IF([.H35]&gt;[.$A$41]; [.$C$41]; IF([.H35]&gt;[.$A$42]; [.$C$42]; IF([.H35]&gt;[.$A$43];[.$C$43];IF([.H35]&gt;[.$A$44];[.$C$44]; IF([.H35]&gt;[.$A$45];[.$C$45];IF([.H35]&gt;[.$A$46];[.$C$46];[.$C$47]))))))/100" office:value-type="string" office:string-value="" calcext:value-type="error">
            <text:p>#DIV/0!</text:p>
          </table:table-cell>
          <table:table-cell table:style-name="ce205" table:formula="of:=(MAX([.B35:.F35])-MIN([.B35:.F35]))/[.H35]*5" office:value-type="string" office:string-value="" calcext:value-type="error">
            <text:p>#DIV/0!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table:number-columns-repeated="5"/>
          <table:table-cell table:style-name="ce76" table:formula="of:=SUMPRODUCT(([.B36:.F36]&lt;&gt;&quot;&quot;)*([.B36:.F36]/[.B$6:.F$6]) / SUM([.B36:.F36]&lt;&gt;&quot;&quot;))" office:value-type="string" office:string-value="" calcext:value-type="error">
            <text:p>#DIV/0!</text:p>
          </table:table-cell>
          <table:table-cell table:style-name="ce201" table:formula="of:=[.G36]*[.H$6]" office:value-type="string" office:string-value="" calcext:value-type="error">
            <text:p>#DIV/0!</text:p>
          </table:table-cell>
          <table:table-cell table:style-name="ce203" table:formula="of:=STDEVP([.B36:.F36])/AVERAGE([.B36:.F36])" office:value-type="string" office:string-value="" calcext:value-type="error">
            <text:p>#DIV/0!</text:p>
          </table:table-cell>
          <table:table-cell table:style-name="ce203" table:formula="of:=IF([.H36]&gt;[.$A$41]; [.$C$41]; IF([.H36]&gt;[.$A$42]; [.$C$42]; IF([.H36]&gt;[.$A$43];[.$C$43];IF([.H36]&gt;[.$A$44];[.$C$44]; IF([.H36]&gt;[.$A$45];[.$C$45];IF([.H36]&gt;[.$A$46];[.$C$46];[.$C$47]))))))/100" office:value-type="string" office:string-value="" calcext:value-type="error">
            <text:p>#DIV/0!</text:p>
          </table:table-cell>
          <table:table-cell table:style-name="ce205" table:formula="of:=(MAX([.B36:.F36])-MIN([.B36:.F36]))/[.H36]*5" office:value-type="string" office:string-value="" calcext:value-type="error">
            <text:p>#DIV/0!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2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2" table:number-rows-repeated="11">
          <table:table-cell table:number-columns-repeated="49"/>
        </table:table-row>
        <table:table-row table:style-name="ro2" table:number-rows-repeated="3">
          <table:table-cell table:number-columns-repeated="8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8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121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28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2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2">
          <table:table-cell table:number-columns-repeated="10"/>
          <table:table-cell table:style-name="ce3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AnnexE_DATA.H7:AnnexE_DATA.H36">
            <calcext:condition calcext:apply-style-name="Good" calcext:value="&gt;1000" calcext:base-cell-address="AnnexE_DATA.H7"/>
          </calcext:conditional-format>
          <calcext:conditional-format calcext:target-range-address="AnnexE_DATA.K7:AnnexE_DATA.K36">
            <calcext:condition calcext:apply-style-name="Good" calcext:value="&lt;[.J7]" calcext:base-cell-address="AnnexE_DATA.K7"/>
          </calcext:conditional-format>
        </calcext:conditional-formats>
      </table:table>
      <table:table table:name="6 - BOTTLE 1" table:style-name="ta1">
        <table:table-column table:style-name="co4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2mgl MTD – NOT FOR CAL</text:p>
          </table:table-cell>
          <table:table-cell table:number-columns-repeated="34"/>
        </table:table-row>
        <table:table-row table:style-name="ro2">
          <table:table-cell table:number-columns-repeated="14"/>
          <table:table-cell table:style-name="ce55" office:value-type="date" office:date-value="2025-05-15" calcext:value-type="date">
            <text:p>2025-05-1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BEFORE calibration with 50% 34D</text:p>
          </table:table-cell>
          <table:table-cell table:number-columns-repeated="34"/>
        </table:table-row>
        <table:table-row table:style-name="ro2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office:value-type="float" office:value="7.477761" calcext:value-type="float">
            <text:p>7.477761</text:p>
          </table:table-cell>
          <table:table-cell office:value-type="float" office:value="7.824255" calcext:value-type="float">
            <text:p>7.824255</text:p>
          </table:table-cell>
          <table:table-cell office:value-type="float" office:value="7.792676" calcext:value-type="float">
            <text:p>7.792676</text:p>
          </table:table-cell>
          <table:table-cell office:value-type="float" office:value="7.838814" calcext:value-type="float">
            <text:p>7.838814</text:p>
          </table:table-cell>
          <table:table-cell office:value-type="float" office:value="7.833295" calcext:value-type="float">
            <text:p>7.833295</text:p>
          </table:table-cell>
          <table:table-cell table:style-name="ce194"/>
          <table:table-cell table:style-name="ce200" table:formula="of:=SUM([.B8:.F8])" office:value-type="float" office:value="38.766801" calcext:value-type="float">
            <text:p>38.8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 office:value-type="float" office:value="33258" calcext:value-type="float">
            <text:p>33258</text:p>
          </table:table-cell>
          <table:table-cell office:value-type="float" office:value="34181" calcext:value-type="float">
            <text:p>34181</text:p>
          </table:table-cell>
          <table:table-cell office:value-type="float" office:value="33852" calcext:value-type="float">
            <text:p>33852</text:p>
          </table:table-cell>
          <table:table-cell office:value-type="float" office:value="33986" calcext:value-type="float">
            <text:p>33986</text:p>
          </table:table-cell>
          <table:table-cell office:value-type="float" office:value="33822" calcext:value-type="float">
            <text:p>33822</text:p>
          </table:table-cell>
          <table:table-cell table:style-name="ce76" table:formula="of:=SUMPRODUCT(([.B9:.F9]&lt;&gt;&quot;&quot;)*([.B9:.F9]/[.B$8:.F$8]) / SUM([.B9:.F9]&lt;&gt;&quot;&quot;))" office:value-type="float" office:value="4362.71798230223" calcext:value-type="float">
            <text:p>4362.7</text:p>
          </table:table-cell>
          <table:table-cell table:style-name="ce268" table:formula="of:=[.G9]*[.H$8]" office:value-type="float" office:value="169128.619839032" calcext:value-type="float">
            <text:p>169129</text:p>
          </table:table-cell>
          <table:table-cell table:style-name="ce203" table:formula="of:=STDEVP([.B9:.F9])/AVERAGE([.B9:.F9])" office:value-type="percentage" office:value="0.00911120672885289" calcext:value-type="percentage">
            <text:p>0.9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73" table:formula="of:=(MAX([.B9:.F9])-MIN([.B9:.F9]))/[.H9]*5" office:value-type="percentage" office:value="0.0272869252075274" calcext:value-type="percentage">
            <text:p>2.7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 office:value-type="float" office:value="28609" calcext:value-type="float">
            <text:p>28609</text:p>
          </table:table-cell>
          <table:table-cell office:value-type="float" office:value="29564" calcext:value-type="float">
            <text:p>29564</text:p>
          </table:table-cell>
          <table:table-cell office:value-type="float" office:value="29128" calcext:value-type="float">
            <text:p>29128</text:p>
          </table:table-cell>
          <table:table-cell office:value-type="float" office:value="29242" calcext:value-type="float">
            <text:p>29242</text:p>
          </table:table-cell>
          <table:table-cell office:value-type="float" office:value="29150" calcext:value-type="float">
            <text:p>29150</text:p>
          </table:table-cell>
          <table:table-cell table:style-name="ce76" table:formula="of:=SUMPRODUCT(([.B10:.F10]&lt;&gt;&quot;&quot;)*([.B10:.F10]/[.B$8:.F$8]) / SUM([.B10:.F10]&lt;&gt;&quot;&quot;))" office:value-type="float" office:value="3758.79186723397" calcext:value-type="float">
            <text:p>3758.8</text:p>
          </table:table-cell>
          <table:table-cell table:style-name="ce268" table:formula="of:=[.G10]*[.H$8]" office:value-type="float" office:value="145716.336317478" calcext:value-type="float">
            <text:p>145716</text:p>
          </table:table-cell>
          <table:table-cell table:style-name="ce203" table:formula="of:=STDEVP([.B10:.F10])/AVERAGE([.B10:.F10])" office:value-type="percentage" office:value="0.0105484794346564" calcext:value-type="percentage">
            <text:p>1.1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73" table:formula="of:=(MAX([.B10:.F10])-MIN([.B10:.F10]))/[.H10]*5" office:value-type="percentage" office:value="0.032769146690571" calcext:value-type="percentage">
            <text:p>3.3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office:value-type="float" office:value="24519" calcext:value-type="float">
            <text:p>24519</text:p>
          </table:table-cell>
          <table:table-cell office:value-type="float" office:value="25362" calcext:value-type="float">
            <text:p>25362</text:p>
          </table:table-cell>
          <table:table-cell office:value-type="float" office:value="24963" calcext:value-type="float">
            <text:p>24963</text:p>
          </table:table-cell>
          <table:table-cell office:value-type="float" office:value="25072" calcext:value-type="float">
            <text:p>25072</text:p>
          </table:table-cell>
          <table:table-cell office:value-type="float" office:value="24897" calcext:value-type="float">
            <text:p>24897</text:p>
          </table:table-cell>
          <table:table-cell table:style-name="ce76" table:formula="of:=SUMPRODUCT(([.B11:.F11]&lt;&gt;&quot;&quot;)*([.B11:.F11]/[.B$8:.F$8]) / SUM([.B11:.F11]&lt;&gt;&quot;&quot;))" office:value-type="float" office:value="3220.11459214698" calcext:value-type="float">
            <text:p>3220.1</text:p>
          </table:table-cell>
          <table:table-cell table:style-name="ce266" table:formula="of:=[.G11]*[.H$8]" office:value-type="float" office:value="124833.541590958" calcext:value-type="float">
            <text:p>124834</text:p>
          </table:table-cell>
          <table:table-cell table:style-name="ce203" table:formula="of:=STDEVP([.B11:.F11])/AVERAGE([.B11:.F11])" office:value-type="percentage" office:value="0.0109353071541711" calcext:value-type="percentage">
            <text:p>1.1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73" table:formula="of:=(MAX([.B11:.F11])-MIN([.B11:.F11]))/[.H11]*5" office:value-type="percentage" office:value="0.033764963697107" calcext:value-type="percentage">
            <text:p>3.4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office:value-type="float" office:value="21020" calcext:value-type="float">
            <text:p>21020</text:p>
          </table:table-cell>
          <table:table-cell office:value-type="float" office:value="21622" calcext:value-type="float">
            <text:p>21622</text:p>
          </table:table-cell>
          <table:table-cell office:value-type="float" office:value="21302" calcext:value-type="float">
            <text:p>21302</text:p>
          </table:table-cell>
          <table:table-cell office:value-type="float" office:value="21242" calcext:value-type="float">
            <text:p>21242</text:p>
          </table:table-cell>
          <table:table-cell office:value-type="float" office:value="21084" calcext:value-type="float">
            <text:p>21084</text:p>
          </table:table-cell>
          <table:table-cell table:style-name="ce76" table:formula="of:=SUMPRODUCT(([.B12:.F12]&lt;&gt;&quot;&quot;)*([.B12:.F12]/[.B$8:.F$8]) / SUM([.B12:.F12]&lt;&gt;&quot;&quot;))" office:value-type="float" office:value="2741.89772061407" calcext:value-type="float">
            <text:p>2741.9</text:p>
          </table:table-cell>
          <table:table-cell table:style-name="ce266" table:formula="of:=[.G12]*[.H$8]" office:value-type="float" office:value="106294.603297399" calcext:value-type="float">
            <text:p>106295</text:p>
          </table:table-cell>
          <table:table-cell table:style-name="ce203" table:formula="of:=STDEVP([.B12:.F12])/AVERAGE([.B12:.F12])" office:value-type="percentage" office:value="0.00990349838051987" calcext:value-type="percentage">
            <text:p>1.0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73" table:formula="of:=(MAX([.B12:.F12])-MIN([.B12:.F12]))/[.H12]*5" office:value-type="percentage" office:value="0.0283175241886776" calcext:value-type="percentage">
            <text:p>2.8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office:value-type="float" office:value="17856" calcext:value-type="float">
            <text:p>17856</text:p>
          </table:table-cell>
          <table:table-cell office:value-type="float" office:value="18447" calcext:value-type="float">
            <text:p>18447</text:p>
          </table:table-cell>
          <table:table-cell office:value-type="float" office:value="18060" calcext:value-type="float">
            <text:p>18060</text:p>
          </table:table-cell>
          <table:table-cell office:value-type="float" office:value="18020" calcext:value-type="float">
            <text:p>18020</text:p>
          </table:table-cell>
          <table:table-cell office:value-type="float" office:value="17819" calcext:value-type="float">
            <text:p>17819</text:p>
          </table:table-cell>
          <table:table-cell table:style-name="ce76" table:formula="of:=SUMPRODUCT(([.B13:.F13]&lt;&gt;&quot;&quot;)*([.B13:.F13]/[.B$8:.F$8]) / SUM([.B13:.F13]&lt;&gt;&quot;&quot;))" office:value-type="float" office:value="2327.34081565893" calcext:value-type="float">
            <text:p>2327.3</text:p>
          </table:table-cell>
          <table:table-cell table:style-name="ce266" table:formula="of:=[.G13]*[.H$8]" office:value-type="float" office:value="90223.5582598276" calcext:value-type="float">
            <text:p>90224</text:p>
          </table:table-cell>
          <table:table-cell table:style-name="ce203" table:formula="of:=STDEVP([.B13:.F13])/AVERAGE([.B13:.F13])" office:value-type="percentage" office:value="0.0123735722177619" calcext:value-type="percentage">
            <text:p>1.2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73" table:formula="of:=(MAX([.B13:.F13])-MIN([.B13:.F13]))/[.H13]*5" office:value-type="percentage" office:value="0.0348024403000973" calcext:value-type="percentage">
            <text:p>3.5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office:value-type="float" office:value="15214" calcext:value-type="float">
            <text:p>15214</text:p>
          </table:table-cell>
          <table:table-cell office:value-type="float" office:value="15648" calcext:value-type="float">
            <text:p>15648</text:p>
          </table:table-cell>
          <table:table-cell office:value-type="float" office:value="15267" calcext:value-type="float">
            <text:p>15267</text:p>
          </table:table-cell>
          <table:table-cell office:value-type="float" office:value="15160" calcext:value-type="float">
            <text:p>15160</text:p>
          </table:table-cell>
          <table:table-cell office:value-type="float" office:value="14867" calcext:value-type="float">
            <text:p>14867</text:p>
          </table:table-cell>
          <table:table-cell table:style-name="ce76" table:formula="of:=SUMPRODUCT(([.B14:.F14]&lt;&gt;&quot;&quot;)*([.B14:.F14]/[.B$8:.F$8]) / SUM([.B14:.F14]&lt;&gt;&quot;&quot;))" office:value-type="float" office:value="1965.1077081957" calcext:value-type="float">
            <text:p>1965.1</text:p>
          </table:table-cell>
          <table:table-cell table:style-name="ce266" table:formula="of:=[.G14]*[.H$8]" office:value-type="float" office:value="76180.9394671889" calcext:value-type="float">
            <text:p>76181</text:p>
          </table:table-cell>
          <table:table-cell table:style-name="ce203" table:formula="of:=STDEVP([.B14:.F14])/AVERAGE([.B14:.F14])" office:value-type="percentage" office:value="0.0164270862817666" calcext:value-type="percentage">
            <text:p>1.6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73" table:formula="of:=(MAX([.B14:.F14])-MIN([.B14:.F14]))/[.H14]*5" office:value-type="percentage" office:value="0.0512595411307822" calcext:value-type="percentage">
            <text:p>5.1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office:value-type="float" office:value="12813" calcext:value-type="float">
            <text:p>12813</text:p>
          </table:table-cell>
          <table:table-cell office:value-type="float" office:value="13120" calcext:value-type="float">
            <text:p>13120</text:p>
          </table:table-cell>
          <table:table-cell office:value-type="float" office:value="12759" calcext:value-type="float">
            <text:p>12759</text:p>
          </table:table-cell>
          <table:table-cell office:value-type="float" office:value="12594" calcext:value-type="float">
            <text:p>12594</text:p>
          </table:table-cell>
          <table:table-cell office:value-type="float" office:value="12465" calcext:value-type="float">
            <text:p>12465</text:p>
          </table:table-cell>
          <table:table-cell table:style-name="ce76" table:formula="of:=SUMPRODUCT(([.B15:.F15]&lt;&gt;&quot;&quot;)*([.B15:.F15]/[.B$8:.F$8]) / SUM([.B15:.F15]&lt;&gt;&quot;&quot;))" office:value-type="float" office:value="1645.10587465847" calcext:value-type="float">
            <text:p>1645.1</text:p>
          </table:table-cell>
          <table:table-cell table:style-name="ce266" table:formula="of:=[.G15]*[.H$8]" office:value-type="float" office:value="63775.492066816" calcext:value-type="float">
            <text:p>63775</text:p>
          </table:table-cell>
          <table:table-cell table:style-name="ce203" table:formula="of:=STDEVP([.B15:.F15])/AVERAGE([.B15:.F15])" office:value-type="percentage" office:value="0.0174146991524712" calcext:value-type="percentage">
            <text:p>1.7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73" table:formula="of:=(MAX([.B15:.F15])-MIN([.B15:.F15]))/[.H15]*5" office:value-type="percentage" office:value="0.0513520146041188" calcext:value-type="percentage">
            <text:p>5.1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4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 office:value-type="float" office:value="10727" calcext:value-type="float">
            <text:p>10727</text:p>
          </table:table-cell>
          <table:table-cell office:value-type="float" office:value="11007" calcext:value-type="float">
            <text:p>11007</text:p>
          </table:table-cell>
          <table:table-cell office:value-type="float" office:value="10708" calcext:value-type="float">
            <text:p>10708</text:p>
          </table:table-cell>
          <table:table-cell office:value-type="float" office:value="10408" calcext:value-type="float">
            <text:p>10408</text:p>
          </table:table-cell>
          <table:table-cell office:value-type="float" office:value="10357" calcext:value-type="float">
            <text:p>10357</text:p>
          </table:table-cell>
          <table:table-cell table:style-name="ce76" table:formula="of:=SUMPRODUCT(([.B16:.F16]&lt;&gt;&quot;&quot;)*([.B16:.F16]/[.B$8:.F$8]) / SUM([.B16:.F16]&lt;&gt;&quot;&quot;))" office:value-type="float" office:value="1373.06778744164" calcext:value-type="float">
            <text:p>1373.1</text:p>
          </table:table-cell>
          <table:table-cell table:style-name="ce266" table:formula="of:=[.G16]*[.H$8]" office:value-type="float" office:value="53229.4456752603" calcext:value-type="float">
            <text:p>53229</text:p>
          </table:table-cell>
          <table:table-cell table:style-name="ce203" table:formula="of:=STDEVP([.B16:.F16])/AVERAGE([.B16:.F16])" office:value-type="percentage" office:value="0.0222691343797985" calcext:value-type="percentage">
            <text:p>2.2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73" table:formula="of:=(MAX([.B16:.F16])-MIN([.B16:.F16]))/[.H16]*5" office:value-type="percentage" office:value="0.0610564314313444" calcext:value-type="percentage">
            <text:p>6.1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 office:value-type="float" office:value="8976" calcext:value-type="float">
            <text:p>8976</text:p>
          </table:table-cell>
          <table:table-cell office:value-type="float" office:value="9211" calcext:value-type="float">
            <text:p>9211</text:p>
          </table:table-cell>
          <table:table-cell office:value-type="float" office:value="8910" calcext:value-type="float">
            <text:p>8910</text:p>
          </table:table-cell>
          <table:table-cell office:value-type="float" office:value="8667" calcext:value-type="float">
            <text:p>8667</text:p>
          </table:table-cell>
          <table:table-cell office:value-type="float" office:value="8486" calcext:value-type="float">
            <text:p>8486</text:p>
          </table:table-cell>
          <table:table-cell table:style-name="ce76" table:formula="of:=SUMPRODUCT(([.B17:.F17]&lt;&gt;&quot;&quot;)*([.B17:.F17]/[.B$8:.F$8]) / SUM([.B17:.F17]&lt;&gt;&quot;&quot;))" office:value-type="float" office:value="1141.99073765824" calcext:value-type="float">
            <text:p>1142.0</text:p>
          </table:table-cell>
          <table:table-cell table:style-name="ce266" table:formula="of:=[.G17]*[.H$8]" office:value-type="float" office:value="44271.3276706403" calcext:value-type="float">
            <text:p>44271</text:p>
          </table:table-cell>
          <table:table-cell table:style-name="ce203" table:formula="of:=STDEVP([.B17:.F17])/AVERAGE([.B17:.F17])" office:value-type="percentage" office:value="0.0283965391067427" calcext:value-type="percentage">
            <text:p>2.8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style-name="ce273" table:formula="of:=(MAX([.B17:.F17])-MIN([.B17:.F17]))/[.H17]*5" office:value-type="percentage" office:value="0.0818814386360502" calcext:value-type="percentage">
            <text:p>8.2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 office:value-type="float" office:value="7554" calcext:value-type="float">
            <text:p>7554</text:p>
          </table:table-cell>
          <table:table-cell office:value-type="float" office:value="7668" calcext:value-type="float">
            <text:p>7668</text:p>
          </table:table-cell>
          <table:table-cell office:value-type="float" office:value="7342" calcext:value-type="float">
            <text:p>7342</text:p>
          </table:table-cell>
          <table:table-cell office:value-type="float" office:value="7155" calcext:value-type="float">
            <text:p>7155</text:p>
          </table:table-cell>
          <table:table-cell office:value-type="float" office:value="6944" calcext:value-type="float">
            <text:p>6944</text:p>
          </table:table-cell>
          <table:table-cell table:style-name="ce76" table:formula="of:=SUMPRODUCT(([.B18:.F18]&lt;&gt;&quot;&quot;)*([.B18:.F18]/[.B$8:.F$8]) / SUM([.B18:.F18]&lt;&gt;&quot;&quot;))" office:value-type="float" office:value="946.325922997898" calcext:value-type="float">
            <text:p>946.3</text:p>
          </table:table-cell>
          <table:table-cell table:style-name="ce266" table:formula="of:=[.G18]*[.H$8]" office:value-type="float" office:value="36686.0287380008" calcext:value-type="float">
            <text:p>36686</text:p>
          </table:table-cell>
          <table:table-cell table:style-name="ce203" table:formula="of:=STDEVP([.B18:.F18])/AVERAGE([.B18:.F18])" office:value-type="percentage" office:value="0.0357792841691719" calcext:value-type="percentage">
            <text:p>3.6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style-name="ce273" table:formula="of:=(MAX([.B18:.F18])-MIN([.B18:.F18]))/[.H18]*5" office:value-type="percentage" office:value="0.0986751666650215" calcext:value-type="percentage">
            <text:p>9.9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 office:value-type="float" office:value="6350" calcext:value-type="float">
            <text:p>6350</text:p>
          </table:table-cell>
          <table:table-cell office:value-type="float" office:value="6402" calcext:value-type="float">
            <text:p>6402</text:p>
          </table:table-cell>
          <table:table-cell office:value-type="float" office:value="6166" calcext:value-type="float">
            <text:p>6166</text:p>
          </table:table-cell>
          <table:table-cell office:value-type="float" office:value="5910" calcext:value-type="float">
            <text:p>5910</text:p>
          </table:table-cell>
          <table:table-cell/>
          <table:table-cell table:style-name="ce76" table:formula="of:=SUMPRODUCT(([.B19:.F19]&lt;&gt;&quot;&quot;)*([.B19:.F19]/[.B$8:.F$8]) / SUM([.B19:.F19]&lt;&gt;&quot;&quot;))" office:value-type="float" office:value="803.151476988466" calcext:value-type="float">
            <text:p>803.2</text:p>
          </table:table-cell>
          <table:table-cell table:style-name="ce266" table:formula="of:=[.G19]*[.H$8]" office:value-type="float" office:value="31135.6134812679" calcext:value-type="float">
            <text:p>31136</text:p>
          </table:table-cell>
          <table:table-cell table:style-name="ce203" table:formula="of:=STDEVP([.B19:.F19])/AVERAGE([.B19:.F19])" office:value-type="percentage" office:value="0.0310279101964882" calcext:value-type="percentage">
            <text:p>3.1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style-name="ce273" table:formula="of:=(MAX([.B19:.F19])-MIN([.B19:.F19]))/[.H19]*5" office:value-type="percentage" office:value="0.0790092028050132" calcext:value-type="percentage">
            <text:p>7.9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 office:value-type="float" office:value="5384" calcext:value-type="float">
            <text:p>5384</text:p>
          </table:table-cell>
          <table:table-cell office:value-type="float" office:value="5344" calcext:value-type="float">
            <text:p>5344</text:p>
          </table:table-cell>
          <table:table-cell office:value-type="float" office:value="5133" calcext:value-type="float">
            <text:p>5133</text:p>
          </table:table-cell>
          <table:table-cell office:value-type="float" office:value="4881" calcext:value-type="float">
            <text:p>4881</text:p>
          </table:table-cell>
          <table:table-cell/>
          <table:table-cell table:style-name="ce76" table:formula="of:=SUMPRODUCT(([.B20:.F20]&lt;&gt;&quot;&quot;)*([.B20:.F20]/[.B$8:.F$8]) / SUM([.B20:.F20]&lt;&gt;&quot;&quot;))" office:value-type="float" office:value="671.093021615478" calcext:value-type="float">
            <text:p>671.1</text:p>
          </table:table-cell>
          <table:table-cell table:style-name="ce266" table:formula="of:=[.G20]*[.H$8]" office:value-type="float" office:value="26016.1296214559" calcext:value-type="float">
            <text:p>26016</text:p>
          </table:table-cell>
          <table:table-cell table:style-name="ce203" table:formula="of:=STDEVP([.B20:.F20])/AVERAGE([.B20:.F20])" office:value-type="percentage" office:value="0.0385692074050764" calcext:value-type="percentage">
            <text:p>3.9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style-name="ce273" table:formula="of:=(MAX([.B20:.F20])-MIN([.B20:.F20]))/[.H20]*5" office:value-type="percentage" office:value="0.096670797562672" calcext:value-type="percentage">
            <text:p>9.7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 office:value-type="float" office:value="4509" calcext:value-type="float">
            <text:p>4509</text:p>
          </table:table-cell>
          <table:table-cell office:value-type="float" office:value="4523" calcext:value-type="float">
            <text:p>4523</text:p>
          </table:table-cell>
          <table:table-cell office:value-type="float" office:value="4243" calcext:value-type="float">
            <text:p>4243</text:p>
          </table:table-cell>
          <table:table-cell office:value-type="float" office:value="4044" calcext:value-type="float">
            <text:p>4044</text:p>
          </table:table-cell>
          <table:table-cell office:value-type="float" office:value="3817" calcext:value-type="float">
            <text:p>3817</text:p>
          </table:table-cell>
          <table:table-cell table:style-name="ce76" table:formula="of:=SUMPRODUCT(([.B21:.F21]&lt;&gt;&quot;&quot;)*([.B21:.F21]/[.B$8:.F$8]) / SUM([.B21:.F21]&lt;&gt;&quot;&quot;))" office:value-type="float" office:value="545.744230481524" calcext:value-type="float">
            <text:p>545.7</text:p>
          </table:table-cell>
          <table:table-cell table:style-name="ce266" table:formula="of:=[.G21]*[.H$8]" office:value-type="float" office:value="21156.7579799754" calcext:value-type="float">
            <text:p>21157</text:p>
          </table:table-cell>
          <table:table-cell table:style-name="ce203" table:formula="of:=STDEVP([.B21:.F21])/AVERAGE([.B21:.F21])" office:value-type="percentage" office:value="0.0642638055661384" calcext:value-type="percentage">
            <text:p>6.4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style-name="ce273" table:formula="of:=(MAX([.B21:.F21])-MIN([.B21:.F21]))/[.H21]*5" office:value-type="percentage" office:value="0.166849760409469" calcext:value-type="percentage">
            <text:p>16.7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 office:value-type="float" office:value="3802" calcext:value-type="float">
            <text:p>3802</text:p>
          </table:table-cell>
          <table:table-cell office:value-type="float" office:value="3767" calcext:value-type="float">
            <text:p>3767</text:p>
          </table:table-cell>
          <table:table-cell office:value-type="float" office:value="3511" calcext:value-type="float">
            <text:p>3511</text:p>
          </table:table-cell>
          <table:table-cell office:value-type="float" office:value="3263" calcext:value-type="float">
            <text:p>3263</text:p>
          </table:table-cell>
          <table:table-cell office:value-type="float" office:value="3132" calcext:value-type="float">
            <text:p>3132</text:p>
          </table:table-cell>
          <table:table-cell table:style-name="ce76" table:formula="of:=SUMPRODUCT(([.B22:.F22]&lt;&gt;&quot;&quot;)*([.B22:.F22]/[.B$8:.F$8]) / SUM([.B22:.F22]&lt;&gt;&quot;&quot;))" office:value-type="float" office:value="451.30750121098" calcext:value-type="float">
            <text:p>451.3</text:p>
          </table:table-cell>
          <table:table-cell table:style-name="ce266" table:formula="of:=[.G22]*[.H$8]" office:value-type="float" office:value="17495.7480892533" calcext:value-type="float">
            <text:p>17496</text:p>
          </table:table-cell>
          <table:table-cell table:style-name="ce203" table:formula="of:=STDEVP([.B22:.F22])/AVERAGE([.B22:.F22])" office:value-type="percentage" office:value="0.0761412044680194" calcext:value-type="percentage">
            <text:p>7.6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style-name="ce273" table:formula="of:=(MAX([.B22:.F22])-MIN([.B22:.F22]))/[.H22]*5" office:value-type="percentage" office:value="0.191475093428998" calcext:value-type="percentage">
            <text:p>19.1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 office:value-type="float" office:value="3161" calcext:value-type="float">
            <text:p>3161</text:p>
          </table:table-cell>
          <table:table-cell office:value-type="float" office:value="3078" calcext:value-type="float">
            <text:p>3078</text:p>
          </table:table-cell>
          <table:table-cell office:value-type="float" office:value="2842" calcext:value-type="float">
            <text:p>2842</text:p>
          </table:table-cell>
          <table:table-cell office:value-type="float" office:value="2619" calcext:value-type="float">
            <text:p>2619</text:p>
          </table:table-cell>
          <table:table-cell office:value-type="float" office:value="2457" calcext:value-type="float">
            <text:p>2457</text:p>
          </table:table-cell>
          <table:table-cell table:style-name="ce76" table:formula="of:=SUMPRODUCT(([.B23:.F23]&lt;&gt;&quot;&quot;)*([.B23:.F23]/[.B$8:.F$8]) / SUM([.B23:.F23]&lt;&gt;&quot;&quot;))" office:value-type="float" office:value="365.716279307573" calcext:value-type="float">
            <text:p>365.7</text:p>
          </table:table-cell>
          <table:table-cell table:style-name="ce266" table:formula="of:=[.G23]*[.H$8]" office:value-type="float" office:value="14177.6502223771" calcext:value-type="float">
            <text:p>14178</text:p>
          </table:table-cell>
          <table:table-cell table:style-name="ce203" table:formula="of:=STDEVP([.B23:.F23])/AVERAGE([.B23:.F23])" office:value-type="percentage" office:value="0.0940883137834752" calcext:value-type="percentage">
            <text:p>9.4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style-name="ce273" table:formula="of:=(MAX([.B23:.F23])-MIN([.B23:.F23]))/[.H23]*5" office:value-type="percentage" office:value="0.248278095790814" calcext:value-type="percentage">
            <text:p>24.8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 office:value-type="float" office:value="2604" calcext:value-type="float">
            <text:p>2604</text:p>
          </table:table-cell>
          <table:table-cell office:value-type="float" office:value="2444" calcext:value-type="float">
            <text:p>2444</text:p>
          </table:table-cell>
          <table:table-cell office:value-type="float" office:value="2242" calcext:value-type="float">
            <text:p>2242</text:p>
          </table:table-cell>
          <table:table-cell office:value-type="float" office:value="2014" calcext:value-type="float">
            <text:p>2014</text:p>
          </table:table-cell>
          <table:table-cell office:value-type="float" office:value="1938" calcext:value-type="float">
            <text:p>1938</text:p>
          </table:table-cell>
          <table:table-cell table:style-name="ce76" table:formula="of:=SUMPRODUCT(([.B24:.F24]&lt;&gt;&quot;&quot;)*([.B24:.F24]/[.B$8:.F$8]) / SUM([.B24:.F24]&lt;&gt;&quot;&quot;))" office:value-type="float" office:value="290.52654414869" calcext:value-type="float">
            <text:p>290.5</text:p>
          </table:table-cell>
          <table:table-cell table:style-name="ce266" table:formula="of:=[.G24]*[.H$8]" office:value-type="float" office:value="11262.78472223" calcext:value-type="float">
            <text:p>11263</text:p>
          </table:table-cell>
          <table:table-cell table:style-name="ce203" table:formula="of:=STDEVP([.B24:.F24])/AVERAGE([.B24:.F24])" office:value-type="percentage" office:value="0.111818753446721" calcext:value-type="percentage">
            <text:p>11.2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" calcext:value-type="percentage">
            <text:p>11.0%</text:p>
          </table:table-cell>
          <table:table-cell table:style-name="ce273" table:formula="of:=(MAX([.B24:.F24])-MIN([.B24:.F24]))/[.H24]*5" office:value-type="percentage" office:value="0.295664001588115" calcext:value-type="percentage">
            <text:p>29.6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 office:value-type="float" office:value="2039" calcext:value-type="float">
            <text:p>2039</text:p>
          </table:table-cell>
          <table:table-cell office:value-type="float" office:value="1902" calcext:value-type="float">
            <text:p>1902</text:p>
          </table:table-cell>
          <table:table-cell office:value-type="float" office:value="1710" calcext:value-type="float">
            <text:p>1710</text:p>
          </table:table-cell>
          <table:table-cell office:value-type="float" office:value="1479" calcext:value-type="float">
            <text:p>1479</text:p>
          </table:table-cell>
          <table:table-cell office:value-type="float" office:value="1441" calcext:value-type="float">
            <text:p>1441</text:p>
          </table:table-cell>
          <table:table-cell table:style-name="ce76" table:formula="of:=SUMPRODUCT(([.B25:.F25]&lt;&gt;&quot;&quot;)*([.B25:.F25]/[.B$8:.F$8]) / SUM([.B25:.F25]&lt;&gt;&quot;&quot;))" office:value-type="float" office:value="221.567420601303" calcext:value-type="float">
            <text:p>221.6</text:p>
          </table:table-cell>
          <table:table-cell table:style-name="ce266" table:formula="of:=[.G25]*[.H$8]" office:value-type="float" office:value="8589.46010253401" calcext:value-type="float">
            <text:p>8589</text:p>
          </table:table-cell>
          <table:table-cell table:style-name="ce203" table:formula="of:=STDEVP([.B25:.F25])/AVERAGE([.B25:.F25])" office:value-type="percentage" office:value="0.135746536274734" calcext:value-type="percentage">
            <text:p>13.6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3" calcext:value-type="percentage">
            <text:p>11.3%</text:p>
          </table:table-cell>
          <table:table-cell table:style-name="ce273" table:formula="of:=(MAX([.B25:.F25])-MIN([.B25:.F25]))/[.H25]*5" office:value-type="percentage" office:value="0.348101040613473" calcext:value-type="percentage">
            <text:p>34.8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 office:value-type="float" office:value="1550" calcext:value-type="float">
            <text:p>1550</text:p>
          </table:table-cell>
          <table:table-cell office:value-type="float" office:value="1394" calcext:value-type="float">
            <text:p>1394</text:p>
          </table:table-cell>
          <table:table-cell office:value-type="float" office:value="1226" calcext:value-type="float">
            <text:p>1226</text:p>
          </table:table-cell>
          <table:table-cell office:value-type="float" office:value="1071" calcext:value-type="float">
            <text:p>1071</text:p>
          </table:table-cell>
          <table:table-cell office:value-type="float" office:value="1041" calcext:value-type="float">
            <text:p>1041</text:p>
          </table:table-cell>
          <table:table-cell table:style-name="ce76" table:formula="of:=SUMPRODUCT(([.B26:.F26]&lt;&gt;&quot;&quot;)*([.B26:.F26]/[.B$8:.F$8]) / SUM([.B26:.F26]&lt;&gt;&quot;&quot;))" office:value-type="float" office:value="162.458903330007" calcext:value-type="float">
            <text:p>162.5</text:p>
          </table:table-cell>
          <table:table-cell table:style-name="ce266" table:formula="of:=[.G26]*[.H$8]" office:value-type="float" office:value="6298.01197607262" calcext:value-type="float">
            <text:p>6298</text:p>
          </table:table-cell>
          <table:table-cell table:style-name="ce203" table:formula="of:=STDEVP([.B26:.F26])/AVERAGE([.B26:.F26])" office:value-type="percentage" office:value="0.153854232174951" calcext:value-type="percentage">
            <text:p>15.4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3" calcext:value-type="percentage">
            <text:p>11.3%</text:p>
          </table:table-cell>
          <table:table-cell table:style-name="ce273" table:formula="of:=(MAX([.B26:.F26])-MIN([.B26:.F26]))/[.H26]*5" office:value-type="percentage" office:value="0.404095770168262" calcext:value-type="percentage">
            <text:p>40.4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 office:value-type="float" office:value="1061" calcext:value-type="float">
            <text:p>1061</text:p>
          </table:table-cell>
          <table:table-cell office:value-type="float" office:value="962" calcext:value-type="float">
            <text:p>962</text:p>
          </table:table-cell>
          <table:table-cell office:value-type="float" office:value="884" calcext:value-type="float">
            <text:p>884</text:p>
          </table:table-cell>
          <table:table-cell office:value-type="float" office:value="744" calcext:value-type="float">
            <text:p>744</text:p>
          </table:table-cell>
          <table:table-cell office:value-type="float" office:value="748" calcext:value-type="float">
            <text:p>748</text:p>
          </table:table-cell>
          <table:table-cell table:style-name="ce76" table:formula="of:=SUMPRODUCT(([.B27:.F27]&lt;&gt;&quot;&quot;)*([.B27:.F27]/[.B$8:.F$8]) / SUM([.B27:.F27]&lt;&gt;&quot;&quot;))" office:value-type="float" office:value="113.736078138321" calcext:value-type="float">
            <text:p>113.7</text:p>
          </table:table-cell>
          <table:table-cell table:style-name="ce266" table:formula="of:=[.G27]*[.H$8]" office:value-type="float" office:value="4409.18390770875" calcext:value-type="float">
            <text:p>4409</text:p>
          </table:table-cell>
          <table:table-cell table:style-name="ce203" table:formula="of:=STDEVP([.B27:.F27])/AVERAGE([.B27:.F27])" office:value-type="percentage" office:value="0.139597167898367" calcext:value-type="percentage">
            <text:p>14.0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9" calcext:value-type="percentage">
            <text:p>11.9%</text:p>
          </table:table-cell>
          <table:table-cell table:style-name="ce273" table:formula="of:=(MAX([.B27:.F27])-MIN([.B27:.F27]))/[.H27]*5" office:value-type="percentage" office:value="0.359476953825601" calcext:value-type="percentage">
            <text:p>35.9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 office:value-type="float" office:value="713" calcext:value-type="float">
            <text:p>713</text:p>
          </table:table-cell>
          <table:table-cell office:value-type="float" office:value="641" calcext:value-type="float">
            <text:p>641</text:p>
          </table:table-cell>
          <table:table-cell office:value-type="float" office:value="635" calcext:value-type="float">
            <text:p>635</text:p>
          </table:table-cell>
          <table:table-cell office:value-type="float" office:value="534" calcext:value-type="float">
            <text:p>534</text:p>
          </table:table-cell>
          <table:table-cell office:value-type="float" office:value="548" calcext:value-type="float">
            <text:p>548</text:p>
          </table:table-cell>
          <table:table-cell table:style-name="ce76" table:formula="of:=SUMPRODUCT(([.B28:.F28]&lt;&gt;&quot;&quot;)*([.B28:.F28]/[.B$8:.F$8]) / SUM([.B28:.F28]&lt;&gt;&quot;&quot;))" office:value-type="float" office:value="79.3682478385454" calcext:value-type="float">
            <text:p>79.4</text:p>
          </table:table-cell>
          <table:table-cell table:style-name="ce266" table:formula="of:=[.G28]*[.H$8]" office:value-type="float" office:value="3076.85306967557" calcext:value-type="float">
            <text:p>3077</text:p>
          </table:table-cell>
          <table:table-cell table:style-name="ce203" table:formula="of:=STDEVP([.B28:.F28])/AVERAGE([.B28:.F28])" office:value-type="percentage" office:value="0.107325536725719" calcext:value-type="percentage">
            <text:p>10.7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9" calcext:value-type="percentage">
            <text:p>11.9%</text:p>
          </table:table-cell>
          <table:table-cell table:style-name="ce273" table:formula="of:=(MAX([.B28:.F28])-MIN([.B28:.F28]))/[.H28]*5" office:value-type="percentage" office:value="0.290881618241969" calcext:value-type="percentage">
            <text:p>29.1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office:value-type="float" office:value="475" calcext:value-type="float">
            <text:p>475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368" calcext:value-type="float">
            <text:p>368</text:p>
          </table:table-cell>
          <table:table-cell table:style-name="ce76" table:formula="of:=SUMPRODUCT(([.B29:.F29]&lt;&gt;&quot;&quot;)*([.B29:.F29]/[.B$8:.F$8]) / SUM([.B29:.F29]&lt;&gt;&quot;&quot;))" office:value-type="float" office:value="53.1325172700518" calcext:value-type="float">
            <text:p>53.1</text:p>
          </table:table-cell>
          <table:table-cell table:style-name="ce266" table:formula="of:=[.G29]*[.H$8]" office:value-type="float" office:value="2059.77772363716" calcext:value-type="float">
            <text:p>2060</text:p>
          </table:table-cell>
          <table:table-cell table:style-name="ce203" table:formula="of:=STDEVP([.B29:.F29])/AVERAGE([.B29:.F29])" office:value-type="percentage" office:value="0.0976331003784697" calcext:value-type="percentage">
            <text:p>9.8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19" calcext:value-type="percentage">
            <text:p>11.9%</text:p>
          </table:table-cell>
          <table:table-cell table:style-name="ce273" table:formula="of:=(MAX([.B29:.F29])-MIN([.B29:.F29]))/[.H29]*5" office:value-type="percentage" office:value="0.259736763758808" calcext:value-type="percentage">
            <text:p>26.0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office:value-type="float" office:value="333" calcext:value-type="float">
            <text:p>333</text:p>
          </table:table-cell>
          <table:table-cell office:value-type="float" office:value="298" calcext:value-type="float">
            <text:p>298</text:p>
          </table:table-cell>
          <table:table-cell office:value-type="float" office:value="317" calcext:value-type="float">
            <text:p>31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table:style-name="ce76" table:formula="of:=SUMPRODUCT(([.B30:.F30]&lt;&gt;&quot;&quot;)*([.B30:.F30]/[.B$8:.F$8]) / SUM([.B30:.F30]&lt;&gt;&quot;&quot;))" office:value-type="float" office:value="37.8550191714335" calcext:value-type="float">
            <text:p>37.9</text:p>
          </table:table-cell>
          <table:table-cell table:style-name="ce266" table:formula="of:=[.G30]*[.H$8]" office:value-type="float" office:value="1467.51799507015" calcext:value-type="float">
            <text:p>1468</text:p>
          </table:table-cell>
          <table:table-cell table:style-name="ce203" table:formula="of:=STDEVP([.B30:.F30])/AVERAGE([.B30:.F30])" office:value-type="percentage" office:value="0.103317745275042" calcext:value-type="percentage">
            <text:p>10.3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34" calcext:value-type="percentage">
            <text:p>13.4%</text:p>
          </table:table-cell>
          <table:table-cell table:style-name="ce273" table:formula="of:=(MAX([.B30:.F30])-MIN([.B30:.F30]))/[.H30]*5" office:value-type="percentage" office:value="0.255533493462937" calcext:value-type="percentage">
            <text:p>25.6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office:value-type="float" office:value="226" calcext:value-type="float">
            <text:p>226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table:style-name="ce76" table:formula="of:=SUMPRODUCT(([.B31:.F31]&lt;&gt;&quot;&quot;)*([.B31:.F31]/[.B$8:.F$8]) / SUM([.B31:.F31]&lt;&gt;&quot;&quot;))" office:value-type="float" office:value="26.4268628388842" calcext:value-type="float">
            <text:p>26.4</text:p>
          </table:table-cell>
          <table:table-cell table:style-name="ce266" table:formula="of:=[.G31]*[.H$8]" office:value-type="float" office:value="1024.48493272932" calcext:value-type="float">
            <text:p>1024</text:p>
          </table:table-cell>
          <table:table-cell table:style-name="ce203" table:formula="of:=STDEVP([.B31:.F31])/AVERAGE([.B31:.F31])" office:value-type="percentage" office:value="0.103524553625601" calcext:value-type="percentage">
            <text:p>10.4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34" calcext:value-type="percentage">
            <text:p>13.4%</text:p>
          </table:table-cell>
          <table:table-cell table:style-name="ce273" table:formula="of:=(MAX([.B31:.F31])-MIN([.B31:.F31]))/[.H31]*5" office:value-type="percentage" office:value="0.244025062754196" calcext:value-type="percentage">
            <text:p>24.4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table:style-name="ce76" table:formula="of:=SUMPRODUCT(([.B32:.F32]&lt;&gt;&quot;&quot;)*([.B32:.F32]/[.B$8:.F$8]) / SUM([.B32:.F32]&lt;&gt;&quot;&quot;))" office:value-type="float" office:value="18.6953417793273" calcext:value-type="float">
            <text:p>18.7</text:p>
          </table:table-cell>
          <table:table-cell table:style-name="ce266" table:formula="of:=[.G32]*[.H$8]" office:value-type="float" office:value="724.758594386167" calcext:value-type="float">
            <text:p>725</text:p>
          </table:table-cell>
          <table:table-cell table:style-name="ce203" table:formula="of:=STDEVP([.B32:.F32])/AVERAGE([.B32:.F32])" office:value-type="percentage" office:value="0.106398426367794" calcext:value-type="percentage">
            <text:p>10.6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56" calcext:value-type="percentage">
            <text:p>15.6%</text:p>
          </table:table-cell>
          <table:table-cell table:style-name="ce273" table:formula="of:=(MAX([.B32:.F32])-MIN([.B32:.F32]))/[.H32]*5" office:value-type="percentage" office:value="0.317347047391412" calcext:value-type="percentage">
            <text:p>31.7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style-name="ce76" table:formula="of:=SUMPRODUCT(([.B33:.F33]&lt;&gt;&quot;&quot;)*([.B33:.F33]/[.B$8:.F$8]) / SUM([.B33:.F33]&lt;&gt;&quot;&quot;))" office:value-type="float" office:value="13.9519822090318" calcext:value-type="float">
            <text:p>14.0</text:p>
          </table:table-cell>
          <table:table-cell table:style-name="ce266" table:formula="of:=[.G33]*[.H$8]" office:value-type="float" office:value="540.873717853077" calcext:value-type="float">
            <text:p>541</text:p>
          </table:table-cell>
          <table:table-cell table:style-name="ce203" table:formula="of:=STDEVP([.B33:.F33])/AVERAGE([.B33:.F33])" office:value-type="percentage" office:value="0.147568309726937" calcext:value-type="percentage">
            <text:p>14.8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56" calcext:value-type="percentage">
            <text:p>15.6%</text:p>
          </table:table-cell>
          <table:table-cell table:style-name="ce273" table:formula="of:=(MAX([.B33:.F33])-MIN([.B33:.F33]))/[.H33]*5" office:value-type="percentage" office:value="0.397504986660126" calcext:value-type="percentage">
            <text:p>39.8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76" table:formula="of:=SUMPRODUCT(([.B34:.F34]&lt;&gt;&quot;&quot;)*([.B34:.F34]/[.B$8:.F$8]) / SUM([.B34:.F34]&lt;&gt;&quot;&quot;))" office:value-type="float" office:value="10.1101996362992" calcext:value-type="float">
            <text:p>10.1</text:p>
          </table:table-cell>
          <table:table-cell table:style-name="ce266" table:formula="of:=[.G34]*[.H$8]" office:value-type="float" office:value="391.940097370683" calcext:value-type="float">
            <text:p>392</text:p>
          </table:table-cell>
          <table:table-cell table:style-name="ce203" table:formula="of:=STDEVP([.B34:.F34])/AVERAGE([.B34:.F34])" office:value-type="percentage" office:value="0.201283809411263" calcext:value-type="percentage">
            <text:p>20.1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93" calcext:value-type="percentage">
            <text:p>19.3%</text:p>
          </table:table-cell>
          <table:table-cell table:style-name="ce273" table:formula="of:=(MAX([.B34:.F34])-MIN([.B34:.F34]))/[.H34]*5" office:value-type="percentage" office:value="0.484767956314265" calcext:value-type="percentage">
            <text:p>48.5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style-name="ce76" table:formula="of:=SUMPRODUCT(([.B35:.F35]&lt;&gt;&quot;&quot;)*([.B35:.F35]/[.B$8:.F$8]) / SUM([.B35:.F35]&lt;&gt;&quot;&quot;))" office:value-type="float" office:value="7.37030537224725" calcext:value-type="float">
            <text:p>7.4</text:p>
          </table:table-cell>
          <table:table-cell table:style-name="ce266" table:formula="of:=[.G35]*[.H$8]" office:value-type="float" office:value="285.72316167514" calcext:value-type="float">
            <text:p>286</text:p>
          </table:table-cell>
          <table:table-cell table:style-name="ce203" table:formula="of:=STDEVP([.B35:.F35])/AVERAGE([.B35:.F35])" office:value-type="percentage" office:value="0.24486100101569" calcext:value-type="percentage">
            <text:p>24.5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93" calcext:value-type="percentage">
            <text:p>19.3%</text:p>
          </table:table-cell>
          <table:table-cell table:style-name="ce273" table:formula="of:=(MAX([.B35:.F35])-MIN([.B35:.F35]))/[.H35]*5" office:value-type="percentage" office:value="0.629980429114302" calcext:value-type="percentage">
            <text:p>63.0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76" table:formula="of:=SUMPRODUCT(([.B36:.F36]&lt;&gt;&quot;&quot;)*([.B36:.F36]/[.B$8:.F$8]) / SUM([.B36:.F36]&lt;&gt;&quot;&quot;))" office:value-type="float" office:value="5.0264521994126" calcext:value-type="float">
            <text:p>5.0</text:p>
          </table:table-cell>
          <table:table-cell table:style-name="ce266" table:formula="of:=[.G36]*[.H$8]" office:value-type="float" office:value="194.859472150641" calcext:value-type="float">
            <text:p>195</text:p>
          </table:table-cell>
          <table:table-cell table:style-name="ce203" table:formula="of:=STDEVP([.B36:.F36])/AVERAGE([.B36:.F36])" office:value-type="percentage" office:value="0.32576340843969" calcext:value-type="percentage">
            <text:p>32.6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273" table:formula="of:=(MAX([.B36:.F36])-MIN([.B36:.F36]))/[.H36]*5" office:value-type="percentage" office:value="0.769785519505252" calcext:value-type="percentage">
            <text:p>77.0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SUMPRODUCT(([.B37:.F37]&lt;&gt;&quot;&quot;)*([.B37:.F37]/[.B$8:.F$8]) / SUM([.B37:.F37]&lt;&gt;&quot;&quot;))" office:value-type="float" office:value="0.284830931221969" calcext:value-type="float">
            <text:p>0.3</text:p>
          </table:table-cell>
          <table:table-cell table:style-name="ce266" table:formula="of:=[.G37]*[.H$8]" office:value-type="float" office:value="11.0419840293268" calcext:value-type="float">
            <text:p>11</text:p>
          </table:table-cell>
          <table:table-cell table:style-name="ce203" table:formula="of:=STDEVP([.B37:.F37])/AVERAGE([.B37:.F37])" office:value-type="percentage" office:value="0.340150671524904" calcext:value-type="percentage">
            <text:p>34.0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273" table:formula="of:=(MAX([.B37:.F37])-MIN([.B37:.F37]))/[.H37]*5" office:value-type="percentage" office:value="0.905634347363724" calcext:value-type="percentage">
            <text:p>90.6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6" table:formula="of:=SUMPRODUCT(([.B38:.F38]&lt;&gt;&quot;&quot;)*([.B38:.F38]/[.B$8:.F$8]) / SUM([.B38:.F38]&lt;&gt;&quot;&quot;))" office:value-type="float" office:value="0.0767587034583555" calcext:value-type="float">
            <text:p>0.1</text:p>
          </table:table-cell>
          <table:table-cell table:style-name="ce266" table:formula="of:=[.G38]*[.H$8]" office:value-type="float" office:value="2.97568938198808" calcext:value-type="float">
            <text:p>3</text:p>
          </table:table-cell>
          <table:table-cell table:style-name="ce203" table:formula="of:=STDEVP([.B38:.F38])/AVERAGE([.B38:.F38])" office:value-type="percentage" office:value="0.816496580927726" calcext:value-type="percentage">
            <text:p>81.6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73" table:formula="of:=(MAX([.B38:.F38])-MIN([.B38:.F38]))/[.H38]*5" office:value-type="percentage" office:value="1.68028290528747" calcext:value-type="percentage">
            <text:p>168.0%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70"/>
          <table:table-cell table:number-columns-repeated="2"/>
          <table:table-cell table:style-name="ce275"/>
          <table:table-cell table:number-columns-repeated="38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6"/>
          <table:table-cell table:style-name="ce270"/>
          <table:table-cell table:number-columns-repeated="2"/>
          <table:table-cell table:style-name="ce275"/>
          <table:table-cell table:number-columns-repeated="38"/>
        </table:table-row>
        <table:table-row table:style-name="ro2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2" table:number-rows-repeated="2">
          <table:table-cell table:number-columns-repeated="49"/>
        </table:table-row>
        <table:table-row table:style-name="ro2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table:number-columns-repeated="2" office:value-type="string" calcext:value-type="string">
            <text:p>count_70</text:p>
          </table:table-cell>
          <table:table-cell table:number-columns-repeated="17"/>
        </table:table-row>
        <table:table-row table:style-name="ro2">
          <table:table-cell office:value-type="float" office:value="7.477761" calcext:value-type="float">
            <text:p>7.477761</text:p>
          </table:table-cell>
          <table:table-cell office:value-type="float" office:value="33258" calcext:value-type="float">
            <text:p>33258</text:p>
          </table:table-cell>
          <table:table-cell office:value-type="float" office:value="28609" calcext:value-type="float">
            <text:p>28609</text:p>
          </table:table-cell>
          <table:table-cell office:value-type="float" office:value="24519" calcext:value-type="float">
            <text:p>24519</text:p>
          </table:table-cell>
          <table:table-cell office:value-type="float" office:value="21020" calcext:value-type="float">
            <text:p>21020</text:p>
          </table:table-cell>
          <table:table-cell office:value-type="float" office:value="17856" calcext:value-type="float">
            <text:p>17856</text:p>
          </table:table-cell>
          <table:table-cell office:value-type="float" office:value="15214" calcext:value-type="float">
            <text:p>15214</text:p>
          </table:table-cell>
          <table:table-cell office:value-type="float" office:value="12813" calcext:value-type="float">
            <text:p>12813</text:p>
          </table:table-cell>
          <table:table-cell office:value-type="float" office:value="10727" calcext:value-type="float">
            <text:p>10727</text:p>
          </table:table-cell>
          <table:table-cell office:value-type="float" office:value="8976" calcext:value-type="float">
            <text:p>8976</text:p>
          </table:table-cell>
          <table:table-cell office:value-type="float" office:value="7554" calcext:value-type="float">
            <text:p>7554</text:p>
          </table:table-cell>
          <table:table-cell office:value-type="float" office:value="6350" calcext:value-type="float">
            <text:p>6350</text:p>
          </table:table-cell>
          <table:table-cell office:value-type="float" office:value="5384" calcext:value-type="float">
            <text:p>5384</text:p>
          </table:table-cell>
          <table:table-cell office:value-type="float" office:value="4509" calcext:value-type="float">
            <text:p>4509</text:p>
          </table:table-cell>
          <table:table-cell office:value-type="float" office:value="3802" calcext:value-type="float">
            <text:p>3802</text:p>
          </table:table-cell>
          <table:table-cell office:value-type="float" office:value="3161" calcext:value-type="float">
            <text:p>3161</text:p>
          </table:table-cell>
          <table:table-cell office:value-type="float" office:value="2604" calcext:value-type="float">
            <text:p>2604</text:p>
          </table:table-cell>
          <table:table-cell office:value-type="float" office:value="2039" calcext:value-type="float">
            <text:p>2039</text:p>
          </table:table-cell>
          <table:table-cell office:value-type="float" office:value="1550" calcext:value-type="float">
            <text:p>1550</text:p>
          </table:table-cell>
          <table:table-cell office:value-type="float" office:value="1061" calcext:value-type="float">
            <text:p>1061</text:p>
          </table:table-cell>
          <table:table-cell office:value-type="float" office:value="713" calcext:value-type="float">
            <text:p>713</text:p>
          </table:table-cell>
          <table:table-cell office:value-type="float" office:value="475" calcext:value-type="float">
            <text:p>475</text:p>
          </table:table-cell>
          <table:table-cell office:value-type="float" office:value="333" calcext:value-type="float">
            <text:p>333</text:p>
          </table:table-cell>
          <table:table-cell office:value-type="float" office:value="226" calcext:value-type="float">
            <text:p>226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7.824255" calcext:value-type="float">
            <text:p>7.824255</text:p>
          </table:table-cell>
          <table:table-cell office:value-type="float" office:value="34181" calcext:value-type="float">
            <text:p>34181</text:p>
          </table:table-cell>
          <table:table-cell office:value-type="float" office:value="29564" calcext:value-type="float">
            <text:p>29564</text:p>
          </table:table-cell>
          <table:table-cell office:value-type="float" office:value="25362" calcext:value-type="float">
            <text:p>25362</text:p>
          </table:table-cell>
          <table:table-cell office:value-type="float" office:value="21622" calcext:value-type="float">
            <text:p>21622</text:p>
          </table:table-cell>
          <table:table-cell office:value-type="float" office:value="18447" calcext:value-type="float">
            <text:p>18447</text:p>
          </table:table-cell>
          <table:table-cell office:value-type="float" office:value="15648" calcext:value-type="float">
            <text:p>15648</text:p>
          </table:table-cell>
          <table:table-cell office:value-type="float" office:value="13120" calcext:value-type="float">
            <text:p>13120</text:p>
          </table:table-cell>
          <table:table-cell office:value-type="float" office:value="11007" calcext:value-type="float">
            <text:p>11007</text:p>
          </table:table-cell>
          <table:table-cell office:value-type="float" office:value="9211" calcext:value-type="float">
            <text:p>9211</text:p>
          </table:table-cell>
          <table:table-cell office:value-type="float" office:value="7668" calcext:value-type="float">
            <text:p>7668</text:p>
          </table:table-cell>
          <table:table-cell office:value-type="float" office:value="6402" calcext:value-type="float">
            <text:p>6402</text:p>
          </table:table-cell>
          <table:table-cell office:value-type="float" office:value="5344" calcext:value-type="float">
            <text:p>5344</text:p>
          </table:table-cell>
          <table:table-cell office:value-type="float" office:value="4523" calcext:value-type="float">
            <text:p>4523</text:p>
          </table:table-cell>
          <table:table-cell office:value-type="float" office:value="3767" calcext:value-type="float">
            <text:p>3767</text:p>
          </table:table-cell>
          <table:table-cell office:value-type="float" office:value="3078" calcext:value-type="float">
            <text:p>3078</text:p>
          </table:table-cell>
          <table:table-cell office:value-type="float" office:value="2444" calcext:value-type="float">
            <text:p>2444</text:p>
          </table:table-cell>
          <table:table-cell office:value-type="float" office:value="1902" calcext:value-type="float">
            <text:p>1902</text:p>
          </table:table-cell>
          <table:table-cell office:value-type="float" office:value="1394" calcext:value-type="float">
            <text:p>1394</text:p>
          </table:table-cell>
          <table:table-cell office:value-type="float" office:value="962" calcext:value-type="float">
            <text:p>962</text:p>
          </table:table-cell>
          <table:table-cell office:value-type="float" office:value="641" calcext:value-type="float">
            <text:p>641</text:p>
          </table:table-cell>
          <table:table-cell office:value-type="float" office:value="423" calcext:value-type="float">
            <text:p>423</text:p>
          </table:table-cell>
          <table:table-cell office:value-type="float" office:value="298" calcext:value-type="float">
            <text:p>298</text:p>
          </table:table-cell>
          <table:table-cell office:value-type="float" office:value="209" calcext:value-type="float">
            <text:p>209</text:p>
          </table:table-cell>
          <table:table-cell office:value-type="float" office:value="144" calcext:value-type="float">
            <text:p>144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7.792676" calcext:value-type="float">
            <text:p>7.792676</text:p>
          </table:table-cell>
          <table:table-cell office:value-type="float" office:value="33852" calcext:value-type="float">
            <text:p>33852</text:p>
          </table:table-cell>
          <table:table-cell office:value-type="float" office:value="29128" calcext:value-type="float">
            <text:p>29128</text:p>
          </table:table-cell>
          <table:table-cell office:value-type="float" office:value="24963" calcext:value-type="float">
            <text:p>24963</text:p>
          </table:table-cell>
          <table:table-cell office:value-type="float" office:value="21302" calcext:value-type="float">
            <text:p>21302</text:p>
          </table:table-cell>
          <table:table-cell office:value-type="float" office:value="18060" calcext:value-type="float">
            <text:p>18060</text:p>
          </table:table-cell>
          <table:table-cell office:value-type="float" office:value="15267" calcext:value-type="float">
            <text:p>15267</text:p>
          </table:table-cell>
          <table:table-cell office:value-type="float" office:value="12759" calcext:value-type="float">
            <text:p>12759</text:p>
          </table:table-cell>
          <table:table-cell office:value-type="float" office:value="10708" calcext:value-type="float">
            <text:p>10708</text:p>
          </table:table-cell>
          <table:table-cell office:value-type="float" office:value="8910" calcext:value-type="float">
            <text:p>8910</text:p>
          </table:table-cell>
          <table:table-cell office:value-type="float" office:value="7342" calcext:value-type="float">
            <text:p>7342</text:p>
          </table:table-cell>
          <table:table-cell office:value-type="float" office:value="6166" calcext:value-type="float">
            <text:p>6166</text:p>
          </table:table-cell>
          <table:table-cell office:value-type="float" office:value="5133" calcext:value-type="float">
            <text:p>5133</text:p>
          </table:table-cell>
          <table:table-cell office:value-type="float" office:value="4243" calcext:value-type="float">
            <text:p>4243</text:p>
          </table:table-cell>
          <table:table-cell office:value-type="float" office:value="3511" calcext:value-type="float">
            <text:p>3511</text:p>
          </table:table-cell>
          <table:table-cell office:value-type="float" office:value="2842" calcext:value-type="float">
            <text:p>2842</text:p>
          </table:table-cell>
          <table:table-cell office:value-type="float" office:value="2242" calcext:value-type="float">
            <text:p>2242</text:p>
          </table:table-cell>
          <table:table-cell office:value-type="float" office:value="1710" calcext:value-type="float">
            <text:p>1710</text:p>
          </table:table-cell>
          <table:table-cell office:value-type="float" office:value="1226" calcext:value-type="float">
            <text:p>1226</text:p>
          </table:table-cell>
          <table:table-cell office:value-type="float" office:value="884" calcext:value-type="float">
            <text:p>884</text:p>
          </table:table-cell>
          <table:table-cell office:value-type="float" office:value="635" calcext:value-type="float">
            <text:p>635</text:p>
          </table:table-cell>
          <table:table-cell office:value-type="float" office:value="422" calcext:value-type="float">
            <text:p>422</text:p>
          </table:table-cell>
          <table:table-cell office:value-type="float" office:value="317" calcext:value-type="float">
            <text:p>317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7.838814" calcext:value-type="float">
            <text:p>7.838814</text:p>
          </table:table-cell>
          <table:table-cell office:value-type="float" office:value="33986" calcext:value-type="float">
            <text:p>33986</text:p>
          </table:table-cell>
          <table:table-cell office:value-type="float" office:value="29242" calcext:value-type="float">
            <text:p>29242</text:p>
          </table:table-cell>
          <table:table-cell office:value-type="float" office:value="25072" calcext:value-type="float">
            <text:p>25072</text:p>
          </table:table-cell>
          <table:table-cell office:value-type="float" office:value="21242" calcext:value-type="float">
            <text:p>21242</text:p>
          </table:table-cell>
          <table:table-cell office:value-type="float" office:value="18020" calcext:value-type="float">
            <text:p>18020</text:p>
          </table:table-cell>
          <table:table-cell office:value-type="float" office:value="15160" calcext:value-type="float">
            <text:p>15160</text:p>
          </table:table-cell>
          <table:table-cell office:value-type="float" office:value="12594" calcext:value-type="float">
            <text:p>12594</text:p>
          </table:table-cell>
          <table:table-cell office:value-type="float" office:value="10408" calcext:value-type="float">
            <text:p>10408</text:p>
          </table:table-cell>
          <table:table-cell office:value-type="float" office:value="8667" calcext:value-type="float">
            <text:p>8667</text:p>
          </table:table-cell>
          <table:table-cell office:value-type="float" office:value="7155" calcext:value-type="float">
            <text:p>7155</text:p>
          </table:table-cell>
          <table:table-cell office:value-type="float" office:value="5910" calcext:value-type="float">
            <text:p>5910</text:p>
          </table:table-cell>
          <table:table-cell office:value-type="float" office:value="4881" calcext:value-type="float">
            <text:p>4881</text:p>
          </table:table-cell>
          <table:table-cell office:value-type="float" office:value="4044" calcext:value-type="float">
            <text:p>4044</text:p>
          </table:table-cell>
          <table:table-cell office:value-type="float" office:value="3263" calcext:value-type="float">
            <text:p>3263</text:p>
          </table:table-cell>
          <table:table-cell office:value-type="float" office:value="2619" calcext:value-type="float">
            <text:p>2619</text:p>
          </table:table-cell>
          <table:table-cell office:value-type="float" office:value="2014" calcext:value-type="float">
            <text:p>2014</text:p>
          </table:table-cell>
          <table:table-cell office:value-type="float" office:value="1479" calcext:value-type="float">
            <text:p>1479</text:p>
          </table:table-cell>
          <table:table-cell office:value-type="float" office:value="1071" calcext:value-type="float">
            <text:p>1071</text:p>
          </table:table-cell>
          <table:table-cell office:value-type="float" office:value="744" calcext:value-type="float">
            <text:p>744</text:p>
          </table:table-cell>
          <table:table-cell office:value-type="float" office:value="534" calcext:value-type="float">
            <text:p>534</text:p>
          </table:table-cell>
          <table:table-cell office:value-type="float" office:value="368" calcext:value-type="float">
            <text:p>368</text:p>
          </table:table-cell>
          <table:table-cell office:value-type="float" office:value="258" calcext:value-type="float">
            <text:p>258</text:p>
          </table:table-cell>
          <table:table-cell office:value-type="float" office:value="182" calcext:value-type="float">
            <text:p>182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7.833295" calcext:value-type="float">
            <text:p>7.833295</text:p>
          </table:table-cell>
          <table:table-cell office:value-type="float" office:value="33822" calcext:value-type="float">
            <text:p>33822</text:p>
          </table:table-cell>
          <table:table-cell office:value-type="float" office:value="29150" calcext:value-type="float">
            <text:p>29150</text:p>
          </table:table-cell>
          <table:table-cell office:value-type="float" office:value="24897" calcext:value-type="float">
            <text:p>24897</text:p>
          </table:table-cell>
          <table:table-cell office:value-type="float" office:value="21084" calcext:value-type="float">
            <text:p>21084</text:p>
          </table:table-cell>
          <table:table-cell office:value-type="float" office:value="17819" calcext:value-type="float">
            <text:p>17819</text:p>
          </table:table-cell>
          <table:table-cell office:value-type="float" office:value="14867" calcext:value-type="float">
            <text:p>14867</text:p>
          </table:table-cell>
          <table:table-cell office:value-type="float" office:value="12465" calcext:value-type="float">
            <text:p>12465</text:p>
          </table:table-cell>
          <table:table-cell office:value-type="float" office:value="10357" calcext:value-type="float">
            <text:p>10357</text:p>
          </table:table-cell>
          <table:table-cell office:value-type="float" office:value="8486" calcext:value-type="float">
            <text:p>8486</text:p>
          </table:table-cell>
          <table:table-cell office:value-type="float" office:value="6944" calcext:value-type="float">
            <text:p>6944</text:p>
          </table:table-cell>
          <table:table-cell office:value-type="float" office:value="5731" calcext:value-type="float">
            <text:p>5731</text:p>
          </table:table-cell>
          <table:table-cell office:value-type="float" office:value="4671" calcext:value-type="float">
            <text:p>4671</text:p>
          </table:table-cell>
          <table:table-cell office:value-type="float" office:value="3817" calcext:value-type="float">
            <text:p>3817</text:p>
          </table:table-cell>
          <table:table-cell office:value-type="float" office:value="3132" calcext:value-type="float">
            <text:p>3132</text:p>
          </table:table-cell>
          <table:table-cell office:value-type="float" office:value="2457" calcext:value-type="float">
            <text:p>2457</text:p>
          </table:table-cell>
          <table:table-cell office:value-type="float" office:value="1938" calcext:value-type="float">
            <text:p>1938</text:p>
          </table:table-cell>
          <table:table-cell office:value-type="float" office:value="1441" calcext:value-type="float">
            <text:p>1441</text:p>
          </table:table-cell>
          <table:table-cell office:value-type="float" office:value="1041" calcext:value-type="float">
            <text:p>1041</text:p>
          </table:table-cell>
          <table:table-cell office:value-type="float" office:value="748" calcext:value-type="float">
            <text:p>748</text:p>
          </table:table-cell>
          <table:table-cell office:value-type="float" office:value="548" calcext:value-type="float">
            <text:p>548</text:p>
          </table:table-cell>
          <table:table-cell office:value-type="float" office:value="368" calcext:value-type="float">
            <text:p>368</text:p>
          </table:table-cell>
          <table:table-cell office:value-type="float" office:value="259" calcext:value-type="float">
            <text:p>259</text:p>
          </table:table-cell>
          <table:table-cell office:value-type="float" office:value="178" calcext:value-type="float">
            <text:p>17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38.7668" calcext:value-type="float">
            <text:p>38.7668</text:p>
          </table:table-cell>
          <table:table-cell office:value-type="float" office:value="169100" calcext:value-type="float">
            <text:p>169100</text:p>
          </table:table-cell>
          <table:table-cell office:value-type="float" office:value="145694" calcext:value-type="float">
            <text:p>145694</text:p>
          </table:table-cell>
          <table:table-cell office:value-type="float" office:value="124812" calcext:value-type="float">
            <text:p>124812</text:p>
          </table:table-cell>
          <table:table-cell office:value-type="float" office:value="106270" calcext:value-type="float">
            <text:p>106270</text:p>
          </table:table-cell>
          <table:table-cell office:value-type="float" office:value="90202" calcext:value-type="float">
            <text:p>90202</text:p>
          </table:table-cell>
          <table:table-cell office:value-type="float" office:value="76156" calcext:value-type="float">
            <text:p>76156</text:p>
          </table:table-cell>
          <table:table-cell office:value-type="float" office:value="63751" calcext:value-type="float">
            <text:p>63751</text:p>
          </table:table-cell>
          <table:table-cell office:value-type="float" office:value="53209" calcext:value-type="float">
            <text:p>53209</text:p>
          </table:table-cell>
          <table:table-cell office:value-type="float" office:value="44249" calcext:value-type="float">
            <text:p>44249</text:p>
          </table:table-cell>
          <table:table-cell office:value-type="float" office:value="36664" calcext:value-type="float">
            <text:p>36664</text:p>
          </table:table-cell>
          <table:table-cell office:value-type="float" office:value="30559" calcext:value-type="float">
            <text:p>30559</text:p>
          </table:table-cell>
          <table:table-cell office:value-type="float" office:value="25412" calcext:value-type="float">
            <text:p>25412</text:p>
          </table:table-cell>
          <table:table-cell office:value-type="float" office:value="21136" calcext:value-type="float">
            <text:p>21136</text:p>
          </table:table-cell>
          <table:table-cell office:value-type="float" office:value="17475" calcext:value-type="float">
            <text:p>17475</text:p>
          </table:table-cell>
          <table:table-cell office:value-type="float" office:value="14157" calcext:value-type="float">
            <text:p>14157</text:p>
          </table:table-cell>
          <table:table-cell office:value-type="float" office:value="11241" calcext:value-type="float">
            <text:p>11241</text:p>
          </table:table-cell>
          <table:table-cell office:value-type="float" office:value="8571" calcext:value-type="float">
            <text:p>8571</text:p>
          </table:table-cell>
          <table:table-cell office:value-type="float" office:value="6281" calcext:value-type="float">
            <text:p>6281</text:p>
          </table:table-cell>
          <table:table-cell office:value-type="float" office:value="4400" calcext:value-type="float">
            <text:p>4400</text:p>
          </table:table-cell>
          <table:table-cell office:value-type="float" office:value="3070" calcext:value-type="float">
            <text:p>3070</text:p>
          </table:table-cell>
          <table:table-cell office:value-type="float" office:value="2055" calcext:value-type="float">
            <text:p>2055</text:p>
          </table:table-cell>
          <table:table-cell office:value-type="float" office:value="1465" calcext:value-type="float">
            <text:p>1465</text:p>
          </table:table-cell>
          <table:table-cell office:value-type="float" office:value="1023" calcext:value-type="float">
            <text:p>1023</text:p>
          </table:table-cell>
          <table:table-cell office:value-type="float" office:value="724" calcext:value-type="float">
            <text:p>724</text:p>
          </table:table-cell>
          <table:table-cell office:value-type="float" office:value="540" calcext:value-type="float">
            <text:p>540</text:p>
          </table:table-cell>
          <table:table-cell office:value-type="float" office:value="391" calcext:value-type="float">
            <text:p>391</text:p>
          </table:table-cell>
          <table:table-cell office:value-type="float" office:value="285" calcext:value-type="float">
            <text:p>285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 table:number-rows-repeated="3">
          <table:table-cell table:number-columns-repeated="8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8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121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28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2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2">
          <table:table-cell table:number-columns-repeated="10"/>
          <table:table-cell table:style-name="ce3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'6 - BOTTLE 1'.H11:'6 - BOTTLE 1'.H40">
            <calcext:condition calcext:apply-style-name="Good" calcext:value="&gt;1000" calcext:base-cell-address="'6 - BOTTLE 1'.H11"/>
          </calcext:conditional-format>
          <calcext:conditional-format calcext:target-range-address="'6 - BOTTLE 1'.K9:'6 - BOTTLE 1'.K40">
            <calcext:condition calcext:apply-style-name="Good" calcext:value="&lt;[.J11]" calcext:base-cell-address="'6 - BOTTLE 1'.K9"/>
          </calcext:conditional-format>
        </calcext:conditional-formats>
      </table:table>
      <table:table table:name="6 - BOTTLE 2" table:style-name="ta1">
        <table:table-column table:style-name="co4" table:number-columns-repeated="49" table:default-cell-style-name="Default"/>
        <table:table-row table:style-name="ro2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office:value-type="string" calcext:value-type="string">
            <text:p>Per ISO 11171 Clause 6.6</text:p>
          </table:table-cell>
          <table:table-cell table:number-columns-repeated="14"/>
          <table:table-cell table:style-name="ce286" office:value-type="string" calcext:value-type="string">
            <text:p>50% 34D CALIBRATION SAMPLE</text:p>
          </table:table-cell>
          <table:table-cell table:number-columns-repeated="33"/>
        </table:table-row>
        <table:table-row table:style-name="ro2">
          <table:table-cell table:number-columns-repeated="15"/>
          <table:table-cell table:style-name="ce55" office:value-type="date" office:date-value="2025-05-15" calcext:value-type="date">
            <text:p>2025-05-15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48"/>
        </table:table-row>
        <table:table-row table:style-name="ro2">
          <table:table-cell table:number-columns-repeated="49"/>
        </table:table-row>
        <table:table-row table:style-name="ro2">
          <table:table-cell table:style-name="ce283" office:value-type="string" calcext:value-type="string">
            <text:p>50% Partistan 34D</text:p>
          </table:table-cell>
          <table:table-cell table:style-name="ce28" table:number-columns-repeated="5"/>
          <table:table-cell table:number-columns-repeated="43"/>
        </table:table-row>
        <table:table-row table:style-name="ro2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Scanned ml</text:p>
          </table:table-cell>
          <table:table-cell office:value-type="float" office:value="7.421026" calcext:value-type="float">
            <text:p>7.421026</text:p>
          </table:table-cell>
          <table:table-cell office:value-type="float" office:value="7.816224" calcext:value-type="float">
            <text:p>7.816224</text:p>
          </table:table-cell>
          <table:table-cell office:value-type="float" office:value="7.775962" calcext:value-type="float">
            <text:p>7.775962</text:p>
          </table:table-cell>
          <table:table-cell office:value-type="float" office:value="7.819816" calcext:value-type="float">
            <text:p>7.819816</text:p>
          </table:table-cell>
          <table:table-cell office:value-type="float" office:value="7.822954" calcext:value-type="float">
            <text:p>7.822954</text:p>
          </table:table-cell>
          <table:table-cell table:style-name="ce194"/>
          <table:table-cell table:style-name="ce200" table:formula="of:=SUM([.B8:.F8])" office:value-type="float" office:value="38.655982" calcext:value-type="float">
            <text:p>38.7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2">
          <table:table-cell table:style-name="ce16" office:value-type="string" calcext:value-type="string">
            <text:p>count_4</text:p>
          </table:table-cell>
          <table:table-cell office:value-type="float" office:value="61393" calcext:value-type="float">
            <text:p>61393</text:p>
          </table:table-cell>
          <table:table-cell office:value-type="float" office:value="55912" calcext:value-type="float">
            <text:p>55912</text:p>
          </table:table-cell>
          <table:table-cell office:value-type="float" office:value="55068" calcext:value-type="float">
            <text:p>55068</text:p>
          </table:table-cell>
          <table:table-cell office:value-type="float" office:value="55884" calcext:value-type="float">
            <text:p>55884</text:p>
          </table:table-cell>
          <table:table-cell office:value-type="float" office:value="55428" calcext:value-type="float">
            <text:p>55428</text:p>
          </table:table-cell>
          <table:table-cell table:style-name="ce76" table:formula="of:=SUMPRODUCT(([.B9:.F9]&lt;&gt;&quot;&quot;)*([.B9:.F9]/[.B$8:.F$8]) / SUM([.B9:.F9]&lt;&gt;&quot;&quot;))" office:value-type="float" office:value="7347.95180301294" calcext:value-type="float">
            <text:p>7348.0</text:p>
          </table:table-cell>
          <table:table-cell table:style-name="ce282" table:formula="of:=[.G9]*[.H$8]" office:value-type="float" office:value="284042.292634136" calcext:value-type="float">
            <text:p>284042</text:p>
          </table:table-cell>
          <table:table-cell table:style-name="ce203" table:formula="of:=STDEVP([.B9:.F9])/AVERAGE([.B9:.F9])" office:value-type="percentage" office:value="0.0413990086031021" calcext:value-type="percentage">
            <text:p>4.1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85" table:formula="of:=(MAX([.B9:.F9])-MIN([.B9:.F9]))/[.H9]*5" office:value-type="percentage" office:value="0.111339053444182" calcext:value-type="percentage">
            <text:p>11.1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</text:p>
          </table:table-cell>
          <table:table-cell office:value-type="float" office:value="52469" calcext:value-type="float">
            <text:p>52469</text:p>
          </table:table-cell>
          <table:table-cell office:value-type="float" office:value="45758" calcext:value-type="float">
            <text:p>45758</text:p>
          </table:table-cell>
          <table:table-cell office:value-type="float" office:value="45320" calcext:value-type="float">
            <text:p>45320</text:p>
          </table:table-cell>
          <table:table-cell office:value-type="float" office:value="46036" calcext:value-type="float">
            <text:p>46036</text:p>
          </table:table-cell>
          <table:table-cell office:value-type="float" office:value="45662" calcext:value-type="float">
            <text:p>45662</text:p>
          </table:table-cell>
          <table:table-cell table:style-name="ce76" table:formula="of:=SUMPRODUCT(([.B10:.F10]&lt;&gt;&quot;&quot;)*([.B10:.F10]/[.B$8:.F$8]) / SUM([.B10:.F10]&lt;&gt;&quot;&quot;))" office:value-type="float" office:value="6095.35759346497" calcext:value-type="float">
            <text:p>6095.4</text:p>
          </table:table-cell>
          <table:table-cell table:style-name="ce282" table:formula="of:=[.G10]*[.H$8]" office:value-type="float" office:value="235622.033416545" calcext:value-type="float">
            <text:p>235622</text:p>
          </table:table-cell>
          <table:table-cell table:style-name="ce203" table:formula="of:=STDEVP([.B10:.F10])/AVERAGE([.B10:.F10])" office:value-type="percentage" office:value="0.0578046131073959" calcext:value-type="percentage">
            <text:p>5.8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85" table:formula="of:=(MAX([.B10:.F10])-MIN([.B10:.F10]))/[.H10]*5" office:value-type="percentage" office:value="0.151704827777324" calcext:value-type="percentage">
            <text:p>15.2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6</text:p>
          </table:table-cell>
          <table:table-cell office:value-type="float" office:value="42699" calcext:value-type="float">
            <text:p>42699</text:p>
          </table:table-cell>
          <table:table-cell office:value-type="float" office:value="40065" calcext:value-type="float">
            <text:p>40065</text:p>
          </table:table-cell>
          <table:table-cell office:value-type="float" office:value="39782" calcext:value-type="float">
            <text:p>39782</text:p>
          </table:table-cell>
          <table:table-cell office:value-type="float" office:value="40336" calcext:value-type="float">
            <text:p>40336</text:p>
          </table:table-cell>
          <table:table-cell office:value-type="float" office:value="40100" calcext:value-type="float">
            <text:p>40100</text:p>
          </table:table-cell>
          <table:table-cell table:style-name="ce76" table:formula="of:=SUMPRODUCT(([.B11:.F11]&lt;&gt;&quot;&quot;)*([.B11:.F11]/[.B$8:.F$8]) / SUM([.B11:.F11]&lt;&gt;&quot;&quot;))" office:value-type="float" office:value="5255.96094785285" calcext:value-type="float">
            <text:p>5256.0</text:p>
          </table:table-cell>
          <table:table-cell table:style-name="ce282" table:formula="of:=[.G11]*[.H$8]" office:value-type="float" office:value="203174.331792903" calcext:value-type="float">
            <text:p>203174</text:p>
          </table:table-cell>
          <table:table-cell table:style-name="ce203" table:formula="of:=STDEVP([.B11:.F11])/AVERAGE([.B11:.F11])" office:value-type="percentage" office:value="0.0262561778833072" calcext:value-type="percentage">
            <text:p>2.6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85" table:formula="of:=(MAX([.B11:.F11])-MIN([.B11:.F11]))/[.H11]*5" office:value-type="percentage" office:value="0.0717856427595718" calcext:value-type="percentage">
            <text:p>7.2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7</text:p>
          </table:table-cell>
          <table:table-cell office:value-type="float" office:value="37114" calcext:value-type="float">
            <text:p>37114</text:p>
          </table:table-cell>
          <table:table-cell office:value-type="float" office:value="35112" calcext:value-type="float">
            <text:p>35112</text:p>
          </table:table-cell>
          <table:table-cell office:value-type="float" office:value="34866" calcext:value-type="float">
            <text:p>34866</text:p>
          </table:table-cell>
          <table:table-cell office:value-type="float" office:value="35188" calcext:value-type="float">
            <text:p>35188</text:p>
          </table:table-cell>
          <table:table-cell office:value-type="float" office:value="35013" calcext:value-type="float">
            <text:p>35013</text:p>
          </table:table-cell>
          <table:table-cell table:style-name="ce76" table:formula="of:=SUMPRODUCT(([.B12:.F12]&lt;&gt;&quot;&quot;)*([.B12:.F12]/[.B$8:.F$8]) / SUM([.B12:.F12]&lt;&gt;&quot;&quot;))" office:value-type="float" office:value="4590.5466653819" calcext:value-type="float">
            <text:p>4590.5</text:p>
          </table:table-cell>
          <table:table-cell table:style-name="ce282" table:formula="of:=[.G12]*[.H$8]" office:value-type="float" office:value="177452.089267163" calcext:value-type="float">
            <text:p>177452</text:p>
          </table:table-cell>
          <table:table-cell table:style-name="ce203" table:formula="of:=STDEVP([.B12:.F12])/AVERAGE([.B12:.F12])" office:value-type="percentage" office:value="0.0235395160928278" calcext:value-type="percentage">
            <text:p>2.4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85" table:formula="of:=(MAX([.B12:.F12])-MIN([.B12:.F12]))/[.H12]*5" office:value-type="percentage" office:value="0.0633410406516975" calcext:value-type="percentage">
            <text:p>6.3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8</text:p>
          </table:table-cell>
          <table:table-cell office:value-type="float" office:value="32218" calcext:value-type="float">
            <text:p>32218</text:p>
          </table:table-cell>
          <table:table-cell office:value-type="float" office:value="30635" calcext:value-type="float">
            <text:p>30635</text:p>
          </table:table-cell>
          <table:table-cell office:value-type="float" office:value="30469" calcext:value-type="float">
            <text:p>30469</text:p>
          </table:table-cell>
          <table:table-cell office:value-type="float" office:value="30701" calcext:value-type="float">
            <text:p>30701</text:p>
          </table:table-cell>
          <table:table-cell office:value-type="float" office:value="30462" calcext:value-type="float">
            <text:p>30462</text:p>
          </table:table-cell>
          <table:table-cell table:style-name="ce76" table:formula="of:=SUMPRODUCT(([.B13:.F13]&lt;&gt;&quot;&quot;)*([.B13:.F13]/[.B$8:.F$8]) / SUM([.B13:.F13]&lt;&gt;&quot;&quot;))" office:value-type="float" office:value="3999.83890089854" calcext:value-type="float">
            <text:p>3999.8</text:p>
          </table:table-cell>
          <table:table-cell table:style-name="ce282" table:formula="of:=[.G13]*[.H$8]" office:value-type="float" office:value="154617.700556034" calcext:value-type="float">
            <text:p>154618</text:p>
          </table:table-cell>
          <table:table-cell table:style-name="ce203" table:formula="of:=STDEVP([.B13:.F13])/AVERAGE([.B13:.F13])" office:value-type="percentage" office:value="0.0215881718308006" calcext:value-type="percentage">
            <text:p>2.2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85" table:formula="of:=(MAX([.B13:.F13])-MIN([.B13:.F13]))/[.H13]*5" office:value-type="percentage" office:value="0.0567852190818095" calcext:value-type="percentage">
            <text:p>5.7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9</text:p>
          </table:table-cell>
          <table:table-cell office:value-type="float" office:value="27870" calcext:value-type="float">
            <text:p>27870</text:p>
          </table:table-cell>
          <table:table-cell office:value-type="float" office:value="26631" calcext:value-type="float">
            <text:p>26631</text:p>
          </table:table-cell>
          <table:table-cell office:value-type="float" office:value="26548" calcext:value-type="float">
            <text:p>26548</text:p>
          </table:table-cell>
          <table:table-cell office:value-type="float" office:value="26503" calcext:value-type="float">
            <text:p>26503</text:p>
          </table:table-cell>
          <table:table-cell office:value-type="float" office:value="26443" calcext:value-type="float">
            <text:p>26443</text:p>
          </table:table-cell>
          <table:table-cell table:style-name="ce76" table:formula="of:=SUMPRODUCT(([.B14:.F14]&lt;&gt;&quot;&quot;)*([.B14:.F14]/[.B$8:.F$8]) / SUM([.B14:.F14]&lt;&gt;&quot;&quot;))" office:value-type="float" office:value="3469.23835135167" calcext:value-type="float">
            <text:p>3469.2</text:p>
          </table:table-cell>
          <table:table-cell table:style-name="ce282" table:formula="of:=[.G14]*[.H$8]" office:value-type="float" office:value="134106.81526356" calcext:value-type="float">
            <text:p>134107</text:p>
          </table:table-cell>
          <table:table-cell table:style-name="ce203" table:formula="of:=STDEVP([.B14:.F14])/AVERAGE([.B14:.F14])" office:value-type="percentage" office:value="0.0201127807704931" calcext:value-type="percentage">
            <text:p>2.0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85" table:formula="of:=(MAX([.B14:.F14])-MIN([.B14:.F14]))/[.H14]*5" office:value-type="percentage" office:value="0.0532038583272417" calcext:value-type="percentage">
            <text:p>5.3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10</text:p>
          </table:table-cell>
          <table:table-cell office:value-type="float" office:value="23724" calcext:value-type="float">
            <text:p>23724</text:p>
          </table:table-cell>
          <table:table-cell office:value-type="float" office:value="22805" calcext:value-type="float">
            <text:p>22805</text:p>
          </table:table-cell>
          <table:table-cell office:value-type="float" office:value="22802" calcext:value-type="float">
            <text:p>22802</text:p>
          </table:table-cell>
          <table:table-cell office:value-type="float" office:value="22703" calcext:value-type="float">
            <text:p>22703</text:p>
          </table:table-cell>
          <table:table-cell office:value-type="float" office:value="22630" calcext:value-type="float">
            <text:p>22630</text:p>
          </table:table-cell>
          <table:table-cell table:style-name="ce76" table:formula="of:=SUMPRODUCT(([.B15:.F15]&lt;&gt;&quot;&quot;)*([.B15:.F15]/[.B$8:.F$8]) / SUM([.B15:.F15]&lt;&gt;&quot;&quot;))" office:value-type="float" office:value="2968.58329311869" calcext:value-type="float">
            <text:p>2968.6</text:p>
          </table:table-cell>
          <table:table-cell table:style-name="ce282" table:formula="of:=[.G15]*[.H$8]" office:value-type="float" office:value="114753.502344297" calcext:value-type="float">
            <text:p>114754</text:p>
          </table:table-cell>
          <table:table-cell table:style-name="ce203" table:formula="of:=STDEVP([.B15:.F15])/AVERAGE([.B15:.F15])" office:value-type="percentage" office:value="0.0174851083767983" calcext:value-type="percentage">
            <text:p>1.7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85" table:formula="of:=(MAX([.B15:.F15])-MIN([.B15:.F15]))/[.H15]*5" office:value-type="percentage" office:value="0.0476673904347449" calcext:value-type="percentage">
            <text:p>4.8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4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1</text:p>
          </table:table-cell>
          <table:table-cell office:value-type="float" office:value="20110" calcext:value-type="float">
            <text:p>20110</text:p>
          </table:table-cell>
          <table:table-cell office:value-type="float" office:value="19407" calcext:value-type="float">
            <text:p>19407</text:p>
          </table:table-cell>
          <table:table-cell office:value-type="float" office:value="19379" calcext:value-type="float">
            <text:p>19379</text:p>
          </table:table-cell>
          <table:table-cell office:value-type="float" office:value="19347" calcext:value-type="float">
            <text:p>19347</text:p>
          </table:table-cell>
          <table:table-cell office:value-type="float" office:value="19281" calcext:value-type="float">
            <text:p>19281</text:p>
          </table:table-cell>
          <table:table-cell table:style-name="ce76" table:formula="of:=SUMPRODUCT(([.B16:.F16]&lt;&gt;&quot;&quot;)*([.B16:.F16]/[.B$8:.F$8]) / SUM([.B16:.F16]&lt;&gt;&quot;&quot;))" office:value-type="float" office:value="2524.74340097294" calcext:value-type="float">
            <text:p>2524.7</text:p>
          </table:table-cell>
          <table:table-cell table:style-name="ce282" table:formula="of:=[.G16]*[.H$8]" office:value-type="float" office:value="97596.4354626289" calcext:value-type="float">
            <text:p>97596</text:p>
          </table:table-cell>
          <table:table-cell table:style-name="ce203" table:formula="of:=STDEVP([.B16:.F16])/AVERAGE([.B16:.F16])" office:value-type="percentage" office:value="0.0156627029602837" calcext:value-type="percentage">
            <text:p>1.6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85" table:formula="of:=(MAX([.B16:.F16])-MIN([.B16:.F16]))/[.H16]*5" office:value-type="percentage" office:value="0.0424708134098523" calcext:value-type="percentage">
            <text:p>4.2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2</text:p>
          </table:table-cell>
          <table:table-cell office:value-type="float" office:value="16727" calcext:value-type="float">
            <text:p>16727</text:p>
          </table:table-cell>
          <table:table-cell office:value-type="float" office:value="16277" calcext:value-type="float">
            <text:p>16277</text:p>
          </table:table-cell>
          <table:table-cell office:value-type="float" office:value="16208" calcext:value-type="float">
            <text:p>16208</text:p>
          </table:table-cell>
          <table:table-cell office:value-type="float" office:value="16293" calcext:value-type="float">
            <text:p>16293</text:p>
          </table:table-cell>
          <table:table-cell office:value-type="float" office:value="16075" calcext:value-type="float">
            <text:p>16075</text:p>
          </table:table-cell>
          <table:table-cell table:style-name="ce76" table:formula="of:=SUMPRODUCT(([.B17:.F17]&lt;&gt;&quot;&quot;)*([.B17:.F17]/[.B$8:.F$8]) / SUM([.B17:.F17]&lt;&gt;&quot;&quot;))" office:value-type="float" office:value="2111.84798233816" calcext:value-type="float">
            <text:p>2111.8</text:p>
          </table:table-cell>
          <table:table-cell table:style-name="ce282" table:formula="of:=[.G17]*[.H$8]" office:value-type="float" office:value="81635.5575920004" calcext:value-type="float">
            <text:p>81636</text:p>
          </table:table-cell>
          <table:table-cell table:style-name="ce203" table:formula="of:=STDEVP([.B17:.F17])/AVERAGE([.B17:.F17])" office:value-type="percentage" office:value="0.0134478786107793" calcext:value-type="percentage">
            <text:p>1.3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style-name="ce285" table:formula="of:=(MAX([.B17:.F17])-MIN([.B17:.F17]))/[.H17]*5" office:value-type="percentage" office:value="0.0399335791432073" calcext:value-type="percentage">
            <text:p>4.0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3</text:p>
          </table:table-cell>
          <table:table-cell office:value-type="float" office:value="13723" calcext:value-type="float">
            <text:p>13723</text:p>
          </table:table-cell>
          <table:table-cell office:value-type="float" office:value="13387" calcext:value-type="float">
            <text:p>13387</text:p>
          </table:table-cell>
          <table:table-cell office:value-type="float" office:value="13317" calcext:value-type="float">
            <text:p>13317</text:p>
          </table:table-cell>
          <table:table-cell office:value-type="float" office:value="13418" calcext:value-type="float">
            <text:p>13418</text:p>
          </table:table-cell>
          <table:table-cell office:value-type="float" office:value="13203" calcext:value-type="float">
            <text:p>13203</text:p>
          </table:table-cell>
          <table:table-cell table:style-name="ce76" table:formula="of:=SUMPRODUCT(([.B18:.F18]&lt;&gt;&quot;&quot;)*([.B18:.F18]/[.B$8:.F$8]) / SUM([.B18:.F18]&lt;&gt;&quot;&quot;))" office:value-type="float" office:value="1735.62662549431" calcext:value-type="float">
            <text:p>1735.6</text:p>
          </table:table-cell>
          <table:table-cell table:style-name="ce282" table:formula="of:=[.G18]*[.H$8]" office:value-type="float" office:value="67092.3515938287" calcext:value-type="float">
            <text:p>67092</text:p>
          </table:table-cell>
          <table:table-cell table:style-name="ce203" table:formula="of:=STDEVP([.B18:.F18])/AVERAGE([.B18:.F18])" office:value-type="percentage" office:value="0.0129190472885953" calcext:value-type="percentage">
            <text:p>1.3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style-name="ce285" table:formula="of:=(MAX([.B18:.F18])-MIN([.B18:.F18]))/[.H18]*5" office:value-type="percentage" office:value="0.0387525543260158" calcext:value-type="percentage">
            <text:p>3.9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4</text:p>
          </table:table-cell>
          <table:table-cell office:value-type="float" office:value="11065" calcext:value-type="float">
            <text:p>11065</text:p>
          </table:table-cell>
          <table:table-cell office:value-type="float" office:value="10720" calcext:value-type="float">
            <text:p>10720</text:p>
          </table:table-cell>
          <table:table-cell office:value-type="float" office:value="10737" calcext:value-type="float">
            <text:p>10737</text:p>
          </table:table-cell>
          <table:table-cell office:value-type="float" office:value="10822" calcext:value-type="float">
            <text:p>10822</text:p>
          </table:table-cell>
          <table:table-cell office:value-type="float" office:value="10720" calcext:value-type="float">
            <text:p>10720</text:p>
          </table:table-cell>
          <table:table-cell table:style-name="ce76" table:formula="of:=SUMPRODUCT(([.B19:.F19]&lt;&gt;&quot;&quot;)*([.B19:.F19]/[.B$8:.F$8]) / SUM([.B19:.F19]&lt;&gt;&quot;&quot;))" office:value-type="float" office:value="1399.51602528773" calcext:value-type="float">
            <text:p>1399.5</text:p>
          </table:table-cell>
          <table:table-cell table:style-name="ce282" table:formula="of:=[.G19]*[.H$8]" office:value-type="float" office:value="54099.6662822341" calcext:value-type="float">
            <text:p>54100</text:p>
          </table:table-cell>
          <table:table-cell table:style-name="ce203" table:formula="of:=STDEVP([.B19:.F19])/AVERAGE([.B19:.F19])" office:value-type="percentage" office:value="0.0121753979009151" calcext:value-type="percentage">
            <text:p>1.2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style-name="ce285" table:formula="of:=(MAX([.B19:.F19])-MIN([.B19:.F19]))/[.H19]*5" office:value-type="percentage" office:value="0.031885594099616" calcext:value-type="percentage">
            <text:p>3.2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5</text:p>
          </table:table-cell>
          <table:table-cell office:value-type="float" office:value="8743" calcext:value-type="float">
            <text:p>8743</text:p>
          </table:table-cell>
          <table:table-cell office:value-type="float" office:value="8485" calcext:value-type="float">
            <text:p>8485</text:p>
          </table:table-cell>
          <table:table-cell office:value-type="float" office:value="8511" calcext:value-type="float">
            <text:p>8511</text:p>
          </table:table-cell>
          <table:table-cell office:value-type="float" office:value="8577" calcext:value-type="float">
            <text:p>8577</text:p>
          </table:table-cell>
          <table:table-cell office:value-type="float" office:value="8471" calcext:value-type="float">
            <text:p>8471</text:p>
          </table:table-cell>
          <table:table-cell table:style-name="ce76" table:formula="of:=SUMPRODUCT(([.B20:.F20]&lt;&gt;&quot;&quot;)*([.B20:.F20]/[.B$8:.F$8]) / SUM([.B20:.F20]&lt;&gt;&quot;&quot;))" office:value-type="float" office:value="1107.57927860425" calcext:value-type="float">
            <text:p>1107.6</text:p>
          </table:table-cell>
          <table:table-cell table:style-name="ce282" table:formula="of:=[.G20]*[.H$8]" office:value-type="float" office:value="42814.5646572989" calcext:value-type="float">
            <text:p>42815</text:p>
          </table:table-cell>
          <table:table-cell table:style-name="ce203" table:formula="of:=STDEVP([.B20:.F20])/AVERAGE([.B20:.F20])" office:value-type="percentage" office:value="0.0116496507975288" calcext:value-type="percentage">
            <text:p>1.2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style-name="ce285" table:formula="of:=(MAX([.B20:.F20])-MIN([.B20:.F20]))/[.H20]*5" office:value-type="percentage" office:value="0.031764891477605" calcext:value-type="percentage">
            <text:p>3.2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2">
          <table:table-cell table:style-name="ce16" office:value-type="string" calcext:value-type="string">
            <text:p>count_16</text:p>
          </table:table-cell>
          <table:table-cell office:value-type="float" office:value="6788" calcext:value-type="float">
            <text:p>6788</text:p>
          </table:table-cell>
          <table:table-cell office:value-type="float" office:value="6603" calcext:value-type="float">
            <text:p>6603</text:p>
          </table:table-cell>
          <table:table-cell office:value-type="float" office:value="6570" calcext:value-type="float">
            <text:p>6570</text:p>
          </table:table-cell>
          <table:table-cell office:value-type="float" office:value="6597" calcext:value-type="float">
            <text:p>6597</text:p>
          </table:table-cell>
          <table:table-cell office:value-type="float" office:value="6560" calcext:value-type="float">
            <text:p>6560</text:p>
          </table:table-cell>
          <table:table-cell table:style-name="ce76" table:formula="of:=SUMPRODUCT(([.B21:.F21]&lt;&gt;&quot;&quot;)*([.B21:.F21]/[.B$8:.F$8]) / SUM([.B21:.F21]&lt;&gt;&quot;&quot;))" office:value-type="float" office:value="857.315014892876" calcext:value-type="float">
            <text:p>857.3</text:p>
          </table:table-cell>
          <table:table-cell table:style-name="ce282" table:formula="of:=[.G21]*[.H$8]" office:value-type="float" office:value="33140.3537840287" calcext:value-type="float">
            <text:p>33140</text:p>
          </table:table-cell>
          <table:table-cell table:style-name="ce203" table:formula="of:=STDEVP([.B21:.F21])/AVERAGE([.B21:.F21])" office:value-type="percentage" office:value="0.012645422953811" calcext:value-type="percentage">
            <text:p>1.3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style-name="ce285" table:formula="of:=(MAX([.B21:.F21])-MIN([.B21:.F21]))/[.H21]*5" office:value-type="percentage" office:value="0.0343991499737519" calcext:value-type="percentage">
            <text:p>3.4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2">
          <table:table-cell table:style-name="ce16" office:value-type="string" calcext:value-type="string">
            <text:p>count_17</text:p>
          </table:table-cell>
          <table:table-cell office:value-type="float" office:value="5242" calcext:value-type="float">
            <text:p>5242</text:p>
          </table:table-cell>
          <table:table-cell office:value-type="float" office:value="5113" calcext:value-type="float">
            <text:p>5113</text:p>
          </table:table-cell>
          <table:table-cell office:value-type="float" office:value="5025" calcext:value-type="float">
            <text:p>5025</text:p>
          </table:table-cell>
          <table:table-cell office:value-type="float" office:value="5088" calcext:value-type="float">
            <text:p>5088</text:p>
          </table:table-cell>
          <table:table-cell office:value-type="float" office:value="5031" calcext:value-type="float">
            <text:p>5031</text:p>
          </table:table-cell>
          <table:table-cell table:style-name="ce76" table:formula="of:=SUMPRODUCT(([.B22:.F22]&lt;&gt;&quot;&quot;)*([.B22:.F22]/[.B$8:.F$8]) / SUM([.B22:.F22]&lt;&gt;&quot;&quot;))" office:value-type="float" office:value="660.101590582903" calcext:value-type="float">
            <text:p>660.1</text:p>
          </table:table-cell>
          <table:table-cell table:style-name="ce282" table:formula="of:=[.G22]*[.H$8]" office:value-type="float" office:value="25516.8752037441" calcext:value-type="float">
            <text:p>25517</text:p>
          </table:table-cell>
          <table:table-cell table:style-name="ce203" table:formula="of:=STDEVP([.B22:.F22])/AVERAGE([.B22:.F22])" office:value-type="percentage" office:value="0.0154056318571926" calcext:value-type="percentage">
            <text:p>1.5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style-name="ce285" table:formula="of:=(MAX([.B22:.F22])-MIN([.B22:.F22]))/[.H22]*5" office:value-type="percentage" office:value="0.0425208804501579" calcext:value-type="percentage">
            <text:p>4.3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2">
          <table:table-cell table:style-name="ce16" office:value-type="string" calcext:value-type="string">
            <text:p>count_18</text:p>
          </table:table-cell>
          <table:table-cell office:value-type="float" office:value="4013" calcext:value-type="float">
            <text:p>4013</text:p>
          </table:table-cell>
          <table:table-cell office:value-type="float" office:value="3938" calcext:value-type="float">
            <text:p>3938</text:p>
          </table:table-cell>
          <table:table-cell office:value-type="float" office:value="3863" calcext:value-type="float">
            <text:p>3863</text:p>
          </table:table-cell>
          <table:table-cell office:value-type="float" office:value="3961" calcext:value-type="float">
            <text:p>3961</text:p>
          </table:table-cell>
          <table:table-cell office:value-type="float" office:value="3864" calcext:value-type="float">
            <text:p>3864</text:p>
          </table:table-cell>
          <table:table-cell table:style-name="ce76" table:formula="of:=SUMPRODUCT(([.B23:.F23]&lt;&gt;&quot;&quot;)*([.B23:.F23]/[.B$8:.F$8]) / SUM([.B23:.F23]&lt;&gt;&quot;&quot;))" office:value-type="float" office:value="508.367355351434" calcext:value-type="float">
            <text:p>508.4</text:p>
          </table:table-cell>
          <table:table-cell table:style-name="ce282" table:formula="of:=[.G23]*[.H$8]" office:value-type="float" office:value="19651.4393378526" calcext:value-type="float">
            <text:p>19651</text:p>
          </table:table-cell>
          <table:table-cell table:style-name="ce203" table:formula="of:=STDEVP([.B23:.F23])/AVERAGE([.B23:.F23])" office:value-type="percentage" office:value="0.0147290893001816" calcext:value-type="percentage">
            <text:p>1.5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style-name="ce285" table:formula="of:=(MAX([.B23:.F23])-MIN([.B23:.F23]))/[.H23]*5" office:value-type="percentage" office:value="0.0381651433824162" calcext:value-type="percentage">
            <text:p>3.8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19</text:p>
          </table:table-cell>
          <table:table-cell office:value-type="float" office:value="3021" calcext:value-type="float">
            <text:p>3021</text:p>
          </table:table-cell>
          <table:table-cell office:value-type="float" office:value="3025" calcext:value-type="float">
            <text:p>3025</text:p>
          </table:table-cell>
          <table:table-cell office:value-type="float" office:value="2960" calcext:value-type="float">
            <text:p>2960</text:p>
          </table:table-cell>
          <table:table-cell office:value-type="float" office:value="3057" calcext:value-type="float">
            <text:p>3057</text:p>
          </table:table-cell>
          <table:table-cell office:value-type="float" office:value="2943" calcext:value-type="float">
            <text:p>2943</text:p>
          </table:table-cell>
          <table:table-cell table:style-name="ce76" table:formula="of:=SUMPRODUCT(([.B24:.F24]&lt;&gt;&quot;&quot;)*([.B24:.F24]/[.B$8:.F$8]) / SUM([.B24:.F24]&lt;&gt;&quot;&quot;))" office:value-type="float" office:value="388.378580034773" calcext:value-type="float">
            <text:p>388.4</text:p>
          </table:table-cell>
          <table:table-cell table:style-name="ce282" table:formula="of:=[.G24]*[.H$8]" office:value-type="float" office:value="15013.1553990097" calcext:value-type="float">
            <text:p>15013</text:p>
          </table:table-cell>
          <table:table-cell table:style-name="ce203" table:formula="of:=STDEVP([.B24:.F24])/AVERAGE([.B24:.F24])" office:value-type="percentage" office:value="0.0142590937478283" calcext:value-type="percentage">
            <text:p>1.4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" calcext:value-type="percentage">
            <text:p>11.0%</text:p>
          </table:table-cell>
          <table:table-cell table:style-name="ce285" table:formula="of:=(MAX([.B24:.F24])-MIN([.B24:.F24]))/[.H24]*5" office:value-type="percentage" office:value="0.0379667021922385" calcext:value-type="percentage">
            <text:p>3.8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2">
          <table:table-cell table:style-name="ce16" office:value-type="string" calcext:value-type="string">
            <text:p>count_20</text:p>
          </table:table-cell>
          <table:table-cell office:value-type="float" office:value="2293" calcext:value-type="float">
            <text:p>2293</text:p>
          </table:table-cell>
          <table:table-cell office:value-type="float" office:value="2276" calcext:value-type="float">
            <text:p>2276</text:p>
          </table:table-cell>
          <table:table-cell office:value-type="float" office:value="2280" calcext:value-type="float">
            <text:p>2280</text:p>
          </table:table-cell>
          <table:table-cell office:value-type="float" office:value="2343" calcext:value-type="float">
            <text:p>2343</text:p>
          </table:table-cell>
          <table:table-cell office:value-type="float" office:value="2240" calcext:value-type="float">
            <text:p>2240</text:p>
          </table:table-cell>
          <table:table-cell table:style-name="ce76" table:formula="of:=SUMPRODUCT(([.B25:.F25]&lt;&gt;&quot;&quot;)*([.B25:.F25]/[.B$8:.F$8]) / SUM([.B25:.F25]&lt;&gt;&quot;&quot;))" office:value-type="float" office:value="295.869539920932" calcext:value-type="float">
            <text:p>295.9</text:p>
          </table:table-cell>
          <table:table-cell table:style-name="ce282" table:formula="of:=[.G25]*[.H$8]" office:value-type="float" office:value="11437.1276095318" calcext:value-type="float">
            <text:p>11437</text:p>
          </table:table-cell>
          <table:table-cell table:style-name="ce203" table:formula="of:=STDEVP([.B25:.F25])/AVERAGE([.B25:.F25])" office:value-type="percentage" office:value="0.0145706180941561" calcext:value-type="percentage">
            <text:p>1.5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" calcext:value-type="percentage">
            <text:p>11.0%</text:p>
          </table:table-cell>
          <table:table-cell table:style-name="ce285" table:formula="of:=(MAX([.B25:.F25])-MIN([.B25:.F25]))/[.H25]*5" office:value-type="percentage" office:value="0.0450287884845137" calcext:value-type="percentage">
            <text:p>4.5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2">
          <table:table-cell table:style-name="ce16" office:value-type="string" calcext:value-type="string">
            <text:p>count_21</text:p>
          </table:table-cell>
          <table:table-cell office:value-type="float" office:value="1758" calcext:value-type="float">
            <text:p>1758</text:p>
          </table:table-cell>
          <table:table-cell office:value-type="float" office:value="1761" calcext:value-type="float">
            <text:p>1761</text:p>
          </table:table-cell>
          <table:table-cell office:value-type="float" office:value="1726" calcext:value-type="float">
            <text:p>1726</text:p>
          </table:table-cell>
          <table:table-cell office:value-type="float" office:value="1810" calcext:value-type="float">
            <text:p>1810</text:p>
          </table:table-cell>
          <table:table-cell office:value-type="float" office:value="1716" calcext:value-type="float">
            <text:p>1716</text:p>
          </table:table-cell>
          <table:table-cell table:style-name="ce76" table:formula="of:=SUMPRODUCT(([.B26:.F26]&lt;&gt;&quot;&quot;)*([.B26:.F26]/[.B$8:.F$8]) / SUM([.B26:.F26]&lt;&gt;&quot;&quot;))" office:value-type="float" office:value="226.995780758952" calcext:value-type="float">
            <text:p>227.0</text:p>
          </table:table-cell>
          <table:table-cell table:style-name="ce282" table:formula="of:=[.G26]*[.H$8]" office:value-type="float" office:value="8774.744815094" calcext:value-type="float">
            <text:p>8775</text:p>
          </table:table-cell>
          <table:table-cell table:style-name="ce203" table:formula="of:=STDEVP([.B26:.F26])/AVERAGE([.B26:.F26])" office:value-type="percentage" office:value="0.0187839884406512" calcext:value-type="percentage">
            <text:p>1.9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3" calcext:value-type="percentage">
            <text:p>11.3%</text:p>
          </table:table-cell>
          <table:table-cell table:style-name="ce285" table:formula="of:=(MAX([.B26:.F26])-MIN([.B26:.F26]))/[.H26]*5" office:value-type="percentage" office:value="0.0535628112160621" calcext:value-type="percentage">
            <text:p>5.4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2</text:p>
          </table:table-cell>
          <table:table-cell office:value-type="float" office:value="1343" calcext:value-type="float">
            <text:p>1343</text:p>
          </table:table-cell>
          <table:table-cell office:value-type="float" office:value="1332" calcext:value-type="float">
            <text:p>1332</text:p>
          </table:table-cell>
          <table:table-cell office:value-type="float" office:value="1301" calcext:value-type="float">
            <text:p>1301</text:p>
          </table:table-cell>
          <table:table-cell office:value-type="float" office:value="1374" calcext:value-type="float">
            <text:p>1374</text:p>
          </table:table-cell>
          <table:table-cell office:value-type="float" office:value="1302" calcext:value-type="float">
            <text:p>1302</text:p>
          </table:table-cell>
          <table:table-cell table:style-name="ce76" table:formula="of:=SUMPRODUCT(([.B27:.F27]&lt;&gt;&quot;&quot;)*([.B27:.F27]/[.B$8:.F$8]) / SUM([.B27:.F27]&lt;&gt;&quot;&quot;))" office:value-type="float" office:value="172.167657963592" calcext:value-type="float">
            <text:p>172.2</text:p>
          </table:table-cell>
          <table:table-cell table:style-name="ce282" table:formula="of:=[.G27]*[.H$8]" office:value-type="float" office:value="6655.30988722276" calcext:value-type="float">
            <text:p>6655</text:p>
          </table:table-cell>
          <table:table-cell table:style-name="ce203" table:formula="of:=STDEVP([.B27:.F27])/AVERAGE([.B27:.F27])" office:value-type="percentage" office:value="0.0205387207517782" calcext:value-type="percentage">
            <text:p>2.1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3" calcext:value-type="percentage">
            <text:p>11.3%</text:p>
          </table:table-cell>
          <table:table-cell table:style-name="ce285" table:formula="of:=(MAX([.B27:.F27])-MIN([.B27:.F27]))/[.H27]*5" office:value-type="percentage" office:value="0.0548434267051558" calcext:value-type="percentage">
            <text:p>5.5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3</text:p>
          </table:table-cell>
          <table:table-cell office:value-type="float" office:value="1017" calcext:value-type="float">
            <text:p>1017</text:p>
          </table:table-cell>
          <table:table-cell office:value-type="float" office:value="1024" calcext:value-type="float">
            <text:p>1024</text:p>
          </table:table-cell>
          <table:table-cell office:value-type="float" office:value="984" calcext:value-type="float">
            <text:p>984</text:p>
          </table:table-cell>
          <table:table-cell office:value-type="float" office:value="1032" calcext:value-type="float">
            <text:p>1032</text:p>
          </table:table-cell>
          <table:table-cell office:value-type="float" office:value="959" calcext:value-type="float">
            <text:p>959</text:p>
          </table:table-cell>
          <table:table-cell table:style-name="ce76" table:formula="of:=SUMPRODUCT(([.B28:.F28]&lt;&gt;&quot;&quot;)*([.B28:.F28]/[.B$8:.F$8]) / SUM([.B28:.F28]&lt;&gt;&quot;&quot;))" office:value-type="float" office:value="129.831360590486" calcext:value-type="float">
            <text:p>129.8</text:p>
          </table:table-cell>
          <table:table-cell table:style-name="ce282" table:formula="of:=[.G28]*[.H$8]" office:value-type="float" office:value="5018.75873802133" calcext:value-type="float">
            <text:p>5019</text:p>
          </table:table-cell>
          <table:table-cell table:style-name="ce203" table:formula="of:=STDEVP([.B28:.F28])/AVERAGE([.B28:.F28])" office:value-type="percentage" office:value="0.0273888909927252" calcext:value-type="percentage">
            <text:p>2.7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3" calcext:value-type="percentage">
            <text:p>11.3%</text:p>
          </table:table-cell>
          <table:table-cell table:style-name="ce285" table:formula="of:=(MAX([.B28:.F28])-MIN([.B28:.F28]))/[.H28]*5" office:value-type="percentage" office:value="0.0727271461038398" calcext:value-type="percentage">
            <text:p>7.3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4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34" calcext:value-type="float">
            <text:p>734</text:p>
          </table:table-cell>
          <table:table-cell office:value-type="float" office:value="761" calcext:value-type="float">
            <text:p>761</text:p>
          </table:table-cell>
          <table:table-cell office:value-type="float" office:value="695" calcext:value-type="float">
            <text:p>695</text:p>
          </table:table-cell>
          <table:table-cell table:style-name="ce76" table:formula="of:=SUMPRODUCT(([.B29:.F29]&lt;&gt;&quot;&quot;)*([.B29:.F29]/[.B$8:.F$8]) / SUM([.B29:.F29]&lt;&gt;&quot;&quot;))" office:value-type="float" office:value="96.6428726653146" calcext:value-type="float">
            <text:p>96.6</text:p>
          </table:table-cell>
          <table:table-cell table:style-name="ce282" table:formula="of:=[.G29]*[.H$8]" office:value-type="float" office:value="3735.8251461787" calcext:value-type="float">
            <text:p>3736</text:p>
          </table:table-cell>
          <table:table-cell table:style-name="ce203" table:formula="of:=STDEVP([.B29:.F29])/AVERAGE([.B29:.F29])" office:value-type="percentage" office:value="0.0391381472281374" calcext:value-type="percentage">
            <text:p>3.9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19" calcext:value-type="percentage">
            <text:p>11.9%</text:p>
          </table:table-cell>
          <table:table-cell table:style-name="ce285" table:formula="of:=(MAX([.B29:.F29])-MIN([.B29:.F29]))/[.H29]*5" office:value-type="percentage" office:value="0.103056215142673" calcext:value-type="percentage">
            <text:p>10.3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5</text:p>
          </table:table-cell>
          <table:table-cell office:value-type="float" office:value="562" calcext:value-type="float">
            <text:p>562</text:p>
          </table:table-cell>
          <table:table-cell office:value-type="float" office:value="578" calcext:value-type="float">
            <text:p>578</text:p>
          </table:table-cell>
          <table:table-cell office:value-type="float" office:value="547" calcext:value-type="float">
            <text:p>547</text:p>
          </table:table-cell>
          <table:table-cell office:value-type="float" office:value="566" calcext:value-type="float">
            <text:p>566</text:p>
          </table:table-cell>
          <table:table-cell office:value-type="float" office:value="512" calcext:value-type="float">
            <text:p>512</text:p>
          </table:table-cell>
          <table:table-cell table:style-name="ce76" table:formula="of:=SUMPRODUCT(([.B30:.F30]&lt;&gt;&quot;&quot;)*([.B30:.F30]/[.B$8:.F$8]) / SUM([.B30:.F30]&lt;&gt;&quot;&quot;))" office:value-type="float" office:value="71.5706310529116" calcext:value-type="float">
            <text:p>71.6</text:p>
          </table:table-cell>
          <table:table-cell table:style-name="ce282" table:formula="of:=[.G30]*[.H$8]" office:value-type="float" office:value="2766.63302570999" calcext:value-type="float">
            <text:p>2767</text:p>
          </table:table-cell>
          <table:table-cell table:style-name="ce203" table:formula="of:=STDEVP([.B30:.F30])/AVERAGE([.B30:.F30])" office:value-type="percentage" office:value="0.0411725120311254" calcext:value-type="percentage">
            <text:p>4.1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19" calcext:value-type="percentage">
            <text:p>11.9%</text:p>
          </table:table-cell>
          <table:table-cell table:style-name="ce285" table:formula="of:=(MAX([.B30:.F30])-MIN([.B30:.F30]))/[.H30]*5" office:value-type="percentage" office:value="0.119278558787287" calcext:value-type="percentage">
            <text:p>11.9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6</text:p>
          </table:table-cell>
          <table:table-cell office:value-type="float" office:value="414" calcext:value-type="float">
            <text:p>414</text:p>
          </table:table-cell>
          <table:table-cell office:value-type="float" office:value="422" calcext:value-type="float">
            <text:p>422</text:p>
          </table:table-cell>
          <table:table-cell office:value-type="float" office:value="414" calcext:value-type="float">
            <text:p>414</text:p>
          </table:table-cell>
          <table:table-cell office:value-type="float" office:value="394" calcext:value-type="float">
            <text:p>394</text:p>
          </table:table-cell>
          <table:table-cell office:value-type="float" office:value="364" calcext:value-type="float">
            <text:p>364</text:p>
          </table:table-cell>
          <table:table-cell table:style-name="ce76" table:formula="of:=SUMPRODUCT(([.B31:.F31]&lt;&gt;&quot;&quot;)*([.B31:.F31]/[.B$8:.F$8]) / SUM([.B31:.F31]&lt;&gt;&quot;&quot;))" office:value-type="float" office:value="51.98665095108" calcext:value-type="float">
            <text:p>52.0</text:p>
          </table:table-cell>
          <table:table-cell table:style-name="ce282" table:formula="of:=[.G31]*[.H$8]" office:value-type="float" office:value="2009.59504340523" calcext:value-type="float">
            <text:p>2010</text:p>
          </table:table-cell>
          <table:table-cell table:style-name="ce203" table:formula="of:=STDEVP([.B31:.F31])/AVERAGE([.B31:.F31])" office:value-type="percentage" office:value="0.0521745053932621" calcext:value-type="percentage">
            <text:p>5.2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19" calcext:value-type="percentage">
            <text:p>11.9%</text:p>
          </table:table-cell>
          <table:table-cell table:style-name="ce285" table:formula="of:=(MAX([.B31:.F31])-MIN([.B31:.F31]))/[.H31]*5" office:value-type="percentage" office:value="0.144307680769653" calcext:value-type="percentage">
            <text:p>14.4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7</text:p>
          </table:table-cell>
          <table:table-cell office:value-type="float" office:value="292" calcext:value-type="float">
            <text:p>292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282" calcext:value-type="float">
            <text:p>282</text:p>
          </table:table-cell>
          <table:table-cell office:value-type="float" office:value="270" calcext:value-type="float">
            <text:p>270</text:p>
          </table:table-cell>
          <table:table-cell table:style-name="ce76" table:formula="of:=SUMPRODUCT(([.B32:.F32]&lt;&gt;&quot;&quot;)*([.B32:.F32]/[.B$8:.F$8]) / SUM([.B32:.F32]&lt;&gt;&quot;&quot;))" office:value-type="float" office:value="37.7616485108805" calcext:value-type="float">
            <text:p>37.8</text:p>
          </table:table-cell>
          <table:table-cell table:style-name="ce282" table:formula="of:=[.G32]*[.H$8]" office:value-type="float" office:value="1459.71360512692" calcext:value-type="float">
            <text:p>1460</text:p>
          </table:table-cell>
          <table:table-cell table:style-name="ce203" table:formula="of:=STDEVP([.B32:.F32])/AVERAGE([.B32:.F32])" office:value-type="percentage" office:value="0.0502918062449462" calcext:value-type="percentage">
            <text:p>5.0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34" calcext:value-type="percentage">
            <text:p>13.4%</text:p>
          </table:table-cell>
          <table:table-cell table:style-name="ce285" table:formula="of:=(MAX([.B32:.F32])-MIN([.B32:.F32]))/[.H32]*5" office:value-type="percentage" office:value="0.13701317799433" calcext:value-type="percentage">
            <text:p>13.7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8</text:p>
          </table:table-cell>
          <table:table-cell office:value-type="float" office:value="212" calcext:value-type="float">
            <text:p>212</text:p>
          </table:table-cell>
          <table:table-cell office:value-type="float" office:value="238" calcext:value-type="float">
            <text:p>238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183" calcext:value-type="float">
            <text:p>183</text:p>
          </table:table-cell>
          <table:table-cell table:style-name="ce76" table:formula="of:=SUMPRODUCT(([.B33:.F33]&lt;&gt;&quot;&quot;)*([.B33:.F33]/[.B$8:.F$8]) / SUM([.B33:.F33]&lt;&gt;&quot;&quot;))" office:value-type="float" office:value="27.1258507465258" calcext:value-type="float">
            <text:p>27.1</text:p>
          </table:table-cell>
          <table:table-cell table:style-name="ce282" table:formula="of:=[.G33]*[.H$8]" office:value-type="float" office:value="1048.57639819239" calcext:value-type="float">
            <text:p>1049</text:p>
          </table:table-cell>
          <table:table-cell table:style-name="ce203" table:formula="of:=STDEVP([.B33:.F33])/AVERAGE([.B33:.F33])" office:value-type="percentage" office:value="0.0834364589263327" calcext:value-type="percentage">
            <text:p>8.3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34" calcext:value-type="percentage">
            <text:p>13.4%</text:p>
          </table:table-cell>
          <table:table-cell table:style-name="ce285" table:formula="of:=(MAX([.B33:.F33])-MIN([.B33:.F33]))/[.H33]*5" office:value-type="percentage" office:value="0.262260337419443" calcext:value-type="percentage">
            <text:p>26.2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2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table:style-name="ce76" table:formula="of:=SUMPRODUCT(([.B34:.F34]&lt;&gt;&quot;&quot;)*([.B34:.F34]/[.B$8:.F$8]) / SUM([.B34:.F34]&lt;&gt;&quot;&quot;))" office:value-type="float" office:value="18.3099813434189" calcext:value-type="float">
            <text:p>18.3</text:p>
          </table:table-cell>
          <table:table-cell table:style-name="ce282" table:formula="of:=[.G34]*[.H$8]" office:value-type="float" office:value="707.790309231537" calcext:value-type="float">
            <text:p>708</text:p>
          </table:table-cell>
          <table:table-cell table:style-name="ce203" table:formula="of:=STDEVP([.B34:.F34])/AVERAGE([.B34:.F34])" office:value-type="percentage" office:value="0.0978513751424497" calcext:value-type="percentage">
            <text:p>9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56" calcext:value-type="percentage">
            <text:p>15.6%</text:p>
          </table:table-cell>
          <table:table-cell table:style-name="ce285" table:formula="of:=(MAX([.B34:.F34])-MIN([.B34:.F34]))/[.H34]*5" office:value-type="percentage" office:value="0.275505326163219" calcext:value-type="percentage">
            <text:p>27.6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style-name="ce76" table:formula="of:=SUMPRODUCT(([.B35:.F35]&lt;&gt;&quot;&quot;)*([.B35:.F35]/[.B$8:.F$8]) / SUM([.B35:.F35]&lt;&gt;&quot;&quot;))" office:value-type="float" office:value="12.5638177690252" calcext:value-type="float">
            <text:p>12.6</text:p>
          </table:table-cell>
          <table:table-cell table:style-name="ce282" table:formula="of:=[.G35]*[.H$8]" office:value-type="float" office:value="485.666713530719" calcext:value-type="float">
            <text:p>486</text:p>
          </table:table-cell>
          <table:table-cell table:style-name="ce203" table:formula="of:=STDEVP([.B35:.F35])/AVERAGE([.B35:.F35])" office:value-type="percentage" office:value="0.0768715541538443" calcext:value-type="percentage">
            <text:p>7.7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93" calcext:value-type="percentage">
            <text:p>19.3%</text:p>
          </table:table-cell>
          <table:table-cell table:style-name="ce285" table:formula="of:=(MAX([.B35:.F35])-MIN([.B35:.F35]))/[.H35]*5" office:value-type="percentage" office:value="0.175017141656804" calcext:value-type="percentage">
            <text:p>17.5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38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style-name="ce76" table:formula="of:=SUMPRODUCT(([.B36:.F36]&lt;&gt;&quot;&quot;)*([.B36:.F36]/[.B$8:.F$8]) / SUM([.B36:.F36]&lt;&gt;&quot;&quot;))" office:value-type="float" office:value="7.80403843413395" calcext:value-type="float">
            <text:p>7.8</text:p>
          </table:table-cell>
          <table:table-cell table:style-name="ce282" table:formula="of:=[.G36]*[.H$8]" office:value-type="float" office:value="301.67276923719" calcext:value-type="float">
            <text:p>302</text:p>
          </table:table-cell>
          <table:table-cell table:style-name="ce203" table:formula="of:=STDEVP([.B36:.F36])/AVERAGE([.B36:.F36])" office:value-type="percentage" office:value="0.130966135178917" calcext:value-type="percentage">
            <text:p>13.1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193" calcext:value-type="percentage">
            <text:p>19.3%</text:p>
          </table:table-cell>
          <table:table-cell table:style-name="ce285" table:formula="of:=(MAX([.B36:.F36])-MIN([.B36:.F36]))/[.H36]*5" office:value-type="percentage" office:value="0.331485006926081" calcext:value-type="percentage">
            <text:p>33.1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count_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6" table:formula="of:=SUMPRODUCT(([.B37:.F37]&lt;&gt;&quot;&quot;)*([.B37:.F37]/[.B$8:.F$8]) / SUM([.B37:.F37]&lt;&gt;&quot;&quot;))" office:value-type="float" office:value="0.391381184667758" calcext:value-type="float">
            <text:p>0.4</text:p>
          </table:table-cell>
          <table:table-cell table:style-name="ce282" table:formula="of:=[.G37]*[.H$8]" office:value-type="float" office:value="15.1292240296555" calcext:value-type="float">
            <text:p>15</text:p>
          </table:table-cell>
          <table:table-cell table:style-name="ce203" table:formula="of:=STDEVP([.B37:.F37])/AVERAGE([.B37:.F37])" office:value-type="percentage" office:value="0.730296743340221" calcext:value-type="percentage">
            <text:p>73.0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285" table:formula="of:=(MAX([.B37:.F37])-MIN([.B37:.F37]))/[.H37]*5" office:value-type="percentage" office:value="1.98291729577112" calcext:value-type="percentage">
            <text:p>198.3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2">
          <table:table-cell table:style-name="ce16" office:value-type="string" calcext:value-type="string">
            <text:p>count_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6" table:formula="of:=SUMPRODUCT(([.B38:.F38]&lt;&gt;&quot;&quot;)*([.B38:.F38]/[.B$8:.F$8]) / SUM([.B38:.F38]&lt;&gt;&quot;&quot;))" office:value-type="float" office:value="0.155242902443981" calcext:value-type="float">
            <text:p>0.2</text:p>
          </table:table-cell>
          <table:table-cell table:style-name="ce282" table:formula="of:=[.G38]*[.H$8]" office:value-type="float" office:value="6.00106684250228" calcext:value-type="float">
            <text:p>6</text:p>
          </table:table-cell>
          <table:table-cell table:style-name="ce203" table:formula="of:=STDEVP([.B38:.F38])/AVERAGE([.B38:.F38])" office:value-type="percentage" office:value="0.97182531580755" calcext:value-type="percentage">
            <text:p>97.2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85" table:formula="of:=(MAX([.B38:.F38])-MIN([.B38:.F38]))/[.H38]*5" office:value-type="percentage" office:value="2.49955556131506" calcext:value-type="percentage">
            <text:p>250.0%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style-name="ce284"/>
          <table:table-cell table:number-columns-repeated="2"/>
          <table:table-cell table:style-name="ce287"/>
          <table:table-cell table:number-columns-repeated="38"/>
        </table:table-row>
        <table:table-row table:style-name="ro2">
          <table:table-cell office:value-type="string" calcext:value-type="string">
            <text:p>Table C.2</text:p>
          </table:table-cell>
          <table:table-cell table:number-columns-repeated="6"/>
          <table:table-cell table:style-name="ce284"/>
          <table:table-cell table:number-columns-repeated="2"/>
          <table:table-cell table:style-name="ce287"/>
          <table:table-cell table:number-columns-repeated="38"/>
        </table:table-row>
        <table:table-row table:style-name="ro2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2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2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2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2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2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2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2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2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2">
          <table:table-cell table:number-columns-repeated="49"/>
        </table:table-row>
        <table:table-row table:style-name="ro2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2">
          <table:table-cell office:value-type="float" office:value="7.421026" calcext:value-type="float">
            <text:p>7.421026</text:p>
          </table:table-cell>
          <table:table-cell office:value-type="float" office:value="61393" calcext:value-type="float">
            <text:p>61393</text:p>
          </table:table-cell>
          <table:table-cell office:value-type="float" office:value="52469" calcext:value-type="float">
            <text:p>52469</text:p>
          </table:table-cell>
          <table:table-cell office:value-type="float" office:value="42699" calcext:value-type="float">
            <text:p>42699</text:p>
          </table:table-cell>
          <table:table-cell office:value-type="float" office:value="37114" calcext:value-type="float">
            <text:p>37114</text:p>
          </table:table-cell>
          <table:table-cell office:value-type="float" office:value="32218" calcext:value-type="float">
            <text:p>32218</text:p>
          </table:table-cell>
          <table:table-cell office:value-type="float" office:value="27870" calcext:value-type="float">
            <text:p>27870</text:p>
          </table:table-cell>
          <table:table-cell office:value-type="float" office:value="23724" calcext:value-type="float">
            <text:p>23724</text:p>
          </table:table-cell>
          <table:table-cell office:value-type="float" office:value="20110" calcext:value-type="float">
            <text:p>20110</text:p>
          </table:table-cell>
          <table:table-cell office:value-type="float" office:value="16727" calcext:value-type="float">
            <text:p>16727</text:p>
          </table:table-cell>
          <table:table-cell office:value-type="float" office:value="13723" calcext:value-type="float">
            <text:p>13723</text:p>
          </table:table-cell>
          <table:table-cell office:value-type="float" office:value="11065" calcext:value-type="float">
            <text:p>11065</text:p>
          </table:table-cell>
          <table:table-cell office:value-type="float" office:value="8743" calcext:value-type="float">
            <text:p>8743</text:p>
          </table:table-cell>
          <table:table-cell office:value-type="float" office:value="6788" calcext:value-type="float">
            <text:p>6788</text:p>
          </table:table-cell>
          <table:table-cell office:value-type="float" office:value="5242" calcext:value-type="float">
            <text:p>5242</text:p>
          </table:table-cell>
          <table:table-cell office:value-type="float" office:value="4013" calcext:value-type="float">
            <text:p>4013</text:p>
          </table:table-cell>
          <table:table-cell office:value-type="float" office:value="3021" calcext:value-type="float">
            <text:p>3021</text:p>
          </table:table-cell>
          <table:table-cell office:value-type="float" office:value="2293" calcext:value-type="float">
            <text:p>2293</text:p>
          </table:table-cell>
          <table:table-cell office:value-type="float" office:value="1758" calcext:value-type="float">
            <text:p>1758</text:p>
          </table:table-cell>
          <table:table-cell office:value-type="float" office:value="1343" calcext:value-type="float">
            <text:p>1343</text:p>
          </table:table-cell>
          <table:table-cell office:value-type="float" office:value="1017" calcext:value-type="float">
            <text:p>1017</text:p>
          </table:table-cell>
          <table:table-cell office:value-type="float" office:value="771" calcext:value-type="float">
            <text:p>771</text:p>
          </table:table-cell>
          <table:table-cell office:value-type="float" office:value="562" calcext:value-type="float">
            <text:p>562</text:p>
          </table:table-cell>
          <table:table-cell office:value-type="float" office:value="414" calcext:value-type="float">
            <text:p>414</text:p>
          </table:table-cell>
          <table:table-cell office:value-type="float" office:value="292" calcext:value-type="float">
            <text:p>292</text:p>
          </table:table-cell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7.816224" calcext:value-type="float">
            <text:p>7.816224</text:p>
          </table:table-cell>
          <table:table-cell office:value-type="float" office:value="55912" calcext:value-type="float">
            <text:p>55912</text:p>
          </table:table-cell>
          <table:table-cell office:value-type="float" office:value="45758" calcext:value-type="float">
            <text:p>45758</text:p>
          </table:table-cell>
          <table:table-cell office:value-type="float" office:value="40065" calcext:value-type="float">
            <text:p>40065</text:p>
          </table:table-cell>
          <table:table-cell office:value-type="float" office:value="35112" calcext:value-type="float">
            <text:p>35112</text:p>
          </table:table-cell>
          <table:table-cell office:value-type="float" office:value="30635" calcext:value-type="float">
            <text:p>30635</text:p>
          </table:table-cell>
          <table:table-cell office:value-type="float" office:value="26631" calcext:value-type="float">
            <text:p>26631</text:p>
          </table:table-cell>
          <table:table-cell office:value-type="float" office:value="22805" calcext:value-type="float">
            <text:p>22805</text:p>
          </table:table-cell>
          <table:table-cell office:value-type="float" office:value="19407" calcext:value-type="float">
            <text:p>19407</text:p>
          </table:table-cell>
          <table:table-cell office:value-type="float" office:value="16277" calcext:value-type="float">
            <text:p>16277</text:p>
          </table:table-cell>
          <table:table-cell office:value-type="float" office:value="13387" calcext:value-type="float">
            <text:p>13387</text:p>
          </table:table-cell>
          <table:table-cell office:value-type="float" office:value="10720" calcext:value-type="float">
            <text:p>10720</text:p>
          </table:table-cell>
          <table:table-cell office:value-type="float" office:value="8485" calcext:value-type="float">
            <text:p>8485</text:p>
          </table:table-cell>
          <table:table-cell office:value-type="float" office:value="6603" calcext:value-type="float">
            <text:p>6603</text:p>
          </table:table-cell>
          <table:table-cell office:value-type="float" office:value="5113" calcext:value-type="float">
            <text:p>5113</text:p>
          </table:table-cell>
          <table:table-cell office:value-type="float" office:value="3938" calcext:value-type="float">
            <text:p>3938</text:p>
          </table:table-cell>
          <table:table-cell office:value-type="float" office:value="3025" calcext:value-type="float">
            <text:p>3025</text:p>
          </table:table-cell>
          <table:table-cell office:value-type="float" office:value="2276" calcext:value-type="float">
            <text:p>2276</text:p>
          </table:table-cell>
          <table:table-cell office:value-type="float" office:value="1761" calcext:value-type="float">
            <text:p>1761</text:p>
          </table:table-cell>
          <table:table-cell office:value-type="float" office:value="1332" calcext:value-type="float">
            <text:p>1332</text:p>
          </table:table-cell>
          <table:table-cell office:value-type="float" office:value="1024" calcext:value-type="float">
            <text:p>1024</text:p>
          </table:table-cell>
          <table:table-cell office:value-type="float" office:value="772" calcext:value-type="float">
            <text:p>772</text:p>
          </table:table-cell>
          <table:table-cell office:value-type="float" office:value="578" calcext:value-type="float">
            <text:p>578</text:p>
          </table:table-cell>
          <table:table-cell office:value-type="float" office:value="422" calcext:value-type="float">
            <text:p>422</text:p>
          </table:table-cell>
          <table:table-cell office:value-type="float" office:value="310" calcext:value-type="float">
            <text:p>310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7.775962" calcext:value-type="float">
            <text:p>7.775962</text:p>
          </table:table-cell>
          <table:table-cell office:value-type="float" office:value="55068" calcext:value-type="float">
            <text:p>55068</text:p>
          </table:table-cell>
          <table:table-cell office:value-type="float" office:value="45320" calcext:value-type="float">
            <text:p>45320</text:p>
          </table:table-cell>
          <table:table-cell office:value-type="float" office:value="39782" calcext:value-type="float">
            <text:p>39782</text:p>
          </table:table-cell>
          <table:table-cell office:value-type="float" office:value="34866" calcext:value-type="float">
            <text:p>34866</text:p>
          </table:table-cell>
          <table:table-cell office:value-type="float" office:value="30469" calcext:value-type="float">
            <text:p>30469</text:p>
          </table:table-cell>
          <table:table-cell office:value-type="float" office:value="26548" calcext:value-type="float">
            <text:p>26548</text:p>
          </table:table-cell>
          <table:table-cell office:value-type="float" office:value="22802" calcext:value-type="float">
            <text:p>22802</text:p>
          </table:table-cell>
          <table:table-cell office:value-type="float" office:value="19379" calcext:value-type="float">
            <text:p>19379</text:p>
          </table:table-cell>
          <table:table-cell office:value-type="float" office:value="16208" calcext:value-type="float">
            <text:p>16208</text:p>
          </table:table-cell>
          <table:table-cell office:value-type="float" office:value="13317" calcext:value-type="float">
            <text:p>13317</text:p>
          </table:table-cell>
          <table:table-cell office:value-type="float" office:value="10737" calcext:value-type="float">
            <text:p>10737</text:p>
          </table:table-cell>
          <table:table-cell office:value-type="float" office:value="8511" calcext:value-type="float">
            <text:p>8511</text:p>
          </table:table-cell>
          <table:table-cell office:value-type="float" office:value="6570" calcext:value-type="float">
            <text:p>6570</text:p>
          </table:table-cell>
          <table:table-cell office:value-type="float" office:value="5025" calcext:value-type="float">
            <text:p>5025</text:p>
          </table:table-cell>
          <table:table-cell office:value-type="float" office:value="3863" calcext:value-type="float">
            <text:p>3863</text:p>
          </table:table-cell>
          <table:table-cell office:value-type="float" office:value="2960" calcext:value-type="float">
            <text:p>2960</text:p>
          </table:table-cell>
          <table:table-cell office:value-type="float" office:value="2280" calcext:value-type="float">
            <text:p>2280</text:p>
          </table:table-cell>
          <table:table-cell office:value-type="float" office:value="1726" calcext:value-type="float">
            <text:p>1726</text:p>
          </table:table-cell>
          <table:table-cell office:value-type="float" office:value="1301" calcext:value-type="float">
            <text:p>1301</text:p>
          </table:table-cell>
          <table:table-cell office:value-type="float" office:value="984" calcext:value-type="float">
            <text:p>984</text:p>
          </table:table-cell>
          <table:table-cell office:value-type="float" office:value="734" calcext:value-type="float">
            <text:p>734</text:p>
          </table:table-cell>
          <table:table-cell office:value-type="float" office:value="547" calcext:value-type="float">
            <text:p>547</text:p>
          </table:table-cell>
          <table:table-cell office:value-type="float" office:value="414" calcext:value-type="float">
            <text:p>414</text:p>
          </table:table-cell>
          <table:table-cell office:value-type="float" office:value="305" calcext:value-type="float">
            <text:p>305</text:p>
          </table:table-cell>
          <table:table-cell office:value-type="float" office:value="207" calcext:value-type="float">
            <text:p>207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office:value-type="float" office:value="7.819816" calcext:value-type="float">
            <text:p>7.819816</text:p>
          </table:table-cell>
          <table:table-cell office:value-type="float" office:value="55884" calcext:value-type="float">
            <text:p>55884</text:p>
          </table:table-cell>
          <table:table-cell office:value-type="float" office:value="46036" calcext:value-type="float">
            <text:p>46036</text:p>
          </table:table-cell>
          <table:table-cell office:value-type="float" office:value="40336" calcext:value-type="float">
            <text:p>40336</text:p>
          </table:table-cell>
          <table:table-cell office:value-type="float" office:value="35188" calcext:value-type="float">
            <text:p>35188</text:p>
          </table:table-cell>
          <table:table-cell office:value-type="float" office:value="30701" calcext:value-type="float">
            <text:p>30701</text:p>
          </table:table-cell>
          <table:table-cell office:value-type="float" office:value="26503" calcext:value-type="float">
            <text:p>26503</text:p>
          </table:table-cell>
          <table:table-cell office:value-type="float" office:value="22703" calcext:value-type="float">
            <text:p>22703</text:p>
          </table:table-cell>
          <table:table-cell office:value-type="float" office:value="19347" calcext:value-type="float">
            <text:p>19347</text:p>
          </table:table-cell>
          <table:table-cell office:value-type="float" office:value="16293" calcext:value-type="float">
            <text:p>16293</text:p>
          </table:table-cell>
          <table:table-cell office:value-type="float" office:value="13418" calcext:value-type="float">
            <text:p>13418</text:p>
          </table:table-cell>
          <table:table-cell office:value-type="float" office:value="10822" calcext:value-type="float">
            <text:p>10822</text:p>
          </table:table-cell>
          <table:table-cell office:value-type="float" office:value="8577" calcext:value-type="float">
            <text:p>8577</text:p>
          </table:table-cell>
          <table:table-cell office:value-type="float" office:value="6597" calcext:value-type="float">
            <text:p>6597</text:p>
          </table:table-cell>
          <table:table-cell office:value-type="float" office:value="5088" calcext:value-type="float">
            <text:p>5088</text:p>
          </table:table-cell>
          <table:table-cell office:value-type="float" office:value="3961" calcext:value-type="float">
            <text:p>3961</text:p>
          </table:table-cell>
          <table:table-cell office:value-type="float" office:value="3057" calcext:value-type="float">
            <text:p>3057</text:p>
          </table:table-cell>
          <table:table-cell office:value-type="float" office:value="2343" calcext:value-type="float">
            <text:p>2343</text:p>
          </table:table-cell>
          <table:table-cell office:value-type="float" office:value="1810" calcext:value-type="float">
            <text:p>1810</text:p>
          </table:table-cell>
          <table:table-cell office:value-type="float" office:value="1374" calcext:value-type="float">
            <text:p>1374</text:p>
          </table:table-cell>
          <table:table-cell office:value-type="float" office:value="1032" calcext:value-type="float">
            <text:p>1032</text:p>
          </table:table-cell>
          <table:table-cell office:value-type="float" office:value="761" calcext:value-type="float">
            <text:p>761</text:p>
          </table:table-cell>
          <table:table-cell office:value-type="float" office:value="566" calcext:value-type="float">
            <text:p>566</text:p>
          </table:table-cell>
          <table:table-cell office:value-type="float" office:value="394" calcext:value-type="float">
            <text:p>394</text:p>
          </table:table-cell>
          <table:table-cell office:value-type="float" office:value="282" calcext:value-type="float">
            <text:p>282</text:p>
          </table:table-cell>
          <table:table-cell office:value-type="float" office:value="208" calcext:value-type="float">
            <text:p>208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7.822954" calcext:value-type="float">
            <text:p>7.822954</text:p>
          </table:table-cell>
          <table:table-cell office:value-type="float" office:value="55428" calcext:value-type="float">
            <text:p>55428</text:p>
          </table:table-cell>
          <table:table-cell office:value-type="float" office:value="45662" calcext:value-type="float">
            <text:p>45662</text:p>
          </table:table-cell>
          <table:table-cell office:value-type="float" office:value="40100" calcext:value-type="float">
            <text:p>40100</text:p>
          </table:table-cell>
          <table:table-cell office:value-type="float" office:value="35013" calcext:value-type="float">
            <text:p>35013</text:p>
          </table:table-cell>
          <table:table-cell office:value-type="float" office:value="30462" calcext:value-type="float">
            <text:p>30462</text:p>
          </table:table-cell>
          <table:table-cell office:value-type="float" office:value="26443" calcext:value-type="float">
            <text:p>26443</text:p>
          </table:table-cell>
          <table:table-cell office:value-type="float" office:value="22630" calcext:value-type="float">
            <text:p>22630</text:p>
          </table:table-cell>
          <table:table-cell office:value-type="float" office:value="19281" calcext:value-type="float">
            <text:p>19281</text:p>
          </table:table-cell>
          <table:table-cell office:value-type="float" office:value="16075" calcext:value-type="float">
            <text:p>16075</text:p>
          </table:table-cell>
          <table:table-cell office:value-type="float" office:value="13203" calcext:value-type="float">
            <text:p>13203</text:p>
          </table:table-cell>
          <table:table-cell office:value-type="float" office:value="10720" calcext:value-type="float">
            <text:p>10720</text:p>
          </table:table-cell>
          <table:table-cell office:value-type="float" office:value="8471" calcext:value-type="float">
            <text:p>8471</text:p>
          </table:table-cell>
          <table:table-cell office:value-type="float" office:value="6560" calcext:value-type="float">
            <text:p>6560</text:p>
          </table:table-cell>
          <table:table-cell office:value-type="float" office:value="5031" calcext:value-type="float">
            <text:p>5031</text:p>
          </table:table-cell>
          <table:table-cell office:value-type="float" office:value="3864" calcext:value-type="float">
            <text:p>3864</text:p>
          </table:table-cell>
          <table:table-cell office:value-type="float" office:value="2943" calcext:value-type="float">
            <text:p>2943</text:p>
          </table:table-cell>
          <table:table-cell office:value-type="float" office:value="2240" calcext:value-type="float">
            <text:p>2240</text:p>
          </table:table-cell>
          <table:table-cell office:value-type="float" office:value="1716" calcext:value-type="float">
            <text:p>1716</text:p>
          </table:table-cell>
          <table:table-cell office:value-type="float" office:value="1302" calcext:value-type="float">
            <text:p>1302</text:p>
          </table:table-cell>
          <table:table-cell office:value-type="float" office:value="959" calcext:value-type="float">
            <text:p>959</text:p>
          </table:table-cell>
          <table:table-cell office:value-type="float" office:value="695" calcext:value-type="float">
            <text:p>695</text:p>
          </table:table-cell>
          <table:table-cell office:value-type="float" office:value="512" calcext:value-type="float">
            <text:p>512</text:p>
          </table:table-cell>
          <table:table-cell office:value-type="float" office:value="364" calcext:value-type="float">
            <text:p>364</text:p>
          </table:table-cell>
          <table:table-cell office:value-type="float" office:value="270" calcext:value-type="float">
            <text:p>270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float" office:value="7.769711" calcext:value-type="float">
            <text:p>7.769711</text:p>
          </table:table-cell>
          <table:table-cell office:value-type="float" office:value="55153" calcext:value-type="float">
            <text:p>55153</text:p>
          </table:table-cell>
          <table:table-cell office:value-type="float" office:value="45363" calcext:value-type="float">
            <text:p>45363</text:p>
          </table:table-cell>
          <table:table-cell office:value-type="float" office:value="39794" calcext:value-type="float">
            <text:p>39794</text:p>
          </table:table-cell>
          <table:table-cell office:value-type="float" office:value="34880" calcext:value-type="float">
            <text:p>34880</text:p>
          </table:table-cell>
          <table:table-cell office:value-type="float" office:value="30572" calcext:value-type="float">
            <text:p>30572</text:p>
          </table:table-cell>
          <table:table-cell office:value-type="float" office:value="26420" calcext:value-type="float">
            <text:p>26420</text:p>
          </table:table-cell>
          <table:table-cell office:value-type="float" office:value="22805" calcext:value-type="float">
            <text:p>22805</text:p>
          </table:table-cell>
          <table:table-cell office:value-type="float" office:value="19423" calcext:value-type="float">
            <text:p>19423</text:p>
          </table:table-cell>
          <table:table-cell office:value-type="float" office:value="16277" calcext:value-type="float">
            <text:p>16277</text:p>
          </table:table-cell>
          <table:table-cell office:value-type="float" office:value="13433" calcext:value-type="float">
            <text:p>13433</text:p>
          </table:table-cell>
          <table:table-cell office:value-type="float" office:value="10816" calcext:value-type="float">
            <text:p>10816</text:p>
          </table:table-cell>
          <table:table-cell office:value-type="float" office:value="8593" calcext:value-type="float">
            <text:p>8593</text:p>
          </table:table-cell>
          <table:table-cell office:value-type="float" office:value="6610" calcext:value-type="float">
            <text:p>6610</text:p>
          </table:table-cell>
          <table:table-cell office:value-type="float" office:value="5058" calcext:value-type="float">
            <text:p>5058</text:p>
          </table:table-cell>
          <table:table-cell office:value-type="float" office:value="3849" calcext:value-type="float">
            <text:p>3849</text:p>
          </table:table-cell>
          <table:table-cell office:value-type="float" office:value="2889" calcext:value-type="float">
            <text:p>2889</text:p>
          </table:table-cell>
          <table:table-cell office:value-type="float" office:value="2215" calcext:value-type="float">
            <text:p>2215</text:p>
          </table:table-cell>
          <table:table-cell office:value-type="float" office:value="1660" calcext:value-type="float">
            <text:p>1660</text:p>
          </table:table-cell>
          <table:table-cell office:value-type="float" office:value="1243" calcext:value-type="float">
            <text:p>1243</text:p>
          </table:table-cell>
          <table:table-cell office:value-type="float" office:value="942" calcext:value-type="float">
            <text:p>942</text:p>
          </table:table-cell>
          <table:table-cell office:value-type="float" office:value="686" calcext:value-type="float">
            <text:p>686</text:p>
          </table:table-cell>
          <table:table-cell office:value-type="float" office:value="495" calcext:value-type="float">
            <text:p>495</text:p>
          </table:table-cell>
          <table:table-cell office:value-type="float" office:value="352" calcext:value-type="float">
            <text:p>352</text:p>
          </table:table-cell>
          <table:table-cell office:value-type="float" office:value="244" calcext:value-type="float">
            <text:p>244</text:p>
          </table:table-cell>
          <table:table-cell office:value-type="float" office:value="179" calcext:value-type="float">
            <text:p>179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7.822186" calcext:value-type="float">
            <text:p>7.822186</text:p>
          </table:table-cell>
          <table:table-cell office:value-type="float" office:value="55508" calcext:value-type="float">
            <text:p>55508</text:p>
          </table:table-cell>
          <table:table-cell office:value-type="float" office:value="45587" calcext:value-type="float">
            <text:p>45587</text:p>
          </table:table-cell>
          <table:table-cell office:value-type="float" office:value="39854" calcext:value-type="float">
            <text:p>39854</text:p>
          </table:table-cell>
          <table:table-cell office:value-type="float" office:value="34966" calcext:value-type="float">
            <text:p>34966</text:p>
          </table:table-cell>
          <table:table-cell office:value-type="float" office:value="30550" calcext:value-type="float">
            <text:p>30550</text:p>
          </table:table-cell>
          <table:table-cell office:value-type="float" office:value="26417" calcext:value-type="float">
            <text:p>26417</text:p>
          </table:table-cell>
          <table:table-cell office:value-type="float" office:value="22682" calcext:value-type="float">
            <text:p>22682</text:p>
          </table:table-cell>
          <table:table-cell office:value-type="float" office:value="19343" calcext:value-type="float">
            <text:p>19343</text:p>
          </table:table-cell>
          <table:table-cell office:value-type="float" office:value="16183" calcext:value-type="float">
            <text:p>16183</text:p>
          </table:table-cell>
          <table:table-cell office:value-type="float" office:value="13346" calcext:value-type="float">
            <text:p>13346</text:p>
          </table:table-cell>
          <table:table-cell office:value-type="float" office:value="10756" calcext:value-type="float">
            <text:p>10756</text:p>
          </table:table-cell>
          <table:table-cell office:value-type="float" office:value="8517" calcext:value-type="float">
            <text:p>8517</text:p>
          </table:table-cell>
          <table:table-cell office:value-type="float" office:value="6620" calcext:value-type="float">
            <text:p>6620</text:p>
          </table:table-cell>
          <table:table-cell office:value-type="float" office:value="5050" calcext:value-type="float">
            <text:p>5050</text:p>
          </table:table-cell>
          <table:table-cell office:value-type="float" office:value="3844" calcext:value-type="float">
            <text:p>3844</text:p>
          </table:table-cell>
          <table:table-cell office:value-type="float" office:value="2903" calcext:value-type="float">
            <text:p>2903</text:p>
          </table:table-cell>
          <table:table-cell office:value-type="float" office:value="2201" calcext:value-type="float">
            <text:p>2201</text:p>
          </table:table-cell>
          <table:table-cell office:value-type="float" office:value="1629" calcext:value-type="float">
            <text:p>1629</text:p>
          </table:table-cell>
          <table:table-cell office:value-type="float" office:value="1246" calcext:value-type="float">
            <text:p>1246</text:p>
          </table:table-cell>
          <table:table-cell office:value-type="float" office:value="918" calcext:value-type="float">
            <text:p>918</text:p>
          </table:table-cell>
          <table:table-cell office:value-type="float" office:value="687" calcext:value-type="float">
            <text:p>687</text:p>
          </table:table-cell>
          <table:table-cell office:value-type="float" office:value="520" calcext:value-type="float">
            <text:p>520</text:p>
          </table:table-cell>
          <table:table-cell office:value-type="float" office:value="384" calcext:value-type="float">
            <text:p>384</text:p>
          </table:table-cell>
          <table:table-cell office:value-type="float" office:value="272" calcext:value-type="float">
            <text:p>272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 table:number-rows-repeated="3">
          <table:table-cell table:number-columns-repeated="8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38"/>
        </table:table-row>
        <table:table-row table:style-name="ro2" table:number-rows-repeated="4">
          <table:table-cell table:number-columns-repeated="49"/>
        </table:table-row>
        <table:table-row table:style-name="ro2">
          <table:table-cell table:style-name="ce28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121"/>
          <table:table-cell table:number-columns-repeated="5"/>
          <table:table-cell table:style-name="ce20" table:number-columns-repeated="4"/>
          <table:table-cell table:number-columns-repeated="39"/>
        </table:table-row>
        <table:table-row table:style-name="ro2" table:number-rows-repeated="2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2">
          <table:table-cell table:style-name="ce28"/>
          <table:table-cell table:number-columns-repeated="48"/>
        </table:table-row>
        <table:table-row table:style-name="ro2" table:number-rows-repeated="3">
          <table:table-cell table:number-columns-repeated="49"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2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2">
          <table:table-cell table:number-columns-repeated="10"/>
          <table:table-cell table:style-name="ce31"/>
          <table:table-cell table:number-columns-repeated="38"/>
        </table:table-row>
        <table:table-row table:style-name="ro2" table:number-rows-repeated="21">
          <table:table-cell table:number-columns-repeated="49"/>
        </table:table-row>
        <table:table-row table:style-name="ro2">
          <table:table-cell table:number-columns-repeated="49"/>
        </table:table-row>
        <calcext:conditional-formats>
          <calcext:conditional-format calcext:target-range-address="'6 - BOTTLE 2'.H9:'6 - BOTTLE 2'.H40">
            <calcext:condition calcext:apply-style-name="Good" calcext:value="&gt;1000" calcext:base-cell-address="'6 - BOTTLE 2'.H9"/>
          </calcext:conditional-format>
          <calcext:conditional-format calcext:target-range-address="'6 - BOTTLE 2'.K9:'6 - BOTTLE 2'.K40">
            <calcext:condition calcext:apply-style-name="Good" calcext:value="&lt;[.J11]" calcext:base-cell-address="'6 - BOTTLE 2'.K9"/>
          </calcext:conditional-format>
        </calcext:conditional-formats>
      </table:table>
      <table:table table:name="Clause 6 Sizing Calibration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3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 table:number-columns-spanned="5" table:number-rows-spanned="1">
            <text:p>Clause 6. Sizing Calibration. 3 separate bottles, 5 sub-samples from each.</text:p>
          </table:table-cell>
          <table:covered-table-cell table:number-columns-repeated="4" table:style-name="ce27"/>
          <table:table-cell table:style-name="ce27" table:number-columns-repeated="5"/>
          <table:table-cell table:style-name="ce278" office:value-type="string" calcext:value-type="string">
            <text:p>PRIMARY CALIBRATION</text:p>
          </table:table-cell>
          <table:table-cell table:style-name="ce27" table:number-columns-repeated="1011"/>
        </table:table-row>
        <table:table-row table:style-name="ro2">
          <table:table-cell table:number-columns-repeated="1024"/>
        </table:table-row>
        <table:table-row table:style-name="ro6">
          <table:table-cell table:style-name="ce34"/>
          <table:table-cell table:style-name="ce33" office:value-type="string" calcext:value-type="string">
            <text:p>SRM2806d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3" table:number-columns-repeated="4"/>
          <table:table-cell table:number-columns-repeated="4"/>
          <table:table-cell table:style-name="ce28"/>
          <table:table-cell table:number-columns-repeated="2"/>
          <table:table-cell table:style-name="ce16"/>
          <table:table-cell office:value-type="string" calcext:value-type="string">
            <text:p>Need &gt;10000 particles <text:span text:style-name="T6">at the smallest threshold setting</text:span><text:span text:style-name="T10"> for each sub-sample / test portion. </text:span></text:p>
          </table:table-cell>
          <table:table-cell table:number-columns-repeated="1011"/>
        </table:table-row>
        <table:table-row table:style-name="ro2">
          <table:table-cell table:style-name="ce78" office:value-type="string" calcext:value-type="string">
            <text:p>Bottle Sampler</text:p>
          </table:table-cell>
          <table:table-cell table:style-name="ce33" table:number-columns-repeated="2"/>
          <table:table-cell table:style-name="ce37" office:value-type="string" calcext:value-type="string">
            <text:p>BS-500 #BS0707</text:p>
          </table:table-cell>
          <table:table-cell table:number-columns-repeated="7"/>
          <table:table-cell table:style-name="ce16"/>
          <table:table-cell office:value-type="string" calcext:value-type="string">
            <text:p>Need &gt;1000 particles <text:span text:style-name="T6">counted</text:span> at each calibrated size, for each of the three calibration tests.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APC Model</text:p>
          </table:table-cell>
          <table:table-cell table:style-name="ce33"/>
          <table:table-cell table:style-name="ce78"/>
          <table:table-cell table:style-name="ce47" office:value-type="string" calcext:value-type="string">
            <text:p>LPA3 Reference Counter</text:p>
          </table:table-cell>
          <table:table-cell table:number-columns-repeated="7"/>
          <table:table-cell table:style-name="ce16"/>
          <table:table-cell office:value-type="string" calcext:value-type="string">
            <text:p>SRM2806D has 14/ml at 30um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APC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7"/>
          <table:table-cell table:style-name="ce16"/>
          <table:table-cell office:value-type="string" calcext:value-type="string">
            <text:p>This implies we need at least 1000/14 = 71ml per test.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Sensor Model</text:p>
          </table:table-cell>
          <table:table-cell table:style-name="ce33" table:number-columns-repeated="2"/>
          <table:table-cell table:style-name="ce47" office:value-type="string" calcext:value-type="string">
            <text:p>Reference Counter</text:p>
          </table:table-cell>
          <table:table-cell table:number-columns-repeated="7"/>
          <table:table-cell table:style-name="ce16"/>
          <table:table-cell table:number-columns-repeated="1012"/>
        </table:table-row>
        <table:table-row table:style-name="ro2">
          <table:table-cell table:style-name="ce33" office:value-type="string" calcext:value-type="string">
            <text:p>Sensor S/N</text:p>
          </table:table-cell>
          <table:table-cell table:style-name="ce33" table:number-columns-repeated="2"/>
          <table:table-cell table:style-name="ce37"/>
          <table:table-cell table:number-columns-repeated="7"/>
          <table:table-cell table:style-name="ce30"/>
          <table:table-cell office:value-type="string" calcext:value-type="string">
            <text:p>At 21um we have 88.64/ml requiring 11.28ml counted volume per test which is more practical. </text:p>
          </table:table-cell>
          <table:table-cell table:number-columns-repeated="1011"/>
        </table:table-row>
        <table:table-row table:style-name="ro2">
          <table:table-cell table:style-name="ce33" office:value-type="string" calcext:value-type="string">
            <text:p>Date</text:p>
          </table:table-cell>
          <table:table-cell table:style-name="ce33" table:number-columns-repeated="2"/>
          <table:table-cell table:style-name="ce241" office:value-type="date" office:date-value="2025-05-09" calcext:value-type="date">
            <text:p>2025-05-09</text:p>
          </table:table-cell>
          <table:table-cell table:number-columns-repeated="7"/>
          <table:table-cell table:style-name="ce30"/>
          <table:table-cell table:number-columns-repeated="1012"/>
        </table:table-row>
        <table:table-row table:style-name="ro2">
          <table:table-cell table:style-name="ce33" office:value-type="string" calcext:value-type="string">
            <text:p>Operator</text:p>
          </table:table-cell>
          <table:table-cell table:style-name="ce33" table:number-columns-repeated="2"/>
          <table:table-cell table:style-name="ce46" office:value-type="string" calcext:value-type="string">
            <text:p>JMD</text:p>
          </table:table-cell>
          <table:table-cell table:number-columns-repeated="7"/>
          <table:table-cell table:style-name="ce31"/>
          <table:table-cell table:number-columns-repeated="1012"/>
        </table:table-row>
        <table:table-row table:style-name="ro2">
          <table:table-cell table:style-name="ce33" office:value-type="string" calcext:value-type="string">
            <text:p>Threshold Noise</text:p>
          </table:table-cell>
          <table:table-cell table:style-name="ce33" table:number-columns-repeated="2"/>
          <table:table-cell table:style-name="ce47" table:formula="of:=AVERAGE(88; 92; 92; 92;93)" office:value-type="float" office:value="91.4" calcext:value-type="float">
            <text:p>91.4</text:p>
          </table:table-cell>
          <table:table-cell table:number-columns-repeated="7"/>
          <table:table-cell table:style-name="ce16"/>
          <table:table-cell table:number-columns-repeated="1012"/>
        </table:table-row>
        <table:table-row table:style-name="ro2" table:visibility="collapse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Lowest threshold J</text:p>
          </table:table-cell>
          <table:table-cell table:number-columns-repeated="2"/>
          <table:table-cell table:formula="of:=[.D12]*1.5" office:value-type="float" office:value="137.1" calcext:value-type="float">
            <text:p>137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ghest threshold H</text:p>
          </table:table-cell>
          <table:table-cell table:number-columns-repeated="2"/>
          <table:table-cell office:value-type="float" office:value="13479" calcext:value-type="float">
            <text:p>134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Factor K</text:p>
          </table:table-cell>
          <table:table-cell table:number-columns-repeated="2"/>
          <table:table-cell table:formula="of:=10^((LOG([.D15])-LOG([.D14]))/27)" office:value-type="float" office:value="1.18522485082317" calcext:value-type="float">
            <text:p>1.185224850823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Nominal</text:p>
          </table:table-cell>
          <table:table-cell office:value-type="string" calcext:value-type="string">
            <text:p>Threshold#</text:p>
          </table:table-cell>
          <table:table-cell table:style-name="ce16" office:value-type="string" calcext:value-type="string">
            <text:p>Initial Value</text:p>
          </table:table-cell>
          <table:table-cell table:style-name="ce16" office:value-type="string" calcext:value-type="string">
            <text:p>INT</text:p>
          </table:table-cell>
          <table:table-cell table:style-name="ce16" office:value-type="string" calcext:value-type="string">
            <text:p>Reversed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270" calcext:value-type="float">
            <text:p>270</text:p>
          </table:table-cell>
          <table:table-cell office:value-type="float" office:value="320" calcext:value-type="float">
            <text:p>320</text:p>
          </table:table-cell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office:value-type="float" office:value="533" calcext:value-type="float">
            <text:p>533</text:p>
          </table:table-cell>
          <table:table-cell office:value-type="float" office:value="632" calcext:value-type="float">
            <text:p>632</text:p>
          </table:table-cell>
          <table:table-cell office:value-type="float" office:value="749" calcext:value-type="float">
            <text:p>749</text:p>
          </table:table-cell>
          <table:table-cell office:value-type="float" office:value="888" calcext:value-type="float">
            <text:p>888</text:p>
          </table:table-cell>
          <table:table-cell office:value-type="float" office:value="1053" calcext:value-type="float">
            <text:p>1053</text:p>
          </table:table-cell>
          <table:table-cell office:value-type="float" office:value="1248" calcext:value-type="float">
            <text:p>1248</text:p>
          </table:table-cell>
          <table:table-cell office:value-type="float" office:value="1479" calcext:value-type="float">
            <text:p>1479</text:p>
          </table:table-cell>
          <table:table-cell office:value-type="float" office:value="1754" calcext:value-type="float">
            <text:p>1754</text:p>
          </table:table-cell>
          <table:table-cell office:value-type="float" office:value="2078" calcext:value-type="float">
            <text:p>2078</text:p>
          </table:table-cell>
          <table:table-cell office:value-type="float" office:value="2464" calcext:value-type="float">
            <text:p>2464</text:p>
          </table:table-cell>
          <table:table-cell office:value-type="float" office:value="2920" calcext:value-type="float">
            <text:p>2920</text:p>
          </table:table-cell>
          <table:table-cell office:value-type="float" office:value="3461" calcext:value-type="float">
            <text:p>3461</text:p>
          </table:table-cell>
          <table:table-cell office:value-type="float" office:value="4102" calcext:value-type="float">
            <text:p>4102</text:p>
          </table:table-cell>
          <table:table-cell office:value-type="float" office:value="4862" calcext:value-type="float">
            <text:p>4862</text:p>
          </table:table-cell>
          <table:table-cell office:value-type="float" office:value="5763" calcext:value-type="float">
            <text:p>5763</text:p>
          </table:table-cell>
          <table:table-cell office:value-type="float" office:value="6830" calcext:value-type="float">
            <text:p>6830</text:p>
          </table:table-cell>
          <table:table-cell office:value-type="float" office:value="8095" calcext:value-type="float">
            <text:p>8095</text:p>
          </table:table-cell>
          <table:table-cell office:value-type="float" office:value="9595" calcext:value-type="float">
            <text:p>9595</text:p>
          </table:table-cell>
          <table:table-cell office:value-type="float" office:value="11372" calcext:value-type="float">
            <text:p>11372</text:p>
          </table:table-cell>
          <table:table-cell office:value-type="float" office:value="13479" calcext:value-type="float">
            <text:p>13479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Thresholds</text:p>
          </table:table-cell>
          <table:table-cell office:value-type="string" calcext:value-type="string">
            <text:p>1.5x noi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0" table:formula="of:=[.D12]*1.5" office:value-type="float" office:value="137.1" calcext:value-type="float">
            <text:p>137</text:p>
          </table:table-cell>
          <table:table-cell table:formula="of:=INT([.E19])" office:value-type="float" office:value="137" calcext:value-type="float">
            <text:p>137</text:p>
          </table:table-cell>
          <table:table-cell table:style-name="ce20" table:formula="of:=[.G20]*[.D$16]" office:value-type="float" office:value="13479" calcext:value-type="float">
            <text:p>13479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20" table:formula="of:=[.E19]*[.D$16]" office:value-type="float" office:value="162.494327047856" calcext:value-type="float">
            <text:p>162</text:p>
          </table:table-cell>
          <table:table-cell table:formula="of:=INT([.E20])" office:value-type="float" office:value="162" calcext:value-type="float">
            <text:p>162</text:p>
          </table:table-cell>
          <table:table-cell table:style-name="ce20" table:formula="of:=[.G21]*[.D$16]" office:value-type="float" office:value="11372.5256356535" calcext:value-type="float">
            <text:p>11373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style-name="ce20" table:formula="of:=[.E20]*[.D$16]" office:value-type="float" office:value="192.592314534906" calcext:value-type="float">
            <text:p>193</text:p>
          </table:table-cell>
          <table:table-cell table:formula="of:=INT([.E21])" office:value-type="float" office:value="192" calcext:value-type="float">
            <text:p>192</text:p>
          </table:table-cell>
          <table:table-cell table:style-name="ce20" table:formula="of:=[.G22]*[.D$16]" office:value-type="float" office:value="9595.24737247533" calcext:value-type="float">
            <text:p>959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style-name="ce20" table:formula="of:=[.E21]*[.D$16]" office:value-type="float" office:value="228.265197264323" calcext:value-type="float">
            <text:p>228</text:p>
          </table:table-cell>
          <table:table-cell table:formula="of:=INT([.E22])" office:value-type="float" office:value="228" calcext:value-type="float">
            <text:p>228</text:p>
          </table:table-cell>
          <table:table-cell table:style-name="ce20" table:formula="of:=[.G23]*[.D$16]" office:value-type="float" office:value="8095.71902395668" calcext:value-type="float">
            <text:p>8096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formula="of:=[.E22]*[.D$16]" office:value-type="float" office:value="270.545584375728" calcext:value-type="float">
            <text:p>271</text:p>
          </table:table-cell>
          <table:table-cell table:formula="of:=INT([.E23])" office:value-type="float" office:value="270" calcext:value-type="float">
            <text:p>270</text:p>
          </table:table-cell>
          <table:table-cell table:style-name="ce20" table:formula="of:=[.G24]*[.D$16]" office:value-type="float" office:value="6830.53432294641" calcext:value-type="float">
            <text:p>6831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style-name="ce20" table:formula="of:=[.E23]*[.D$16]" office:value-type="float" office:value="320.657349882588" calcext:value-type="float">
            <text:p>321</text:p>
          </table:table-cell>
          <table:table-cell table:formula="of:=INT([.E24])" office:value-type="float" office:value="320" calcext:value-type="float">
            <text:p>320</text:p>
          </table:table-cell>
          <table:table-cell table:style-name="ce20" table:formula="of:=[.G25]*[.D$16]" office:value-type="float" office:value="5763.07045722374" calcext:value-type="float">
            <text:p>5763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style-name="ce20" table:formula="of:=[.E24]*[.D$16]" office:value-type="float" office:value="380.051059679943" calcext:value-type="float">
            <text:p>380</text:p>
          </table:table-cell>
          <table:table-cell table:formula="of:=INT([.E25])" office:value-type="float" office:value="380" calcext:value-type="float">
            <text:p>380</text:p>
          </table:table-cell>
          <table:table-cell table:style-name="ce20" table:formula="of:=[.G26]*[.D$16]" office:value-type="float" office:value="4862.427963117" calcext:value-type="float">
            <text:p>4862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style-name="ce20" table:formula="of:=[.E25]*[.D$16]" office:value-type="float" office:value="450.445960514347" calcext:value-type="float">
            <text:p>450</text:p>
          </table:table-cell>
          <table:table-cell table:formula="of:=INT([.E26])" office:value-type="float" office:value="450" calcext:value-type="float">
            <text:p>450</text:p>
          </table:table-cell>
          <table:table-cell table:style-name="ce20" table:formula="of:=[.G27]*[.D$16]" office:value-type="float" office:value="4102.5362906793" calcext:value-type="float">
            <text:p>4103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20" table:formula="of:=[.E26]*[.D$16]" office:value-type="float" office:value="533.879746354515" calcext:value-type="float">
            <text:p>534</text:p>
          </table:table-cell>
          <table:table-cell table:formula="of:=INT([.E27])" office:value-type="float" office:value="533" calcext:value-type="float">
            <text:p>533</text:p>
          </table:table-cell>
          <table:table-cell table:style-name="ce20" table:formula="of:=[.G28]*[.D$16]" office:value-type="float" office:value="3461.3991495622" calcext:value-type="float">
            <text:p>3461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style-name="ce20" table:formula="of:=[.E27]*[.D$16]" office:value-type="float" office:value="632.76754273054" calcext:value-type="float">
            <text:p>633</text:p>
          </table:table-cell>
          <table:table-cell table:formula="of:=INT([.E28])" office:value-type="float" office:value="632" calcext:value-type="float">
            <text:p>632</text:p>
          </table:table-cell>
          <table:table-cell table:style-name="ce20" table:formula="of:=[.G29]*[.D$16]" office:value-type="float" office:value="2920.45779090624" calcext:value-type="float">
            <text:p>2920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style-name="ce20" table:formula="of:=[.E28]*[.D$16]" office:value-type="float" office:value="749.971816438546" calcext:value-type="float">
            <text:p>750</text:p>
          </table:table-cell>
          <table:table-cell table:formula="of:=INT([.E29])" office:value-type="float" office:value="749" calcext:value-type="float">
            <text:p>749</text:p>
          </table:table-cell>
          <table:table-cell table:style-name="ce20" table:formula="of:=[.G30]*[.D$16]" office:value-type="float" office:value="2464.05379441539" calcext:value-type="float">
            <text:p>2464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style-name="ce20" table:formula="of:=[.E29]*[.D$16]" office:value-type="float" office:value="888.885234259955" calcext:value-type="float">
            <text:p>889</text:p>
          </table:table-cell>
          <table:table-cell table:formula="of:=INT([.E30])" office:value-type="float" office:value="888" calcext:value-type="float">
            <text:p>888</text:p>
          </table:table-cell>
          <table:table-cell table:style-name="ce20" table:formula="of:=[.G31]*[.D$16]" office:value-type="float" office:value="2078.97581012079" calcext:value-type="float">
            <text:p>2079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style-name="ce20" table:formula="of:=[.E30]*[.D$16]" office:value-type="float" office:value="1053.52886917467" calcext:value-type="float">
            <text:p>1054</text:p>
          </table:table-cell>
          <table:table-cell table:formula="of:=INT([.E31])" office:value-type="float" office:value="1053" calcext:value-type="float">
            <text:p>1053</text:p>
          </table:table-cell>
          <table:table-cell table:style-name="ce20" table:formula="of:=[.G32]*[.D$16]" office:value-type="float" office:value="1754.07713454278" calcext:value-type="float">
            <text:p>1754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style-name="ce20" table:formula="of:=[.E31]*[.D$16]" office:value-type="float" office:value="1248.66859680545" calcext:value-type="float">
            <text:p>1249</text:p>
          </table:table-cell>
          <table:table-cell table:formula="of:=INT([.E32])" office:value-type="float" office:value="1248" calcext:value-type="float">
            <text:p>1248</text:p>
          </table:table-cell>
          <table:table-cell table:style-name="ce20" table:formula="of:=[.G33]*[.D$16]" office:value-type="float" office:value="1479.95305137631" calcext:value-type="float">
            <text:p>1480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style-name="ce20" table:formula="of:=[.E32]*[.D$16]" office:value-type="float" office:value="1479.95305137631" calcext:value-type="float">
            <text:p>1480</text:p>
          </table:table-cell>
          <table:table-cell table:formula="of:=INT([.E33])" office:value-type="float" office:value="1479" calcext:value-type="float">
            <text:p>1479</text:p>
          </table:table-cell>
          <table:table-cell table:style-name="ce20" table:formula="of:=[.G34]*[.D$16]" office:value-type="float" office:value="1248.66859680545" calcext:value-type="float">
            <text:p>1249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table:style-name="ce20" table:formula="of:=[.E33]*[.D$16]" office:value-type="float" office:value="1754.07713454278" calcext:value-type="float">
            <text:p>1754</text:p>
          </table:table-cell>
          <table:table-cell table:formula="of:=INT([.E34])" office:value-type="float" office:value="1754" calcext:value-type="float">
            <text:p>1754</text:p>
          </table:table-cell>
          <table:table-cell table:style-name="ce20" table:formula="of:=[.G35]*[.D$16]" office:value-type="float" office:value="1053.52886917467" calcext:value-type="float">
            <text:p>1054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style-name="ce20" table:formula="of:=[.E34]*[.D$16]" office:value-type="float" office:value="2078.97581012079" calcext:value-type="float">
            <text:p>2079</text:p>
          </table:table-cell>
          <table:table-cell table:formula="of:=INT([.E35])" office:value-type="float" office:value="2078" calcext:value-type="float">
            <text:p>2078</text:p>
          </table:table-cell>
          <table:table-cell table:style-name="ce20" table:formula="of:=[.G36]*[.D$16]" office:value-type="float" office:value="888.885234259955" calcext:value-type="float">
            <text:p>889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style-name="ce20" table:formula="of:=[.E35]*[.D$16]" office:value-type="float" office:value="2464.05379441539" calcext:value-type="float">
            <text:p>2464</text:p>
          </table:table-cell>
          <table:table-cell table:formula="of:=INT([.E36])" office:value-type="float" office:value="2464" calcext:value-type="float">
            <text:p>2464</text:p>
          </table:table-cell>
          <table:table-cell table:style-name="ce20" table:formula="of:=[.G37]*[.D$16]" office:value-type="float" office:value="749.971816438546" calcext:value-type="float">
            <text:p>750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style-name="ce20" table:formula="of:=[.E36]*[.D$16]" office:value-type="float" office:value="2920.45779090624" calcext:value-type="float">
            <text:p>2920</text:p>
          </table:table-cell>
          <table:table-cell table:formula="of:=INT([.E37])" office:value-type="float" office:value="2920" calcext:value-type="float">
            <text:p>2920</text:p>
          </table:table-cell>
          <table:table-cell table:style-name="ce20" table:formula="of:=[.G38]*[.D$16]" office:value-type="float" office:value="632.76754273054" calcext:value-type="float">
            <text:p>633</text:p>
          </table:table-cell>
          <table:table-cell table:number-columns-repeated="3"/>
          <table:table-cell table:style-name="ce28" office:value-type="string" calcext:value-type="string">
            <text:p>5ml sample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style-name="ce20" table:formula="of:=[.E37]*[.D$16]" office:value-type="float" office:value="3461.3991495622" calcext:value-type="float">
            <text:p>3461</text:p>
          </table:table-cell>
          <table:table-cell table:formula="of:=INT([.E38])" office:value-type="float" office:value="3461" calcext:value-type="float">
            <text:p>3461</text:p>
          </table:table-cell>
          <table:table-cell table:style-name="ce20" table:formula="of:=[.G39]*[.D$16]" office:value-type="float" office:value="533.879746354515" calcext:value-type="float">
            <text:p>534</text:p>
          </table:table-cell>
          <table:table-cell table:number-columns-repeated="2"/>
          <table:table-cell table:style-name="ce16" office:value-type="string" calcext:value-type="string">
            <text:p>&gt;4μm(c)/100ml</text:p>
          </table:table-cell>
          <table:table-cell table:style-name="ce16" office:value-type="string" calcext:value-type="string">
            <text:p>Deviation</text:p>
          </table:table-cell>
          <table:table-cell table:style-name="ce16" office:value-type="string" calcext:value-type="string">
            <text:p>6μm</text:p>
          </table:table-cell>
          <table:table-cell/>
          <table:table-cell table:style-name="ce16" office:value-type="string" calcext:value-type="string">
            <text:p>14um</text:p>
          </table:table-cell>
          <table:table-cell/>
          <table:table-cell table:style-name="ce16" office:value-type="string" calcext:value-type="string">
            <text:p>21μm</text:p>
          </table:table-cell>
          <table:table-cell/>
          <table:table-cell table:style-name="ce16" office:value-type="string" calcext:value-type="string">
            <text:p>25μm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style-name="ce20" table:formula="of:=[.E38]*[.D$16]" office:value-type="float" office:value="4102.5362906793" calcext:value-type="float">
            <text:p>4103</text:p>
          </table:table-cell>
          <table:table-cell table:formula="of:=INT([.E39])" office:value-type="float" office:value="4102" calcext:value-type="float">
            <text:p>4102</text:p>
          </table:table-cell>
          <table:table-cell table:style-name="ce20" table:formula="of:=[.G40]*[.D$16]" office:value-type="float" office:value="450.445960514347" calcext:value-type="float">
            <text:p>450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table:style-name="ce20" table:formula="of:=[.E39]*[.D$16]" office:value-type="float" office:value="4862.427963117" calcext:value-type="float">
            <text:p>4862</text:p>
          </table:table-cell>
          <table:table-cell table:formula="of:=INT([.E40])" office:value-type="float" office:value="4862" calcext:value-type="float">
            <text:p>4862</text:p>
          </table:table-cell>
          <table:table-cell table:style-name="ce20" table:formula="of:=[.G41]*[.D$16]" office:value-type="float" office:value="380.051059679943" calcext:value-type="float">
            <text:p>380</text:p>
          </table:table-cell>
          <table:table-cell/>
          <table:table-cell office:value-type="string" calcext:value-type="string">
            <text:p>Portion 1</text:p>
          </table:table-cell>
          <table:table-cell office:value-type="float" office:value="1319366" calcext:value-type="float">
            <text:p>1319366</text:p>
          </table:table-cell>
          <table:table-cell table:style-name="ce21" table:formula="of:=([.J40]-[.J$46])/[.J$46]" office:value-type="percentage" office:value="0.0352403515921879" calcext:value-type="percentage">
            <text:p>3.52%</text:p>
          </table:table-cell>
          <table:table-cell office:value-type="float" office:value="504590" calcext:value-type="float">
            <text:p>504590</text:p>
          </table:table-cell>
          <table:table-cell table:style-name="ce21" table:formula="of:=([.L40]-[.L$46])/[.L$46]" office:value-type="percentage" office:value="0.00510209976085033" calcext:value-type="percentage">
            <text:p>0.51%</text:p>
          </table:table-cell>
          <table:table-cell office:value-type="float" office:value="40101" calcext:value-type="float">
            <text:p>40101</text:p>
          </table:table-cell>
          <table:table-cell table:style-name="ce21" table:formula="of:=([.N40]-[.N$46])/[.N$46]" office:value-type="percentage" office:value="-0.0351940871623866" calcext:value-type="percentage">
            <text:p>-3.52%</text:p>
          </table:table-cell>
          <table:table-cell office:value-type="float" office:value="7960" calcext:value-type="float">
            <text:p>7960</text:p>
          </table:table-cell>
          <table:table-cell table:style-name="ce21" table:formula="of:=([.P40]-[.P$46])/[.P$46]" office:value-type="percentage" office:value="-0.0646298472385429" calcext:value-type="percentage">
            <text:p>-6.46%</text:p>
          </table:table-cell>
          <table:table-cell office:value-type="float" office:value="3907" calcext:value-type="float">
            <text:p>3907</text:p>
          </table:table-cell>
          <table:table-cell table:style-name="ce21" table:formula="of:=([.R40]-[.R$46])/[.R$46]" office:value-type="percentage" office:value="-0.0527910782471665" calcext:value-type="percentage">
            <text:p>-5.28%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style-name="ce20" table:formula="of:=[.E40]*[.D$16]" office:value-type="float" office:value="5763.07045722374" calcext:value-type="float">
            <text:p>5763</text:p>
          </table:table-cell>
          <table:table-cell table:formula="of:=INT([.E41])" office:value-type="float" office:value="5763" calcext:value-type="float">
            <text:p>5763</text:p>
          </table:table-cell>
          <table:table-cell table:style-name="ce20" table:formula="of:=[.G42]*[.D$16]" office:value-type="float" office:value="320.657349882588" calcext:value-type="float">
            <text:p>321</text:p>
          </table:table-cell>
          <table:table-cell/>
          <table:table-cell office:value-type="string" calcext:value-type="string">
            <text:p>Portion 2</text:p>
          </table:table-cell>
          <table:table-cell office:value-type="float" office:value="1264547" calcext:value-type="float">
            <text:p>1264547</text:p>
          </table:table-cell>
          <table:table-cell table:style-name="ce21" table:formula="of:=([.J41]-[.J$46])/[.J$46]" office:value-type="percentage" office:value="-0.00777336926611231" calcext:value-type="percentage">
            <text:p>-0.78%</text:p>
          </table:table-cell>
          <table:table-cell office:value-type="float" office:value="496968" calcext:value-type="float">
            <text:p>496968</text:p>
          </table:table-cell>
          <table:table-cell table:style-name="ce21" table:formula="of:=([.L41]-[.L$46])/[.L$46]" office:value-type="percentage" office:value="-0.0100803021979225" calcext:value-type="percentage">
            <text:p>-1.01%</text:p>
          </table:table-cell>
          <table:table-cell office:value-type="float" office:value="41958" calcext:value-type="float">
            <text:p>41958</text:p>
          </table:table-cell>
          <table:table-cell table:style-name="ce21" table:formula="of:=([.N41]-[.N$46])/[.N$46]" office:value-type="percentage" office:value="0.00948421462907619" calcext:value-type="percentage">
            <text:p>0.95%</text:p>
          </table:table-cell>
          <table:table-cell/>
          <table:table-cell table:style-name="ce21"/>
          <table:table-cell/>
          <table:table-cell table:style-name="ce21"/>
          <table:table-cell table:number-columns-repeated="1005"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table:style-name="ce20" table:formula="of:=[.E41]*[.D$16]" office:value-type="float" office:value="6830.53432294641" calcext:value-type="float">
            <text:p>6831</text:p>
          </table:table-cell>
          <table:table-cell table:formula="of:=INT([.E42])" office:value-type="float" office:value="6830" calcext:value-type="float">
            <text:p>6830</text:p>
          </table:table-cell>
          <table:table-cell table:style-name="ce20" table:formula="of:=[.G43]*[.D$16]" office:value-type="float" office:value="270.545584375728" calcext:value-type="float">
            <text:p>271</text:p>
          </table:table-cell>
          <table:table-cell/>
          <table:table-cell office:value-type="string" calcext:value-type="string">
            <text:p>Portion 3</text:p>
          </table:table-cell>
          <table:table-cell office:value-type="float" office:value="1237296" calcext:value-type="float">
            <text:p>1237296</text:p>
          </table:table-cell>
          <table:table-cell table:style-name="ce21" table:formula="of:=([.J42]-[.J$46])/[.J$46]" office:value-type="percentage" office:value="-0.0291558626919234" calcext:value-type="percentage">
            <text:p>-2.92%</text:p>
          </table:table-cell>
          <table:table-cell office:value-type="float" office:value="493550" calcext:value-type="float">
            <text:p>493550</text:p>
          </table:table-cell>
          <table:table-cell table:style-name="ce21" table:formula="of:=([.L42]-[.L$46])/[.L$46]" office:value-type="percentage" office:value="-0.0168886792505446" calcext:value-type="percentage">
            <text:p>-1.69%</text:p>
          </table:table-cell>
          <table:table-cell office:value-type="float" office:value="41992" calcext:value-type="float">
            <text:p>41992</text:p>
          </table:table-cell>
          <table:table-cell table:style-name="ce21" table:formula="of:=([.N42]-[.N$46])/[.N$46]" office:value-type="percentage" office:value="0.0103022341556835" calcext:value-type="percentage">
            <text:p>1.03%</text:p>
          </table:table-cell>
          <table:table-cell office:value-type="float" office:value="8518" calcext:value-type="float">
            <text:p>8518</text:p>
          </table:table-cell>
          <table:table-cell table:style-name="ce21" table:formula="of:=([.P42]-[.P$46])/[.P$46]" office:value-type="percentage" office:value="0.000940070505287897" calcext:value-type="percentage">
            <text:p>0.09%</text:p>
          </table:table-cell>
          <table:table-cell office:value-type="float" office:value="4153" calcext:value-type="float">
            <text:p>4153</text:p>
          </table:table-cell>
          <table:table-cell table:style-name="ce21" table:formula="of:=([.R42]-[.R$46])/[.R$46]" office:value-type="percentage" office:value="0.00684889993332929" calcext:value-type="percentage">
            <text:p>0.68%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style-name="ce20" table:formula="of:=[.E42]*[.D$16]" office:value-type="float" office:value="8095.71902395668" calcext:value-type="float">
            <text:p>8096</text:p>
          </table:table-cell>
          <table:table-cell table:formula="of:=INT([.E43])" office:value-type="float" office:value="8095" calcext:value-type="float">
            <text:p>8095</text:p>
          </table:table-cell>
          <table:table-cell table:style-name="ce20" table:formula="of:=[.G44]*[.D$16]" office:value-type="float" office:value="228.265197264323" calcext:value-type="float">
            <text:p>228</text:p>
          </table:table-cell>
          <table:table-cell/>
          <table:table-cell office:value-type="string" calcext:value-type="string">
            <text:p>Portion 4</text:p>
          </table:table-cell>
          <table:table-cell office:value-type="float" office:value="1282331" calcext:value-type="float">
            <text:p>1282331</text:p>
          </table:table-cell>
          <table:table-cell table:style-name="ce21" table:formula="of:=([.J43]-[.J$46])/[.J$46]" office:value-type="percentage" office:value="0.00618084390348238" calcext:value-type="percentage">
            <text:p>0.62%</text:p>
          </table:table-cell>
          <table:table-cell office:value-type="float" office:value="507867" calcext:value-type="float">
            <text:p>507867</text:p>
          </table:table-cell>
          <table:table-cell table:style-name="ce21" table:formula="of:=([.L43]-[.L$46])/[.L$46]" office:value-type="percentage" office:value="0.0116296163206639" calcext:value-type="percentage">
            <text:p>1.16%</text:p>
          </table:table-cell>
          <table:table-cell office:value-type="float" office:value="42135" calcext:value-type="float">
            <text:p>42135</text:p>
          </table:table-cell>
          <table:table-cell table:style-name="ce21" table:formula="of:=([.N43]-[.N$46])/[.N$46]" office:value-type="percentage" office:value="0.0137427280470024" calcext:value-type="percentage">
            <text:p>1.37%</text:p>
          </table:table-cell>
          <table:table-cell office:value-type="float" office:value="8785" calcext:value-type="float">
            <text:p>8785</text:p>
          </table:table-cell>
          <table:table-cell table:style-name="ce21" table:formula="of:=([.P43]-[.P$46])/[.P$46]" office:value-type="percentage" office:value="0.0323149236192714" calcext:value-type="percentage">
            <text:p>3.23%</text:p>
          </table:table-cell>
          <table:table-cell office:value-type="float" office:value="4187" calcext:value-type="float">
            <text:p>4187</text:p>
          </table:table-cell>
          <table:table-cell table:style-name="ce21" table:formula="of:=([.R43]-[.R$46])/[.R$46]" office:value-type="percentage" office:value="0.0150918237468938" calcext:value-type="percentage">
            <text:p>1.51%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table:style-name="ce20" table:formula="of:=[.E43]*[.D$16]" office:value-type="float" office:value="9595.24737247533" calcext:value-type="float">
            <text:p>9595</text:p>
          </table:table-cell>
          <table:table-cell table:formula="of:=INT([.E44])" office:value-type="float" office:value="9595" calcext:value-type="float">
            <text:p>9595</text:p>
          </table:table-cell>
          <table:table-cell table:style-name="ce20" table:formula="of:=[.G45]*[.D$16]" office:value-type="float" office:value="192.592314534906" calcext:value-type="float">
            <text:p>193</text:p>
          </table:table-cell>
          <table:table-cell/>
          <table:table-cell office:value-type="string" calcext:value-type="string">
            <text:p>Portion 5</text:p>
          </table:table-cell>
          <table:table-cell office:value-type="float" office:value="1268729" calcext:value-type="float">
            <text:p>1268729</text:p>
          </table:table-cell>
          <table:table-cell table:style-name="ce21" table:formula="of:=([.J44]-[.J$46])/[.J$46]" office:value-type="percentage" office:value="-0.00449196353763475" calcext:value-type="percentage">
            <text:p>-0.45%</text:p>
          </table:table-cell>
          <table:table-cell office:value-type="float" office:value="507168" calcext:value-type="float">
            <text:p>507168</text:p>
          </table:table-cell>
          <table:table-cell table:style-name="ce21" table:formula="of:=([.L44]-[.L$46])/[.L$46]" office:value-type="percentage" office:value="0.0102372653669532" calcext:value-type="percentage">
            <text:p>1.02%</text:p>
          </table:table-cell>
          <table:table-cell office:value-type="float" office:value="41633" calcext:value-type="float">
            <text:p>41633</text:p>
          </table:table-cell>
          <table:table-cell table:style-name="ce21" table:formula="of:=([.N44]-[.N$46])/[.N$46]" office:value-type="percentage" office:value="0.00166491033062418" calcext:value-type="percentage">
            <text:p>0.17%</text:p>
          </table:table-cell>
          <table:table-cell office:value-type="float" office:value="8777" calcext:value-type="float">
            <text:p>8777</text:p>
          </table:table-cell>
          <table:table-cell table:style-name="ce21" table:formula="of:=([.P44]-[.P$46])/[.P$46]" office:value-type="percentage" office:value="0.0313748531139835" calcext:value-type="percentage">
            <text:p>3.14%</text:p>
          </table:table-cell>
          <table:table-cell office:value-type="float" office:value="4252" calcext:value-type="float">
            <text:p>4252</text:p>
          </table:table-cell>
          <table:table-cell table:style-name="ce21" table:formula="of:=([.R44]-[.R$46])/[.R$46]" office:value-type="percentage" office:value="0.0308503545669435" calcext:value-type="percentage">
            <text:p>3.09%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style-name="ce20" table:formula="of:=[.E44]*[.D$16]" office:value-type="float" office:value="11372.5256356535" calcext:value-type="float">
            <text:p>11373</text:p>
          </table:table-cell>
          <table:table-cell table:formula="of:=INT([.E45])" office:value-type="float" office:value="11372" calcext:value-type="float">
            <text:p>11372</text:p>
          </table:table-cell>
          <table:table-cell table:style-name="ce20" table:formula="of:=[.G46]*[.D$16]" office:value-type="float" office:value="162.494327047856" calcext:value-type="float">
            <text:p>16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~30um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table:formula="of:=[.E45]*[.D$16]" office:value-type="float" office:value="13479" calcext:value-type="float">
            <text:p>13479</text:p>
          </table:table-cell>
          <table:table-cell table:formula="of:=INT([.E46])" office:value-type="float" office:value="13479" calcext:value-type="float">
            <text:p>13479</text:p>
          </table:table-cell>
          <table:table-cell table:style-name="ce20" table:formula="of:=[.D12]*1.5" office:value-type="float" office:value="137.1" calcext:value-type="float">
            <text:p>137</text:p>
          </table:table-cell>
          <table:table-cell/>
          <table:table-cell office:value-type="string" calcext:value-type="string">
            <text:p>Mean</text:p>
          </table:table-cell>
          <table:table-cell table:style-name="ce20" table:formula="of:=AVERAGE([.J40:.J44])" office:value-type="float" office:value="1274453.8" calcext:value-type="float">
            <text:p>1274454</text:p>
          </table:table-cell>
          <table:table-cell/>
          <table:table-cell table:style-name="ce20" table:formula="of:=AVERAGE([.L40:.L44])" office:value-type="float" office:value="502028.6" calcext:value-type="float">
            <text:p>502029</text:p>
          </table:table-cell>
          <table:table-cell/>
          <table:table-cell table:style-name="ce20" table:formula="of:=AVERAGE([.N40:.N44])" office:value-type="float" office:value="41563.8" calcext:value-type="float">
            <text:p>41564</text:p>
          </table:table-cell>
          <table:table-cell/>
          <table:table-cell table:style-name="ce20" table:formula="of:=AVERAGE([.P40:.P44])" office:value-type="float" office:value="8510" calcext:value-type="float">
            <text:p>8510</text:p>
          </table:table-cell>
          <table:table-cell/>
          <table:table-cell table:style-name="ce20" table:formula="of:=AVERAGE([.R40:.R44])" office:value-type="float" office:value="4124.75" calcext:value-type="float">
            <text:p>4125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20"/>
          <table:table-cell table:number-columns-repeated="3"/>
          <table:table-cell office:value-type="string" calcext:value-type="string">
            <text:p>Sample StdDev</text:p>
          </table:table-cell>
          <table:table-cell table:style-name="ce20" table:formula="of:=STDEVP([.J40:.J44])" office:value-type="float" office:value="26798.4182772043" calcext:value-type="float">
            <text:p>26798</text:p>
          </table:table-cell>
          <table:table-cell/>
          <table:table-cell table:style-name="ce20" table:formula="of:=STDEVP([.L40:.L44])" office:value-type="float" office:value="5736.85361849159" calcext:value-type="float">
            <text:p>5737</text:p>
          </table:table-cell>
          <table:table-cell/>
          <table:table-cell table:style-name="ce20" table:formula="of:=STDEVP([.N40:.N44])" office:value-type="float" office:value="749.612006307263" calcext:value-type="float">
            <text:p>750</text:p>
          </table:table-cell>
          <table:table-cell/>
          <table:table-cell table:style-name="ce20" table:formula="of:=STDEVP([.P40:.P44])" office:value-type="float" office:value="335.215602262186" calcext:value-type="float">
            <text:p>335</text:p>
          </table:table-cell>
          <table:table-cell/>
          <table:table-cell table:style-name="ce20" table:formula="of:=STDEVP([.R40:.R44])" office:value-type="float" office:value="130.652927636544" calcext:value-type="float">
            <text:p>131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20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6"/>
        </table:table-row>
        <table:table-row table:style-name="ro2">
          <table:table-cell table:number-columns-repeated="4"/>
          <table:table-cell table:style-name="ce20"/>
          <table:table-cell table:number-columns-repeated="3"/>
          <table:table-cell office:value-type="string" calcext:value-type="string">
            <text:p>D<text:span text:style-name="T7">Q</text:span></text:p>
          </table:table-cell>
          <table:table-cell table:style-name="ce153" table:formula="of:=(MAX([.J40:.J44])-MIN([.J40:.J44]))/[.J46]" office:value-type="percentage" office:value="0.0643962142841114" calcext:value-type="percentage">
            <text:p>6.44%</text:p>
          </table:table-cell>
          <table:table-cell/>
          <table:table-cell table:style-name="ce153" table:formula="of:=(MAX([.L40:.L44])-MIN([.L40:.L44]))/[.L46]" office:value-type="percentage" office:value="0.0285182955712085" calcext:value-type="percentage">
            <text:p>2.85%</text:p>
          </table:table-cell>
          <table:table-cell/>
          <table:table-cell table:style-name="ce153" table:formula="of:=(MAX([.N40:.N44])-MIN([.N40:.N44]))/[.N46]" office:value-type="percentage" office:value="0.0489368152093889" calcext:value-type="percentage">
            <text:p>4.89%</text:p>
          </table:table-cell>
          <table:table-cell/>
          <table:table-cell table:style-name="ce153" table:formula="of:=(MAX([.P40:.P44])-MIN([.P40:.P44]))/[.P46]" office:value-type="percentage" office:value="0.0969447708578143" calcext:value-type="percentage">
            <text:p>9.69%</text:p>
          </table:table-cell>
          <table:table-cell/>
          <table:table-cell table:style-name="ce153" table:formula="of:=(MAX([.R40:.R44])-MIN([.R40:.R44]))/[.R46]" office:value-type="percentage" office:value="0.08364143281411" calcext:value-type="percentage">
            <text:p>8.36%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riteria &lt;%</text:p>
          </table:table-cell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3" calcext:value-type="percentage">
            <text:p>11.30%</text:p>
          </table:table-cell>
          <table:table-cell/>
          <table:table-cell table:style-name="ce21" office:value-type="percentage" office:value="0.119" calcext:value-type="percentage">
            <text:p>11.90%</text:p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CV<text:span text:style-name="T7">VOL</text:span></text:p>
          </table:table-cell>
          <table:table-cell table:style-name="ce21" table:formula="of:=[.J47]/[.J46]" office:value-type="percentage" office:value="0.0210273752388704" calcext:value-type="percentage">
            <text:p>2.10%</text:p>
          </table:table-cell>
          <table:table-cell table:style-name="ce101" table:formula="of:=IF([.J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 table:formula="of:=[.L47]/[.L46]" office:value-type="percentage" office:value="0.0114273442160299" calcext:value-type="percentage">
            <text:p>1.14%</text:p>
          </table:table-cell>
          <table:table-cell table:style-name="ce101" table:formula="of:=IF([.L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 table:formula="of:=[.N47]/[.N46]" office:value-type="percentage" office:value="0.0180352134864296" calcext:value-type="percentage">
            <text:p>1.80%</text:p>
          </table:table-cell>
          <table:table-cell table:style-name="ce101" table:formula="of:=IF([.N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/>
          <table:table-cell/>
          <table:table-cell table:style-name="ce21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16" office:value-type="string" calcext:value-type="string">
            <text:p>&gt;4μm(c)/100m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float" office:value="1239489" calcext:value-type="float">
            <text:p>1239489</text:p>
          </table:table-cell>
          <table:table-cell table:style-name="ce21" table:formula="of:=([.J59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5922" calcext:value-type="float">
            <text:p>1235922</text:p>
          </table:table-cell>
          <table:table-cell table:style-name="ce21" table:formula="of:=([.J60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13694" calcext:value-type="float">
            <text:p>1213694</text:p>
          </table:table-cell>
          <table:table-cell table:style-name="ce21" table:formula="of:=([.J61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59898" calcext:value-type="float">
            <text:p>1259898</text:p>
          </table:table-cell>
          <table:table-cell table:style-name="ce21" table:formula="of:=([.J62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7332" calcext:value-type="float">
            <text:p>1237332</text:p>
          </table:table-cell>
          <table:table-cell table:style-name="ce21" table:formula="of:=([.J63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0" table:formula="of:=AVERAGE([.J59:.J63])" office:value-type="float" office:value="1237267" calcext:value-type="float">
            <text:p>1237267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0" table:formula="of:=STDEVP([.J59:.J63])" office:value-type="float" office:value="14660.1434099398" calcext:value-type="float">
            <text:p>1466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1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9"/>
          <table:table-cell table:style-name="ce21" table:formula="of:=[.J66]/[.J65]" office:value-type="percentage" office:value="0.0118488114610183" calcext:value-type="percentage">
            <text:p>1.18%</text:p>
          </table:table-cell>
          <table:table-cell table:style-name="ce101" table:formula="of:=IF([.J73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013"/>
        </table:table-row>
        <calcext:conditional-formats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">
            <calcext:condition calcext:apply-style-name="Good" calcext:value="=&quot;&lt;3% = PASS&quot;" calcext:base-cell-address="'Clause 6 Sizing Calibration'.K54"/>
            <calcext:condition calcext:apply-style-name="Bad" calcext:value="!=&quot;&lt;3% = PASS&quot;" calcext:base-cell-address="'Clause 6 Sizing Calibration'.K54"/>
          </calcext:conditional-format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">
            <calcext:condition calcext:apply-style-name="Good" calcext:value="&lt;0.03" calcext:base-cell-address="'Clause 6 Sizing Calibration'.K54"/>
            <calcext:condition calcext:apply-style-name="Bad" calcext:value="&gt;=0.03" calcext:base-cell-address="'Clause 6 Sizing Calibration'.K54"/>
          </calcext:conditional-format>
          <calcext:conditional-format calcext:target-range-address="'Clause 6 Sizing Calibration'.J49:'Clause 6 Sizing Calibration'.J49 'Clause 6 Sizing Calibration'.L49:'Clause 6 Sizing Calibration'.L49 'Clause 6 Sizing Calibration'.N49:'Clause 6 Sizing Calibration'.N49 'Clause 6 Sizing Calibration'.P49:'Clause 6 Sizing Calibration'.P49 'Clause 6 Sizing Calibration'.R49:'Clause 6 Sizing Calibration'.R49">
            <calcext:condition calcext:apply-style-name="Accent" calcext:value="&lt;[.J50]" calcext:base-cell-address="'Clause 6 Sizing Calibration'.J49"/>
          </calcext:conditional-format>
        </calcext:conditional-formats>
      </table:table>
      <table:table table:name="Clause 6 - Spheres" table:style-name="ta1">
        <table:table-column table:style-name="co9" table:default-cell-style-name="Default"/>
        <table:table-column table:style-name="co4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6" table:default-cell-style-name="Default"/>
        <table:table-row table:style-name="ro2">
          <table:table-cell table:style-name="ce33" office:value-type="string" calcext:value-type="string">
            <text:p>APC Model</text:p>
          </table:table-cell>
          <table:table-cell table:style-name="ce33"/>
          <table:table-cell table:style-name="ce78"/>
          <table:table-cell table:style-name="ce47" office:value-type="string" calcext:value-type="string">
            <text:p>LPA3 Reference Counter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APC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Date</text:p>
          </table:table-cell>
          <table:table-cell table:style-name="ce33" table:number-columns-repeated="2"/>
          <table:table-cell table:style-name="ce241" office:value-type="date" office:date-value="2025-05-07" calcext:value-type="date">
            <text:p>2025-05-07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Sensor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Sensor Model</text:p>
          </table:table-cell>
          <table:table-cell table:style-name="ce33" table:number-columns-repeated="2"/>
          <table:table-cell table:style-name="ce47" office:value-type="string" calcext:value-type="string">
            <text:p>Reference Counter</text:p>
          </table:table-cell>
          <table:table-cell table:number-columns-repeated="13"/>
        </table:table-row>
        <table:table-row table:style-name="ro2">
          <table:table-cell table:style-name="ce78" office:value-type="string" calcext:value-type="string">
            <text:p>Bottle Sampler</text:p>
          </table:table-cell>
          <table:table-cell table:style-name="ce33" table:number-columns-repeated="2"/>
          <table:table-cell table:style-name="ce37" office:value-type="string" calcext:value-type="string">
            <text:p>BS-500 #5000860</text:p>
          </table:table-cell>
          <table:table-cell table:number-columns-repeated="13"/>
        </table:table-row>
        <table:table-row table:style-name="ro2">
          <table:table-cell table:style-name="ce33" office:value-type="string" calcext:value-type="string">
            <text:p>Operator</text:p>
          </table:table-cell>
          <table:table-cell table:style-name="ce33" table:number-columns-repeated="2"/>
          <table:table-cell table:style-name="ce46" office:value-type="string" calcext:value-type="string">
            <text:p>JMD</text:p>
          </table:table-cell>
          <table:table-cell table:number-columns-repeated="13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11" office:value-type="string" calcext:value-type="string">
            <text:p>Poly Spheres Concentrate Calculator</text:p>
          </table:table-cell>
          <table:table-cell table:style-name="ce11" table:number-columns-repeated="3"/>
          <table:table-cell table:number-columns-repeated="13"/>
        </table:table-row>
        <table:table-row table:style-name="ro2">
          <table:table-cell table:style-name="ce11" table:number-columns-repeated="4"/>
          <table:table-cell table:number-columns-repeated="3"/>
          <table:table-cell table:style-name="ce28"/>
          <table:table-cell table:number-columns-repeated="9"/>
        </table:table-row>
        <table:table-row table:style-name="ro2">
          <table:table-cell table:style-name="ce257" office:value-type="float" office:value="49.4" calcext:value-type="float">
            <text:p>49.4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271"/>
          <table:table-cell/>
          <table:table-cell table:style-name="ce274" office:value-type="float" office:value="39" calcext:value-type="float">
            <text:p>39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117"/>
          <table:table-cell table:style-name="ce118"/>
          <table:table-cell table:number-columns-repeated="2"/>
          <table:table-cell table:style-name="ce257" office:value-type="float" office:value="69.7" calcext:value-type="float">
            <text:p>69.7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117"/>
          <table:table-cell table:style-name="ce118"/>
        </table:table-row>
        <table:table-row table:style-name="ro2">
          <table:table-cell table:style-name="ce258" table:formula="of:=(4/3)*(3.1415936)*(([.A12]*0.000001/2)^3)" office:value-type="float" office:value="0.000000000000063121832711697" calcext:value-type="float">
            <text:p>6.312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style-name="ce272"/>
          <table:table-cell/>
          <table:table-cell table:style-name="ce258" table:formula="of:=(4/3)*(3.1415936)*(([.F12]*0.000001/2)^3)" office:value-type="float" office:value="0.0000000000000310593651264" calcext:value-type="float">
            <text:p>3.106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  <table:table-cell table:number-columns-repeated="2"/>
          <table:table-cell table:style-name="ce258" table:formula="of:=(4/3)*(3.1415936)*(([.M12]*0.000001/2)^3)" office:value-type="float" office:value="0.000000000000177295244720002" calcext:value-type="float">
            <text:p>1.773E-13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</table:table-row>
        <table:table-row table:style-name="ro2">
          <table:table-cell table:style-name="ce258" table:formula="of:=[.A13]*1.05*1000" office:value-type="float" office:value="0.0000000000662779243472819" calcext:value-type="float">
            <text:p>6.628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style-name="ce272"/>
          <table:table-cell/>
          <table:table-cell table:style-name="ce258" table:formula="of:=[.F13]*1.05*1000" office:value-type="float" office:value="0.00000000003261233338272" calcext:value-type="float">
            <text:p>3.261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  <table:table-cell table:number-columns-repeated="2"/>
          <table:table-cell table:style-name="ce258" table:formula="of:=[.M13]*1.05*1000" office:value-type="float" office:value="0.000000000186160006956002" calcext:value-type="float">
            <text:p>1.862E-10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</table:table-row>
        <table:table-row table:style-name="ro2">
          <table:table-cell table:style-name="ce258" table:formula="of:=0.000001/[.A14]" office:value-type="float" office:value="15087.980045365" calcext:value-type="float">
            <text:p>1.509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style-name="ce272"/>
          <table:table-cell/>
          <table:table-cell table:style-name="ce258" table:formula="of:=0.000001/[.F14]" office:value-type="float" office:value="30663.2459647877" calcext:value-type="float">
            <text:p>3.066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  <table:table-cell table:number-columns-repeated="2"/>
          <table:table-cell table:style-name="ce258" table:formula="of:=0.000001/[.M14]" office:value-type="float" office:value="5371.72304809993" calcext:value-type="float">
            <text:p>5.372E+03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</table:table-row>
        <table:table-row table:style-name="ro2">
          <table:table-cell table:style-name="ce259" office:value-type="float" office:value="5000" calcext:value-type="float">
            <text:p>5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style-name="ce272"/>
          <table:table-cell/>
          <table:table-cell table:style-name="ce259" office:value-type="float" office:value="3000" calcext:value-type="float">
            <text:p>3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  <table:table-cell table:number-columns-repeated="2"/>
          <table:table-cell table:style-name="ce259" office:value-type="float" office:value="2000" calcext:value-type="float">
            <text:p>2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</table:table-row>
        <table:table-row table:style-name="ro2">
          <table:table-cell table:style-name="ce261" table:formula="of:=[.A16]/[.A15]*1000" office:value-type="float" office:value="331.38962173641" calcext:value-type="float">
            <text:p>331.39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style-name="ce272"/>
          <table:table-cell/>
          <table:table-cell table:style-name="ce261" table:formula="of:=[.F16]/[.F15]*1000" office:value-type="float" office:value="97.83700014816" calcext:value-type="float">
            <text:p>97.84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  <table:table-cell table:number-columns-repeated="2"/>
          <table:table-cell table:style-name="ce261" table:formula="of:=[.M16]/[.M15]*1000" office:value-type="float" office:value="372.320013912004" calcext:value-type="float">
            <text:p>372.32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</table:table-row>
        <table:table-row table:style-name="ro2">
          <table:table-cell table:style-name="ce262" office:value-type="float" office:value="0.2028" calcext:value-type="float">
            <text:p>0.2028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 table:style-name="ce272"/>
          <table:table-cell/>
          <table:table-cell table:style-name="ce262" office:value-type="float" office:value="0.1" calcext:value-type="float">
            <text:p>0.1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  <table:table-cell table:number-columns-repeated="2"/>
          <table:table-cell table:style-name="ce262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</table:table-row>
        <table:table-row table:style-name="ro2">
          <table:table-cell table:style-name="ce261" table:formula="of:=[.A18]*[.A17]" office:value-type="float" office:value="67.2058152881439" calcext:value-type="float">
            <text:p>67.21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style-name="ce272"/>
          <table:table-cell/>
          <table:table-cell table:style-name="ce261" table:formula="of:=[.F18]*[.F17]" office:value-type="float" office:value="9.783700014816" calcext:value-type="float">
            <text:p>9.78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  <table:table-cell table:number-columns-repeated="2"/>
          <table:table-cell table:style-name="ce261" table:formula="of:=[.M18]*[.M17]" office:value-type="float" office:value="74.4640027824009" calcext:value-type="float">
            <text:p>74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</table:table-row>
        <table:table-row table:style-name="ro2">
          <table:table-cell table:style-name="ce262" office:value-type="float" office:value="67.2" calcext:value-type="float">
            <text:p>67.2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style-name="ce272"/>
          <table:table-cell/>
          <table:table-cell table:style-name="ce262" office:value-type="float" office:value="13.46" calcext:value-type="float">
            <text:p>13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  <table:table-cell table:number-columns-repeated="2"/>
          <table:table-cell table:style-name="ce262" office:value-type="float" office:value="77.57" calcext:value-type="float">
            <text:p>77.57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</table:table-row>
        <table:table-row table:style-name="ro2">
          <table:table-cell table:style-name="ce263" table:formula="of:=[.A20]/[.A19]*[.A16]" office:value-type="float" office:value="4999.56735231029" calcext:value-type="float">
            <text:p>5000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style-name="ce272"/>
          <table:table-cell/>
          <table:table-cell table:style-name="ce263" table:formula="of:=[.F20]/[.F19]*[.F16]" office:value-type="float" office:value="4127.27290686042" calcext:value-type="float">
            <text:p>4127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  <table:table-cell table:number-columns-repeated="2"/>
          <table:table-cell table:style-name="ce263" table:formula="of:=[.M20]/[.M19]*[.M16]" office:value-type="float" office:value="2083.42278420556" calcext:value-type="float">
            <text:p>2083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</table:table-row>
        <table:table-row table:style-name="ro2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0]*[.F15]" office:value-type="float" office:value="412727.290686042" calcext:value-type="float">
            <text:p>412727.3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  <table:table-cell table:number-columns-repeated="2"/>
          <table:table-cell table:style-name="ce264" table:formula="of:=[.M20]*[.M15]" office:value-type="float" office:value="416684.556841111" calcext:value-type="float">
            <text:p>416684.6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</table:table-row>
        <table:table-row table:style-name="ro2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1]/[.F16]*[.F18]*1000" office:value-type="float" office:value="137.575763562014" calcext:value-type="float">
            <text:p>1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  <table:table-cell table:number-columns-repeated="2"/>
          <table:table-cell table:style-name="ce264" table:formula="of:=[.M21]/[.M16]*[.M18]*1000" office:value-type="float" office:value="208.342278420556" calcext:value-type="float">
            <text:p>20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</table:table-row>
        <table:table-row table:style-name="ro2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3]-[.F18]*1000" office:value-type="float" office:value="37.5757635620141" calcext:value-type="float">
            <text:p>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  <table:table-cell table:number-columns-repeated="2"/>
          <table:table-cell table:style-name="ce264" table:formula="of:=[.M23]-[.M18]*1000" office:value-type="float" office:value="8.34227842055566" calcext:value-type="float">
            <text:p>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</table:table-row>
        <table:table-row table:style-name="ro2" table:number-rows-repeated="2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2">
          <table:table-cell table:style-name="ce228" office:value-type="string" calcext:value-type="string">
            <text:p>Dilution</text:p>
          </table:table-cell>
          <table:table-cell table:number-columns-repeated="2"/>
          <table:table-cell table:style-name="ce234"/>
          <table:table-cell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  <table:table-cell table:number-columns-repeated="2"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</table:table-row>
        <table:table-row table:style-name="ro2"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 table:style-name="ce234"/>
          <table:table-cell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</table:table-row>
        <table:table-row table:style-name="ro2"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</text:p>
          </table:table-cell>
          <table:table-cell table:style-name="ce234"/>
          <table:table-cell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</table:table-row>
        <table:table-row table:style-name="ro2">
          <table:table-cell table:style-name="ce228" table:formula="of:=[.A28]*[.A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 table:style-name="ce234"/>
          <table:table-cell/>
          <table:table-cell table:style-name="ce228" table:formula="of:=[.F28]*[.F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  <table:table-cell table:number-columns-repeated="2"/>
          <table:table-cell table:style-name="ce228" table:formula="of:=[.M28]*[.M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</table:table-row>
        <table:table-row table:style-name="ro2">
          <table:table-cell table:style-name="ce264" table:formula="of:=[.A30]/[.A21]" office:value-type="float" office:value="6.0005192221557" calcext:value-type="float">
            <text:p>6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 table:style-name="ce234"/>
          <table:table-cell/>
          <table:table-cell table:style-name="ce264" table:formula="of:=[.F30]/[.F21]" office:value-type="float" office:value="7.26872215068053" calcext:value-type="float">
            <text:p>7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  <table:table-cell table:number-columns-repeated="2"/>
          <table:table-cell table:style-name="ce264" table:formula="of:=[.M30]/[.M21]" office:value-type="float" office:value="14.399381742117" calcext:value-type="float">
            <text:p>14.4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</table:table-row>
        <table:table-row table:style-name="ro2">
          <table:table-cell table:style-name="ce264" table:formula="of:=[.A28]-[.A31]" office:value-type="float" office:value="93.9994807778443" calcext:value-type="float">
            <text:p>94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 table:style-name="ce234"/>
          <table:table-cell/>
          <table:table-cell table:style-name="ce264" table:formula="of:=[.F28]-[.F31]" office:value-type="float" office:value="92.7312778493195" calcext:value-type="float">
            <text:p>92.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  <table:table-cell table:number-columns-repeated="2"/>
          <table:table-cell table:style-name="ce264" table:formula="of:=[.M28]-[.M31]" office:value-type="float" office:value="85.600618257883" calcext:value-type="float">
            <text:p>85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</table:table-row>
        <table:table-row table:style-name="ro2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2">
          <table:table-cell table:style-name="ce229"/>
          <table:table-cell table:style-name="ce186" table:number-columns-repeated="2"/>
          <table:table-cell table:style-name="ce235"/>
          <table:table-cell/>
          <table:table-cell table:style-name="ce229"/>
          <table:table-cell table:style-name="ce186" table:number-columns-repeated="3"/>
          <table:table-cell table:style-name="ce235"/>
          <table:table-cell table:number-columns-repeated="2"/>
          <table:table-cell table:style-name="ce229"/>
          <table:table-cell table:style-name="ce186" table:number-columns-repeated="3"/>
          <table:table-cell table:style-name="ce23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28" office:value-type="string" calcext:value-type="string">
            <text:p>Iterative Calculator for sliding window half-count method of PSL sphere threshold measurement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5"/>
          <table:table-cell table:style-name="ce55" office:value-type="date" office:date-value="2025-05-08" calcext:value-type="date">
            <text:p>2025-05-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librated Channel Size</text:p>
          </table:table-cell>
          <table:table-cell/>
          <table:table-cell table:style-name="ce28" table:formula="of:=[.A12]" office:value-type="float" office:value="49.4" calcext:value-type="float">
            <text:p>49.4</text:p>
          </table:table-cell>
          <table:table-cell office:value-type="string" calcext:value-type="string">
            <text:p>μm(c)</text:p>
          </table:table-cell>
          <table:table-cell table:number-columns-repeated="2"/>
          <table:table-cell table:style-name="ce28" table:formula="of:=[.F12]" office:value-type="float" office:value="39" calcext:value-type="float">
            <text:p>39</text:p>
          </table:table-cell>
          <table:table-cell office:value-type="string" calcext:value-type="string">
            <text:p>μm(c)</text:p>
          </table:table-cell>
          <table:table-cell table:number-columns-repeated="5"/>
          <table:table-cell table:style-name="ce28" table:formula="of:=[.M12]" office:value-type="float" office:value="69.7" calcext:value-type="float">
            <text:p>69.7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Channel Threshold (LPA-View value)</text:p>
          </table:table-cell>
          <table:table-cell table:style-name="ce248" table:formula="of:=0.56*[.C42]" office:value-type="float" office:value="20664" calcext:value-type="float">
            <text:p>20664</text:p>
          </table:table-cell>
          <table:table-cell table:style-name="ce251" office:value-type="float" office:value="36900" calcext:value-type="float">
            <text:p>36900</text:p>
          </table:table-cell>
          <table:table-cell table:style-name="ce252" table:formula="of:=1.56*[.C42]" office:value-type="float" office:value="57564" calcext:value-type="float">
            <text:p>57564</text:p>
          </table:table-cell>
          <table:table-cell/>
          <table:table-cell table:style-name="ce248" table:formula="of:=0.56*[.G42]" office:value-type="float" office:value="14168" calcext:value-type="float">
            <text:p>14168</text:p>
          </table:table-cell>
          <table:table-cell table:style-name="ce251" office:value-type="float" office:value="25300" calcext:value-type="float">
            <text:p>25300</text:p>
          </table:table-cell>
          <table:table-cell table:style-name="ce252" table:formula="of:=1.56*[.G42]" office:value-type="float" office:value="39468" calcext:value-type="float">
            <text:p>39468</text:p>
          </table:table-cell>
          <table:table-cell table:number-columns-repeated="4"/>
          <table:table-cell table:style-name="ce248" table:formula="of:=0.56*[.N42]" office:value-type="float" office:value="31150" calcext:value-type="float">
            <text:p>31150</text:p>
          </table:table-cell>
          <table:table-cell table:style-name="ce251" office:value-type="float" office:value="55625" calcext:value-type="float">
            <text:p>55625</text:p>
          </table:table-cell>
          <table:table-cell table:style-name="ce252" table:formula="of:=1.56*[.N42]" office:value-type="float" office:value="86775" calcext:value-type="float">
            <text:p>867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mulative Counts / 100ml</text:p>
          </table:table-cell>
          <table:table-cell table:style-name="ce229" office:value-type="float" office:value="41252" calcext:value-type="float">
            <text:p>41252</text:p>
          </table:table-cell>
          <table:table-cell table:style-name="ce186" office:value-type="float" office:value="20600" calcext:value-type="float">
            <text:p>20600</text:p>
          </table:table-cell>
          <table:table-cell table:style-name="ce235" office:value-type="float" office:value="92" calcext:value-type="float">
            <text:p>92</text:p>
          </table:table-cell>
          <table:table-cell/>
          <table:table-cell table:style-name="ce229" office:value-type="float" office:value="43502" calcext:value-type="float">
            <text:p>43502</text:p>
          </table:table-cell>
          <table:table-cell table:style-name="ce186" office:value-type="float" office:value="21877" calcext:value-type="float">
            <text:p>21877</text:p>
          </table:table-cell>
          <table:table-cell table:style-name="ce235" office:value-type="float" office:value="134" calcext:value-type="float">
            <text:p>134</text:p>
          </table:table-cell>
          <table:table-cell table:number-columns-repeated="4"/>
          <table:table-cell table:style-name="ce229" office:value-type="float" office:value="20135" calcext:value-type="float">
            <text:p>20135</text:p>
          </table:table-cell>
          <table:table-cell table:style-name="ce186" office:value-type="float" office:value="10070" calcext:value-type="float">
            <text:p>10070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fferential Counts / 100ml</text:p>
          </table:table-cell>
          <table:table-cell table:style-name="ce249" table:formula="of:=[.B43]-[.C43]" office:value-type="float" office:value="20652" calcext:value-type="float">
            <text:p>20652</text:p>
          </table:table-cell>
          <table:table-cell table:style-name="ce249" table:formula="of:=[.C43]-[.D43]" office:value-type="float" office:value="20508" calcext:value-type="float">
            <text:p>20508</text:p>
          </table:table-cell>
          <table:table-cell table:style-name="ce249" table:formula="of:=[.D43]-[.L43]" office:value-type="float" office:value="92" calcext:value-type="float">
            <text:p>92</text:p>
          </table:table-cell>
          <table:table-cell/>
          <table:table-cell table:style-name="ce249" table:formula="of:=[.F43]-[.G43]" office:value-type="float" office:value="21625" calcext:value-type="float">
            <text:p>21625</text:p>
          </table:table-cell>
          <table:table-cell table:style-name="ce249" table:formula="of:=[.G43]-[.H43]" office:value-type="float" office:value="21743" calcext:value-type="float">
            <text:p>21743</text:p>
          </table:table-cell>
          <table:table-cell table:style-name="ce249" table:formula="of:=[.H43]-[.P43]" office:value-type="float" office:value="134" calcext:value-type="float">
            <text:p>134</text:p>
          </table:table-cell>
          <table:table-cell table:number-columns-repeated="4"/>
          <table:table-cell table:style-name="ce249" table:formula="of:=[.M43]-[.N43]" office:value-type="float" office:value="10065" calcext:value-type="float">
            <text:p>10065</text:p>
          </table:table-cell>
          <table:table-cell table:style-name="ce249" table:formula="of:=[.N43]-[.O43]" office:value-type="float" office:value="10070" calcext:value-type="float">
            <text:p>10070</text:p>
          </table:table-cell>
          <table:table-cell table:style-name="ce249" table:formula="of:=[.O43]-[.B43]" office:value-type="float" office:value="-41252" calcext:value-type="float">
            <text:p>-41252</text:p>
          </table:table-cell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D</text:p>
          </table:table-cell>
          <table:table-cell table:style-name="ce250" table:formula="of:=(1-[.B44]/[.C44])" office:value-type="percentage" office:value="-0.00702165008777067" calcext:value-type="percentage">
            <text:p>-0.70%</text:p>
          </table:table-cell>
          <table:table-cell table:number-columns-repeated="3"/>
          <table:table-cell table:style-name="ce250" table:formula="of:=(1-[.F44]/[.G44])" office:value-type="percentage" office:value="0.00542703398795019" calcext:value-type="percentage">
            <text:p>0.54%</text:p>
          </table:table-cell>
          <table:table-cell table:number-columns-repeated="6"/>
          <table:table-cell table:style-name="ce250" table:formula="of:=(1-[.M44]/[.N44])" office:value-type="percentage" office:value="0.000496524329692161" calcext:value-type="percentage">
            <text:p>0.05%</text:p>
          </table:table-cell>
          <table:table-cell table:number-columns-repeated="4"/>
        </table:table-row>
        <table:table-row table:style-name="ro2" table:number-rows-repeated="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inearity" table:style-name="ta1">
        <table:table-column table:style-name="co4" table:number-columns-repeated="6" table:default-cell-style-name="Default"/>
        <table:table-row table:style-name="ro2">
          <table:table-cell table:style-name="ce55" office:value-type="date" office:date-value="2025-05-08" calcext:value-type="date">
            <text:p>2025-05-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M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nearity Test – Dilute reference fluid to 10% of calibration value and record deviation in counts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 calcext:value-type="string">
            <text:p>34D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rtistan 34D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1" office:value-type="percentage" office:value="0.1" calcext:value-type="percentage">
            <text:p>10.00%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percentage</text:p>
          </table:table-cell>
          <table:table-cell table:style-name="ce16" office:value-type="string" calcext:value-type="string">
            <text:p>Error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750.3" calcext:value-type="float">
            <text:p>10750.3</text:p>
          </table:table-cell>
          <table:table-cell table:formula="of:=[.B11]*[.C$8]" office:value-type="float" office:value="1075.03" calcext:value-type="float">
            <text:p>1075.03</text:p>
          </table:table-cell>
          <table:table-cell office:value-type="float" office:value="1035.42" calcext:value-type="float">
            <text:p>1035.42</text:p>
          </table:table-cell>
          <table:table-cell table:style-name="ce21" table:formula="of:=[.D11]/[.B11]" office:value-type="percentage" office:value="0.0963154516618141" calcext:value-type="percentage">
            <text:p>9.63%</text:p>
          </table:table-cell>
          <table:table-cell table:style-name="ce21" table:formula="of:=[.E11]-[.$C$8]" office:value-type="percentage" office:value="-0.00368454833818591" calcext:value-type="percentage">
            <text:p>-0.3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21.1" calcext:value-type="float">
            <text:p>7121.1</text:p>
          </table:table-cell>
          <table:table-cell table:formula="of:=[.B12]*[.C$8]" office:value-type="float" office:value="712.11" calcext:value-type="float">
            <text:p>712.1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729.1" calcext:value-type="float">
            <text:p>4729.1</text:p>
          </table:table-cell>
          <table:table-cell table:formula="of:=[.B13]*[.C$8]" office:value-type="float" office:value="472.91" calcext:value-type="float">
            <text:p>472.91</text:p>
          </table:table-cell>
          <table:table-cell office:value-type="float" office:value="471.41" calcext:value-type="float">
            <text:p>471.41</text:p>
          </table:table-cell>
          <table:table-cell table:style-name="ce21" table:formula="of:=[.D13]/[.B13]" office:value-type="percentage" office:value="0.0996828149119283" calcext:value-type="percentage">
            <text:p>9.97%</text:p>
          </table:table-cell>
          <table:table-cell table:style-name="ce21" table:formula="of:=[.E13]/[.C13]" office:value-type="percentage" office:value="0.000210786016180517" calcext:value-type="percentage">
            <text:p>0.02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199.3" calcext:value-type="float">
            <text:p>3199.3</text:p>
          </table:table-cell>
          <table:table-cell table:formula="of:=[.B14]*[.C$8]" office:value-type="float" office:value="319.93" calcext:value-type="float">
            <text:p>319.9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80.6" calcext:value-type="float">
            <text:p>2280.6</text:p>
          </table:table-cell>
          <table:table-cell table:formula="of:=[.B15]*[.C$8]" office:value-type="float" office:value="228.06" calcext:value-type="float">
            <text:p>228.06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15" calcext:value-type="float">
            <text:p>1615</text:p>
          </table:table-cell>
          <table:table-cell table:formula="of:=[.B16]*[.C$8]" office:value-type="float" office:value="161.5" calcext:value-type="float">
            <text:p>161.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30.5" calcext:value-type="float">
            <text:p>1130.5</text:p>
          </table:table-cell>
          <table:table-cell table:formula="of:=[.B17]*[.C$8]" office:value-type="float" office:value="113.05" calcext:value-type="float">
            <text:p>113.0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16.2" calcext:value-type="float">
            <text:p>816.2</text:p>
          </table:table-cell>
          <table:table-cell table:formula="of:=[.B18]*[.C$8]" office:value-type="float" office:value="81.62" calcext:value-type="float">
            <text:p>81.6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18.6" calcext:value-type="float">
            <text:p>618.6</text:p>
          </table:table-cell>
          <table:table-cell table:formula="of:=[.B19]*[.C$8]" office:value-type="float" office:value="61.86" calcext:value-type="float">
            <text:p>61.86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81.9" calcext:value-type="float">
            <text:p>481.9</text:p>
          </table:table-cell>
          <table:table-cell table:formula="of:=[.B20]*[.C$8]" office:value-type="float" office:value="48.19" calcext:value-type="float">
            <text:p>48.19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4.7" calcext:value-type="float">
            <text:p>384.7</text:p>
          </table:table-cell>
          <table:table-cell table:formula="of:=[.B21]*[.C$8]" office:value-type="float" office:value="38.47" calcext:value-type="float">
            <text:p>38.47</text:p>
          </table:table-cell>
          <table:table-cell office:value-type="float" office:value="42.25" calcext:value-type="float">
            <text:p>42.25</text:p>
          </table:table-cell>
          <table:table-cell table:style-name="ce21" table:formula="of:=[.D21]/[.B21]" office:value-type="percentage" office:value="0.109825838315571" calcext:value-type="percentage">
            <text:p>10.98%</text:p>
          </table:table-cell>
          <table:table-cell table:style-name="ce21" table:formula="of:=[.E21]/[.C21]" office:value-type="percentage" office:value="0.00285484373058411" calcext:value-type="percentage">
            <text:p>0.29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4.6" calcext:value-type="float">
            <text:p>314.6</text:p>
          </table:table-cell>
          <table:table-cell table:formula="of:=[.B22]*[.C$8]" office:value-type="float" office:value="31.46" calcext:value-type="float">
            <text:p>31.4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1.8" calcext:value-type="float">
            <text:p>261.8</text:p>
          </table:table-cell>
          <table:table-cell table:formula="of:=[.B23]*[.C$8]" office:value-type="float" office:value="26.18" calcext:value-type="float">
            <text:p>26.1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1.2" calcext:value-type="float">
            <text:p>221.2</text:p>
          </table:table-cell>
          <table:table-cell table:formula="of:=[.B24]*[.C$8]" office:value-type="float" office:value="22.12" calcext:value-type="float">
            <text:p>22.12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88.7" calcext:value-type="float">
            <text:p>188.7</text:p>
          </table:table-cell>
          <table:table-cell table:formula="of:=[.B25]*[.C$8]" office:value-type="float" office:value="18.87" calcext:value-type="float">
            <text:p>18.8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table:formula="of:=[.B26]*[.C$8]" office:value-type="float" office:value="16.1" calcext:value-type="float">
            <text:p>16.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6.4" calcext:value-type="float">
            <text:p>136.4</text:p>
          </table:table-cell>
          <table:table-cell table:formula="of:=[.B27]*[.C$8]" office:value-type="float" office:value="13.64" calcext:value-type="float">
            <text:p>13.64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4.4" calcext:value-type="float">
            <text:p>114.4</text:p>
          </table:table-cell>
          <table:table-cell table:formula="of:=[.B28]*[.C$8]" office:value-type="float" office:value="11.44" calcext:value-type="float">
            <text:p>11.44</text:p>
          </table:table-cell>
          <table:table-cell office:value-type="float" office:value="13.73" calcext:value-type="float">
            <text:p>13.73</text:p>
          </table:table-cell>
          <table:table-cell table:style-name="ce21" table:formula="of:=[.D28]/[.B28]" office:value-type="percentage" office:value="0.120017482517483" calcext:value-type="percentage">
            <text:p>12.00%</text:p>
          </table:table-cell>
          <table:table-cell table:style-name="ce21" table:formula="of:=[.E28]/[.C28]" office:value-type="percentage" office:value="0.0104910386815981" calcext:value-type="percentage">
            <text:p>1.0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5.3" calcext:value-type="float">
            <text:p>95.3</text:p>
          </table:table-cell>
          <table:table-cell table:formula="of:=[.B29]*[.C$8]" office:value-type="float" office:value="9.53" calcext:value-type="float">
            <text:p>9.53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formula="of:=[.B30]*[.C$8]" office:value-type="float" office:value="7.9" calcext:value-type="float">
            <text:p>7.9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5.3" calcext:value-type="float">
            <text:p>65.3</text:p>
          </table:table-cell>
          <table:table-cell table:formula="of:=[.B31]*[.C$8]" office:value-type="float" office:value="6.53" calcext:value-type="float">
            <text:p>6.53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3.8" calcext:value-type="float">
            <text:p>53.8</text:p>
          </table:table-cell>
          <table:table-cell table:formula="of:=[.B32]*[.C$8]" office:value-type="float" office:value="5.38" calcext:value-type="float">
            <text:p>5.38</text:p>
          </table:table-cell>
          <table:table-cell office:value-type="float" office:value="6.71" calcext:value-type="float">
            <text:p>6.71</text:p>
          </table:table-cell>
          <table:table-cell table:style-name="ce21" table:formula="of:=[.D32]/[.B32]" office:value-type="percentage" office:value="0.124721189591078" calcext:value-type="percentage">
            <text:p>12.47%</text:p>
          </table:table-cell>
          <table:table-cell table:style-name="ce21" table:formula="of:=[.E32]/[.C32]" office:value-type="percentage" office:value="0.0231823772474123" calcext:value-type="percentage">
            <text:p>2.32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.6" calcext:value-type="float">
            <text:p>44.6</text:p>
          </table:table-cell>
          <table:table-cell table:formula="of:=[.B33]*[.C$8]" office:value-type="float" office:value="4.46" calcext:value-type="float">
            <text:p>4.4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B34]*[.C$8]" office:value-type="float" office:value="3.7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0.7" calcext:value-type="float">
            <text:p>30.7</text:p>
          </table:table-cell>
          <table:table-cell table:formula="of:=[.B35]*[.C$8]" office:value-type="float" office:value="3.07" calcext:value-type="float">
            <text:p>3.07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.2" calcext:value-type="float">
            <text:p>25.2</text:p>
          </table:table-cell>
          <table:table-cell table:formula="of:=[.B36]*[.C$8]" office:value-type="float" office:value="2.52" calcext:value-type="float">
            <text:p>2.5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.1" calcext:value-type="float">
            <text:p>20.1</text:p>
          </table:table-cell>
          <table:table-cell table:formula="of:=[.B37]*[.C$8]" office:value-type="float" office:value="2.01" calcext:value-type="float">
            <text:p>2.01</text:p>
          </table:table-cell>
          <table:table-cell table:number-columns-repeated="3"/>
        </table:table-row>
      </table:table>
      <table:table table:name="Annex C Flow Rate Limits" table:style-name="ta1">
        <table:table-column table:style-name="co4" table:number-columns-repeated="9" table:default-cell-style-name="Default"/>
        <table:table-column table:style-name="co4" table:number-columns-repeated="4" table:default-cell-style-name="ce33"/>
        <table:table-column table:style-name="co4" table:number-columns-repeated="1011" table:default-cell-style-name="Default"/>
        <table:table-row table:style-name="ro3">
          <table:table-cell table:style-name="ce8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 table:number-columns-spanned="6" table:number-rows-spanned="1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covered-table-cell table:number-columns-repeated="5" table:style-name="ce27"/>
          <table:table-cell table:style-name="ce27" table:number-columns-repeated="1016"/>
        </table:table-row>
        <table:table-row table:style-name="ro2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2">
          <table:table-cell office:value-type="string" calcext:value-type="string">
            <text:p>Fixed flow rate <text:s/>PASS</text:p>
          </table:table-cell>
          <table:table-cell table:style-name="ce9"/>
          <table:table-cell>
            <draw:frame draw:z-index="0" draw:name="Image 6" draw:style-name="gr2" draw:text-style-name="P2" svg:width="6.826cm" svg:height="14.526cm" svg:x="0.764cm" svg:y="0.127cm">
              <draw:image xlink:href="Pictures/100000010000010200000225D643068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 table:number-columns-repeated="4"/>
          <table:table-cell table:number-columns-repeated="1011"/>
        </table:table-row>
        <table:table-row table:style-name="ro6">
          <table:table-cell table:number-columns-repeated="9"/>
          <table:table-cell table:style-name="ce34" office:value-type="string" calcext:value-type="string">
            <text:p>Volumetric Sampling Accuracy (Traceable Flow Measurement)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9"/>
          <table:table-cell>
            <draw:frame draw:z-index="1" draw:name="Text Frame 4" draw:style-name="gr1" draw:text-style-name="P1" svg:width="11.315cm" svg:height="5.432cm" svg:x="0.001cm" svg:y="0.028cm">
              <draw:text-box>
                <text:p><text:span text:style-name="T1">Used microbalance to weigh 10ml sample of fluid, added using precision digital pipette. Added 10x 10ml in total to plastic sample bottle and weighed result (after Tare-ing empty bottle weight).</text:span></text:p>
                <text:p><text:span text:style-name="T1"/></text:p>
                <text:p><text:span text:style-name="T1">Used bottle sampler to sample 15ml pumped flush + 40ml pumped sample.</text:span></text:p>
                <text:p><text:span text:style-name="T1"/></text:p>
                <text:p><text:span text:style-name="T1">Measured final weight of bottle+remaining fluid.</text:span></text:p>
                <text:p><text:span text:style-name="T1"/></text:p>
              </draw:text-box>
            </draw:frame>
          </table:table-cell>
          <table:table-cell table:number-columns-repeated="101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Date</text:p>
          </table:table-cell>
          <table:table-cell/>
          <table:table-cell table:style-name="ce46" office:value-type="date" office:date-value="2025-03-10" calcext:value-type="date">
            <text:p>2025-03-1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Operator</text:p>
          </table:table-cell>
          <table:table-cell/>
          <table:table-cell table:style-name="ce37" office:value-type="string" calcext:value-type="string">
            <text:p>JMD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Particle Counter</text:p>
          </table:table-cell>
          <table:table-cell/>
          <table:table-cell table:style-name="ce37" office:value-type="float" office:value="61110029" calcext:value-type="float">
            <text:p>61110029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7"/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MIL5606 Fluid</text:p>
          </table:table-cell>
          <table:table-cell/>
          <table:table-cell table:style-name="ce37"/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Temperature</text:p>
          </table:table-cell>
          <table:table-cell/>
          <table:table-cell table:style-name="ce37" office:value-type="string" calcext:value-type="string">
            <text:p>40'C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10ml Weight</text:p>
          </table:table-cell>
          <table:table-cell/>
          <table:table-cell table:style-name="ce82" office:value-type="float" office:value="8.419" calcext:value-type="float">
            <text:p>8.42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After 100ml</text:p>
          </table:table-cell>
          <table:table-cell/>
          <table:table-cell table:style-name="ce82" office:value-type="float" office:value="86.379" calcext:value-type="float">
            <text:p>86.38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Flush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Sample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Total Fluid</text:p>
          </table:table-cell>
          <table:table-cell/>
          <table:table-cell table:style-name="ce47" table:formula="of:=[.L28]+[.L29]" office:value-type="float" office:value="55" calcext:value-type="float">
            <text:p>55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Final Weight</text:p>
          </table:table-cell>
          <table:table-cell/>
          <table:table-cell table:style-name="ce82" office:value-type="float" office:value="39.51" calcext:value-type="float">
            <text:p>39.51</text:p>
          </table:table-cell>
          <table:table-cell office:value-type="string" calcext:value-type="string">
            <text:p>g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Fluid Weight Taken</text:p>
          </table:table-cell>
          <table:table-cell/>
          <table:table-cell table:style-name="ce82" table:formula="of:=[.L27]-[.L31]" office:value-type="float" office:value="46.869" calcext:value-type="float">
            <text:p>46.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0" office:value-type="string" calcext:value-type="string">
            <text:p>ml taken</text:p>
          </table:table-cell>
          <table:table-cell table:style-name="ce81"/>
          <table:table-cell table:style-name="ce160" table:formula="of:=[.L32]/[.L26]*10" office:value-type="float" office:value="55.6705071861266" calcext:value-type="float">
            <text:p>55.67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7"/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Difference</text:p>
          </table:table-cell>
          <table:table-cell/>
          <table:table-cell table:style-name="ce84" table:formula="of:=[.L33]/[.L30]-1" office:value-type="percentage" office:value="0.0121910397477569" calcext:value-type="percentage">
            <text:p>1.22%</text:p>
          </table:table-cell>
          <table:table-cell table:number-columns-repeated="1012"/>
        </table:table-row>
      </table:table>
      <table:table table:name="Annex D Resolution" table:style-name="ta1">
        <table:shapes>
          <draw:frame draw:z-index="0" draw:style-name="gr3" draw:text-style-name="P2" svg:width="19.162cm" svg:height="10.778cm" svg:x="7.925cm" svg:y="12.597cm">
            <draw:object draw:notify-on-update-of-ranges="'Annex D Resolution'.L2:'Annex D Resolution'.L1002 'Annex D Resolution'.M1:'Annex D Resolution'.M1 'Annex D Resolution'.M2:'Annex D Resolution'.M1002 'Annex D Resolution'.L2:'Annex D Resolution'.L1002 'Annex D Resolution'.N1:'Annex D Resolution'.N1 'Annex D Resolution'.N2:'Annex D Resolution'.N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4" table:number-columns-repeated="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1" table:default-cell-style-name="Default"/>
        <table:table-row table:style-name="ro10">
          <table:table-cell table:style-name="ce161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 table:number-columns-spanned="6" table:number-rows-spanned="1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covered-table-cell table:number-columns-repeated="5" table:style-name="ce27"/>
          <table:table-cell table:style-name="ce27"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dsp.height</text:p>
          </table:table-cell>
          <table:table-cell table:style-name="ce27" office:value-type="string" calcext:value-type="string">
            <text:p>Average</text:p>
          </table:table-cell>
          <table:table-cell table:style-name="ce27" office:value-type="string" calcext:value-type="string">
            <text:p>Max/2</text:p>
          </table:table-cell>
          <table:table-cell table:style-name="ce27" table:number-columns-repeated="1009"/>
        </table:table-row>
        <table:table-row table:style-name="ro2">
          <table:table-cell office:value-type="string" calcext:value-type="string">
            <text:p>Date</text:p>
          </table:table-cell>
          <table:table-cell table:style-name="ce55" office:value-type="date" office:date-value="2025-05-06" calcext:value-type="date">
            <text:p>2025-05-06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perator</text:p>
          </table:table-cell>
          <table:table-cell table:style-name="ce16" office:value-type="string" calcext:value-type="string">
            <text:p>JM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ticle Counter</text:p>
          </table:table-cell>
          <table:table-cell office:value-type="float" office:value="61110029" calcext:value-type="float">
            <text:p>6111002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rmware</text:p>
          </table:table-cell>
          <table:table-cell office:value-type="float" office:value="5.1" calcext:value-type="float">
            <text:p>5.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M2:.M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office:value-type="string" calcext:value-type="string">
            <text:p>Concentration / ml</text:p>
          </table:table-cell>
          <table:table-cell table:style-name="ce22" office:value-type="float" office:value="5060" calcext:value-type="float">
            <text:p>5060</text:p>
          </table:table-cell>
          <table:table-cell table:style-name="ce11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M3:.M1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M4:.M1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office:value-type="float" office:value="10.2" calcext:value-type="float">
            <text:p>10.2</text:p>
          </table:table-cell>
          <table:table-cell table:style-name="ce11" office:value-type="string" calcext:value-type="string">
            <text:p>microns</text:p>
          </table:table-cell>
          <table:table-cell table:style-name="ce11" office:value-type="string" calcext:value-type="string">
            <text:p>diameter</text:p>
          </table:table-cell>
          <table:table-cell table:number-columns-repeated="2"/>
          <table:table-cell office:value-type="string" calcext:value-type="string">
            <text:p>LC10 spheres batch DC-10-0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M5:.M1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2" table:formula="of:=(4/3)*(3.1415936)*(([.A8]*0.000001/2)^3)" office:value-type="float" office:value="5.556473768448E-016" calcext:value-type="float">
            <text:p>5.56E-16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number-columns-repeated="2"/>
          <table:table-cell table:style-name="ce16" office:value-type="string" calcext:value-type="string">
            <text:p>10.2±0.4</text:p>
          </table:table-cell>
          <table:table-cell office:value-type="string" calcext:value-type="string">
            <text:p>μm certified mean diamat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M6:.M1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2" table:formula="of:=[.A9]*1.05*1000" office:value-type="float" office:value="0.00000000000058342974568704" calcext:value-type="float">
            <text:p>5.83E-13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number-columns-repeated="2"/>
          <table:table-cell table:style-name="ce21" office:value-type="percentage" office:value="0.069" calcext:value-type="percentage">
            <text:p>6.90%</text:p>
          </table:table-cell>
          <table:table-cell office:value-type="string" calcext:value-type="string">
            <text:p>CV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M7:.M1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2" table:formula="of:=0.000001/[.A10]" office:value-type="float" office:value="1714002.42684303" calcext:value-type="float">
            <text:p>1.71E+06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number-columns-repeated="2"/>
          <table:table-cell office:value-type="string" calcext:value-type="string">
            <text:p>NIST TRACEABLE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M8:.M1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2" office:value-type="float" office:value="250000" calcext:value-type="float">
            <text:p>2.50E+005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M9:.M1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3" table:formula="of:=[.A12]/[.A11]*10" office:value-type="float" office:value="1.4585743642176" calcext:value-type="float">
            <text:p>1.46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M10:.M1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4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Rig volum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M11:.M1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3" table:formula="of:=[.A14]*[.A13]" office:value-type="float" office:value="0.29171487284352" calcext:value-type="float">
            <text:p>0.29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M12:.M1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4" office:value-type="float" office:value="29.56" calcext:value-type="float">
            <text:p>29.5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M13:.M2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22" office:value-type="float" office:value="5066" calcext:value-type="float">
            <text:p>5066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M14:.M2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table:formula="of:=SUM([.M200:.M1000])" office:value-type="float" office:value="157173" calcext:value-type="float">
            <text:p>157173</text:p>
          </table:table-cell>
          <table:table-cell table:style-name="ce11" office:value-type="string" calcext:value-type="string">
            <text:p>10μm particles</text:p>
          </table:table-cell>
          <table:table-cell table:style-name="ce11" office:value-type="string" calcext:value-type="string">
            <text:p>Total 10um particles Sized and Plotte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M15:.M2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M16:.M2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M17:.M2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M18:.M2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M19:.M2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MAX([.$N$2:.$N$1000])" office:value-type="float" office:value="974.5" calcext:value-type="float">
            <text:p>974.50</text:p>
          </table:table-cell>
          <table:table-cell office:value-type="string" calcext:value-type="string">
            <text:p>Peak data value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AVERAGE([.M20:.M2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MATCH([.A23]; [.N3:.N1000]; 0)" office:value-type="float" office:value="479" calcext:value-type="float">
            <text:p>479.00</text:p>
          </table:table-cell>
          <table:table-cell office:value-type="string" calcext:value-type="string">
            <text:p>Peak Position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AVERAGE([.M21:.M2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MAX([.$A$23])/2" office:value-type="float" office:value="487.25" calcext:value-type="float">
            <text:p>487.25</text:p>
          </table:table-cell>
          <table:table-cell office:value-type="string" calcext:value-type="string">
            <text:p>half peak value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AVERAGE([.M22:.M2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MATCH([.A25]; [.N2:.N1000]; 1)" office:value-type="float" office:value="415" calcext:value-type="float">
            <text:p>415.00</text:p>
          </table:table-cell>
          <table:table-cell office:value-type="string" calcext:value-type="string">
            <text:p>LHS FWHM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AVERAGE([.M23:.M3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INDEX([.L2:.L1000];[.A26])" office:value-type="float" office:value="414" calcext:value-type="float">
            <text:p>414.00</text:p>
          </table:table-cell>
          <table:table-cell office:value-type="string" calcext:value-type="string">
            <text:p>X value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AVERAGE([.M24:.M3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[.A24]-[.A27]" office:value-type="float" office:value="65" calcext:value-type="float">
            <text:p>65.00</text:p>
          </table:table-cell>
          <table:table-cell office:value-type="string" calcext:value-type="string">
            <text:p>½ FWHM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AVERAGE([.M25:.M3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[.A28]*2" office:value-type="float" office:value="130" calcext:value-type="float">
            <text:p>130.00</text:p>
          </table:table-cell>
          <table:table-cell office:value-type="string" calcext:value-type="string">
            <text:p>FWHM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VERAGE([.M26:.M3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 table:formula="of:=[.A29] / (2 * SQRT(2 * LN(2)))" office:value-type="float" office:value="55.2059170187212" calcext:value-type="float">
            <text:p>55.21</text:p>
          </table:table-cell>
          <table:table-cell office:value-type="string" calcext:value-type="string">
            <text:p>Std.Dev.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AVERAGE([.M27:.M3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68" table:formula="of:=[.A30]/[.A24]" office:value-type="percentage" office:value="0.115252436364763" calcext:value-type="percentage">
            <text:p>11.53%</text:p>
          </table:table-cell>
          <table:table-cell table:style-name="ce171" office:value-type="string" calcext:value-type="string">
            <text:p>CV<text:span text:style-name="T7">SIGNAL</text:span><text:span text:style-name="T11"> &lt; 30%</text:span>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M28:.M3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53"/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M29:.M3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style-name="ce169" table:formula="of:=[.A31]/2" office:value-type="percentage" office:value="0.0576262181823813" calcext:value-type="percentage">
            <text:p>5.76%</text:p>
          </table:table-cell>
          <table:table-cell table:style-name="ce171" office:value-type="string" calcext:value-type="string">
            <text:p>CV<text:span text:style-name="T7">DIAMETER</text:span> &lt; 15%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AVERAGE([.M30:.M3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AVERAGE([.M31:.M3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AVERAGE([.M32:.M3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AVERAGE([.M33:.M4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AVERAGE([.M34:.M4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AVERAGE([.M35:.M4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AVERAGE([.M36:.M4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AVERAGE([.M37:.M4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AVERAGE([.M38:.M4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M39:.M4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xcar_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AVERAGE([.M40:.M4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l/min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AVERAGE([.M41:.M4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tection Threshol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U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AVERAGE([.M42:.M4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AVERAGE([.M43:.M5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[.M44:.M5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AVERAGE([.M45:.M5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AVERAGE([.M46:.M5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AVERAGE([.M47:.M5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M48:.M5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M49:.M5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M50:.M5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AVERAGE([.M51:.M5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AVERAGE([.M52:.M5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M53:.M6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AVERAGE([.M54:.M6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M55:.M6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AVERAGE([.M56:.M6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AVERAGE([.M57:.M6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AVERAGE([.M58:.M6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VERAGE([.M59:.M6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AVERAGE([.M60:.M6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AVERAGE([.M61:.M6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AVERAGE([.M62:.M6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AVERAGE([.M63:.M7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AVERAGE([.M64:.M7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AVERAGE([.M65:.M7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AVERAGE([.M66:.M7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AVERAGE([.M67:.M7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AVERAGE([.M68:.M7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AVERAGE([.M69:.M7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AVERAGE([.M70:.M7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AVERAGE([.M71:.M7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AVERAGE([.M72:.M7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AVERAGE([.M73:.M8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M74:.M8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AVERAGE([.M75:.M8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AVERAGE([.M76:.M8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AVERAGE([.M77:.M8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AVERAGE([.M78:.M8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AVERAGE([.M79:.M8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AVERAGE([.M80:.M8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AVERAGE([.M81:.M8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AVERAGE([.M82:.M8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AVERAGE([.M83:.M9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AVERAGE([.M84:.M9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AVERAGE([.M85:.M9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AVERAGE([.M86:.M9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AVERAGE([.M87:.M9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AVERAGE([.M88:.M9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M89:.M9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AVERAGE([.M90:.M9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AVERAGE([.M91:.M9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AVERAGE([.M92:.M9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AVERAGE([.M93:.M10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AVERAGE([.M94:.M10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AVERAGE([.M95:.M10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AVERAGE([.M96:.M10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AVERAGE([.M97:.M10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AVERAGE([.M98:.M10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M99:.M10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AVERAGE([.M100:.M10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AVERAGE([.M101:.M10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AVERAGE([.M102:.M10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AVERAGE([.M103:.M11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AVERAGE([.M104:.M11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AVERAGE([.M105:.M11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AVERAGE([.M106:.M11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AVERAGE([.M107:.M11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AVERAGE([.M108:.M11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AVERAGE([.M109:.M11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AVERAGE([.M110:.M11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AVERAGE([.M111:.M11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AVERAGE([.M112:.M11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AVERAGE([.M113:.M12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AVERAGE([.M114:.M12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AVERAGE([.M115:.M12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AVERAGE([.M116:.M12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AVERAGE([.M117:.M12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AVERAGE([.M118:.M12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AVERAGE([.M119:.M12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AVERAGE([.M120:.M12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AVERAGE([.M121:.M12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AVERAGE([.M122:.M12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AVERAGE([.M123:.M13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AVERAGE([.M124:.M13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AVERAGE([.M125:.M13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AVERAGE([.M126:.M13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AVERAGE([.M127:.M13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AVERAGE([.M128:.M13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AVERAGE([.M129:.M13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AVERAGE([.M130:.M13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AVERAGE([.M131:.M13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AVERAGE([.M132:.M13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AVERAGE([.M133:.M14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AVERAGE([.M134:.M14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AVERAGE([.M135:.M14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AVERAGE([.M136:.M14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AVERAGE([.M137:.M14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AVERAGE([.M138:.M14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AVERAGE([.M139:.M14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AVERAGE([.M140:.M14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AVERAGE([.M141:.M14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AVERAGE([.M142:.M14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AVERAGE([.M143:.M15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AVERAGE([.M144:.M15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AVERAGE([.M145:.M15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AVERAGE([.M146:.M15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AVERAGE([.M147:.M15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AVERAGE([.M148:.M15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AVERAGE([.M149:.M15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AVERAGE([.M150:.M15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AVERAGE([.M151:.M15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AVERAGE([.M152:.M15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AVERAGE([.M153:.M16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AVERAGE([.M154:.M16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AVERAGE([.M155:.M16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AVERAGE([.M156:.M16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AVERAGE([.M157:.M16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AVERAGE([.M158:.M16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AVERAGE([.M159:.M16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AVERAGE([.M160:.M16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AVERAGE([.M161:.M16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AVERAGE([.M162:.M16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AVERAGE([.M163:.M17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AVERAGE([.M164:.M17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AVERAGE([.M165:.M17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AVERAGE([.M166:.M17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AVERAGE([.M167:.M17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AVERAGE([.M168:.M17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AVERAGE([.M169:.M17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AVERAGE([.M170:.M17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AVERAGE([.M171:.M17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AVERAGE([.M172:.M17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AVERAGE([.M173:.M18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AVERAGE([.M174:.M18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AVERAGE([.M175:.M18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AVERAGE([.M176:.M18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AVERAGE([.M177:.M18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AVERAGE([.M178:.M18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AVERAGE([.M179:.M18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AVERAGE([.M180:.M18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AVERAGE([.M181:.M18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AVERAGE([.M182:.M18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AVERAGE([.M183:.M19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AVERAGE([.M184:.M19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AVERAGE([.M185:.M192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AVERAGE([.M186:.M193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AVERAGE([.M187:.M194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AVERAGE([.M188:.M195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AVERAGE([.M189:.M196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AVERAGE([.M190:.M197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AVERAGE([.M191:.M198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AVERAGE([.M192:.M199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AVERAGE([.M193:.M200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AVERAGE([.M194:.M201])" office:value-type="float" office:value="0" calcext:value-type="float">
            <text:p>0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AVERAGE([.M195:.M202])" office:value-type="float" office:value="0.25" calcext:value-type="float">
            <text:p>0.25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AVERAGE([.M196:.M203])" office:value-type="float" office:value="0.5" calcext:value-type="float">
            <text:p>0.5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AVERAGE([.M197:.M204])" office:value-type="float" office:value="1.375" calcext:value-type="float">
            <text:p>1.375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AVERAGE([.M198:.M205])" office:value-type="float" office:value="2.875" calcext:value-type="float">
            <text:p>2.875</text:p>
          </table:table-cell>
          <table:table-cell table:formula="of:=MAX([.$A$23])/2" office:value-type="float" office:value="487.25" calcext:value-type="float">
            <text:p>487.2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AVERAGE([.M199:.M206])" office:value-type="float" office:value="4" calcext:value-type="float">
            <text:p>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AVERAGE([.M200:.M207])" office:value-type="float" office:value="4.25" calcext:value-type="float">
            <text:p>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AVERAGE([.M201:.M208])" office:value-type="float" office:value="5.375" calcext:value-type="float">
            <text:p>5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table:formula="of:=AVERAGE([.M202:.M209])" office:value-type="float" office:value="6.375" calcext:value-type="float">
            <text:p>6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table:formula="of:=AVERAGE([.M203:.M210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formula="of:=AVERAGE([.M204:.M211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6" calcext:value-type="float">
            <text:p>206</text:p>
          </table:table-cell>
          <table:table-cell office:value-type="float" office:value="9" calcext:value-type="float">
            <text:p>9</text:p>
          </table:table-cell>
          <table:table-cell table:formula="of:=AVERAGE([.M205:.M212])" office:value-type="float" office:value="8.5" calcext:value-type="float">
            <text:p>8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table:formula="of:=AVERAGE([.M206:.M213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table:formula="of:=AVERAGE([.M207:.M214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table:formula="of:=AVERAGE([.M208:.M215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table:formula="of:=AVERAGE([.M209:.M216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table:formula="of:=AVERAGE([.M210:.M217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formula="of:=AVERAGE([.M211:.M218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formula="of:=AVERAGE([.M212:.M219])" office:value-type="float" office:value="7.625" calcext:value-type="float">
            <text:p>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table:formula="of:=AVERAGE([.M213:.M220])" office:value-type="float" office:value="7" calcext:value-type="float">
            <text:p>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table:formula="of:=AVERAGE([.M214:.M221])" office:value-type="float" office:value="7.25" calcext:value-type="float">
            <text:p>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table:formula="of:=AVERAGE([.M215:.M222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table:formula="of:=AVERAGE([.M216:.M223])" office:value-type="float" office:value="8.125" calcext:value-type="float">
            <text:p>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formula="of:=AVERAGE([.M217:.M224])" office:value-type="float" office:value="8" calcext:value-type="float">
            <text:p>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formula="of:=AVERAGE([.M218:.M225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table:formula="of:=AVERAGE([.M219:.M226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table:formula="of:=AVERAGE([.M220:.M227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table:formula="of:=AVERAGE([.M221:.M228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formula="of:=AVERAGE([.M222:.M229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table:formula="of:=AVERAGE([.M223:.M230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AVERAGE([.M224:.M231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table:formula="of:=AVERAGE([.M225:.M232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table:formula="of:=AVERAGE([.M226:.M233])" office:value-type="float" office:value="6.125" calcext:value-type="float">
            <text:p>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table:formula="of:=AVERAGE([.M227:.M234])" office:value-type="float" office:value="6.125" calcext:value-type="float">
            <text:p>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formula="of:=AVERAGE([.M228:.M235])" office:value-type="float" office:value="5.75" calcext:value-type="float">
            <text:p>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table:formula="of:=AVERAGE([.M229:.M236])" office:value-type="float" office:value="5.5" calcext:value-type="float">
            <text:p>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table:formula="of:=AVERAGE([.M230:.M237])" office:value-type="float" office:value="5.375" calcext:value-type="float">
            <text:p>5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table:formula="of:=AVERAGE([.M231:.M238])" office:value-type="float" office:value="5" calcext:value-type="float">
            <text:p>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formula="of:=AVERAGE([.M232:.M239])" office:value-type="float" office:value="4.375" calcext:value-type="float">
            <text:p>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formula="of:=AVERAGE([.M233:.M240])" office:value-type="float" office:value="4.375" calcext:value-type="float">
            <text:p>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table:formula="of:=AVERAGE([.M234:.M241])" office:value-type="float" office:value="5.5" calcext:value-type="float">
            <text:p>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table:formula="of:=AVERAGE([.M235:.M242])" office:value-type="float" office:value="5.875" calcext:value-type="float">
            <text:p>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table:formula="of:=AVERAGE([.M236:.M243])" office:value-type="float" office:value="6.375" calcext:value-type="float">
            <text:p>6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table:formula="of:=AVERAGE([.M237:.M244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table:formula="of:=AVERAGE([.M238:.M245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formula="of:=AVERAGE([.M239:.M246])" office:value-type="float" office:value="7.875" calcext:value-type="float">
            <text:p>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table:formula="of:=AVERAGE([.M240:.M247])" office:value-type="float" office:value="8.5" calcext:value-type="float">
            <text:p>8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table:formula="of:=AVERAGE([.M241:.M248])" office:value-type="float" office:value="8.375" calcext:value-type="float">
            <text:p>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table:formula="of:=AVERAGE([.M242:.M249])" office:value-type="float" office:value="8" calcext:value-type="float">
            <text:p>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table:formula="of:=AVERAGE([.M243:.M250])" office:value-type="float" office:value="7.625" calcext:value-type="float">
            <text:p>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table:formula="of:=AVERAGE([.M244:.M251])" office:value-type="float" office:value="8" calcext:value-type="float">
            <text:p>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table:formula="of:=AVERAGE([.M245:.M252])" office:value-type="float" office:value="7.125" calcext:value-type="float">
            <text:p>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table:formula="of:=AVERAGE([.M246:.M253])" office:value-type="float" office:value="7.125" calcext:value-type="float">
            <text:p>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formula="of:=AVERAGE([.M247:.M254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table:formula="of:=AVERAGE([.M248:.M255])" office:value-type="float" office:value="6.25" calcext:value-type="float">
            <text:p>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AVERAGE([.M249:.M256])" office:value-type="float" office:value="6.5" calcext:value-type="float">
            <text:p>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table:formula="of:=AVERAGE([.M250:.M257])" office:value-type="float" office:value="5.875" calcext:value-type="float">
            <text:p>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formula="of:=AVERAGE([.M251:.M258])" office:value-type="float" office:value="5.75" calcext:value-type="float">
            <text:p>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table:formula="of:=AVERAGE([.M252:.M259])" office:value-type="float" office:value="5.125" calcext:value-type="float">
            <text:p>5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table:formula="of:=AVERAGE([.M253:.M260])" office:value-type="float" office:value="5.25" calcext:value-type="float">
            <text:p>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formula="of:=AVERAGE([.M254:.M261])" office:value-type="float" office:value="4.875" calcext:value-type="float">
            <text:p>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AVERAGE([.M255:.M262])" office:value-type="float" office:value="5.75" calcext:value-type="float">
            <text:p>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formula="of:=AVERAGE([.M256:.M263])" office:value-type="float" office:value="7.125" calcext:value-type="float">
            <text:p>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formula="of:=AVERAGE([.M257:.M264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table:formula="of:=AVERAGE([.M258:.M265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formula="of:=AVERAGE([.M259:.M266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table:formula="of:=AVERAGE([.M260:.M267])" office:value-type="float" office:value="7.125" calcext:value-type="float">
            <text:p>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table:formula="of:=AVERAGE([.M261:.M268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table:formula="of:=AVERAGE([.M262:.M269])" office:value-type="float" office:value="7.875" calcext:value-type="float">
            <text:p>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formula="of:=AVERAGE([.M263:.M270])" office:value-type="float" office:value="7.625" calcext:value-type="float">
            <text:p>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formula="of:=AVERAGE([.M264:.M271])" office:value-type="float" office:value="6.25" calcext:value-type="float">
            <text:p>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table:formula="of:=AVERAGE([.M265:.M272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table:formula="of:=AVERAGE([.M266:.M273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table:formula="of:=AVERAGE([.M267:.M274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table:formula="of:=AVERAGE([.M268:.M275])" office:value-type="float" office:value="7.875" calcext:value-type="float">
            <text:p>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table:formula="of:=AVERAGE([.M269:.M276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formula="of:=AVERAGE([.M270:.M277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table:formula="of:=AVERAGE([.M271:.M278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table:formula="of:=AVERAGE([.M272:.M279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formula="of:=AVERAGE([.M273:.M280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table:formula="of:=AVERAGE([.M274:.M281])" office:value-type="float" office:value="7.375" calcext:value-type="float">
            <text:p>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formula="of:=AVERAGE([.M275:.M282])" office:value-type="float" office:value="6.5" calcext:value-type="float">
            <text:p>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table:formula="of:=AVERAGE([.M276:.M283])" office:value-type="float" office:value="6.125" calcext:value-type="float">
            <text:p>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formula="of:=AVERAGE([.M277:.M284])" office:value-type="float" office:value="6.125" calcext:value-type="float">
            <text:p>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table:formula="of:=AVERAGE([.M278:.M285])" office:value-type="float" office:value="5.75" calcext:value-type="float">
            <text:p>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formula="of:=AVERAGE([.M279:.M286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table:formula="of:=AVERAGE([.M280:.M287])" office:value-type="float" office:value="6.25" calcext:value-type="float">
            <text:p>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formula="of:=AVERAGE([.M281:.M288])" office:value-type="float" office:value="6.5" calcext:value-type="float">
            <text:p>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formula="of:=AVERAGE([.M282:.M289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table:formula="of:=AVERAGE([.M283:.M290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table:formula="of:=AVERAGE([.M284:.M291])" office:value-type="float" office:value="6.75" calcext:value-type="float">
            <text:p>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table:formula="of:=AVERAGE([.M285:.M292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table:formula="of:=AVERAGE([.M286:.M293])" office:value-type="float" office:value="7" calcext:value-type="float">
            <text:p>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formula="of:=AVERAGE([.M287:.M294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formula="of:=AVERAGE([.M288:.M295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table:formula="of:=AVERAGE([.M289:.M296])" office:value-type="float" office:value="6.875" calcext:value-type="float">
            <text:p>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  <table:table-cell table:formula="of:=AVERAGE([.M290:.M297])" office:value-type="float" office:value="6.625" calcext:value-type="float">
            <text:p>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table:formula="of:=AVERAGE([.M291:.M298])" office:value-type="float" office:value="7.25" calcext:value-type="float">
            <text:p>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table:formula="of:=AVERAGE([.M292:.M299])" office:value-type="float" office:value="7.5" calcext:value-type="float">
            <text:p>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table:formula="of:=AVERAGE([.M293:.M300])" office:value-type="float" office:value="7.75" calcext:value-type="float">
            <text:p>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table:formula="of:=AVERAGE([.M294:.M301])" office:value-type="float" office:value="8" calcext:value-type="float">
            <text:p>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table:formula="of:=AVERAGE([.M295:.M302])" office:value-type="float" office:value="8.625" calcext:value-type="float">
            <text:p>8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table:formula="of:=AVERAGE([.M296:.M303])" office:value-type="float" office:value="8.875" calcext:value-type="float">
            <text:p>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formula="of:=AVERAGE([.M297:.M304])" office:value-type="float" office:value="9.125" calcext:value-type="float">
            <text:p>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  <table:table-cell table:formula="of:=AVERAGE([.M298:.M305])" office:value-type="float" office:value="9.375" calcext:value-type="float">
            <text:p>9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table:formula="of:=AVERAGE([.M299:.M306])" office:value-type="float" office:value="10" calcext:value-type="float">
            <text:p>10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table:formula="of:=AVERAGE([.M300:.M307])" office:value-type="float" office:value="10.25" calcext:value-type="float">
            <text:p>1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  <table:table-cell table:formula="of:=AVERAGE([.M301:.M308])" office:value-type="float" office:value="11.25" calcext:value-type="float">
            <text:p>11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table:formula="of:=AVERAGE([.M302:.M309])" office:value-type="float" office:value="11.625" calcext:value-type="float">
            <text:p>1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 table:formula="of:=AVERAGE([.M303:.M310])" office:value-type="float" office:value="11.625" calcext:value-type="float">
            <text:p>1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table:formula="of:=AVERAGE([.M304:.M311])" office:value-type="float" office:value="12.25" calcext:value-type="float">
            <text:p>1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6" calcext:value-type="float">
            <text:p>306</text:p>
          </table:table-cell>
          <table:table-cell office:value-type="float" office:value="16" calcext:value-type="float">
            <text:p>16</text:p>
          </table:table-cell>
          <table:table-cell table:formula="of:=AVERAGE([.M305:.M312])" office:value-type="float" office:value="12.875" calcext:value-type="float">
            <text:p>12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  <table:table-cell table:formula="of:=AVERAGE([.M306:.M313])" office:value-type="float" office:value="13" calcext:value-type="float">
            <text:p>13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table:formula="of:=AVERAGE([.M307:.M314])" office:value-type="float" office:value="13.375" calcext:value-type="float">
            <text:p>1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09" calcext:value-type="float">
            <text:p>309</text:p>
          </table:table-cell>
          <table:table-cell office:value-type="float" office:value="13" calcext:value-type="float">
            <text:p>13</text:p>
          </table:table-cell>
          <table:table-cell table:formula="of:=AVERAGE([.M308:.M315])" office:value-type="float" office:value="13.5" calcext:value-type="float">
            <text:p>1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table:formula="of:=AVERAGE([.M309:.M316])" office:value-type="float" office:value="12.75" calcext:value-type="float">
            <text:p>1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table:formula="of:=AVERAGE([.M310:.M317])" office:value-type="float" office:value="13.375" calcext:value-type="float">
            <text:p>1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2" calcext:value-type="float">
            <text:p>312</text:p>
          </table:table-cell>
          <table:table-cell office:value-type="float" office:value="18" calcext:value-type="float">
            <text:p>18</text:p>
          </table:table-cell>
          <table:table-cell table:formula="of:=AVERAGE([.M311:.M318])" office:value-type="float" office:value="13.5" calcext:value-type="float">
            <text:p>1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table:formula="of:=AVERAGE([.M312:.M319])" office:value-type="float" office:value="13.25" calcext:value-type="float">
            <text:p>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table:formula="of:=AVERAGE([.M313:.M320])" office:value-type="float" office:value="13.25" calcext:value-type="float">
            <text:p>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table:formula="of:=AVERAGE([.M314:.M321])" office:value-type="float" office:value="13.75" calcext:value-type="float">
            <text:p>1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table:formula="of:=AVERAGE([.M315:.M322])" office:value-type="float" office:value="13.625" calcext:value-type="float">
            <text:p>1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table:formula="of:=AVERAGE([.M316:.M323])" office:value-type="float" office:value="14.375" calcext:value-type="float">
            <text:p>1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table:formula="of:=AVERAGE([.M317:.M324])" office:value-type="float" office:value="15.125" calcext:value-type="float">
            <text:p>15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  <table:table-cell table:formula="of:=AVERAGE([.M318:.M325])" office:value-type="float" office:value="15.875" calcext:value-type="float">
            <text:p>1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table:formula="of:=AVERAGE([.M319:.M326])" office:value-type="float" office:value="16.375" calcext:value-type="float">
            <text:p>16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1" calcext:value-type="float">
            <text:p>321</text:p>
          </table:table-cell>
          <table:table-cell office:value-type="float" office:value="17" calcext:value-type="float">
            <text:p>17</text:p>
          </table:table-cell>
          <table:table-cell table:formula="of:=AVERAGE([.M320:.M327])" office:value-type="float" office:value="18.125" calcext:value-type="float">
            <text:p>1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  <table:table-cell table:formula="of:=AVERAGE([.M321:.M328])" office:value-type="float" office:value="18.125" calcext:value-type="float">
            <text:p>1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3" calcext:value-type="float">
            <text:p>323</text:p>
          </table:table-cell>
          <table:table-cell office:value-type="float" office:value="22" calcext:value-type="float">
            <text:p>22</text:p>
          </table:table-cell>
          <table:table-cell table:formula="of:=AVERAGE([.M322:.M329])" office:value-type="float" office:value="18.75" calcext:value-type="float">
            <text:p>1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table:formula="of:=AVERAGE([.M323:.M330])" office:value-type="float" office:value="19.125" calcext:value-type="float">
            <text:p>1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table:formula="of:=AVERAGE([.M324:.M331])" office:value-type="float" office:value="20.875" calcext:value-type="float">
            <text:p>2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  <table:table-cell table:formula="of:=AVERAGE([.M325:.M332])" office:value-type="float" office:value="22.25" calcext:value-type="float">
            <text:p>2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7" calcext:value-type="float">
            <text:p>327</text:p>
          </table:table-cell>
          <table:table-cell office:value-type="float" office:value="20" calcext:value-type="float">
            <text:p>20</text:p>
          </table:table-cell>
          <table:table-cell table:formula="of:=AVERAGE([.M326:.M333])" office:value-type="float" office:value="22.125" calcext:value-type="float">
            <text:p>2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  <table:table-cell table:formula="of:=AVERAGE([.M327:.M334])" office:value-type="float" office:value="22.375" calcext:value-type="float">
            <text:p>2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29" calcext:value-type="float">
            <text:p>329</text:p>
          </table:table-cell>
          <table:table-cell office:value-type="float" office:value="31" calcext:value-type="float">
            <text:p>31</text:p>
          </table:table-cell>
          <table:table-cell table:formula="of:=AVERAGE([.M328:.M335])" office:value-type="float" office:value="22.625" calcext:value-type="float">
            <text:p>2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0" calcext:value-type="float">
            <text:p>330</text:p>
          </table:table-cell>
          <table:table-cell office:value-type="float" office:value="27" calcext:value-type="float">
            <text:p>27</text:p>
          </table:table-cell>
          <table:table-cell table:formula="of:=AVERAGE([.M329:.M336])" office:value-type="float" office:value="24.75" calcext:value-type="float">
            <text:p>24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table:formula="of:=AVERAGE([.M330:.M337])" office:value-type="float" office:value="26.25" calcext:value-type="float">
            <text:p>2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2" calcext:value-type="float">
            <text:p>332</text:p>
          </table:table-cell>
          <table:table-cell office:value-type="float" office:value="19" calcext:value-type="float">
            <text:p>19</text:p>
          </table:table-cell>
          <table:table-cell table:formula="of:=AVERAGE([.M331:.M338])" office:value-type="float" office:value="27" calcext:value-type="float">
            <text:p>2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3" calcext:value-type="float">
            <text:p>333</text:p>
          </table:table-cell>
          <table:table-cell office:value-type="float" office:value="27" calcext:value-type="float">
            <text:p>27</text:p>
          </table:table-cell>
          <table:table-cell table:formula="of:=AVERAGE([.M332:.M339])" office:value-type="float" office:value="26.75" calcext:value-type="float">
            <text:p>2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4" calcext:value-type="float">
            <text:p>334</text:p>
          </table:table-cell>
          <table:table-cell office:value-type="float" office:value="33" calcext:value-type="float">
            <text:p>33</text:p>
          </table:table-cell>
          <table:table-cell table:formula="of:=AVERAGE([.M333:.M340])" office:value-type="float" office:value="27.125" calcext:value-type="float">
            <text:p>2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32" calcext:value-type="float">
            <text:p>32</text:p>
          </table:table-cell>
          <table:table-cell table:formula="of:=AVERAGE([.M334:.M341])" office:value-type="float" office:value="29.25" calcext:value-type="float">
            <text:p>2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table:formula="of:=AVERAGE([.M335:.M342])" office:value-type="float" office:value="31.25" calcext:value-type="float">
            <text:p>31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table:formula="of:=AVERAGE([.M336:.M343])" office:value-type="float" office:value="33.5" calcext:value-type="float">
            <text:p>3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8" calcext:value-type="float">
            <text:p>338</text:p>
          </table:table-cell>
          <table:table-cell office:value-type="float" office:value="30" calcext:value-type="float">
            <text:p>30</text:p>
          </table:table-cell>
          <table:table-cell table:formula="of:=AVERAGE([.M337:.M344])" office:value-type="float" office:value="35.125" calcext:value-type="float">
            <text:p>35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39" calcext:value-type="float">
            <text:p>339</text:p>
          </table:table-cell>
          <table:table-cell office:value-type="float" office:value="38" calcext:value-type="float">
            <text:p>38</text:p>
          </table:table-cell>
          <table:table-cell table:formula="of:=AVERAGE([.M338:.M345])" office:value-type="float" office:value="34.625" calcext:value-type="float">
            <text:p>34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table:formula="of:=AVERAGE([.M339:.M346])" office:value-type="float" office:value="37.875" calcext:value-type="float">
            <text:p>3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1" calcext:value-type="float">
            <text:p>341</text:p>
          </table:table-cell>
          <table:table-cell office:value-type="float" office:value="45" calcext:value-type="float">
            <text:p>45</text:p>
          </table:table-cell>
          <table:table-cell table:formula="of:=AVERAGE([.M340:.M347])" office:value-type="float" office:value="39.125" calcext:value-type="float">
            <text:p>3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2" calcext:value-type="float">
            <text:p>342</text:p>
          </table:table-cell>
          <table:table-cell office:value-type="float" office:value="46" calcext:value-type="float">
            <text:p>46</text:p>
          </table:table-cell>
          <table:table-cell table:formula="of:=AVERAGE([.M341:.M348])" office:value-type="float" office:value="41.25" calcext:value-type="float">
            <text:p>41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table:formula="of:=AVERAGE([.M342:.M349])" office:value-type="float" office:value="44.25" calcext:value-type="float">
            <text:p>4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4" calcext:value-type="float">
            <text:p>344</text:p>
          </table:table-cell>
          <table:table-cell office:value-type="float" office:value="52" calcext:value-type="float">
            <text:p>52</text:p>
          </table:table-cell>
          <table:table-cell table:formula="of:=AVERAGE([.M343:.M350])" office:value-type="float" office:value="47.25" calcext:value-type="float">
            <text:p>4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5" calcext:value-type="float">
            <text:p>345</text:p>
          </table:table-cell>
          <table:table-cell office:value-type="float" office:value="39" calcext:value-type="float">
            <text:p>39</text:p>
          </table:table-cell>
          <table:table-cell table:formula="of:=AVERAGE([.M344:.M351])" office:value-type="float" office:value="48" calcext:value-type="float">
            <text:p>4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6" calcext:value-type="float">
            <text:p>346</text:p>
          </table:table-cell>
          <table:table-cell office:value-type="float" office:value="47" calcext:value-type="float">
            <text:p>47</text:p>
          </table:table-cell>
          <table:table-cell table:formula="of:=AVERAGE([.M345:.M352])" office:value-type="float" office:value="48.25" calcext:value-type="float">
            <text:p>4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7" calcext:value-type="float">
            <text:p>347</text:p>
          </table:table-cell>
          <table:table-cell office:value-type="float" office:value="62" calcext:value-type="float">
            <text:p>62</text:p>
          </table:table-cell>
          <table:table-cell table:formula="of:=AVERAGE([.M346:.M353])" office:value-type="float" office:value="52.5" calcext:value-type="float">
            <text:p>52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8" calcext:value-type="float">
            <text:p>348</text:p>
          </table:table-cell>
          <table:table-cell office:value-type="float" office:value="59" calcext:value-type="float">
            <text:p>59</text:p>
          </table:table-cell>
          <table:table-cell table:formula="of:=AVERAGE([.M347:.M354])" office:value-type="float" office:value="53.25" calcext:value-type="float">
            <text:p>5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49" calcext:value-type="float">
            <text:p>349</text:p>
          </table:table-cell>
          <table:table-cell office:value-type="float" office:value="51" calcext:value-type="float">
            <text:p>51</text:p>
          </table:table-cell>
          <table:table-cell table:formula="of:=AVERAGE([.M348:.M355])" office:value-type="float" office:value="55.5" calcext:value-type="float">
            <text:p>5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0" calcext:value-type="float">
            <text:p>350</text:p>
          </table:table-cell>
          <table:table-cell office:value-type="float" office:value="48" calcext:value-type="float">
            <text:p>48</text:p>
          </table:table-cell>
          <table:table-cell table:formula="of:=AVERAGE([.M349:.M356])" office:value-type="float" office:value="59.25" calcext:value-type="float">
            <text:p>5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table:formula="of:=AVERAGE([.M350:.M357])" office:value-type="float" office:value="59.625" calcext:value-type="float">
            <text:p>59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table:formula="of:=AVERAGE([.M351:.M358])" office:value-type="float" office:value="61.875" calcext:value-type="float">
            <text:p>6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table:formula="of:=AVERAGE([.M352:.M359])" office:value-type="float" office:value="63.875" calcext:value-type="float">
            <text:p>63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4" calcext:value-type="float">
            <text:p>354</text:p>
          </table:table-cell>
          <table:table-cell office:value-type="float" office:value="77" calcext:value-type="float">
            <text:p>77</text:p>
          </table:table-cell>
          <table:table-cell table:formula="of:=AVERAGE([.M353:.M360])" office:value-type="float" office:value="68" calcext:value-type="float">
            <text:p>6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5" calcext:value-type="float">
            <text:p>355</text:p>
          </table:table-cell>
          <table:table-cell office:value-type="float" office:value="65" calcext:value-type="float">
            <text:p>65</text:p>
          </table:table-cell>
          <table:table-cell table:formula="of:=AVERAGE([.M354:.M361])" office:value-type="float" office:value="70.25" calcext:value-type="float">
            <text:p>7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6" calcext:value-type="float">
            <text:p>356</text:p>
          </table:table-cell>
          <table:table-cell office:value-type="float" office:value="77" calcext:value-type="float">
            <text:p>77</text:p>
          </table:table-cell>
          <table:table-cell table:formula="of:=AVERAGE([.M355:.M362])" office:value-type="float" office:value="70.75" calcext:value-type="float">
            <text:p>7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table:formula="of:=AVERAGE([.M356:.M363])" office:value-type="float" office:value="74.375" calcext:value-type="float">
            <text:p>7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8" calcext:value-type="float">
            <text:p>358</text:p>
          </table:table-cell>
          <table:table-cell office:value-type="float" office:value="81" calcext:value-type="float">
            <text:p>81</text:p>
          </table:table-cell>
          <table:table-cell table:formula="of:=AVERAGE([.M357:.M364])" office:value-type="float" office:value="77.25" calcext:value-type="float">
            <text:p>7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59" calcext:value-type="float">
            <text:p>359</text:p>
          </table:table-cell>
          <table:table-cell office:value-type="float" office:value="80" calcext:value-type="float">
            <text:p>80</text:p>
          </table:table-cell>
          <table:table-cell table:formula="of:=AVERAGE([.M358:.M365])" office:value-type="float" office:value="78.75" calcext:value-type="float">
            <text:p>7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0" calcext:value-type="float">
            <text:p>360</text:p>
          </table:table-cell>
          <table:table-cell office:value-type="float" office:value="62" calcext:value-type="float">
            <text:p>62</text:p>
          </table:table-cell>
          <table:table-cell table:formula="of:=AVERAGE([.M359:.M366])" office:value-type="float" office:value="80.5" calcext:value-type="float">
            <text:p>8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1" calcext:value-type="float">
            <text:p>361</text:p>
          </table:table-cell>
          <table:table-cell office:value-type="float" office:value="86" calcext:value-type="float">
            <text:p>86</text:p>
          </table:table-cell>
          <table:table-cell table:formula="of:=AVERAGE([.M360:.M367])" office:value-type="float" office:value="84.125" calcext:value-type="float">
            <text:p>84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table:formula="of:=AVERAGE([.M361:.M368])" office:value-type="float" office:value="86.25" calcext:value-type="float">
            <text:p>8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3" calcext:value-type="float">
            <text:p>363</text:p>
          </table:table-cell>
          <table:table-cell office:value-type="float" office:value="77" calcext:value-type="float">
            <text:p>77</text:p>
          </table:table-cell>
          <table:table-cell table:formula="of:=AVERAGE([.M362:.M369])" office:value-type="float" office:value="88.375" calcext:value-type="float">
            <text:p>8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4" calcext:value-type="float">
            <text:p>364</text:p>
          </table:table-cell>
          <table:table-cell office:value-type="float" office:value="91" calcext:value-type="float">
            <text:p>91</text:p>
          </table:table-cell>
          <table:table-cell table:formula="of:=AVERAGE([.M363:.M370])" office:value-type="float" office:value="95" calcext:value-type="float">
            <text:p>9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table:formula="of:=AVERAGE([.M364:.M371])" office:value-type="float" office:value="97.5" calcext:value-type="float">
            <text:p>9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6" calcext:value-type="float">
            <text:p>366</text:p>
          </table:table-cell>
          <table:table-cell office:value-type="float" office:value="98" calcext:value-type="float">
            <text:p>98</text:p>
          </table:table-cell>
          <table:table-cell table:formula="of:=AVERAGE([.M365:.M372])" office:value-type="float" office:value="99.75" calcext:value-type="float">
            <text:p>9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7" calcext:value-type="float">
            <text:p>367</text:p>
          </table:table-cell>
          <table:table-cell office:value-type="float" office:value="97" calcext:value-type="float">
            <text:p>97</text:p>
          </table:table-cell>
          <table:table-cell table:formula="of:=AVERAGE([.M366:.M373])" office:value-type="float" office:value="104.375" calcext:value-type="float">
            <text:p>104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8" calcext:value-type="float">
            <text:p>368</text:p>
          </table:table-cell>
          <table:table-cell office:value-type="float" office:value="115" calcext:value-type="float">
            <text:p>115</text:p>
          </table:table-cell>
          <table:table-cell table:formula="of:=AVERAGE([.M367:.M374])" office:value-type="float" office:value="108.875" calcext:value-type="float">
            <text:p>10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9" calcext:value-type="float">
            <text:p>369</text:p>
          </table:table-cell>
          <table:table-cell office:value-type="float" office:value="106" calcext:value-type="float">
            <text:p>106</text:p>
          </table:table-cell>
          <table:table-cell table:formula="of:=AVERAGE([.M368:.M375])" office:value-type="float" office:value="114.625" calcext:value-type="float">
            <text:p>114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0" calcext:value-type="float">
            <text:p>370</text:p>
          </table:table-cell>
          <table:table-cell office:value-type="float" office:value="118" calcext:value-type="float">
            <text:p>118</text:p>
          </table:table-cell>
          <table:table-cell table:formula="of:=AVERAGE([.M369:.M376])" office:value-type="float" office:value="117" calcext:value-type="float">
            <text:p>11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1" calcext:value-type="float">
            <text:p>371</text:p>
          </table:table-cell>
          <table:table-cell office:value-type="float" office:value="114" calcext:value-type="float">
            <text:p>114</text:p>
          </table:table-cell>
          <table:table-cell table:formula="of:=AVERAGE([.M370:.M377])" office:value-type="float" office:value="123.375" calcext:value-type="float">
            <text:p>12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2" calcext:value-type="float">
            <text:p>372</text:p>
          </table:table-cell>
          <table:table-cell office:value-type="float" office:value="127" calcext:value-type="float">
            <text:p>127</text:p>
          </table:table-cell>
          <table:table-cell table:formula="of:=AVERAGE([.M371:.M378])" office:value-type="float" office:value="126.875" calcext:value-type="float">
            <text:p>12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3" calcext:value-type="float">
            <text:p>373</text:p>
          </table:table-cell>
          <table:table-cell office:value-type="float" office:value="142" calcext:value-type="float">
            <text:p>142</text:p>
          </table:table-cell>
          <table:table-cell table:formula="of:=AVERAGE([.M372:.M379])" office:value-type="float" office:value="132.125" calcext:value-type="float">
            <text:p>13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4" calcext:value-type="float">
            <text:p>374</text:p>
          </table:table-cell>
          <table:table-cell office:value-type="float" office:value="117" calcext:value-type="float">
            <text:p>117</text:p>
          </table:table-cell>
          <table:table-cell table:formula="of:=AVERAGE([.M373:.M380])" office:value-type="float" office:value="139.125" calcext:value-type="float">
            <text:p>13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5" calcext:value-type="float">
            <text:p>375</text:p>
          </table:table-cell>
          <table:table-cell office:value-type="float" office:value="148" calcext:value-type="float">
            <text:p>148</text:p>
          </table:table-cell>
          <table:table-cell table:formula="of:=AVERAGE([.M374:.M381])" office:value-type="float" office:value="147.5" calcext:value-type="float">
            <text:p>14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6" calcext:value-type="float">
            <text:p>376</text:p>
          </table:table-cell>
          <table:table-cell office:value-type="float" office:value="143" calcext:value-type="float">
            <text:p>143</text:p>
          </table:table-cell>
          <table:table-cell table:formula="of:=AVERAGE([.M375:.M382])" office:value-type="float" office:value="154.25" calcext:value-type="float">
            <text:p>15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7" calcext:value-type="float">
            <text:p>377</text:p>
          </table:table-cell>
          <table:table-cell office:value-type="float" office:value="148" calcext:value-type="float">
            <text:p>148</text:p>
          </table:table-cell>
          <table:table-cell table:formula="of:=AVERAGE([.M376:.M383])" office:value-type="float" office:value="158.75" calcext:value-type="float">
            <text:p>15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8" calcext:value-type="float">
            <text:p>378</text:p>
          </table:table-cell>
          <table:table-cell office:value-type="float" office:value="174" calcext:value-type="float">
            <text:p>174</text:p>
          </table:table-cell>
          <table:table-cell table:formula="of:=AVERAGE([.M377:.M384])" office:value-type="float" office:value="168.125" calcext:value-type="float">
            <text:p>16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79" calcext:value-type="float">
            <text:p>379</text:p>
          </table:table-cell>
          <table:table-cell office:value-type="float" office:value="181" calcext:value-type="float">
            <text:p>181</text:p>
          </table:table-cell>
          <table:table-cell table:formula="of:=AVERAGE([.M378:.M385])" office:value-type="float" office:value="175.875" calcext:value-type="float">
            <text:p>17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0" calcext:value-type="float">
            <text:p>380</text:p>
          </table:table-cell>
          <table:table-cell office:value-type="float" office:value="181" calcext:value-type="float">
            <text:p>181</text:p>
          </table:table-cell>
          <table:table-cell table:formula="of:=AVERAGE([.M379:.M386])" office:value-type="float" office:value="185.25" calcext:value-type="float">
            <text:p>18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1" calcext:value-type="float">
            <text:p>381</text:p>
          </table:table-cell>
          <table:table-cell office:value-type="float" office:value="178" calcext:value-type="float">
            <text:p>178</text:p>
          </table:table-cell>
          <table:table-cell table:formula="of:=AVERAGE([.M380:.M387])" office:value-type="float" office:value="190.875" calcext:value-type="float">
            <text:p>19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2" calcext:value-type="float">
            <text:p>382</text:p>
          </table:table-cell>
          <table:table-cell office:value-type="float" office:value="192" calcext:value-type="float">
            <text:p>192</text:p>
          </table:table-cell>
          <table:table-cell table:formula="of:=AVERAGE([.M381:.M388])" office:value-type="float" office:value="196.75" calcext:value-type="float">
            <text:p>19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3" calcext:value-type="float">
            <text:p>383</text:p>
          </table:table-cell>
          <table:table-cell office:value-type="float" office:value="210" calcext:value-type="float">
            <text:p>210</text:p>
          </table:table-cell>
          <table:table-cell table:formula="of:=AVERAGE([.M382:.M389])" office:value-type="float" office:value="202.375" calcext:value-type="float">
            <text:p>20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218" calcext:value-type="float">
            <text:p>218</text:p>
          </table:table-cell>
          <table:table-cell table:formula="of:=AVERAGE([.M383:.M390])" office:value-type="float" office:value="213.625" calcext:value-type="float">
            <text:p>21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5" calcext:value-type="float">
            <text:p>385</text:p>
          </table:table-cell>
          <table:table-cell office:value-type="float" office:value="193" calcext:value-type="float">
            <text:p>193</text:p>
          </table:table-cell>
          <table:table-cell table:formula="of:=AVERAGE([.M384:.M391])" office:value-type="float" office:value="220.5" calcext:value-type="float">
            <text:p>22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6" calcext:value-type="float">
            <text:p>386</text:p>
          </table:table-cell>
          <table:table-cell office:value-type="float" office:value="221" calcext:value-type="float">
            <text:p>221</text:p>
          </table:table-cell>
          <table:table-cell table:formula="of:=AVERAGE([.M385:.M392])" office:value-type="float" office:value="229" calcext:value-type="float">
            <text:p>22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7" calcext:value-type="float">
            <text:p>387</text:p>
          </table:table-cell>
          <table:table-cell office:value-type="float" office:value="226" calcext:value-type="float">
            <text:p>226</text:p>
          </table:table-cell>
          <table:table-cell table:formula="of:=AVERAGE([.M386:.M393])" office:value-type="float" office:value="232.875" calcext:value-type="float">
            <text:p>232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8" calcext:value-type="float">
            <text:p>388</text:p>
          </table:table-cell>
          <table:table-cell office:value-type="float" office:value="271" calcext:value-type="float">
            <text:p>271</text:p>
          </table:table-cell>
          <table:table-cell table:formula="of:=AVERAGE([.M387:.M394])" office:value-type="float" office:value="240.625" calcext:value-type="float">
            <text:p>240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9" calcext:value-type="float">
            <text:p>389</text:p>
          </table:table-cell>
          <table:table-cell office:value-type="float" office:value="233" calcext:value-type="float">
            <text:p>233</text:p>
          </table:table-cell>
          <table:table-cell table:formula="of:=AVERAGE([.M388:.M395])" office:value-type="float" office:value="251.25" calcext:value-type="float">
            <text:p>251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0" calcext:value-type="float">
            <text:p>390</text:p>
          </table:table-cell>
          <table:table-cell office:value-type="float" office:value="260" calcext:value-type="float">
            <text:p>260</text:p>
          </table:table-cell>
          <table:table-cell table:formula="of:=AVERAGE([.M389:.M396])" office:value-type="float" office:value="258.125" calcext:value-type="float">
            <text:p>25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1" calcext:value-type="float">
            <text:p>391</text:p>
          </table:table-cell>
          <table:table-cell office:value-type="float" office:value="241" calcext:value-type="float">
            <text:p>241</text:p>
          </table:table-cell>
          <table:table-cell table:formula="of:=AVERAGE([.M390:.M397])" office:value-type="float" office:value="264.5" calcext:value-type="float">
            <text:p>26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2" calcext:value-type="float">
            <text:p>392</text:p>
          </table:table-cell>
          <table:table-cell office:value-type="float" office:value="280" calcext:value-type="float">
            <text:p>280</text:p>
          </table:table-cell>
          <table:table-cell table:formula="of:=AVERAGE([.M391:.M398])" office:value-type="float" office:value="268.125" calcext:value-type="float">
            <text:p>26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3" calcext:value-type="float">
            <text:p>393</text:p>
          </table:table-cell>
          <table:table-cell office:value-type="float" office:value="278" calcext:value-type="float">
            <text:p>278</text:p>
          </table:table-cell>
          <table:table-cell table:formula="of:=AVERAGE([.M392:.M399])" office:value-type="float" office:value="279" calcext:value-type="float">
            <text:p>27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4" calcext:value-type="float">
            <text:p>394</text:p>
          </table:table-cell>
          <table:table-cell office:value-type="float" office:value="276" calcext:value-type="float">
            <text:p>276</text:p>
          </table:table-cell>
          <table:table-cell table:formula="of:=AVERAGE([.M393:.M400])" office:value-type="float" office:value="286.5" calcext:value-type="float">
            <text:p>28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5" calcext:value-type="float">
            <text:p>395</text:p>
          </table:table-cell>
          <table:table-cell office:value-type="float" office:value="277" calcext:value-type="float">
            <text:p>277</text:p>
          </table:table-cell>
          <table:table-cell table:formula="of:=AVERAGE([.M394:.M401])" office:value-type="float" office:value="296.875" calcext:value-type="float">
            <text:p>29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6" calcext:value-type="float">
            <text:p>396</text:p>
          </table:table-cell>
          <table:table-cell office:value-type="float" office:value="300" calcext:value-type="float">
            <text:p>300</text:p>
          </table:table-cell>
          <table:table-cell table:formula="of:=AVERAGE([.M395:.M402])" office:value-type="float" office:value="302.125" calcext:value-type="float">
            <text:p>30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7" calcext:value-type="float">
            <text:p>397</text:p>
          </table:table-cell>
          <table:table-cell office:value-type="float" office:value="320" calcext:value-type="float">
            <text:p>320</text:p>
          </table:table-cell>
          <table:table-cell table:formula="of:=AVERAGE([.M396:.M403])" office:value-type="float" office:value="307.75" calcext:value-type="float">
            <text:p>30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8" calcext:value-type="float">
            <text:p>398</text:p>
          </table:table-cell>
          <table:table-cell office:value-type="float" office:value="320" calcext:value-type="float">
            <text:p>320</text:p>
          </table:table-cell>
          <table:table-cell table:formula="of:=AVERAGE([.M397:.M404])" office:value-type="float" office:value="319.875" calcext:value-type="float">
            <text:p>319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9" calcext:value-type="float">
            <text:p>399</text:p>
          </table:table-cell>
          <table:table-cell office:value-type="float" office:value="324" calcext:value-type="float">
            <text:p>324</text:p>
          </table:table-cell>
          <table:table-cell table:formula="of:=AVERAGE([.M398:.M405])" office:value-type="float" office:value="329.75" calcext:value-type="float">
            <text:p>32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0" calcext:value-type="float">
            <text:p>400</text:p>
          </table:table-cell>
          <table:table-cell office:value-type="float" office:value="322" calcext:value-type="float">
            <text:p>322</text:p>
          </table:table-cell>
          <table:table-cell table:formula="of:=AVERAGE([.M399:.M406])" office:value-type="float" office:value="340.75" calcext:value-type="float">
            <text:p>34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1" calcext:value-type="float">
            <text:p>401</text:p>
          </table:table-cell>
          <table:table-cell office:value-type="float" office:value="323" calcext:value-type="float">
            <text:p>323</text:p>
          </table:table-cell>
          <table:table-cell table:formula="of:=AVERAGE([.M400:.M407])" office:value-type="float" office:value="350.625" calcext:value-type="float">
            <text:p>350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2" calcext:value-type="float">
            <text:p>402</text:p>
          </table:table-cell>
          <table:table-cell office:value-type="float" office:value="373" calcext:value-type="float">
            <text:p>373</text:p>
          </table:table-cell>
          <table:table-cell table:formula="of:=AVERAGE([.M401:.M408])" office:value-type="float" office:value="361.125" calcext:value-type="float">
            <text:p>361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3" calcext:value-type="float">
            <text:p>403</text:p>
          </table:table-cell>
          <table:table-cell office:value-type="float" office:value="356" calcext:value-type="float">
            <text:p>356</text:p>
          </table:table-cell>
          <table:table-cell table:formula="of:=AVERAGE([.M402:.M409])" office:value-type="float" office:value="371.625" calcext:value-type="float">
            <text:p>37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4" calcext:value-type="float">
            <text:p>404</text:p>
          </table:table-cell>
          <table:table-cell office:value-type="float" office:value="388" calcext:value-type="float">
            <text:p>388</text:p>
          </table:table-cell>
          <table:table-cell table:formula="of:=AVERAGE([.M403:.M410])" office:value-type="float" office:value="381.75" calcext:value-type="float">
            <text:p>38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5" calcext:value-type="float">
            <text:p>405</text:p>
          </table:table-cell>
          <table:table-cell office:value-type="float" office:value="399" calcext:value-type="float">
            <text:p>399</text:p>
          </table:table-cell>
          <table:table-cell table:formula="of:=AVERAGE([.M404:.M411])" office:value-type="float" office:value="392.125" calcext:value-type="float">
            <text:p>39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table:formula="of:=AVERAGE([.M405:.M412])" office:value-type="float" office:value="394.25" calcext:value-type="float">
            <text:p>39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formula="of:=AVERAGE([.M406:.M413])" office:value-type="float" office:value="406.25" calcext:value-type="float">
            <text:p>40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table:formula="of:=AVERAGE([.M407:.M414])" office:value-type="float" office:value="412.75" calcext:value-type="float">
            <text:p>41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9" calcext:value-type="float">
            <text:p>409</text:p>
          </table:table-cell>
          <table:table-cell office:value-type="float" office:value="406" calcext:value-type="float">
            <text:p>406</text:p>
          </table:table-cell>
          <table:table-cell table:formula="of:=AVERAGE([.M408:.M415])" office:value-type="float" office:value="424.875" calcext:value-type="float">
            <text:p>42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  <table:table-cell table:formula="of:=AVERAGE([.M409:.M416])" office:value-type="float" office:value="433.875" calcext:value-type="float">
            <text:p>433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1" calcext:value-type="float">
            <text:p>411</text:p>
          </table:table-cell>
          <table:table-cell office:value-type="float" office:value="452" calcext:value-type="float">
            <text:p>452</text:p>
          </table:table-cell>
          <table:table-cell table:formula="of:=AVERAGE([.M410:.M417])" office:value-type="float" office:value="445.75" calcext:value-type="float">
            <text:p>44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2" calcext:value-type="float">
            <text:p>412</text:p>
          </table:table-cell>
          <table:table-cell office:value-type="float" office:value="440" calcext:value-type="float">
            <text:p>440</text:p>
          </table:table-cell>
          <table:table-cell table:formula="of:=AVERAGE([.M411:.M418])" office:value-type="float" office:value="457.75" calcext:value-type="float">
            <text:p>45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3" calcext:value-type="float">
            <text:p>413</text:p>
          </table:table-cell>
          <table:table-cell office:value-type="float" office:value="496" calcext:value-type="float">
            <text:p>496</text:p>
          </table:table-cell>
          <table:table-cell table:formula="of:=AVERAGE([.M412:.M419])" office:value-type="float" office:value="473.5" calcext:value-type="float">
            <text:p>47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4" calcext:value-type="float">
            <text:p>414</text:p>
          </table:table-cell>
          <table:table-cell office:value-type="float" office:value="476" calcext:value-type="float">
            <text:p>476</text:p>
          </table:table-cell>
          <table:table-cell table:formula="of:=AVERAGE([.M413:.M420])" office:value-type="float" office:value="486.625" calcext:value-type="float">
            <text:p>48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5" calcext:value-type="float">
            <text:p>415</text:p>
          </table:table-cell>
          <table:table-cell office:value-type="float" office:value="503" calcext:value-type="float">
            <text:p>503</text:p>
          </table:table-cell>
          <table:table-cell table:formula="of:=AVERAGE([.M414:.M421])" office:value-type="float" office:value="495.25" calcext:value-type="float">
            <text:p>49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  <table:table-cell table:formula="of:=AVERAGE([.M415:.M422])" office:value-type="float" office:value="508.75" calcext:value-type="float">
            <text:p>50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7" calcext:value-type="float">
            <text:p>417</text:p>
          </table:table-cell>
          <table:table-cell office:value-type="float" office:value="532" calcext:value-type="float">
            <text:p>532</text:p>
          </table:table-cell>
          <table:table-cell table:formula="of:=AVERAGE([.M416:.M423])" office:value-type="float" office:value="517.75" calcext:value-type="float">
            <text:p>517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8" calcext:value-type="float">
            <text:p>418</text:p>
          </table:table-cell>
          <table:table-cell office:value-type="float" office:value="495" calcext:value-type="float">
            <text:p>495</text:p>
          </table:table-cell>
          <table:table-cell table:formula="of:=AVERAGE([.M417:.M424])" office:value-type="float" office:value="529.25" calcext:value-type="float">
            <text:p>52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9" calcext:value-type="float">
            <text:p>419</text:p>
          </table:table-cell>
          <table:table-cell office:value-type="float" office:value="521" calcext:value-type="float">
            <text:p>521</text:p>
          </table:table-cell>
          <table:table-cell table:formula="of:=AVERAGE([.M418:.M425])" office:value-type="float" office:value="536.75" calcext:value-type="float">
            <text:p>53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0" calcext:value-type="float">
            <text:p>420</text:p>
          </table:table-cell>
          <table:table-cell office:value-type="float" office:value="548" calcext:value-type="float">
            <text:p>548</text:p>
          </table:table-cell>
          <table:table-cell table:formula="of:=AVERAGE([.M419:.M426])" office:value-type="float" office:value="548" calcext:value-type="float">
            <text:p>54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table:formula="of:=AVERAGE([.M420:.M427])" office:value-type="float" office:value="552.375" calcext:value-type="float">
            <text:p>55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2" calcext:value-type="float">
            <text:p>422</text:p>
          </table:table-cell>
          <table:table-cell office:value-type="float" office:value="568" calcext:value-type="float">
            <text:p>568</text:p>
          </table:table-cell>
          <table:table-cell table:formula="of:=AVERAGE([.M421:.M428])" office:value-type="float" office:value="571.875" calcext:value-type="float">
            <text:p>57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3" calcext:value-type="float">
            <text:p>423</text:p>
          </table:table-cell>
          <table:table-cell office:value-type="float" office:value="563" calcext:value-type="float">
            <text:p>563</text:p>
          </table:table-cell>
          <table:table-cell table:formula="of:=AVERAGE([.M422:.M429])" office:value-type="float" office:value="582.125" calcext:value-type="float">
            <text:p>58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4" calcext:value-type="float">
            <text:p>424</text:p>
          </table:table-cell>
          <table:table-cell office:value-type="float" office:value="589" calcext:value-type="float">
            <text:p>589</text:p>
          </table:table-cell>
          <table:table-cell table:formula="of:=AVERAGE([.M423:.M430])" office:value-type="float" office:value="589.125" calcext:value-type="float">
            <text:p>58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5" calcext:value-type="float">
            <text:p>425</text:p>
          </table:table-cell>
          <table:table-cell office:value-type="float" office:value="567" calcext:value-type="float">
            <text:p>567</text:p>
          </table:table-cell>
          <table:table-cell table:formula="of:=AVERAGE([.M424:.M431])" office:value-type="float" office:value="599.625" calcext:value-type="float">
            <text:p>599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6" calcext:value-type="float">
            <text:p>426</text:p>
          </table:table-cell>
          <table:table-cell office:value-type="float" office:value="651" calcext:value-type="float">
            <text:p>651</text:p>
          </table:table-cell>
          <table:table-cell table:formula="of:=AVERAGE([.M425:.M432])" office:value-type="float" office:value="611.375" calcext:value-type="float">
            <text:p>61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7" calcext:value-type="float">
            <text:p>427</text:p>
          </table:table-cell>
          <table:table-cell office:value-type="float" office:value="603" calcext:value-type="float">
            <text:p>603</text:p>
          </table:table-cell>
          <table:table-cell table:formula="of:=AVERAGE([.M426:.M433])" office:value-type="float" office:value="622.625" calcext:value-type="float">
            <text:p>62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8" calcext:value-type="float">
            <text:p>428</text:p>
          </table:table-cell>
          <table:table-cell office:value-type="float" office:value="604" calcext:value-type="float">
            <text:p>604</text:p>
          </table:table-cell>
          <table:table-cell table:formula="of:=AVERAGE([.M427:.M434])" office:value-type="float" office:value="632.375" calcext:value-type="float">
            <text:p>63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9" calcext:value-type="float">
            <text:p>429</text:p>
          </table:table-cell>
          <table:table-cell office:value-type="float" office:value="652" calcext:value-type="float">
            <text:p>652</text:p>
          </table:table-cell>
          <table:table-cell table:formula="of:=AVERAGE([.M428:.M435])" office:value-type="float" office:value="646" calcext:value-type="float">
            <text:p>646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0" calcext:value-type="float">
            <text:p>430</text:p>
          </table:table-cell>
          <table:table-cell office:value-type="float" office:value="662" calcext:value-type="float">
            <text:p>662</text:p>
          </table:table-cell>
          <table:table-cell table:formula="of:=AVERAGE([.M429:.M436])" office:value-type="float" office:value="652.625" calcext:value-type="float">
            <text:p>65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1" calcext:value-type="float">
            <text:p>431</text:p>
          </table:table-cell>
          <table:table-cell office:value-type="float" office:value="653" calcext:value-type="float">
            <text:p>653</text:p>
          </table:table-cell>
          <table:table-cell table:formula="of:=AVERAGE([.M430:.M437])" office:value-type="float" office:value="672.25" calcext:value-type="float">
            <text:p>67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2" calcext:value-type="float">
            <text:p>432</text:p>
          </table:table-cell>
          <table:table-cell office:value-type="float" office:value="667" calcext:value-type="float">
            <text:p>667</text:p>
          </table:table-cell>
          <table:table-cell table:formula="of:=AVERAGE([.M431:.M438])" office:value-type="float" office:value="685.875" calcext:value-type="float">
            <text:p>68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3" calcext:value-type="float">
            <text:p>433</text:p>
          </table:table-cell>
          <table:table-cell office:value-type="float" office:value="676" calcext:value-type="float">
            <text:p>676</text:p>
          </table:table-cell>
          <table:table-cell table:formula="of:=AVERAGE([.M432:.M439])" office:value-type="float" office:value="688.375" calcext:value-type="float">
            <text:p>68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4" calcext:value-type="float">
            <text:p>434</text:p>
          </table:table-cell>
          <table:table-cell office:value-type="float" office:value="704" calcext:value-type="float">
            <text:p>704</text:p>
          </table:table-cell>
          <table:table-cell table:formula="of:=AVERAGE([.M433:.M440])" office:value-type="float" office:value="698" calcext:value-type="float">
            <text:p>69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5" calcext:value-type="float">
            <text:p>435</text:p>
          </table:table-cell>
          <table:table-cell office:value-type="float" office:value="760" calcext:value-type="float">
            <text:p>760</text:p>
          </table:table-cell>
          <table:table-cell table:formula="of:=AVERAGE([.M434:.M441])" office:value-type="float" office:value="717" calcext:value-type="float">
            <text:p>71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6" calcext:value-type="float">
            <text:p>436</text:p>
          </table:table-cell>
          <table:table-cell office:value-type="float" office:value="713" calcext:value-type="float">
            <text:p>713</text:p>
          </table:table-cell>
          <table:table-cell table:formula="of:=AVERAGE([.M435:.M442])" office:value-type="float" office:value="733.375" calcext:value-type="float">
            <text:p>73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7" calcext:value-type="float">
            <text:p>437</text:p>
          </table:table-cell>
          <table:table-cell office:value-type="float" office:value="672" calcext:value-type="float">
            <text:p>672</text:p>
          </table:table-cell>
          <table:table-cell table:formula="of:=AVERAGE([.M436:.M443])" office:value-type="float" office:value="747.875" calcext:value-type="float">
            <text:p>74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8" calcext:value-type="float">
            <text:p>438</text:p>
          </table:table-cell>
          <table:table-cell office:value-type="float" office:value="739" calcext:value-type="float">
            <text:p>739</text:p>
          </table:table-cell>
          <table:table-cell table:formula="of:=AVERAGE([.M437:.M444])" office:value-type="float" office:value="751.875" calcext:value-type="float">
            <text:p>75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9" calcext:value-type="float">
            <text:p>439</text:p>
          </table:table-cell>
          <table:table-cell office:value-type="float" office:value="805" calcext:value-type="float">
            <text:p>805</text:p>
          </table:table-cell>
          <table:table-cell table:formula="of:=AVERAGE([.M438:.M445])" office:value-type="float" office:value="755.875" calcext:value-type="float">
            <text:p>75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0" calcext:value-type="float">
            <text:p>440</text:p>
          </table:table-cell>
          <table:table-cell office:value-type="float" office:value="798" calcext:value-type="float">
            <text:p>798</text:p>
          </table:table-cell>
          <table:table-cell table:formula="of:=AVERAGE([.M439:.M446])" office:value-type="float" office:value="767.125" calcext:value-type="float">
            <text:p>767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1" calcext:value-type="float">
            <text:p>441</text:p>
          </table:table-cell>
          <table:table-cell office:value-type="float" office:value="792" calcext:value-type="float">
            <text:p>792</text:p>
          </table:table-cell>
          <table:table-cell table:formula="of:=AVERAGE([.M440:.M447])" office:value-type="float" office:value="785.875" calcext:value-type="float">
            <text:p>78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2" calcext:value-type="float">
            <text:p>442</text:p>
          </table:table-cell>
          <table:table-cell office:value-type="float" office:value="736" calcext:value-type="float">
            <text:p>736</text:p>
          </table:table-cell>
          <table:table-cell table:formula="of:=AVERAGE([.M441:.M448])" office:value-type="float" office:value="801.125" calcext:value-type="float">
            <text:p>801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3" calcext:value-type="float">
            <text:p>443</text:p>
          </table:table-cell>
          <table:table-cell office:value-type="float" office:value="792" calcext:value-type="float">
            <text:p>792</text:p>
          </table:table-cell>
          <table:table-cell table:formula="of:=AVERAGE([.M442:.M449])" office:value-type="float" office:value="806.875" calcext:value-type="float">
            <text:p>80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4" calcext:value-type="float">
            <text:p>444</text:p>
          </table:table-cell>
          <table:table-cell office:value-type="float" office:value="803" calcext:value-type="float">
            <text:p>803</text:p>
          </table:table-cell>
          <table:table-cell table:formula="of:=AVERAGE([.M443:.M450])" office:value-type="float" office:value="813.25" calcext:value-type="float">
            <text:p>8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5" calcext:value-type="float">
            <text:p>445</text:p>
          </table:table-cell>
          <table:table-cell office:value-type="float" office:value="822" calcext:value-type="float">
            <text:p>822</text:p>
          </table:table-cell>
          <table:table-cell table:formula="of:=AVERAGE([.M444:.M451])" office:value-type="float" office:value="816.875" calcext:value-type="float">
            <text:p>81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6" calcext:value-type="float">
            <text:p>446</text:p>
          </table:table-cell>
          <table:table-cell office:value-type="float" office:value="861" calcext:value-type="float">
            <text:p>861</text:p>
          </table:table-cell>
          <table:table-cell table:formula="of:=AVERAGE([.M445:.M452])" office:value-type="float" office:value="829.5" calcext:value-type="float">
            <text:p>829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7" calcext:value-type="float">
            <text:p>447</text:p>
          </table:table-cell>
          <table:table-cell office:value-type="float" office:value="851" calcext:value-type="float">
            <text:p>851</text:p>
          </table:table-cell>
          <table:table-cell table:formula="of:=AVERAGE([.M446:.M453])" office:value-type="float" office:value="841.5" calcext:value-type="float">
            <text:p>841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8" calcext:value-type="float">
            <text:p>448</text:p>
          </table:table-cell>
          <table:table-cell office:value-type="float" office:value="849" calcext:value-type="float">
            <text:p>849</text:p>
          </table:table-cell>
          <table:table-cell table:formula="of:=AVERAGE([.M447:.M454])" office:value-type="float" office:value="851.875" calcext:value-type="float">
            <text:p>85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49" calcext:value-type="float">
            <text:p>449</text:p>
          </table:table-cell>
          <table:table-cell office:value-type="float" office:value="821" calcext:value-type="float">
            <text:p>821</text:p>
          </table:table-cell>
          <table:table-cell table:formula="of:=AVERAGE([.M448:.M455])" office:value-type="float" office:value="860.375" calcext:value-type="float">
            <text:p>860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0" calcext:value-type="float">
            <text:p>450</text:p>
          </table:table-cell>
          <table:table-cell office:value-type="float" office:value="837" calcext:value-type="float">
            <text:p>837</text:p>
          </table:table-cell>
          <table:table-cell table:formula="of:=AVERAGE([.M449:.M456])" office:value-type="float" office:value="859.75" calcext:value-type="float">
            <text:p>85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1" calcext:value-type="float">
            <text:p>451</text:p>
          </table:table-cell>
          <table:table-cell office:value-type="float" office:value="888" calcext:value-type="float">
            <text:p>888</text:p>
          </table:table-cell>
          <table:table-cell table:formula="of:=AVERAGE([.M450:.M457])" office:value-type="float" office:value="865.375" calcext:value-type="float">
            <text:p>865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2" calcext:value-type="float">
            <text:p>452</text:p>
          </table:table-cell>
          <table:table-cell office:value-type="float" office:value="886" calcext:value-type="float">
            <text:p>886</text:p>
          </table:table-cell>
          <table:table-cell table:formula="of:=AVERAGE([.M451:.M458])" office:value-type="float" office:value="869.75" calcext:value-type="float">
            <text:p>86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3" calcext:value-type="float">
            <text:p>453</text:p>
          </table:table-cell>
          <table:table-cell office:value-type="float" office:value="890" calcext:value-type="float">
            <text:p>890</text:p>
          </table:table-cell>
          <table:table-cell table:formula="of:=AVERAGE([.M452:.M459])" office:value-type="float" office:value="877.375" calcext:value-type="float">
            <text:p>87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4" calcext:value-type="float">
            <text:p>454</text:p>
          </table:table-cell>
          <table:table-cell office:value-type="float" office:value="856" calcext:value-type="float">
            <text:p>856</text:p>
          </table:table-cell>
          <table:table-cell table:formula="of:=AVERAGE([.M453:.M460])" office:value-type="float" office:value="884.125" calcext:value-type="float">
            <text:p>884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5" calcext:value-type="float">
            <text:p>455</text:p>
          </table:table-cell>
          <table:table-cell office:value-type="float" office:value="896" calcext:value-type="float">
            <text:p>896</text:p>
          </table:table-cell>
          <table:table-cell table:formula="of:=AVERAGE([.M454:.M461])" office:value-type="float" office:value="892" calcext:value-type="float">
            <text:p>892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6" calcext:value-type="float">
            <text:p>456</text:p>
          </table:table-cell>
          <table:table-cell office:value-type="float" office:value="884" calcext:value-type="float">
            <text:p>884</text:p>
          </table:table-cell>
          <table:table-cell table:formula="of:=AVERAGE([.M455:.M462])" office:value-type="float" office:value="892.5" calcext:value-type="float">
            <text:p>892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7" calcext:value-type="float">
            <text:p>457</text:p>
          </table:table-cell>
          <table:table-cell office:value-type="float" office:value="882" calcext:value-type="float">
            <text:p>882</text:p>
          </table:table-cell>
          <table:table-cell table:formula="of:=AVERAGE([.M456:.M463])" office:value-type="float" office:value="892.375" calcext:value-type="float">
            <text:p>89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8" calcext:value-type="float">
            <text:p>458</text:p>
          </table:table-cell>
          <table:table-cell office:value-type="float" office:value="891" calcext:value-type="float">
            <text:p>891</text:p>
          </table:table-cell>
          <table:table-cell table:formula="of:=AVERAGE([.M457:.M464])" office:value-type="float" office:value="899.25" calcext:value-type="float">
            <text:p>89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9" calcext:value-type="float">
            <text:p>459</text:p>
          </table:table-cell>
          <table:table-cell office:value-type="float" office:value="951" calcext:value-type="float">
            <text:p>951</text:p>
          </table:table-cell>
          <table:table-cell table:formula="of:=AVERAGE([.M458:.M465])" office:value-type="float" office:value="909" calcext:value-type="float">
            <text:p>90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890" calcext:value-type="float">
            <text:p>890</text:p>
          </table:table-cell>
          <table:table-cell table:formula="of:=AVERAGE([.M459:.M466])" office:value-type="float" office:value="905.5" calcext:value-type="float">
            <text:p>90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1" calcext:value-type="float">
            <text:p>461</text:p>
          </table:table-cell>
          <table:table-cell office:value-type="float" office:value="889" calcext:value-type="float">
            <text:p>889</text:p>
          </table:table-cell>
          <table:table-cell table:formula="of:=AVERAGE([.M460:.M467])" office:value-type="float" office:value="911.75" calcext:value-type="float">
            <text:p>91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2" calcext:value-type="float">
            <text:p>462</text:p>
          </table:table-cell>
          <table:table-cell office:value-type="float" office:value="911" calcext:value-type="float">
            <text:p>911</text:p>
          </table:table-cell>
          <table:table-cell table:formula="of:=AVERAGE([.M461:.M468])" office:value-type="float" office:value="915.875" calcext:value-type="float">
            <text:p>91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3" calcext:value-type="float">
            <text:p>463</text:p>
          </table:table-cell>
          <table:table-cell office:value-type="float" office:value="974" calcext:value-type="float">
            <text:p>974</text:p>
          </table:table-cell>
          <table:table-cell table:formula="of:=AVERAGE([.M462:.M469])" office:value-type="float" office:value="910.75" calcext:value-type="float">
            <text:p>91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4" calcext:value-type="float">
            <text:p>464</text:p>
          </table:table-cell>
          <table:table-cell office:value-type="float" office:value="856" calcext:value-type="float">
            <text:p>856</text:p>
          </table:table-cell>
          <table:table-cell table:formula="of:=AVERAGE([.M463:.M470])" office:value-type="float" office:value="915.375" calcext:value-type="float">
            <text:p>915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5" calcext:value-type="float">
            <text:p>465</text:p>
          </table:table-cell>
          <table:table-cell office:value-type="float" office:value="932" calcext:value-type="float">
            <text:p>932</text:p>
          </table:table-cell>
          <table:table-cell table:formula="of:=AVERAGE([.M464:.M471])" office:value-type="float" office:value="928.875" calcext:value-type="float">
            <text:p>92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6" calcext:value-type="float">
            <text:p>466</text:p>
          </table:table-cell>
          <table:table-cell office:value-type="float" office:value="924" calcext:value-type="float">
            <text:p>924</text:p>
          </table:table-cell>
          <table:table-cell table:formula="of:=AVERAGE([.M465:.M472])" office:value-type="float" office:value="938.375" calcext:value-type="float">
            <text:p>93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7" calcext:value-type="float">
            <text:p>467</text:p>
          </table:table-cell>
          <table:table-cell office:value-type="float" office:value="910" calcext:value-type="float">
            <text:p>910</text:p>
          </table:table-cell>
          <table:table-cell table:formula="of:=AVERAGE([.M466:.M473])" office:value-type="float" office:value="934.875" calcext:value-type="float">
            <text:p>93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8" calcext:value-type="float">
            <text:p>468</text:p>
          </table:table-cell>
          <table:table-cell office:value-type="float" office:value="927" calcext:value-type="float">
            <text:p>927</text:p>
          </table:table-cell>
          <table:table-cell table:formula="of:=AVERAGE([.M467:.M474])" office:value-type="float" office:value="949.875" calcext:value-type="float">
            <text:p>949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9" calcext:value-type="float">
            <text:p>469</text:p>
          </table:table-cell>
          <table:table-cell office:value-type="float" office:value="997" calcext:value-type="float">
            <text:p>997</text:p>
          </table:table-cell>
          <table:table-cell table:formula="of:=AVERAGE([.M468:.M475])" office:value-type="float" office:value="944.75" calcext:value-type="float">
            <text:p>944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987" calcext:value-type="float">
            <text:p>987</text:p>
          </table:table-cell>
          <table:table-cell table:formula="of:=AVERAGE([.M469:.M476])" office:value-type="float" office:value="952.25" calcext:value-type="float">
            <text:p>95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1" calcext:value-type="float">
            <text:p>471</text:p>
          </table:table-cell>
          <table:table-cell office:value-type="float" office:value="946" calcext:value-type="float">
            <text:p>946</text:p>
          </table:table-cell>
          <table:table-cell table:formula="of:=AVERAGE([.M470:.M477])" office:value-type="float" office:value="957.375" calcext:value-type="float">
            <text:p>95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2" calcext:value-type="float">
            <text:p>472</text:p>
          </table:table-cell>
          <table:table-cell office:value-type="float" office:value="976" calcext:value-type="float">
            <text:p>976</text:p>
          </table:table-cell>
          <table:table-cell table:formula="of:=AVERAGE([.M471:.M478])" office:value-type="float" office:value="964.5" calcext:value-type="float">
            <text:p>96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3" calcext:value-type="float">
            <text:p>473</text:p>
          </table:table-cell>
          <table:table-cell office:value-type="float" office:value="891" calcext:value-type="float">
            <text:p>891</text:p>
          </table:table-cell>
          <table:table-cell table:formula="of:=AVERAGE([.M472:.M479])" office:value-type="float" office:value="961.5" calcext:value-type="float">
            <text:p>961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4" calcext:value-type="float">
            <text:p>474</text:p>
          </table:table-cell>
          <table:table-cell office:value-type="float" office:value="984" calcext:value-type="float">
            <text:p>984</text:p>
          </table:table-cell>
          <table:table-cell table:formula="of:=AVERAGE([.M473:.M480])" office:value-type="float" office:value="955.625" calcext:value-type="float">
            <text:p>95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5" calcext:value-type="float">
            <text:p>475</text:p>
          </table:table-cell>
          <table:table-cell office:value-type="float" office:value="951" calcext:value-type="float">
            <text:p>951</text:p>
          </table:table-cell>
          <table:table-cell table:formula="of:=AVERAGE([.M474:.M481])" office:value-type="float" office:value="961.125" calcext:value-type="float">
            <text:p>961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6" calcext:value-type="float">
            <text:p>476</text:p>
          </table:table-cell>
          <table:table-cell office:value-type="float" office:value="984" calcext:value-type="float">
            <text:p>984</text:p>
          </table:table-cell>
          <table:table-cell table:formula="of:=AVERAGE([.M475:.M482])" office:value-type="float" office:value="963.375" calcext:value-type="float">
            <text:p>96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7" calcext:value-type="float">
            <text:p>477</text:p>
          </table:table-cell>
          <table:table-cell office:value-type="float" office:value="973" calcext:value-type="float">
            <text:p>973</text:p>
          </table:table-cell>
          <table:table-cell table:formula="of:=AVERAGE([.M476:.M483])" office:value-type="float" office:value="971.75" calcext:value-type="float">
            <text:p>97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8" calcext:value-type="float">
            <text:p>478</text:p>
          </table:table-cell>
          <table:table-cell office:value-type="float" office:value="940" calcext:value-type="float">
            <text:p>940</text:p>
          </table:table-cell>
          <table:table-cell table:formula="of:=AVERAGE([.M477:.M484])" office:value-type="float" office:value="971.375" calcext:value-type="float">
            <text:p>97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9" calcext:value-type="float">
            <text:p>479</text:p>
          </table:table-cell>
          <table:table-cell office:value-type="float" office:value="990" calcext:value-type="float">
            <text:p>990</text:p>
          </table:table-cell>
          <table:table-cell table:formula="of:=AVERAGE([.M478:.M485])" office:value-type="float" office:value="974.5" calcext:value-type="float">
            <text:p>97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994" calcext:value-type="float">
            <text:p>994</text:p>
          </table:table-cell>
          <table:table-cell table:formula="of:=AVERAGE([.M479:.M486])" office:value-type="float" office:value="970.875" calcext:value-type="float">
            <text:p>97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1" calcext:value-type="float">
            <text:p>481</text:p>
          </table:table-cell>
          <table:table-cell office:value-type="float" office:value="958" calcext:value-type="float">
            <text:p>958</text:p>
          </table:table-cell>
          <table:table-cell table:formula="of:=AVERAGE([.M480:.M487])" office:value-type="float" office:value="962.5" calcext:value-type="float">
            <text:p>962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2" calcext:value-type="float">
            <text:p>482</text:p>
          </table:table-cell>
          <table:table-cell office:value-type="float" office:value="981" calcext:value-type="float">
            <text:p>981</text:p>
          </table:table-cell>
          <table:table-cell table:formula="of:=AVERAGE([.M481:.M488])" office:value-type="float" office:value="967" calcext:value-type="float">
            <text:p>96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3" calcext:value-type="float">
            <text:p>483</text:p>
          </table:table-cell>
          <table:table-cell office:value-type="float" office:value="976" calcext:value-type="float">
            <text:p>976</text:p>
          </table:table-cell>
          <table:table-cell table:formula="of:=AVERAGE([.M482:.M489])" office:value-type="float" office:value="960.25" calcext:value-type="float">
            <text:p>96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4" calcext:value-type="float">
            <text:p>484</text:p>
          </table:table-cell>
          <table:table-cell office:value-type="float" office:value="955" calcext:value-type="float">
            <text:p>955</text:p>
          </table:table-cell>
          <table:table-cell table:formula="of:=AVERAGE([.M483:.M490])" office:value-type="float" office:value="956.375" calcext:value-type="float">
            <text:p>956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5" calcext:value-type="float">
            <text:p>485</text:p>
          </table:table-cell>
          <table:table-cell office:value-type="float" office:value="906" calcext:value-type="float">
            <text:p>906</text:p>
          </table:table-cell>
          <table:table-cell table:formula="of:=AVERAGE([.M484:.M491])" office:value-type="float" office:value="953.125" calcext:value-type="float">
            <text:p>953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6" calcext:value-type="float">
            <text:p>486</text:p>
          </table:table-cell>
          <table:table-cell office:value-type="float" office:value="976" calcext:value-type="float">
            <text:p>976</text:p>
          </table:table-cell>
          <table:table-cell table:formula="of:=AVERAGE([.M485:.M492])" office:value-type="float" office:value="945.25" calcext:value-type="float">
            <text:p>94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7" calcext:value-type="float">
            <text:p>487</text:p>
          </table:table-cell>
          <table:table-cell office:value-type="float" office:value="936" calcext:value-type="float">
            <text:p>936</text:p>
          </table:table-cell>
          <table:table-cell table:formula="of:=AVERAGE([.M486:.M493])" office:value-type="float" office:value="940.125" calcext:value-type="float">
            <text:p>940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8" calcext:value-type="float">
            <text:p>488</text:p>
          </table:table-cell>
          <table:table-cell office:value-type="float" office:value="963" calcext:value-type="float">
            <text:p>963</text:p>
          </table:table-cell>
          <table:table-cell table:formula="of:=AVERAGE([.M487:.M494])" office:value-type="float" office:value="933.375" calcext:value-type="float">
            <text:p>93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9" calcext:value-type="float">
            <text:p>489</text:p>
          </table:table-cell>
          <table:table-cell office:value-type="float" office:value="932" calcext:value-type="float">
            <text:p>932</text:p>
          </table:table-cell>
          <table:table-cell table:formula="of:=AVERAGE([.M488:.M495])" office:value-type="float" office:value="933.875" calcext:value-type="float">
            <text:p>933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918" calcext:value-type="float">
            <text:p>918</text:p>
          </table:table-cell>
          <table:table-cell table:formula="of:=AVERAGE([.M489:.M496])" office:value-type="float" office:value="931" calcext:value-type="float">
            <text:p>931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1" calcext:value-type="float">
            <text:p>491</text:p>
          </table:table-cell>
          <table:table-cell office:value-type="float" office:value="935" calcext:value-type="float">
            <text:p>935</text:p>
          </table:table-cell>
          <table:table-cell table:formula="of:=AVERAGE([.M490:.M497])" office:value-type="float" office:value="936.75" calcext:value-type="float">
            <text:p>93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2" calcext:value-type="float">
            <text:p>492</text:p>
          </table:table-cell>
          <table:table-cell office:value-type="float" office:value="901" calcext:value-type="float">
            <text:p>901</text:p>
          </table:table-cell>
          <table:table-cell table:formula="of:=AVERAGE([.M491:.M498])" office:value-type="float" office:value="932.875" calcext:value-type="float">
            <text:p>932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3" calcext:value-type="float">
            <text:p>493</text:p>
          </table:table-cell>
          <table:table-cell office:value-type="float" office:value="910" calcext:value-type="float">
            <text:p>910</text:p>
          </table:table-cell>
          <table:table-cell table:formula="of:=AVERAGE([.M492:.M499])" office:value-type="float" office:value="930.75" calcext:value-type="float">
            <text:p>93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4" calcext:value-type="float">
            <text:p>494</text:p>
          </table:table-cell>
          <table:table-cell office:value-type="float" office:value="953" calcext:value-type="float">
            <text:p>953</text:p>
          </table:table-cell>
          <table:table-cell table:formula="of:=AVERAGE([.M493:.M500])" office:value-type="float" office:value="935.25" calcext:value-type="float">
            <text:p>93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5" calcext:value-type="float">
            <text:p>495</text:p>
          </table:table-cell>
          <table:table-cell office:value-type="float" office:value="982" calcext:value-type="float">
            <text:p>982</text:p>
          </table:table-cell>
          <table:table-cell table:formula="of:=AVERAGE([.M494:.M501])" office:value-type="float" office:value="938.375" calcext:value-type="float">
            <text:p>93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6" calcext:value-type="float">
            <text:p>496</text:p>
          </table:table-cell>
          <table:table-cell office:value-type="float" office:value="932" calcext:value-type="float">
            <text:p>932</text:p>
          </table:table-cell>
          <table:table-cell table:formula="of:=AVERAGE([.M495:.M502])" office:value-type="float" office:value="944.25" calcext:value-type="float">
            <text:p>94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7" calcext:value-type="float">
            <text:p>497</text:p>
          </table:table-cell>
          <table:table-cell office:value-type="float" office:value="915" calcext:value-type="float">
            <text:p>915</text:p>
          </table:table-cell>
          <table:table-cell table:formula="of:=AVERAGE([.M496:.M503])" office:value-type="float" office:value="948.25" calcext:value-type="float">
            <text:p>94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8" calcext:value-type="float">
            <text:p>498</text:p>
          </table:table-cell>
          <table:table-cell office:value-type="float" office:value="954" calcext:value-type="float">
            <text:p>954</text:p>
          </table:table-cell>
          <table:table-cell table:formula="of:=AVERAGE([.M497:.M504])" office:value-type="float" office:value="942.75" calcext:value-type="float">
            <text:p>94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99" calcext:value-type="float">
            <text:p>499</text:p>
          </table:table-cell>
          <table:table-cell office:value-type="float" office:value="960" calcext:value-type="float">
            <text:p>960</text:p>
          </table:table-cell>
          <table:table-cell table:formula="of:=AVERAGE([.M498:.M505])" office:value-type="float" office:value="943.5" calcext:value-type="float">
            <text:p>94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948" calcext:value-type="float">
            <text:p>948</text:p>
          </table:table-cell>
          <table:table-cell table:formula="of:=AVERAGE([.M499:.M506])" office:value-type="float" office:value="940.5" calcext:value-type="float">
            <text:p>94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1" calcext:value-type="float">
            <text:p>501</text:p>
          </table:table-cell>
          <table:table-cell office:value-type="float" office:value="942" calcext:value-type="float">
            <text:p>942</text:p>
          </table:table-cell>
          <table:table-cell table:formula="of:=AVERAGE([.M500:.M507])" office:value-type="float" office:value="943.75" calcext:value-type="float">
            <text:p>94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2" calcext:value-type="float">
            <text:p>502</text:p>
          </table:table-cell>
          <table:table-cell office:value-type="float" office:value="909" calcext:value-type="float">
            <text:p>909</text:p>
          </table:table-cell>
          <table:table-cell table:formula="of:=AVERAGE([.M501:.M508])" office:value-type="float" office:value="940" calcext:value-type="float">
            <text:p>940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3" calcext:value-type="float">
            <text:p>503</text:p>
          </table:table-cell>
          <table:table-cell office:value-type="float" office:value="988" calcext:value-type="float">
            <text:p>988</text:p>
          </table:table-cell>
          <table:table-cell table:formula="of:=AVERAGE([.M502:.M509])" office:value-type="float" office:value="931.625" calcext:value-type="float">
            <text:p>93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4" calcext:value-type="float">
            <text:p>504</text:p>
          </table:table-cell>
          <table:table-cell office:value-type="float" office:value="908" calcext:value-type="float">
            <text:p>908</text:p>
          </table:table-cell>
          <table:table-cell table:formula="of:=AVERAGE([.M503:.M510])" office:value-type="float" office:value="926.125" calcext:value-type="float">
            <text:p>92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5" calcext:value-type="float">
            <text:p>505</text:p>
          </table:table-cell>
          <table:table-cell office:value-type="float" office:value="941" calcext:value-type="float">
            <text:p>941</text:p>
          </table:table-cell>
          <table:table-cell table:formula="of:=AVERAGE([.M504:.M511])" office:value-type="float" office:value="921" calcext:value-type="float">
            <text:p>921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6" calcext:value-type="float">
            <text:p>506</text:p>
          </table:table-cell>
          <table:table-cell office:value-type="float" office:value="924" calcext:value-type="float">
            <text:p>924</text:p>
          </table:table-cell>
          <table:table-cell table:formula="of:=AVERAGE([.M505:.M512])" office:value-type="float" office:value="913.25" calcext:value-type="float">
            <text:p>9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7" calcext:value-type="float">
            <text:p>507</text:p>
          </table:table-cell>
          <table:table-cell office:value-type="float" office:value="893" calcext:value-type="float">
            <text:p>893</text:p>
          </table:table-cell>
          <table:table-cell table:formula="of:=AVERAGE([.M506:.M513])" office:value-type="float" office:value="899.125" calcext:value-type="float">
            <text:p>89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8" calcext:value-type="float">
            <text:p>508</text:p>
          </table:table-cell>
          <table:table-cell office:value-type="float" office:value="904" calcext:value-type="float">
            <text:p>904</text:p>
          </table:table-cell>
          <table:table-cell table:formula="of:=AVERAGE([.M507:.M514])" office:value-type="float" office:value="890.375" calcext:value-type="float">
            <text:p>890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09" calcext:value-type="float">
            <text:p>509</text:p>
          </table:table-cell>
          <table:table-cell office:value-type="float" office:value="901" calcext:value-type="float">
            <text:p>901</text:p>
          </table:table-cell>
          <table:table-cell table:formula="of:=AVERAGE([.M508:.M515])" office:value-type="float" office:value="877.375" calcext:value-type="float">
            <text:p>87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847" calcext:value-type="float">
            <text:p>847</text:p>
          </table:table-cell>
          <table:table-cell table:formula="of:=AVERAGE([.M509:.M516])" office:value-type="float" office:value="868.875" calcext:value-type="float">
            <text:p>86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1" calcext:value-type="float">
            <text:p>511</text:p>
          </table:table-cell>
          <table:table-cell office:value-type="float" office:value="875" calcext:value-type="float">
            <text:p>875</text:p>
          </table:table-cell>
          <table:table-cell table:formula="of:=AVERAGE([.M510:.M517])" office:value-type="float" office:value="858.5" calcext:value-type="float">
            <text:p>858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2" calcext:value-type="float">
            <text:p>512</text:p>
          </table:table-cell>
          <table:table-cell office:value-type="float" office:value="838" calcext:value-type="float">
            <text:p>838</text:p>
          </table:table-cell>
          <table:table-cell table:formula="of:=AVERAGE([.M511:.M518])" office:value-type="float" office:value="854.5" calcext:value-type="float">
            <text:p>85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3" calcext:value-type="float">
            <text:p>513</text:p>
          </table:table-cell>
          <table:table-cell office:value-type="float" office:value="837" calcext:value-type="float">
            <text:p>837</text:p>
          </table:table-cell>
          <table:table-cell table:formula="of:=AVERAGE([.M512:.M519])" office:value-type="float" office:value="844" calcext:value-type="float">
            <text:p>84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4" calcext:value-type="float">
            <text:p>514</text:p>
          </table:table-cell>
          <table:table-cell office:value-type="float" office:value="856" calcext:value-type="float">
            <text:p>856</text:p>
          </table:table-cell>
          <table:table-cell table:formula="of:=AVERAGE([.M513:.M520])" office:value-type="float" office:value="845.25" calcext:value-type="float">
            <text:p>84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5" calcext:value-type="float">
            <text:p>515</text:p>
          </table:table-cell>
          <table:table-cell office:value-type="float" office:value="810" calcext:value-type="float">
            <text:p>810</text:p>
          </table:table-cell>
          <table:table-cell table:formula="of:=AVERAGE([.M514:.M521])" office:value-type="float" office:value="834.125" calcext:value-type="float">
            <text:p>834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6" calcext:value-type="float">
            <text:p>516</text:p>
          </table:table-cell>
          <table:table-cell office:value-type="float" office:value="872" calcext:value-type="float">
            <text:p>872</text:p>
          </table:table-cell>
          <table:table-cell table:formula="of:=AVERAGE([.M515:.M522])" office:value-type="float" office:value="832.625" calcext:value-type="float">
            <text:p>83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7" calcext:value-type="float">
            <text:p>517</text:p>
          </table:table-cell>
          <table:table-cell office:value-type="float" office:value="817" calcext:value-type="float">
            <text:p>817</text:p>
          </table:table-cell>
          <table:table-cell table:formula="of:=AVERAGE([.M516:.M523])" office:value-type="float" office:value="827.875" calcext:value-type="float">
            <text:p>82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8" calcext:value-type="float">
            <text:p>518</text:p>
          </table:table-cell>
          <table:table-cell office:value-type="float" office:value="857" calcext:value-type="float">
            <text:p>857</text:p>
          </table:table-cell>
          <table:table-cell table:formula="of:=AVERAGE([.M517:.M524])" office:value-type="float" office:value="822.25" calcext:value-type="float">
            <text:p>82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19" calcext:value-type="float">
            <text:p>519</text:p>
          </table:table-cell>
          <table:table-cell office:value-type="float" office:value="786" calcext:value-type="float">
            <text:p>786</text:p>
          </table:table-cell>
          <table:table-cell table:formula="of:=AVERAGE([.M518:.M525])" office:value-type="float" office:value="825.625" calcext:value-type="float">
            <text:p>82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826" calcext:value-type="float">
            <text:p>826</text:p>
          </table:table-cell>
          <table:table-cell table:formula="of:=AVERAGE([.M519:.M526])" office:value-type="float" office:value="819.25" calcext:value-type="float">
            <text:p>81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1" calcext:value-type="float">
            <text:p>521</text:p>
          </table:table-cell>
          <table:table-cell office:value-type="float" office:value="799" calcext:value-type="float">
            <text:p>799</text:p>
          </table:table-cell>
          <table:table-cell table:formula="of:=AVERAGE([.M520:.M527])" office:value-type="float" office:value="811.75" calcext:value-type="float">
            <text:p>81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2" calcext:value-type="float">
            <text:p>522</text:p>
          </table:table-cell>
          <table:table-cell office:value-type="float" office:value="811" calcext:value-type="float">
            <text:p>811</text:p>
          </table:table-cell>
          <table:table-cell table:formula="of:=AVERAGE([.M521:.M528])" office:value-type="float" office:value="807.625" calcext:value-type="float">
            <text:p>80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3" calcext:value-type="float">
            <text:p>523</text:p>
          </table:table-cell>
          <table:table-cell office:value-type="float" office:value="837" calcext:value-type="float">
            <text:p>837</text:p>
          </table:table-cell>
          <table:table-cell table:formula="of:=AVERAGE([.M522:.M529])" office:value-type="float" office:value="810.125" calcext:value-type="float">
            <text:p>810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4" calcext:value-type="float">
            <text:p>524</text:p>
          </table:table-cell>
          <table:table-cell office:value-type="float" office:value="821" calcext:value-type="float">
            <text:p>821</text:p>
          </table:table-cell>
          <table:table-cell table:formula="of:=AVERAGE([.M523:.M530])" office:value-type="float" office:value="799.25" calcext:value-type="float">
            <text:p>79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5" calcext:value-type="float">
            <text:p>525</text:p>
          </table:table-cell>
          <table:table-cell office:value-type="float" office:value="757" calcext:value-type="float">
            <text:p>757</text:p>
          </table:table-cell>
          <table:table-cell table:formula="of:=AVERAGE([.M524:.M531])" office:value-type="float" office:value="796.5" calcext:value-type="float">
            <text:p>79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6" calcext:value-type="float">
            <text:p>526</text:p>
          </table:table-cell>
          <table:table-cell office:value-type="float" office:value="824" calcext:value-type="float">
            <text:p>824</text:p>
          </table:table-cell>
          <table:table-cell table:formula="of:=AVERAGE([.M525:.M532])" office:value-type="float" office:value="786.25" calcext:value-type="float">
            <text:p>78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7" calcext:value-type="float">
            <text:p>527</text:p>
          </table:table-cell>
          <table:table-cell office:value-type="float" office:value="806" calcext:value-type="float">
            <text:p>806</text:p>
          </table:table-cell>
          <table:table-cell table:formula="of:=AVERAGE([.M526:.M533])" office:value-type="float" office:value="777.5" calcext:value-type="float">
            <text:p>77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8" calcext:value-type="float">
            <text:p>528</text:p>
          </table:table-cell>
          <table:table-cell office:value-type="float" office:value="739" calcext:value-type="float">
            <text:p>739</text:p>
          </table:table-cell>
          <table:table-cell table:formula="of:=AVERAGE([.M527:.M534])" office:value-type="float" office:value="763.375" calcext:value-type="float">
            <text:p>76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9" calcext:value-type="float">
            <text:p>529</text:p>
          </table:table-cell>
          <table:table-cell office:value-type="float" office:value="777" calcext:value-type="float">
            <text:p>777</text:p>
          </table:table-cell>
          <table:table-cell table:formula="of:=AVERAGE([.M528:.M535])" office:value-type="float" office:value="759" calcext:value-type="float">
            <text:p>75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729" calcext:value-type="float">
            <text:p>729</text:p>
          </table:table-cell>
          <table:table-cell table:formula="of:=AVERAGE([.M529:.M536])" office:value-type="float" office:value="744.25" calcext:value-type="float">
            <text:p>74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1" calcext:value-type="float">
            <text:p>531</text:p>
          </table:table-cell>
          <table:table-cell office:value-type="float" office:value="767" calcext:value-type="float">
            <text:p>767</text:p>
          </table:table-cell>
          <table:table-cell table:formula="of:=AVERAGE([.M530:.M537])" office:value-type="float" office:value="731.75" calcext:value-type="float">
            <text:p>731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2" calcext:value-type="float">
            <text:p>532</text:p>
          </table:table-cell>
          <table:table-cell office:value-type="float" office:value="708" calcext:value-type="float">
            <text:p>708</text:p>
          </table:table-cell>
          <table:table-cell table:formula="of:=AVERAGE([.M531:.M538])" office:value-type="float" office:value="728.75" calcext:value-type="float">
            <text:p>72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3" calcext:value-type="float">
            <text:p>533</text:p>
          </table:table-cell>
          <table:table-cell office:value-type="float" office:value="722" calcext:value-type="float">
            <text:p>722</text:p>
          </table:table-cell>
          <table:table-cell table:formula="of:=AVERAGE([.M532:.M539])" office:value-type="float" office:value="717.5" calcext:value-type="float">
            <text:p>717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4" calcext:value-type="float">
            <text:p>534</text:p>
          </table:table-cell>
          <table:table-cell office:value-type="float" office:value="706" calcext:value-type="float">
            <text:p>706</text:p>
          </table:table-cell>
          <table:table-cell table:formula="of:=AVERAGE([.M533:.M540])" office:value-type="float" office:value="713.25" calcext:value-type="float">
            <text:p>71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5" calcext:value-type="float">
            <text:p>535</text:p>
          </table:table-cell>
          <table:table-cell office:value-type="float" office:value="706" calcext:value-type="float">
            <text:p>706</text:p>
          </table:table-cell>
          <table:table-cell table:formula="of:=AVERAGE([.M534:.M541])" office:value-type="float" office:value="702.25" calcext:value-type="float">
            <text:p>702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6" calcext:value-type="float">
            <text:p>536</text:p>
          </table:table-cell>
          <table:table-cell office:value-type="float" office:value="715" calcext:value-type="float">
            <text:p>715</text:p>
          </table:table-cell>
          <table:table-cell table:formula="of:=AVERAGE([.M535:.M542])" office:value-type="float" office:value="694.125" calcext:value-type="float">
            <text:p>694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7" calcext:value-type="float">
            <text:p>537</text:p>
          </table:table-cell>
          <table:table-cell office:value-type="float" office:value="687" calcext:value-type="float">
            <text:p>687</text:p>
          </table:table-cell>
          <table:table-cell table:formula="of:=AVERAGE([.M536:.M543])" office:value-type="float" office:value="684.625" calcext:value-type="float">
            <text:p>684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8" calcext:value-type="float">
            <text:p>538</text:p>
          </table:table-cell>
          <table:table-cell office:value-type="float" office:value="695" calcext:value-type="float">
            <text:p>695</text:p>
          </table:table-cell>
          <table:table-cell table:formula="of:=AVERAGE([.M537:.M544])" office:value-type="float" office:value="674.75" calcext:value-type="float">
            <text:p>674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9" calcext:value-type="float">
            <text:p>539</text:p>
          </table:table-cell>
          <table:table-cell office:value-type="float" office:value="679" calcext:value-type="float">
            <text:p>679</text:p>
          </table:table-cell>
          <table:table-cell table:formula="of:=AVERAGE([.M538:.M545])" office:value-type="float" office:value="670.5" calcext:value-type="float">
            <text:p>67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643" calcext:value-type="float">
            <text:p>643</text:p>
          </table:table-cell>
          <table:table-cell table:formula="of:=AVERAGE([.M539:.M546])" office:value-type="float" office:value="663.625" calcext:value-type="float">
            <text:p>66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1" calcext:value-type="float">
            <text:p>541</text:p>
          </table:table-cell>
          <table:table-cell office:value-type="float" office:value="646" calcext:value-type="float">
            <text:p>646</text:p>
          </table:table-cell>
          <table:table-cell table:formula="of:=AVERAGE([.M540:.M547])" office:value-type="float" office:value="656.875" calcext:value-type="float">
            <text:p>65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2" calcext:value-type="float">
            <text:p>542</text:p>
          </table:table-cell>
          <table:table-cell office:value-type="float" office:value="627" calcext:value-type="float">
            <text:p>627</text:p>
          </table:table-cell>
          <table:table-cell table:formula="of:=AVERAGE([.M541:.M548])" office:value-type="float" office:value="647" calcext:value-type="float">
            <text:p>64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3" calcext:value-type="float">
            <text:p>543</text:p>
          </table:table-cell>
          <table:table-cell office:value-type="float" office:value="672" calcext:value-type="float">
            <text:p>672</text:p>
          </table:table-cell>
          <table:table-cell table:formula="of:=AVERAGE([.M542:.M549])" office:value-type="float" office:value="640.375" calcext:value-type="float">
            <text:p>640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4" calcext:value-type="float">
            <text:p>544</text:p>
          </table:table-cell>
          <table:table-cell office:value-type="float" office:value="660" calcext:value-type="float">
            <text:p>660</text:p>
          </table:table-cell>
          <table:table-cell table:formula="of:=AVERAGE([.M543:.M550])" office:value-type="float" office:value="629" calcext:value-type="float">
            <text:p>62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5" calcext:value-type="float">
            <text:p>545</text:p>
          </table:table-cell>
          <table:table-cell office:value-type="float" office:value="633" calcext:value-type="float">
            <text:p>633</text:p>
          </table:table-cell>
          <table:table-cell table:formula="of:=AVERAGE([.M544:.M551])" office:value-type="float" office:value="624.625" calcext:value-type="float">
            <text:p>624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6" calcext:value-type="float">
            <text:p>546</text:p>
          </table:table-cell>
          <table:table-cell office:value-type="float" office:value="616" calcext:value-type="float">
            <text:p>616</text:p>
          </table:table-cell>
          <table:table-cell table:formula="of:=AVERAGE([.M545:.M552])" office:value-type="float" office:value="619.875" calcext:value-type="float">
            <text:p>619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7" calcext:value-type="float">
            <text:p>547</text:p>
          </table:table-cell>
          <table:table-cell office:value-type="float" office:value="626" calcext:value-type="float">
            <text:p>626</text:p>
          </table:table-cell>
          <table:table-cell table:formula="of:=AVERAGE([.M546:.M553])" office:value-type="float" office:value="604.75" calcext:value-type="float">
            <text:p>604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8" calcext:value-type="float">
            <text:p>548</text:p>
          </table:table-cell>
          <table:table-cell office:value-type="float" office:value="552" calcext:value-type="float">
            <text:p>552</text:p>
          </table:table-cell>
          <table:table-cell table:formula="of:=AVERAGE([.M547:.M554])" office:value-type="float" office:value="598.125" calcext:value-type="float">
            <text:p>59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9" calcext:value-type="float">
            <text:p>549</text:p>
          </table:table-cell>
          <table:table-cell office:value-type="float" office:value="611" calcext:value-type="float">
            <text:p>611</text:p>
          </table:table-cell>
          <table:table-cell table:formula="of:=AVERAGE([.M548:.M555])" office:value-type="float" office:value="586.125" calcext:value-type="float">
            <text:p>58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589" calcext:value-type="float">
            <text:p>589</text:p>
          </table:table-cell>
          <table:table-cell table:formula="of:=AVERAGE([.M549:.M556])" office:value-type="float" office:value="585.625" calcext:value-type="float">
            <text:p>58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number-columns-repeated="2" office:value-type="float" office:value="551" calcext:value-type="float">
            <text:p>551</text:p>
          </table:table-cell>
          <table:table-cell table:formula="of:=AVERAGE([.M550:.M557])" office:value-type="float" office:value="577" calcext:value-type="float">
            <text:p>57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2" calcext:value-type="float">
            <text:p>552</text:p>
          </table:table-cell>
          <table:table-cell office:value-type="float" office:value="607" calcext:value-type="float">
            <text:p>607</text:p>
          </table:table-cell>
          <table:table-cell table:formula="of:=AVERAGE([.M551:.M558])" office:value-type="float" office:value="577.625" calcext:value-type="float">
            <text:p>57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3" calcext:value-type="float">
            <text:p>553</text:p>
          </table:table-cell>
          <table:table-cell office:value-type="float" office:value="537" calcext:value-type="float">
            <text:p>537</text:p>
          </table:table-cell>
          <table:table-cell table:formula="of:=AVERAGE([.M552:.M559])" office:value-type="float" office:value="566.875" calcext:value-type="float">
            <text:p>56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4" calcext:value-type="float">
            <text:p>554</text:p>
          </table:table-cell>
          <table:table-cell office:value-type="float" office:value="612" calcext:value-type="float">
            <text:p>612</text:p>
          </table:table-cell>
          <table:table-cell table:formula="of:=AVERAGE([.M553:.M560])" office:value-type="float" office:value="555.75" calcext:value-type="float">
            <text:p>55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table:formula="of:=AVERAGE([.M554:.M561])" office:value-type="float" office:value="550.25" calcext:value-type="float">
            <text:p>55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formula="of:=AVERAGE([.M555:.M562])" office:value-type="float" office:value="533.75" calcext:value-type="float">
            <text:p>53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7" calcext:value-type="float">
            <text:p>557</text:p>
          </table:table-cell>
          <table:table-cell office:value-type="float" office:value="525" calcext:value-type="float">
            <text:p>525</text:p>
          </table:table-cell>
          <table:table-cell table:formula="of:=AVERAGE([.M556:.M563])" office:value-type="float" office:value="532" calcext:value-type="float">
            <text:p>532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table:formula="of:=AVERAGE([.M557:.M564])" office:value-type="float" office:value="510.75" calcext:value-type="float">
            <text:p>51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9" calcext:value-type="float">
            <text:p>559</text:p>
          </table:table-cell>
          <table:table-cell office:value-type="float" office:value="507" calcext:value-type="float">
            <text:p>507</text:p>
          </table:table-cell>
          <table:table-cell table:formula="of:=AVERAGE([.M558:.M565])" office:value-type="float" office:value="501.875" calcext:value-type="float">
            <text:p>50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475" calcext:value-type="float">
            <text:p>475</text:p>
          </table:table-cell>
          <table:table-cell table:formula="of:=AVERAGE([.M559:.M566])" office:value-type="float" office:value="488.125" calcext:value-type="float">
            <text:p>488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1" calcext:value-type="float">
            <text:p>561</text:p>
          </table:table-cell>
          <table:table-cell office:value-type="float" office:value="523" calcext:value-type="float">
            <text:p>523</text:p>
          </table:table-cell>
          <table:table-cell table:formula="of:=AVERAGE([.M560:.M567])" office:value-type="float" office:value="482.375" calcext:value-type="float">
            <text:p>482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2" calcext:value-type="float">
            <text:p>562</text:p>
          </table:table-cell>
          <table:table-cell office:value-type="float" office:value="442" calcext:value-type="float">
            <text:p>442</text:p>
          </table:table-cell>
          <table:table-cell table:formula="of:=AVERAGE([.M561:.M568])" office:value-type="float" office:value="476.125" calcext:value-type="float">
            <text:p>47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3" calcext:value-type="float">
            <text:p>563</text:p>
          </table:table-cell>
          <table:table-cell office:value-type="float" office:value="486" calcext:value-type="float">
            <text:p>486</text:p>
          </table:table-cell>
          <table:table-cell table:formula="of:=AVERAGE([.M562:.M569])" office:value-type="float" office:value="467.375" calcext:value-type="float">
            <text:p>46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4" calcext:value-type="float">
            <text:p>564</text:p>
          </table:table-cell>
          <table:table-cell office:value-type="float" office:value="447" calcext:value-type="float">
            <text:p>447</text:p>
          </table:table-cell>
          <table:table-cell table:formula="of:=AVERAGE([.M563:.M570])" office:value-type="float" office:value="460.5" calcext:value-type="float">
            <text:p>46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5" calcext:value-type="float">
            <text:p>565</text:p>
          </table:table-cell>
          <table:table-cell office:value-type="float" office:value="479" calcext:value-type="float">
            <text:p>479</text:p>
          </table:table-cell>
          <table:table-cell table:formula="of:=AVERAGE([.M564:.M571])" office:value-type="float" office:value="443.75" calcext:value-type="float">
            <text:p>44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6" calcext:value-type="float">
            <text:p>566</text:p>
          </table:table-cell>
          <table:table-cell office:value-type="float" office:value="450" calcext:value-type="float">
            <text:p>450</text:p>
          </table:table-cell>
          <table:table-cell table:formula="of:=AVERAGE([.M565:.M572])" office:value-type="float" office:value="443.75" calcext:value-type="float">
            <text:p>44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7" calcext:value-type="float">
            <text:p>567</text:p>
          </table:table-cell>
          <table:table-cell office:value-type="float" office:value="437" calcext:value-type="float">
            <text:p>437</text:p>
          </table:table-cell>
          <table:table-cell table:formula="of:=AVERAGE([.M566:.M573])" office:value-type="float" office:value="433.25" calcext:value-type="float">
            <text:p>433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8" calcext:value-type="float">
            <text:p>568</text:p>
          </table:table-cell>
          <table:table-cell office:value-type="float" office:value="420" calcext:value-type="float">
            <text:p>420</text:p>
          </table:table-cell>
          <table:table-cell table:formula="of:=AVERAGE([.M567:.M574])" office:value-type="float" office:value="431" calcext:value-type="float">
            <text:p>431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9" calcext:value-type="float">
            <text:p>569</text:p>
          </table:table-cell>
          <table:table-cell office:value-type="float" office:value="389" calcext:value-type="float">
            <text:p>389</text:p>
          </table:table-cell>
          <table:table-cell table:formula="of:=AVERAGE([.M568:.M575])" office:value-type="float" office:value="419.25" calcext:value-type="float">
            <text:p>41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42" calcext:value-type="float">
            <text:p>442</text:p>
          </table:table-cell>
          <table:table-cell table:formula="of:=AVERAGE([.M569:.M576])" office:value-type="float" office:value="416" calcext:value-type="float">
            <text:p>416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1" calcext:value-type="float">
            <text:p>571</text:p>
          </table:table-cell>
          <table:table-cell office:value-type="float" office:value="402" calcext:value-type="float">
            <text:p>402</text:p>
          </table:table-cell>
          <table:table-cell table:formula="of:=AVERAGE([.M570:.M577])" office:value-type="float" office:value="411.625" calcext:value-type="float">
            <text:p>411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2" calcext:value-type="float">
            <text:p>572</text:p>
          </table:table-cell>
          <table:table-cell office:value-type="float" office:value="429" calcext:value-type="float">
            <text:p>429</text:p>
          </table:table-cell>
          <table:table-cell table:formula="of:=AVERAGE([.M571:.M578])" office:value-type="float" office:value="406.625" calcext:value-type="float">
            <text:p>40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3" calcext:value-type="float">
            <text:p>573</text:p>
          </table:table-cell>
          <table:table-cell office:value-type="float" office:value="385" calcext:value-type="float">
            <text:p>385</text:p>
          </table:table-cell>
          <table:table-cell table:formula="of:=AVERAGE([.M572:.M579])" office:value-type="float" office:value="406.125" calcext:value-type="float">
            <text:p>40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4" calcext:value-type="float">
            <text:p>574</text:p>
          </table:table-cell>
          <table:table-cell office:value-type="float" office:value="424" calcext:value-type="float">
            <text:p>424</text:p>
          </table:table-cell>
          <table:table-cell table:formula="of:=AVERAGE([.M573:.M580])" office:value-type="float" office:value="399.75" calcext:value-type="float">
            <text:p>39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5" calcext:value-type="float">
            <text:p>575</text:p>
          </table:table-cell>
          <table:table-cell office:value-type="float" office:value="402" calcext:value-type="float">
            <text:p>402</text:p>
          </table:table-cell>
          <table:table-cell table:formula="of:=AVERAGE([.M574:.M581])" office:value-type="float" office:value="394.875" calcext:value-type="float">
            <text:p>39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6" calcext:value-type="float">
            <text:p>576</text:p>
          </table:table-cell>
          <table:table-cell office:value-type="float" office:value="380" calcext:value-type="float">
            <text:p>380</text:p>
          </table:table-cell>
          <table:table-cell table:formula="of:=AVERAGE([.M575:.M582])" office:value-type="float" office:value="383.875" calcext:value-type="float">
            <text:p>383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7" calcext:value-type="float">
            <text:p>577</text:p>
          </table:table-cell>
          <table:table-cell office:value-type="float" office:value="385" calcext:value-type="float">
            <text:p>385</text:p>
          </table:table-cell>
          <table:table-cell table:formula="of:=AVERAGE([.M576:.M583])" office:value-type="float" office:value="378.25" calcext:value-type="float">
            <text:p>37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8" calcext:value-type="float">
            <text:p>578</text:p>
          </table:table-cell>
          <table:table-cell office:value-type="float" office:value="391" calcext:value-type="float">
            <text:p>391</text:p>
          </table:table-cell>
          <table:table-cell table:formula="of:=AVERAGE([.M577:.M584])" office:value-type="float" office:value="368.375" calcext:value-type="float">
            <text:p>36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9" calcext:value-type="float">
            <text:p>579</text:p>
          </table:table-cell>
          <table:table-cell office:value-type="float" office:value="363" calcext:value-type="float">
            <text:p>363</text:p>
          </table:table-cell>
          <table:table-cell table:formula="of:=AVERAGE([.M578:.M585])" office:value-type="float" office:value="354.25" calcext:value-type="float">
            <text:p>354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341" calcext:value-type="float">
            <text:p>341</text:p>
          </table:table-cell>
          <table:table-cell table:formula="of:=AVERAGE([.M579:.M586])" office:value-type="float" office:value="346.5" calcext:value-type="float">
            <text:p>34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1" calcext:value-type="float">
            <text:p>581</text:p>
          </table:table-cell>
          <table:table-cell office:value-type="float" office:value="340" calcext:value-type="float">
            <text:p>340</text:p>
          </table:table-cell>
          <table:table-cell table:formula="of:=AVERAGE([.M580:.M587])" office:value-type="float" office:value="337.25" calcext:value-type="float">
            <text:p>33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2" calcext:value-type="float">
            <text:p>582</text:p>
          </table:table-cell>
          <table:table-cell office:value-type="float" office:value="345" calcext:value-type="float">
            <text:p>345</text:p>
          </table:table-cell>
          <table:table-cell table:formula="of:=AVERAGE([.M581:.M588])" office:value-type="float" office:value="329.25" calcext:value-type="float">
            <text:p>32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3" calcext:value-type="float">
            <text:p>583</text:p>
          </table:table-cell>
          <table:table-cell office:value-type="float" office:value="289" calcext:value-type="float">
            <text:p>289</text:p>
          </table:table-cell>
          <table:table-cell table:formula="of:=AVERAGE([.M582:.M589])" office:value-type="float" office:value="319.125" calcext:value-type="float">
            <text:p>319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4" calcext:value-type="float">
            <text:p>584</text:p>
          </table:table-cell>
          <table:table-cell office:value-type="float" office:value="318" calcext:value-type="float">
            <text:p>318</text:p>
          </table:table-cell>
          <table:table-cell table:formula="of:=AVERAGE([.M583:.M590])" office:value-type="float" office:value="313.375" calcext:value-type="float">
            <text:p>31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5" calcext:value-type="float">
            <text:p>585</text:p>
          </table:table-cell>
          <table:table-cell office:value-type="float" office:value="311" calcext:value-type="float">
            <text:p>311</text:p>
          </table:table-cell>
          <table:table-cell table:formula="of:=AVERAGE([.M584:.M591])" office:value-type="float" office:value="304.5" calcext:value-type="float">
            <text:p>304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6" calcext:value-type="float">
            <text:p>586</text:p>
          </table:table-cell>
          <table:table-cell office:value-type="float" office:value="327" calcext:value-type="float">
            <text:p>327</text:p>
          </table:table-cell>
          <table:table-cell table:formula="of:=AVERAGE([.M585:.M592])" office:value-type="float" office:value="297.25" calcext:value-type="float">
            <text:p>29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7" calcext:value-type="float">
            <text:p>587</text:p>
          </table:table-cell>
          <table:table-cell office:value-type="float" office:value="282" calcext:value-type="float">
            <text:p>282</text:p>
          </table:table-cell>
          <table:table-cell table:formula="of:=AVERAGE([.M586:.M593])" office:value-type="float" office:value="297.375" calcext:value-type="float">
            <text:p>297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8" calcext:value-type="float">
            <text:p>588</text:p>
          </table:table-cell>
          <table:table-cell office:value-type="float" office:value="295" calcext:value-type="float">
            <text:p>295</text:p>
          </table:table-cell>
          <table:table-cell table:formula="of:=AVERAGE([.M587:.M594])" office:value-type="float" office:value="291.125" calcext:value-type="float">
            <text:p>291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9" calcext:value-type="float">
            <text:p>589</text:p>
          </table:table-cell>
          <table:table-cell office:value-type="float" office:value="269" calcext:value-type="float">
            <text:p>269</text:p>
          </table:table-cell>
          <table:table-cell table:formula="of:=AVERAGE([.M588:.M595])" office:value-type="float" office:value="287.25" calcext:value-type="float">
            <text:p>28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287" calcext:value-type="float">
            <text:p>287</text:p>
          </table:table-cell>
          <table:table-cell table:formula="of:=AVERAGE([.M589:.M596])" office:value-type="float" office:value="279.25" calcext:value-type="float">
            <text:p>279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1" calcext:value-type="float">
            <text:p>591</text:p>
          </table:table-cell>
          <table:table-cell office:value-type="float" office:value="290" calcext:value-type="float">
            <text:p>290</text:p>
          </table:table-cell>
          <table:table-cell table:formula="of:=AVERAGE([.M590:.M597])" office:value-type="float" office:value="273.625" calcext:value-type="float">
            <text:p>27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2" calcext:value-type="float">
            <text:p>592</text:p>
          </table:table-cell>
          <table:table-cell office:value-type="float" office:value="268" calcext:value-type="float">
            <text:p>268</text:p>
          </table:table-cell>
          <table:table-cell table:formula="of:=AVERAGE([.M591:.M598])" office:value-type="float" office:value="265.875" calcext:value-type="float">
            <text:p>26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3" calcext:value-type="float">
            <text:p>593</text:p>
          </table:table-cell>
          <table:table-cell office:value-type="float" office:value="280" calcext:value-type="float">
            <text:p>280</text:p>
          </table:table-cell>
          <table:table-cell table:formula="of:=AVERAGE([.M592:.M599])" office:value-type="float" office:value="260.875" calcext:value-type="float">
            <text:p>26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4" calcext:value-type="float">
            <text:p>594</text:p>
          </table:table-cell>
          <table:table-cell office:value-type="float" office:value="263" calcext:value-type="float">
            <text:p>263</text:p>
          </table:table-cell>
          <table:table-cell table:formula="of:=AVERAGE([.M593:.M600])" office:value-type="float" office:value="253.75" calcext:value-type="float">
            <text:p>25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5" calcext:value-type="float">
            <text:p>595</text:p>
          </table:table-cell>
          <table:table-cell office:value-type="float" office:value="237" calcext:value-type="float">
            <text:p>237</text:p>
          </table:table-cell>
          <table:table-cell table:formula="of:=AVERAGE([.M594:.M601])" office:value-type="float" office:value="246.875" calcext:value-type="float">
            <text:p>24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6" calcext:value-type="float">
            <text:p>596</text:p>
          </table:table-cell>
          <table:table-cell office:value-type="float" office:value="233" calcext:value-type="float">
            <text:p>233</text:p>
          </table:table-cell>
          <table:table-cell table:formula="of:=AVERAGE([.M595:.M602])" office:value-type="float" office:value="242.125" calcext:value-type="float">
            <text:p>24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7" calcext:value-type="float">
            <text:p>597</text:p>
          </table:table-cell>
          <table:table-cell office:value-type="float" office:value="229" calcext:value-type="float">
            <text:p>229</text:p>
          </table:table-cell>
          <table:table-cell table:formula="of:=AVERAGE([.M596:.M603])" office:value-type="float" office:value="235.5" calcext:value-type="float">
            <text:p>23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8" calcext:value-type="float">
            <text:p>598</text:p>
          </table:table-cell>
          <table:table-cell office:value-type="float" office:value="230" calcext:value-type="float">
            <text:p>230</text:p>
          </table:table-cell>
          <table:table-cell table:formula="of:=AVERAGE([.M597:.M604])" office:value-type="float" office:value="226.5" calcext:value-type="float">
            <text:p>22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9" calcext:value-type="float">
            <text:p>599</text:p>
          </table:table-cell>
          <table:table-cell office:value-type="float" office:value="235" calcext:value-type="float">
            <text:p>235</text:p>
          </table:table-cell>
          <table:table-cell table:formula="of:=AVERAGE([.M598:.M605])" office:value-type="float" office:value="222.625" calcext:value-type="float">
            <text:p>222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230" calcext:value-type="float">
            <text:p>230</text:p>
          </table:table-cell>
          <table:table-cell table:formula="of:=AVERAGE([.M599:.M606])" office:value-type="float" office:value="217.25" calcext:value-type="float">
            <text:p>217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1" calcext:value-type="float">
            <text:p>601</text:p>
          </table:table-cell>
          <table:table-cell office:value-type="float" office:value="227" calcext:value-type="float">
            <text:p>227</text:p>
          </table:table-cell>
          <table:table-cell table:formula="of:=AVERAGE([.M600:.M607])" office:value-type="float" office:value="208.25" calcext:value-type="float">
            <text:p>20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2" calcext:value-type="float">
            <text:p>602</text:p>
          </table:table-cell>
          <table:table-cell office:value-type="float" office:value="191" calcext:value-type="float">
            <text:p>191</text:p>
          </table:table-cell>
          <table:table-cell table:formula="of:=AVERAGE([.M601:.M608])" office:value-type="float" office:value="201.375" calcext:value-type="float">
            <text:p>20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3" calcext:value-type="float">
            <text:p>603</text:p>
          </table:table-cell>
          <table:table-cell office:value-type="float" office:value="206" calcext:value-type="float">
            <text:p>206</text:p>
          </table:table-cell>
          <table:table-cell table:formula="of:=AVERAGE([.M602:.M609])" office:value-type="float" office:value="195.75" calcext:value-type="float">
            <text:p>195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4" calcext:value-type="float">
            <text:p>604</text:p>
          </table:table-cell>
          <table:table-cell office:value-type="float" office:value="190" calcext:value-type="float">
            <text:p>190</text:p>
          </table:table-cell>
          <table:table-cell table:formula="of:=AVERAGE([.M603:.M610])" office:value-type="float" office:value="189.625" calcext:value-type="float">
            <text:p>189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5" calcext:value-type="float">
            <text:p>605</text:p>
          </table:table-cell>
          <table:table-cell office:value-type="float" office:value="157" calcext:value-type="float">
            <text:p>157</text:p>
          </table:table-cell>
          <table:table-cell table:formula="of:=AVERAGE([.M604:.M611])" office:value-type="float" office:value="182.5" calcext:value-type="float">
            <text:p>182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6" calcext:value-type="float">
            <text:p>606</text:p>
          </table:table-cell>
          <table:table-cell office:value-type="float" office:value="175" calcext:value-type="float">
            <text:p>175</text:p>
          </table:table-cell>
          <table:table-cell table:formula="of:=AVERAGE([.M605:.M612])" office:value-type="float" office:value="178" calcext:value-type="float">
            <text:p>17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7" calcext:value-type="float">
            <text:p>607</text:p>
          </table:table-cell>
          <table:table-cell office:value-type="float" office:value="190" calcext:value-type="float">
            <text:p>190</text:p>
          </table:table-cell>
          <table:table-cell table:formula="of:=AVERAGE([.M606:.M613])" office:value-type="float" office:value="176.75" calcext:value-type="float">
            <text:p>176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8" calcext:value-type="float">
            <text:p>608</text:p>
          </table:table-cell>
          <table:table-cell office:value-type="float" office:value="181" calcext:value-type="float">
            <text:p>181</text:p>
          </table:table-cell>
          <table:table-cell table:formula="of:=AVERAGE([.M607:.M614])" office:value-type="float" office:value="175.625" calcext:value-type="float">
            <text:p>17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9" calcext:value-type="float">
            <text:p>609</text:p>
          </table:table-cell>
          <table:table-cell office:value-type="float" office:value="170" calcext:value-type="float">
            <text:p>170</text:p>
          </table:table-cell>
          <table:table-cell table:formula="of:=AVERAGE([.M608:.M615])" office:value-type="float" office:value="177.625" calcext:value-type="float">
            <text:p>17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155" calcext:value-type="float">
            <text:p>155</text:p>
          </table:table-cell>
          <table:table-cell table:formula="of:=AVERAGE([.M609:.M616])" office:value-type="float" office:value="176.125" calcext:value-type="float">
            <text:p>176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1" calcext:value-type="float">
            <text:p>611</text:p>
          </table:table-cell>
          <table:table-cell office:value-type="float" office:value="196" calcext:value-type="float">
            <text:p>196</text:p>
          </table:table-cell>
          <table:table-cell table:formula="of:=AVERAGE([.M610:.M617])" office:value-type="float" office:value="174.875" calcext:value-type="float">
            <text:p>17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2" calcext:value-type="float">
            <text:p>612</text:p>
          </table:table-cell>
          <table:table-cell office:value-type="float" office:value="181" calcext:value-type="float">
            <text:p>181</text:p>
          </table:table-cell>
          <table:table-cell table:formula="of:=AVERAGE([.M611:.M618])" office:value-type="float" office:value="170" calcext:value-type="float">
            <text:p>170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3" calcext:value-type="float">
            <text:p>613</text:p>
          </table:table-cell>
          <table:table-cell office:value-type="float" office:value="173" calcext:value-type="float">
            <text:p>173</text:p>
          </table:table-cell>
          <table:table-cell table:formula="of:=AVERAGE([.M612:.M619])" office:value-type="float" office:value="166" calcext:value-type="float">
            <text:p>166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4" calcext:value-type="float">
            <text:p>614</text:p>
          </table:table-cell>
          <table:table-cell office:value-type="float" office:value="163" calcext:value-type="float">
            <text:p>163</text:p>
          </table:table-cell>
          <table:table-cell table:formula="of:=AVERAGE([.M613:.M620])" office:value-type="float" office:value="164" calcext:value-type="float">
            <text:p>16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5" calcext:value-type="float">
            <text:p>615</text:p>
          </table:table-cell>
          <table:table-cell office:value-type="float" office:value="180" calcext:value-type="float">
            <text:p>180</text:p>
          </table:table-cell>
          <table:table-cell table:formula="of:=AVERAGE([.M614:.M621])" office:value-type="float" office:value="156.625" calcext:value-type="float">
            <text:p>15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6" calcext:value-type="float">
            <text:p>616</text:p>
          </table:table-cell>
          <table:table-cell office:value-type="float" office:value="142" calcext:value-type="float">
            <text:p>142</text:p>
          </table:table-cell>
          <table:table-cell table:formula="of:=AVERAGE([.M615:.M622])" office:value-type="float" office:value="151.375" calcext:value-type="float">
            <text:p>15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7" calcext:value-type="float">
            <text:p>617</text:p>
          </table:table-cell>
          <table:table-cell office:value-type="float" office:value="138" calcext:value-type="float">
            <text:p>138</text:p>
          </table:table-cell>
          <table:table-cell table:formula="of:=AVERAGE([.M616:.M623])" office:value-type="float" office:value="145.625" calcext:value-type="float">
            <text:p>14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8" calcext:value-type="float">
            <text:p>618</text:p>
          </table:table-cell>
          <table:table-cell office:value-type="float" office:value="139" calcext:value-type="float">
            <text:p>139</text:p>
          </table:table-cell>
          <table:table-cell table:formula="of:=AVERAGE([.M617:.M624])" office:value-type="float" office:value="140.875" calcext:value-type="float">
            <text:p>140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9" calcext:value-type="float">
            <text:p>619</text:p>
          </table:table-cell>
          <table:table-cell office:value-type="float" office:value="137" calcext:value-type="float">
            <text:p>137</text:p>
          </table:table-cell>
          <table:table-cell table:formula="of:=AVERAGE([.M618:.M625])" office:value-type="float" office:value="135.875" calcext:value-type="float">
            <text:p>13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139" calcext:value-type="float">
            <text:p>139</text:p>
          </table:table-cell>
          <table:table-cell table:formula="of:=AVERAGE([.M619:.M626])" office:value-type="float" office:value="135.625" calcext:value-type="float">
            <text:p>13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1" calcext:value-type="float">
            <text:p>621</text:p>
          </table:table-cell>
          <table:table-cell office:value-type="float" office:value="127" calcext:value-type="float">
            <text:p>127</text:p>
          </table:table-cell>
          <table:table-cell table:formula="of:=AVERAGE([.M620:.M627])" office:value-type="float" office:value="132.125" calcext:value-type="float">
            <text:p>13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2" calcext:value-type="float">
            <text:p>622</text:p>
          </table:table-cell>
          <table:table-cell office:value-type="float" office:value="125" calcext:value-type="float">
            <text:p>125</text:p>
          </table:table-cell>
          <table:table-cell table:formula="of:=AVERAGE([.M621:.M628])" office:value-type="float" office:value="129.75" calcext:value-type="float">
            <text:p>12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3" calcext:value-type="float">
            <text:p>623</text:p>
          </table:table-cell>
          <table:table-cell office:value-type="float" office:value="140" calcext:value-type="float">
            <text:p>140</text:p>
          </table:table-cell>
          <table:table-cell table:formula="of:=AVERAGE([.M622:.M629])" office:value-type="float" office:value="128" calcext:value-type="float">
            <text:p>128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4" calcext:value-type="float">
            <text:p>624</text:p>
          </table:table-cell>
          <table:table-cell office:value-type="float" office:value="140" calcext:value-type="float">
            <text:p>140</text:p>
          </table:table-cell>
          <table:table-cell table:formula="of:=AVERAGE([.M623:.M630])" office:value-type="float" office:value="121.5" calcext:value-type="float">
            <text:p>121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5" calcext:value-type="float">
            <text:p>625</text:p>
          </table:table-cell>
          <table:table-cell office:value-type="float" office:value="110" calcext:value-type="float">
            <text:p>110</text:p>
          </table:table-cell>
          <table:table-cell table:formula="of:=AVERAGE([.M624:.M631])" office:value-type="float" office:value="118.75" calcext:value-type="float">
            <text:p>118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6" calcext:value-type="float">
            <text:p>626</text:p>
          </table:table-cell>
          <table:table-cell office:value-type="float" office:value="120" calcext:value-type="float">
            <text:p>120</text:p>
          </table:table-cell>
          <table:table-cell table:formula="of:=AVERAGE([.M625:.M632])" office:value-type="float" office:value="115.625" calcext:value-type="float">
            <text:p>115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7" calcext:value-type="float">
            <text:p>627</text:p>
          </table:table-cell>
          <table:table-cell office:value-type="float" office:value="123" calcext:value-type="float">
            <text:p>123</text:p>
          </table:table-cell>
          <table:table-cell table:formula="of:=AVERAGE([.M626:.M633])" office:value-type="float" office:value="109.75" calcext:value-type="float">
            <text:p>10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8" calcext:value-type="float">
            <text:p>628</text:p>
          </table:table-cell>
          <table:table-cell office:value-type="float" office:value="87" calcext:value-type="float">
            <text:p>87</text:p>
          </table:table-cell>
          <table:table-cell table:formula="of:=AVERAGE([.M627:.M634])" office:value-type="float" office:value="106.5" calcext:value-type="float">
            <text:p>106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9" calcext:value-type="float">
            <text:p>629</text:p>
          </table:table-cell>
          <table:table-cell office:value-type="float" office:value="105" calcext:value-type="float">
            <text:p>105</text:p>
          </table:table-cell>
          <table:table-cell table:formula="of:=AVERAGE([.M628:.M635])" office:value-type="float" office:value="103.75" calcext:value-type="float">
            <text:p>10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table:formula="of:=AVERAGE([.M629:.M636])" office:value-type="float" office:value="100.25" calcext:value-type="float">
            <text:p>100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1" calcext:value-type="float">
            <text:p>631</text:p>
          </table:table-cell>
          <table:table-cell office:value-type="float" office:value="93" calcext:value-type="float">
            <text:p>93</text:p>
          </table:table-cell>
          <table:table-cell table:formula="of:=AVERAGE([.M630:.M637])" office:value-type="float" office:value="96.625" calcext:value-type="float">
            <text:p>9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2" calcext:value-type="float">
            <text:p>632</text:p>
          </table:table-cell>
          <table:table-cell office:value-type="float" office:value="114" calcext:value-type="float">
            <text:p>114</text:p>
          </table:table-cell>
          <table:table-cell table:formula="of:=AVERAGE([.M631:.M638])" office:value-type="float" office:value="98.25" calcext:value-type="float">
            <text:p>9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3" calcext:value-type="float">
            <text:p>633</text:p>
          </table:table-cell>
          <table:table-cell office:value-type="float" office:value="88" calcext:value-type="float">
            <text:p>88</text:p>
          </table:table-cell>
          <table:table-cell table:formula="of:=AVERAGE([.M632:.M639])" office:value-type="float" office:value="96.625" calcext:value-type="float">
            <text:p>9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4" calcext:value-type="float">
            <text:p>634</text:p>
          </table:table-cell>
          <table:table-cell office:value-type="float" office:value="92" calcext:value-type="float">
            <text:p>92</text:p>
          </table:table-cell>
          <table:table-cell table:formula="of:=AVERAGE([.M633:.M640])" office:value-type="float" office:value="93.625" calcext:value-type="float">
            <text:p>9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5" calcext:value-type="float">
            <text:p>635</text:p>
          </table:table-cell>
          <table:table-cell office:value-type="float" office:value="94" calcext:value-type="float">
            <text:p>94</text:p>
          </table:table-cell>
          <table:table-cell table:formula="of:=AVERAGE([.M634:.M641])" office:value-type="float" office:value="92.125" calcext:value-type="float">
            <text:p>92.1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6" calcext:value-type="float">
            <text:p>636</text:p>
          </table:table-cell>
          <table:table-cell office:value-type="float" office:value="100" calcext:value-type="float">
            <text:p>100</text:p>
          </table:table-cell>
          <table:table-cell table:formula="of:=AVERAGE([.M635:.M642])" office:value-type="float" office:value="87" calcext:value-type="float">
            <text:p>87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7" calcext:value-type="float">
            <text:p>637</text:p>
          </table:table-cell>
          <table:table-cell office:value-type="float" office:value="92" calcext:value-type="float">
            <text:p>92</text:p>
          </table:table-cell>
          <table:table-cell table:formula="of:=AVERAGE([.M636:.M643])" office:value-type="float" office:value="85.5" calcext:value-type="float">
            <text:p>85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8" calcext:value-type="float">
            <text:p>638</text:p>
          </table:table-cell>
          <table:table-cell office:value-type="float" office:value="76" calcext:value-type="float">
            <text:p>76</text:p>
          </table:table-cell>
          <table:table-cell table:formula="of:=AVERAGE([.M637:.M644])" office:value-type="float" office:value="82" calcext:value-type="float">
            <text:p>82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39" calcext:value-type="float">
            <text:p>639</text:p>
          </table:table-cell>
          <table:table-cell office:value-type="float" office:value="81" calcext:value-type="float">
            <text:p>81</text:p>
          </table:table-cell>
          <table:table-cell table:formula="of:=AVERAGE([.M638:.M645])" office:value-type="float" office:value="79.375" calcext:value-type="float">
            <text:p>79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0" calcext:value-type="float">
            <text:p>640</text:p>
          </table:table-cell>
          <table:table-cell office:value-type="float" office:value="73" calcext:value-type="float">
            <text:p>73</text:p>
          </table:table-cell>
          <table:table-cell table:formula="of:=AVERAGE([.M639:.M646])" office:value-type="float" office:value="75.25" calcext:value-type="float">
            <text:p>7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1" calcext:value-type="float">
            <text:p>641</text:p>
          </table:table-cell>
          <table:table-cell office:value-type="float" office:value="76" calcext:value-type="float">
            <text:p>76</text:p>
          </table:table-cell>
          <table:table-cell table:formula="of:=AVERAGE([.M640:.M647])" office:value-type="float" office:value="70.75" calcext:value-type="float">
            <text:p>70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2" calcext:value-type="float">
            <text:p>642</text:p>
          </table:table-cell>
          <table:table-cell office:value-type="float" office:value="64" calcext:value-type="float">
            <text:p>64</text:p>
          </table:table-cell>
          <table:table-cell table:formula="of:=AVERAGE([.M641:.M648])" office:value-type="float" office:value="69.75" calcext:value-type="float">
            <text:p>69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3" calcext:value-type="float">
            <text:p>643</text:p>
          </table:table-cell>
          <table:table-cell office:value-type="float" office:value="73" calcext:value-type="float">
            <text:p>73</text:p>
          </table:table-cell>
          <table:table-cell table:formula="of:=AVERAGE([.M642:.M649])" office:value-type="float" office:value="67.875" calcext:value-type="float">
            <text:p>6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4" calcext:value-type="float">
            <text:p>644</text:p>
          </table:table-cell>
          <table:table-cell office:value-type="float" office:value="67" calcext:value-type="float">
            <text:p>67</text:p>
          </table:table-cell>
          <table:table-cell table:formula="of:=AVERAGE([.M643:.M650])" office:value-type="float" office:value="66.625" calcext:value-type="float">
            <text:p>6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5" calcext:value-type="float">
            <text:p>645</text:p>
          </table:table-cell>
          <table:table-cell office:value-type="float" office:value="56" calcext:value-type="float">
            <text:p>56</text:p>
          </table:table-cell>
          <table:table-cell table:formula="of:=AVERAGE([.M644:.M651])" office:value-type="float" office:value="64.875" calcext:value-type="float">
            <text:p>64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6" calcext:value-type="float">
            <text:p>646</text:p>
          </table:table-cell>
          <table:table-cell office:value-type="float" office:value="68" calcext:value-type="float">
            <text:p>68</text:p>
          </table:table-cell>
          <table:table-cell table:formula="of:=AVERAGE([.M645:.M652])" office:value-type="float" office:value="63.625" calcext:value-type="float">
            <text:p>63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7" calcext:value-type="float">
            <text:p>647</text:p>
          </table:table-cell>
          <table:table-cell office:value-type="float" office:value="66" calcext:value-type="float">
            <text:p>66</text:p>
          </table:table-cell>
          <table:table-cell table:formula="of:=AVERAGE([.M646:.M653])" office:value-type="float" office:value="61.875" calcext:value-type="float">
            <text:p>6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8" calcext:value-type="float">
            <text:p>648</text:p>
          </table:table-cell>
          <table:table-cell office:value-type="float" office:value="63" calcext:value-type="float">
            <text:p>63</text:p>
          </table:table-cell>
          <table:table-cell table:formula="of:=AVERAGE([.M647:.M654])" office:value-type="float" office:value="58.875" calcext:value-type="float">
            <text:p>58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49" calcext:value-type="float">
            <text:p>649</text:p>
          </table:table-cell>
          <table:table-cell office:value-type="float" office:value="62" calcext:value-type="float">
            <text:p>62</text:p>
          </table:table-cell>
          <table:table-cell table:formula="of:=AVERAGE([.M648:.M655])" office:value-type="float" office:value="58.25" calcext:value-type="float">
            <text:p>5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0" calcext:value-type="float">
            <text:p>650</text:p>
          </table:table-cell>
          <table:table-cell office:value-type="float" office:value="54" calcext:value-type="float">
            <text:p>54</text:p>
          </table:table-cell>
          <table:table-cell table:formula="of:=AVERAGE([.M649:.M656])" office:value-type="float" office:value="56.625" calcext:value-type="float">
            <text:p>56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1" calcext:value-type="float">
            <text:p>651</text:p>
          </table:table-cell>
          <table:table-cell office:value-type="float" office:value="59" calcext:value-type="float">
            <text:p>59</text:p>
          </table:table-cell>
          <table:table-cell table:formula="of:=AVERAGE([.M650:.M657])" office:value-type="float" office:value="55" calcext:value-type="float">
            <text:p>5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2" calcext:value-type="float">
            <text:p>652</text:p>
          </table:table-cell>
          <table:table-cell office:value-type="float" office:value="43" calcext:value-type="float">
            <text:p>43</text:p>
          </table:table-cell>
          <table:table-cell table:formula="of:=AVERAGE([.M651:.M658])" office:value-type="float" office:value="52.875" calcext:value-type="float">
            <text:p>52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3" calcext:value-type="float">
            <text:p>653</text:p>
          </table:table-cell>
          <table:table-cell office:value-type="float" office:value="51" calcext:value-type="float">
            <text:p>51</text:p>
          </table:table-cell>
          <table:table-cell table:formula="of:=AVERAGE([.M652:.M659])" office:value-type="float" office:value="50.5" calcext:value-type="float">
            <text:p>50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4" calcext:value-type="float">
            <text:p>654</text:p>
          </table:table-cell>
          <table:table-cell office:value-type="float" office:value="55" calcext:value-type="float">
            <text:p>55</text:p>
          </table:table-cell>
          <table:table-cell table:formula="of:=AVERAGE([.M653:.M660])" office:value-type="float" office:value="48.25" calcext:value-type="float">
            <text:p>48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5" calcext:value-type="float">
            <text:p>655</text:p>
          </table:table-cell>
          <table:table-cell office:value-type="float" office:value="53" calcext:value-type="float">
            <text:p>53</text:p>
          </table:table-cell>
          <table:table-cell table:formula="of:=AVERAGE([.M654:.M661])" office:value-type="float" office:value="47.625" calcext:value-type="float">
            <text:p>47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6" calcext:value-type="float">
            <text:p>656</text:p>
          </table:table-cell>
          <table:table-cell office:value-type="float" office:value="46" calcext:value-type="float">
            <text:p>46</text:p>
          </table:table-cell>
          <table:table-cell table:formula="of:=AVERAGE([.M655:.M662])" office:value-type="float" office:value="46.875" calcext:value-type="float">
            <text:p>4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7" calcext:value-type="float">
            <text:p>657</text:p>
          </table:table-cell>
          <table:table-cell office:value-type="float" office:value="43" calcext:value-type="float">
            <text:p>43</text:p>
          </table:table-cell>
          <table:table-cell table:formula="of:=AVERAGE([.M656:.M663])" office:value-type="float" office:value="45.875" calcext:value-type="float">
            <text:p>45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8" calcext:value-type="float">
            <text:p>658</text:p>
          </table:table-cell>
          <table:table-cell office:value-type="float" office:value="36" calcext:value-type="float">
            <text:p>36</text:p>
          </table:table-cell>
          <table:table-cell table:formula="of:=AVERAGE([.M657:.M664])" office:value-type="float" office:value="44" calcext:value-type="float">
            <text:p>4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59" calcext:value-type="float">
            <text:p>659</text:p>
          </table:table-cell>
          <table:table-cell office:value-type="float" office:value="54" calcext:value-type="float">
            <text:p>54</text:p>
          </table:table-cell>
          <table:table-cell table:formula="of:=AVERAGE([.M658:.M665])" office:value-type="float" office:value="42.75" calcext:value-type="float">
            <text:p>4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0" calcext:value-type="float">
            <text:p>660</text:p>
          </table:table-cell>
          <table:table-cell office:value-type="float" office:value="37" calcext:value-type="float">
            <text:p>37</text:p>
          </table:table-cell>
          <table:table-cell table:formula="of:=AVERAGE([.M659:.M666])" office:value-type="float" office:value="42" calcext:value-type="float">
            <text:p>42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1" calcext:value-type="float">
            <text:p>661</text:p>
          </table:table-cell>
          <table:table-cell office:value-type="float" office:value="43" calcext:value-type="float">
            <text:p>43</text:p>
          </table:table-cell>
          <table:table-cell table:formula="of:=AVERAGE([.M660:.M667])" office:value-type="float" office:value="41.375" calcext:value-type="float">
            <text:p>4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2" calcext:value-type="float">
            <text:p>662</text:p>
          </table:table-cell>
          <table:table-cell office:value-type="float" office:value="40" calcext:value-type="float">
            <text:p>40</text:p>
          </table:table-cell>
          <table:table-cell table:formula="of:=AVERAGE([.M661:.M668])" office:value-type="float" office:value="41.375" calcext:value-type="float">
            <text:p>4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3" calcext:value-type="float">
            <text:p>663</text:p>
          </table:table-cell>
          <table:table-cell office:value-type="float" office:value="43" calcext:value-type="float">
            <text:p>43</text:p>
          </table:table-cell>
          <table:table-cell table:formula="of:=AVERAGE([.M662:.M669])" office:value-type="float" office:value="38.625" calcext:value-type="float">
            <text:p>38.6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4" calcext:value-type="float">
            <text:p>664</text:p>
          </table:table-cell>
          <table:table-cell office:value-type="float" office:value="40" calcext:value-type="float">
            <text:p>40</text:p>
          </table:table-cell>
          <table:table-cell table:formula="of:=AVERAGE([.M663:.M670])" office:value-type="float" office:value="37.875" calcext:value-type="float">
            <text:p>37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5" calcext:value-type="float">
            <text:p>665</text:p>
          </table:table-cell>
          <table:table-cell office:value-type="float" office:value="38" calcext:value-type="float">
            <text:p>38</text:p>
          </table:table-cell>
          <table:table-cell table:formula="of:=AVERAGE([.M664:.M671])" office:value-type="float" office:value="36.875" calcext:value-type="float">
            <text:p>36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6" calcext:value-type="float">
            <text:p>666</text:p>
          </table:table-cell>
          <table:table-cell office:value-type="float" office:value="36" calcext:value-type="float">
            <text:p>36</text:p>
          </table:table-cell>
          <table:table-cell table:formula="of:=AVERAGE([.M665:.M672])" office:value-type="float" office:value="35" calcext:value-type="float">
            <text:p>3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7" calcext:value-type="float">
            <text:p>667</text:p>
          </table:table-cell>
          <table:table-cell office:value-type="float" office:value="32" calcext:value-type="float">
            <text:p>32</text:p>
          </table:table-cell>
          <table:table-cell table:formula="of:=AVERAGE([.M666:.M673])" office:value-type="float" office:value="33.375" calcext:value-type="float">
            <text:p>33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8" calcext:value-type="float">
            <text:p>668</text:p>
          </table:table-cell>
          <table:table-cell office:value-type="float" office:value="31" calcext:value-type="float">
            <text:p>31</text:p>
          </table:table-cell>
          <table:table-cell table:formula="of:=AVERAGE([.M667:.M674])" office:value-type="float" office:value="31.875" calcext:value-type="float">
            <text:p>31.8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9" calcext:value-type="float">
            <text:p>669</text:p>
          </table:table-cell>
          <table:table-cell office:value-type="float" office:value="35" calcext:value-type="float">
            <text:p>35</text:p>
          </table:table-cell>
          <table:table-cell table:formula="of:=AVERAGE([.M668:.M675])" office:value-type="float" office:value="30" calcext:value-type="float">
            <text:p>30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0" calcext:value-type="float">
            <text:p>670</text:p>
          </table:table-cell>
          <table:table-cell office:value-type="float" office:value="25" calcext:value-type="float">
            <text:p>25</text:p>
          </table:table-cell>
          <table:table-cell table:formula="of:=AVERAGE([.M669:.M676])" office:value-type="float" office:value="29.5" calcext:value-type="float">
            <text:p>29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1" calcext:value-type="float">
            <text:p>671</text:p>
          </table:table-cell>
          <table:table-cell office:value-type="float" office:value="30" calcext:value-type="float">
            <text:p>30</text:p>
          </table:table-cell>
          <table:table-cell table:formula="of:=AVERAGE([.M670:.M677])" office:value-type="float" office:value="29" calcext:value-type="float">
            <text:p>29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table:formula="of:=AVERAGE([.M671:.M678])" office:value-type="float" office:value="28.375" calcext:value-type="float">
            <text:p>28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3" calcext:value-type="float">
            <text:p>673</text:p>
          </table:table-cell>
          <table:table-cell office:value-type="float" office:value="23" calcext:value-type="float">
            <text:p>23</text:p>
          </table:table-cell>
          <table:table-cell table:formula="of:=AVERAGE([.M672:.M679])" office:value-type="float" office:value="26.25" calcext:value-type="float">
            <text:p>26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4" calcext:value-type="float">
            <text:p>674</text:p>
          </table:table-cell>
          <table:table-cell office:value-type="float" office:value="32" calcext:value-type="float">
            <text:p>32</text:p>
          </table:table-cell>
          <table:table-cell table:formula="of:=AVERAGE([.M673:.M680])" office:value-type="float" office:value="25.25" calcext:value-type="float">
            <text:p>25.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table:formula="of:=AVERAGE([.M674:.M681])" office:value-type="float" office:value="25" calcext:value-type="float">
            <text:p>2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6" calcext:value-type="float">
            <text:p>676</text:p>
          </table:table-cell>
          <table:table-cell office:value-type="float" office:value="26" calcext:value-type="float">
            <text:p>26</text:p>
          </table:table-cell>
          <table:table-cell table:formula="of:=AVERAGE([.M675:.M682])" office:value-type="float" office:value="23.5" calcext:value-type="float">
            <text:p>2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7" calcext:value-type="float">
            <text:p>677</text:p>
          </table:table-cell>
          <table:table-cell office:value-type="float" office:value="18" calcext:value-type="float">
            <text:p>18</text:p>
          </table:table-cell>
          <table:table-cell table:formula="of:=AVERAGE([.M676:.M683])" office:value-type="float" office:value="24" calcext:value-type="float">
            <text:p>24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8" calcext:value-type="float">
            <text:p>678</text:p>
          </table:table-cell>
          <table:table-cell office:value-type="float" office:value="17" calcext:value-type="float">
            <text:p>17</text:p>
          </table:table-cell>
          <table:table-cell table:formula="of:=AVERAGE([.M677:.M684])" office:value-type="float" office:value="22.75" calcext:value-type="float">
            <text:p>22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AVERAGE([.M678:.M685])" office:value-type="float" office:value="21.375" calcext:value-type="float">
            <text:p>21.3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table:formula="of:=AVERAGE([.M679:.M686])" office:value-type="float" office:value="21" calcext:value-type="float">
            <text:p>21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1" calcext:value-type="float">
            <text:p>681</text:p>
          </table:table-cell>
          <table:table-cell office:value-type="float" office:value="27" calcext:value-type="float">
            <text:p>27</text:p>
          </table:table-cell>
          <table:table-cell table:formula="of:=AVERAGE([.M680:.M687])" office:value-type="float" office:value="23" calcext:value-type="float">
            <text:p>23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2" calcext:value-type="float">
            <text:p>682</text:p>
          </table:table-cell>
          <table:table-cell office:value-type="float" office:value="22" calcext:value-type="float">
            <text:p>22</text:p>
          </table:table-cell>
          <table:table-cell table:formula="of:=AVERAGE([.M681:.M688])" office:value-type="float" office:value="23.75" calcext:value-type="float">
            <text:p>23.7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3" calcext:value-type="float">
            <text:p>683</text:p>
          </table:table-cell>
          <table:table-cell office:value-type="float" office:value="17" calcext:value-type="float">
            <text:p>17</text:p>
          </table:table-cell>
          <table:table-cell table:formula="of:=AVERAGE([.M682:.M689])" office:value-type="float" office:value="23.5" calcext:value-type="float">
            <text:p>23.5</text:p>
          </table:table-cell>
          <table:table-cell table:formula="of:=MAX([.$A$23])/2" office:value-type="float" office:value="487.25" calcext:value-type="float">
            <text:p>487.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4" calcext:value-type="float">
            <text:p>68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686:.N168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5" calcext:value-type="float">
            <text:p>68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AX([.N687:.N1685]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6" calcext:value-type="float">
            <text:p>68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688:.N1686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7" calcext:value-type="float">
            <text:p>68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AX([.N689:.N168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8" calcext:value-type="float">
            <text:p>68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690:.N168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9" calcext:value-type="float">
            <text:p>68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691:.N1689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0" calcext:value-type="float">
            <text:p>69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692:.N169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1" calcext:value-type="float">
            <text:p>69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693:.N169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2" calcext:value-type="float">
            <text:p>69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AX([.N694:.N1692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3" calcext:value-type="float">
            <text:p>69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695:.N1693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4" calcext:value-type="float">
            <text:p>69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696:.N169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5" calcext:value-type="float">
            <text:p>69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697:.N169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6" calcext:value-type="float">
            <text:p>69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698:.N169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7" calcext:value-type="float">
            <text:p>69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AX([.N699:.N1697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8" calcext:value-type="float">
            <text:p>69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00:.N169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701:.N169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02:.N170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03:.N170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2" calcext:value-type="float">
            <text:p>70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04:.N170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3" calcext:value-type="float">
            <text:p>70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05:.N170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06:.N170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5" calcext:value-type="float">
            <text:p>70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07:.N170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6" calcext:value-type="float">
            <text:p>70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708:.N170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7" calcext:value-type="float">
            <text:p>70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709:.N170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10:.N170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11:.N170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712:.N171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713:.N17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14:.N171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15:.N17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716:.N171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17:.N171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718:.N171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19:.N171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20:.N171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21:.N171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22:.N172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23:.N172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24:.N172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25:.N172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26:.N172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27:.N172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28:.N1726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729:.N172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730:.N172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31:.N172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32:.N17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33:.N17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34:.N1732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35:.N173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36:.N173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37:.N173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38:.N173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39:.N173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40:.N173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41:.N173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42:.N174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43:.N17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44:.N174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45:.N174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46:.N1744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47:.N174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48:.N174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49:.N174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8" calcext:value-type="float">
            <text:p>74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50:.N174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9" calcext:value-type="float">
            <text:p>74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51:.N174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52:.N175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1" calcext:value-type="float">
            <text:p>75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53:.N175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2" calcext:value-type="float">
            <text:p>75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54:.N175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55:.N175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4" calcext:value-type="float">
            <text:p>75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56:.N175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5" calcext:value-type="float">
            <text:p>755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57:.N1755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6" calcext:value-type="float">
            <text:p>756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758:.N1756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7" calcext:value-type="float">
            <text:p>75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59:.N17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8" calcext:value-type="float">
            <text:p>75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760:.N175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59" calcext:value-type="float">
            <text:p>75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61:.N175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0" calcext:value-type="float">
            <text:p>76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62:.N176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1" calcext:value-type="float">
            <text:p>76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63:.N17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2" calcext:value-type="float">
            <text:p>76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64:.N176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3" calcext:value-type="float">
            <text:p>7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65:.N176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4" calcext:value-type="float">
            <text:p>76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66:.N176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767:.N1765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768:.N176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7" calcext:value-type="float">
            <text:p>76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69:.N176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70:.N176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69" calcext:value-type="float">
            <text:p>7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71:.N176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72:.N177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73:.N17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2" calcext:value-type="float">
            <text:p>77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74:.N177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3" calcext:value-type="float">
            <text:p>77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75:.N177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4" calcext:value-type="float">
            <text:p>77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76:.N177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77:.N1775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778:.N1776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79:.N177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80:.N1778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79" calcext:value-type="float">
            <text:p>77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81:.N177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0" calcext:value-type="float">
            <text:p>7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82:.N178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1" calcext:value-type="float">
            <text:p>78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83:.N1781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84:.N178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3" calcext:value-type="float">
            <text:p>78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85:.N178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86:.N178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5" calcext:value-type="float">
            <text:p>78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87:.N1785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88:.N178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7" calcext:value-type="float">
            <text:p>78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789:.N1787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790:.N178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89" calcext:value-type="float">
            <text:p>78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91:.N178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792:.N179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793:.N1791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94:.N179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795:.N179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4" calcext:value-type="float">
            <text:p>79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796:.N179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5" calcext:value-type="float">
            <text:p>79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797:.N179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6" calcext:value-type="float">
            <text:p>796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798:.N1796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7" calcext:value-type="float">
            <text:p>79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799:.N179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8" calcext:value-type="float">
            <text:p>798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800:.N179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99" calcext:value-type="float">
            <text:p>799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01:.N179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02:.N180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1" calcext:value-type="float">
            <text:p>80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03:.N180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2" calcext:value-type="float">
            <text:p>80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04:.N180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805:.N1803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4" calcext:value-type="float">
            <text:p>80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06:.N180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5" calcext:value-type="float">
            <text:p>80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07:.N180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08:.N1806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09:.N180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8" calcext:value-type="float">
            <text:p>808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10:.N1808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811:.N18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0" calcext:value-type="float">
            <text:p>8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12:.N18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N813:.N1811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2" calcext:value-type="float">
            <text:p>8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814:.N181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3" calcext:value-type="float">
            <text:p>81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15:.N181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16:.N181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5" calcext:value-type="float">
            <text:p>81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817:.N181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6" calcext:value-type="float">
            <text:p>81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18:.N181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19:.N181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8" calcext:value-type="float">
            <text:p>818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20:.N181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21:.N1819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0" calcext:value-type="float">
            <text:p>820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822:.N1820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23:.N182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2" calcext:value-type="float">
            <text:p>822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24:.N182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3" calcext:value-type="float">
            <text:p>82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825:.N1823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26:.N182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27:.N182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6" calcext:value-type="float">
            <text:p>82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28:.N182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7" calcext:value-type="float">
            <text:p>8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29:.N182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8" calcext:value-type="float">
            <text:p>8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30:.N182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29" calcext:value-type="float">
            <text:p>82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31:.N182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32:.N18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1" calcext:value-type="float">
            <text:p>83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33:.N183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34:.N183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35:.N183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4" calcext:value-type="float">
            <text:p>83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836:.N18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837:.N183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6" calcext:value-type="float">
            <text:p>83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38:.N183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7" calcext:value-type="float">
            <text:p>837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839:.N183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40:.N183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39" calcext:value-type="float">
            <text:p>839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41:.N1839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42:.N184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1" calcext:value-type="float">
            <text:p>84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43:.N18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2" calcext:value-type="float">
            <text:p>84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44:.N184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3" calcext:value-type="float">
            <text:p>843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45:.N18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4" calcext:value-type="float">
            <text:p>844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46:.N184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47:.N184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6" calcext:value-type="float">
            <text:p>84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48:.N184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7" calcext:value-type="float">
            <text:p>84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49:.N184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8" calcext:value-type="float">
            <text:p>84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850:.N18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49" calcext:value-type="float">
            <text:p>84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51:.N184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52:.N185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1" calcext:value-type="float">
            <text:p>85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53:.N185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2" calcext:value-type="float">
            <text:p>85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54:.N185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3" calcext:value-type="float">
            <text:p>85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55:.N185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856:.N185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57:.N185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6" calcext:value-type="float">
            <text:p>8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58:.N185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7" calcext:value-type="float">
            <text:p>85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59:.N185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8" calcext:value-type="float">
            <text:p>8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60:.N185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59" calcext:value-type="float">
            <text:p>85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61:.N185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62:.N186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1" calcext:value-type="float">
            <text:p>86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63:.N18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2" calcext:value-type="float">
            <text:p>86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64:.N186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3" calcext:value-type="float">
            <text:p>86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65:.N186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4" calcext:value-type="float">
            <text:p>86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66:.N186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5" calcext:value-type="float">
            <text:p>86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67:.N186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6" calcext:value-type="float">
            <text:p>86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68:.N186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7" calcext:value-type="float">
            <text:p>86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869:.N186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8" calcext:value-type="float">
            <text:p>86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70:.N1868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69" calcext:value-type="float">
            <text:p>86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71:.N186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72:.N187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1" calcext:value-type="float">
            <text:p>87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73:.N18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2" calcext:value-type="float">
            <text:p>87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74:.N187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3" calcext:value-type="float">
            <text:p>87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75:.N187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4" calcext:value-type="float">
            <text:p>87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76:.N187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77:.N187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6" calcext:value-type="float">
            <text:p>87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78:.N187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7" calcext:value-type="float">
            <text:p>87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879:.N187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8" calcext:value-type="float">
            <text:p>87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80:.N187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79" calcext:value-type="float">
            <text:p>8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881:.N187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0" calcext:value-type="float">
            <text:p>8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82:.N188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1" calcext:value-type="float">
            <text:p>88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883:.N188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2" calcext:value-type="float">
            <text:p>88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84:.N188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3" calcext:value-type="float">
            <text:p>88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885:.N188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4" calcext:value-type="float">
            <text:p>884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86:.N188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87:.N188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6" calcext:value-type="float">
            <text:p>88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88:.N188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7" calcext:value-type="float">
            <text:p>88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889:.N188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8" calcext:value-type="float">
            <text:p>88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890:.N188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89" calcext:value-type="float">
            <text:p>88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891:.N188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0" calcext:value-type="float">
            <text:p>890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892:.N189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1" calcext:value-type="float">
            <text:p>89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93:.N18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2" calcext:value-type="float">
            <text:p>89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94:.N189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3" calcext:value-type="float">
            <text:p>89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895:.N1893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896:.N189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5" calcext:value-type="float">
            <text:p>89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897:.N189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6" calcext:value-type="float">
            <text:p>89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898:.N189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7" calcext:value-type="float">
            <text:p>89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899:.N189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8" calcext:value-type="float">
            <text:p>89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00:.N189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899" calcext:value-type="float">
            <text:p>89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01:.N189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02:.N190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03:.N190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2" calcext:value-type="float">
            <text:p>90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04:.N190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3" calcext:value-type="float">
            <text:p>90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05:.N190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4" calcext:value-type="float">
            <text:p>90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06:.N190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07:.N1905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6" calcext:value-type="float">
            <text:p>90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08:.N190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7" calcext:value-type="float">
            <text:p>907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09:.N190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8" calcext:value-type="float">
            <text:p>90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10:.N190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11:.N19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12:.N19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1" calcext:value-type="float">
            <text:p>9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13:.N19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2" calcext:value-type="float">
            <text:p>91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14:.N191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3" calcext:value-type="float">
            <text:p>91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15:.N191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4" calcext:value-type="float">
            <text:p>91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16:.N191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5" calcext:value-type="float">
            <text:p>9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17:.N19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6" calcext:value-type="float">
            <text:p>91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18:.N191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7" calcext:value-type="float">
            <text:p>91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[.N919:.N1917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8" calcext:value-type="float">
            <text:p>9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N920:.N191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19" calcext:value-type="float">
            <text:p>9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21:.N191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0" calcext:value-type="float">
            <text:p>92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[.N922:.N1920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1" calcext:value-type="float">
            <text:p>92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23:.N192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2" calcext:value-type="float">
            <text:p>92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24:.N192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3" calcext:value-type="float">
            <text:p>92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25:.N192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4" calcext:value-type="float">
            <text:p>92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926:.N192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5" calcext:value-type="float">
            <text:p>9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27:.N1925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928:.N192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7" calcext:value-type="float">
            <text:p>92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29:.N192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8" calcext:value-type="float">
            <text:p>92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30:.N1928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31:.N192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0" calcext:value-type="float">
            <text:p>9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932:.N1930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1" calcext:value-type="float">
            <text:p>93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33:.N19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2" calcext:value-type="float">
            <text:p>93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34:.N193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3" calcext:value-type="float">
            <text:p>93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35:.N193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4" calcext:value-type="float">
            <text:p>93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36:.N19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5" calcext:value-type="float">
            <text:p>93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37:.N193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6" calcext:value-type="float">
            <text:p>93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938:.N193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7" calcext:value-type="float">
            <text:p>93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39:.N193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8" calcext:value-type="float">
            <text:p>93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40:.N193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39" calcext:value-type="float">
            <text:p>93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941:.N193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0" calcext:value-type="float">
            <text:p>94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42:.N194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1" calcext:value-type="float">
            <text:p>94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43:.N194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2" calcext:value-type="float">
            <text:p>942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N944:.N194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3" calcext:value-type="float">
            <text:p>94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45:.N194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4" calcext:value-type="float">
            <text:p>94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46:.N194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5" calcext:value-type="float">
            <text:p>94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47:.N194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6" calcext:value-type="float">
            <text:p>94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48:.N194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7" calcext:value-type="float">
            <text:p>94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49:.N194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8" calcext:value-type="float">
            <text:p>94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50:.N19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49" calcext:value-type="float">
            <text:p>94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[.N951:.N194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52:.N195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1" calcext:value-type="float">
            <text:p>95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53:.N195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2" calcext:value-type="float">
            <text:p>952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54:.N195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3" calcext:value-type="float">
            <text:p>95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55:.N195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4" calcext:value-type="float">
            <text:p>95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56:.N195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5" calcext:value-type="float">
            <text:p>955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N957:.N195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6" calcext:value-type="float">
            <text:p>95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58:.N195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7" calcext:value-type="float">
            <text:p>95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59:.N19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60:.N1958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59" calcext:value-type="float">
            <text:p>95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N961:.N195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0" calcext:value-type="float">
            <text:p>96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62:.N1960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1" calcext:value-type="float">
            <text:p>96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63:.N196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2" calcext:value-type="float">
            <text:p>96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64:.N1962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3" calcext:value-type="float">
            <text:p>96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65:.N1963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4" calcext:value-type="float">
            <text:p>96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66:.N196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5" calcext:value-type="float">
            <text:p>96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67:.N196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6" calcext:value-type="float">
            <text:p>96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68:.N196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7" calcext:value-type="float">
            <text:p>96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69:.N196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8" calcext:value-type="float">
            <text:p>96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70:.N196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69" calcext:value-type="float">
            <text:p>96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71:.N196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0" calcext:value-type="float">
            <text:p>97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AX([.N972:.N1970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1" calcext:value-type="float">
            <text:p>97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73:.N197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2" calcext:value-type="float">
            <text:p>97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N974:.N1972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3" calcext:value-type="float">
            <text:p>97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75:.N1973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4" calcext:value-type="float">
            <text:p>97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76:.N1974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5" calcext:value-type="float">
            <text:p>97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N977:.N197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6" calcext:value-type="float">
            <text:p>97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78:.N197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7" calcext:value-type="float">
            <text:p>97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79:.N197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8" calcext:value-type="float">
            <text:p>97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80:.N197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79" calcext:value-type="float">
            <text:p>97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81:.N197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0" calcext:value-type="float">
            <text:p>98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82:.N198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1" calcext:value-type="float">
            <text:p>98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[.N983:.N1981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2" calcext:value-type="float">
            <text:p>98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N984:.N198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3" calcext:value-type="float">
            <text:p>98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N985:.N198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4" calcext:value-type="float">
            <text:p>98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86:.N198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87:.N198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88:.N198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7" calcext:value-type="float">
            <text:p>98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N989:.N198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8" calcext:value-type="float">
            <text:p>98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990:.N1988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89" calcext:value-type="float">
            <text:p>98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91:.N198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0" calcext:value-type="float">
            <text:p>99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N992:.N199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1" calcext:value-type="float">
            <text:p>99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93:.N19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2" calcext:value-type="float">
            <text:p>99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N994:.N1992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3" calcext:value-type="float">
            <text:p>99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N995:.N199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4" calcext:value-type="float">
            <text:p>99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N996:.N199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5" calcext:value-type="float">
            <text:p>9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[.N997:.N199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6" calcext:value-type="float">
            <text:p>99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N998:.N199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999:.N199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8" calcext:value-type="float">
            <text:p>99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N1000:.N199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[.N1001:.N199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2"/>
          <table:table-cell table:formula="of:=MAX([.N1002:.N200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nnex D Resolution'.A33:'Annex D Resolution'.A33">
            <calcext:condition calcext:apply-style-name="Good" calcext:value="&lt;0.15" calcext:base-cell-address="'Annex D Resolution'.A33"/>
          </calcext:conditional-format>
          <calcext:conditional-format calcext:target-range-address="'Annex D Resolution'.A31:'Annex D Resolution'.A31">
            <calcext:condition calcext:apply-style-name="Good" calcext:value="&lt;0.3" calcext:base-cell-address="'Annex D Resolution'.A31"/>
          </calcext:conditional-format>
        </calcext:conditional-formats>
      </table:table>
      <table:table table:name="Annex E Verify Counting Accuracy" table:style-name="ta1">
        <table:table-column table:style-name="co16" table:default-cell-style-name="Default"/>
        <table:table-column table:style-name="co17" table:default-cell-style-name="Default"/>
        <table:table-column table:style-name="co4" table:number-columns-repeated="1022" table:default-cell-style-name="Default"/>
        <table:table-row table:style-name="ro11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</text:p>
            <text:p>1mg/l</text:p>
          </table:table-cell>
          <table:table-cell table:style-name="ce24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7"/>
          <table:table-cell table:number-columns-repeated="4"/>
          <table:table-cell table:style-name="ce27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string" calcext:value-type="string">
            <text:p>11171 00001</text:p>
          </table:table-cell>
          <table:table-cell table:number-columns-repeated="9"/>
          <table:table-cell>
            <draw:frame draw:z-index="0" draw:name="Image 7" draw:style-name="gr2" draw:text-style-name="P2" svg:width="13.801cm" svg:height="5.615cm" svg:x="0.288cm" svg:y="0.515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16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30" office:value-type="date" office:date-value="2025-05-16" calcext:value-type="date">
            <text:p>2025-05-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114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Table A.1</text:p>
          </table:table-cell>
          <table:table-cell table:number-columns-repeated="4"/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1004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4"/>
          <table:table-cell table:style-name="ce185" office:value-type="string" calcext:value-type="string">
            <text:p>μm(c)</text:p>
          </table:table-cell>
          <table:table-cell table:style-name="ce185" office:value-type="string" calcext:value-type="string">
            <text:p>Median</text:p>
          </table:table-cell>
          <table:table-cell table:style-name="ce185" office:value-type="string" calcext:value-type="string">
            <text:p>Minimum</text:p>
          </table:table-cell>
          <table:table-cell table:style-name="ce185" office:value-type="string" calcext:value-type="string">
            <text:p>Maximum</text:p>
          </table:table-cell>
          <table:table-cell/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table:style-name="ce115" office:value-type="string" calcext:value-type="string">
            <text:p>Particle Counts</text:p>
          </table:table-cell>
          <table:table-cell table:style-name="ce117" table:number-columns-repeated="3"/>
          <table:table-cell table:style-name="ce118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table:style-name="ce326" office:value-type="string" calcext:value-type="string">
            <text:p>4μm</text:p>
          </table:table-cell>
          <table:table-cell table:style-name="ce31" office:value-type="string" calcext:value-type="string">
            <text:p>6μm</text:p>
          </table:table-cell>
          <table:table-cell table:style-name="ce333" office:value-type="string" calcext:value-type="string">
            <text:p>14μm</text:p>
          </table:table-cell>
          <table:table-cell table:style-name="ce333" office:value-type="string" calcext:value-type="string">
            <text:p>21μm</text:p>
          </table:table-cell>
          <table:table-cell table:style-name="ce336" office:value-type="string" calcext:value-type="string">
            <text:p>25μm</text:p>
          </table:table-cell>
          <table:table-cell table:style-name="ce16"/>
          <table:table-cell/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6300" calcext:value-type="float">
            <text:p>6300</text:p>
          </table:table-cell>
          <table:table-cell table:style-name="ce260" office:value-type="float" office:value="4553" calcext:value-type="float">
            <text:p>4553</text:p>
          </table:table-cell>
          <table:table-cell table:style-name="ce260" office:value-type="float" office:value="8713" calcext:value-type="float">
            <text:p>8713</text:p>
          </table:table-cell>
          <table:table-cell/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office:value-type="float" office:value="686972" calcext:value-type="float">
            <text:p>686972</text:p>
          </table:table-cell>
          <table:table-cell office:value-type="float" office:value="160789" calcext:value-type="float">
            <text:p>160789</text:p>
          </table:table-cell>
          <table:table-cell table:style-name="ce249" office:value-type="float" office:value="1187" calcext:value-type="float">
            <text:p>1187</text:p>
          </table:table-cell>
          <table:table-cell table:style-name="ce249" office:value-type="float" office:value="408" calcext:value-type="float">
            <text:p>408</text:p>
          </table:table-cell>
          <table:table-cell table:style-name="ce249" office:value-type="float" office:value="229" calcext:value-type="float">
            <text:p>229</text:p>
          </table:table-cell>
          <table:table-cell table:style-name="ce16"/>
          <table:table-cell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 office:value-type="float" office:value="688200" calcext:value-type="float">
            <text:p>688200</text:p>
          </table:table-cell>
          <table:table-cell office:value-type="float" office:value="160999" calcext:value-type="float">
            <text:p>160999</text:p>
          </table:table-cell>
          <table:table-cell table:style-name="ce249" office:value-type="float" office:value="1314" calcext:value-type="float">
            <text:p>1314</text:p>
          </table:table-cell>
          <table:table-cell table:style-name="ce249" office:value-type="float" office:value="489" calcext:value-type="float">
            <text:p>489</text:p>
          </table:table-cell>
          <table:table-cell table:style-name="ce249" office:value-type="float" office:value="296" calcext:value-type="float">
            <text:p>296</text:p>
          </table:table-cell>
          <table:table-cell table:style-name="ce16"/>
          <table:table-cell/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1631" calcext:value-type="float">
            <text:p>1631</text:p>
          </table:table-cell>
          <table:table-cell table:style-name="ce260" office:value-type="float" office:value="938.2" calcext:value-type="float">
            <text:p>938.2</text:p>
          </table:table-cell>
          <table:table-cell table:style-name="ce260" office:value-type="float" office:value="2834" calcext:value-type="float">
            <text:p>2834</text:p>
          </table:table-cell>
          <table:table-cell/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 office:value-type="float" office:value="684665" calcext:value-type="float">
            <text:p>684665</text:p>
          </table:table-cell>
          <table:table-cell office:value-type="float" office:value="159955" calcext:value-type="float">
            <text:p>159955</text:p>
          </table:table-cell>
          <table:table-cell table:style-name="ce249" office:value-type="float" office:value="1037" calcext:value-type="float">
            <text:p>1037</text:p>
          </table:table-cell>
          <table:table-cell table:style-name="ce249" office:value-type="float" office:value="293" calcext:value-type="float">
            <text:p>293</text:p>
          </table:table-cell>
          <table:table-cell table:style-name="ce249" office:value-type="float" office:value="178" calcext:value-type="float">
            <text:p>178</text:p>
          </table:table-cell>
          <table:table-cell table:style-name="ce16"/>
          <table:table-cell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 office:value-type="float" office:value="684241" calcext:value-type="float">
            <text:p>684241</text:p>
          </table:table-cell>
          <table:table-cell office:value-type="float" office:value="159597" calcext:value-type="float">
            <text:p>159597</text:p>
          </table:table-cell>
          <table:table-cell table:style-name="ce249" office:value-type="float" office:value="830" calcext:value-type="float">
            <text:p>830</text:p>
          </table:table-cell>
          <table:table-cell table:style-name="ce249" office:value-type="float" office:value="217" calcext:value-type="float">
            <text:p>217</text:p>
          </table:table-cell>
          <table:table-cell table:style-name="ce249" office:value-type="float" office:value="153" calcext:value-type="float">
            <text:p>153</text:p>
          </table:table-cell>
          <table:table-cell table:style-name="ce16"/>
          <table:table-cell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/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 office:value-type="float" office:value="678338" calcext:value-type="float">
            <text:p>678338</text:p>
          </table:table-cell>
          <table:table-cell office:value-type="float" office:value="156956" calcext:value-type="float">
            <text:p>156956</text:p>
          </table:table-cell>
          <table:table-cell table:style-name="ce249" office:value-type="float" office:value="1154" calcext:value-type="float">
            <text:p>1154</text:p>
          </table:table-cell>
          <table:table-cell table:style-name="ce249" office:value-type="float" office:value="333" calcext:value-type="float">
            <text:p>333</text:p>
          </table:table-cell>
          <table:table-cell table:style-name="ce249" office:value-type="float" office:value="205" calcext:value-type="float">
            <text:p>205</text:p>
          </table:table-cell>
          <table:table-cell table:style-name="ce16"/>
          <table:table-cell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1013"/>
        </table:table-row>
        <table:table-row table:style-name="ro2">
          <table:table-cell table:style-name="ce175" table:formula="of:=SUM([.A24:.A28])/5/100" office:value-type="float" office:value="6844.832" calcext:value-type="float">
            <text:p>6844.832</text:p>
          </table:table-cell>
          <table:table-cell table:style-name="ce179" table:formula="of:=SUM([.B24:.B28])/5/100" office:value-type="float" office:value="1596.592" calcext:value-type="float">
            <text:p>1596.592</text:p>
          </table:table-cell>
          <table:table-cell table:style-name="ce334" table:formula="of:=SUM([.C24:.C28])/5/100" office:value-type="float" office:value="11.044" calcext:value-type="float">
            <text:p>11.044</text:p>
          </table:table-cell>
          <table:table-cell table:style-name="ce334" table:formula="of:=SUM([.D24:.D28])/5/100" office:value-type="float" office:value="3.48" calcext:value-type="float">
            <text:p>3.48</text:p>
          </table:table-cell>
          <table:table-cell table:style-name="ce334" table:formula="of:=SUM([.E24:.E28])/5/100" office:value-type="float" office:value="2.122" calcext:value-type="float">
            <text:p>2.122</text:p>
          </table:table-cell>
          <table:table-cell table:style-name="ce16" office:value-type="string" calcext:value-type="string">
            <text:p>/ml</text:p>
          </table:table-cell>
          <table:table-cell/>
          <table:table-cell table:style-name="ce186" office:value-type="float" office:value="10" calcext:value-type="float">
            <text:p>10</text:p>
          </table:table-cell>
          <table:table-cell table:style-name="ce186" office:value-type="float" office:value="88.9" calcext:value-type="float">
            <text:p>88.9</text:p>
          </table:table-cell>
          <table:table-cell table:style-name="ce186" office:value-type="float" office:value="27.89" calcext:value-type="float">
            <text:p>27.89</text:p>
          </table:table-cell>
          <table:table-cell table:style-name="ce186" office:value-type="float" office:value="283.4" calcext:value-type="float">
            <text:p>283.4</text:p>
          </table:table-cell>
          <table:table-cell table:number-columns-repeated="1013"/>
        </table:table-row>
        <table:table-row table:style-name="ro2">
          <table:table-cell table:style-name="ce328" table:formula="of:=[.A29]/[.$I$23]-1" office:value-type="percentage" office:value="0.0864812698412698" calcext:value-type="percentage">
            <text:p>8.65%</text:p>
          </table:table-cell>
          <table:table-cell table:style-name="ce328" table:formula="of:=[.B29]/[.$I$25]-1" office:value-type="percentage" office:value="-0.0210962599632127" calcext:value-type="percentage">
            <text:p>-2.11%</text:p>
          </table:table-cell>
          <table:table-cell table:style-name="ce335" office:value-type="string" calcext:value-type="string">
            <text:p>Deviation from Nominal Annex E Values</text:p>
          </table:table-cell>
          <table:table-cell table:style-name="ce122"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ce16" table:number-columns-repeated="6"/>
          <table:table-cell table:number-columns-repeated="1018"/>
        </table:table-row>
        <table:table-row table:style-name="ro2">
          <table:table-cell/>
          <table:table-cell table:style-name="ce28" office:value-type="string" calcext:value-type="string">
            <text:p>~Raw Counts</text:p>
          </table:table-cell>
          <table:table-cell table:style-name="ce28"/>
          <table:table-cell table:number-columns-repeated="9"/>
          <table:table-cell office:value-type="float" office:value="676034" calcext:value-type="float">
            <text:p>676034</text:p>
          </table:table-cell>
          <table:table-cell office:value-type="float" office:value="162561" calcext:value-type="float">
            <text:p>162561</text:p>
          </table:table-cell>
          <table:table-cell office:value-type="float" office:value="3400" calcext:value-type="float">
            <text:p>3400</text:p>
          </table:table-cell>
          <table:table-cell office:value-type="float" office:value="1374" calcext:value-type="float">
            <text:p>1374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ottle 2</text:p>
          </table:table-cell>
          <table:table-cell table:number-columns-repeated="1005"/>
        </table:table-row>
        <table:table-row table:style-name="ro2">
          <table:table-cell table:style-name="ce120" office:value-type="string" calcext:value-type="string">
            <text:p>Portion </text:p>
          </table:table-cell>
          <table:table-cell table:style-name="ce122" office:value-type="string" calcext:value-type="string">
            <text:p>&gt;4μm(c)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6μ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14u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21μ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25μm</text:p>
          </table:table-cell>
          <table:table-cell table:style-name="ce122" office:value-type="string" calcext:value-type="string">
            <text:p>Deviation</text:p>
          </table:table-cell>
          <table:table-cell/>
          <table:table-cell office:value-type="float" office:value="649797" calcext:value-type="float">
            <text:p>649797</text:p>
          </table:table-cell>
          <table:table-cell office:value-type="float" office:value="156643" calcext:value-type="float">
            <text:p>156643</text:p>
          </table:table-cell>
          <table:table-cell office:value-type="float" office:value="3094" calcext:value-type="float">
            <text:p>3094</text:p>
          </table:table-cell>
          <table:table-cell office:value-type="float" office:value="1390" calcext:value-type="float">
            <text:p>139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55" office:value-type="date" office:date-value="2025-05-16" calcext:value-type="date">
            <text:p>2025-05-16</text:p>
          </table:table-cell>
          <table:table-cell table:number-columns-repeated="1005"/>
        </table:table-row>
        <table:table-row table:style-name="ro2">
          <table:table-cell table:number-columns-repeated="12"/>
          <table:table-cell office:value-type="float" office:value="659312" calcext:value-type="float">
            <text:p>659312</text:p>
          </table:table-cell>
          <table:table-cell office:value-type="float" office:value="157381" calcext:value-type="float">
            <text:p>157381</text:p>
          </table:table-cell>
          <table:table-cell office:value-type="float" office:value="2782" calcext:value-type="float">
            <text:p>2782</text:p>
          </table:table-cell>
          <table:table-cell office:value-type="float" office:value="1205" calcext:value-type="float">
            <text:p>1205</text:p>
          </table:table-cell>
          <table:table-cell office:value-type="float" office:value="692" calcext:value-type="float">
            <text:p>69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20" table:formula="of:=[.A24]*[.$B$18]" office:value-type="float" office:value="48088.04" calcext:value-type="float">
            <text:p>48088</text:p>
          </table:table-cell>
          <table:table-cell table:style-name="ce21" table:formula="of:=([.B35]-[.B$47])/[.B$47]" office:value-type="percentage" office:value="0.00363602788205759" calcext:value-type="percentage">
            <text:p>0.36%</text:p>
          </table:table-cell>
          <table:table-cell table:style-name="ce20" table:formula="of:=[.B24]*[.$B$18]" office:value-type="float" office:value="11255.23" calcext:value-type="float">
            <text:p>11255</text:p>
          </table:table-cell>
          <table:table-cell table:style-name="ce21" table:formula="of:=([.D35]-[.D$47])/[.D$47]" office:value-type="percentage" office:value="0.00707632256706796" calcext:value-type="percentage">
            <text:p>0.71%</text:p>
          </table:table-cell>
          <table:table-cell table:style-name="ce20" table:formula="of:=[.C24]*[.$B$18]" office:value-type="float" office:value="83.09" calcext:value-type="float">
            <text:p>83</text:p>
          </table:table-cell>
          <table:table-cell table:style-name="ce21" table:formula="of:=([.F35]-[.F$47])/[.F$47]" office:value-type="percentage" office:value="0.0747917421224194" calcext:value-type="percentage">
            <text:p>7.48%</text:p>
          </table:table-cell>
          <table:table-cell table:style-name="ce20" table:formula="of:=[.D24]*[.$B$18]" office:value-type="float" office:value="28.56" calcext:value-type="float">
            <text:p>29</text:p>
          </table:table-cell>
          <table:table-cell table:style-name="ce21" table:formula="of:=([.H35]-[.H$47])/[.H$47]" office:value-type="percentage" office:value="0.172413793103448" calcext:value-type="percentage">
            <text:p>17.24%</text:p>
          </table:table-cell>
          <table:table-cell table:style-name="ce20" table:formula="of:=[.E24]*[.$B$18]" office:value-type="float" office:value="16.03" calcext:value-type="float">
            <text:p>16</text:p>
          </table:table-cell>
          <table:table-cell table:style-name="ce21" table:formula="of:=([.J35]-[.J$47])/[.J$47]" office:value-type="percentage" office:value="0.0791705937794532" calcext:value-type="percentage">
            <text:p>7.92%</text:p>
          </table:table-cell>
          <table:table-cell/>
          <table:table-cell office:value-type="float" office:value="649632" calcext:value-type="float">
            <text:p>649632</text:p>
          </table:table-cell>
          <table:table-cell office:value-type="float" office:value="155407" calcext:value-type="float">
            <text:p>155407</text:p>
          </table:table-cell>
          <table:table-cell office:value-type="float" office:value="2980" calcext:value-type="float">
            <text:p>2980</text:p>
          </table:table-cell>
          <table:table-cell office:value-type="float" office:value="1228" calcext:value-type="float">
            <text:p>1228</text:p>
          </table:table-cell>
          <table:table-cell office:value-type="float" office:value="665" calcext:value-type="float">
            <text:p>66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20" table:formula="of:=[.A25]*[.$B$18]" office:value-type="float" office:value="48174" calcext:value-type="float">
            <text:p>48174</text:p>
          </table:table-cell>
          <table:table-cell table:style-name="ce21" table:formula="of:=([.B36]-[.B$47])/[.B$47]" office:value-type="percentage" office:value="0.00543008214080344" calcext:value-type="percentage">
            <text:p>0.54%</text:p>
          </table:table-cell>
          <table:table-cell table:style-name="ce20" table:formula="of:=[.B25]*[.$B$18]" office:value-type="float" office:value="11269.93" calcext:value-type="float">
            <text:p>11270</text:p>
          </table:table-cell>
          <table:table-cell table:style-name="ce21" table:formula="of:=([.D36]-[.D$47])/[.D$47]" office:value-type="percentage" office:value="0.00839162415945965" calcext:value-type="percentage">
            <text:p>0.84%</text:p>
          </table:table-cell>
          <table:table-cell table:style-name="ce20" table:formula="of:=[.C25]*[.$B$18]" office:value-type="float" office:value="91.98" calcext:value-type="float">
            <text:p>92</text:p>
          </table:table-cell>
          <table:table-cell table:style-name="ce21" table:formula="of:=([.F36]-[.F$47])/[.F$47]" office:value-type="percentage" office:value="0.189786309308222" calcext:value-type="percentage">
            <text:p>18.98%</text:p>
          </table:table-cell>
          <table:table-cell table:style-name="ce20" table:formula="of:=[.D25]*[.$B$18]" office:value-type="float" office:value="34.23" calcext:value-type="float">
            <text:p>34</text:p>
          </table:table-cell>
          <table:table-cell table:style-name="ce21" table:formula="of:=([.H36]-[.H$47])/[.H$47]" office:value-type="percentage" office:value="0.405172413793103" calcext:value-type="percentage">
            <text:p>40.52%</text:p>
          </table:table-cell>
          <table:table-cell table:style-name="ce20" table:formula="of:=[.E25]*[.$B$18]" office:value-type="float" office:value="20.72" calcext:value-type="float">
            <text:p>21</text:p>
          </table:table-cell>
          <table:table-cell table:style-name="ce21" table:formula="of:=([.J36]-[.J$47])/[.J$47]" office:value-type="percentage" office:value="0.394910461828464" calcext:value-type="percentage">
            <text:p>39.49%</text:p>
          </table:table-cell>
          <table:table-cell/>
          <table:table-cell office:value-type="float" office:value="649182" calcext:value-type="float">
            <text:p>649182</text:p>
          </table:table-cell>
          <table:table-cell office:value-type="float" office:value="153191" calcext:value-type="float">
            <text:p>153191</text:p>
          </table:table-cell>
          <table:table-cell office:value-type="float" office:value="2873" calcext:value-type="float">
            <text:p>2873</text:p>
          </table:table-cell>
          <table:table-cell office:value-type="float" office:value="1072" calcext:value-type="float">
            <text:p>1072</text:p>
          </table:table-cell>
          <table:table-cell office:value-type="float" office:value="600" calcext:value-type="float">
            <text:p>6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20" table:formula="of:=[.A26]*[.$B$18]" office:value-type="float" office:value="47926.55" calcext:value-type="float">
            <text:p>47927</text:p>
          </table:table-cell>
          <table:table-cell table:style-name="ce21" table:formula="of:=([.B37]-[.B$47])/[.B$47]" office:value-type="percentage" office:value="0.000265601843843545" calcext:value-type="percentage">
            <text:p>0.03%</text:p>
          </table:table-cell>
          <table:table-cell table:style-name="ce20" table:formula="of:=[.B26]*[.$B$18]" office:value-type="float" office:value="11196.85" calcext:value-type="float">
            <text:p>11197</text:p>
          </table:table-cell>
          <table:table-cell table:style-name="ce21" table:formula="of:=([.D37]-[.D$47])/[.D$47]" office:value-type="percentage" office:value="0.0018526962429976" calcext:value-type="percentage">
            <text:p>0.19%</text:p>
          </table:table-cell>
          <table:table-cell table:style-name="ce20" table:formula="of:=[.C26]*[.$B$18]" office:value-type="float" office:value="72.59" calcext:value-type="float">
            <text:p>73</text:p>
          </table:table-cell>
          <table:table-cell table:style-name="ce21" table:formula="of:=([.F37]-[.F$47])/[.F$47]" office:value-type="percentage" office:value="-0.0610286128214416" calcext:value-type="percentage">
            <text:p>-6.10%</text:p>
          </table:table-cell>
          <table:table-cell table:style-name="ce20" table:formula="of:=[.D26]*[.$B$18]" office:value-type="float" office:value="20.51" calcext:value-type="float">
            <text:p>21</text:p>
          </table:table-cell>
          <table:table-cell table:style-name="ce21" table:formula="of:=([.H37]-[.H$47])/[.H$47]" office:value-type="percentage" office:value="-0.158045977011494" calcext:value-type="percentage">
            <text:p>-15.80%</text:p>
          </table:table-cell>
          <table:table-cell table:style-name="ce20" table:formula="of:=[.E26]*[.$B$18]" office:value-type="float" office:value="12.46" calcext:value-type="float">
            <text:p>12</text:p>
          </table:table-cell>
          <table:table-cell table:style-name="ce21" table:formula="of:=([.J37]-[.J$47])/[.J$47]" office:value-type="percentage" office:value="-0.161168708765316" calcext:value-type="percentage">
            <text:p>-16.12%</text:p>
          </table:table-cell>
          <table:table-cell/>
          <table:table-cell office:value-type="float" office:value="641855" calcext:value-type="float">
            <text:p>641855</text:p>
          </table:table-cell>
          <table:table-cell office:value-type="float" office:value="152613" calcext:value-type="float">
            <text:p>152613</text:p>
          </table:table-cell>
          <table:table-cell office:value-type="float" office:value="2759" calcext:value-type="float">
            <text:p>2759</text:p>
          </table:table-cell>
          <table:table-cell office:value-type="float" office:value="1089" calcext:value-type="float">
            <text:p>1089</text:p>
          </table:table-cell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20" table:formula="of:=[.A27]*[.$B$18]" office:value-type="float" office:value="47896.87" calcext:value-type="float">
            <text:p>47897</text:p>
          </table:table-cell>
          <table:table-cell table:style-name="ce21" table:formula="of:=([.B38]-[.B$47])/[.B$47]" office:value-type="percentage" office:value="-0.000353843600544285" calcext:value-type="percentage">
            <text:p>-0.04%</text:p>
          </table:table-cell>
          <table:table-cell table:style-name="ce20" table:formula="of:=[.B27]*[.$B$18]" office:value-type="float" office:value="11171.79" calcext:value-type="float">
            <text:p>11172</text:p>
          </table:table-cell>
          <table:table-cell table:style-name="ce21" table:formula="of:=([.D38]-[.D$47])/[.D$47]" office:value-type="percentage" office:value="-0.00038957980498456" calcext:value-type="percentage">
            <text:p>-0.04%</text:p>
          </table:table-cell>
          <table:table-cell table:style-name="ce20" table:formula="of:=[.C27]*[.$B$18]" office:value-type="float" office:value="58.1" calcext:value-type="float">
            <text:p>58</text:p>
          </table:table-cell>
          <table:table-cell table:style-name="ce21" table:formula="of:=([.F38]-[.F$47])/[.F$47]" office:value-type="percentage" office:value="-0.24846070264397" calcext:value-type="percentage">
            <text:p>-24.85%</text:p>
          </table:table-cell>
          <table:table-cell table:style-name="ce20" table:formula="of:=[.D27]*[.$B$18]" office:value-type="float" office:value="15.19" calcext:value-type="float">
            <text:p>15</text:p>
          </table:table-cell>
          <table:table-cell table:style-name="ce21" table:formula="of:=([.H38]-[.H$47])/[.H$47]" office:value-type="percentage" office:value="-0.376436781609195" calcext:value-type="percentage">
            <text:p>-37.64%</text:p>
          </table:table-cell>
          <table:table-cell table:style-name="ce20" table:formula="of:=[.E27]*[.$B$18]" office:value-type="float" office:value="10.71" calcext:value-type="float">
            <text:p>11</text:p>
          </table:table-cell>
          <table:table-cell table:style-name="ce21" table:formula="of:=([.J38]-[.J$47])/[.J$47]" office:value-type="percentage" office:value="-0.278982092365693" calcext:value-type="percentage">
            <text:p>-27.90%</text:p>
          </table:table-cell>
          <table:table-cell/>
          <table:table-cell office:value-type="float" office:value="643619" calcext:value-type="float">
            <text:p>643619</text:p>
          </table:table-cell>
          <table:table-cell office:value-type="float" office:value="149693" calcext:value-type="float">
            <text:p>149693</text:p>
          </table:table-cell>
          <table:table-cell office:value-type="float" office:value="3282" calcext:value-type="float">
            <text:p>3282</text:p>
          </table:table-cell>
          <table:table-cell office:value-type="float" office:value="1255" calcext:value-type="float">
            <text:p>1255</text:p>
          </table:table-cell>
          <table:table-cell office:value-type="float" office:value="676" calcext:value-type="float">
            <text:p>67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20" table:formula="of:=[.A28]*[.$B$18]" office:value-type="float" office:value="47483.66" calcext:value-type="float">
            <text:p>47484</text:p>
          </table:table-cell>
          <table:table-cell table:style-name="ce21" table:formula="of:=([.B39]-[.B$47])/[.B$47]" office:value-type="percentage" office:value="-0.0089778682661606" calcext:value-type="percentage">
            <text:p>-0.90%</text:p>
          </table:table-cell>
          <table:table-cell table:style-name="ce20" table:formula="of:=[.B28]*[.$B$18]" office:value-type="float" office:value="10986.92" calcext:value-type="float">
            <text:p>10987</text:p>
          </table:table-cell>
          <table:table-cell table:style-name="ce21" table:formula="of:=([.D39]-[.D$47])/[.D$47]" office:value-type="percentage" office:value="-0.0169310631645403" calcext:value-type="percentage">
            <text:p>-1.69%</text:p>
          </table:table-cell>
          <table:table-cell table:style-name="ce20" table:formula="of:=[.C28]*[.$B$18]" office:value-type="float" office:value="80.78" calcext:value-type="float">
            <text:p>81</text:p>
          </table:table-cell>
          <table:table-cell table:style-name="ce21" table:formula="of:=([.F39]-[.F$47])/[.F$47]" office:value-type="percentage" office:value="0.0449112640347699" calcext:value-type="percentage">
            <text:p>4.49%</text:p>
          </table:table-cell>
          <table:table-cell table:style-name="ce20" table:formula="of:=[.D28]*[.$B$18]" office:value-type="float" office:value="23.31" calcext:value-type="float">
            <text:p>23</text:p>
          </table:table-cell>
          <table:table-cell table:style-name="ce21" table:formula="of:=([.H39]-[.H$47])/[.H$47]" office:value-type="percentage" office:value="-0.0431034482758621" calcext:value-type="percentage">
            <text:p>-4.31%</text:p>
          </table:table-cell>
          <table:table-cell table:style-name="ce20" table:formula="of:=[.E28]*[.$B$18]" office:value-type="float" office:value="14.35" calcext:value-type="float">
            <text:p>14</text:p>
          </table:table-cell>
          <table:table-cell table:style-name="ce21" table:formula="of:=([.J39]-[.J$47])/[.J$47]" office:value-type="percentage" office:value="-0.0339302544769087" calcext:value-type="percentage">
            <text:p>-3.39%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2"/>
          <table:table-cell office:value-type="float" office:value="673493" calcext:value-type="float">
            <text:p>673493</text:p>
          </table:table-cell>
          <table:table-cell office:value-type="float" office:value="161044" calcext:value-type="float">
            <text:p>161044</text:p>
          </table:table-cell>
          <table:table-cell office:value-type="float" office:value="1924" calcext:value-type="float">
            <text:p>1924</text:p>
          </table:table-cell>
          <table:table-cell office:value-type="float" office:value="493" calcext:value-type="float">
            <text:p>49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B3</text:p>
          </table:table-cell>
          <table:table-cell table:number-columns-repeated="1005"/>
        </table:table-row>
        <table:table-row table:style-name="ro2">
          <table:table-cell table:number-columns-repeated="12"/>
          <table:table-cell office:value-type="float" office:value="642017" calcext:value-type="float">
            <text:p>642017</text:p>
          </table:table-cell>
          <table:table-cell office:value-type="float" office:value="154590" calcext:value-type="float">
            <text:p>154590</text:p>
          </table:table-cell>
          <table:table-cell office:value-type="float" office:value="1966" calcext:value-type="float">
            <text:p>1966</text:p>
          </table:table-cell>
          <table:table-cell office:value-type="float" office:value="536" calcext:value-type="float">
            <text:p>536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55" office:value-type="date" office:date-value="2025-05-16" calcext:value-type="date">
            <text:p>2025-05-16</text:p>
          </table:table-cell>
          <table:table-cell table:number-columns-repeated="1005"/>
        </table:table-row>
        <table:table-row table:style-name="ro2">
          <table:table-cell table:style-name="ce28" office:value-type="string" calcext:value-type="string">
            <text:p>N<text:span text:style-name="T7">TOTAL</text:span></text:p>
          </table:table-cell>
          <table:table-cell table:style-name="ce20" table:formula="of:=SUM([.B35:.B39])" office:value-type="float" office:value="239569.12" calcext:value-type="float">
            <text:p>239569</text:p>
          </table:table-cell>
          <table:table-cell table:style-name="ce20"/>
          <table:table-cell table:style-name="ce20" table:formula="of:=SUM([.D35:.D39])" office:value-type="float" office:value="55880.72" calcext:value-type="float">
            <text:p>55881</text:p>
          </table:table-cell>
          <table:table-cell table:style-name="ce20"/>
          <table:table-cell table:style-name="ce20" table:formula="of:=SUM([.F35:.F39])" office:value-type="float" office:value="386.54" calcext:value-type="float">
            <text:p>387</text:p>
          </table:table-cell>
          <table:table-cell table:style-name="ce20"/>
          <table:table-cell table:style-name="ce20" table:formula="of:=SUM([.H35:.H39])" office:value-type="float" office:value="121.8" calcext:value-type="float">
            <text:p>122</text:p>
          </table:table-cell>
          <table:table-cell table:style-name="ce20"/>
          <table:table-cell table:style-name="ce20" table:formula="of:=SUM([.J35:.J39])" office:value-type="float" office:value="74.27" calcext:value-type="float">
            <text:p>74</text:p>
          </table:table-cell>
          <table:table-cell table:number-columns-repeated="2"/>
          <table:table-cell office:value-type="float" office:value="637845" calcext:value-type="float">
            <text:p>637845</text:p>
          </table:table-cell>
          <table:table-cell office:value-type="float" office:value="152534" calcext:value-type="float">
            <text:p>152534</text:p>
          </table:table-cell>
          <table:table-cell office:value-type="float" office:value="1649" calcext:value-type="float">
            <text:p>1649</text:p>
          </table:table-cell>
          <table:table-cell office:value-type="float" office:value="526" calcext:value-type="float">
            <text:p>526</text:p>
          </table:table-cell>
          <table:table-cell office:value-type="float" office:value="282" calcext:value-type="float">
            <text:p>282</text:p>
          </table:table-cell>
          <table:table-cell table:number-columns-repeated="1007"/>
        </table:table-row>
        <table:table-row table:style-name="ro2">
          <table:table-cell table:style-name="ce121" office:value-type="string" calcext:value-type="string">
            <text:p>X /ml</text:p>
          </table:table-cell>
          <table:table-cell table:style-name="ce20" table:formula="of:=[.B44]/[.$B$19]" office:value-type="float" office:value="6844.832" calcext:value-type="float">
            <text:p>6845</text:p>
          </table:table-cell>
          <table:table-cell table:style-name="ce20"/>
          <table:table-cell table:style-name="ce20" table:formula="of:=[.D44]/[.$B$19]" office:value-type="float" office:value="1596.592" calcext:value-type="float">
            <text:p>1597</text:p>
          </table:table-cell>
          <table:table-cell table:style-name="ce20"/>
          <table:table-cell table:style-name="ce20" table:formula="of:=[.F44]/[.$B$19]" office:value-type="float" office:value="11.044" calcext:value-type="float">
            <text:p>11</text:p>
          </table:table-cell>
          <table:table-cell table:style-name="ce20"/>
          <table:table-cell table:style-name="ce20" table:formula="of:=[.H44]/[.$B$19]" office:value-type="float" office:value="3.48" calcext:value-type="float">
            <text:p>3</text:p>
          </table:table-cell>
          <table:table-cell table:style-name="ce20"/>
          <table:table-cell table:style-name="ce20" table:formula="of:=[.J44]/[.$B$19]" office:value-type="float" office:value="2.122" calcext:value-type="float">
            <text:p>2</text:p>
          </table:table-cell>
          <table:table-cell table:number-columns-repeated="2"/>
          <table:table-cell office:value-type="float" office:value="599463" calcext:value-type="float">
            <text:p>599463</text:p>
          </table:table-cell>
          <table:table-cell office:value-type="float" office:value="151238" calcext:value-type="float">
            <text:p>151238</text:p>
          </table:table-cell>
          <table:table-cell office:value-type="float" office:value="1640" calcext:value-type="float">
            <text:p>1640</text:p>
          </table:table-cell>
          <table:table-cell office:value-type="float" office:value="396" calcext:value-type="float">
            <text:p>396</text:p>
          </table:table-cell>
          <table:table-cell office:value-type="float" office:value="229" calcext:value-type="float">
            <text:p>229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float" office:value="596532" calcext:value-type="float">
            <text:p>596532</text:p>
          </table:table-cell>
          <table:table-cell office:value-type="float" office:value="149016" calcext:value-type="float">
            <text:p>149016</text:p>
          </table:table-cell>
          <table:table-cell office:value-type="float" office:value="1305" calcext:value-type="float">
            <text:p>1305</text:p>
          </table:table-cell>
          <table:table-cell office:value-type="float" office:value="254" calcext:value-type="float">
            <text:p>254</text:p>
          </table:table-cell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X Mean</text:p>
          </table:table-cell>
          <table:table-cell table:style-name="ce20" table:formula="of:=AVERAGE([.B35:.B39])" office:value-type="float" office:value="47913.824" calcext:value-type="float">
            <text:p>47914</text:p>
          </table:table-cell>
          <table:table-cell/>
          <table:table-cell table:style-name="ce20" table:formula="of:=AVERAGE([.D35:.D39])" office:value-type="float" office:value="11176.144" calcext:value-type="float">
            <text:p>11176</text:p>
          </table:table-cell>
          <table:table-cell/>
          <table:table-cell table:style-name="ce20" table:formula="of:=AVERAGE([.F35:.F39])" office:value-type="float" office:value="77.308" calcext:value-type="float">
            <text:p>77</text:p>
          </table:table-cell>
          <table:table-cell/>
          <table:table-cell table:style-name="ce20" table:formula="of:=AVERAGE([.H35:.H39])" office:value-type="float" office:value="24.36" calcext:value-type="float">
            <text:p>24</text:p>
          </table:table-cell>
          <table:table-cell/>
          <table:table-cell table:style-name="ce20" table:formula="of:=AVERAGE([.J35:.J39])" office:value-type="float" office:value="14.854" calcext:value-type="float">
            <text:p>15</text:p>
          </table:table-cell>
          <table:table-cell table:number-columns-repeated="2"/>
          <table:table-cell office:value-type="float" office:value="638345" calcext:value-type="float">
            <text:p>638345</text:p>
          </table:table-cell>
          <table:table-cell office:value-type="float" office:value="153507" calcext:value-type="float">
            <text:p>153507</text:p>
          </table:table-cell>
          <table:table-cell office:value-type="float" office:value="1583" calcext:value-type="float">
            <text:p>1583</text:p>
          </table:table-cell>
          <table:table-cell office:value-type="float" office:value="386" calcext:value-type="float">
            <text:p>386</text:p>
          </table:table-cell>
          <table:table-cell office:value-type="float" office:value="180" calcext:value-type="float">
            <text:p>18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d Dev</text:p>
          </table:table-cell>
          <table:table-cell table:style-name="ce20" table:formula="of:=STDEVP([.B35:.B39])" office:value-type="float" office:value="238.131569398097" calcext:value-type="float">
            <text:p>238</text:p>
          </table:table-cell>
          <table:table-cell/>
          <table:table-cell table:style-name="ce20" table:formula="of:=STDEVP([.D35:.D39])" office:value-type="float" office:value="101.295436343401" calcext:value-type="float">
            <text:p>101</text:p>
          </table:table-cell>
          <table:table-cell/>
          <table:table-cell table:style-name="ce20" table:formula="of:=STDEVP([.F35:.F39])" office:value-type="float" office:value="11.4189376038229" calcext:value-type="float">
            <text:p>11</text:p>
          </table:table-cell>
          <table:table-cell/>
          <table:table-cell table:style-name="ce20" table:formula="of:=STDEVP([.H35:.H39])" office:value-type="float" office:value="6.55851812530849" calcext:value-type="float">
            <text:p>7</text:p>
          </table:table-cell>
          <table:table-cell/>
          <table:table-cell table:style-name="ce20" table:formula="of:=STDEVP([.J35:.J39])" office:value-type="float" office:value="3.43368373616441" calcext:value-type="float">
            <text:p>3</text:p>
          </table:table-cell>
          <table:table-cell table:number-columns-repeated="2"/>
          <table:table-cell office:value-type="float" office:value="599337" calcext:value-type="float">
            <text:p>599337</text:p>
          </table:table-cell>
          <table:table-cell office:value-type="float" office:value="151325" calcext:value-type="float">
            <text:p>151325</text:p>
          </table:table-cell>
          <table:table-cell office:value-type="float" office:value="1477" calcext:value-type="float">
            <text:p>1477</text:p>
          </table:table-cell>
          <table:table-cell office:value-type="float" office:value="356" calcext:value-type="float">
            <text:p>356</text:p>
          </table:table-cell>
          <table:table-cell office:value-type="float" office:value="216" calcext:value-type="float">
            <text:p>2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X</text:p>
          </table:table-cell>
          <table:table-cell table:style-name="ce20" table:formula="of:=[.B45]*[.$B$20]" office:value-type="float" office:value="47913.824" calcext:value-type="float">
            <text:p>47914</text:p>
          </table:table-cell>
          <table:table-cell table:style-name="ce20"/>
          <table:table-cell table:style-name="ce20" table:formula="of:=[.D45]*[.$B$20]" office:value-type="float" office:value="11176.144" calcext:value-type="float">
            <text:p>11176</text:p>
          </table:table-cell>
          <table:table-cell table:style-name="ce20"/>
          <table:table-cell table:style-name="ce20" table:formula="of:=[.F45]*[.$B$20]" office:value-type="float" office:value="77.308" calcext:value-type="float">
            <text:p>77</text:p>
          </table:table-cell>
          <table:table-cell table:style-name="ce20"/>
          <table:table-cell table:style-name="ce20" table:formula="of:=[.H45]*[.$B$20]" office:value-type="float" office:value="24.36" calcext:value-type="float">
            <text:p>24</text:p>
          </table:table-cell>
          <table:table-cell table:style-name="ce20"/>
          <table:table-cell table:style-name="ce20" table:formula="of:=[.J45]*[.$B$20]" office:value-type="float" office:value="14.854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N<text:span text:style-name="T7">TOTAL</text:span></text:p>
          </table:table-cell>
          <table:table-cell table:formula="of:=[.$B$14]*[.B49]" office:value-type="float" office:value="239569.12" calcext:value-type="float">
            <text:p>239569.12</text:p>
          </table:table-cell>
          <table:table-cell/>
          <table:table-cell table:formula="of:=[.$B$14]*[.D49]" office:value-type="float" office:value="55880.72" calcext:value-type="float">
            <text:p>55880.72</text:p>
          </table:table-cell>
          <table:table-cell/>
          <table:table-cell table:formula="of:=[.$B$14]*[.F49]" office:value-type="float" office:value="386.54" calcext:value-type="float">
            <text:p>386.54</text:p>
          </table:table-cell>
          <table:table-cell/>
          <table:table-cell table:formula="of:=[.$B$14]*[.H49]" office:value-type="float" office:value="121.8" calcext:value-type="float">
            <text:p>121.8</text:p>
          </table:table-cell>
          <table:table-cell/>
          <table:table-cell table:formula="of:=[.$B$14]*[.J49]" office:value-type="float" office:value="74.27" calcext:value-type="float">
            <text:p>74.27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21" table:formula="of:=[.B48]/[.B47]" office:value-type="percentage" office:value="0.00496999716403552" calcext:value-type="percentage">
            <text:p>0.50%</text:p>
          </table:table-cell>
          <table:table-cell/>
          <table:table-cell table:style-name="ce21" table:formula="of:=[.D48]/[.D47]" office:value-type="percentage" office:value="0.00906354072955758" calcext:value-type="percentage">
            <text:p>0.91%</text:p>
          </table:table-cell>
          <table:table-cell/>
          <table:table-cell table:style-name="ce21" table:formula="of:=[.F48]/[.F47]" office:value-type="percentage" office:value="0.147707062707907" calcext:value-type="percentage">
            <text:p>14.77%</text:p>
          </table:table-cell>
          <table:table-cell/>
          <table:table-cell table:style-name="ce21" table:formula="of:=[.H48]/[.H47]" office:value-type="percentage" office:value="0.269233092171941" calcext:value-type="percentage">
            <text:p>26.92%</text:p>
          </table:table-cell>
          <table:table-cell/>
          <table:table-cell table:style-name="ce21" table:formula="of:=[.J48]/[.J47]" office:value-type="percentage" office:value="0.231162228097779" calcext:value-type="percentage">
            <text:p>23.12%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D<text:span text:style-name="T7">Q</text:span></text:p>
          </table:table-cell>
          <table:table-cell table:style-name="ce181" table:formula="of:=(MAX([.B35:.B39])-MIN([.B35:.B39]))/[.B47]" office:value-type="percentage" office:value="0.014407950406964" calcext:value-type="percentage">
            <text:p>1.44%</text:p>
          </table:table-cell>
          <table:table-cell/>
          <table:table-cell table:style-name="ce181" table:formula="of:=(MAX([.D35:.D39])-MIN([.D35:.D39]))/[.D47]" office:value-type="percentage" office:value="0.025322687324" calcext:value-type="percentage">
            <text:p>2.53%</text:p>
          </table:table-cell>
          <table:table-cell/>
          <table:table-cell table:style-name="ce123" table:formula="of:=(MAX([.F35:.F39])-MIN([.F35:.F39]))/[.F47]" office:value-type="percentage" office:value="0.438247011952191" calcext:value-type="percentage">
            <text:p>43.82%</text:p>
          </table:table-cell>
          <table:table-cell/>
          <table:table-cell table:style-name="ce123" table:formula="of:=(MAX([.H35:.H39])-MIN([.H35:.H39]))/[.H47]" office:value-type="percentage" office:value="0.781609195402299" calcext:value-type="percentage">
            <text:p>78.16%</text:p>
          </table:table-cell>
          <table:table-cell/>
          <table:table-cell table:style-name="ce123" table:formula="of:=(MAX([.J35:.J39])-MIN([.J35:.J39]))/[.J47]" office:value-type="percentage" office:value="0.673892554194156" calcext:value-type="percentage">
            <text:p>67.39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7">QMAX</text:span></text:p>
          </table:table-cell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3" calcext:value-type="percentage">
            <text:p>11.30%</text:p>
          </table:table-cell>
          <table:table-cell table:number-columns-repeated="6"/>
          <table:table-cell table:style-name="ce31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8"/>
          <table:table-cell table:number-columns-repeated="2"/>
          <table:table-cell table:style-name="ce16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16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calcext:conditional-formats>
          <calcext:conditional-format calcext:target-range-address="'Annex E Verify Counting Accuracy'.A29:'Annex E Verify Counting Accuracy'.A29">
            <calcext:condition calcext:apply-style-name="Good" calcext:value="between([.$J$23],[.$K$23])" calcext:base-cell-address="'Annex E Verify Counting Accuracy'.A29"/>
          </calcext:conditional-format>
          <calcext:conditional-format calcext:target-range-address="'Annex E Verify Counting Accuracy'.B29:'Annex E Verify Counting Accuracy'.B29">
            <calcext:condition calcext:apply-style-name="Good" calcext:value="between([.$J$25],[.$K$25])" calcext:base-cell-address="'Annex E Verify Counting Accuracy'.B29"/>
          </calcext:conditional-format>
          <calcext:conditional-format calcext:target-range-address="'Annex E Verify Counting Accuracy'.B55:'Annex E Verify Counting Accuracy'.B55 'Annex E Verify Counting Accuracy'.D55:'Annex E Verify Counting Accuracy'.D55">
            <calcext:condition calcext:apply-style-name="Good" calcext:value="&lt;[.B56]" calcext:base-cell-address="'Annex E Verify Counting Accuracy'.B55"/>
          </calcext:conditional-format>
        </calcext:conditional-formats>
      </table:table>
      <table:table table:name="Interpolated Thresholds" table:style-name="ta1">
        <table:table-column table:style-name="co4" table:number-columns-repeated="10" table:default-cell-style-name="Default"/>
        <table:table-column table:style-name="co18" table:default-cell-style-name="Default"/>
        <table:table-column table:style-name="co4" table:number-columns-repeated="29" table:default-cell-style-name="Default"/>
        <table:table-row table:style-name="ro12">
          <table:table-cell/>
          <table:table-cell table:style-name="ce346" table:number-columns-repeated="4"/>
          <table:table-cell table:style-name="ce346" office:value-type="string" calcext:value-type="string" table:number-columns-spanned="5" table:number-rows-spanned="1">
            <text:p>Enter all of the threshold  settings determined in 6.3 in column A <text:span text:style-name="T14">in order of decreasing value of threshold  setting</text:span><text:span text:style-name="T15">. For each calibration suspension sample, enter the  values of X̅</text:span><text:span text:style-name="T16">N</text:span><text:span text:style-name="T17"> obtained for each threshold setting actually used for a sample in the a</text:span></text:p>
          </table:table-cell>
          <table:covered-table-cell table:style-name="ce346" office:value-type="string" calcext:value-type="string">
            <text:p>Enter the <text:s/>particle size and concentration data from the Particle Size Calibration Summary portion of Table 4 <text:s/>in columns F and G. <text:s/>Enter in Table 4 the corresponding <text:s/>interpolated threshold voltage setting displayed in column <text:s/>H of this worksheet.</text:p>
          </table:covered-table-cell>
          <table:covered-table-cell table:number-columns-repeated="2" table:style-name="ce346"/>
          <table:covered-table-cell/>
          <table:table-cell table:number-columns-repeated="30"/>
        </table:table-row>
        <table:table-row table:style-name="ro12">
          <table:table-cell/>
          <table:table-cell table:style-name="ce210" office:value-type="string" calcext:value-type="string">
            <text:p>X̅<text:span text:style-name="T12">N</text:span><text:span text:style-name="T13"> for First Sample</text:span></text:p>
          </table:table-cell>
          <table:table-cell table:style-name="ce210" office:value-type="string" calcext:value-type="string">
            <text:p>X̅<text:span text:style-name="T12">N</text:span><text:span text:style-name="T13"> for Second Sample</text:span></text:p>
          </table:table-cell>
          <table:table-cell table:style-name="ce210" office:value-type="string" calcext:value-type="string">
            <text:p>X̅<text:span text:style-name="T12">N</text:span><text:span text:style-name="T13"> for Third Sample</text:span></text:p>
          </table:table-cell>
          <table:table-cell table:style-name="ce210" office:value-type="string" calcext:value-type="string">
            <text:p>Mean X̅<text:span text:style-name="T12">N</text:span><text:span text:style-name="T13"> </text:span></text:p>
          </table:table-cell>
          <table:table-cell table:style-name="ce208" office:value-type="string" calcext:value-type="string">
            <text:p>Threshold Voltage Setting</text:p>
          </table:table-cell>
          <table:table-cell table:style-name="ce213" office:value-type="string" calcext:value-type="string">
            <text:p><text:s/>Particle Size</text:p>
          </table:table-cell>
          <table:table-cell table:style-name="ce208" office:value-type="string" calcext:value-type="string">
            <text:p>Particle Concentration</text:p>
          </table:table-cell>
          <table:table-cell table:style-name="ce208" office:value-type="string" calcext:value-type="string">
            <text:p>Interpolated Threshold Voltage Setting</text:p>
          </table:table-cell>
          <table:table-cell table:number-columns-repeated="31"/>
        </table:table-row>
        <table:table-row table:style-name="ro13">
          <table:table-cell/>
          <table:table-cell table:number-columns-repeated="4"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 table:number-columns-repeated="2"/>
          <table:table-cell table:style-name="ce353" office:value-type="string" calcext:value-type="string">
            <text:p>34D</text:p>
          </table:table-cell>
          <table:table-cell table:style-name="ce353" office:value-type="string" calcext:value-type="string">
            <text:p>50% 34D</text:p>
          </table:table-cell>
          <table:table-cell table:number-columns-repeated="2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342" office:value-type="float" office:value="7.80403843413395" calcext:value-type="float">
            <text:p>7.8</text:p>
          </table:table-cell>
          <table:table-cell table:style-name="ce344" table:formula="of:=AVERAGE([.B4:.D4])" office:value-type="float" office:value="7.80403843413395" calcext:value-type="float">
            <text:p>7.8</text:p>
          </table:table-cell>
          <table:table-cell table:style-name="ce20" office:value-type="float" office:value="13479" calcext:value-type="float">
            <text:p>13479</text:p>
          </table:table-cell>
          <table:table-cell table:style-name="ce215" office:value-type="float" office:value="4" calcext:value-type="float">
            <text:p>4</text:p>
          </table:table-cell>
          <table:table-cell office:value-type="float" office:value="5375.15" calcext:value-type="float">
            <text:p>5375.15</text:p>
          </table:table-cell>
          <table:table-cell table:style-name="ce75" table:formula="of:=ASTROS.MONTEZUMA.CALCTOOLS.CALCFUNCTIONS.PYTHON.INTERPOLATIONIMPL.INTERPO([.$H4];[.$E$4:.$E$31];[.$F$4:.$F$31])" office:value-type="float" office:value="188.318589331367" calcext:value-type="float">
            <text:p>188</text:p>
          </table:table-cell>
          <table:table-cell/>
          <table:table-cell table:style-name="ce237"/>
          <table:table-cell office:value-type="float" office:value="10750.3" calcext:value-type="float">
            <text:p>10750.3</text:p>
          </table:table-cell>
          <table:table-cell table:formula="of:=[.L4]/2" office:value-type="float" office:value="5375.15" calcext:value-type="float">
            <text:p>5375.15</text:p>
          </table:table-cell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table:style-name="ce342" office:value-type="float" office:value="12.5638177690252" calcext:value-type="float">
            <text:p>12.6</text:p>
          </table:table-cell>
          <table:table-cell table:style-name="ce344" table:formula="of:=AVERAGE([.B5:.D5])" office:value-type="float" office:value="12.5638177690252" calcext:value-type="float">
            <text:p>12.6</text:p>
          </table:table-cell>
          <table:table-cell table:style-name="ce20" office:value-type="float" office:value="11372.5256356535" calcext:value-type="float">
            <text:p>11373</text:p>
          </table:table-cell>
          <table:table-cell table:style-name="ce215" office:value-type="float" office:value="5" calcext:value-type="float">
            <text:p>5</text:p>
          </table:table-cell>
          <table:table-cell office:value-type="float" office:value="3560.55" calcext:value-type="float">
            <text:p>3560.55</text:p>
          </table:table-cell>
          <table:table-cell table:style-name="ce20" table:formula="of:=ASTROS.MONTEZUMA.CALCTOOLS.CALCFUNCTIONS.PYTHON.INTERPOLATIONIMPL.INTERPO([.$H5];[.$E$4:.$E$31];[.$F$4:.$F$31])" office:value-type="float" office:value="312.033559483167" calcext:value-type="float">
            <text:p>312</text:p>
          </table:table-cell>
          <table:table-cell/>
          <table:table-cell table:style-name="ce237"/>
          <table:table-cell office:value-type="float" office:value="7121.1" calcext:value-type="float">
            <text:p>7121.1</text:p>
          </table:table-cell>
          <table:table-cell table:formula="of:=[.L5]/2" office:value-type="float" office:value="3560.55" calcext:value-type="float">
            <text:p>3560.55</text:p>
          </table:table-cell>
          <table:table-cell table:number-columns-repeated="2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table:style-name="ce342" office:value-type="float" office:value="18.3099813434189" calcext:value-type="float">
            <text:p>18.3</text:p>
          </table:table-cell>
          <table:table-cell table:style-name="ce344" table:formula="of:=AVERAGE([.B6:.D6])" office:value-type="float" office:value="18.3099813434189" calcext:value-type="float">
            <text:p>18.3</text:p>
          </table:table-cell>
          <table:table-cell table:style-name="ce20" office:value-type="float" office:value="9595.24737247533" calcext:value-type="float">
            <text:p>9595</text:p>
          </table:table-cell>
          <table:table-cell table:style-name="ce215" office:value-type="float" office:value="6" calcext:value-type="float">
            <text:p>6</text:p>
          </table:table-cell>
          <table:table-cell office:value-type="float" office:value="2364.55" calcext:value-type="float">
            <text:p>2364.55</text:p>
          </table:table-cell>
          <table:table-cell table:style-name="ce75" table:formula="of:=ASTROS.MONTEZUMA.CALCTOOLS.CALCFUNCTIONS.PYTHON.INTERPOLATIONIMPL.INTERPO([.$H6];[.$E$4:.$E$31];[.$F$4:.$F$31])" office:value-type="float" office:value="482.816244384236" calcext:value-type="float">
            <text:p>483</text:p>
          </table:table-cell>
          <table:table-cell/>
          <table:table-cell table:style-name="ce237"/>
          <table:table-cell office:value-type="float" office:value="4729.1" calcext:value-type="float">
            <text:p>4729.1</text:p>
          </table:table-cell>
          <table:table-cell table:formula="of:=[.L6]/2" office:value-type="float" office:value="2364.55" calcext:value-type="float">
            <text:p>2364.55</text:p>
          </table:table-cell>
          <table:table-cell table:number-columns-repeated="2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table:style-name="ce342" office:value-type="float" office:value="27.1258507465258" calcext:value-type="float">
            <text:p>27.1</text:p>
          </table:table-cell>
          <table:table-cell table:style-name="ce344" table:formula="of:=AVERAGE([.B7:.D7])" office:value-type="float" office:value="27.1258507465258" calcext:value-type="float">
            <text:p>27.1</text:p>
          </table:table-cell>
          <table:table-cell table:style-name="ce20" office:value-type="float" office:value="8095.71902395668" calcext:value-type="float">
            <text:p>8096</text:p>
          </table:table-cell>
          <table:table-cell table:style-name="ce215" office:value-type="float" office:value="7" calcext:value-type="float">
            <text:p>7</text:p>
          </table:table-cell>
          <table:table-cell office:value-type="float" office:value="1599.65" calcext:value-type="float">
            <text:p>1599.65</text:p>
          </table:table-cell>
          <table:table-cell table:style-name="ce20" table:formula="of:=ASTROS.MONTEZUMA.CALCTOOLS.CALCFUNCTIONS.PYTHON.INTERPOLATIONIMPL.INTERPO([.$H7];[.$E$4:.$E$31];[.$F$4:.$F$31])" office:value-type="float" office:value="680.183606438531" calcext:value-type="float">
            <text:p>680</text:p>
          </table:table-cell>
          <table:table-cell/>
          <table:table-cell table:style-name="ce237"/>
          <table:table-cell office:value-type="float" office:value="3199.3" calcext:value-type="float">
            <text:p>3199.3</text:p>
          </table:table-cell>
          <table:table-cell table:formula="of:=[.L7]/2" office:value-type="float" office:value="1599.65" calcext:value-type="float">
            <text:p>1599.65</text:p>
          </table:table-cell>
          <table:table-cell table:number-columns-repeated="2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table:style-name="ce342" office:value-type="float" office:value="37.7616485108805" calcext:value-type="float">
            <text:p>37.8</text:p>
          </table:table-cell>
          <table:table-cell table:style-name="ce344" table:formula="of:=AVERAGE([.B8:.D8])" office:value-type="float" office:value="37.7616485108805" calcext:value-type="float">
            <text:p>37.8</text:p>
          </table:table-cell>
          <table:table-cell table:style-name="ce20" office:value-type="float" office:value="6830.53432294641" calcext:value-type="float">
            <text:p>6831</text:p>
          </table:table-cell>
          <table:table-cell table:style-name="ce215" office:value-type="float" office:value="8" calcext:value-type="float">
            <text:p>8</text:p>
          </table:table-cell>
          <table:table-cell office:value-type="float" office:value="1140.3" calcext:value-type="float">
            <text:p>1140.3</text:p>
          </table:table-cell>
          <table:table-cell table:style-name="ce20" table:formula="of:=ASTROS.MONTEZUMA.CALCTOOLS.CALCFUNCTIONS.PYTHON.INTERPOLATIONIMPL.INTERPO([.$H8];[.$E$4:.$E$31];[.$F$4:.$F$31])" office:value-type="float" office:value="873.315603871514" calcext:value-type="float">
            <text:p>873</text:p>
          </table:table-cell>
          <table:table-cell/>
          <table:table-cell table:style-name="ce237"/>
          <table:table-cell office:value-type="float" office:value="2280.6" calcext:value-type="float">
            <text:p>2280.6</text:p>
          </table:table-cell>
          <table:table-cell table:formula="of:=[.L8]/2" office:value-type="float" office:value="1140.3" calcext:value-type="float">
            <text:p>1140.3</text:p>
          </table:table-cell>
          <table:table-cell table:number-columns-repeated="2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table:style-name="ce342" office:value-type="float" office:value="51.98665095108" calcext:value-type="float">
            <text:p>52.0</text:p>
          </table:table-cell>
          <table:table-cell table:style-name="ce344" table:formula="of:=AVERAGE([.B9:.D9])" office:value-type="float" office:value="51.98665095108" calcext:value-type="float">
            <text:p>52.0</text:p>
          </table:table-cell>
          <table:table-cell table:style-name="ce20" office:value-type="float" office:value="5763.07045722374" calcext:value-type="float">
            <text:p>5763</text:p>
          </table:table-cell>
          <table:table-cell table:style-name="ce215" office:value-type="float" office:value="9" calcext:value-type="float">
            <text:p>9</text:p>
          </table:table-cell>
          <table:table-cell office:value-type="float" office:value="807.5" calcext:value-type="float">
            <text:p>807.5</text:p>
          </table:table-cell>
          <table:table-cell table:style-name="ce20" table:formula="of:=ASTROS.MONTEZUMA.CALCTOOLS.CALCFUNCTIONS.PYTHON.INTERPOLATIONIMPL.INTERPO([.$H9];[.$E$4:.$E$31];[.$F$4:.$F$31])" office:value-type="float" office:value="1102.82007981173" calcext:value-type="float">
            <text:p>1103</text:p>
          </table:table-cell>
          <table:table-cell/>
          <table:table-cell table:style-name="ce237"/>
          <table:table-cell office:value-type="float" office:value="1615" calcext:value-type="float">
            <text:p>1615</text:p>
          </table:table-cell>
          <table:table-cell table:formula="of:=[.L9]/2" office:value-type="float" office:value="807.5" calcext:value-type="float">
            <text:p>807.5</text:p>
          </table:table-cell>
          <table:table-cell table:number-columns-repeated="2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table:style-name="ce342" office:value-type="float" office:value="71.5706310529116" calcext:value-type="float">
            <text:p>71.6</text:p>
          </table:table-cell>
          <table:table-cell table:style-name="ce344" table:formula="of:=AVERAGE([.B10:.D10])" office:value-type="float" office:value="71.5706310529116" calcext:value-type="float">
            <text:p>71.6</text:p>
          </table:table-cell>
          <table:table-cell table:style-name="ce20" office:value-type="float" office:value="4862.427963117" calcext:value-type="float">
            <text:p>4862</text:p>
          </table:table-cell>
          <table:table-cell table:style-name="ce215" office:value-type="float" office:value="10" calcext:value-type="float">
            <text:p>10</text:p>
          </table:table-cell>
          <table:table-cell office:value-type="float" office:value="565.25" calcext:value-type="float">
            <text:p>565.25</text:p>
          </table:table-cell>
          <table:table-cell table:style-name="ce75" table:formula="of:=ASTROS.MONTEZUMA.CALCTOOLS.CALCFUNCTIONS.PYTHON.INTERPOLATIONIMPL.INTERPO([.$H10];[.$E$4:.$E$31];[.$F$4:.$F$31])" office:value-type="float" office:value="1393.24835073955" calcext:value-type="float">
            <text:p>1393</text:p>
          </table:table-cell>
          <table:table-cell/>
          <table:table-cell table:style-name="ce237"/>
          <table:table-cell office:value-type="float" office:value="1130.5" calcext:value-type="float">
            <text:p>1130.5</text:p>
          </table:table-cell>
          <table:table-cell table:formula="of:=[.L10]/2" office:value-type="float" office:value="565.25" calcext:value-type="float">
            <text:p>565.25</text:p>
          </table:table-cell>
          <table:table-cell table:number-columns-repeated="2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table:style-name="ce342" office:value-type="float" office:value="96.6428726653146" calcext:value-type="float">
            <text:p>96.6</text:p>
          </table:table-cell>
          <table:table-cell table:style-name="ce344" table:formula="of:=AVERAGE([.B11:.D11])" office:value-type="float" office:value="96.6428726653146" calcext:value-type="float">
            <text:p>96.6</text:p>
          </table:table-cell>
          <table:table-cell table:style-name="ce20" office:value-type="float" office:value="4102.5362906793" calcext:value-type="float">
            <text:p>4103</text:p>
          </table:table-cell>
          <table:table-cell table:style-name="ce215" office:value-type="float" office:value="11" calcext:value-type="float">
            <text:p>11</text:p>
          </table:table-cell>
          <table:table-cell office:value-type="float" office:value="408.1" calcext:value-type="float">
            <text:p>408.1</text:p>
          </table:table-cell>
          <table:table-cell table:style-name="ce20" table:formula="of:=ASTROS.MONTEZUMA.CALCTOOLS.CALCFUNCTIONS.PYTHON.INTERPOLATIONIMPL.INTERPO([.$H11];[.$E$4:.$E$31];[.$F$4:.$F$31])" office:value-type="float" office:value="1709.02195206891" calcext:value-type="float">
            <text:p>1709</text:p>
          </table:table-cell>
          <table:table-cell/>
          <table:table-cell table:style-name="ce237"/>
          <table:table-cell office:value-type="float" office:value="816.2" calcext:value-type="float">
            <text:p>816.2</text:p>
          </table:table-cell>
          <table:table-cell table:formula="of:=[.L11]/2" office:value-type="float" office:value="408.1" calcext:value-type="float">
            <text:p>408.1</text:p>
          </table:table-cell>
          <table:table-cell table:number-columns-repeated="2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table:style-name="ce342" office:value-type="float" office:value="129.831360590486" calcext:value-type="float">
            <text:p>129.8</text:p>
          </table:table-cell>
          <table:table-cell table:style-name="ce344" table:formula="of:=AVERAGE([.B12:.D12])" office:value-type="float" office:value="129.831360590486" calcext:value-type="float">
            <text:p>129.8</text:p>
          </table:table-cell>
          <table:table-cell table:style-name="ce20" office:value-type="float" office:value="3461.3991495622" calcext:value-type="float">
            <text:p>3461</text:p>
          </table:table-cell>
          <table:table-cell table:style-name="ce215" office:value-type="float" office:value="12" calcext:value-type="float">
            <text:p>12</text:p>
          </table:table-cell>
          <table:table-cell office:value-type="float" office:value="309.3" calcext:value-type="float">
            <text:p>309.3</text:p>
          </table:table-cell>
          <table:table-cell table:style-name="ce20" table:formula="of:=ASTROS.MONTEZUMA.CALCTOOLS.CALCFUNCTIONS.PYTHON.INTERPOLATIONIMPL.INTERPO([.$H12];[.$E$4:.$E$31];[.$F$4:.$F$31])" office:value-type="float" office:value="2031.80702870524" calcext:value-type="float">
            <text:p>2032</text:p>
          </table:table-cell>
          <table:table-cell/>
          <table:table-cell table:style-name="ce237"/>
          <table:table-cell office:value-type="float" office:value="618.6" calcext:value-type="float">
            <text:p>618.6</text:p>
          </table:table-cell>
          <table:table-cell table:formula="of:=[.L12]/2" office:value-type="float" office:value="309.3" calcext:value-type="float">
            <text:p>309.3</text:p>
          </table:table-cell>
          <table:table-cell table:number-columns-repeated="2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table:style-name="ce342" office:value-type="float" office:value="172.167657963592" calcext:value-type="float">
            <text:p>172.2</text:p>
          </table:table-cell>
          <table:table-cell table:style-name="ce344" table:formula="of:=AVERAGE([.B13:.D13])" office:value-type="float" office:value="172.167657963592" calcext:value-type="float">
            <text:p>172.2</text:p>
          </table:table-cell>
          <table:table-cell table:style-name="ce20" office:value-type="float" office:value="2920.45779090624" calcext:value-type="float">
            <text:p>2920</text:p>
          </table:table-cell>
          <table:table-cell table:style-name="ce215" office:value-type="float" office:value="13" calcext:value-type="float">
            <text:p>13</text:p>
          </table:table-cell>
          <table:table-cell office:value-type="float" office:value="240.95" calcext:value-type="float">
            <text:p>240.95</text:p>
          </table:table-cell>
          <table:table-cell table:style-name="ce20" table:formula="of:=ASTROS.MONTEZUMA.CALCTOOLS.CALCFUNCTIONS.PYTHON.INTERPOLATIONIMPL.INTERPO([.$H13];[.$E$4:.$E$31];[.$F$4:.$F$31])" office:value-type="float" office:value="2386.03478277541" calcext:value-type="float">
            <text:p>2386</text:p>
          </table:table-cell>
          <table:table-cell/>
          <table:table-cell table:style-name="ce237"/>
          <table:table-cell office:value-type="float" office:value="481.9" calcext:value-type="float">
            <text:p>481.9</text:p>
          </table:table-cell>
          <table:table-cell table:formula="of:=[.L13]/2" office:value-type="float" office:value="240.95" calcext:value-type="float">
            <text:p>240.95</text:p>
          </table:table-cell>
          <table:table-cell table:number-columns-repeated="2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 table:style-name="ce342" office:value-type="float" office:value="226.995780758952" calcext:value-type="float">
            <text:p>227.0</text:p>
          </table:table-cell>
          <table:table-cell table:style-name="ce344" table:formula="of:=AVERAGE([.B14:.D14])" office:value-type="float" office:value="226.995780758952" calcext:value-type="float">
            <text:p>227.0</text:p>
          </table:table-cell>
          <table:table-cell table:style-name="ce20" office:value-type="float" office:value="2464.05379441539" calcext:value-type="float">
            <text:p>2464</text:p>
          </table:table-cell>
          <table:table-cell table:style-name="ce215" office:value-type="float" office:value="14" calcext:value-type="float">
            <text:p>14</text:p>
          </table:table-cell>
          <table:table-cell office:value-type="float" office:value="192.35" calcext:value-type="float">
            <text:p>192.35</text:p>
          </table:table-cell>
          <table:table-cell table:style-name="ce75" table:formula="of:=ASTROS.MONTEZUMA.CALCTOOLS.CALCFUNCTIONS.PYTHON.INTERPOLATIONIMPL.INTERPO([.$H14];[.$E$4:.$E$31];[.$F$4:.$F$31])" office:value-type="float" office:value="2752.45456383348" calcext:value-type="float">
            <text:p>2752</text:p>
          </table:table-cell>
          <table:table-cell/>
          <table:table-cell table:style-name="ce237"/>
          <table:table-cell office:value-type="float" office:value="384.7" calcext:value-type="float">
            <text:p>384.7</text:p>
          </table:table-cell>
          <table:table-cell table:formula="of:=[.L14]/2" office:value-type="float" office:value="192.35" calcext:value-type="float">
            <text:p>192.35</text:p>
          </table:table-cell>
          <table:table-cell table:number-columns-repeated="2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 table:style-name="ce342" office:value-type="float" office:value="295.869539920932" calcext:value-type="float">
            <text:p>295.9</text:p>
          </table:table-cell>
          <table:table-cell table:style-name="ce344" table:formula="of:=AVERAGE([.B15:.D15])" office:value-type="float" office:value="295.869539920932" calcext:value-type="float">
            <text:p>295.9</text:p>
          </table:table-cell>
          <table:table-cell table:style-name="ce20" office:value-type="float" office:value="2078.97581012079" calcext:value-type="float">
            <text:p>2079</text:p>
          </table:table-cell>
          <table:table-cell table:style-name="ce215" office:value-type="float" office:value="15" calcext:value-type="float">
            <text:p>15</text:p>
          </table:table-cell>
          <table:table-cell office:value-type="float" office:value="157.3" calcext:value-type="float">
            <text:p>157.3</text:p>
          </table:table-cell>
          <table:table-cell table:style-name="ce20" table:formula="of:=ASTROS.MONTEZUMA.CALCTOOLS.CALCFUNCTIONS.PYTHON.INTERPOLATIONIMPL.INTERPO([.$H15];[.$E$4:.$E$31];[.$F$4:.$F$31])" office:value-type="float" office:value="3110.42553957305" calcext:value-type="float">
            <text:p>3110</text:p>
          </table:table-cell>
          <table:table-cell/>
          <table:table-cell table:style-name="ce237"/>
          <table:table-cell office:value-type="float" office:value="314.6" calcext:value-type="float">
            <text:p>314.6</text:p>
          </table:table-cell>
          <table:table-cell table:formula="of:=[.L15]/2" office:value-type="float" office:value="157.3" calcext:value-type="float">
            <text:p>157.3</text:p>
          </table:table-cell>
          <table:table-cell table:number-columns-repeated="2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 table:style-name="ce342" office:value-type="float" office:value="388.378580034773" calcext:value-type="float">
            <text:p>388.4</text:p>
          </table:table-cell>
          <table:table-cell table:style-name="ce344" table:formula="of:=AVERAGE([.B16:.D16])" office:value-type="float" office:value="388.378580034773" calcext:value-type="float">
            <text:p>388.4</text:p>
          </table:table-cell>
          <table:table-cell table:style-name="ce20" office:value-type="float" office:value="1754.07713454278" calcext:value-type="float">
            <text:p>1754</text:p>
          </table:table-cell>
          <table:table-cell table:style-name="ce215" office:value-type="float" office:value="16" calcext:value-type="float">
            <text:p>16</text:p>
          </table:table-cell>
          <table:table-cell office:value-type="float" office:value="130.9" calcext:value-type="float">
            <text:p>130.9</text:p>
          </table:table-cell>
          <table:table-cell table:style-name="ce20" table:formula="of:=ASTROS.MONTEZUMA.CALCTOOLS.CALCFUNCTIONS.PYTHON.INTERPOLATIONIMPL.INTERPO([.$H16];[.$E$4:.$E$31];[.$F$4:.$F$31])" office:value-type="float" office:value="3447.74487911428" calcext:value-type="float">
            <text:p>3448</text:p>
          </table:table-cell>
          <table:table-cell/>
          <table:table-cell table:style-name="ce237"/>
          <table:table-cell office:value-type="float" office:value="261.8" calcext:value-type="float">
            <text:p>261.8</text:p>
          </table:table-cell>
          <table:table-cell table:formula="of:=[.L16]/2" office:value-type="float" office:value="130.9" calcext:value-type="float">
            <text:p>130.9</text:p>
          </table:table-cell>
          <table:table-cell table:number-columns-repeated="2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 table:style-name="ce342" office:value-type="float" office:value="508.367355351434" calcext:value-type="float">
            <text:p>508.4</text:p>
          </table:table-cell>
          <table:table-cell table:style-name="ce344" table:formula="of:=AVERAGE([.B17:.D17])" office:value-type="float" office:value="508.367355351434" calcext:value-type="float">
            <text:p>508.4</text:p>
          </table:table-cell>
          <table:table-cell table:style-name="ce20" office:value-type="float" office:value="1479.95305137631" calcext:value-type="float">
            <text:p>1480</text:p>
          </table:table-cell>
          <table:table-cell table:style-name="ce215" office:value-type="float" office:value="17" calcext:value-type="float">
            <text:p>17</text:p>
          </table:table-cell>
          <table:table-cell office:value-type="float" office:value="110.6" calcext:value-type="float">
            <text:p>110.6</text:p>
          </table:table-cell>
          <table:table-cell table:style-name="ce20" table:formula="of:=ASTROS.MONTEZUMA.CALCTOOLS.CALCFUNCTIONS.PYTHON.INTERPOLATIONIMPL.INTERPO([.$H17];[.$E$4:.$E$31];[.$F$4:.$F$31])" office:value-type="float" office:value="3832.91169260351" calcext:value-type="float">
            <text:p>3833</text:p>
          </table:table-cell>
          <table:table-cell/>
          <table:table-cell table:style-name="ce237"/>
          <table:table-cell office:value-type="float" office:value="221.2" calcext:value-type="float">
            <text:p>221.2</text:p>
          </table:table-cell>
          <table:table-cell table:formula="of:=[.L17]/2" office:value-type="float" office:value="110.6" calcext:value-type="float">
            <text:p>110.6</text:p>
          </table:table-cell>
          <table:table-cell table:number-columns-repeated="2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table:style-name="ce342" office:value-type="float" office:value="660.101590582903" calcext:value-type="float">
            <text:p>660.1</text:p>
          </table:table-cell>
          <table:table-cell table:style-name="ce344" table:formula="of:=AVERAGE([.B18:.D18])" office:value-type="float" office:value="660.101590582903" calcext:value-type="float">
            <text:p>660.1</text:p>
          </table:table-cell>
          <table:table-cell table:style-name="ce20" office:value-type="float" office:value="1248.66859680545" calcext:value-type="float">
            <text:p>1249</text:p>
          </table:table-cell>
          <table:table-cell table:style-name="ce215" office:value-type="float" office:value="18" calcext:value-type="float">
            <text:p>18</text:p>
          </table:table-cell>
          <table:table-cell office:value-type="float" office:value="94.35" calcext:value-type="float">
            <text:p>94.35</text:p>
          </table:table-cell>
          <table:table-cell table:style-name="ce20" table:formula="of:=ASTROS.MONTEZUMA.CALCTOOLS.CALCFUNCTIONS.PYTHON.INTERPOLATIONIMPL.INTERPO([.$H18];[.$E$4:.$E$31];[.$F$4:.$F$31])" office:value-type="float" office:value="4172.02887420126" calcext:value-type="float">
            <text:p>4172</text:p>
          </table:table-cell>
          <table:table-cell/>
          <table:table-cell table:style-name="ce237"/>
          <table:table-cell office:value-type="float" office:value="188.7" calcext:value-type="float">
            <text:p>188.7</text:p>
          </table:table-cell>
          <table:table-cell table:formula="of:=[.L18]/2" office:value-type="float" office:value="94.35" calcext:value-type="float">
            <text:p>94.35</text:p>
          </table:table-cell>
          <table:table-cell table:number-columns-repeated="2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 table:style-name="ce342" office:value-type="float" office:value="857.315014892876" calcext:value-type="float">
            <text:p>857.3</text:p>
          </table:table-cell>
          <table:table-cell table:style-name="ce344" table:formula="of:=AVERAGE([.B19:.D19])" office:value-type="float" office:value="857.315014892876" calcext:value-type="float">
            <text:p>857.3</text:p>
          </table:table-cell>
          <table:table-cell table:style-name="ce20" office:value-type="float" office:value="1053.52886917467" calcext:value-type="float">
            <text:p>1054</text:p>
          </table:table-cell>
          <table:table-cell table:style-name="ce215" office:value-type="float" office:value="19" calcext:value-type="float">
            <text:p>19</text:p>
          </table:table-cell>
          <table:table-cell office:value-type="float" office:value="80.5" calcext:value-type="float">
            <text:p>80.5</text:p>
          </table:table-cell>
          <table:table-cell table:style-name="ce20" table:formula="of:=ASTROS.MONTEZUMA.CALCTOOLS.CALCFUNCTIONS.PYTHON.INTERPOLATIONIMPL.INTERPO([.$H19];[.$E$4:.$E$31];[.$F$4:.$F$31])" office:value-type="float" office:value="4591.79587493309" calcext:value-type="float">
            <text:p>4592</text:p>
          </table:table-cell>
          <table:table-cell/>
          <table:table-cell table:style-name="ce237"/>
          <table:table-cell office:value-type="float" office:value="161" calcext:value-type="float">
            <text:p>161</text:p>
          </table:table-cell>
          <table:table-cell table:formula="of:=[.L19]/2" office:value-type="float" office:value="80.5" calcext:value-type="float">
            <text:p>80.5</text:p>
          </table:table-cell>
          <table:table-cell table:number-columns-repeated="2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 table:style-name="ce342" office:value-type="float" office:value="1107.57927860425" calcext:value-type="float">
            <text:p>1107.6</text:p>
          </table:table-cell>
          <table:table-cell table:style-name="ce344" table:formula="of:=AVERAGE([.B20:.D20])" office:value-type="float" office:value="1107.57927860425" calcext:value-type="float">
            <text:p>1107.6</text:p>
          </table:table-cell>
          <table:table-cell table:style-name="ce20" office:value-type="float" office:value="888.885234259955" calcext:value-type="float">
            <text:p>889</text:p>
          </table:table-cell>
          <table:table-cell table:style-name="ce215" office:value-type="float" office:value="20" calcext:value-type="float">
            <text:p>20</text:p>
          </table:table-cell>
          <table:table-cell office:value-type="float" office:value="68.2" calcext:value-type="float">
            <text:p>68.2</text:p>
          </table:table-cell>
          <table:table-cell table:style-name="ce20" table:formula="of:=ASTROS.MONTEZUMA.CALCTOOLS.CALCFUNCTIONS.PYTHON.INTERPOLATIONIMPL.INTERPO([.$H20];[.$E$4:.$E$31];[.$F$4:.$F$31])" office:value-type="float" office:value="5017.43902534352" calcext:value-type="float">
            <text:p>5017</text:p>
          </table:table-cell>
          <table:table-cell/>
          <table:table-cell table:style-name="ce237"/>
          <table:table-cell office:value-type="float" office:value="136.4" calcext:value-type="float">
            <text:p>136.4</text:p>
          </table:table-cell>
          <table:table-cell table:formula="of:=[.L20]/2" office:value-type="float" office:value="68.2" calcext:value-type="float">
            <text:p>68.2</text:p>
          </table:table-cell>
          <table:table-cell table:number-columns-repeated="2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 table:style-name="ce342" office:value-type="float" office:value="1399.51602528773" calcext:value-type="float">
            <text:p>1399.5</text:p>
          </table:table-cell>
          <table:table-cell table:style-name="ce344" table:formula="of:=AVERAGE([.B21:.D21])" office:value-type="float" office:value="1399.51602528773" calcext:value-type="float">
            <text:p>1399.5</text:p>
          </table:table-cell>
          <table:table-cell table:style-name="ce20" office:value-type="float" office:value="749.971816438546" calcext:value-type="float">
            <text:p>750</text:p>
          </table:table-cell>
          <table:table-cell table:style-name="ce215" office:value-type="float" office:value="21" calcext:value-type="float">
            <text:p>21</text:p>
          </table:table-cell>
          <table:table-cell office:value-type="float" office:value="57.2" calcext:value-type="float">
            <text:p>57.2</text:p>
          </table:table-cell>
          <table:table-cell table:style-name="ce20" table:formula="of:=ASTROS.MONTEZUMA.CALCTOOLS.CALCFUNCTIONS.PYTHON.INTERPOLATIONIMPL.INTERPO([.$H21];[.$E$4:.$E$31];[.$F$4:.$F$31])" office:value-type="float" office:value="5523.31512323884" calcext:value-type="float">
            <text:p>5523</text:p>
          </table:table-cell>
          <table:table-cell table:number-columns-repeated="2"/>
          <table:table-cell office:value-type="float" office:value="114.4" calcext:value-type="float">
            <text:p>114.4</text:p>
          </table:table-cell>
          <table:table-cell table:formula="of:=[.L21]/2" office:value-type="float" office:value="57.2" calcext:value-type="float">
            <text:p>57.2</text:p>
          </table:table-cell>
          <table:table-cell table:number-columns-repeated="2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 table:style-name="ce342" office:value-type="float" office:value="1735.62662549431" calcext:value-type="float">
            <text:p>1735.6</text:p>
          </table:table-cell>
          <table:table-cell table:style-name="ce344" table:formula="of:=AVERAGE([.B22:.D22])" office:value-type="float" office:value="1735.62662549431" calcext:value-type="float">
            <text:p>1735.6</text:p>
          </table:table-cell>
          <table:table-cell table:style-name="ce20" office:value-type="float" office:value="632.76754273054" calcext:value-type="float">
            <text:p>633</text:p>
          </table:table-cell>
          <table:table-cell table:style-name="ce215" office:value-type="float" office:value="22" calcext:value-type="float">
            <text:p>22</text:p>
          </table:table-cell>
          <table:table-cell office:value-type="float" office:value="47.65" calcext:value-type="float">
            <text:p>47.65</text:p>
          </table:table-cell>
          <table:table-cell table:style-name="ce20" table:formula="of:=ASTROS.MONTEZUMA.CALCTOOLS.CALCFUNCTIONS.PYTHON.INTERPOLATIONIMPL.INTERPO([.$H22];[.$E$4:.$E$31];[.$F$4:.$F$31])" office:value-type="float" office:value="6088.49874505642" calcext:value-type="float">
            <text:p>6088</text:p>
          </table:table-cell>
          <table:table-cell table:number-columns-repeated="2"/>
          <table:table-cell office:value-type="float" office:value="95.3" calcext:value-type="float">
            <text:p>95.3</text:p>
          </table:table-cell>
          <table:table-cell table:formula="of:=[.L22]/2" office:value-type="float" office:value="47.65" calcext:value-type="float">
            <text:p>47.65</text:p>
          </table:table-cell>
          <table:table-cell table:number-columns-repeated="2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 table:style-name="ce342" office:value-type="float" office:value="2111.84798233816" calcext:value-type="float">
            <text:p>2111.8</text:p>
          </table:table-cell>
          <table:table-cell table:style-name="ce344" table:formula="of:=AVERAGE([.B23:.D23])" office:value-type="float" office:value="2111.84798233816" calcext:value-type="float">
            <text:p>2111.8</text:p>
          </table:table-cell>
          <table:table-cell table:style-name="ce20" office:value-type="float" office:value="533.879746354515" calcext:value-type="float">
            <text:p>534</text:p>
          </table:table-cell>
          <table:table-cell table:style-name="ce215" office:value-type="float" office:value="23" calcext:value-type="float">
            <text:p>23</text:p>
          </table:table-cell>
          <table:table-cell office:value-type="float" office:value="39.5" calcext:value-type="float">
            <text:p>39.5</text:p>
          </table:table-cell>
          <table:table-cell table:style-name="ce20" table:formula="of:=ASTROS.MONTEZUMA.CALCTOOLS.CALCFUNCTIONS.PYTHON.INTERPOLATIONIMPL.INTERPO([.$H23];[.$E$4:.$E$31];[.$F$4:.$F$31])" office:value-type="float" office:value="6700.08602191018" calcext:value-type="float">
            <text:p>670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L23]/2" office:value-type="float" office:value="39.5" calcext:value-type="float">
            <text:p>39.5</text:p>
          </table:table-cell>
          <table:table-cell table:number-columns-repeated="2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 table:style-name="ce342" office:value-type="float" office:value="2524.74340097294" calcext:value-type="float">
            <text:p>2524.7</text:p>
          </table:table-cell>
          <table:table-cell table:style-name="ce344" table:formula="of:=AVERAGE([.B24:.D24])" office:value-type="float" office:value="2524.74340097294" calcext:value-type="float">
            <text:p>2524.7</text:p>
          </table:table-cell>
          <table:table-cell table:style-name="ce20" office:value-type="float" office:value="450.445960514347" calcext:value-type="float">
            <text:p>450</text:p>
          </table:table-cell>
          <table:table-cell table:style-name="ce215" office:value-type="float" office:value="24" calcext:value-type="float">
            <text:p>24</text:p>
          </table:table-cell>
          <table:table-cell office:value-type="float" office:value="32.65" calcext:value-type="float">
            <text:p>32.65</text:p>
          </table:table-cell>
          <table:table-cell table:style-name="ce20" table:formula="of:=ASTROS.MONTEZUMA.CALCTOOLS.CALCFUNCTIONS.PYTHON.INTERPOLATIONIMPL.INTERPO([.$H24];[.$E$4:.$E$31];[.$F$4:.$F$31])" office:value-type="float" office:value="7438.59209502838" calcext:value-type="float">
            <text:p>7439</text:p>
          </table:table-cell>
          <table:table-cell table:number-columns-repeated="2"/>
          <table:table-cell office:value-type="float" office:value="65.3" calcext:value-type="float">
            <text:p>65.3</text:p>
          </table:table-cell>
          <table:table-cell table:formula="of:=[.L24]/2" office:value-type="float" office:value="32.65" calcext:value-type="float">
            <text:p>32.65</text:p>
          </table:table-cell>
          <table:table-cell table:number-columns-repeated="2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 table:style-name="ce342" office:value-type="float" office:value="2968.58329311869" calcext:value-type="float">
            <text:p>2968.6</text:p>
          </table:table-cell>
          <table:table-cell table:style-name="ce344" table:formula="of:=AVERAGE([.B25:.D25])" office:value-type="float" office:value="2968.58329311869" calcext:value-type="float">
            <text:p>2968.6</text:p>
          </table:table-cell>
          <table:table-cell table:style-name="ce20" office:value-type="float" office:value="380.051059679943" calcext:value-type="float">
            <text:p>380</text:p>
          </table:table-cell>
          <table:table-cell table:style-name="ce215" office:value-type="float" office:value="25" calcext:value-type="float">
            <text:p>25</text:p>
          </table:table-cell>
          <table:table-cell office:value-type="float" office:value="26.9" calcext:value-type="float">
            <text:p>26.9</text:p>
          </table:table-cell>
          <table:table-cell table:style-name="ce20" table:formula="of:=ASTROS.MONTEZUMA.CALCTOOLS.CALCFUNCTIONS.PYTHON.INTERPOLATIONIMPL.INTERPO([.$H25];[.$E$4:.$E$31];[.$F$4:.$F$31])" office:value-type="float" office:value="8134.13492844254" calcext:value-type="float">
            <text:p>8134</text:p>
          </table:table-cell>
          <table:table-cell table:number-columns-repeated="2"/>
          <table:table-cell office:value-type="float" office:value="53.8" calcext:value-type="float">
            <text:p>53.8</text:p>
          </table:table-cell>
          <table:table-cell table:formula="of:=[.L25]/2" office:value-type="float" office:value="26.9" calcext:value-type="float">
            <text:p>26.9</text:p>
          </table:table-cell>
          <table:table-cell table:number-columns-repeated="2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 table:style-name="ce342" office:value-type="float" office:value="3469.23835135167" calcext:value-type="float">
            <text:p>3469.2</text:p>
          </table:table-cell>
          <table:table-cell table:style-name="ce344" table:formula="of:=AVERAGE([.B26:.D26])" office:value-type="float" office:value="3469.23835135167" calcext:value-type="float">
            <text:p>3469.2</text:p>
          </table:table-cell>
          <table:table-cell table:style-name="ce20" office:value-type="float" office:value="320.657349882588" calcext:value-type="float">
            <text:p>321</text:p>
          </table:table-cell>
          <table:table-cell table:style-name="ce215" office:value-type="float" office:value="26" calcext:value-type="float">
            <text:p>26</text:p>
          </table:table-cell>
          <table:table-cell office:value-type="float" office:value="22.3" calcext:value-type="float">
            <text:p>22.3</text:p>
          </table:table-cell>
          <table:table-cell table:style-name="ce20" table:formula="of:=ASTROS.MONTEZUMA.CALCTOOLS.CALCFUNCTIONS.PYTHON.INTERPOLATIONIMPL.INTERPO([.$H26];[.$E$4:.$E$31];[.$F$4:.$F$31])" office:value-type="float" office:value="8916.56829806061" calcext:value-type="float">
            <text:p>8917</text:p>
          </table:table-cell>
          <table:table-cell table:number-columns-repeated="2"/>
          <table:table-cell office:value-type="float" office:value="44.6" calcext:value-type="float">
            <text:p>44.6</text:p>
          </table:table-cell>
          <table:table-cell table:formula="of:=[.L26]/2" office:value-type="float" office:value="22.3" calcext:value-type="float">
            <text:p>22.3</text:p>
          </table:table-cell>
          <table:table-cell table:number-columns-repeated="2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 table:style-name="ce342" office:value-type="float" office:value="3999.83890089854" calcext:value-type="float">
            <text:p>3999.8</text:p>
          </table:table-cell>
          <table:table-cell table:style-name="ce344" table:formula="of:=AVERAGE([.B27:.D27])" office:value-type="float" office:value="3999.83890089854" calcext:value-type="float">
            <text:p>3999.8</text:p>
          </table:table-cell>
          <table:table-cell table:style-name="ce20" office:value-type="float" office:value="270.545584375728" calcext:value-type="float">
            <text:p>271</text:p>
          </table:table-cell>
          <table:table-cell table:style-name="ce215" office:value-type="float" office:value="27" calcext:value-type="float">
            <text:p>27</text:p>
          </table:table-cell>
          <table:table-cell office:value-type="float" office:value="18.5" calcext:value-type="float">
            <text:p>18.5</text:p>
          </table:table-cell>
          <table:table-cell table:style-name="ce20" table:formula="of:=ASTROS.MONTEZUMA.CALCTOOLS.CALCFUNCTIONS.PYTHON.INTERPOLATIONIMPL.INTERPO([.$H27];[.$E$4:.$E$31];[.$F$4:.$F$31])" office:value-type="float" office:value="9562.92629904945" calcext:value-type="float">
            <text:p>95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L27]/2" office:value-type="float" office:value="18.5" calcext:value-type="float">
            <text:p>18.5</text:p>
          </table:table-cell>
          <table:table-cell table:number-columns-repeated="2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 table:style-name="ce342" office:value-type="float" office:value="4590.5466653819" calcext:value-type="float">
            <text:p>4590.5</text:p>
          </table:table-cell>
          <table:table-cell table:style-name="ce344" table:formula="of:=AVERAGE([.B28:.D28])" office:value-type="float" office:value="4590.5466653819" calcext:value-type="float">
            <text:p>4590.5</text:p>
          </table:table-cell>
          <table:table-cell table:style-name="ce20" office:value-type="float" office:value="228.265197264323" calcext:value-type="float">
            <text:p>228</text:p>
          </table:table-cell>
          <table:table-cell table:style-name="ce215" office:value-type="float" office:value="28" calcext:value-type="float">
            <text:p>28</text:p>
          </table:table-cell>
          <table:table-cell office:value-type="float" office:value="15.35" calcext:value-type="float">
            <text:p>15.35</text:p>
          </table:table-cell>
          <table:table-cell table:style-name="ce20" table:formula="of:=ASTROS.MONTEZUMA.CALCTOOLS.CALCFUNCTIONS.PYTHON.INTERPOLATIONIMPL.INTERPO([.$H28];[.$E$4:.$E$31];[.$F$4:.$F$31])" office:value-type="float" office:value="10510.7643836016" calcext:value-type="float">
            <text:p>10511</text:p>
          </table:table-cell>
          <table:table-cell table:number-columns-repeated="2"/>
          <table:table-cell office:value-type="float" office:value="30.7" calcext:value-type="float">
            <text:p>30.7</text:p>
          </table:table-cell>
          <table:table-cell table:formula="of:=[.L28]/2" office:value-type="float" office:value="15.35" calcext:value-type="float">
            <text:p>15.35</text:p>
          </table:table-cell>
          <table:table-cell table:number-columns-repeated="2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 table:style-name="ce342" office:value-type="float" office:value="5255.96094785285" calcext:value-type="float">
            <text:p>5256.0</text:p>
          </table:table-cell>
          <table:table-cell table:style-name="ce344" table:formula="of:=AVERAGE([.B29:.D29])" office:value-type="float" office:value="5255.96094785285" calcext:value-type="float">
            <text:p>5256.0</text:p>
          </table:table-cell>
          <table:table-cell table:style-name="ce20" office:value-type="float" office:value="192.592314534906" calcext:value-type="float">
            <text:p>193</text:p>
          </table:table-cell>
          <table:table-cell table:style-name="ce215" office:value-type="float" office:value="29" calcext:value-type="float">
            <text:p>29</text:p>
          </table:table-cell>
          <table:table-cell office:value-type="float" office:value="12.6" calcext:value-type="float">
            <text:p>12.6</text:p>
          </table:table-cell>
          <table:table-cell table:style-name="ce20" table:formula="of:=ASTROS.MONTEZUMA.CALCTOOLS.CALCFUNCTIONS.PYTHON.INTERPOLATIONIMPL.INTERPO([.$H29];[.$E$4:.$E$31];[.$F$4:.$F$31])" office:value-type="float" office:value="11361.3345354016" calcext:value-type="float">
            <text:p>11361</text:p>
          </table:table-cell>
          <table:table-cell table:number-columns-repeated="2"/>
          <table:table-cell office:value-type="float" office:value="25.2" calcext:value-type="float">
            <text:p>25.2</text:p>
          </table:table-cell>
          <table:table-cell table:formula="of:=[.L29]/2" office:value-type="float" office:value="12.6" calcext:value-type="float">
            <text:p>12.6</text:p>
          </table:table-cell>
          <table:table-cell table:number-columns-repeated="2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 table:style-name="ce342" office:value-type="float" office:value="6095.35759346497" calcext:value-type="float">
            <text:p>6095.4</text:p>
          </table:table-cell>
          <table:table-cell table:style-name="ce344" table:formula="of:=AVERAGE([.B30:.D30])" office:value-type="float" office:value="6095.35759346497" calcext:value-type="float">
            <text:p>6095.4</text:p>
          </table:table-cell>
          <table:table-cell table:style-name="ce20" office:value-type="float" office:value="162.494327047856" calcext:value-type="float">
            <text:p>162</text:p>
          </table:table-cell>
          <table:table-cell table:style-name="ce215" office:value-type="float" office:value="30" calcext:value-type="float">
            <text:p>30</text:p>
          </table:table-cell>
          <table:table-cell office:value-type="float" office:value="10.05" calcext:value-type="float">
            <text:p>10.05</text:p>
          </table:table-cell>
          <table:table-cell table:style-name="ce20" table:formula="of:=ASTROS.MONTEZUMA.CALCTOOLS.CALCFUNCTIONS.PYTHON.INTERPOLATIONIMPL.INTERPO([.$H30];[.$E$4:.$E$31];[.$F$4:.$F$31])" office:value-type="float" office:value="12485.0336564085" calcext:value-type="float">
            <text:p>12485</text:p>
          </table:table-cell>
          <table:table-cell table:number-columns-repeated="2"/>
          <table:table-cell office:value-type="float" office:value="20.1" calcext:value-type="float">
            <text:p>20.1</text:p>
          </table:table-cell>
          <table:table-cell table:formula="of:=[.L30]/2" office:value-type="float" office:value="10.05" calcext:value-type="float">
            <text:p>10.05</text:p>
          </table:table-cell>
          <table:table-cell table:number-columns-repeated="2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 table:style-name="ce342" office:value-type="float" office:value="7347.95180301294" calcext:value-type="float">
            <text:p>7348.0</text:p>
          </table:table-cell>
          <table:table-cell table:style-name="ce344" table:formula="of:=AVERAGE([.B31:.D31])" office:value-type="float" office:value="7347.95180301294" calcext:value-type="float">
            <text:p>7348.0</text:p>
          </table:table-cell>
          <table:table-cell table:style-name="ce20" office:value-type="float" office:value="137.1" calcext:value-type="float">
            <text:p>137</text:p>
          </table:table-cell>
          <table:table-cell table:style-name="ce215" table:number-columns-repeated="2"/>
          <table:table-cell table:style-name="ce216" table:formula="of:=cubicspline([.H3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/>
          <table:table-cell table:style-name="ce267"/>
          <table:table-cell table:style-name="ce215" table:number-columns-repeated="2"/>
          <table:table-cell table:style-name="ce216" table:formula="of:=cubicspline([.H32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/>
          <table:table-cell table:style-name="ce267"/>
          <table:table-cell table:style-name="ce215" table:number-columns-repeated="2"/>
          <table:table-cell table:style-name="ce216" table:formula="of:=cubicspline([.H3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4:.D34])" office:value-type="string" office:string-value="" calcext:value-type="error">
            <text:p>#DIV/0!</text:p>
          </table:table-cell>
          <table:table-cell table:style-name="ce267"/>
          <table:table-cell table:style-name="ce215" table:number-columns-repeated="2"/>
          <table:table-cell table:style-name="ce216" table:formula="of:=cubicspline([.H3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5:.D3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6:.D3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7:.D3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7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8:.D3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8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39:.D3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39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0:.D4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0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1:.D4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2:.D4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2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 table:number-columns-repeated="28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3:.D4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4:.D4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5:.D4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5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6:.D4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6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7:.D4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7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8:.D4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8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49:.D4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49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0:.D5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0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1:.D5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1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2:.D5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2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3:.D5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3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4:.D5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4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5:.D5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5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6:.D5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6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7:.D5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7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8:.D5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8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59:.D5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59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0:.D6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0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1:.D6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1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2:.D6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2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3:.D6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3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4:.D6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4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5:.D6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5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6:.D6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6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7:.D6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7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8:.D6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8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69:.D6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69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0:.D7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0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1:.D7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1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2:.D7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2];[.$E$5:.$E$107];[.$F$5:.$F$107])" office:value-type="string" office:string-value="" calcext:value-type="error">
            <text:p>#NAME?</text:p>
          </table:table-cell>
          <table:table-cell table:number-columns-repeated="3"/>
          <table:table-cell table:style-name="ce267"/>
          <table:table-cell table:number-columns-repeated="27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3:.D7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4:.D7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5:.D7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6:.D7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7:.D7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7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8:.D7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8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79:.D7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79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0:.D8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0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1:.D8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2:.D8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2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3:.D8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4:.D8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5:.D8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6:.D8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7:.D8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7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8:.D8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8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89:.D8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89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0:.D9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0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1:.D9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2:.D9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2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3:.D9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4:.D9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5:.D9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6:.D9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7:.D97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7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8:.D98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8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99:.D99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99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0:.D100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0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1:.D101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1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2:.D102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2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3:.D103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3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4:.D104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4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5:.D105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5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>
          <table:table-cell/>
          <table:table-cell table:style-name="ce211" table:number-columns-repeated="3"/>
          <table:table-cell table:style-name="ce212" table:formula="of:=AVERAGE([.B106:.D106])" office:value-type="string" office:string-value="" calcext:value-type="error">
            <text:p>#DIV/0!</text:p>
          </table:table-cell>
          <table:table-cell table:style-name="ce209"/>
          <table:table-cell table:style-name="ce215" table:number-columns-repeated="2"/>
          <table:table-cell table:style-name="ce216" table:formula="of:=cubicspline([.H106];[.$E$5:.$E$107];[.$F$5:.$F$107])" office:value-type="string" office:string-value="" calcext:value-type="error">
            <text:p>#NAME?</text:p>
          </table:table-cell>
          <table:table-cell table:number-columns-repeated="31"/>
        </table:table-row>
        <table:table-row table:style-name="ro2" table:number-rows-repeated="1048469">
          <table:table-cell table:number-columns-repeated="40"/>
        </table:table-row>
        <table:table-row table:style-name="ro2">
          <table:table-cell table:number-columns-repeated="40"/>
        </table:table-row>
      </table:table>
      <table:table table:name="Calibration Curve" table:style-name="ta1">
        <table:table-column table:style-name="co4" table:number-columns-repeated="2" table:default-cell-style-name="ce220"/>
        <table:table-column table:style-name="co4" table:default-cell-style-name="ce226"/>
        <table:table-column table:style-name="co4" table:default-cell-style-name="ce227"/>
        <table:table-column table:style-name="co4" table:number-columns-repeated="32" table:default-cell-style-name="Default"/>
        <table:table-row table:style-name="ro2">
          <table:table-cell table:style-name="ce214" office:value-type="string" calcext:value-type="string" table:number-columns-spanned="2" table:number-rows-spanned="1">
            <text:p>Data from Table 4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Threshold Settings corresponding to Sizes of Interest</text:p>
          </table:table-cell>
          <table:covered-table-cell table:style-name="ce214"/>
          <table:table-cell table:number-columns-repeated="32"/>
        </table:table-row>
        <table:table-row table:style-name="ro14">
          <table:table-cell table:style-name="ce217" office:value-type="string" calcext:value-type="string" table:number-columns-spanned="2" table:number-rows-spanned="1">
            <text:p>Enter the particle sizes and corresponding threshold settings from Table 4 (also columns F and H of the Clause 6.9 worksheet) <text:span text:style-name="T14">in order of increasing value of particle size</text:span><text:span text:style-name="T15">.</text:span></text:p>
          </table:table-cell>
          <table:covered-table-cell table:style-name="ce221"/>
          <table:table-cell table:style-name="ce217" office:value-type="string" calcext:value-type="string" table:number-columns-spanned="2" table:number-rows-spanned="1">
            <text:p>Enter particle sizes of interest (that lie within the range of the data in column A) <text:span text:style-name="T14">in order of increasing particle size</text:span><text:span text:style-name="T15">. The corresponding interpolated threshold voltage settings are displayed in column D.</text:span></text:p>
          </table:table-cell>
          <table:covered-table-cell table:style-name="ce221"/>
          <table:table-cell/>
          <table:table-cell>
            <draw:frame draw:z-index="0" draw:style-name="gr3" draw:text-style-name="P2" svg:width="20.292cm" svg:height="11.414cm" svg:x="0.45cm" svg:y="3.053cm">
              <draw:object draw:notify-on-update-of-ranges="'Calibration Curve'.D5:'Calibration Curve'.D34 'Calibration Curve'.C5:'Calibration Curve'.C34 'Calibration Curve'.D5:'Calibration Curve'.D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0"/>
        </table:table-row>
        <table:table-row table:style-name="ro12">
          <table:table-cell table:style-name="ce218" office:value-type="string" calcext:value-type="string">
            <text:p>Particle Size</text:p>
          </table:table-cell>
          <table:table-cell table:style-name="ce222" office:value-type="string" calcext:value-type="string">
            <text:p>Threshold Setting</text:p>
          </table:table-cell>
          <table:table-cell table:style-name="ce218" office:value-type="string" calcext:value-type="string">
            <text:p><text:s/>Particle Size</text:p>
          </table:table-cell>
          <table:table-cell table:style-name="ce223" office:value-type="string" calcext:value-type="string">
            <text:p>Interpolated Threshold Voltage Setting</text:p>
          </table:table-cell>
          <table:table-cell table:number-columns-repeated="32"/>
        </table:table-row>
        <table:table-row table:style-name="ro2"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number-columns-repeated="32"/>
        </table:table-row>
        <table:table-row table:style-name="ro2">
          <table:table-cell table:style-name="ce215" office:value-type="float" office:value="4" calcext:value-type="float">
            <text:p>4</text:p>
          </table:table-cell>
          <table:table-cell table:style-name="ce75" office:value-type="float" office:value="188.318589331367" calcext:value-type="float">
            <text:p>188</text:p>
          </table:table-cell>
          <table:table-cell table:style-name="ce215" office:value-type="float" office:value="4" calcext:value-type="float">
            <text:p>4</text:p>
          </table:table-cell>
          <table:table-cell table:style-name="ce319" table:formula="of:=ASTROS.MONTEZUMA.CALCTOOLS.CALCFUNCTIONS.PYTHON.INTERPOLATIONIMPL.INTERPO([.C5];[.A$5:.A$34];[.B$5:.B$34])" office:value-type="float" office:value="188.318589331367" calcext:value-type="float">
            <text:p>188</text:p>
          </table:table-cell>
          <table:table-cell table:number-columns-repeated="32"/>
        </table:table-row>
        <table:table-row table:style-name="ro2">
          <table:table-cell table:style-name="ce215" office:value-type="float" office:value="5" calcext:value-type="float">
            <text:p>5</text:p>
          </table:table-cell>
          <table:table-cell table:style-name="ce20" office:value-type="float" office:value="312.033559483167" calcext:value-type="float">
            <text:p>312</text:p>
          </table:table-cell>
          <table:table-cell table:style-name="ce215" office:value-type="float" office:value="5" calcext:value-type="float">
            <text:p>5</text:p>
          </table:table-cell>
          <table:table-cell table:style-name="ce319" table:formula="of:=ASTROS.MONTEZUMA.CALCTOOLS.CALCFUNCTIONS.PYTHON.INTERPOLATIONIMPL.INTERPO([.C6];[.A$5:.A$34];[.B$5:.B$34])" office:value-type="float" office:value="312.033559483167" calcext:value-type="float">
            <text:p>312</text:p>
          </table:table-cell>
          <table:table-cell table:number-columns-repeated="32"/>
        </table:table-row>
        <table:table-row table:style-name="ro2">
          <table:table-cell table:style-name="ce215" office:value-type="float" office:value="6" calcext:value-type="float">
            <text:p>6</text:p>
          </table:table-cell>
          <table:table-cell table:style-name="ce75" office:value-type="float" office:value="482.816244384237" calcext:value-type="float">
            <text:p>483</text:p>
          </table:table-cell>
          <table:table-cell table:style-name="ce215" office:value-type="float" office:value="6" calcext:value-type="float">
            <text:p>6</text:p>
          </table:table-cell>
          <table:table-cell table:style-name="ce319" table:formula="of:=ASTROS.MONTEZUMA.CALCTOOLS.CALCFUNCTIONS.PYTHON.INTERPOLATIONIMPL.INTERPO([.C7];[.A$5:.A$34];[.B$5:.B$34])" office:value-type="float" office:value="482.816244384237" calcext:value-type="float">
            <text:p>483</text:p>
          </table:table-cell>
          <table:table-cell table:number-columns-repeated="32"/>
        </table:table-row>
        <table:table-row table:style-name="ro2">
          <table:table-cell table:style-name="ce215" office:value-type="float" office:value="7" calcext:value-type="float">
            <text:p>7</text:p>
          </table:table-cell>
          <table:table-cell table:style-name="ce20" office:value-type="float" office:value="680.18360643853" calcext:value-type="float">
            <text:p>680</text:p>
          </table:table-cell>
          <table:table-cell table:style-name="ce215" office:value-type="float" office:value="7" calcext:value-type="float">
            <text:p>7</text:p>
          </table:table-cell>
          <table:table-cell table:style-name="ce319" table:formula="of:=ASTROS.MONTEZUMA.CALCTOOLS.CALCFUNCTIONS.PYTHON.INTERPOLATIONIMPL.INTERPO([.C8];[.A$5:.A$34];[.B$5:.B$34])" office:value-type="float" office:value="680.18360643853" calcext:value-type="float">
            <text:p>680</text:p>
          </table:table-cell>
          <table:table-cell table:number-columns-repeated="32"/>
        </table:table-row>
        <table:table-row table:style-name="ro2">
          <table:table-cell table:style-name="ce215" office:value-type="float" office:value="8" calcext:value-type="float">
            <text:p>8</text:p>
          </table:table-cell>
          <table:table-cell table:style-name="ce20" office:value-type="float" office:value="873.315603871514" calcext:value-type="float">
            <text:p>873</text:p>
          </table:table-cell>
          <table:table-cell table:style-name="ce215" office:value-type="float" office:value="8" calcext:value-type="float">
            <text:p>8</text:p>
          </table:table-cell>
          <table:table-cell table:style-name="ce319" table:formula="of:=ASTROS.MONTEZUMA.CALCTOOLS.CALCFUNCTIONS.PYTHON.INTERPOLATIONIMPL.INTERPO([.C9];[.A$5:.A$34];[.B$5:.B$34])" office:value-type="float" office:value="873.315603871514" calcext:value-type="float">
            <text:p>873</text:p>
          </table:table-cell>
          <table:table-cell table:number-columns-repeated="32"/>
        </table:table-row>
        <table:table-row table:style-name="ro2">
          <table:table-cell table:style-name="ce215" office:value-type="float" office:value="9" calcext:value-type="float">
            <text:p>9</text:p>
          </table:table-cell>
          <table:table-cell table:style-name="ce20" office:value-type="float" office:value="1102.82007981173" calcext:value-type="float">
            <text:p>1103</text:p>
          </table:table-cell>
          <table:table-cell table:style-name="ce215" office:value-type="float" office:value="9" calcext:value-type="float">
            <text:p>9</text:p>
          </table:table-cell>
          <table:table-cell table:style-name="ce319" table:formula="of:=ASTROS.MONTEZUMA.CALCTOOLS.CALCFUNCTIONS.PYTHON.INTERPOLATIONIMPL.INTERPO([.C10];[.A$5:.A$34];[.B$5:.B$34])" office:value-type="float" office:value="1102.82007981173" calcext:value-type="float">
            <text:p>1103</text:p>
          </table:table-cell>
          <table:table-cell table:number-columns-repeated="32"/>
        </table:table-row>
        <table:table-row table:style-name="ro2">
          <table:table-cell table:style-name="ce215" office:value-type="float" office:value="10" calcext:value-type="float">
            <text:p>10</text:p>
          </table:table-cell>
          <table:table-cell table:style-name="ce75" office:value-type="float" office:value="1393.24835073955" calcext:value-type="float">
            <text:p>1393</text:p>
          </table:table-cell>
          <table:table-cell table:style-name="ce215" office:value-type="float" office:value="10" calcext:value-type="float">
            <text:p>10</text:p>
          </table:table-cell>
          <table:table-cell table:style-name="ce319" table:formula="of:=ASTROS.MONTEZUMA.CALCTOOLS.CALCFUNCTIONS.PYTHON.INTERPOLATIONIMPL.INTERPO([.C11];[.A$5:.A$34];[.B$5:.B$34])" office:value-type="float" office:value="1393.24835073955" calcext:value-type="float">
            <text:p>1393</text:p>
          </table:table-cell>
          <table:table-cell table:number-columns-repeated="32"/>
        </table:table-row>
        <table:table-row table:style-name="ro2">
          <table:table-cell table:style-name="ce215" office:value-type="float" office:value="11" calcext:value-type="float">
            <text:p>11</text:p>
          </table:table-cell>
          <table:table-cell table:style-name="ce20" office:value-type="float" office:value="1709.02195206891" calcext:value-type="float">
            <text:p>1709</text:p>
          </table:table-cell>
          <table:table-cell table:style-name="ce215" office:value-type="float" office:value="11" calcext:value-type="float">
            <text:p>11</text:p>
          </table:table-cell>
          <table:table-cell table:style-name="ce319" table:formula="of:=ASTROS.MONTEZUMA.CALCTOOLS.CALCFUNCTIONS.PYTHON.INTERPOLATIONIMPL.INTERPO([.C12];[.A$5:.A$34];[.B$5:.B$34])" office:value-type="float" office:value="1709.02195206891" calcext:value-type="float">
            <text:p>1709</text:p>
          </table:table-cell>
          <table:table-cell table:number-columns-repeated="32"/>
        </table:table-row>
        <table:table-row table:style-name="ro2">
          <table:table-cell table:style-name="ce215" office:value-type="float" office:value="12" calcext:value-type="float">
            <text:p>12</text:p>
          </table:table-cell>
          <table:table-cell table:style-name="ce20" office:value-type="float" office:value="2031.80702870523" calcext:value-type="float">
            <text:p>2032</text:p>
          </table:table-cell>
          <table:table-cell table:style-name="ce215" office:value-type="float" office:value="12" calcext:value-type="float">
            <text:p>12</text:p>
          </table:table-cell>
          <table:table-cell table:style-name="ce319" table:formula="of:=ASTROS.MONTEZUMA.CALCTOOLS.CALCFUNCTIONS.PYTHON.INTERPOLATIONIMPL.INTERPO([.C13];[.A$5:.A$34];[.B$5:.B$34])" office:value-type="float" office:value="2031.80702870523" calcext:value-type="float">
            <text:p>2032</text:p>
          </table:table-cell>
          <table:table-cell table:number-columns-repeated="32"/>
        </table:table-row>
        <table:table-row table:style-name="ro2">
          <table:table-cell table:style-name="ce215" office:value-type="float" office:value="13" calcext:value-type="float">
            <text:p>13</text:p>
          </table:table-cell>
          <table:table-cell table:style-name="ce20" office:value-type="float" office:value="2386.03478277541" calcext:value-type="float">
            <text:p>2386</text:p>
          </table:table-cell>
          <table:table-cell table:style-name="ce215" office:value-type="float" office:value="13" calcext:value-type="float">
            <text:p>13</text:p>
          </table:table-cell>
          <table:table-cell table:style-name="ce319" table:formula="of:=ASTROS.MONTEZUMA.CALCTOOLS.CALCFUNCTIONS.PYTHON.INTERPOLATIONIMPL.INTERPO([.C14];[.A$5:.A$34];[.B$5:.B$34])" office:value-type="float" office:value="2386.03478277541" calcext:value-type="float">
            <text:p>2386</text:p>
          </table:table-cell>
          <table:table-cell table:number-columns-repeated="32"/>
        </table:table-row>
        <table:table-row table:style-name="ro2">
          <table:table-cell table:style-name="ce215" office:value-type="float" office:value="14" calcext:value-type="float">
            <text:p>14</text:p>
          </table:table-cell>
          <table:table-cell table:style-name="ce75" office:value-type="float" office:value="2752.45456383348" calcext:value-type="float">
            <text:p>2752</text:p>
          </table:table-cell>
          <table:table-cell table:style-name="ce215" office:value-type="float" office:value="14" calcext:value-type="float">
            <text:p>14</text:p>
          </table:table-cell>
          <table:table-cell table:style-name="ce319" table:formula="of:=ASTROS.MONTEZUMA.CALCTOOLS.CALCFUNCTIONS.PYTHON.INTERPOLATIONIMPL.INTERPO([.C15];[.A$5:.A$34];[.B$5:.B$34])" office:value-type="float" office:value="2752.45456383348" calcext:value-type="float">
            <text:p>2752</text:p>
          </table:table-cell>
          <table:table-cell table:number-columns-repeated="32"/>
        </table:table-row>
        <table:table-row table:style-name="ro2">
          <table:table-cell table:style-name="ce215" office:value-type="float" office:value="15" calcext:value-type="float">
            <text:p>15</text:p>
          </table:table-cell>
          <table:table-cell table:style-name="ce20" office:value-type="float" office:value="3110.42553957305" calcext:value-type="float">
            <text:p>3110</text:p>
          </table:table-cell>
          <table:table-cell table:style-name="ce215" office:value-type="float" office:value="15" calcext:value-type="float">
            <text:p>15</text:p>
          </table:table-cell>
          <table:table-cell table:style-name="ce319" table:formula="of:=ASTROS.MONTEZUMA.CALCTOOLS.CALCFUNCTIONS.PYTHON.INTERPOLATIONIMPL.INTERPO([.C16];[.A$5:.A$34];[.B$5:.B$34])" office:value-type="float" office:value="3110.42553957305" calcext:value-type="float">
            <text:p>3110</text:p>
          </table:table-cell>
          <table:table-cell table:number-columns-repeated="32"/>
        </table:table-row>
        <table:table-row table:style-name="ro2">
          <table:table-cell table:style-name="ce215" office:value-type="float" office:value="16" calcext:value-type="float">
            <text:p>16</text:p>
          </table:table-cell>
          <table:table-cell table:style-name="ce20" office:value-type="float" office:value="3447.74487911428" calcext:value-type="float">
            <text:p>3448</text:p>
          </table:table-cell>
          <table:table-cell table:style-name="ce215" office:value-type="float" office:value="16" calcext:value-type="float">
            <text:p>16</text:p>
          </table:table-cell>
          <table:table-cell table:style-name="ce319" table:formula="of:=ASTROS.MONTEZUMA.CALCTOOLS.CALCFUNCTIONS.PYTHON.INTERPOLATIONIMPL.INTERPO([.C17];[.A$5:.A$34];[.B$5:.B$34])" office:value-type="float" office:value="3447.74487911428" calcext:value-type="float">
            <text:p>3448</text:p>
          </table:table-cell>
          <table:table-cell table:number-columns-repeated="32"/>
        </table:table-row>
        <table:table-row table:style-name="ro2">
          <table:table-cell table:style-name="ce215" office:value-type="float" office:value="17" calcext:value-type="float">
            <text:p>17</text:p>
          </table:table-cell>
          <table:table-cell table:style-name="ce20" office:value-type="float" office:value="3832.91169260351" calcext:value-type="float">
            <text:p>3833</text:p>
          </table:table-cell>
          <table:table-cell table:style-name="ce215" office:value-type="float" office:value="17" calcext:value-type="float">
            <text:p>17</text:p>
          </table:table-cell>
          <table:table-cell table:style-name="ce319" table:formula="of:=ASTROS.MONTEZUMA.CALCTOOLS.CALCFUNCTIONS.PYTHON.INTERPOLATIONIMPL.INTERPO([.C18];[.A$5:.A$34];[.B$5:.B$34])" office:value-type="float" office:value="3832.91169260351" calcext:value-type="float">
            <text:p>3833</text:p>
          </table:table-cell>
          <table:table-cell table:number-columns-repeated="32"/>
        </table:table-row>
        <table:table-row table:style-name="ro2">
          <table:table-cell table:style-name="ce215" office:value-type="float" office:value="18" calcext:value-type="float">
            <text:p>18</text:p>
          </table:table-cell>
          <table:table-cell table:style-name="ce20" office:value-type="float" office:value="4172.02887420126" calcext:value-type="float">
            <text:p>4172</text:p>
          </table:table-cell>
          <table:table-cell table:style-name="ce215" office:value-type="float" office:value="18" calcext:value-type="float">
            <text:p>18</text:p>
          </table:table-cell>
          <table:table-cell table:style-name="ce319" table:formula="of:=ASTROS.MONTEZUMA.CALCTOOLS.CALCFUNCTIONS.PYTHON.INTERPOLATIONIMPL.INTERPO([.C19];[.A$5:.A$34];[.B$5:.B$34])" office:value-type="float" office:value="4172.02887420126" calcext:value-type="float">
            <text:p>4172</text:p>
          </table:table-cell>
          <table:table-cell table:number-columns-repeated="32"/>
        </table:table-row>
        <table:table-row table:style-name="ro2">
          <table:table-cell table:style-name="ce215" office:value-type="float" office:value="19" calcext:value-type="float">
            <text:p>19</text:p>
          </table:table-cell>
          <table:table-cell table:style-name="ce20" office:value-type="float" office:value="4591.79587493309" calcext:value-type="float">
            <text:p>4592</text:p>
          </table:table-cell>
          <table:table-cell table:style-name="ce215" office:value-type="float" office:value="19" calcext:value-type="float">
            <text:p>19</text:p>
          </table:table-cell>
          <table:table-cell table:style-name="ce319" table:formula="of:=ASTROS.MONTEZUMA.CALCTOOLS.CALCFUNCTIONS.PYTHON.INTERPOLATIONIMPL.INTERPO([.C20];[.A$5:.A$34];[.B$5:.B$34])" office:value-type="float" office:value="4591.79587493309" calcext:value-type="float">
            <text:p>4592</text:p>
          </table:table-cell>
          <table:table-cell table:number-columns-repeated="32"/>
        </table:table-row>
        <table:table-row table:style-name="ro2">
          <table:table-cell table:style-name="ce215" office:value-type="float" office:value="20" calcext:value-type="float">
            <text:p>20</text:p>
          </table:table-cell>
          <table:table-cell table:style-name="ce20" office:value-type="float" office:value="5017.43902534352" calcext:value-type="float">
            <text:p>5017</text:p>
          </table:table-cell>
          <table:table-cell table:style-name="ce215" office:value-type="float" office:value="20" calcext:value-type="float">
            <text:p>20</text:p>
          </table:table-cell>
          <table:table-cell table:style-name="ce319" table:formula="of:=ASTROS.MONTEZUMA.CALCTOOLS.CALCFUNCTIONS.PYTHON.INTERPOLATIONIMPL.INTERPO([.C21];[.A$5:.A$34];[.B$5:.B$34])" office:value-type="float" office:value="5017.43902534352" calcext:value-type="float">
            <text:p>5017</text:p>
          </table:table-cell>
          <table:table-cell table:number-columns-repeated="32"/>
        </table:table-row>
        <table:table-row table:style-name="ro2">
          <table:table-cell table:style-name="ce215" office:value-type="float" office:value="21" calcext:value-type="float">
            <text:p>21</text:p>
          </table:table-cell>
          <table:table-cell table:style-name="ce20" office:value-type="float" office:value="5523.31512323884" calcext:value-type="float">
            <text:p>5523</text:p>
          </table:table-cell>
          <table:table-cell table:style-name="ce215" office:value-type="float" office:value="21" calcext:value-type="float">
            <text:p>21</text:p>
          </table:table-cell>
          <table:table-cell table:style-name="ce319" table:formula="of:=ASTROS.MONTEZUMA.CALCTOOLS.CALCFUNCTIONS.PYTHON.INTERPOLATIONIMPL.INTERPO([.C22];[.A$5:.A$34];[.B$5:.B$34])" office:value-type="float" office:value="5523.31512323884" calcext:value-type="float">
            <text:p>5523</text:p>
          </table:table-cell>
          <table:table-cell table:number-columns-repeated="2"/>
          <table:table-cell office:value-type="float" office:value="188.318589331367" calcext:value-type="float">
            <text:p>188.318589331367</text:p>
          </table:table-cell>
          <table:table-cell office:value-type="float" office:value="312.033559483167" calcext:value-type="float">
            <text:p>312.033559483167</text:p>
          </table:table-cell>
          <table:table-cell office:value-type="float" office:value="482.816244384237" calcext:value-type="float">
            <text:p>482.816244384237</text:p>
          </table:table-cell>
          <table:table-cell office:value-type="float" office:value="680.18360643853" calcext:value-type="float">
            <text:p>680.18360643853</text:p>
          </table:table-cell>
          <table:table-cell office:value-type="float" office:value="873.315603871514" calcext:value-type="float">
            <text:p>873.315603871514</text:p>
          </table:table-cell>
          <table:table-cell office:value-type="float" office:value="1102.82007981173" calcext:value-type="float">
            <text:p>1102.82007981173</text:p>
          </table:table-cell>
          <table:table-cell office:value-type="float" office:value="1393.24835073955" calcext:value-type="float">
            <text:p>1393.24835073955</text:p>
          </table:table-cell>
          <table:table-cell office:value-type="float" office:value="1709.02195206891" calcext:value-type="float">
            <text:p>1709.02195206891</text:p>
          </table:table-cell>
          <table:table-cell office:value-type="float" office:value="2031.80702870523" calcext:value-type="float">
            <text:p>2031.80702870523</text:p>
          </table:table-cell>
          <table:table-cell office:value-type="float" office:value="2386.03478277541" calcext:value-type="float">
            <text:p>2386.03478277541</text:p>
          </table:table-cell>
          <table:table-cell office:value-type="float" office:value="2752.45456383348" calcext:value-type="float">
            <text:p>2752.45456383348</text:p>
          </table:table-cell>
          <table:table-cell office:value-type="float" office:value="3110.42553957305" calcext:value-type="float">
            <text:p>3110.42553957305</text:p>
          </table:table-cell>
          <table:table-cell office:value-type="float" office:value="3447.74487911428" calcext:value-type="float">
            <text:p>3447.74487911428</text:p>
          </table:table-cell>
          <table:table-cell office:value-type="float" office:value="3832.91169260351" calcext:value-type="float">
            <text:p>3832.91169260351</text:p>
          </table:table-cell>
          <table:table-cell office:value-type="float" office:value="4172.02887420126" calcext:value-type="float">
            <text:p>4172.02887420126</text:p>
          </table:table-cell>
          <table:table-cell office:value-type="float" office:value="4591.79587493309" calcext:value-type="float">
            <text:p>4591.79587493309</text:p>
          </table:table-cell>
          <table:table-cell office:value-type="float" office:value="5017.43902534352" calcext:value-type="float">
            <text:p>5017.43902534352</text:p>
          </table:table-cell>
          <table:table-cell office:value-type="float" office:value="5523.31512323884" calcext:value-type="float">
            <text:p>5523.31512323884</text:p>
          </table:table-cell>
          <table:table-cell office:value-type="float" office:value="6088.49874505642" calcext:value-type="float">
            <text:p>6088.49874505642</text:p>
          </table:table-cell>
          <table:table-cell office:value-type="float" office:value="6700.08602191018" calcext:value-type="float">
            <text:p>6700.08602191018</text:p>
          </table:table-cell>
          <table:table-cell office:value-type="float" office:value="7438.59209502838" calcext:value-type="float">
            <text:p>7438.59209502838</text:p>
          </table:table-cell>
          <table:table-cell office:value-type="float" office:value="8134.13492844253" calcext:value-type="float">
            <text:p>8134.13492844253</text:p>
          </table:table-cell>
          <table:table-cell office:value-type="float" office:value="8916.56829806061" calcext:value-type="float">
            <text:p>8916.56829806061</text:p>
          </table:table-cell>
          <table:table-cell office:value-type="float" office:value="9562.92629904945" calcext:value-type="float">
            <text:p>9562.92629904945</text:p>
          </table:table-cell>
          <table:table-cell office:value-type="float" office:value="10510.7643836016" calcext:value-type="float">
            <text:p>10510.7643836016</text:p>
          </table:table-cell>
          <table:table-cell office:value-type="float" office:value="11361.3345354016" calcext:value-type="float">
            <text:p>11361.3345354016</text:p>
          </table:table-cell>
          <table:table-cell office:value-type="float" office:value="12485.0336564085" calcext:value-type="float">
            <text:p>12485.0336564085</text:p>
          </table:table-cell>
          <table:table-cell office:value-type="float" office:value="23756.3051350805" calcext:value-type="float">
            <text:p>23756.3051350805</text:p>
          </table:table-cell>
          <table:table-cell office:value-type="float" office:value="37442.8078817734" calcext:value-type="float">
            <text:p>37442.8078817734</text:p>
          </table:table-cell>
          <table:table-cell office:value-type="float" office:value="55536.4039408867" calcext:value-type="float">
            <text:p>55536.4039408867</text:p>
          </table:table-cell>
        </table:table-row>
        <table:table-row table:style-name="ro2">
          <table:table-cell table:style-name="ce215" office:value-type="float" office:value="22" calcext:value-type="float">
            <text:p>22</text:p>
          </table:table-cell>
          <table:table-cell table:style-name="ce20" office:value-type="float" office:value="6088.49874505642" calcext:value-type="float">
            <text:p>6088</text:p>
          </table:table-cell>
          <table:table-cell table:style-name="ce215" office:value-type="float" office:value="22" calcext:value-type="float">
            <text:p>22</text:p>
          </table:table-cell>
          <table:table-cell table:style-name="ce319" table:formula="of:=ASTROS.MONTEZUMA.CALCTOOLS.CALCFUNCTIONS.PYTHON.INTERPOLATIONIMPL.INTERPO([.C23];[.A$5:.A$34];[.B$5:.B$34])" office:value-type="float" office:value="6088.49874505642" calcext:value-type="float">
            <text:p>6088</text:p>
          </table:table-cell>
          <table:table-cell table:number-columns-repeated="2"/>
          <table:table-cell table:formula="of:=INT([.G22]+0.5)" office:value-type="float" office:value="188" calcext:value-type="float">
            <text:p>188</text:p>
          </table:table-cell>
          <table:table-cell table:formula="of:=INT([.H22]+0.5)" office:value-type="float" office:value="312" calcext:value-type="float">
            <text:p>312</text:p>
          </table:table-cell>
          <table:table-cell table:formula="of:=INT([.I22]+0.5)" office:value-type="float" office:value="483" calcext:value-type="float">
            <text:p>483</text:p>
          </table:table-cell>
          <table:table-cell table:formula="of:=INT([.J22]+0.5)" office:value-type="float" office:value="680" calcext:value-type="float">
            <text:p>680</text:p>
          </table:table-cell>
          <table:table-cell table:formula="of:=INT([.K22]+0.5)" office:value-type="float" office:value="873" calcext:value-type="float">
            <text:p>873</text:p>
          </table:table-cell>
          <table:table-cell table:formula="of:=INT([.L22]+0.5)" office:value-type="float" office:value="1103" calcext:value-type="float">
            <text:p>1103</text:p>
          </table:table-cell>
          <table:table-cell table:formula="of:=INT([.M22]+0.5)" office:value-type="float" office:value="1393" calcext:value-type="float">
            <text:p>1393</text:p>
          </table:table-cell>
          <table:table-cell table:formula="of:=INT([.N22]+0.5)" office:value-type="float" office:value="1709" calcext:value-type="float">
            <text:p>1709</text:p>
          </table:table-cell>
          <table:table-cell table:formula="of:=INT([.O22]+0.5)" office:value-type="float" office:value="2032" calcext:value-type="float">
            <text:p>2032</text:p>
          </table:table-cell>
          <table:table-cell table:formula="of:=INT([.P22]+0.5)" office:value-type="float" office:value="2386" calcext:value-type="float">
            <text:p>2386</text:p>
          </table:table-cell>
          <table:table-cell table:formula="of:=INT([.Q22]+0.5)" office:value-type="float" office:value="2752" calcext:value-type="float">
            <text:p>2752</text:p>
          </table:table-cell>
          <table:table-cell table:formula="of:=INT([.R22]+0.5)" office:value-type="float" office:value="3110" calcext:value-type="float">
            <text:p>3110</text:p>
          </table:table-cell>
          <table:table-cell table:formula="of:=INT([.S22]+0.5)" office:value-type="float" office:value="3448" calcext:value-type="float">
            <text:p>3448</text:p>
          </table:table-cell>
          <table:table-cell table:formula="of:=INT([.T22]+0.5)" office:value-type="float" office:value="3833" calcext:value-type="float">
            <text:p>3833</text:p>
          </table:table-cell>
          <table:table-cell table:formula="of:=INT([.U22]+0.5)" office:value-type="float" office:value="4172" calcext:value-type="float">
            <text:p>4172</text:p>
          </table:table-cell>
          <table:table-cell table:formula="of:=INT([.V22]+0.5)" office:value-type="float" office:value="4592" calcext:value-type="float">
            <text:p>4592</text:p>
          </table:table-cell>
          <table:table-cell table:formula="of:=INT([.W22]+0.5)" office:value-type="float" office:value="5017" calcext:value-type="float">
            <text:p>5017</text:p>
          </table:table-cell>
          <table:table-cell table:formula="of:=INT([.X22]+0.5)" office:value-type="float" office:value="5523" calcext:value-type="float">
            <text:p>5523</text:p>
          </table:table-cell>
          <table:table-cell table:formula="of:=INT([.Y22]+0.5)" office:value-type="float" office:value="6088" calcext:value-type="float">
            <text:p>6088</text:p>
          </table:table-cell>
          <table:table-cell table:formula="of:=INT([.Z22]+0.5)" office:value-type="float" office:value="6700" calcext:value-type="float">
            <text:p>6700</text:p>
          </table:table-cell>
          <table:table-cell table:formula="of:=INT([.AA22]+0.5)" office:value-type="float" office:value="7439" calcext:value-type="float">
            <text:p>7439</text:p>
          </table:table-cell>
          <table:table-cell table:formula="of:=INT([.AB22]+0.5)" office:value-type="float" office:value="8134" calcext:value-type="float">
            <text:p>8134</text:p>
          </table:table-cell>
          <table:table-cell table:formula="of:=INT([.AC22]+0.5)" office:value-type="float" office:value="8917" calcext:value-type="float">
            <text:p>8917</text:p>
          </table:table-cell>
          <table:table-cell table:formula="of:=INT([.AD22]+0.5)" office:value-type="float" office:value="9563" calcext:value-type="float">
            <text:p>9563</text:p>
          </table:table-cell>
          <table:table-cell table:formula="of:=INT([.AE22]+0.5)" office:value-type="float" office:value="10511" calcext:value-type="float">
            <text:p>10511</text:p>
          </table:table-cell>
          <table:table-cell table:formula="of:=INT([.AF22]+0.5)" office:value-type="float" office:value="11361" calcext:value-type="float">
            <text:p>11361</text:p>
          </table:table-cell>
          <table:table-cell table:formula="of:=INT([.AG22]+0.5)" office:value-type="float" office:value="12485" calcext:value-type="float">
            <text:p>12485</text:p>
          </table:table-cell>
          <table:table-cell table:formula="of:=INT([.AH22]+0.5)" office:value-type="float" office:value="23756" calcext:value-type="float">
            <text:p>23756</text:p>
          </table:table-cell>
          <table:table-cell table:formula="of:=INT([.AI22]+0.5)" office:value-type="float" office:value="37443" calcext:value-type="float">
            <text:p>37443</text:p>
          </table:table-cell>
          <table:table-cell table:formula="of:=INT([.AJ22]+0.5)" office:value-type="float" office:value="55536" calcext:value-type="float">
            <text:p>55536</text:p>
          </table:table-cell>
        </table:table-row>
        <table:table-row table:style-name="ro2">
          <table:table-cell table:style-name="ce215" office:value-type="float" office:value="23" calcext:value-type="float">
            <text:p>23</text:p>
          </table:table-cell>
          <table:table-cell table:style-name="ce20" office:value-type="float" office:value="6700.08602191018" calcext:value-type="float">
            <text:p>6700</text:p>
          </table:table-cell>
          <table:table-cell table:style-name="ce215" office:value-type="float" office:value="23" calcext:value-type="float">
            <text:p>23</text:p>
          </table:table-cell>
          <table:table-cell table:style-name="ce319" table:formula="of:=ASTROS.MONTEZUMA.CALCTOOLS.CALCFUNCTIONS.PYTHON.INTERPOLATIONIMPL.INTERPO([.C24];[.A$5:.A$34];[.B$5:.B$34])" office:value-type="float" office:value="6700.08602191018" calcext:value-type="float">
            <text:p>6700</text:p>
          </table:table-cell>
          <table:table-cell table:number-columns-repeated="32"/>
        </table:table-row>
        <table:table-row table:style-name="ro2">
          <table:table-cell table:style-name="ce215" office:value-type="float" office:value="24" calcext:value-type="float">
            <text:p>24</text:p>
          </table:table-cell>
          <table:table-cell table:style-name="ce20" office:value-type="float" office:value="7438.59209502838" calcext:value-type="float">
            <text:p>7439</text:p>
          </table:table-cell>
          <table:table-cell table:style-name="ce215" office:value-type="float" office:value="24" calcext:value-type="float">
            <text:p>24</text:p>
          </table:table-cell>
          <table:table-cell table:style-name="ce319" table:formula="of:=ASTROS.MONTEZUMA.CALCTOOLS.CALCFUNCTIONS.PYTHON.INTERPOLATIONIMPL.INTERPO([.C25];[.A$5:.A$34];[.B$5:.B$34])" office:value-type="float" office:value="7438.59209502838" calcext:value-type="float">
            <text:p>7439</text:p>
          </table:table-cell>
          <table:table-cell table:number-columns-repeated="32"/>
        </table:table-row>
        <table:table-row table:style-name="ro2">
          <table:table-cell table:style-name="ce215" office:value-type="float" office:value="25" calcext:value-type="float">
            <text:p>25</text:p>
          </table:table-cell>
          <table:table-cell table:style-name="ce20" office:value-type="float" office:value="8134.13492844253" calcext:value-type="float">
            <text:p>8134</text:p>
          </table:table-cell>
          <table:table-cell table:style-name="ce215" office:value-type="float" office:value="25" calcext:value-type="float">
            <text:p>25</text:p>
          </table:table-cell>
          <table:table-cell table:style-name="ce319" table:formula="of:=ASTROS.MONTEZUMA.CALCTOOLS.CALCFUNCTIONS.PYTHON.INTERPOLATIONIMPL.INTERPO([.C26];[.A$5:.A$34];[.B$5:.B$34])" office:value-type="float" office:value="8134.13492844253" calcext:value-type="float">
            <text:p>8134</text:p>
          </table:table-cell>
          <table:table-cell table:number-columns-repeated="32"/>
        </table:table-row>
        <table:table-row table:style-name="ro2">
          <table:table-cell table:style-name="ce215" office:value-type="float" office:value="26" calcext:value-type="float">
            <text:p>26</text:p>
          </table:table-cell>
          <table:table-cell table:style-name="ce20" office:value-type="float" office:value="8916.56829806061" calcext:value-type="float">
            <text:p>8917</text:p>
          </table:table-cell>
          <table:table-cell table:style-name="ce215" office:value-type="float" office:value="26" calcext:value-type="float">
            <text:p>26</text:p>
          </table:table-cell>
          <table:table-cell table:style-name="ce319" table:formula="of:=ASTROS.MONTEZUMA.CALCTOOLS.CALCFUNCTIONS.PYTHON.INTERPOLATIONIMPL.INTERPO([.C27];[.A$5:.A$34];[.B$5:.B$34])" office:value-type="float" office:value="8916.56829806061" calcext:value-type="float">
            <text:p>8917</text:p>
          </table:table-cell>
          <table:table-cell table:number-columns-repeated="32"/>
        </table:table-row>
        <table:table-row table:style-name="ro2">
          <table:table-cell table:style-name="ce215" office:value-type="float" office:value="27" calcext:value-type="float">
            <text:p>27</text:p>
          </table:table-cell>
          <table:table-cell table:style-name="ce20" office:value-type="float" office:value="9562.92629904945" calcext:value-type="float">
            <text:p>9563</text:p>
          </table:table-cell>
          <table:table-cell table:style-name="ce215" office:value-type="float" office:value="27" calcext:value-type="float">
            <text:p>27</text:p>
          </table:table-cell>
          <table:table-cell table:style-name="ce319" table:formula="of:=ASTROS.MONTEZUMA.CALCTOOLS.CALCFUNCTIONS.PYTHON.INTERPOLATIONIMPL.INTERPO([.C28];[.A$5:.A$34];[.B$5:.B$34])" office:value-type="float" office:value="9562.92629904945" calcext:value-type="float">
            <text:p>9563</text:p>
          </table:table-cell>
          <table:table-cell table:number-columns-repeated="32"/>
        </table:table-row>
        <table:table-row table:style-name="ro2">
          <table:table-cell table:style-name="ce215" office:value-type="float" office:value="28" calcext:value-type="float">
            <text:p>28</text:p>
          </table:table-cell>
          <table:table-cell table:style-name="ce20" office:value-type="float" office:value="10510.7643836016" calcext:value-type="float">
            <text:p>10511</text:p>
          </table:table-cell>
          <table:table-cell table:style-name="ce215" office:value-type="float" office:value="28" calcext:value-type="float">
            <text:p>28</text:p>
          </table:table-cell>
          <table:table-cell table:style-name="ce319" table:formula="of:=ASTROS.MONTEZUMA.CALCTOOLS.CALCFUNCTIONS.PYTHON.INTERPOLATIONIMPL.INTERPO([.C29];[.A$5:.A$34];[.B$5:.B$34])" office:value-type="float" office:value="10510.7643836016" calcext:value-type="float">
            <text:p>10511</text:p>
          </table:table-cell>
          <table:table-cell table:number-columns-repeated="32"/>
        </table:table-row>
        <table:table-row table:style-name="ro2">
          <table:table-cell table:style-name="ce215" office:value-type="float" office:value="29" calcext:value-type="float">
            <text:p>29</text:p>
          </table:table-cell>
          <table:table-cell table:style-name="ce20" office:value-type="float" office:value="11361.3345354016" calcext:value-type="float">
            <text:p>11361</text:p>
          </table:table-cell>
          <table:table-cell table:style-name="ce215" office:value-type="float" office:value="29" calcext:value-type="float">
            <text:p>29</text:p>
          </table:table-cell>
          <table:table-cell table:style-name="ce319" table:formula="of:=ASTROS.MONTEZUMA.CALCTOOLS.CALCFUNCTIONS.PYTHON.INTERPOLATIONIMPL.INTERPO([.C30];[.A$5:.A$34];[.B$5:.B$34])" office:value-type="float" office:value="11361.3345354016" calcext:value-type="float">
            <text:p>11361</text:p>
          </table:table-cell>
          <table:table-cell table:number-columns-repeated="32"/>
        </table:table-row>
        <table:table-row table:style-name="ro2">
          <table:table-cell table:style-name="ce215" office:value-type="float" office:value="30" calcext:value-type="float">
            <text:p>30</text:p>
          </table:table-cell>
          <table:table-cell table:style-name="ce20" office:value-type="float" office:value="12485.0336564085" calcext:value-type="float">
            <text:p>12485</text:p>
          </table:table-cell>
          <table:table-cell table:style-name="ce215" office:value-type="float" office:value="30" calcext:value-type="float">
            <text:p>30</text:p>
          </table:table-cell>
          <table:table-cell table:style-name="ce319" table:formula="of:=ASTROS.MONTEZUMA.CALCTOOLS.CALCFUNCTIONS.PYTHON.INTERPOLATIONIMPL.INTERPO([.C31];[.A$5:.A$34];[.B$5:.B$34])" office:value-type="float" office:value="12485.0336564085" calcext:value-type="float">
            <text:p>12485</text:p>
          </table:table-cell>
          <table:table-cell table:number-columns-repeated="32"/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5300" calcext:value-type="float">
            <text:p>25300</text:p>
          </table:table-cell>
          <table:table-cell table:style-name="ce225" office:value-type="float" office:value="38" calcext:value-type="float">
            <text:p>38.0</text:p>
          </table:table-cell>
          <table:table-cell table:style-name="ce319" table:formula="of:=ASTROS.MONTEZUMA.CALCTOOLS.CALCFUNCTIONS.PYTHON.INTERPOLATIONIMPL.INTERPO([.C32];[.A$5:.A$34];[.B$5:.B$34])" office:value-type="float" office:value="23876.1148507121" calcext:value-type="float">
            <text:p>23876</text:p>
          </table:table-cell>
          <table:table-cell table:number-columns-repeated="32"/>
        </table:table-row>
        <table:table-row table:style-name="ro2">
          <table:table-cell office:value-type="float" office:value="49.4" calcext:value-type="float">
            <text:p>49.4</text:p>
          </table:table-cell>
          <table:table-cell office:value-type="float" office:value="36900" calcext:value-type="float">
            <text:p>36900</text:p>
          </table:table-cell>
          <table:table-cell table:style-name="ce225" office:value-type="float" office:value="50" calcext:value-type="float">
            <text:p>50.0</text:p>
          </table:table-cell>
          <table:table-cell table:style-name="ce319" table:formula="of:=ASTROS.MONTEZUMA.CALCTOOLS.CALCFUNCTIONS.PYTHON.INTERPOLATIONIMPL.INTERPO([.C33];[.A$5:.A$34];[.B$5:.B$34])" office:value-type="float" office:value="37442.8078817734" calcext:value-type="float">
            <text:p>37443</text:p>
          </table:table-cell>
          <table:table-cell table:number-columns-repeated="32"/>
        </table:table-row>
        <table:table-row table:style-name="ro2">
          <table:table-cell office:value-type="float" office:value="69.7" calcext:value-type="float">
            <text:p>69.7</text:p>
          </table:table-cell>
          <table:table-cell office:value-type="float" office:value="55265" calcext:value-type="float">
            <text:p>55265</text:p>
          </table:table-cell>
          <table:table-cell table:style-name="ce225" office:value-type="float" office:value="70" calcext:value-type="float">
            <text:p>70.0</text:p>
          </table:table-cell>
          <table:table-cell table:style-name="ce319" table:formula="of:=ASTROS.MONTEZUMA.CALCTOOLS.CALCFUNCTIONS.PYTHON.INTERPOLATIONIMPL.INTERPO([.C34];[.A$5:.A$34];[.B$5:.B$34])" office:value-type="float" office:value="55536.4039408867" calcext:value-type="float">
            <text:p>55536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35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36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37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38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39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40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41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42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43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44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45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46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47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48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49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50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2"/>
          <table:table-cell table:style-name="ce225"/>
          <table:table-cell table:formula="of:=cubicspline([.C51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52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53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54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55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56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57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58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59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60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61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62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63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64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65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66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67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68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69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70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71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72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73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74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75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76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77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78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79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80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81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82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83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84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85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86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87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88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89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90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91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92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93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94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95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96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97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98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99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100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101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102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103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104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105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106];[.$A$5:.$A$107];[.$B$5:.$B$107])" office:value-type="string" office:string-value="" calcext:value-type="error">
            <text:p>#NAME?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cubicspline([.C107];[.$A$5:.$A$107];[.$B$5:.$B$107])" office:value-type="string" office:string-value="" calcext:value-type="error">
            <text:p>#NAME?</text:p>
          </table:table-cell>
          <table:table-cell table:number-columns-repeated="32"/>
        </table:table-row>
      </table:table>
      <table:named-expressions/>
      <table:database-ranges>
        <table:database-range table:name="__Anonymous_Sheet_DB__3" table:target-range-address="'Annex B Coincidence Limit'.R1:'Annex B Coincidence Limit'.R1"/>
        <table:database-range table:name="__Anonymous_Sheet_DB__4" table:target-range-address="'Annex B Coincidence Limit_2'.R1:'Annex B Coincidence Limit_2'.R1"/>
        <table:database-range table:name="__Anonymous_Sheet_DB__5" table:target-range-address="'Annex B Coincidence Limit_3'.R1:'Annex B Coincidence Limit_3'.R1"/>
        <table:database-range table:name="__Anonymous_Sheet_DB__15" table:target-range-address="'Interpolated Thresholds'.A4:'Interpolated Thresholds'.F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scientific-number number:decimal-places="1" number:min-decimal-places="1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1493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#dcdcdc" style:first-page-number="continue" style:scale-to="11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ISO11171:2020 Summary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17:53:03.0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use_20_6.9" style:display-name="PageStyle_Clause 6.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" style:display-name="PageStyle_Clause 6.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1" style:display-name="PageStyle_Clause 6.15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2" style:display-name="PageStyle_Clause 6.15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3" style:display-name="PageStyle_Clause 6.15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4T13:24:09.574000000</meta:creation-date>
    <dc:date>2025-06-06T20:03:55.045000000</dc:date>
    <meta:editing-duration>P7DT21H14M36S</meta:editing-duration>
    <meta:editing-cycles>333</meta:editing-cycles>
    <meta:generator>LibreOffice/7.6.4.1$Windows_X86_64 LibreOffice_project/e19e193f88cd6c0525a17fb7a176ed8e6a3e2aa1</meta:generator>
    <dc:title>ISO111171:2020</dc:title>
    <meta:document-statistic meta:table-count="17" meta:cell-count="13014" meta:object-count="1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3cm" svg:height="11.415cm" xlink:href=".." xlink:type="simple" chart:class="chart:scatter" chart:column-mapping="0 0" chart:style-name="ch1">
        <chart:plot-area chart:style-name="ch2" table:cell-range-address="'Calibration Curve'.C5:'Calibration Curve'.D34" chart:data-source-has-labels="column" svg:x="1.394cm" svg:y="0.228cm" svg:width="18.494cm" svg:height="10cm">
          <chart:coordinate-region svg:x="2.824cm" svg:y="0.426cm" svg:width="16.866cm" svg:height="9.158cm"/>
          <chart:axis chart:dimension="x" chart:name="primary-x" chart:style-name="ch3" chartooo:axis-type="auto">
            <chart:title svg:x="10.176cm" svg:y="10.456cm" chart:style-name="ch4">
              <text:p>um(c)</text:p>
            </chart:title>
            <chart:categories table:cell-range-address="'Calibration Curve'.D5:'Calibration Curve'.D34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6.011cm" chart:style-name="ch8">
              <text:p>Threshold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Calibration Curve'.D5:'Calibration Curve'.D34" chart:class="chart:scatter">
            <chart:domain table:cell-range-address="'Calibration Curve'.C5:'Calibration Curve'.C34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88.318589331367">
                <text:p>188.318589331367</text:p>
                <draw:g>
                  <svg:desc>'Calibration Curve'.D5:'Calibration Curve'.D34</svg:desc>
                </draw:g>
              </table:table-cell>
              <table:table-cell office:value-type="float" office:value="4">
                <text:p>4</text:p>
                <draw:g>
                  <svg:desc>'Calibration Curve'.C5:'Calibration Curve'.C34</svg:desc>
                </draw:g>
              </table:table-cell>
              <table:table-cell office:value-type="float" office:value="188.318589331367">
                <text:p>188.318589331367</text:p>
                <draw:g>
                  <svg:desc>'Calibration Curve'.D5:'Calibration Curve'.D34</svg:desc>
                </draw:g>
              </table:table-cell>
            </table:table-row>
            <table:table-row>
              <table:table-cell office:value-type="float" office:value="312.033559483167">
                <text:p>312.033559483167</text:p>
              </table:table-cell>
              <table:table-cell office:value-type="float" office:value="5">
                <text:p>5</text:p>
              </table:table-cell>
              <table:table-cell office:value-type="float" office:value="312.033559483167">
                <text:p>312.033559483167</text:p>
              </table:table-cell>
            </table:table-row>
            <table:table-row>
              <table:table-cell office:value-type="float" office:value="482.816244384237">
                <text:p>482.816244384237</text:p>
              </table:table-cell>
              <table:table-cell office:value-type="float" office:value="6">
                <text:p>6</text:p>
              </table:table-cell>
              <table:table-cell office:value-type="float" office:value="482.816244384237">
                <text:p>482.816244384237</text:p>
              </table:table-cell>
            </table:table-row>
            <table:table-row>
              <table:table-cell office:value-type="float" office:value="680.18360643853">
                <text:p>680.18360643853</text:p>
              </table:table-cell>
              <table:table-cell office:value-type="float" office:value="7">
                <text:p>7</text:p>
              </table:table-cell>
              <table:table-cell office:value-type="float" office:value="680.18360643853">
                <text:p>680.18360643853</text:p>
              </table:table-cell>
            </table:table-row>
            <table:table-row>
              <table:table-cell office:value-type="float" office:value="873.315603871514">
                <text:p>873.315603871514</text:p>
              </table:table-cell>
              <table:table-cell office:value-type="float" office:value="8">
                <text:p>8</text:p>
              </table:table-cell>
              <table:table-cell office:value-type="float" office:value="873.315603871514">
                <text:p>873.315603871514</text:p>
              </table:table-cell>
            </table:table-row>
            <table:table-row>
              <table:table-cell office:value-type="float" office:value="1102.82007981173">
                <text:p>1102.82007981173</text:p>
              </table:table-cell>
              <table:table-cell office:value-type="float" office:value="9">
                <text:p>9</text:p>
              </table:table-cell>
              <table:table-cell office:value-type="float" office:value="1102.82007981173">
                <text:p>1102.82007981173</text:p>
              </table:table-cell>
            </table:table-row>
            <table:table-row>
              <table:table-cell office:value-type="float" office:value="1393.24835073955">
                <text:p>1393.24835073955</text:p>
              </table:table-cell>
              <table:table-cell office:value-type="float" office:value="10">
                <text:p>10</text:p>
              </table:table-cell>
              <table:table-cell office:value-type="float" office:value="1393.24835073955">
                <text:p>1393.24835073955</text:p>
              </table:table-cell>
            </table:table-row>
            <table:table-row>
              <table:table-cell office:value-type="float" office:value="1709.02195206891">
                <text:p>1709.02195206891</text:p>
              </table:table-cell>
              <table:table-cell office:value-type="float" office:value="11">
                <text:p>11</text:p>
              </table:table-cell>
              <table:table-cell office:value-type="float" office:value="1709.02195206891">
                <text:p>1709.02195206891</text:p>
              </table:table-cell>
            </table:table-row>
            <table:table-row>
              <table:table-cell office:value-type="float" office:value="2031.80702870523">
                <text:p>2031.80702870523</text:p>
              </table:table-cell>
              <table:table-cell office:value-type="float" office:value="12">
                <text:p>12</text:p>
              </table:table-cell>
              <table:table-cell office:value-type="float" office:value="2031.80702870523">
                <text:p>2031.80702870523</text:p>
              </table:table-cell>
            </table:table-row>
            <table:table-row>
              <table:table-cell office:value-type="float" office:value="2386.03478277541">
                <text:p>2386.03478277541</text:p>
              </table:table-cell>
              <table:table-cell office:value-type="float" office:value="13">
                <text:p>13</text:p>
              </table:table-cell>
              <table:table-cell office:value-type="float" office:value="2386.03478277541">
                <text:p>2386.03478277541</text:p>
              </table:table-cell>
            </table:table-row>
            <table:table-row>
              <table:table-cell office:value-type="float" office:value="2752.45456383348">
                <text:p>2752.45456383348</text:p>
              </table:table-cell>
              <table:table-cell office:value-type="float" office:value="14">
                <text:p>14</text:p>
              </table:table-cell>
              <table:table-cell office:value-type="float" office:value="2752.45456383348">
                <text:p>2752.45456383348</text:p>
              </table:table-cell>
            </table:table-row>
            <table:table-row>
              <table:table-cell office:value-type="float" office:value="3110.42553957305">
                <text:p>3110.42553957305</text:p>
              </table:table-cell>
              <table:table-cell office:value-type="float" office:value="15">
                <text:p>15</text:p>
              </table:table-cell>
              <table:table-cell office:value-type="float" office:value="3110.42553957305">
                <text:p>3110.42553957305</text:p>
              </table:table-cell>
            </table:table-row>
            <table:table-row>
              <table:table-cell office:value-type="float" office:value="3447.74487911428">
                <text:p>3447.74487911428</text:p>
              </table:table-cell>
              <table:table-cell office:value-type="float" office:value="16">
                <text:p>16</text:p>
              </table:table-cell>
              <table:table-cell office:value-type="float" office:value="3447.74487911428">
                <text:p>3447.74487911428</text:p>
              </table:table-cell>
            </table:table-row>
            <table:table-row>
              <table:table-cell office:value-type="float" office:value="3832.91169260351">
                <text:p>3832.91169260351</text:p>
              </table:table-cell>
              <table:table-cell office:value-type="float" office:value="17">
                <text:p>17</text:p>
              </table:table-cell>
              <table:table-cell office:value-type="float" office:value="3832.91169260351">
                <text:p>3832.91169260351</text:p>
              </table:table-cell>
            </table:table-row>
            <table:table-row>
              <table:table-cell office:value-type="float" office:value="4172.02887420126">
                <text:p>4172.02887420126</text:p>
              </table:table-cell>
              <table:table-cell office:value-type="float" office:value="18">
                <text:p>18</text:p>
              </table:table-cell>
              <table:table-cell office:value-type="float" office:value="4172.02887420126">
                <text:p>4172.02887420126</text:p>
              </table:table-cell>
            </table:table-row>
            <table:table-row>
              <table:table-cell office:value-type="float" office:value="4591.79587493309">
                <text:p>4591.79587493309</text:p>
              </table:table-cell>
              <table:table-cell office:value-type="float" office:value="19">
                <text:p>19</text:p>
              </table:table-cell>
              <table:table-cell office:value-type="float" office:value="4591.79587493309">
                <text:p>4591.79587493309</text:p>
              </table:table-cell>
            </table:table-row>
            <table:table-row>
              <table:table-cell office:value-type="float" office:value="5017.43902534352">
                <text:p>5017.43902534352</text:p>
              </table:table-cell>
              <table:table-cell office:value-type="float" office:value="20">
                <text:p>20</text:p>
              </table:table-cell>
              <table:table-cell office:value-type="float" office:value="5017.43902534352">
                <text:p>5017.43902534352</text:p>
              </table:table-cell>
            </table:table-row>
            <table:table-row>
              <table:table-cell office:value-type="float" office:value="5523.31512323884">
                <text:p>5523.31512323884</text:p>
              </table:table-cell>
              <table:table-cell office:value-type="float" office:value="21">
                <text:p>21</text:p>
              </table:table-cell>
              <table:table-cell office:value-type="float" office:value="5523.31512323884">
                <text:p>5523.31512323884</text:p>
              </table:table-cell>
            </table:table-row>
            <table:table-row>
              <table:table-cell office:value-type="float" office:value="6088.49874505642">
                <text:p>6088.49874505642</text:p>
              </table:table-cell>
              <table:table-cell office:value-type="float" office:value="22">
                <text:p>22</text:p>
              </table:table-cell>
              <table:table-cell office:value-type="float" office:value="6088.49874505642">
                <text:p>6088.49874505642</text:p>
              </table:table-cell>
            </table:table-row>
            <table:table-row>
              <table:table-cell office:value-type="float" office:value="6700.08602191018">
                <text:p>6700.08602191018</text:p>
              </table:table-cell>
              <table:table-cell office:value-type="float" office:value="23">
                <text:p>23</text:p>
              </table:table-cell>
              <table:table-cell office:value-type="float" office:value="6700.08602191018">
                <text:p>6700.08602191018</text:p>
              </table:table-cell>
            </table:table-row>
            <table:table-row>
              <table:table-cell office:value-type="float" office:value="7438.59209502838">
                <text:p>7438.59209502838</text:p>
              </table:table-cell>
              <table:table-cell office:value-type="float" office:value="24">
                <text:p>24</text:p>
              </table:table-cell>
              <table:table-cell office:value-type="float" office:value="7438.59209502838">
                <text:p>7438.59209502838</text:p>
              </table:table-cell>
            </table:table-row>
            <table:table-row>
              <table:table-cell office:value-type="float" office:value="8134.13492844253">
                <text:p>8134.13492844253</text:p>
              </table:table-cell>
              <table:table-cell office:value-type="float" office:value="25">
                <text:p>25</text:p>
              </table:table-cell>
              <table:table-cell office:value-type="float" office:value="8134.13492844253">
                <text:p>8134.13492844253</text:p>
              </table:table-cell>
            </table:table-row>
            <table:table-row>
              <table:table-cell office:value-type="float" office:value="8916.56829806061">
                <text:p>8916.56829806061</text:p>
              </table:table-cell>
              <table:table-cell office:value-type="float" office:value="26">
                <text:p>26</text:p>
              </table:table-cell>
              <table:table-cell office:value-type="float" office:value="8916.56829806061">
                <text:p>8916.56829806061</text:p>
              </table:table-cell>
            </table:table-row>
            <table:table-row>
              <table:table-cell office:value-type="float" office:value="9562.92629904945">
                <text:p>9562.92629904945</text:p>
              </table:table-cell>
              <table:table-cell office:value-type="float" office:value="27">
                <text:p>27</text:p>
              </table:table-cell>
              <table:table-cell office:value-type="float" office:value="9562.92629904945">
                <text:p>9562.92629904945</text:p>
              </table:table-cell>
            </table:table-row>
            <table:table-row>
              <table:table-cell office:value-type="float" office:value="10510.7643836016">
                <text:p>10510.7643836016</text:p>
              </table:table-cell>
              <table:table-cell office:value-type="float" office:value="28">
                <text:p>28</text:p>
              </table:table-cell>
              <table:table-cell office:value-type="float" office:value="10510.7643836016">
                <text:p>10510.7643836016</text:p>
              </table:table-cell>
            </table:table-row>
            <table:table-row>
              <table:table-cell office:value-type="float" office:value="11361.3345354016">
                <text:p>11361.3345354016</text:p>
              </table:table-cell>
              <table:table-cell office:value-type="float" office:value="29">
                <text:p>29</text:p>
              </table:table-cell>
              <table:table-cell office:value-type="float" office:value="11361.3345354016">
                <text:p>11361.3345354016</text:p>
              </table:table-cell>
            </table:table-row>
            <table:table-row>
              <table:table-cell office:value-type="float" office:value="12485.0336564085">
                <text:p>12485.0336564085</text:p>
              </table:table-cell>
              <table:table-cell office:value-type="float" office:value="30">
                <text:p>30</text:p>
              </table:table-cell>
              <table:table-cell office:value-type="float" office:value="12485.0336564085">
                <text:p>12485.0336564085</text:p>
              </table:table-cell>
            </table:table-row>
            <table:table-row>
              <table:table-cell office:value-type="float" office:value="23876.1148507121">
                <text:p>23876.1148507121</text:p>
              </table:table-cell>
              <table:table-cell office:value-type="float" office:value="38">
                <text:p>38</text:p>
              </table:table-cell>
              <table:table-cell office:value-type="float" office:value="23876.1148507121">
                <text:p>23876.1148507121</text:p>
              </table:table-cell>
            </table:table-row>
            <table:table-row>
              <table:table-cell office:value-type="float" office:value="37442.8078817734">
                <text:p>37442.8078817734</text:p>
              </table:table-cell>
              <table:table-cell office:value-type="float" office:value="50">
                <text:p>50</text:p>
              </table:table-cell>
              <table:table-cell office:value-type="float" office:value="37442.8078817734">
                <text:p>37442.8078817734</text:p>
              </table:table-cell>
            </table:table-row>
            <table:table-row>
              <table:table-cell office:value-type="float" office:value="55536.4039408867">
                <text:p>55536.4039408867</text:p>
              </table:table-cell>
              <table:table-cell office:value-type="float" office:value="70">
                <text:p>70</text:p>
              </table:table-cell>
              <table:table-cell office:value-type="float" office:value="55536.4039408867">
                <text:p>55536.4039408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3cm" svg:height="10.779cm" xlink:href=".." xlink:type="simple" chart:class="chart:scatter" chart:style-name="ch1">
        <chart:legend chart:legend-position="end" svg:x="16.79cm" svg:y="4.844cm" style:legend-expansion="high" chart:style-name="ch2"/>
        <chart:plot-area chart:style-name="ch3" table:cell-range-address="'Annex D Resolution'.L2:'Annex D Resolution'.N1002 'Annex D Resolution'.M1:'Annex D Resolution'.N1" chart:data-source-has-labels="row" svg:x="0.383cm" svg:y="0.215cm" svg:width="16.024cm" svg:height="10.349cm">
          <chart:coordinate-region svg:x="1.42cm" svg:y="0.413cm" svg:width="14.592cm" svg:height="9.5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nex D Resolution'.M2:'Annex D Resolution'.M1002" chart:label-cell-address="'Annex D Resolution'.M1:'Annex D Resolution'.M1" chart:class="chart:scatter">
            <chart:domain table:cell-range-address="'Annex D Resolution'.L2:'Annex D Resolution'.L1002"/>
            <chart:data-point chart:repeated="1001"/>
          </chart:series>
          <chart:series chart:style-name="ch8" chart:values-cell-range-address="'Annex D Resolution'.N2:'Annex D Resolution'.N1002" chart:label-cell-address="'Annex D Resolution'.N1:'Annex D Resolution'.N1" chart:class="chart:scatte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p.height</text:p>
                <draw:g>
                  <svg:desc>'Annex D Resolution'.M1:'Annex D Resolution'.M1</svg:desc>
                </draw:g>
              </table:table-cell>
              <table:table-cell office:value-type="string">
                <text:p>Average</text:p>
                <draw:g>
                  <svg:desc>'Annex D Resolution'.N1:'Annex D Resolution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D Resolution'.L2:'Annex D Resolution'.L1002</svg:desc>
                </draw:g>
              </table:table-cell>
              <table:table-cell office:value-type="float" office:value="0">
                <text:p>0</text:p>
                <draw:g>
                  <svg:desc>'Annex D Resolution'.M2:'Annex D Resolution'.M1002</svg:desc>
                </draw:g>
              </table:table-cell>
              <table:table-cell office:value-type="float" office:value="0">
                <text:p>0</text:p>
                <draw:g>
                  <svg:desc>'Annex D Resolution'.N2:'Annex D Resolution'.N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2">
                <text:p>12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8">
                <text:p>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6">
                <text:p>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">
                <text:p>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6">
                <text:p>6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8">
                <text:p>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9">
                <text:p>9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7">
                <text:p>7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">
                <text:p>7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">
                <text:p>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5">
                <text:p>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">
                <text:p>6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8">
                <text:p>8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">
                <text:p>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7">
                <text:p>7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2">
                <text:p>12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6">
                <text:p>6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6">
                <text:p>6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9">
                <text:p>9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">
                <text:p>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9">
                <text:p>9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8">
                <text:p>8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">
                <text:p>4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4">
                <text:p>4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5">
                <text:p>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4">
                <text:p>4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6">
                <text:p>6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5">
                <text:p>5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5">
                <text:p>15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">
                <text:p>6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4">
                <text:p>4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5">
                <text:p>5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6">
                <text:p>6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8">
                <text:p>8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9">
                <text:p>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5">
                <text:p>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">
                <text:p>10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0">
                <text:p>10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5">
                <text:p>5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9">
                <text:p>9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5">
                <text:p>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9">
                <text:p>9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7">
                <text:p>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">
                <text:p>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0">
                <text:p>10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6">
                <text:p>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7">
                <text:p>7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">
                <text:p>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6">
                <text:p>6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6">
                <text:p>6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6">
                <text:p>6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">
                <text:p>9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0">
                <text:p>10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8">
                <text:p>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0">
                <text:p>10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5">
                <text:p>15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0">
                <text:p>10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6">
                <text:p>16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2">
                <text:p>12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6">
                <text:p>16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1">
                <text:p>11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1">
                <text:p>11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0">
                <text:p>10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6">
                <text:p>16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3">
                <text:p>13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1">
                <text:p>11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6">
                <text:p>16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5">
                <text:p>1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7">
                <text:p>17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7">
                <text:p>17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6">
                <text:p>16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22">
                <text:p>22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7">
                <text:p>17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5">
                <text:p>2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6">
                <text:p>16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0">
                <text:p>20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20">
                <text:p>20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1">
                <text:p>31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7">
                <text:p>27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21">
                <text:p>21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27">
                <text:p>2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3">
                <text:p>33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2">
                <text:p>32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9">
                <text:p>2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0">
                <text:p>30</text:p>
              </table:table-cell>
              <table:table-cell office:value-type="float" office:value="35.125">
                <text:p>35.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8">
                <text:p>38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5">
                <text:p>35</text:p>
              </table:table-cell>
              <table:table-cell office:value-type="float" office:value="37.875">
                <text:p>37.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45">
                <text:p>45</text:p>
              </table:table-cell>
              <table:table-cell office:value-type="float" office:value="39.125">
                <text:p>39.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46">
                <text:p>46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8">
                <text:p>28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52">
                <text:p>52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47">
                <text:p>47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62">
                <text:p>6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59">
                <text:p>59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48">
                <text:p>48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62">
                <text:p>62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58">
                <text:p>58</text:p>
              </table:table-cell>
              <table:table-cell office:value-type="float" office:value="61.875">
                <text:p>61.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57">
                <text:p>57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65">
                <text:p>65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77">
                <text:p>7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67">
                <text:p>67</text:p>
              </table:table-cell>
              <table:table-cell office:value-type="float" office:value="74.375">
                <text:p>74.3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81">
                <text:p>81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80">
                <text:p>80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62">
                <text:p>62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86">
                <text:p>86</text:p>
              </table:table-cell>
              <table:table-cell office:value-type="float" office:value="84.125">
                <text:p>84.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0">
                <text:p>100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77">
                <text:p>77</text:p>
              </table:table-cell>
              <table:table-cell office:value-type="float" office:value="88.375">
                <text:p>88.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96">
                <text:p>96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98">
                <text:p>98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97">
                <text:p>97</text:p>
              </table:table-cell>
              <table:table-cell office:value-type="float" office:value="104.375">
                <text:p>104.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15">
                <text:p>115</text:p>
              </table:table-cell>
              <table:table-cell office:value-type="float" office:value="108.875">
                <text:p>108.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06">
                <text:p>106</text:p>
              </table:table-cell>
              <table:table-cell office:value-type="float" office:value="114.625">
                <text:p>114.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14">
                <text:p>114</text:p>
              </table:table-cell>
              <table:table-cell office:value-type="float" office:value="123.375">
                <text:p>123.3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27">
                <text:p>127</text:p>
              </table:table-cell>
              <table:table-cell office:value-type="float" office:value="126.875">
                <text:p>126.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42">
                <text:p>142</text:p>
              </table:table-cell>
              <table:table-cell office:value-type="float" office:value="132.125">
                <text:p>132.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17">
                <text:p>117</text:p>
              </table:table-cell>
              <table:table-cell office:value-type="float" office:value="139.125">
                <text:p>139.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48">
                <text:p>148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43">
                <text:p>143</text:p>
              </table:table-cell>
              <table:table-cell office:value-type="float" office:value="154.25">
                <text:p>154.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48">
                <text:p>148</text:p>
              </table:table-cell>
              <table:table-cell office:value-type="float" office:value="158.75">
                <text:p>158.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74">
                <text:p>174</text:p>
              </table:table-cell>
              <table:table-cell office:value-type="float" office:value="168.125">
                <text:p>168.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81">
                <text:p>181</text:p>
              </table:table-cell>
              <table:table-cell office:value-type="float" office:value="175.875">
                <text:p>175.8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81">
                <text:p>181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78">
                <text:p>178</text:p>
              </table:table-cell>
              <table:table-cell office:value-type="float" office:value="190.875">
                <text:p>190.8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92">
                <text:p>192</text:p>
              </table:table-cell>
              <table:table-cell office:value-type="float" office:value="196.75">
                <text:p>196.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210">
                <text:p>210</text:p>
              </table:table-cell>
              <table:table-cell office:value-type="float" office:value="202.375">
                <text:p>202.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218">
                <text:p>218</text:p>
              </table:table-cell>
              <table:table-cell office:value-type="float" office:value="213.625">
                <text:p>213.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93">
                <text:p>193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221">
                <text:p>22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226">
                <text:p>226</text:p>
              </table:table-cell>
              <table:table-cell office:value-type="float" office:value="232.875">
                <text:p>232.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271">
                <text:p>271</text:p>
              </table:table-cell>
              <table:table-cell office:value-type="float" office:value="240.625">
                <text:p>240.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233">
                <text:p>233</text:p>
              </table:table-cell>
              <table:table-cell office:value-type="float" office:value="251.25">
                <text:p>251.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260">
                <text:p>260</text:p>
              </table:table-cell>
              <table:table-cell office:value-type="float" office:value="258.125">
                <text:p>258.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241">
                <text:p>241</text:p>
              </table:table-cell>
              <table:table-cell office:value-type="float" office:value="264.5">
                <text:p>264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280">
                <text:p>280</text:p>
              </table:table-cell>
              <table:table-cell office:value-type="float" office:value="268.125">
                <text:p>268.1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276">
                <text:p>276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277">
                <text:p>277</text:p>
              </table:table-cell>
              <table:table-cell office:value-type="float" office:value="296.875">
                <text:p>296.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00">
                <text:p>300</text:p>
              </table:table-cell>
              <table:table-cell office:value-type="float" office:value="302.125">
                <text:p>302.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20">
                <text:p>320</text:p>
              </table:table-cell>
              <table:table-cell office:value-type="float" office:value="307.75">
                <text:p>307.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20">
                <text:p>320</text:p>
              </table:table-cell>
              <table:table-cell office:value-type="float" office:value="319.875">
                <text:p>319.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24">
                <text:p>324</text:p>
              </table:table-cell>
              <table:table-cell office:value-type="float" office:value="329.75">
                <text:p>329.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322">
                <text:p>322</text:p>
              </table:table-cell>
              <table:table-cell office:value-type="float" office:value="340.75">
                <text:p>340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23">
                <text:p>323</text:p>
              </table:table-cell>
              <table:table-cell office:value-type="float" office:value="350.625">
                <text:p>350.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73">
                <text:p>373</text:p>
              </table:table-cell>
              <table:table-cell office:value-type="float" office:value="361.125">
                <text:p>361.1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356">
                <text:p>356</text:p>
              </table:table-cell>
              <table:table-cell office:value-type="float" office:value="371.625">
                <text:p>371.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388">
                <text:p>388</text:p>
              </table:table-cell>
              <table:table-cell office:value-type="float" office:value="381.75">
                <text:p>381.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399">
                <text:p>399</text:p>
              </table:table-cell>
              <table:table-cell office:value-type="float" office:value="392.125">
                <text:p>392.1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404">
                <text:p>404</text:p>
              </table:table-cell>
              <table:table-cell office:value-type="float" office:value="394.25">
                <text:p>394.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403">
                <text:p>403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  <table:table-cell office:value-type="float" office:value="424.875">
                <text:p>424.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390">
                <text:p>390</text:p>
              </table:table-cell>
              <table:table-cell office:value-type="float" office:value="433.875">
                <text:p>433.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452">
                <text:p>452</text:p>
              </table:table-cell>
              <table:table-cell office:value-type="float" office:value="445.75">
                <text:p>445.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440">
                <text:p>440</text:p>
              </table:table-cell>
              <table:table-cell office:value-type="float" office:value="457.75">
                <text:p>457.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96">
                <text:p>496</text:p>
              </table:table-cell>
              <table:table-cell office:value-type="float" office:value="473.5">
                <text:p>473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476">
                <text:p>476</text:p>
              </table:table-cell>
              <table:table-cell office:value-type="float" office:value="486.625">
                <text:p>486.6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503">
                <text:p>503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499">
                <text:p>499</text:p>
              </table:table-cell>
              <table:table-cell office:value-type="float" office:value="508.75">
                <text:p>508.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532">
                <text:p>532</text:p>
              </table:table-cell>
              <table:table-cell office:value-type="float" office:value="517.75">
                <text:p>517.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495">
                <text:p>495</text:p>
              </table:table-cell>
              <table:table-cell office:value-type="float" office:value="529.25">
                <text:p>529.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521">
                <text:p>521</text:p>
              </table:table-cell>
              <table:table-cell office:value-type="float" office:value="536.75">
                <text:p>536.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48">
                <text:p>54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68">
                <text:p>568</text:p>
              </table:table-cell>
              <table:table-cell office:value-type="float" office:value="552.375">
                <text:p>552.3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568">
                <text:p>568</text:p>
              </table:table-cell>
              <table:table-cell office:value-type="float" office:value="571.875">
                <text:p>571.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563">
                <text:p>563</text:p>
              </table:table-cell>
              <table:table-cell office:value-type="float" office:value="582.125">
                <text:p>582.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589">
                <text:p>589</text:p>
              </table:table-cell>
              <table:table-cell office:value-type="float" office:value="589.125">
                <text:p>589.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67">
                <text:p>567</text:p>
              </table:table-cell>
              <table:table-cell office:value-type="float" office:value="599.625">
                <text:p>599.6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651">
                <text:p>651</text:p>
              </table:table-cell>
              <table:table-cell office:value-type="float" office:value="611.375">
                <text:p>611.3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603">
                <text:p>603</text:p>
              </table:table-cell>
              <table:table-cell office:value-type="float" office:value="622.625">
                <text:p>622.6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604">
                <text:p>604</text:p>
              </table:table-cell>
              <table:table-cell office:value-type="float" office:value="632.375">
                <text:p>632.3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652">
                <text:p>65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662">
                <text:p>662</text:p>
              </table:table-cell>
              <table:table-cell office:value-type="float" office:value="652.625">
                <text:p>652.6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653">
                <text:p>653</text:p>
              </table:table-cell>
              <table:table-cell office:value-type="float" office:value="672.25">
                <text:p>672.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667">
                <text:p>667</text:p>
              </table:table-cell>
              <table:table-cell office:value-type="float" office:value="685.875">
                <text:p>685.8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676">
                <text:p>676</text:p>
              </table:table-cell>
              <table:table-cell office:value-type="float" office:value="688.375">
                <text:p>688.3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704">
                <text:p>70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760">
                <text:p>76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713">
                <text:p>713</text:p>
              </table:table-cell>
              <table:table-cell office:value-type="float" office:value="733.375">
                <text:p>733.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672">
                <text:p>672</text:p>
              </table:table-cell>
              <table:table-cell office:value-type="float" office:value="747.875">
                <text:p>747.8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739">
                <text:p>739</text:p>
              </table:table-cell>
              <table:table-cell office:value-type="float" office:value="751.875">
                <text:p>751.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805">
                <text:p>805</text:p>
              </table:table-cell>
              <table:table-cell office:value-type="float" office:value="755.875">
                <text:p>755.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798">
                <text:p>798</text:p>
              </table:table-cell>
              <table:table-cell office:value-type="float" office:value="767.125">
                <text:p>767.1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792">
                <text:p>792</text:p>
              </table:table-cell>
              <table:table-cell office:value-type="float" office:value="785.875">
                <text:p>785.8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736">
                <text:p>736</text:p>
              </table:table-cell>
              <table:table-cell office:value-type="float" office:value="801.125">
                <text:p>801.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792">
                <text:p>792</text:p>
              </table:table-cell>
              <table:table-cell office:value-type="float" office:value="806.875">
                <text:p>806.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803">
                <text:p>803</text:p>
              </table:table-cell>
              <table:table-cell office:value-type="float" office:value="813.25">
                <text:p>813.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822">
                <text:p>822</text:p>
              </table:table-cell>
              <table:table-cell office:value-type="float" office:value="816.875">
                <text:p>816.8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861">
                <text:p>861</text:p>
              </table:table-cell>
              <table:table-cell office:value-type="float" office:value="829.5">
                <text:p>829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851">
                <text:p>851</text:p>
              </table:table-cell>
              <table:table-cell office:value-type="float" office:value="841.5">
                <text:p>841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849">
                <text:p>849</text:p>
              </table:table-cell>
              <table:table-cell office:value-type="float" office:value="851.875">
                <text:p>851.8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821">
                <text:p>821</text:p>
              </table:table-cell>
              <table:table-cell office:value-type="float" office:value="860.375">
                <text:p>860.3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837">
                <text:p>837</text:p>
              </table:table-cell>
              <table:table-cell office:value-type="float" office:value="859.75">
                <text:p>859.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888">
                <text:p>888</text:p>
              </table:table-cell>
              <table:table-cell office:value-type="float" office:value="865.375">
                <text:p>865.3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886">
                <text:p>886</text:p>
              </table:table-cell>
              <table:table-cell office:value-type="float" office:value="869.75">
                <text:p>869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890">
                <text:p>890</text:p>
              </table:table-cell>
              <table:table-cell office:value-type="float" office:value="877.375">
                <text:p>877.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856">
                <text:p>856</text:p>
              </table:table-cell>
              <table:table-cell office:value-type="float" office:value="884.125">
                <text:p>884.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896">
                <text:p>89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884">
                <text:p>884</text:p>
              </table:table-cell>
              <table:table-cell office:value-type="float" office:value="892.5">
                <text:p>89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882">
                <text:p>882</text:p>
              </table:table-cell>
              <table:table-cell office:value-type="float" office:value="892.375">
                <text:p>892.3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891">
                <text:p>891</text:p>
              </table:table-cell>
              <table:table-cell office:value-type="float" office:value="899.25">
                <text:p>899.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951">
                <text:p>95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890">
                <text:p>890</text:p>
              </table:table-cell>
              <table:table-cell office:value-type="float" office:value="905.5">
                <text:p>905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889">
                <text:p>889</text:p>
              </table:table-cell>
              <table:table-cell office:value-type="float" office:value="911.75">
                <text:p>911.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911">
                <text:p>911</text:p>
              </table:table-cell>
              <table:table-cell office:value-type="float" office:value="915.875">
                <text:p>915.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974">
                <text:p>974</text:p>
              </table:table-cell>
              <table:table-cell office:value-type="float" office:value="910.75">
                <text:p>910.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856">
                <text:p>856</text:p>
              </table:table-cell>
              <table:table-cell office:value-type="float" office:value="915.375">
                <text:p>915.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932">
                <text:p>932</text:p>
              </table:table-cell>
              <table:table-cell office:value-type="float" office:value="928.875">
                <text:p>928.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924">
                <text:p>924</text:p>
              </table:table-cell>
              <table:table-cell office:value-type="float" office:value="938.375">
                <text:p>938.3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910">
                <text:p>910</text:p>
              </table:table-cell>
              <table:table-cell office:value-type="float" office:value="934.875">
                <text:p>934.8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927">
                <text:p>927</text:p>
              </table:table-cell>
              <table:table-cell office:value-type="float" office:value="949.875">
                <text:p>949.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997">
                <text:p>997</text:p>
              </table:table-cell>
              <table:table-cell office:value-type="float" office:value="944.75">
                <text:p>944.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987">
                <text:p>987</text:p>
              </table:table-cell>
              <table:table-cell office:value-type="float" office:value="952.25">
                <text:p>952.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946">
                <text:p>946</text:p>
              </table:table-cell>
              <table:table-cell office:value-type="float" office:value="957.375">
                <text:p>957.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976">
                <text:p>976</text:p>
              </table:table-cell>
              <table:table-cell office:value-type="float" office:value="964.5">
                <text:p>964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891">
                <text:p>891</text:p>
              </table:table-cell>
              <table:table-cell office:value-type="float" office:value="961.5">
                <text:p>961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984">
                <text:p>984</text:p>
              </table:table-cell>
              <table:table-cell office:value-type="float" office:value="955.625">
                <text:p>955.6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951">
                <text:p>951</text:p>
              </table:table-cell>
              <table:table-cell office:value-type="float" office:value="961.125">
                <text:p>961.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984">
                <text:p>984</text:p>
              </table:table-cell>
              <table:table-cell office:value-type="float" office:value="963.375">
                <text:p>963.3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973">
                <text:p>973</text:p>
              </table:table-cell>
              <table:table-cell office:value-type="float" office:value="971.75">
                <text:p>971.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940">
                <text:p>940</text:p>
              </table:table-cell>
              <table:table-cell office:value-type="float" office:value="971.375">
                <text:p>971.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990">
                <text:p>990</text:p>
              </table:table-cell>
              <table:table-cell office:value-type="float" office:value="974.5">
                <text:p>974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994">
                <text:p>994</text:p>
              </table:table-cell>
              <table:table-cell office:value-type="float" office:value="970.875">
                <text:p>970.8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958">
                <text:p>958</text:p>
              </table:table-cell>
              <table:table-cell office:value-type="float" office:value="962.5">
                <text:p>962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981">
                <text:p>981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976">
                <text:p>976</text:p>
              </table:table-cell>
              <table:table-cell office:value-type="float" office:value="960.25">
                <text:p>960.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955">
                <text:p>955</text:p>
              </table:table-cell>
              <table:table-cell office:value-type="float" office:value="956.375">
                <text:p>956.3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906">
                <text:p>906</text:p>
              </table:table-cell>
              <table:table-cell office:value-type="float" office:value="953.125">
                <text:p>953.1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976">
                <text:p>976</text:p>
              </table:table-cell>
              <table:table-cell office:value-type="float" office:value="945.25">
                <text:p>945.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936">
                <text:p>936</text:p>
              </table:table-cell>
              <table:table-cell office:value-type="float" office:value="940.125">
                <text:p>940.1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963">
                <text:p>963</text:p>
              </table:table-cell>
              <table:table-cell office:value-type="float" office:value="933.375">
                <text:p>933.3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932">
                <text:p>932</text:p>
              </table:table-cell>
              <table:table-cell office:value-type="float" office:value="933.875">
                <text:p>933.8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918">
                <text:p>918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935">
                <text:p>935</text:p>
              </table:table-cell>
              <table:table-cell office:value-type="float" office:value="936.75">
                <text:p>936.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901">
                <text:p>901</text:p>
              </table:table-cell>
              <table:table-cell office:value-type="float" office:value="932.875">
                <text:p>932.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910">
                <text:p>910</text:p>
              </table:table-cell>
              <table:table-cell office:value-type="float" office:value="930.75">
                <text:p>930.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953">
                <text:p>953</text:p>
              </table:table-cell>
              <table:table-cell office:value-type="float" office:value="935.25">
                <text:p>935.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982">
                <text:p>982</text:p>
              </table:table-cell>
              <table:table-cell office:value-type="float" office:value="938.375">
                <text:p>938.3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932">
                <text:p>932</text:p>
              </table:table-cell>
              <table:table-cell office:value-type="float" office:value="944.25">
                <text:p>944.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915">
                <text:p>915</text:p>
              </table:table-cell>
              <table:table-cell office:value-type="float" office:value="948.25">
                <text:p>948.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954">
                <text:p>954</text:p>
              </table:table-cell>
              <table:table-cell office:value-type="float" office:value="942.75">
                <text:p>942.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960">
                <text:p>960</text:p>
              </table:table-cell>
              <table:table-cell office:value-type="float" office:value="943.5">
                <text:p>943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948">
                <text:p>948</text:p>
              </table:table-cell>
              <table:table-cell office:value-type="float" office:value="940.5">
                <text:p>940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942">
                <text:p>942</text:p>
              </table:table-cell>
              <table:table-cell office:value-type="float" office:value="943.75">
                <text:p>943.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909">
                <text:p>90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988">
                <text:p>988</text:p>
              </table:table-cell>
              <table:table-cell office:value-type="float" office:value="931.625">
                <text:p>931.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908">
                <text:p>908</text:p>
              </table:table-cell>
              <table:table-cell office:value-type="float" office:value="926.125">
                <text:p>926.1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941">
                <text:p>94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924">
                <text:p>924</text:p>
              </table:table-cell>
              <table:table-cell office:value-type="float" office:value="913.25">
                <text:p>913.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893">
                <text:p>893</text:p>
              </table:table-cell>
              <table:table-cell office:value-type="float" office:value="899.125">
                <text:p>899.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904">
                <text:p>904</text:p>
              </table:table-cell>
              <table:table-cell office:value-type="float" office:value="890.375">
                <text:p>890.3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901">
                <text:p>901</text:p>
              </table:table-cell>
              <table:table-cell office:value-type="float" office:value="877.375">
                <text:p>877.3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847">
                <text:p>847</text:p>
              </table:table-cell>
              <table:table-cell office:value-type="float" office:value="868.875">
                <text:p>868.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875">
                <text:p>875</text:p>
              </table:table-cell>
              <table:table-cell office:value-type="float" office:value="858.5">
                <text:p>858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838">
                <text:p>838</text:p>
              </table:table-cell>
              <table:table-cell office:value-type="float" office:value="854.5">
                <text:p>854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837">
                <text:p>837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856">
                <text:p>856</text:p>
              </table:table-cell>
              <table:table-cell office:value-type="float" office:value="845.25">
                <text:p>845.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810">
                <text:p>810</text:p>
              </table:table-cell>
              <table:table-cell office:value-type="float" office:value="834.125">
                <text:p>834.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872">
                <text:p>872</text:p>
              </table:table-cell>
              <table:table-cell office:value-type="float" office:value="832.625">
                <text:p>832.6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817">
                <text:p>817</text:p>
              </table:table-cell>
              <table:table-cell office:value-type="float" office:value="827.875">
                <text:p>827.8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857">
                <text:p>857</text:p>
              </table:table-cell>
              <table:table-cell office:value-type="float" office:value="822.25">
                <text:p>822.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786">
                <text:p>786</text:p>
              </table:table-cell>
              <table:table-cell office:value-type="float" office:value="825.625">
                <text:p>825.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826">
                <text:p>826</text:p>
              </table:table-cell>
              <table:table-cell office:value-type="float" office:value="819.25">
                <text:p>819.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799">
                <text:p>799</text:p>
              </table:table-cell>
              <table:table-cell office:value-type="float" office:value="811.75">
                <text:p>811.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811">
                <text:p>811</text:p>
              </table:table-cell>
              <table:table-cell office:value-type="float" office:value="807.625">
                <text:p>807.6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837">
                <text:p>837</text:p>
              </table:table-cell>
              <table:table-cell office:value-type="float" office:value="810.125">
                <text:p>810.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821">
                <text:p>821</text:p>
              </table:table-cell>
              <table:table-cell office:value-type="float" office:value="799.25">
                <text:p>799.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757">
                <text:p>757</text:p>
              </table:table-cell>
              <table:table-cell office:value-type="float" office:value="796.5">
                <text:p>796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824">
                <text:p>824</text:p>
              </table:table-cell>
              <table:table-cell office:value-type="float" office:value="786.25">
                <text:p>786.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806">
                <text:p>806</text:p>
              </table:table-cell>
              <table:table-cell office:value-type="float" office:value="777.5">
                <text:p>777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739">
                <text:p>739</text:p>
              </table:table-cell>
              <table:table-cell office:value-type="float" office:value="763.375">
                <text:p>763.3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777">
                <text:p>77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729">
                <text:p>729</text:p>
              </table:table-cell>
              <table:table-cell office:value-type="float" office:value="744.25">
                <text:p>744.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767">
                <text:p>767</text:p>
              </table:table-cell>
              <table:table-cell office:value-type="float" office:value="731.75">
                <text:p>731.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708">
                <text:p>708</text:p>
              </table:table-cell>
              <table:table-cell office:value-type="float" office:value="728.75">
                <text:p>728.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722">
                <text:p>722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706">
                <text:p>706</text:p>
              </table:table-cell>
              <table:table-cell office:value-type="float" office:value="713.25">
                <text:p>713.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706">
                <text:p>706</text:p>
              </table:table-cell>
              <table:table-cell office:value-type="float" office:value="702.25">
                <text:p>702.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715">
                <text:p>715</text:p>
              </table:table-cell>
              <table:table-cell office:value-type="float" office:value="694.125">
                <text:p>694.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687">
                <text:p>687</text:p>
              </table:table-cell>
              <table:table-cell office:value-type="float" office:value="684.625">
                <text:p>684.6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695">
                <text:p>695</text:p>
              </table:table-cell>
              <table:table-cell office:value-type="float" office:value="674.75">
                <text:p>674.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679">
                <text:p>679</text:p>
              </table:table-cell>
              <table:table-cell office:value-type="float" office:value="670.5">
                <text:p>670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643">
                <text:p>643</text:p>
              </table:table-cell>
              <table:table-cell office:value-type="float" office:value="663.625">
                <text:p>663.6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646">
                <text:p>646</text:p>
              </table:table-cell>
              <table:table-cell office:value-type="float" office:value="656.875">
                <text:p>656.8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627">
                <text:p>62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672">
                <text:p>672</text:p>
              </table:table-cell>
              <table:table-cell office:value-type="float" office:value="640.375">
                <text:p>640.3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660">
                <text:p>66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633">
                <text:p>633</text:p>
              </table:table-cell>
              <table:table-cell office:value-type="float" office:value="624.625">
                <text:p>624.6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616">
                <text:p>616</text:p>
              </table:table-cell>
              <table:table-cell office:value-type="float" office:value="619.875">
                <text:p>619.8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626">
                <text:p>626</text:p>
              </table:table-cell>
              <table:table-cell office:value-type="float" office:value="604.75">
                <text:p>604.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552">
                <text:p>552</text:p>
              </table:table-cell>
              <table:table-cell office:value-type="float" office:value="598.125">
                <text:p>598.1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611">
                <text:p>611</text:p>
              </table:table-cell>
              <table:table-cell office:value-type="float" office:value="586.125">
                <text:p>586.1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589">
                <text:p>589</text:p>
              </table:table-cell>
              <table:table-cell office:value-type="float" office:value="585.625">
                <text:p>585.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607">
                <text:p>607</text:p>
              </table:table-cell>
              <table:table-cell office:value-type="float" office:value="577.625">
                <text:p>577.6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537">
                <text:p>537</text:p>
              </table:table-cell>
              <table:table-cell office:value-type="float" office:value="566.875">
                <text:p>566.8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612">
                <text:p>612</text:p>
              </table:table-cell>
              <table:table-cell office:value-type="float" office:value="555.75">
                <text:p>555.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550.25">
                <text:p>550.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533.75">
                <text:p>533.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500">
                <text:p>500</text:p>
              </table:table-cell>
              <table:table-cell office:value-type="float" office:value="510.75">
                <text:p>510.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507">
                <text:p>507</text:p>
              </table:table-cell>
              <table:table-cell office:value-type="float" office:value="501.875">
                <text:p>501.8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475">
                <text:p>475</text:p>
              </table:table-cell>
              <table:table-cell office:value-type="float" office:value="488.125">
                <text:p>488.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523">
                <text:p>523</text:p>
              </table:table-cell>
              <table:table-cell office:value-type="float" office:value="482.375">
                <text:p>482.3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442">
                <text:p>442</text:p>
              </table:table-cell>
              <table:table-cell office:value-type="float" office:value="476.125">
                <text:p>476.1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486">
                <text:p>486</text:p>
              </table:table-cell>
              <table:table-cell office:value-type="float" office:value="467.375">
                <text:p>467.3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447">
                <text:p>447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479">
                <text:p>479</text:p>
              </table:table-cell>
              <table:table-cell office:value-type="float" office:value="443.75">
                <text:p>443.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450">
                <text:p>450</text:p>
              </table:table-cell>
              <table:table-cell office:value-type="float" office:value="443.75">
                <text:p>443.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437">
                <text:p>437</text:p>
              </table:table-cell>
              <table:table-cell office:value-type="float" office:value="433.25">
                <text:p>433.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420">
                <text:p>42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389">
                <text:p>389</text:p>
              </table:table-cell>
              <table:table-cell office:value-type="float" office:value="419.25">
                <text:p>419.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442">
                <text:p>44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402">
                <text:p>402</text:p>
              </table:table-cell>
              <table:table-cell office:value-type="float" office:value="411.625">
                <text:p>411.6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429">
                <text:p>429</text:p>
              </table:table-cell>
              <table:table-cell office:value-type="float" office:value="406.625">
                <text:p>406.6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385">
                <text:p>385</text:p>
              </table:table-cell>
              <table:table-cell office:value-type="float" office:value="406.125">
                <text:p>406.1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424">
                <text:p>424</text:p>
              </table:table-cell>
              <table:table-cell office:value-type="float" office:value="399.75">
                <text:p>399.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402">
                <text:p>402</text:p>
              </table:table-cell>
              <table:table-cell office:value-type="float" office:value="394.875">
                <text:p>394.8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80">
                <text:p>380</text:p>
              </table:table-cell>
              <table:table-cell office:value-type="float" office:value="383.875">
                <text:p>383.8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385">
                <text:p>385</text:p>
              </table:table-cell>
              <table:table-cell office:value-type="float" office:value="378.25">
                <text:p>378.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391">
                <text:p>391</text:p>
              </table:table-cell>
              <table:table-cell office:value-type="float" office:value="368.375">
                <text:p>368.3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363">
                <text:p>363</text:p>
              </table:table-cell>
              <table:table-cell office:value-type="float" office:value="354.25">
                <text:p>354.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341">
                <text:p>341</text:p>
              </table:table-cell>
              <table:table-cell office:value-type="float" office:value="346.5">
                <text:p>346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340">
                <text:p>340</text:p>
              </table:table-cell>
              <table:table-cell office:value-type="float" office:value="337.25">
                <text:p>337.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345">
                <text:p>345</text:p>
              </table:table-cell>
              <table:table-cell office:value-type="float" office:value="329.25">
                <text:p>329.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289">
                <text:p>289</text:p>
              </table:table-cell>
              <table:table-cell office:value-type="float" office:value="319.125">
                <text:p>319.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318">
                <text:p>318</text:p>
              </table:table-cell>
              <table:table-cell office:value-type="float" office:value="313.375">
                <text:p>313.3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311">
                <text:p>311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327">
                <text:p>327</text:p>
              </table:table-cell>
              <table:table-cell office:value-type="float" office:value="297.25">
                <text:p>297.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282">
                <text:p>282</text:p>
              </table:table-cell>
              <table:table-cell office:value-type="float" office:value="297.375">
                <text:p>297.3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295">
                <text:p>295</text:p>
              </table:table-cell>
              <table:table-cell office:value-type="float" office:value="291.125">
                <text:p>291.1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269">
                <text:p>269</text:p>
              </table:table-cell>
              <table:table-cell office:value-type="float" office:value="287.25">
                <text:p>287.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287">
                <text:p>287</text:p>
              </table:table-cell>
              <table:table-cell office:value-type="float" office:value="279.25">
                <text:p>279.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290">
                <text:p>290</text:p>
              </table:table-cell>
              <table:table-cell office:value-type="float" office:value="273.625">
                <text:p>273.6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268">
                <text:p>268</text:p>
              </table:table-cell>
              <table:table-cell office:value-type="float" office:value="265.875">
                <text:p>265.8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80">
                <text:p>280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63">
                <text:p>263</text:p>
              </table:table-cell>
              <table:table-cell office:value-type="float" office:value="253.75">
                <text:p>253.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237">
                <text:p>237</text:p>
              </table:table-cell>
              <table:table-cell office:value-type="float" office:value="246.875">
                <text:p>246.8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233">
                <text:p>233</text:p>
              </table:table-cell>
              <table:table-cell office:value-type="float" office:value="242.125">
                <text:p>242.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229">
                <text:p>229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230">
                <text:p>230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35">
                <text:p>235</text:p>
              </table:table-cell>
              <table:table-cell office:value-type="float" office:value="222.625">
                <text:p>222.6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230">
                <text:p>230</text:p>
              </table:table-cell>
              <table:table-cell office:value-type="float" office:value="217.25">
                <text:p>217.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227">
                <text:p>227</text:p>
              </table:table-cell>
              <table:table-cell office:value-type="float" office:value="208.25">
                <text:p>208.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91">
                <text:p>191</text:p>
              </table:table-cell>
              <table:table-cell office:value-type="float" office:value="201.375">
                <text:p>201.3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206">
                <text:p>206</text:p>
              </table:table-cell>
              <table:table-cell office:value-type="float" office:value="195.75">
                <text:p>195.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90">
                <text:p>190</text:p>
              </table:table-cell>
              <table:table-cell office:value-type="float" office:value="189.625">
                <text:p>189.6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57">
                <text:p>157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90">
                <text:p>190</text:p>
              </table:table-cell>
              <table:table-cell office:value-type="float" office:value="176.75">
                <text:p>176.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81">
                <text:p>181</text:p>
              </table:table-cell>
              <table:table-cell office:value-type="float" office:value="175.625">
                <text:p>175.6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70">
                <text:p>170</text:p>
              </table:table-cell>
              <table:table-cell office:value-type="float" office:value="177.625">
                <text:p>177.6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55">
                <text:p>155</text:p>
              </table:table-cell>
              <table:table-cell office:value-type="float" office:value="176.125">
                <text:p>176.1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96">
                <text:p>196</text:p>
              </table:table-cell>
              <table:table-cell office:value-type="float" office:value="174.875">
                <text:p>174.8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81">
                <text:p>18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73">
                <text:p>17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80">
                <text:p>180</text:p>
              </table:table-cell>
              <table:table-cell office:value-type="float" office:value="156.625">
                <text:p>156.6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42">
                <text:p>142</text:p>
              </table:table-cell>
              <table:table-cell office:value-type="float" office:value="151.375">
                <text:p>151.3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38">
                <text:p>138</text:p>
              </table:table-cell>
              <table:table-cell office:value-type="float" office:value="145.625">
                <text:p>145.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39">
                <text:p>139</text:p>
              </table:table-cell>
              <table:table-cell office:value-type="float" office:value="140.875">
                <text:p>140.8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37">
                <text:p>137</text:p>
              </table:table-cell>
              <table:table-cell office:value-type="float" office:value="135.875">
                <text:p>135.8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39">
                <text:p>139</text:p>
              </table:table-cell>
              <table:table-cell office:value-type="float" office:value="135.625">
                <text:p>135.6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27">
                <text:p>127</text:p>
              </table:table-cell>
              <table:table-cell office:value-type="float" office:value="132.125">
                <text:p>132.1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25">
                <text:p>125</text:p>
              </table:table-cell>
              <table:table-cell office:value-type="float" office:value="129.75">
                <text:p>129.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40">
                <text:p>140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10">
                <text:p>110</text:p>
              </table:table-cell>
              <table:table-cell office:value-type="float" office:value="118.75">
                <text:p>118.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20">
                <text:p>120</text:p>
              </table:table-cell>
              <table:table-cell office:value-type="float" office:value="115.625">
                <text:p>115.6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23">
                <text:p>123</text:p>
              </table:table-cell>
              <table:table-cell office:value-type="float" office:value="109.75">
                <text:p>109.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87">
                <text:p>87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05">
                <text:p>105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00">
                <text:p>100</text:p>
              </table:table-cell>
              <table:table-cell office:value-type="float" office:value="100.25">
                <text:p>100.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93">
                <text:p>93</text:p>
              </table:table-cell>
              <table:table-cell office:value-type="float" office:value="96.625">
                <text:p>96.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14">
                <text:p>114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88">
                <text:p>88</text:p>
              </table:table-cell>
              <table:table-cell office:value-type="float" office:value="96.625">
                <text:p>96.6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92">
                <text:p>92</text:p>
              </table:table-cell>
              <table:table-cell office:value-type="float" office:value="93.625">
                <text:p>93.6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94">
                <text:p>94</text:p>
              </table:table-cell>
              <table:table-cell office:value-type="float" office:value="92.125">
                <text:p>92.1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92">
                <text:p>92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81">
                <text:p>81</text:p>
              </table:table-cell>
              <table:table-cell office:value-type="float" office:value="79.375">
                <text:p>79.3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73">
                <text:p>73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76">
                <text:p>76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64">
                <text:p>64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73">
                <text:p>73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67">
                <text:p>67</text:p>
              </table:table-cell>
              <table:table-cell office:value-type="float" office:value="66.625">
                <text:p>66.6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56">
                <text:p>56</text:p>
              </table:table-cell>
              <table:table-cell office:value-type="float" office:value="64.875">
                <text:p>64.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68">
                <text:p>68</text:p>
              </table:table-cell>
              <table:table-cell office:value-type="float" office:value="63.625">
                <text:p>63.6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66">
                <text:p>66</text:p>
              </table:table-cell>
              <table:table-cell office:value-type="float" office:value="61.875">
                <text:p>61.8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63">
                <text:p>63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62">
                <text:p>6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54">
                <text:p>54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43">
                <text:p>43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51">
                <text:p>5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55">
                <text:p>55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53">
                <text:p>53</text:p>
              </table:table-cell>
              <table:table-cell office:value-type="float" office:value="47.625">
                <text:p>47.6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46">
                <text:p>46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43">
                <text:p>43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54">
                <text:p>54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43">
                <text:p>43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40">
                <text:p>40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43">
                <text:p>43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40">
                <text:p>40</text:p>
              </table:table-cell>
              <table:table-cell office:value-type="float" office:value="37.875">
                <text:p>37.8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38">
                <text:p>38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32">
                <text:p>32</text:p>
              </table:table-cell>
              <table:table-cell office:value-type="float" office:value="33.375">
                <text:p>33.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31">
                <text:p>31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25">
                <text:p>2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28">
                <text:p>28</text:p>
              </table:table-cell>
              <table:table-cell office:value-type="float" office:value="28.375">
                <text:p>28.3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23">
                <text:p>23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32">
                <text:p>32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26">
                <text:p>2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7">
                <text:p>17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8">
                <text:p>28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22">
                <text:p>22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7">
                <text:p>1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Annex A Preliminary Check'.E22:'Annex B Coincidence Limit'.E36 'Annex B Coincidence Limit'.K21:'Annex B Coincidence Limit'.L21 'Annex A Preliminary Check'.L22:'Annex B Coincidence Limit'.L36 'Annex B Coincidence Limit'.K22:'Annex B Coincidence Limit'.K36 'Annex B Coincidence Limit'.I20:'Annex B Coincidence Limit'.I20 'Annex B Coincidence Limit'.I22:'Annex B Coincidence Limit'.I36" chart:data-source-has-labels="row" svg:x="1.468cm" svg:y="0.304cm" svg:width="22.005cm" svg:height="13.673cm">
          <chart:coordinate-region svg:x="3.095cm" svg:y="0.502cm" svg:width="20.278cm" svg:height="12.831cm"/>
          <chart:axis chart:dimension="x" chart:name="primary-x" chart:style-name="ch4">
            <chart:title svg:x="11.37cm" svg:y="14.281cm" chart:style-name="ch5">
              <text:p>RM8632a mg/l</text:p>
            </chart:title>
          </chart:axis>
          <chart:axis chart:dimension="y" chart:name="primary-y" chart:style-name="ch4">
            <chart:title svg:x="0.451cm" svg:y="8.172cm" chart:style-name="ch6">
              <text:p>count / 100ml</text:p>
            </chart:title>
            <chart:grid chart:style-name="ch7" chart:class="major"/>
          </chart:axis>
          <chart:series chart:style-name="ch8" chart:values-cell-range-address="'Annex A Preliminary Check'.L22:'Annex B Coincidence Limit'.L36" chart:label-cell-address="'Annex B Coincidence Limit'.L21:'Annex B Coincidence Limit'.L21" chart:class="chart:scatter">
            <chart:domain table:cell-range-address="'Annex A Preliminary Check'.E22:'Annex B Coincidence Limit'.E36"/>
            <chart:data-point chart:repeated="30"/>
          </chart:series>
          <chart:series chart:style-name="ch9" chart:values-cell-range-address="'Annex B Coincidence Limit'.K22:'Annex B Coincidence Limit'.K36" chart:label-cell-address="'Annex B Coincidence Limit'.K21:'Annex B Coincidence Limit'.K21" chart:class="chart:scatter">
            <chart:domain table:cell-range-address="'Annex B Coincidence Limit'.E22:'Annex B Coincidence Limit'.E36"/>
            <chart:data-point chart:repeated="15"/>
          </chart:series>
          <chart:series chart:style-name="ch10" chart:values-cell-range-address="'Annex B Coincidence Limit'.I22:'Annex B Coincidence Limit'.I36" chart:label-cell-address="'Annex B Coincidence Limit'.I20:'Annex B Coincidence Limit'.I20" chart:class="chart:scatter">
            <chart:domain table:cell-range-address="'Annex B Coincidence Limit'.E22:'Annex B Coincidence Limit'.E36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unts</text:p>
                <draw:g>
                  <svg:desc>'Annex B Coincidence Limit'.L21:'Annex B Coincidence Limit'.L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95%</text:p>
                <draw:g>
                  <svg:desc>'Annex B Coincidence Limit'.K21:'Annex B Coincidence Limit'.K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ression</text:p>
                <draw:g>
                  <svg:desc>'Annex B Coincidence Limit'.I20:'Annex B Coincidence Limit'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nnex A Preliminary Check'.E22:'Annex B Coincidence Limit'.E36</svg:desc>
                </draw:g>
              </table:table-cell>
              <table:table-cell office:value-type="float" office:value="NaN">
                <text:p>NaN</text:p>
                <draw:g>
                  <svg:desc>'Annex A Preliminary Check'.L22:'Annex B Coincidence Limit'.L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0.95">
                <text:p>0.95</text:p>
                <draw:g>
                  <svg:desc>'Annex B Coincidence Limit'.K22:'Annex B Coincidence Limit'.K36</svg:desc>
                </draw:g>
              </table:table-cell>
              <table:table-cell office:value-type="float" office:value="0">
                <text:p>0</text:p>
                <draw:g>
                  <svg:desc>'Annex B Coincidence Limit'.E22:'Annex B Coincidence Limit'.E36</svg:desc>
                </draw:g>
              </table:table-cell>
              <table:table-cell office:value-type="float" office:value="1">
                <text:p>1</text:p>
                <draw:g>
                  <svg:desc>'Annex B Coincidence Limit'.I22:'Annex B Coincidence Limit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97569245385">
                <text:p>0.18397569245385</text:p>
              </table:table-cell>
              <table:table-cell office:value-type="float" office:value="146863.622038757">
                <text:p>146863.622038757</text:p>
              </table:table-cell>
              <table:table-cell office:value-type="float" office:value="0.18397569245385">
                <text:p>0.18397569245385</text:p>
              </table:table-cell>
              <table:table-cell office:value-type="float" office:value="154593.286356587">
                <text:p>154593.286356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447354064375">
                <text:p>0.360447354064375</text:p>
              </table:table-cell>
              <table:table-cell office:value-type="float" office:value="287736.94647438">
                <text:p>287736.94647438</text:p>
              </table:table-cell>
              <table:table-cell office:value-type="float" office:value="0.360447354064375">
                <text:p>0.360447354064375</text:p>
              </table:table-cell>
              <table:table-cell office:value-type="float" office:value="302880.996288821">
                <text:p>302880.996288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636194650226">
                <text:p>0.536636194650226</text:p>
              </table:table-cell>
              <table:table-cell office:value-type="float" office:value="428384.50130143">
                <text:p>428384.50130143</text:p>
              </table:table-cell>
              <table:table-cell office:value-type="float" office:value="0.536636194650226">
                <text:p>0.536636194650226</text:p>
              </table:table-cell>
              <table:table-cell office:value-type="float" office:value="450931.054001505">
                <text:p>450931.054001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2542893558613">
                <text:p>0.712542893558613</text:p>
              </table:table-cell>
              <table:table-cell office:value-type="float" office:value="568806.828827374">
                <text:p>568806.828827374</text:p>
              </table:table-cell>
              <table:table-cell office:value-type="float" office:value="0.712542893558613">
                <text:p>0.712542893558613</text:p>
              </table:table-cell>
              <table:table-cell office:value-type="float" office:value="598744.030344604">
                <text:p>598744.030344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816812796273">
                <text:p>0.88816812796273</text:p>
              </table:table-cell>
              <table:table-cell office:value-type="float" office:value="709004.469624212">
                <text:p>709004.469624212</text:p>
              </table:table-cell>
              <table:table-cell office:value-type="float" office:value="0.88816812796273">
                <text:p>0.88816812796273</text:p>
              </table:table-cell>
              <table:table-cell office:value-type="float" office:value="746320.494341276">
                <text:p>746320.494341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351257287044">
                <text:p>1.06351257287044</text:p>
              </table:table-cell>
              <table:table-cell office:value-type="float" office:value="848977.962535409">
                <text:p>848977.962535409</text:p>
              </table:table-cell>
              <table:table-cell office:value-type="float" office:value="1.06351257287044">
                <text:p>1.06351257287044</text:p>
              </table:table-cell>
              <table:table-cell office:value-type="float" office:value="893661.013195168">
                <text:p>893661.013195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857690113294">
                <text:p>1.23857690113294</text:p>
              </table:table-cell>
              <table:table-cell office:value-type="float" office:value="988727.844682814">
                <text:p>988727.844682814</text:p>
              </table:table-cell>
              <table:table-cell office:value-type="float" office:value="1.23857690113294">
                <text:p>1.23857690113294</text:p>
              </table:table-cell>
              <table:table-cell office:value-type="float" office:value="1040766.1522977">
                <text:p>1040766.1522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336178345332">
                <text:p>1.41336178345332</text:p>
              </table:table-cell>
              <table:table-cell office:value-type="float" office:value="1128254.65147349">
                <text:p>1128254.65147349</text:p>
              </table:table-cell>
              <table:table-cell office:value-type="float" office:value="1.41336178345332">
                <text:p>1.41336178345332</text:p>
              </table:table-cell>
              <table:table-cell office:value-type="float" office:value="1187636.47523525">
                <text:p>1187636.47523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786788839521">
                <text:p>1.58786788839521</text:p>
              </table:table-cell>
              <table:table-cell office:value-type="float" office:value="1267558.91660661">
                <text:p>1267558.91660661</text:p>
              </table:table-cell>
              <table:table-cell office:value-type="float" office:value="1.58786788839521">
                <text:p>1.58786788839521</text:p>
              </table:table-cell>
              <table:table-cell office:value-type="float" office:value="1334272.54379644">
                <text:p>1334272.54379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604642975144">
                <text:p>1.93604642975144</text:p>
              </table:table-cell>
              <table:table-cell office:value-type="float" office:value="1545501.948198">
                <text:p>1545501.948198</text:p>
              </table:table-cell>
              <table:table-cell office:value-type="float" office:value="1.93604642975144">
                <text:p>1.93604642975144</text:p>
              </table:table-cell>
              <table:table-cell office:value-type="float" office:value="1626844.15599789">
                <text:p>1626844.15599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972019267197">
                <text:p>2.10972019267197</text:p>
              </table:table-cell>
              <table:table-cell office:value-type="float" office:value="1684141.77357606">
                <text:p>1684141.77357606</text:p>
              </table:table-cell>
              <table:table-cell office:value-type="float" office:value="2.10972019267197">
                <text:p>2.10972019267197</text:p>
              </table:table-cell>
              <table:table-cell office:value-type="float" office:value="1772780.81429059">
                <text:p>1772780.81429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8311783124321">
                <text:p>2.28311783124321</text:p>
              </table:table-cell>
              <table:table-cell office:value-type="float" office:value="1822561.1751496">
                <text:p>1822561.1751496</text:p>
              </table:table-cell>
              <table:table-cell office:value-type="float" office:value="2.28311783124321">
                <text:p>2.28311783124321</text:p>
              </table:table-cell>
              <table:table-cell office:value-type="float" office:value="1918485.44752589">
                <text:p>1918485.44752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624000345826">
                <text:p>2.45624000345826</text:p>
              </table:table-cell>
              <table:table-cell office:value-type="float" office:value="1960760.67817959">
                <text:p>1960760.67817959</text:p>
              </table:table-cell>
              <table:table-cell office:value-type="float" office:value="2.45624000345826">
                <text:p>2.45624000345826</text:p>
              </table:table-cell>
              <table:table-cell office:value-type="float" office:value="2063958.60861009">
                <text:p>2063958.60861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2908736522129">
                <text:p>2.62908736522129</text:p>
              </table:table-cell>
              <table:table-cell office:value-type="float" office:value="2098740.80625944">
                <text:p>2098740.80625944</text:p>
              </table:table-cell>
              <table:table-cell office:value-type="float" office:value="2.62908736522129">
                <text:p>2.62908736522129</text:p>
              </table:table-cell>
              <table:table-cell office:value-type="float" office:value="2209200.84869415">
                <text:p>2209200.848694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.0000001">
                <text:p>1.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397569245385">
                <text:p>0.18397569245385</text:p>
              </table:table-cell>
              <table:table-cell office:value-type="float" office:value="172107.3193049">
                <text:p>172107.319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47354064375">
                <text:p>0.360447354064375</text:p>
              </table:table-cell>
              <table:table-cell office:value-type="float" office:value="303430.3436049">
                <text:p>303430.343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6636194650226">
                <text:p>0.536636194650226</text:p>
              </table:table-cell>
              <table:table-cell office:value-type="float" office:value="473361.6745316">
                <text:p>473361.674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2542893558613">
                <text:p>0.712542893558613</text:p>
              </table:table-cell>
              <table:table-cell office:value-type="float" office:value="633346.16169">
                <text:p>633346.16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816812796273">
                <text:p>0.88816812796273</text:p>
              </table:table-cell>
              <table:table-cell office:value-type="float" office:value="772691.1913536">
                <text:p>772691.191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6351257287044">
                <text:p>1.06351257287044</text:p>
              </table:table-cell>
              <table:table-cell office:value-type="float" office:value="907937.1764516">
                <text:p>907937.176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3857690113294">
                <text:p>1.23857690113294</text:p>
              </table:table-cell>
              <table:table-cell office:value-type="float" office:value="1044623.4098276">
                <text:p>1044623.409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336178345332">
                <text:p>1.41336178345332</text:p>
              </table:table-cell>
              <table:table-cell office:value-type="float" office:value="1203847.0933776">
                <text:p>1203847.0933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786788839521">
                <text:p>1.58786788839521</text:p>
              </table:table-cell>
              <table:table-cell office:value-type="float" office:value="1343346.5477729">
                <text:p>1343346.547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3604642975144">
                <text:p>1.93604642975144</text:p>
              </table:table-cell>
              <table:table-cell office:value-type="float" office:value="1617722.1634704">
                <text:p>1617722.163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0972019267197">
                <text:p>2.10972019267197</text:p>
              </table:table-cell>
              <table:table-cell office:value-type="float" office:value="1759156.0540841">
                <text:p>1759156.0540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8311783124321">
                <text:p>2.28311783124321</text:p>
              </table:table-cell>
              <table:table-cell office:value-type="float" office:value="1927361.3360964">
                <text:p>1927361.336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5624000345826">
                <text:p>2.45624000345826</text:p>
              </table:table-cell>
              <table:table-cell office:value-type="float" office:value="2084370.5556804">
                <text:p>2084370.555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2908736522129">
                <text:p>2.62908736522129</text:p>
              </table:table-cell>
              <table:table-cell office:value-type="float" office:value="2193113.13969">
                <text:p>2193113.1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" chart:maximum="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05cm" chart:symbol-height="0.0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Annex A Preliminary Check'.I22:'Annex B Coincidence Limit'.I36 'ISO 11171_2020 Summary'.A1:'ISO 11171_2020 Summary'.A1 'Annex A Preliminary Check'.M22:'Annex B Coincidence Limit'.M36" chart:data-source-has-labels="row" svg:x="1.395cm" svg:y="2.51cm" svg:width="18.548cm" svg:height="11.466cm">
          <chart:coordinate-region svg:x="2.13cm" svg:y="2.708cm" svg:width="17.123cm" svg:height="10.624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Annex A Preliminary Check'.M22:'Annex B Coincidence Limit'.M36" chart:label-cell-address="'ISO 11171_2020 Summary'.A1:'ISO 11171_2020 Summary'.A1" chart:class="chart:scatter">
            <chart:domain table:cell-range-address="'Annex A Preliminary Check'.I22:'Annex B Coincidence Limit'.I36"/>
            <chart:data-point chart:repeated="10"/>
            <chart:data-point chart:style-name="ch13"/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SO 11171:2020</text:p>
                <draw:g>
                  <svg:desc>'ISO 11171_2020 Summary'.A1:'ISO 11171_2020 Summary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0565">
                <text:p>1210565</text:p>
                <draw:g>
                  <svg:desc>'Annex A Preliminary Check'.I22:'Annex B Coincidence Limit'.I36</svg:desc>
                </draw:g>
              </table:table-cell>
              <table:table-cell office:value-type="float" office:value="NaN">
                <text:p>NaN</text:p>
                <draw:g>
                  <svg:desc>'Annex A Preliminary Check'.M22:'Annex B Coincidence Limit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1940">
                <text:p>1221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2389">
                <text:p>122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2577">
                <text:p>123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9566.8">
                <text:p>121956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49.90458388598">
                <text:p>8349.90458388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84661519474454">
                <text:p>0.00684661519474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54593.286356587">
                <text:p>154593.286356587</text:p>
              </table:table-cell>
              <table:table-cell office:value-type="float" office:value="1.11329103197868">
                <text:p>1.11329103197868</text:p>
              </table:table-cell>
            </table:table-row>
            <table:table-row>
              <table:table-cell office:value-type="string"/>
              <table:table-cell office:value-type="float" office:value="302880.996288821">
                <text:p>302880.996288821</text:p>
              </table:table-cell>
              <table:table-cell office:value-type="float" office:value="1.00181373979487">
                <text:p>1.00181373979487</text:p>
              </table:table-cell>
            </table:table-row>
            <table:table-row>
              <table:table-cell office:value-type="string"/>
              <table:table-cell office:value-type="float" office:value="450931.054001505">
                <text:p>450931.054001505</text:p>
              </table:table-cell>
              <table:table-cell office:value-type="float" office:value="1.04974290488767">
                <text:p>1.04974290488767</text:p>
              </table:table-cell>
            </table:table-row>
            <table:table-row>
              <table:table-cell office:value-type="string"/>
              <table:table-cell office:value-type="float" office:value="598744.030344604">
                <text:p>598744.030344604</text:p>
              </table:table-cell>
              <table:table-cell office:value-type="float" office:value="1.05779119221528">
                <text:p>1.05779119221528</text:p>
              </table:table-cell>
            </table:table-row>
            <table:table-row>
              <table:table-cell office:value-type="string"/>
              <table:table-cell office:value-type="float" office:value="746320.494341276">
                <text:p>746320.494341276</text:p>
              </table:table-cell>
              <table:table-cell office:value-type="float" office:value="1.03533427959204">
                <text:p>1.03533427959204</text:p>
              </table:table-cell>
            </table:table-row>
            <table:table-row>
              <table:table-cell office:value-type="string"/>
              <table:table-cell office:value-type="float" office:value="893661.013195168">
                <text:p>893661.013195168</text:p>
              </table:table-cell>
              <table:table-cell office:value-type="float" office:value="1.01597492007108">
                <text:p>1.01597492007108</text:p>
              </table:table-cell>
            </table:table-row>
            <table:table-row>
              <table:table-cell office:value-type="string"/>
              <table:table-cell office:value-type="float" office:value="1040766.1522977">
                <text:p>1040766.1522977</text:p>
              </table:table-cell>
              <table:table-cell office:value-type="float" office:value="1.0037061711907">
                <text:p>1.0037061711907</text:p>
              </table:table-cell>
            </table:table-row>
            <table:table-row>
              <table:table-cell office:value-type="string"/>
              <table:table-cell office:value-type="float" office:value="1187636.47523525">
                <text:p>1187636.47523525</text:p>
              </table:table-cell>
              <table:table-cell office:value-type="float" office:value="1.01364947816977">
                <text:p>1.01364947816977</text:p>
              </table:table-cell>
            </table:table-row>
            <table:table-row>
              <table:table-cell office:value-type="string"/>
              <table:table-cell office:value-type="float" office:value="1334272.54379644">
                <text:p>1334272.54379644</text:p>
              </table:table-cell>
              <table:table-cell office:value-type="float" office:value="1.00680071250709">
                <text:p>1.00680071250709</text:p>
              </table:table-cell>
            </table:table-row>
            <table:table-row>
              <table:table-cell office:value-type="string"/>
              <table:table-cell office:value-type="float" office:value="1626844.15599789">
                <text:p>1626844.15599789</text:p>
              </table:table-cell>
              <table:table-cell office:value-type="float" office:value="0.994392829519741">
                <text:p>0.994392829519741</text:p>
              </table:table-cell>
            </table:table-row>
            <table:table-row>
              <table:table-cell office:value-type="string"/>
              <table:table-cell office:value-type="float" office:value="1772780.81429059">
                <text:p>1772780.81429059</text:p>
              </table:table-cell>
              <table:table-cell office:value-type="float" office:value="0.992314469957788">
                <text:p>0.992314469957788</text:p>
              </table:table-cell>
            </table:table-row>
            <table:table-row>
              <table:table-cell office:value-type="string"/>
              <table:table-cell office:value-type="float" office:value="1918485.44752589">
                <text:p>1918485.44752589</text:p>
              </table:table-cell>
              <table:table-cell office:value-type="float" office:value="1.00462650815619">
                <text:p>1.00462650815619</text:p>
              </table:table-cell>
            </table:table-row>
            <table:table-row>
              <table:table-cell office:value-type="string"/>
              <table:table-cell office:value-type="float" office:value="2063958.60861009">
                <text:p>2063958.60861009</text:p>
              </table:table-cell>
              <table:table-cell office:value-type="float" office:value="1.00988970756737">
                <text:p>1.00988970756737</text:p>
              </table:table-cell>
            </table:table-row>
            <table:table-row>
              <table:table-cell office:value-type="string"/>
              <table:table-cell office:value-type="float" office:value="2209200.84869415">
                <text:p>2209200.84869415</text:p>
              </table:table-cell>
              <table:table-cell office:value-type="float" office:value="0.992717860391166">
                <text:p>0.9927178603911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Annex A Preliminary Check'.E22:'Annex B Coincidence Limit'.E36 'Annex B Coincidence Limit_2'.K21:'Annex B Coincidence Limit_2'.L21 'Annex A Preliminary Check'.L22:'Annex B Coincidence Limit'.L36 'Annex B Coincidence Limit_2'.K22:'Annex B Coincidence Limit_2'.K36 'Annex B Coincidence Limit_2'.I20:'Annex B Coincidence Limit_2'.I20 'Annex B Coincidence Limit_2'.I22:'Annex B Coincidence Limit_2'.I36" chart:data-source-has-labels="row" svg:x="1.468cm" svg:y="0.304cm" svg:width="22.005cm" svg:height="13.673cm">
          <chart:coordinate-region svg:x="3.095cm" svg:y="0.502cm" svg:width="20.278cm" svg:height="12.831cm"/>
          <chart:axis chart:dimension="x" chart:name="primary-x" chart:style-name="ch4">
            <chart:title svg:x="11.37cm" svg:y="14.281cm" chart:style-name="ch5">
              <text:p>RM8632a mg/l</text:p>
            </chart:title>
          </chart:axis>
          <chart:axis chart:dimension="y" chart:name="primary-y" chart:style-name="ch4">
            <chart:title svg:x="0.451cm" svg:y="8.172cm" chart:style-name="ch6">
              <text:p>count / 100ml</text:p>
            </chart:title>
            <chart:grid chart:style-name="ch7" chart:class="major"/>
          </chart:axis>
          <chart:series chart:style-name="ch8" chart:values-cell-range-address="'Annex A Preliminary Check'.L22:'Annex B Coincidence Limit'.L36" chart:label-cell-address="'Annex B Coincidence Limit_2'.L21:'Annex B Coincidence Limit_2'.L21" chart:class="chart:scatter">
            <chart:domain table:cell-range-address="'Annex A Preliminary Check'.E22:'Annex B Coincidence Limit'.E36"/>
            <chart:data-point chart:repeated="30"/>
          </chart:series>
          <chart:series chart:style-name="ch9" chart:values-cell-range-address="'Annex B Coincidence Limit_2'.K22:'Annex B Coincidence Limit_2'.K36" chart:label-cell-address="'Annex B Coincidence Limit_2'.K21:'Annex B Coincidence Limit_2'.K21" chart:class="chart:scatter">
            <chart:domain table:cell-range-address="'Annex B Coincidence Limit_2'.E22:'Annex B Coincidence Limit_2'.E36"/>
            <chart:data-point chart:repeated="15"/>
          </chart:series>
          <chart:series chart:style-name="ch10" chart:values-cell-range-address="'Annex B Coincidence Limit_2'.I22:'Annex B Coincidence Limit_2'.I36" chart:label-cell-address="'Annex B Coincidence Limit_2'.I20:'Annex B Coincidence Limit_2'.I20" chart:class="chart:scatter">
            <chart:domain table:cell-range-address="'Annex B Coincidence Limit_2'.E22:'Annex B Coincidence Limit_2'.E36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unts</text:p>
                <draw:g>
                  <svg:desc>'Annex B Coincidence Limit_2'.L21:'Annex B Coincidence Limit_2'.L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95%</text:p>
                <draw:g>
                  <svg:desc>'Annex B Coincidence Limit_2'.K21:'Annex B Coincidence Limit_2'.K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ression</text:p>
                <draw:g>
                  <svg:desc>'Annex B Coincidence Limit_2'.I20:'Annex B Coincidence Limit_2'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nnex A Preliminary Check'.E22:'Annex B Coincidence Limit'.E36</svg:desc>
                </draw:g>
              </table:table-cell>
              <table:table-cell office:value-type="float" office:value="NaN">
                <text:p>NaN</text:p>
                <draw:g>
                  <svg:desc>'Annex A Preliminary Check'.L22:'Annex B Coincidence Limit'.L36</svg:desc>
                </draw:g>
              </table:table-cell>
              <table:table-cell office:value-type="float" office:value="0">
                <text:p>0</text:p>
                <draw:g>
                  <svg:desc>'Annex B Coincidence Limit_2'.E22:'Annex B Coincidence Limit_2'.E36</svg:desc>
                </draw:g>
              </table:table-cell>
              <table:table-cell office:value-type="float" office:value="0.95">
                <text:p>0.95</text:p>
                <draw:g>
                  <svg:desc>'Annex B Coincidence Limit_2'.K22:'Annex B Coincidence Limit_2'.K36</svg:desc>
                </draw:g>
              </table:table-cell>
              <table:table-cell office:value-type="float" office:value="0">
                <text:p>0</text:p>
                <draw:g>
                  <svg:desc>'Annex B Coincidence Limit_2'.E22:'Annex B Coincidence Limit_2'.E36</svg:desc>
                </draw:g>
              </table:table-cell>
              <table:table-cell office:value-type="float" office:value="1">
                <text:p>1</text:p>
                <draw:g>
                  <svg:desc>'Annex B Coincidence Limit_2'.I22:'Annex B Coincidence Limit_2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229571984436">
                <text:p>0.173229571984436</text:p>
              </table:table-cell>
              <table:table-cell office:value-type="float" office:value="81225.2145893819">
                <text:p>81225.2145893819</text:p>
              </table:table-cell>
              <table:table-cell office:value-type="float" office:value="0.173229571984436">
                <text:p>0.173229571984436</text:p>
              </table:table-cell>
              <table:table-cell office:value-type="float" office:value="85500.2258835599">
                <text:p>85500.2258835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122448979592">
                <text:p>0.346122448979592</text:p>
              </table:table-cell>
              <table:table-cell office:value-type="float" office:value="162292.557041564">
                <text:p>162292.557041564</text:p>
              </table:table-cell>
              <table:table-cell office:value-type="float" office:value="0.346122448979592">
                <text:p>0.346122448979592</text:p>
              </table:table-cell>
              <table:table-cell office:value-type="float" office:value="170834.270570067">
                <text:p>170834.270570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679611650486">
                <text:p>0.518679611650486</text:p>
              </table:table-cell>
              <table:table-cell office:value-type="float" office:value="243202.487178305">
                <text:p>243202.487178305</text:p>
              </table:table-cell>
              <table:table-cell office:value-type="float" office:value="0.518679611650486">
                <text:p>0.518679611650486</text:p>
              </table:table-cell>
              <table:table-cell office:value-type="float" office:value="256002.618082426">
                <text:p>256002.618082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090203685742">
                <text:p>0.69090203685742</text:p>
              </table:table-cell>
              <table:table-cell office:value-type="float" office:value="323955.463037379">
                <text:p>323955.463037379</text:p>
              </table:table-cell>
              <table:table-cell office:value-type="float" office:value="0.69090203685742">
                <text:p>0.69090203685742</text:p>
              </table:table-cell>
              <table:table-cell office:value-type="float" office:value="341005.750565662">
                <text:p>341005.750565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2790697674419">
                <text:p>0.862790697674419</text:p>
              </table:table-cell>
              <table:table-cell office:value-type="float" office:value="404551.940881224">
                <text:p>404551.940881224</text:p>
              </table:table-cell>
              <table:table-cell office:value-type="float" office:value="0.862790697674419">
                <text:p>0.862790697674419</text:p>
              </table:table-cell>
              <table:table-cell office:value-type="float" office:value="425844.148296025">
                <text:p>425844.148296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434656340755">
                <text:p>1.03434656340755</text:p>
              </table:table-cell>
              <table:table-cell office:value-type="float" office:value="484992.375205524">
                <text:p>484992.375205524</text:p>
              </table:table-cell>
              <table:table-cell office:value-type="float" office:value="1.03434656340755">
                <text:p>1.03434656340755</text:p>
              </table:table-cell>
              <table:table-cell office:value-type="float" office:value="510518.289690026">
                <text:p>510518.289690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557059961315">
                <text:p>1.20557059961315</text:p>
              </table:table-cell>
              <table:table-cell office:value-type="float" office:value="565277.218747766">
                <text:p>565277.218747766</text:p>
              </table:table-cell>
              <table:table-cell office:value-type="float" office:value="1.20557059961315">
                <text:p>1.20557059961315</text:p>
              </table:table-cell>
              <table:table-cell office:value-type="float" office:value="595028.651313438">
                <text:p>595028.651313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646376811594">
                <text:p>1.37646376811594</text:p>
              </table:table-cell>
              <table:table-cell office:value-type="float" office:value="645406.922495725">
                <text:p>645406.922495725</text:p>
              </table:table-cell>
              <table:table-cell office:value-type="float" office:value="1.37646376811594">
                <text:p>1.37646376811594</text:p>
              </table:table-cell>
              <table:table-cell office:value-type="float" office:value="679375.707890237">
                <text:p>679375.707890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702702702703">
                <text:p>1.54702702702703</text:p>
              </table:table-cell>
              <table:table-cell office:value-type="float" office:value="725381.935695909">
                <text:p>725381.935695909</text:p>
              </table:table-cell>
              <table:table-cell office:value-type="float" office:value="1.54702702702703">
                <text:p>1.54702702702703</text:p>
              </table:table-cell>
              <table:table-cell office:value-type="float" office:value="763559.932311483">
                <text:p>763559.932311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726133076181">
                <text:p>1.71726133076181</text:p>
              </table:table-cell>
              <table:table-cell office:value-type="float" office:value="805202.705861952">
                <text:p>805202.705861952</text:p>
              </table:table-cell>
              <table:table-cell office:value-type="float" office:value="1.71726133076181">
                <text:p>1.71726133076181</text:p>
              </table:table-cell>
              <table:table-cell office:value-type="float" office:value="847581.795644159">
                <text:p>847581.795644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71676300578">
                <text:p>1.8871676300578</text:p>
              </table:table-cell>
              <table:table-cell office:value-type="float" office:value="884869.678782975">
                <text:p>884869.678782975</text:p>
              </table:table-cell>
              <table:table-cell office:value-type="float" office:value="1.8871676300578">
                <text:p>1.8871676300578</text:p>
              </table:table-cell>
              <table:table-cell office:value-type="float" office:value="931441.767139974">
                <text:p>931441.767139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7468719923">
                <text:p>2.0567468719923</text:p>
              </table:table-cell>
              <table:table-cell office:value-type="float" office:value="964383.298531871">
                <text:p>964383.298531871</text:p>
              </table:table-cell>
              <table:table-cell office:value-type="float" office:value="2.0567468719923">
                <text:p>2.0567468719923</text:p>
              </table:table-cell>
              <table:table-cell office:value-type="float" office:value="1015140.31424407">
                <text:p>1015140.31424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6">
                <text:p>2.226</text:p>
              </table:table-cell>
              <table:table-cell office:value-type="float" office:value="1043744.00747356">
                <text:p>1043744.00747356</text:p>
              </table:table-cell>
              <table:table-cell office:value-type="float" office:value="2.226">
                <text:p>2.226</text:p>
              </table:table-cell>
              <table:table-cell office:value-type="float" office:value="1098677.90260374">
                <text:p>1098677.90260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492795389049">
                <text:p>2.39492795389049</text:p>
              </table:table-cell>
              <table:table-cell office:value-type="float" office:value="1122952.24627318">
                <text:p>1122952.24627318</text:p>
              </table:table-cell>
              <table:table-cell office:value-type="float" office:value="2.39492795389049">
                <text:p>2.39492795389049</text:p>
              </table:table-cell>
              <table:table-cell office:value-type="float" office:value="1182054.99607703">
                <text:p>1182054.996077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.0000001">
                <text:p>1.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397569245385">
                <text:p>0.18397569245385</text:p>
              </table:table-cell>
              <table:table-cell office:value-type="float" office:value="172107.3193049">
                <text:p>172107.319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47354064375">
                <text:p>0.360447354064375</text:p>
              </table:table-cell>
              <table:table-cell office:value-type="float" office:value="303430.3436049">
                <text:p>303430.343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6636194650226">
                <text:p>0.536636194650226</text:p>
              </table:table-cell>
              <table:table-cell office:value-type="float" office:value="473361.6745316">
                <text:p>473361.674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2542893558613">
                <text:p>0.712542893558613</text:p>
              </table:table-cell>
              <table:table-cell office:value-type="float" office:value="633346.16169">
                <text:p>633346.16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816812796273">
                <text:p>0.88816812796273</text:p>
              </table:table-cell>
              <table:table-cell office:value-type="float" office:value="772691.1913536">
                <text:p>772691.191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6351257287044">
                <text:p>1.06351257287044</text:p>
              </table:table-cell>
              <table:table-cell office:value-type="float" office:value="907937.1764516">
                <text:p>907937.176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3857690113294">
                <text:p>1.23857690113294</text:p>
              </table:table-cell>
              <table:table-cell office:value-type="float" office:value="1044623.4098276">
                <text:p>1044623.409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336178345332">
                <text:p>1.41336178345332</text:p>
              </table:table-cell>
              <table:table-cell office:value-type="float" office:value="1203847.0933776">
                <text:p>1203847.0933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786788839521">
                <text:p>1.58786788839521</text:p>
              </table:table-cell>
              <table:table-cell office:value-type="float" office:value="1343346.5477729">
                <text:p>1343346.547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3604642975144">
                <text:p>1.93604642975144</text:p>
              </table:table-cell>
              <table:table-cell office:value-type="float" office:value="1617722.1634704">
                <text:p>1617722.163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0972019267197">
                <text:p>2.10972019267197</text:p>
              </table:table-cell>
              <table:table-cell office:value-type="float" office:value="1759156.0540841">
                <text:p>1759156.0540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8311783124321">
                <text:p>2.28311783124321</text:p>
              </table:table-cell>
              <table:table-cell office:value-type="float" office:value="1927361.3360964">
                <text:p>1927361.336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5624000345826">
                <text:p>2.45624000345826</text:p>
              </table:table-cell>
              <table:table-cell office:value-type="float" office:value="2084370.5556804">
                <text:p>2084370.555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2908736522129">
                <text:p>2.62908736522129</text:p>
              </table:table-cell>
              <table:table-cell office:value-type="float" office:value="2193113.13969">
                <text:p>2193113.1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" chart:maximum="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05cm" chart:symbol-height="0.0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Annex A Preliminary Check'.I22:'Annex B Coincidence Limit'.I36 'ISO 11171_2020 Summary'.A1:'ISO 11171_2020 Summary'.A1 'Annex A Preliminary Check'.M22:'Annex B Coincidence Limit'.M36" chart:data-source-has-labels="row" svg:x="1.395cm" svg:y="2.51cm" svg:width="18.548cm" svg:height="11.466cm">
          <chart:coordinate-region svg:x="2.13cm" svg:y="2.708cm" svg:width="17.123cm" svg:height="10.624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Annex A Preliminary Check'.M22:'Annex B Coincidence Limit'.M36" chart:label-cell-address="'ISO 11171_2020 Summary'.A1:'ISO 11171_2020 Summary'.A1" chart:class="chart:scatter">
            <chart:domain table:cell-range-address="'Annex A Preliminary Check'.I22:'Annex B Coincidence Limit'.I36"/>
            <chart:data-point chart:repeated="10"/>
            <chart:data-point chart:style-name="ch13"/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SO 11171:2020</text:p>
                <draw:g>
                  <svg:desc>'ISO 11171_2020 Summary'.A1:'ISO 11171_2020 Summary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0565">
                <text:p>1210565</text:p>
                <draw:g>
                  <svg:desc>'Annex A Preliminary Check'.I22:'Annex B Coincidence Limit'.I36</svg:desc>
                </draw:g>
              </table:table-cell>
              <table:table-cell office:value-type="float" office:value="NaN">
                <text:p>NaN</text:p>
                <draw:g>
                  <svg:desc>'Annex A Preliminary Check'.M22:'Annex B Coincidence Limit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1940">
                <text:p>1221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2389">
                <text:p>122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2577">
                <text:p>123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9566.8">
                <text:p>121956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49.90458388598">
                <text:p>8349.90458388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84661519474454">
                <text:p>0.00684661519474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54593.286356587">
                <text:p>154593.286356587</text:p>
              </table:table-cell>
              <table:table-cell office:value-type="float" office:value="1.11329103197868">
                <text:p>1.11329103197868</text:p>
              </table:table-cell>
            </table:table-row>
            <table:table-row>
              <table:table-cell office:value-type="string"/>
              <table:table-cell office:value-type="float" office:value="302880.996288821">
                <text:p>302880.996288821</text:p>
              </table:table-cell>
              <table:table-cell office:value-type="float" office:value="1.00181373979487">
                <text:p>1.00181373979487</text:p>
              </table:table-cell>
            </table:table-row>
            <table:table-row>
              <table:table-cell office:value-type="string"/>
              <table:table-cell office:value-type="float" office:value="450931.054001505">
                <text:p>450931.054001505</text:p>
              </table:table-cell>
              <table:table-cell office:value-type="float" office:value="1.04974290488767">
                <text:p>1.04974290488767</text:p>
              </table:table-cell>
            </table:table-row>
            <table:table-row>
              <table:table-cell office:value-type="string"/>
              <table:table-cell office:value-type="float" office:value="598744.030344604">
                <text:p>598744.030344604</text:p>
              </table:table-cell>
              <table:table-cell office:value-type="float" office:value="1.05779119221528">
                <text:p>1.05779119221528</text:p>
              </table:table-cell>
            </table:table-row>
            <table:table-row>
              <table:table-cell office:value-type="string"/>
              <table:table-cell office:value-type="float" office:value="746320.494341276">
                <text:p>746320.494341276</text:p>
              </table:table-cell>
              <table:table-cell office:value-type="float" office:value="1.03533427959204">
                <text:p>1.03533427959204</text:p>
              </table:table-cell>
            </table:table-row>
            <table:table-row>
              <table:table-cell office:value-type="string"/>
              <table:table-cell office:value-type="float" office:value="893661.013195168">
                <text:p>893661.013195168</text:p>
              </table:table-cell>
              <table:table-cell office:value-type="float" office:value="1.01597492007108">
                <text:p>1.01597492007108</text:p>
              </table:table-cell>
            </table:table-row>
            <table:table-row>
              <table:table-cell office:value-type="string"/>
              <table:table-cell office:value-type="float" office:value="1040766.1522977">
                <text:p>1040766.1522977</text:p>
              </table:table-cell>
              <table:table-cell office:value-type="float" office:value="1.0037061711907">
                <text:p>1.0037061711907</text:p>
              </table:table-cell>
            </table:table-row>
            <table:table-row>
              <table:table-cell office:value-type="string"/>
              <table:table-cell office:value-type="float" office:value="1187636.47523525">
                <text:p>1187636.47523525</text:p>
              </table:table-cell>
              <table:table-cell office:value-type="float" office:value="1.01364947816977">
                <text:p>1.01364947816977</text:p>
              </table:table-cell>
            </table:table-row>
            <table:table-row>
              <table:table-cell office:value-type="string"/>
              <table:table-cell office:value-type="float" office:value="1334272.54379644">
                <text:p>1334272.54379644</text:p>
              </table:table-cell>
              <table:table-cell office:value-type="float" office:value="1.00680071250709">
                <text:p>1.00680071250709</text:p>
              </table:table-cell>
            </table:table-row>
            <table:table-row>
              <table:table-cell office:value-type="string"/>
              <table:table-cell office:value-type="float" office:value="1626844.15599789">
                <text:p>1626844.15599789</text:p>
              </table:table-cell>
              <table:table-cell office:value-type="float" office:value="0.994392829519741">
                <text:p>0.994392829519741</text:p>
              </table:table-cell>
            </table:table-row>
            <table:table-row>
              <table:table-cell office:value-type="string"/>
              <table:table-cell office:value-type="float" office:value="1772780.81429059">
                <text:p>1772780.81429059</text:p>
              </table:table-cell>
              <table:table-cell office:value-type="float" office:value="0.992314469957788">
                <text:p>0.992314469957788</text:p>
              </table:table-cell>
            </table:table-row>
            <table:table-row>
              <table:table-cell office:value-type="string"/>
              <table:table-cell office:value-type="float" office:value="1918485.44752589">
                <text:p>1918485.44752589</text:p>
              </table:table-cell>
              <table:table-cell office:value-type="float" office:value="1.00462650815619">
                <text:p>1.00462650815619</text:p>
              </table:table-cell>
            </table:table-row>
            <table:table-row>
              <table:table-cell office:value-type="string"/>
              <table:table-cell office:value-type="float" office:value="2063958.60861009">
                <text:p>2063958.60861009</text:p>
              </table:table-cell>
              <table:table-cell office:value-type="float" office:value="1.00988970756737">
                <text:p>1.00988970756737</text:p>
              </table:table-cell>
            </table:table-row>
            <table:table-row>
              <table:table-cell office:value-type="string"/>
              <table:table-cell office:value-type="float" office:value="2209200.84869415">
                <text:p>2209200.84869415</text:p>
              </table:table-cell>
              <table:table-cell office:value-type="float" office:value="0.992717860391166">
                <text:p>0.9927178603911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" chart:maximum="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05cm" chart:symbol-height="0.0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Annex A Preliminary Check'.I22:'Annex B Coincidence Limit'.I36 'ISO 11171_2020 Summary'.A1:'ISO 11171_2020 Summary'.A1 'Annex A Preliminary Check'.M22:'Annex B Coincidence Limit'.M36" chart:data-source-has-labels="row" svg:x="1.395cm" svg:y="2.51cm" svg:width="18.548cm" svg:height="11.466cm">
          <chart:coordinate-region svg:x="2.13cm" svg:y="2.708cm" svg:width="17.123cm" svg:height="10.624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Annex A Preliminary Check'.M22:'Annex B Coincidence Limit'.M36" chart:label-cell-address="'ISO 11171_2020 Summary'.A1:'ISO 11171_2020 Summary'.A1" chart:class="chart:scatter">
            <chart:domain table:cell-range-address="'Annex A Preliminary Check'.I22:'Annex B Coincidence Limit'.I36"/>
            <chart:data-point chart:repeated="10"/>
            <chart:data-point chart:style-name="ch13"/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SO 11171:2020</text:p>
                <draw:g>
                  <svg:desc>'ISO 11171_2020 Summary'.A1:'ISO 11171_2020 Summary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0565">
                <text:p>1210565</text:p>
                <draw:g>
                  <svg:desc>'Annex A Preliminary Check'.I22:'Annex B Coincidence Limit'.I36</svg:desc>
                </draw:g>
              </table:table-cell>
              <table:table-cell office:value-type="float" office:value="NaN">
                <text:p>NaN</text:p>
                <draw:g>
                  <svg:desc>'Annex A Preliminary Check'.M22:'Annex B Coincidence Limit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1940">
                <text:p>1221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2389">
                <text:p>122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2577">
                <text:p>123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9566.8">
                <text:p>121956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49.90458388598">
                <text:p>8349.90458388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84661519474454">
                <text:p>0.00684661519474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54593.286356587">
                <text:p>154593.286356587</text:p>
              </table:table-cell>
              <table:table-cell office:value-type="float" office:value="1.11329103197868">
                <text:p>1.11329103197868</text:p>
              </table:table-cell>
            </table:table-row>
            <table:table-row>
              <table:table-cell office:value-type="string"/>
              <table:table-cell office:value-type="float" office:value="302880.996288821">
                <text:p>302880.996288821</text:p>
              </table:table-cell>
              <table:table-cell office:value-type="float" office:value="1.00181373979487">
                <text:p>1.00181373979487</text:p>
              </table:table-cell>
            </table:table-row>
            <table:table-row>
              <table:table-cell office:value-type="string"/>
              <table:table-cell office:value-type="float" office:value="450931.054001505">
                <text:p>450931.054001505</text:p>
              </table:table-cell>
              <table:table-cell office:value-type="float" office:value="1.04974290488767">
                <text:p>1.04974290488767</text:p>
              </table:table-cell>
            </table:table-row>
            <table:table-row>
              <table:table-cell office:value-type="string"/>
              <table:table-cell office:value-type="float" office:value="598744.030344604">
                <text:p>598744.030344604</text:p>
              </table:table-cell>
              <table:table-cell office:value-type="float" office:value="1.05779119221528">
                <text:p>1.05779119221528</text:p>
              </table:table-cell>
            </table:table-row>
            <table:table-row>
              <table:table-cell office:value-type="string"/>
              <table:table-cell office:value-type="float" office:value="746320.494341276">
                <text:p>746320.494341276</text:p>
              </table:table-cell>
              <table:table-cell office:value-type="float" office:value="1.03533427959204">
                <text:p>1.03533427959204</text:p>
              </table:table-cell>
            </table:table-row>
            <table:table-row>
              <table:table-cell office:value-type="string"/>
              <table:table-cell office:value-type="float" office:value="893661.013195168">
                <text:p>893661.013195168</text:p>
              </table:table-cell>
              <table:table-cell office:value-type="float" office:value="1.01597492007108">
                <text:p>1.01597492007108</text:p>
              </table:table-cell>
            </table:table-row>
            <table:table-row>
              <table:table-cell office:value-type="string"/>
              <table:table-cell office:value-type="float" office:value="1040766.1522977">
                <text:p>1040766.1522977</text:p>
              </table:table-cell>
              <table:table-cell office:value-type="float" office:value="1.0037061711907">
                <text:p>1.0037061711907</text:p>
              </table:table-cell>
            </table:table-row>
            <table:table-row>
              <table:table-cell office:value-type="string"/>
              <table:table-cell office:value-type="float" office:value="1187636.47523525">
                <text:p>1187636.47523525</text:p>
              </table:table-cell>
              <table:table-cell office:value-type="float" office:value="1.01364947816977">
                <text:p>1.01364947816977</text:p>
              </table:table-cell>
            </table:table-row>
            <table:table-row>
              <table:table-cell office:value-type="string"/>
              <table:table-cell office:value-type="float" office:value="1334272.54379644">
                <text:p>1334272.54379644</text:p>
              </table:table-cell>
              <table:table-cell office:value-type="float" office:value="1.00680071250709">
                <text:p>1.00680071250709</text:p>
              </table:table-cell>
            </table:table-row>
            <table:table-row>
              <table:table-cell office:value-type="string"/>
              <table:table-cell office:value-type="float" office:value="1626844.15599789">
                <text:p>1626844.15599789</text:p>
              </table:table-cell>
              <table:table-cell office:value-type="float" office:value="0.994392829519741">
                <text:p>0.994392829519741</text:p>
              </table:table-cell>
            </table:table-row>
            <table:table-row>
              <table:table-cell office:value-type="string"/>
              <table:table-cell office:value-type="float" office:value="1772780.81429059">
                <text:p>1772780.81429059</text:p>
              </table:table-cell>
              <table:table-cell office:value-type="float" office:value="0.992314469957788">
                <text:p>0.992314469957788</text:p>
              </table:table-cell>
            </table:table-row>
            <table:table-row>
              <table:table-cell office:value-type="string"/>
              <table:table-cell office:value-type="float" office:value="1918485.44752589">
                <text:p>1918485.44752589</text:p>
              </table:table-cell>
              <table:table-cell office:value-type="float" office:value="1.00462650815619">
                <text:p>1.00462650815619</text:p>
              </table:table-cell>
            </table:table-row>
            <table:table-row>
              <table:table-cell office:value-type="string"/>
              <table:table-cell office:value-type="float" office:value="2063958.60861009">
                <text:p>2063958.60861009</text:p>
              </table:table-cell>
              <table:table-cell office:value-type="float" office:value="1.00988970756737">
                <text:p>1.00988970756737</text:p>
              </table:table-cell>
            </table:table-row>
            <table:table-row>
              <table:table-cell office:value-type="string"/>
              <table:table-cell office:value-type="float" office:value="2209200.84869415">
                <text:p>2209200.84869415</text:p>
              </table:table-cell>
              <table:table-cell office:value-type="float" office:value="0.992717860391166">
                <text:p>0.9927178603911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