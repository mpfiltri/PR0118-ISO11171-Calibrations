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0ffff" fo:wrap-option="wrap" style:vertical-align="middle"/>
    </style:style>
    <style:style style:name="ce2" style:family="table-cell" style:parent-style-name="Default" style:data-style-name="N158"/>
    <style:style style:name="ce3" style:family="table-cell" style:parent-style-name="Default" style:data-style-name="N2"/>
    <style:style style:name="ce8" style:family="table-cell" style:parent-style-name="Default" style:data-style-name="N81"/>
    <style:style style:name="ce1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40" style:family="table-cell" style:parent-style-name="Default">
      <style:table-cell-properties fo:background-color="#e0ffff" style:vertical-align="middle"/>
    </style:style>
    <style:style style:name="ce21" style:family="table-cell" style:parent-style-name="Default" style:data-style-name="N157">
      <style:table-cell-properties fo:background-color="#e0ffff"/>
    </style:style>
    <style:style style:name="ce22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23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58">
      <style:table-cell-properties fo:background-color="#e0ffff"/>
    </style:style>
    <style:style style:name="ce25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26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27" style:family="table-cell" style:parent-style-name="Default" style:data-style-name="N1">
      <style:table-cell-properties fo:background-color="#e0ffff"/>
    </style:style>
    <style:style style:name="ce28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" style:family="table-cell" style:parent-style-name="Default" style:data-style-name="N1"/>
    <style:style style:name="ce31" style:family="table-cell" style:parent-style-name="Default" style:data-style-name="N2">
      <style:table-cell-properties fo:background-color="#e0ffff"/>
    </style:style>
    <style:style style:name="ce32" style:family="table-cell" style:parent-style-name="Default" style:data-style-name="N2">
      <style:table-cell-properties fo:background-color="#e0ffff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34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e0ffff"/>
    </style:style>
    <style:style style:name="ce36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37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ex B Coincidence Limit" table:style-name="ta1">
        <table:shapes>
          <draw:frame draw:z-index="0" draw:style-name="gr1" draw:text-style-name="P1" svg:width="23.951cm" svg:height="15.239cm" svg:x="0.186cm" svg:y="18.129cm">
            <draw:object draw:notify-on-update-of-ranges="'Annex B Coincidence Limit'.E22:'Annex B Coincidence Limit'.E36 'Annex B Coincidence Limit'.G22:'Annex B Coincidence Limit'.G36 'Annex B Coincidence Limit'.E22:'Annex B Coincidence Limit'.E36 'Annex B Coincidence Limit'.L22:'Annex B Coincidence Limit'.L36 'Annex B Coincidence Limit'.E22:'Annex B Coincidence Limit'.E35 'Annex B Coincidence Limit'.K22:'Annex B Coincidence Limit'.K36 'Annex B Coincidence Limit'.E22:'Annex B Coincidence Limit'.E36 'Annex B Coincidence Limit'.I22:'Annex B Coincidence Limit'.I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348cm" svg:height="15.238cm" svg:x="24.798cm" svg:y="18.113cm">
            <draw:object draw:notify-on-update-of-ranges="'Annex B Coincidence Limit'.I22:'Annex B Coincidence Limit'.I36 'Annex B Coincidence Limit'.J22:'Annex B Coincidence Limit'.J36 'Annex B Coincidence Limit'.I22:'Annex B Coincidence Limit'.I36 'Annex B Coincidence Limit'.M22:'Annex B Coincidence Limit'.M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Text Frame 1" draw:style-name="gr2" draw:text-style-name="P2" svg:width="19.604cm" svg:height="15.848cm" svg:x="31.597cm" svg:y="1.901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60" table:default-cell-style-name="Default"/>
        <table:table-row table:style-name="ro1">
          <table:table-cell table:style-name="ce1" office:value-type="string" calcext:value-type="string">
            <text:p>Δ<text:span text:style-name="T1">COUNTS_4um</text:span> &lt; 5%</text:p>
          </table:table-cell>
          <table:table-cell table:style-name="ce40" office:value-type="string" calcext:value-type="string">
            <text:p>RM8632x</text:p>
          </table:table-cell>
          <table:table-cell table:style-name="ce1" office:value-type="string" calcext:value-type="string" table:number-columns-spanned="10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40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  <table:table-cell table:number-columns-repeated="15375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0"/>
          <table:table-cell table:style-name="ce4" office:value-type="string" calcext:value-type="string">
            <text:p>portion</text:p>
          </table:table-cell>
          <table:table-cell table:style-name="ce4"/>
          <table:table-cell table:number-columns-repeated="16359"/>
        </table:table-row>
        <table:table-row table:style-name="ro2">
          <table:table-cell table:number-columns-repeated="23"/>
          <table:table-cell table:style-name="ce4" office:value-type="string" calcext:value-type="string">
            <text:p>counts</text:p>
          </table:table-cell>
          <table:table-cell table:style-name="ce4" office:value-type="string" calcext:value-type="string">
            <text:p>Averaged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3285" calcext:value-type="float">
            <text:p>3285</text:p>
          </table:table-cell>
          <table:table-cell table:style-name="ce38"/>
          <table:table-cell table:number-columns-repeated="16359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0"/>
          <table:table-cell office:value-type="float" office:value="742" calcext:value-type="float">
            <text:p>742</text:p>
          </table:table-cell>
          <table:table-cell table:number-columns-repeated="16360"/>
        </table:table-row>
        <table:table-row table:style-name="ro2">
          <table:table-cell office:value-type="float" office:value="10.34" calcext:value-type="float">
            <text:p>10.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0"/>
          <table:table-cell office:value-type="float" office:value="272" calcext:value-type="float">
            <text:p>272</text:p>
          </table:table-cell>
          <table:table-cell table:number-columns-repeated="16360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0"/>
          <table:table-cell office:value-type="float" office:value="3225" calcext:value-type="float">
            <text:p>3225</text:p>
          </table:table-cell>
          <table:table-cell table:number-columns-repeated="16360"/>
        </table:table-row>
        <table:table-row table:style-name="ro2">
          <table:table-cell table:formula="of:=[.A8]/10" office:value-type="float" office:value="4000" calcext:value-type="float">
            <text:p>4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0"/>
          <table:table-cell office:value-type="float" office:value="9264" calcext:value-type="float">
            <text:p>9264</text:p>
          </table:table-cell>
          <table:table-cell table:formula="of:=AVERAGE([.X5:.X9])" office:value-type="float" office:value="3357.6" calcext:value-type="float">
            <text:p>3357.6</text:p>
          </table:table-cell>
          <table:table-cell table:number-columns-repeated="16359"/>
        </table:table-row>
        <table:table-row table:style-name="ro2">
          <table:table-cell table:style-name="ce2" table:formula="of:=[.A9]/[.A6]*[.A7]" office:value-type="float" office:value="6.56507936507937" calcext:value-type="float">
            <text:p>6.56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0"/>
          <table:table-cell office:value-type="float" office:value="881738" calcext:value-type="float">
            <text:p>881738</text:p>
          </table:table-cell>
          <table:table-cell table:number-columns-repeated="16360"/>
        </table:table-row>
        <table:table-row table:style-name="ro2">
          <table:table-cell table:style-name="ce3" table:formula="of:=[.A10]*100" office:value-type="float" office:value="656.507936507937" calcext:value-type="float">
            <text:p>656.51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0"/>
          <table:table-cell office:value-type="float" office:value="852166" calcext:value-type="float">
            <text:p>852166</text:p>
          </table:table-cell>
          <table:table-cell table:number-columns-repeated="1636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0"/>
          <table:table-cell office:value-type="float" office:value="867043" calcext:value-type="float">
            <text:p>867043</text:p>
          </table:table-cell>
          <table:table-cell table:number-columns-repeated="16360"/>
        </table:table-row>
        <table:table-row table:style-name="ro2">
          <table:table-cell table:style-name="ce3" table:formula="of:=[.A11]*[.A12]/1000" office:value-type="float" office:value="124.736507936508" calcext:value-type="float">
            <text:p>124.7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6"/>
          <table:table-cell office:value-type="string" calcext:value-type="string">
            <text:p>Added 1.9mg</text:p>
          </table:table-cell>
          <table:table-cell table:number-columns-repeated="13"/>
          <table:table-cell office:value-type="float" office:value="851350" calcext:value-type="float">
            <text:p>851350</text:p>
          </table:table-cell>
          <table:table-cell table:number-columns-repeated="16360"/>
        </table:table-row>
        <table:table-row table:style-name="ro2">
          <table:table-cell office:value-type="float" office:value="253.02" calcext:value-type="float">
            <text:p>253.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0"/>
          <table:table-cell office:value-type="float" office:value="866366" calcext:value-type="float">
            <text:p>866366</text:p>
          </table:table-cell>
          <table:table-cell table:formula="of:=AVERAGE([.X10:.X14])" office:value-type="float" office:value="863732.6" calcext:value-type="float">
            <text:p>863732.6</text:p>
          </table:table-cell>
          <table:table-cell table:number-columns-repeated="16359"/>
        </table:table-row>
        <table:table-row table:style-name="ro2">
          <table:table-cell table:style-name="ce3" table:formula="of:=[.A11]*[.A14]/[.A13]" office:value-type="float" office:value="1331.68421052632" calcext:value-type="float">
            <text:p>1331.6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0"/>
          <table:table-cell office:value-type="float" office:value="1537100" calcext:value-type="float">
            <text:p>1537100</text:p>
          </table:table-cell>
          <table:table-cell table:number-columns-repeated="16360"/>
        </table:table-row>
        <table:table-row table:style-name="ro2">
          <table:table-cell table:style-name="ce3" table:formula="of:=[.A13]/[.A14]*10" office:value-type="float" office:value="4.92990704041214" calcext:value-type="float">
            <text:p>4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0"/>
          <table:table-cell office:value-type="float" office:value="1466787" calcext:value-type="float">
            <text:p>146678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468810" calcext:value-type="float">
            <text:p>1468810</text:p>
          </table:table-cell>
          <table:table-cell table:number-columns-repeated="16360"/>
        </table:table-row>
        <table:table-row table:style-name="ro2">
          <table:table-cell table:style-name="ce8" office:value-type="float" office:value="2000000" calcext:value-type="float">
            <text:p>2.00E+06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0"/>
          <table:table-cell office:value-type="float" office:value="1457012" calcext:value-type="float">
            <text:p>1457012</text:p>
          </table:table-cell>
          <table:table-cell table:number-columns-repeated="16360"/>
        </table:table-row>
        <table:table-row table:style-name="ro2"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0"/>
          <table:table-cell office:value-type="float" office:value="1471737" calcext:value-type="float">
            <text:p>1471737</text:p>
          </table:table-cell>
          <table:table-cell table:formula="of:=AVERAGE([.X15:.X19])" office:value-type="float" office:value="1480289.2" calcext:value-type="float">
            <text:p>1480289.2</text:p>
          </table:table-cell>
          <table:table-cell table:number-columns-repeated="16359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number-columns-repeated="10"/>
          <table:table-cell office:value-type="float" office:value="1973429" calcext:value-type="float">
            <text:p>1973429</text:p>
          </table:table-cell>
          <table:table-cell table:number-columns-repeated="16360"/>
        </table:table-row>
        <table:table-row table:style-name="ro2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style-name="ce16" office:value-type="string" calcext:value-type="string">
            <text:p>Actual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10"/>
          <table:table-cell office:value-type="float" office:value="1997216" calcext:value-type="float">
            <text:p>1997216</text:p>
          </table:table-cell>
          <table:table-cell table:number-columns-repeated="16360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1.45" calcext:value-type="float">
            <text:p>1.5</text:p>
          </table:table-cell>
          <table:table-cell table:style-name="ce21" table:formula="of:=[.B22]" office:value-type="float" office:value="1.45" calcext:value-type="float">
            <text:p>1.5</text:p>
          </table:table-cell>
          <table:table-cell table:style-name="ce24" table:formula="of:=[.C22]*[.$A$15]/1000" office:value-type="float" office:value="1.93094210526316" calcext:value-type="float">
            <text:p>1.931</text:p>
          </table:table-cell>
          <table:table-cell table:style-name="ce24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Y9]" office:value-type="float" office:value="3357.6" calcext:value-type="float">
            <text:p>3357.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I22]*0.95" office:value-type="float" office:value="0.95" calcext:value-type="float">
            <text:p>0.95</text:p>
          </table:table-cell>
          <table:table-cell table:style-name="ce36" table:formula="of:=IF([.G22]&lt;[.$A$18]; [.G22]; [.G22]*(1+[.G22]/[.$A$18]*[.$A$19]))" office:value-type="float" office:value="3357.6" calcext:value-type="float">
            <text:p>3357.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  <table:table-cell office:value-type="float" office:value="1962998" calcext:value-type="float">
            <text:p>1962998</text:p>
          </table:table-cell>
          <table:table-cell table:number-columns-repeated="16360"/>
        </table:table-row>
        <table:table-row table:style-name="ro2">
          <table:table-cell table:number-columns-repeated="2" table:style-name="ce17" office:value-type="float" office:value="10" calcext:value-type="float">
            <text:p>10</text:p>
          </table:table-cell>
          <table:table-cell table:style-name="ce21" table:formula="of:=[.C22]+[.B23]" office:value-type="float" office:value="11.45" calcext:value-type="float">
            <text:p>11.5</text:p>
          </table:table-cell>
          <table:table-cell table:style-name="ce24" table:formula="of:=[.C23]*[.$A$15]/1000" office:value-type="float" office:value="15.2477842105263" calcext:value-type="float">
            <text:p>15.248</text:p>
          </table:table-cell>
          <table:table-cell table:style-name="ce24" table:formula="of:=[.D23]/([.$A$7]+[.C23]/1000)" office:value-type="float" office:value="1.47300950210128" calcext:value-type="float">
            <text:p>1.473</text:p>
          </table:table-cell>
          <table:table-cell table:style-name="ce27" table:formula="of:=[.$A$6]*[.E23]*100" office:value-type="float" office:value="927995.986323808" calcext:value-type="float">
            <text:p>927996</text:p>
          </table:table-cell>
          <table:table-cell table:style-name="ce17" table:formula="of:=[.Y14]" office:value-type="float" office:value="863732.6" calcext:value-type="float">
            <text:p>863732.6</text:p>
          </table:table-cell>
          <table:table-cell table:style-name="ce31" table:formula="of:=[.G23]/[.F23]" office:value-type="float" office:value="0.93075036177863" calcext:value-type="float">
            <text:p>0.93</text:p>
          </table:table-cell>
          <table:table-cell table:style-name="ce27" table:formula="of:=[.E23]*[.$C$99]" office:value-type="float" office:value="702174.722629868" calcext:value-type="float">
            <text:p>702175</text:p>
          </table:table-cell>
          <table:table-cell table:style-name="ce31" table:formula="of:=[.G23]/[.I23]" office:value-type="float" office:value="1.2300821606979" calcext:value-type="float">
            <text:p>1.23</text:p>
          </table:table-cell>
          <table:table-cell table:style-name="ce27" table:formula="of:=[.I23]*0.95" office:value-type="float" office:value="667065.986498375" calcext:value-type="float">
            <text:p>667066</text:p>
          </table:table-cell>
          <table:table-cell table:style-name="ce36" table:formula="of:=IF([.G23]&lt;[.$A$18]; [.G23]; [.G23]*(1+[.G23]/[.$A$18]*[.$A$19]))" office:value-type="float" office:value="863732.6" calcext:value-type="float">
            <text:p>863732.6</text:p>
          </table:table-cell>
          <table:table-cell table:style-name="ce39" table:formula="of:=[.L23]/[.I23]" office:value-type="float" office:value="1.2300821606979" calcext:value-type="float">
            <text:p>1.2300821606979</text:p>
          </table:table-cell>
          <table:table-cell table:number-columns-repeated="10"/>
          <table:table-cell office:value-type="float" office:value="1968634" calcext:value-type="float">
            <text:p>1968634</text:p>
          </table:table-cell>
          <table:table-cell table:number-columns-repeated="1636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3]+[.B24]" office:value-type="float" office:value="21.45" calcext:value-type="float">
            <text:p>21.5</text:p>
          </table:table-cell>
          <table:table-cell table:style-name="ce24" table:formula="of:=[.C24]*[.$A$15]/1000" office:value-type="float" office:value="28.5646263157895" calcext:value-type="float">
            <text:p>28.565</text:p>
          </table:table-cell>
          <table:table-cell table:style-name="ce24" table:formula="of:=[.D24]/([.$A$7]+[.C24]/1000)" office:value-type="float" office:value="2.75681746433071" calcext:value-type="float">
            <text:p>2.757</text:p>
          </table:table-cell>
          <table:table-cell table:style-name="ce27" table:formula="of:=[.$A$6]*[.E24]*100" office:value-type="float" office:value="1736795.00252835" calcext:value-type="float">
            <text:p>1736795</text:p>
          </table:table-cell>
          <table:table-cell table:style-name="ce17" table:formula="of:=[.Y19]" office:value-type="float" office:value="1480289.2" calcext:value-type="float">
            <text:p>1480289.2</text:p>
          </table:table-cell>
          <table:table-cell table:style-name="ce31" table:formula="of:=[.G24]/[.F24]" office:value-type="float" office:value="0.852310835674366" calcext:value-type="float">
            <text:p>0.85</text:p>
          </table:table-cell>
          <table:table-cell table:style-name="ce27" table:formula="of:=[.E24]*[.$C$99]" office:value-type="float" office:value="1314158.21527029" calcext:value-type="float">
            <text:p>1314158</text:p>
          </table:table-cell>
          <table:table-cell table:style-name="ce31" table:formula="of:=[.G24]/[.I24]" office:value-type="float" office:value="1.12641627377838" calcext:value-type="float">
            <text:p>1.13</text:p>
          </table:table-cell>
          <table:table-cell table:style-name="ce27" table:formula="of:=[.I24]*0.95" office:value-type="float" office:value="1248450.30450677" calcext:value-type="float">
            <text:p>1248450</text:p>
          </table:table-cell>
          <table:table-cell table:style-name="ce36" table:formula="of:=IF([.G24]&lt;[.$A$18]; [.G24]; [.G24]*(1+[.G24]/[.$A$18]*[.$A$19]))" office:value-type="float" office:value="1480289.2" calcext:value-type="float">
            <text:p>1480289.2</text:p>
          </table:table-cell>
          <table:table-cell table:style-name="ce39" table:formula="of:=[.L24]/[.I24]" office:value-type="float" office:value="1.12641627377838" calcext:value-type="float">
            <text:p>1.12641627377838</text:p>
          </table:table-cell>
          <table:table-cell table:number-columns-repeated="10"/>
          <table:table-cell office:value-type="float" office:value="1961405" calcext:value-type="float">
            <text:p>1961405</text:p>
          </table:table-cell>
          <table:table-cell table:formula="of:=AVERAGE([.X20:.X24])" office:value-type="float" office:value="1972736.4" calcext:value-type="float">
            <text:p>1972736.4</text:p>
          </table:table-cell>
          <table:table-cell table:number-columns-repeated="16359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4]+[.B25]" office:value-type="float" office:value="31.45" calcext:value-type="float">
            <text:p>31.5</text:p>
          </table:table-cell>
          <table:table-cell table:style-name="ce24" table:formula="of:=[.C25]*[.$A$15]/1000" office:value-type="float" office:value="41.8814684210526" calcext:value-type="float">
            <text:p>41.881</text:p>
          </table:table-cell>
          <table:table-cell table:style-name="ce24" table:formula="of:=[.D25]/([.$A$7]+[.C25]/1000)" office:value-type="float" office:value="4.03814976893806" calcext:value-type="float">
            <text:p>4.038</text:p>
          </table:table-cell>
          <table:table-cell table:style-name="ce27" table:formula="of:=[.$A$6]*[.E25]*100" office:value-type="float" office:value="2544034.35443098" calcext:value-type="float">
            <text:p>2544034</text:p>
          </table:table-cell>
          <table:table-cell table:style-name="ce17" table:formula="of:=[.Y24]" office:value-type="float" office:value="1972736.4" calcext:value-type="float">
            <text:p>1972736.4</text:p>
          </table:table-cell>
          <table:table-cell table:style-name="ce31" table:formula="of:=[.G25]/[.F25]" office:value-type="float" office:value="0.775436226544685" calcext:value-type="float">
            <text:p>0.78</text:p>
          </table:table-cell>
          <table:table-cell table:style-name="ce27" table:formula="of:=[.E25]*[.$C$99]" office:value-type="float" office:value="1924961.57689211" calcext:value-type="float">
            <text:p>1924962</text:p>
          </table:table-cell>
          <table:table-cell table:style-name="ce31" table:formula="of:=[.G25]/[.I25]" office:value-type="float" office:value="1.02481858530653" calcext:value-type="float">
            <text:p>1.02</text:p>
          </table:table-cell>
          <table:table-cell table:style-name="ce27" table:formula="of:=[.I25]*0.95" office:value-type="float" office:value="1828713.49804751" calcext:value-type="float">
            <text:p>1828713</text:p>
          </table:table-cell>
          <table:table-cell table:style-name="ce36" table:formula="of:=IF([.G25]&lt;[.$A$18]; [.G25]; [.G25]*(1+[.G25]/[.$A$18]*[.$A$19]))" office:value-type="float" office:value="1972736.4" calcext:value-type="float">
            <text:p>1972736.4</text:p>
          </table:table-cell>
          <table:table-cell table:style-name="ce39" table:formula="of:=[.L25]/[.I25]" office:value-type="float" office:value="1.02481858530653" calcext:value-type="float">
            <text:p>1.02481858530653</text:p>
          </table:table-cell>
          <table:table-cell table:number-columns-repeated="10"/>
          <table:table-cell office:value-type="float" office:value="2389655" calcext:value-type="float">
            <text:p>2389655</text:p>
          </table:table-cell>
          <table:table-cell table:number-columns-repeated="16360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5]+[.B26]" office:value-type="float" office:value="41.45" calcext:value-type="float">
            <text:p>41.5</text:p>
          </table:table-cell>
          <table:table-cell table:style-name="ce24" table:formula="of:=[.C26]*[.$A$15]/1000" office:value-type="float" office:value="55.1983105263158" calcext:value-type="float">
            <text:p>55.198</text:p>
          </table:table-cell>
          <table:table-cell table:style-name="ce24" table:formula="of:=[.D26]/([.$A$7]+[.C26]/1000)" office:value-type="float" office:value="5.31701357000379" calcext:value-type="float">
            <text:p>5.317</text:p>
          </table:table-cell>
          <table:table-cell table:style-name="ce27" table:formula="of:=[.$A$6]*[.E26]*100" office:value-type="float" office:value="3349718.54910238" calcext:value-type="float">
            <text:p>3349719</text:p>
          </table:table-cell>
          <table:table-cell table:style-name="ce17" table:formula="of:=[.Y29]" office:value-type="float" office:value="2367409.6" calcext:value-type="float">
            <text:p>2367409.6</text:p>
          </table:table-cell>
          <table:table-cell table:style-name="ce31" table:formula="of:=[.G26]/[.F26]" office:value-type="float" office:value="0.70674881047376" calcext:value-type="float">
            <text:p>0.71</text:p>
          </table:table-cell>
          <table:table-cell table:style-name="ce27" table:formula="of:=[.E26]*[.$C$99]" office:value-type="float" office:value="2534588.21780225" calcext:value-type="float">
            <text:p>2534588</text:p>
          </table:table-cell>
          <table:table-cell table:style-name="ce31" table:formula="of:=[.G26]/[.I26]" office:value-type="float" office:value="0.934041113018663" calcext:value-type="float">
            <text:p>0.93</text:p>
          </table:table-cell>
          <table:table-cell table:style-name="ce27" table:formula="of:=[.I26]*0.95" office:value-type="float" office:value="2407858.80691213" calcext:value-type="float">
            <text:p>2407859</text:p>
          </table:table-cell>
          <table:table-cell table:style-name="ce36" table:formula="of:=IF([.G26]&lt;[.$A$18]; [.G26]; [.G26]*(1+[.G26]/[.$A$18]*[.$A$19]))" office:value-type="float" office:value="3208103.83212582" calcext:value-type="float">
            <text:p>3208103.83212582</text:p>
          </table:table-cell>
          <table:table-cell table:style-name="ce39" table:formula="of:=[.L26]/[.I26]" office:value-type="float" office:value="1.26572979768192" calcext:value-type="float">
            <text:p>1.26572979768192</text:p>
          </table:table-cell>
          <table:table-cell table:number-columns-repeated="2"/>
          <table:table-cell table:style-name="ce4" table:number-columns-repeated="2"/>
          <table:table-cell table:number-columns-repeated="6"/>
          <table:table-cell office:value-type="float" office:value="2340678" calcext:value-type="float">
            <text:p>2340678</text:p>
          </table:table-cell>
          <table:table-cell table:number-columns-repeated="5"/>
          <table:table-cell table:style-name="ce4" table:number-columns-repeated="16355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6]+[.B27]" office:value-type="float" office:value="51.45" calcext:value-type="float">
            <text:p>51.5</text:p>
          </table:table-cell>
          <table:table-cell table:style-name="ce24" table:formula="of:=[.C27]*[.$A$15]/1000" office:value-type="float" office:value="68.515152631579" calcext:value-type="float">
            <text:p>68.515</text:p>
          </table:table-cell>
          <table:table-cell table:style-name="ce24" table:formula="of:=[.D27]/([.$A$7]+[.C27]/1000)" office:value-type="float" office:value="6.59341599407002" calcext:value-type="float">
            <text:p>6.593</text:p>
          </table:table-cell>
          <table:table-cell table:style-name="ce27" table:formula="of:=[.$A$6]*[.E27]*100" office:value-type="float" office:value="4153852.07626412" calcext:value-type="float">
            <text:p>4153852</text:p>
          </table:table-cell>
          <table:table-cell table:style-name="ce17" table:formula="of:=[.Y34]" office:value-type="float" office:value="2680435.4" calcext:value-type="float">
            <text:p>2680435.4</text:p>
          </table:table-cell>
          <table:table-cell table:style-name="ce31" table:formula="of:=[.G27]/[.F27]" office:value-type="float" office:value="0.645289083671638" calcext:value-type="float">
            <text:p>0.65</text:p>
          </table:table-cell>
          <table:table-cell table:style-name="ce27" table:formula="of:=[.E27]*[.$C$99]" office:value-type="float" office:value="3143041.53518022" calcext:value-type="float">
            <text:p>3143042</text:p>
          </table:table-cell>
          <table:table-cell table:style-name="ce31" table:formula="of:=[.G27]/[.I27]" office:value-type="float" office:value="0.852815774146716" calcext:value-type="float">
            <text:p>0.85</text:p>
          </table:table-cell>
          <table:table-cell table:style-name="ce27" table:formula="of:=[.I27]*0.95" office:value-type="float" office:value="2985889.45842121" calcext:value-type="float">
            <text:p>2985889</text:p>
          </table:table-cell>
          <table:table-cell table:style-name="ce36" table:formula="of:=IF([.G27]&lt;[.$A$18]; [.G27]; [.G27]*(1+[.G27]/[.$A$18]*[.$A$19]))" office:value-type="float" office:value="3758145.49003597" calcext:value-type="float">
            <text:p>3758145.49003597</text:p>
          </table:table-cell>
          <table:table-cell table:style-name="ce39" table:formula="of:=[.L27]/[.I27]" office:value-type="float" office:value="1.1957034127519" calcext:value-type="float">
            <text:p>1.1957034127519</text:p>
          </table:table-cell>
          <table:table-cell table:number-columns-repeated="10"/>
          <table:table-cell office:value-type="float" office:value="2410522" calcext:value-type="float">
            <text:p>2410522</text:p>
          </table:table-cell>
          <table:table-cell table:number-columns-repeated="16360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[.C27]+[.B28]" office:value-type="float" office:value="61.45" calcext:value-type="float">
            <text:p>61.5</text:p>
          </table:table-cell>
          <table:table-cell table:style-name="ce25" table:formula="of:=[.C28]*[.$A$15]/1000" office:value-type="float" office:value="81.8319947368421" calcext:value-type="float">
            <text:p>81.832</text:p>
          </table:table-cell>
          <table:table-cell table:style-name="ce25" table:formula="of:=[.D28]/([.$A$7]+[.C28]/1000)" office:value-type="float" office:value="7.86736414027295" calcext:value-type="float">
            <text:p>7.867</text:p>
          </table:table-cell>
          <table:table-cell table:style-name="ce28" table:formula="of:=[.$A$6]*[.E28]*100" office:value-type="float" office:value="4956439.40837196" calcext:value-type="float">
            <text:p>4956439</text:p>
          </table:table-cell>
          <table:table-cell table:style-name="ce18" table:formula="of:=[.Y39]" office:value-type="float" office:value="2870681.2" calcext:value-type="float">
            <text:p>2870681.2</text:p>
          </table:table-cell>
          <table:table-cell table:style-name="ce32" table:formula="of:=[.G28]/[.F28]" office:value-type="float" office:value="0.579182143365076" calcext:value-type="float">
            <text:p>0.58</text:p>
          </table:table-cell>
          <table:table-cell table:style-name="ce28" table:formula="of:=[.E28]*[.$C$99]" office:value-type="float" office:value="3750324.91314133" calcext:value-type="float">
            <text:p>3750325</text:p>
          </table:table-cell>
          <table:table-cell table:style-name="ce32" table:formula="of:=[.G28]/[.I28]" office:value-type="float" office:value="0.765448665511884" calcext:value-type="float">
            <text:p>0.77</text:p>
          </table:table-cell>
          <table:table-cell table:style-name="ce28" table:formula="of:=[.I28]*0.95" office:value-type="float" office:value="3562808.66748426" calcext:value-type="float">
            <text:p>3562809</text:p>
          </table:table-cell>
          <table:table-cell table:style-name="ce36" table:formula="of:=IF([.G28]&lt;[.$A$18]; [.G28]; [.G28]*(1+[.G28]/[.$A$18]*[.$A$19]))" office:value-type="float" office:value="4106802.78280502" calcext:value-type="float">
            <text:p>4106802.78280502</text:p>
          </table:table-cell>
          <table:table-cell table:style-name="ce39" table:formula="of:=[.L28]/[.I28]" office:value-type="float" office:value="1.09505252955939" calcext:value-type="float">
            <text:p>1.09505252955939</text:p>
          </table:table-cell>
          <table:table-cell table:number-columns-repeated="10"/>
          <table:table-cell office:value-type="float" office:value="2329124" calcext:value-type="float">
            <text:p>2329124</text:p>
          </table:table-cell>
          <table:table-cell table:number-columns-repeated="16360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8]+[.B29]" office:value-type="float" office:value="71.45" calcext:value-type="float">
            <text:p>71.5</text:p>
          </table:table-cell>
          <table:table-cell table:style-name="ce24" table:formula="of:=[.C29]*[.$A$15]/1000" office:value-type="float" office:value="95.1488368421053" calcext:value-type="float">
            <text:p>95.149</text:p>
          </table:table-cell>
          <table:table-cell table:style-name="ce24" table:formula="of:=[.D29]/([.$A$7]+[.C29]/1000)" office:value-type="float" office:value="9.13886508047441" calcext:value-type="float">
            <text:p>9.139</text:p>
          </table:table-cell>
          <table:table-cell table:style-name="ce27" table:formula="of:=[.$A$6]*[.E29]*100" office:value-type="float" office:value="5757485.00069888" calcext:value-type="float">
            <text:p>5757485</text:p>
          </table:table-cell>
          <table:table-cell table:style-name="ce17" table:formula="of:=[.Y44]" office:value-type="float" office:value="3166478.6" calcext:value-type="float">
            <text:p>3166478.6</text:p>
          </table:table-cell>
          <table:table-cell table:style-name="ce31" table:formula="of:=[.G29]/[.F29]" office:value-type="float" office:value="0.549976005081322" calcext:value-type="float">
            <text:p>0.55</text:p>
          </table:table-cell>
          <table:table-cell table:style-name="ce27" table:formula="of:=[.E29]*[.$C$99]" office:value-type="float" office:value="4356441.72279935" calcext:value-type="float">
            <text:p>4356442</text:p>
          </table:table-cell>
          <table:table-cell table:style-name="ce31" table:formula="of:=[.G29]/[.I29]" office:value-type="float" office:value="0.726849755255144" calcext:value-type="float">
            <text:p>0.73</text:p>
          </table:table-cell>
          <table:table-cell table:style-name="ce27" table:formula="of:=[.I29]*0.95" office:value-type="float" office:value="4138619.63665938" calcext:value-type="float">
            <text:p>4138620</text:p>
          </table:table-cell>
          <table:table-cell table:style-name="ce36" table:formula="of:=IF([.G29]&lt;[.$A$18]; [.G29]; [.G29]*(1+[.G29]/[.$A$18]*[.$A$19]))" office:value-type="float" office:value="4670466.60863869" calcext:value-type="float">
            <text:p>4670466.60863869</text:p>
          </table:table-cell>
          <table:table-cell table:style-name="ce39" table:formula="of:=[.L29]/[.I29]" office:value-type="float" office:value="1.07208288456974" calcext:value-type="float">
            <text:p>1.07208288456974</text:p>
          </table:table-cell>
          <table:table-cell table:number-columns-repeated="10"/>
          <table:table-cell office:value-type="float" office:value="2367069" calcext:value-type="float">
            <text:p>2367069</text:p>
          </table:table-cell>
          <table:table-cell table:formula="of:=AVERAGE([.X25:.X29])" office:value-type="float" office:value="2367409.6" calcext:value-type="float">
            <text:p>2367409.6</text:p>
          </table:table-cell>
          <table:table-cell table:number-columns-repeated="16359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9]+[.B30]" office:value-type="float" office:value="81.45" calcext:value-type="float">
            <text:p>81.5</text:p>
          </table:table-cell>
          <table:table-cell table:style-name="ce24" table:formula="of:=[.C30]*[.$A$15]/1000" office:value-type="float" office:value="108.465678947368" calcext:value-type="float">
            <text:p>108.466</text:p>
          </table:table-cell>
          <table:table-cell table:style-name="ce24" table:formula="of:=[.D30]/([.$A$7]+[.C30]/1000)" office:value-type="float" office:value="10.4079258593927" calcext:value-type="float">
            <text:p>10.408</text:p>
          </table:table-cell>
          <table:table-cell table:style-name="ce27" table:formula="of:=[.$A$6]*[.E30]*100" office:value-type="float" office:value="6556993.29141742" calcext:value-type="float">
            <text:p>6556993</text:p>
          </table:table-cell>
          <table:table-cell table:style-name="ce17" table:formula="of:=[.Y49]" office:value-type="float" office:value="3354567.6" calcext:value-type="float">
            <text:p>3354567.6</text:p>
          </table:table-cell>
          <table:table-cell table:style-name="ce31" table:formula="of:=[.G30]/[.F30]" office:value-type="float" office:value="0.511601499484659" calcext:value-type="float">
            <text:p>0.51</text:p>
          </table:table-cell>
          <table:table-cell table:style-name="ce27" table:formula="of:=[.E30]*[.$C$99]" office:value-type="float" office:value="4961395.32232889" calcext:value-type="float">
            <text:p>4961395</text:p>
          </table:table-cell>
          <table:table-cell table:style-name="ce31" table:formula="of:=[.G30]/[.I30]" office:value-type="float" office:value="0.676133906303068" calcext:value-type="float">
            <text:p>0.68</text:p>
          </table:table-cell>
          <table:table-cell table:style-name="ce27" table:formula="of:=[.I30]*0.95" office:value-type="float" office:value="4713325.55621245" calcext:value-type="float">
            <text:p>4713326</text:p>
          </table:table-cell>
          <table:table-cell table:style-name="ce36" table:formula="of:=IF([.G30]&lt;[.$A$18]; [.G30]; [.G30]*(1+[.G30]/[.$A$18]*[.$A$19]))" office:value-type="float" office:value="5042536.16744546" calcext:value-type="float">
            <text:p>5042536.16744546</text:p>
          </table:table-cell>
          <table:table-cell table:style-name="ce39" table:formula="of:=[.L30]/[.I30]" office:value-type="float" office:value="1.01635444060492" calcext:value-type="float">
            <text:p>1.01635444060492</text:p>
          </table:table-cell>
          <table:table-cell table:number-columns-repeated="10"/>
          <table:table-cell office:value-type="float" office:value="2725570" calcext:value-type="float">
            <text:p>2725570</text:p>
          </table:table-cell>
          <table:table-cell table:style-name="ce4"/>
          <table:table-cell table:number-columns-repeated="16359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0]+[.B31]" office:value-type="float" office:value="91.45" calcext:value-type="float">
            <text:p>91.5</text:p>
          </table:table-cell>
          <table:table-cell table:style-name="ce24" table:formula="of:=[.C31]*[.$A$15]/1000" office:value-type="float" office:value="121.782521052632" calcext:value-type="float">
            <text:p>121.783</text:p>
          </table:table-cell>
          <table:table-cell table:style-name="ce24" table:formula="of:=[.D31]/([.$A$7]+[.C31]/1000)" office:value-type="float" office:value="11.6745534947329" calcext:value-type="float">
            <text:p>11.675</text:p>
          </table:table-cell>
          <table:table-cell table:style-name="ce27" table:formula="of:=[.$A$6]*[.E31]*100" office:value-type="float" office:value="7354968.70168173" calcext:value-type="float">
            <text:p>7354969</text:p>
          </table:table-cell>
          <table:table-cell table:style-name="ce17" table:formula="of:=[.Y54]" office:value-type="float" office:value="3458586.6" calcext:value-type="float">
            <text:p>3458586.6</text:p>
          </table:table-cell>
          <table:table-cell table:style-name="ce31" table:formula="of:=[.G31]/[.F31]" office:value-type="float" office:value="0.470238112530538" calcext:value-type="float">
            <text:p>0.47</text:p>
          </table:table-cell>
          <table:table-cell table:style-name="ce27" table:formula="of:=[.E31]*[.$C$99]" office:value-type="float" office:value="5565189.05702754" calcext:value-type="float">
            <text:p>5565189</text:p>
          </table:table-cell>
          <table:table-cell table:style-name="ce31" table:formula="of:=[.G31]/[.I31]" office:value-type="float" office:value="0.62146794377679" calcext:value-type="float">
            <text:p>0.62</text:p>
          </table:table-cell>
          <table:table-cell table:style-name="ce27" table:formula="of:=[.I31]*0.95" office:value-type="float" office:value="5286929.60417617" calcext:value-type="float">
            <text:p>5286930</text:p>
          </table:table-cell>
          <table:table-cell table:style-name="ce36" table:formula="of:=IF([.G31]&lt;[.$A$18]; [.G31]; [.G31]*(1+[.G31]/[.$A$18]*[.$A$19]))" office:value-type="float" office:value="5252859.79045493" calcext:value-type="float">
            <text:p>5252859.79045493</text:p>
          </table:table-cell>
          <table:table-cell table:style-name="ce39" table:formula="of:=[.L31]/[.I31]" office:value-type="float" office:value="0.943878049178183" calcext:value-type="float">
            <text:p>0.943878049178183</text:p>
          </table:table-cell>
          <table:table-cell table:number-columns-repeated="10"/>
          <table:table-cell office:value-type="float" office:value="2685195" calcext:value-type="float">
            <text:p>2685195</text:p>
          </table:table-cell>
          <table:table-cell table:number-columns-repeated="16360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1]+[.B32]" office:value-type="float" office:value="101.45" calcext:value-type="float">
            <text:p>101.5</text:p>
          </table:table-cell>
          <table:table-cell table:style-name="ce24" table:formula="of:=[.C32]*[.$A$15]/1000" office:value-type="float" office:value="135.099363157895" calcext:value-type="float">
            <text:p>135.099</text:p>
          </table:table-cell>
          <table:table-cell table:style-name="ce24" table:formula="of:=[.D32]/([.$A$7]+[.C32]/1000)" office:value-type="float" office:value="12.9387549773159" calcext:value-type="float">
            <text:p>12.939</text:p>
          </table:table-cell>
          <table:table-cell table:style-name="ce27" table:formula="of:=[.$A$6]*[.E32]*100" office:value-type="float" office:value="8151415.63570899" calcext:value-type="float">
            <text:p>8151416</text:p>
          </table:table-cell>
          <table:table-cell table:style-name="ce17" table:formula="of:=[.Y59]" office:value-type="float" office:value="3603050" calcext:value-type="float">
            <text:p>3603050</text:p>
          </table:table-cell>
          <table:table-cell table:style-name="ce31" table:formula="of:=[.G32]/[.F32]" office:value-type="float" office:value="0.442015247537628" calcext:value-type="float">
            <text:p>0.44</text:p>
          </table:table-cell>
          <table:table-cell table:style-name="ce27" table:formula="of:=[.E32]*[.$C$99]" office:value-type="float" office:value="6167826.25937734" calcext:value-type="float">
            <text:p>6167826</text:p>
          </table:table-cell>
          <table:table-cell table:style-name="ce31" table:formula="of:=[.G32]/[.I32]" office:value-type="float" office:value="0.584168530123891" calcext:value-type="float">
            <text:p>0.58</text:p>
          </table:table-cell>
          <table:table-cell table:style-name="ce27" table:formula="of:=[.I32]*0.95" office:value-type="float" office:value="5859434.94640848" calcext:value-type="float">
            <text:p>5859435</text:p>
          </table:table-cell>
          <table:table-cell table:style-name="ce36" table:formula="of:=IF([.G32]&lt;[.$A$18]; [.G32]; [.G32]*(1+[.G32]/[.$A$18]*[.$A$19]))" office:value-type="float" office:value="5550345.395375" calcext:value-type="float">
            <text:p>5550345.395375</text:p>
          </table:table-cell>
          <table:table-cell table:style-name="ce39" table:formula="of:=[.L32]/[.I32]" office:value-type="float" office:value="0.899886793493324" calcext:value-type="float">
            <text:p>0.899886793493324</text:p>
          </table:table-cell>
          <table:table-cell table:number-columns-repeated="10"/>
          <table:table-cell office:value-type="float" office:value="2662791" calcext:value-type="float">
            <text:p>2662791</text:p>
          </table:table-cell>
          <table:table-cell table:number-columns-repeated="16360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21" table:formula="of:=[.C32]+[.B33]" office:value-type="float" office:value="101.45" calcext:value-type="float">
            <text:p>101.5</text:p>
          </table:table-cell>
          <table:table-cell table:style-name="ce24" table:formula="of:=[.C33]*[.$A$15]/1000" office:value-type="float" office:value="135.099363157895" calcext:value-type="float">
            <text:p>135.099</text:p>
          </table:table-cell>
          <table:table-cell table:style-name="ce24" table:formula="of:=[.D33]/([.$A$7]+[.C33]/1000)" office:value-type="float" office:value="12.9387549773159" calcext:value-type="float">
            <text:p>12.939</text:p>
          </table:table-cell>
          <table:table-cell table:style-name="ce27" table:formula="of:=[.$A$6]*[.E33]*100" office:value-type="float" office:value="8151415.63570899" calcext:value-type="float">
            <text:p>8151416</text:p>
          </table:table-cell>
          <table:table-cell table:style-name="ce17" table:formula="of:=[.Y64]" office:value-type="float" office:value="0" calcext:value-type="float">
            <text:p>0</text:p>
          </table:table-cell>
          <table:table-cell table:style-name="ce31" table:formula="of:=[.G33]/[.F33]" office:value-type="float" office:value="0" calcext:value-type="float">
            <text:p>0.00</text:p>
          </table:table-cell>
          <table:table-cell table:style-name="ce27" table:formula="of:=[.E33]*[.$C$99]" office:value-type="float" office:value="6167826.25937734" calcext:value-type="float">
            <text:p>6167826</text:p>
          </table:table-cell>
          <table:table-cell table:style-name="ce31" table:formula="of:=[.G33]/[.I33]" office:value-type="float" office:value="0" calcext:value-type="float">
            <text:p>0.00</text:p>
          </table:table-cell>
          <table:table-cell table:style-name="ce27" table:formula="of:=[.I33]*0.95" office:value-type="float" office:value="5859434.94640848" calcext:value-type="float">
            <text:p>5859435</text:p>
          </table:table-cell>
          <table:table-cell table:style-name="ce36" table:formula="of:=IF([.G33]&lt;[.$A$18]; [.G33]; [.G33]*(1+[.G33]/[.$A$18]*[.$A$19]))" office:value-type="float" office:value="0" calcext:value-type="float">
            <text:p>0</text:p>
          </table:table-cell>
          <table:table-cell table:style-name="ce39" table:formula="of:=[.L33]/[.I33]" office:value-type="float" office:value="0" calcext:value-type="float">
            <text:p>0</text:p>
          </table:table-cell>
          <table:table-cell table:number-columns-repeated="10"/>
          <table:table-cell office:value-type="float" office:value="2660365" calcext:value-type="float">
            <text:p>2660365</text:p>
          </table:table-cell>
          <table:table-cell table:number-columns-repeated="16360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1" table:formula="of:=[.C33]+[.B34]" office:value-type="float" office:value="101.45" calcext:value-type="float">
            <text:p>101.5</text:p>
          </table:table-cell>
          <table:table-cell table:style-name="ce24" table:formula="of:=[.C34]*[.$A$15]/1000" office:value-type="float" office:value="135.099363157895" calcext:value-type="float">
            <text:p>135.099</text:p>
          </table:table-cell>
          <table:table-cell table:style-name="ce24" table:formula="of:=[.D34]/([.$A$7]+[.C34]/1000)" office:value-type="float" office:value="12.9387549773159" calcext:value-type="float">
            <text:p>12.939</text:p>
          </table:table-cell>
          <table:table-cell table:style-name="ce27" table:formula="of:=[.$A$6]*[.E34]*100" office:value-type="float" office:value="8151415.63570899" calcext:value-type="float">
            <text:p>8151416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formula="of:=[.G34]/[.F34]" office:value-type="float" office:value="0" calcext:value-type="float">
            <text:p>0.00</text:p>
          </table:table-cell>
          <table:table-cell table:style-name="ce27" table:formula="of:=[.E34]*[.$C$99]" office:value-type="float" office:value="6167826.25937734" calcext:value-type="float">
            <text:p>6167826</text:p>
          </table:table-cell>
          <table:table-cell table:style-name="ce31" table:formula="of:=[.G34]/[.I34]" office:value-type="float" office:value="0" calcext:value-type="float">
            <text:p>0.00</text:p>
          </table:table-cell>
          <table:table-cell table:style-name="ce27" table:formula="of:=[.I34]*0.95" office:value-type="float" office:value="5859434.94640848" calcext:value-type="float">
            <text:p>5859435</text:p>
          </table:table-cell>
          <table:table-cell table:style-name="ce36" table:formula="of:=IF([.G34]&lt;[.$A$18]; [.G34]; [.G34]*(1+[.G34]/[.$A$18]*[.$A$19]))" office:value-type="float" office:value="0" calcext:value-type="float">
            <text:p>0</text:p>
          </table:table-cell>
          <table:table-cell table:style-name="ce39" table:formula="of:=[.L34]/[.I34]" office:value-type="float" office:value="0" calcext:value-type="float">
            <text:p>0</text:p>
          </table:table-cell>
          <table:table-cell table:number-columns-repeated="10"/>
          <table:table-cell office:value-type="float" office:value="2668256" calcext:value-type="float">
            <text:p>2668256</text:p>
          </table:table-cell>
          <table:table-cell table:formula="of:=AVERAGE([.X30:.X34])" office:value-type="float" office:value="2680435.4" calcext:value-type="float">
            <text:p>2680435.4</text:p>
          </table:table-cell>
          <table:table-cell table:number-columns-repeated="16359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/>
          <table:table-cell table:style-name="ce21" table:formula="of:=[.C34]+[.B35]" office:value-type="float" office:value="101.45" calcext:value-type="float">
            <text:p>101.5</text:p>
          </table:table-cell>
          <table:table-cell table:style-name="ce24" table:formula="of:=[.C35]*[.$A$15]/1000" office:value-type="float" office:value="135.099363157895" calcext:value-type="float">
            <text:p>135.099</text:p>
          </table:table-cell>
          <table:table-cell table:style-name="ce24" table:formula="of:=[.D35]/([.$A$7]+[.C35]/1000)" office:value-type="float" office:value="12.9387549773159" calcext:value-type="float">
            <text:p>12.939</text:p>
          </table:table-cell>
          <table:table-cell table:style-name="ce27" table:formula="of:=[.$A$6]*[.E35]*100" office:value-type="float" office:value="8151415.63570899" calcext:value-type="float">
            <text:p>8151416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formula="of:=[.G35]/[.F35]" office:value-type="float" office:value="0" calcext:value-type="float">
            <text:p>0.00</text:p>
          </table:table-cell>
          <table:table-cell table:style-name="ce27" table:formula="of:=[.E35]*[.$C$99]" office:value-type="float" office:value="6167826.25937734" calcext:value-type="float">
            <text:p>6167826</text:p>
          </table:table-cell>
          <table:table-cell table:style-name="ce31" table:formula="of:=[.G35]/[.I35]" office:value-type="float" office:value="0" calcext:value-type="float">
            <text:p>0.00</text:p>
          </table:table-cell>
          <table:table-cell table:style-name="ce27" table:formula="of:=[.I35]*0.95" office:value-type="float" office:value="5859434.94640848" calcext:value-type="float">
            <text:p>5859435</text:p>
          </table:table-cell>
          <table:table-cell table:style-name="ce36" table:formula="of:=IF([.G35]&lt;[.$A$18]; [.G35]; [.G35]*(1+[.G35]/[.$A$18]*[.$A$19]))" office:value-type="float" office:value="0" calcext:value-type="float">
            <text:p>0</text:p>
          </table:table-cell>
          <table:table-cell table:style-name="ce39" table:formula="of:=[.L35]/[.I35]" office:value-type="float" office:value="0" calcext:value-type="float">
            <text:p>0</text:p>
          </table:table-cell>
          <table:table-cell table:number-columns-repeated="10"/>
          <table:table-cell office:value-type="float" office:value="2887237" calcext:value-type="float">
            <text:p>2887237</text:p>
          </table:table-cell>
          <table:table-cell table:number-columns-repeated="16360"/>
        </table:table-row>
        <table:table-row table:style-name="ro2">
          <table:table-cell table:style-name="ce19" office:value-type="float" office:value="150" calcext:value-type="float">
            <text:p>150</text:p>
          </table:table-cell>
          <table:table-cell table:style-name="ce19"/>
          <table:table-cell table:style-name="ce23" table:formula="of:=[.C35]+[.B36]" office:value-type="float" office:value="101.45" calcext:value-type="float">
            <text:p>101.5</text:p>
          </table:table-cell>
          <table:table-cell table:style-name="ce26" table:formula="of:=[.C36]*[.$A$15]/1000" office:value-type="float" office:value="135.099363157895" calcext:value-type="float">
            <text:p>135.099</text:p>
          </table:table-cell>
          <table:table-cell table:style-name="ce26" table:formula="of:=[.D36]/([.$A$7]+[.C36]/1000)" office:value-type="float" office:value="12.9387549773159" calcext:value-type="float">
            <text:p>12.939</text:p>
          </table:table-cell>
          <table:table-cell table:style-name="ce29" table:formula="of:=[.$A$6]*[.E36]*100" office:value-type="float" office:value="8151415.63570899" calcext:value-type="float">
            <text:p>8151416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[.G36]/[.F36]" office:value-type="float" office:value="0" calcext:value-type="float">
            <text:p>0.00</text:p>
          </table:table-cell>
          <table:table-cell table:style-name="ce29" table:formula="of:=[.E36]*[.$C$99]" office:value-type="float" office:value="6167826.25937734" calcext:value-type="float">
            <text:p>6167826</text:p>
          </table:table-cell>
          <table:table-cell table:style-name="ce33" table:formula="of:=[.G36]/[.I36]" office:value-type="float" office:value="0" calcext:value-type="float">
            <text:p>0.00</text:p>
          </table:table-cell>
          <table:table-cell table:style-name="ce29" table:formula="of:=[.I36]*0.95" office:value-type="float" office:value="5859434.94640848" calcext:value-type="float">
            <text:p>5859435</text:p>
          </table:table-cell>
          <table:table-cell table:style-name="ce37" table:formula="of:=IF([.G36]&lt;[.$A$18]; [.G36]; [.G36]*(1+[.G36]/[.$A$18]*[.$A$19]))" office:value-type="float" office:value="0" calcext:value-type="float">
            <text:p>0</text:p>
          </table:table-cell>
          <table:table-cell table:style-name="ce39" table:formula="of:=[.L36]/[.I36]" office:value-type="float" office:value="0" calcext:value-type="float">
            <text:p>0</text:p>
          </table:table-cell>
          <table:table-cell table:number-columns-repeated="10"/>
          <table:table-cell office:value-type="float" office:value="2827855" calcext:value-type="float">
            <text:p>2827855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910753" calcext:value-type="float">
            <text:p>2910753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73013" calcext:value-type="float">
            <text:p>2873013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54548" calcext:value-type="float">
            <text:p>2854548</text:p>
          </table:table-cell>
          <table:table-cell table:formula="of:=AVERAGE([.X35:.X39])" office:value-type="float" office:value="2870681.2" calcext:value-type="float">
            <text:p>2870681.2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3147500" calcext:value-type="float">
            <text:p>314750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133622" calcext:value-type="float">
            <text:p>313362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208827" calcext:value-type="float">
            <text:p>320882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182206" calcext:value-type="float">
            <text:p>3182206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160238" calcext:value-type="float">
            <text:p>3160238</text:p>
          </table:table-cell>
          <table:table-cell table:formula="of:=AVERAGE([.X40:.X44])" office:value-type="float" office:value="3166478.6" calcext:value-type="float">
            <text:p>3166478.6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3360902" calcext:value-type="float">
            <text:p>336090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341590" calcext:value-type="float">
            <text:p>334159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330439" calcext:value-type="float">
            <text:p>3330439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387471" calcext:value-type="float">
            <text:p>3387471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352436" calcext:value-type="float">
            <text:p>3352436</text:p>
          </table:table-cell>
          <table:table-cell table:formula="of:=AVERAGE([.X45:.X49])" office:value-type="float" office:value="3354567.6" calcext:value-type="float">
            <text:p>3354567.6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3392091" calcext:value-type="float">
            <text:p>3392091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462385" calcext:value-type="float">
            <text:p>3462385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480754" calcext:value-type="float">
            <text:p>3480754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514548" calcext:value-type="float">
            <text:p>3514548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443155" calcext:value-type="float">
            <text:p>3443155</text:p>
          </table:table-cell>
          <table:table-cell table:formula="of:=AVERAGE([.X50:.X54])" office:value-type="float" office:value="3458586.6" calcext:value-type="float">
            <text:p>3458586.6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3599548" calcext:value-type="float">
            <text:p>3599548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634496" calcext:value-type="float">
            <text:p>3634496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582602" calcext:value-type="float">
            <text:p>358260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633472" calcext:value-type="float">
            <text:p>363347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3565132" calcext:value-type="float">
            <text:p>3565132</text:p>
          </table:table-cell>
          <table:table-cell table:formula="of:=AVERAGE([.X55:.X59])" office:value-type="float" office:value="3603050" calcext:value-type="float">
            <text:p>3603050</text:p>
          </table:table-cell>
          <table:table-cell table:number-columns-repeated="16359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6"/>
          <table:table-cell office:value-type="string" calcext:value-type="string">
            <text:p><text:span text:style-name="T2">Regression</text:span>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6375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76693.953181022" calcext:value-type="float">
            <text:p>476693.95318102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9650.505395007" calcext:value-type="float">
            <text:p>19650.50539500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0.993248719252472" calcext:value-type="float">
            <text:p>0.993248719252472</text:p>
          </table:table-cell>
          <table:table-cell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588.480175182248" calcext:value-type="float">
            <text:p>588.4801751822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2349675662195.7" calcext:value-type="float">
            <text:p>12349675662195.7</text:p>
          </table:table-cell>
          <table:table-cell office:value-type="float" office:value="83942849278.6256" calcext:value-type="float">
            <text:p>83942849278.6256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string" office:string-value="" calcext:value-type="error">
            <text:p>Err:50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12349675662195.7" calcext:value-type="float">
            <text:p>12349675662195.7</text:p>
          </table:table-cell>
          <table:table-cell table:formula="of:=[.$B$80] / [.$C$91]" office:value-type="float" office:value="12349675662195.7" calcext:value-type="float">
            <text:p>12349675662195.7</text:p>
          </table:table-cell>
          <table:table-cell table:formula="of:=[.$B$79]" office:value-type="float" office:value="588.480175182248" calcext:value-type="float">
            <text:p>588.480175182248</text:p>
          </table:table-cell>
          <table:table-cell table:formula="of:=LEGACY.FDIST([.$B$79] ; [.$C$91] ; [.$C$79])" office:value-type="float" office:value="0.0000171310338819394" calcext:value-type="float">
            <text:p>1.71310338819394E-05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[.$I$80] / [.$J$91]" office:value-type="string" office:string-value="" calcext:value-type="error">
            <text:p>Err:502</text:p>
          </table:table-cell>
          <table:table-cell table:formula="of:=[.$I$79]" office:value-type="string" office:string-value="" calcext:value-type="error">
            <text:p>Err:502</text:p>
          </table:table-cell>
          <table:table-cell table:formula="of:=LEGACY.FDIST([.$I$79] ; [.$J$91] ; [.$J$79]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83942849278.6256" calcext:value-type="float">
            <text:p>83942849278.6256</text:p>
          </table:table-cell>
          <table:table-cell table:formula="of:=[.$C$80] / [.$C$79]" office:value-type="float" office:value="20985712319.6564" calcext:value-type="float">
            <text:p>20985712319.6564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string" office:string-value="" calcext:value-type="error">
            <text:p>Err:502</text:p>
          </table:table-cell>
          <table:table-cell table:formula="of:=[.$J$80] / [.$J$79]" office:value-type="string" office:string-value="" calcext:value-type="error">
            <text:p>Err:502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12433618511474.3" calcext:value-type="float">
            <text:p>12433618511474.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string" office:string-value="" calcext:value-type="error">
            <text:p>Err:502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16369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7:.$J$77]; 1 ; ROW([.$K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/ [.$K$98:.$K$99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8:.$L$99]) ; [.$J$79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- [.$K$98:.$K$99] * TINV(1 - [.$J$95] ; [.$J$79]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+ [.$K$98:.$K$99] * TINV(1 - [.$J$95] ; [.$J$79])" office:value-type="string" office:string-value="" calcext:value-type="error">
            <text:p>Err:502</text:p>
          </table:table-cell>
          <table:table-cell table:number-columns-repeated="16369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4" office:value-type="float" office:value="476693.953181022" calcext:value-type="float">
            <text:p>476693.953181022</text:p>
          </table:table-cell>
          <table:table-cell office:value-type="float" office:value="19650.505395007" calcext:value-type="float">
            <text:p>19650.505395007</text:p>
          </table:table-cell>
          <table:table-cell office:value-type="float" office:value="24.2586103308134" calcext:value-type="float">
            <text:p>24.2586103308134</text:p>
          </table:table-cell>
          <table:table-cell office:value-type="float" office:value="0.0000171310338819394" calcext:value-type="float">
            <text:p>1.71310338819394E-05</text:p>
          </table:table-cell>
          <table:table-cell office:value-type="float" office:value="422135.403662392" calcext:value-type="float">
            <text:p>422135.403662392</text:p>
          </table:table-cell>
          <table:table-cell office:value-type="float" office:value="531252.502699652" calcext:value-type="float">
            <text:p>531252.50269965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379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3357.6" calcext:value-type="float">
            <text:p>3357.6</text:p>
          </table:table-cell>
          <table:table-cell table:number-matrix-columns-spanned="1" table:number-matrix-rows-spanned="5" table:formula="of:=[.$D$102:.$D$106] - [.$C$102:.$C$106]" office:value-type="float" office:value="3357.6" calcext:value-type="float">
            <text:p>3357.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766939.53181022" calcext:value-type="float">
            <text:p>4766939.53181022</text:p>
          </table:table-cell>
          <table:table-cell office:value-type="float" office:value="863732.6" calcext:value-type="float">
            <text:p>863732.6</text:p>
          </table:table-cell>
          <table:table-cell office:value-type="float" office:value="-3903206.93181022" calcext:value-type="float">
            <text:p>-3903206.9318102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533879.06362044" calcext:value-type="float">
            <text:p>9533879.06362044</text:p>
          </table:table-cell>
          <table:table-cell office:value-type="float" office:value="1480289.2" calcext:value-type="float">
            <text:p>1480289.2</text:p>
          </table:table-cell>
          <table:table-cell office:value-type="float" office:value="-8053589.86362044" calcext:value-type="float">
            <text:p>-8053589.8636204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300818.5954307" calcext:value-type="float">
            <text:p>14300818.5954307</text:p>
          </table:table-cell>
          <table:table-cell office:value-type="float" office:value="1972736.4" calcext:value-type="float">
            <text:p>1972736.4</text:p>
          </table:table-cell>
          <table:table-cell office:value-type="float" office:value="-12328082.1954307" calcext:value-type="float">
            <text:p>-12328082.195430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067758.1272409" calcext:value-type="float">
            <text:p>19067758.1272409</text:p>
          </table:table-cell>
          <table:table-cell office:value-type="float" office:value="2367409.6" calcext:value-type="float">
            <text:p>2367409.6</text:p>
          </table:table-cell>
          <table:table-cell office:value-type="float" office:value="-16700348.5272409" calcext:value-type="float">
            <text:p>-16700348.5272409</text:p>
          </table:table-cell>
          <table:table-cell table:number-columns-repeated="16379"/>
        </table:table-row>
      </table:table>
      <table:table table:name="Annex B Coincidence Limit_2" table:style-name="ta1">
        <table:shapes>
          <draw:frame draw:z-index="0" draw:style-name="gr1" draw:text-style-name="P1" svg:width="23.951cm" svg:height="15.239cm" svg:x="0.186cm" svg:y="18.129cm">
            <draw:object draw:notify-on-update-of-ranges="'Annex B Coincidence Limit_2'.E23:'Annex B Coincidence Limit_2'.E37 'Annex B Coincidence Limit_2'.G23:'Annex B Coincidence Limit_2'.G37 'Annex B Coincidence Limit_2'.P22:'Annex B Coincidence Limit_2'.P22 'Annex B Coincidence Limit_2'.P23:'Annex B Coincidence Limit_2'.P37 'Annex B Coincidence Limit_2'.E23:'Annex B Coincidence Limit_2'.E37 'Annex B Coincidence Limit_2'.E23:'Annex B Coincidence Limit_2'.E37 'Annex B Coincidence Limit_2'.L23:'Annex B Coincidence Limit_2'.L37 'Annex B Coincidence Limit_2'.E23:'Annex B Coincidence Limit_2'.E36 'Annex B Coincidence Limit_2'.K23:'Annex B Coincidence Limit_2'.K37 'Annex B Coincidence Limit_2'.E23:'Annex B Coincidence Limit_2'.E37 'Annex B Coincidence Limit_2'.I23:'Annex B Coincidence Limit_2'.I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0.348cm" svg:height="15.238cm" svg:x="24.798cm" svg:y="18.113cm">
            <draw:object draw:notify-on-update-of-ranges="'Annex B Coincidence Limit_2'.I23:'Annex B Coincidence Limit_2'.I37 'Annex B Coincidence Limit_2'.J23:'Annex B Coincidence Limit_2'.J37 'Annex B Coincidence Limit_2'.I23:'Annex B Coincidence Limit_2'.I37 'Annex B Coincidence Limit_2'.M23:'Annex B Coincidence Limit_2'.M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Text Frame 1" draw:style-name="gr2" draw:text-style-name="P2" svg:width="10.253cm" svg:height="15.848cm" svg:x="40.948cm" svg:y="1.901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85" table:default-cell-style-name="Default"/>
        <table:table-row table:style-name="ro3">
          <table:table-cell table:style-name="ce1" office:value-type="string" calcext:value-type="string">
            <text:p>Updated 2025-05-14 </text:p>
          </table:table-cell>
          <table:table-cell table:style-name="ce40"/>
          <table:table-cell table:style-name="ce1"/>
          <table:table-cell table:style-name="ce40" table:number-columns-repeated="9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1">
          <table:table-cell table:style-name="ce1" office:value-type="string" calcext:value-type="string">
            <text:p>Δ<text:span text:style-name="T1">COUNTS_4um</text:span> &lt; 5%</text:p>
          </table:table-cell>
          <table:table-cell table:style-name="ce40" office:value-type="string" calcext:value-type="string">
            <text:p>RM8632x</text:p>
          </table:table-cell>
          <table:table-cell table:style-name="ce1" office:value-type="string" calcext:value-type="string" table:number-columns-spanned="10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40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2">
          <table:table-cell table:number-columns-repeated="1009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0"/>
          <table:table-cell table:style-name="ce4" office:value-type="string" calcext:value-type="string">
            <text:p>portion</text:p>
          </table:table-cell>
          <table:table-cell table:style-name="ce4"/>
          <table:table-cell table:number-columns-repeated="984"/>
        </table:table-row>
        <table:table-row table:style-name="ro2">
          <table:table-cell table:number-columns-repeated="23"/>
          <table:table-cell table:style-name="ce4" office:value-type="string" calcext:value-type="string">
            <text:p>counts</text:p>
          </table:table-cell>
          <table:table-cell table:style-name="ce4" office:value-type="string" calcext:value-type="string">
            <text:p>Averaged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285" calcext:value-type="float">
            <text:p>3285</text:p>
          </table:table-cell>
          <table:table-cell table:style-name="ce38"/>
          <table:table-cell table:number-columns-repeated="984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0"/>
          <table:table-cell office:value-type="float" office:value="742" calcext:value-type="float">
            <text:p>742</text:p>
          </table:table-cell>
          <table:table-cell table:number-columns-repeated="985"/>
        </table:table-row>
        <table:table-row table:style-name="ro2">
          <table:table-cell office:value-type="float" office:value="10.34" calcext:value-type="float">
            <text:p>10.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0"/>
          <table:table-cell office:value-type="float" office:value="272" calcext:value-type="float">
            <text:p>272</text:p>
          </table:table-cell>
          <table:table-cell table:number-columns-repeated="98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0"/>
          <table:table-cell office:value-type="float" office:value="3225" calcext:value-type="float">
            <text:p>3225</text:p>
          </table:table-cell>
          <table:table-cell table:number-columns-repeated="985"/>
        </table:table-row>
        <table:table-row table:style-name="ro2">
          <table:table-cell table:formula="of:=[.A9]/10" office:value-type="float" office:value="4000" calcext:value-type="float">
            <text:p>4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0"/>
          <table:table-cell office:value-type="float" office:value="9264" calcext:value-type="float">
            <text:p>9264</text:p>
          </table:table-cell>
          <table:table-cell table:formula="of:=AVERAGE([.X6:.X10])" office:value-type="float" office:value="3357.6" calcext:value-type="float">
            <text:p>3357.6</text:p>
          </table:table-cell>
          <table:table-cell table:number-columns-repeated="984"/>
        </table:table-row>
        <table:table-row table:style-name="ro2">
          <table:table-cell table:style-name="ce2" table:formula="of:=[.A10]/[.A7]*[.A8]" office:value-type="float" office:value="6.56507936507937" calcext:value-type="float">
            <text:p>6.56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0"/>
          <table:table-cell office:value-type="float" office:value="881738" calcext:value-type="float">
            <text:p>881738</text:p>
          </table:table-cell>
          <table:table-cell table:number-columns-repeated="985"/>
        </table:table-row>
        <table:table-row table:style-name="ro2">
          <table:table-cell table:style-name="ce3" table:formula="of:=[.A11]*100" office:value-type="float" office:value="656.507936507937" calcext:value-type="float">
            <text:p>656.51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0"/>
          <table:table-cell office:value-type="float" office:value="852166" calcext:value-type="float">
            <text:p>852166</text:p>
          </table:table-cell>
          <table:table-cell table:number-columns-repeated="98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0"/>
          <table:table-cell office:value-type="float" office:value="867043" calcext:value-type="float">
            <text:p>867043</text:p>
          </table:table-cell>
          <table:table-cell table:number-columns-repeated="985"/>
        </table:table-row>
        <table:table-row table:style-name="ro2">
          <table:table-cell table:style-name="ce3" table:formula="of:=[.A12]*[.A13]/1000" office:value-type="float" office:value="124.736507936508" calcext:value-type="float">
            <text:p>124.7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6"/>
          <table:table-cell office:value-type="string" calcext:value-type="string">
            <text:p>Added 1.9mg</text:p>
          </table:table-cell>
          <table:table-cell table:number-columns-repeated="13"/>
          <table:table-cell office:value-type="float" office:value="851350" calcext:value-type="float">
            <text:p>851350</text:p>
          </table:table-cell>
          <table:table-cell table:number-columns-repeated="985"/>
        </table:table-row>
        <table:table-row table:style-name="ro2">
          <table:table-cell office:value-type="float" office:value="253.02" calcext:value-type="float">
            <text:p>253.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0"/>
          <table:table-cell office:value-type="float" office:value="866366" calcext:value-type="float">
            <text:p>866366</text:p>
          </table:table-cell>
          <table:table-cell table:formula="of:=AVERAGE([.X11:.X15])" office:value-type="float" office:value="863732.6" calcext:value-type="float">
            <text:p>863732.6</text:p>
          </table:table-cell>
          <table:table-cell table:number-columns-repeated="984"/>
        </table:table-row>
        <table:table-row table:style-name="ro2">
          <table:table-cell table:style-name="ce3" table:formula="of:=[.A12]*[.A15]/[.A14]" office:value-type="float" office:value="1331.68421052632" calcext:value-type="float">
            <text:p>1331.6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0"/>
          <table:table-cell office:value-type="float" office:value="1537100" calcext:value-type="float">
            <text:p>1537100</text:p>
          </table:table-cell>
          <table:table-cell table:number-columns-repeated="985"/>
        </table:table-row>
        <table:table-row table:style-name="ro2">
          <table:table-cell table:style-name="ce3" table:formula="of:=[.A14]/[.A15]*10" office:value-type="float" office:value="4.92990704041214" calcext:value-type="float">
            <text:p>4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0"/>
          <table:table-cell office:value-type="float" office:value="1466787" calcext:value-type="float">
            <text:p>1466787</text:p>
          </table:table-cell>
          <table:table-cell table:number-columns-repeated="985"/>
        </table:table-row>
        <table:table-row table:style-name="ro2">
          <table:table-cell table:style-name="ce4" office:value-type="float" office:value="600000" calcext:value-type="float">
            <text:p>600000</text:p>
          </table:table-cell>
          <table:table-cell/>
          <table:table-cell office:value-type="string" calcext:value-type="string">
            <text:p>counts/mg</text:p>
          </table:table-cell>
          <table:table-cell table:number-columns-repeated="20"/>
          <table:table-cell office:value-type="float" office:value="1468810" calcext:value-type="float">
            <text:p>1468810</text:p>
          </table:table-cell>
          <table:table-cell table:number-columns-repeated="985"/>
        </table:table-row>
        <table:table-row table:style-name="ro2">
          <table:table-cell table:style-name="ce8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0"/>
          <table:table-cell office:value-type="float" office:value="1457012" calcext:value-type="float">
            <text:p>1457012</text:p>
          </table:table-cell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0.27" calcext:value-type="float">
            <text:p>0.27</text:p>
          </table:table-cell>
          <table:table-cell office:value-type="string" calcext:value-type="string">
            <text:p>correction factor</text:p>
          </table:table-cell>
          <table:table-cell table:number-columns-repeated="20"/>
          <table:table-cell office:value-type="float" office:value="1471737" calcext:value-type="float">
            <text:p>1471737</text:p>
          </table:table-cell>
          <table:table-cell table:formula="of:=AVERAGE([.X16:.X20])" office:value-type="float" office:value="1480289.2" calcext:value-type="float">
            <text:p>1480289.2</text:p>
          </table:table-cell>
          <table:table-cell table:number-columns-repeated="984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style-name="ce61" office:value-type="string" calcext:value-type="string">
            <text:p>Qf</text:p>
          </table:table-cell>
          <table:table-cell table:style-name="ce61" office:value-type="string" calcext:value-type="string">
            <text:p>Qf^2</text:p>
          </table:table-cell>
          <table:table-cell table:number-columns-repeated="8"/>
          <table:table-cell office:value-type="float" office:value="1973429" calcext:value-type="float">
            <text:p>1973429</text:p>
          </table:table-cell>
          <table:table-cell table:number-columns-repeated="985"/>
        </table:table-row>
        <table:table-row table:style-name="ro2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style-name="ce16" office:value-type="string" calcext:value-type="string">
            <text:p>Actual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2"/>
          <table:table-cell office:value-type="string" calcext:value-type="string">
            <text:p>Corrected 2</text:p>
          </table:table-cell>
          <table:table-cell table:number-columns-repeated="7"/>
          <table:table-cell office:value-type="float" office:value="1997216" calcext:value-type="float">
            <text:p>1997216</text:p>
          </table:table-cell>
          <table:table-cell table:number-columns-repeated="98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1.45" calcext:value-type="float">
            <text:p>1.5</text:p>
          </table:table-cell>
          <table:table-cell table:style-name="ce21" table:formula="of:=[.B23]" office:value-type="float" office:value="1.45" calcext:value-type="float">
            <text:p>1.5</text:p>
          </table:table-cell>
          <table:table-cell table:style-name="ce24" table:formula="of:=[.C23]*[.$A$16]/1000" office:value-type="float" office:value="1.93094210526316" calcext:value-type="float">
            <text:p>1.931</text:p>
          </table:table-cell>
          <table:table-cell table:style-name="ce24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Y10]" office:value-type="float" office:value="3357.6" calcext:value-type="float">
            <text:p>3357.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I23]*0.95" office:value-type="float" office:value="0.95" calcext:value-type="float">
            <text:p>0.95</text:p>
          </table:table-cell>
          <table:table-cell table:style-name="ce36" table:formula="of:=IF([.$G23]&lt;[.$A$19]; [.$G23]; [.$G23]*(1+[.$G23]/[.$A$19]*[.$A$20] + ([.$G23]/[.$A$19]*[.$B$20])^2))" office:value-type="float" office:value="3357.6" calcext:value-type="float">
            <text:p>3357.6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formula="of:=([.G23]/[.$A$19])*[.$B$20]" office:value-type="float" office:value="0.000906552" calcext:value-type="float">
            <text:p>0.001</text:p>
          </table:table-cell>
          <table:table-cell table:style-name="ce2" table:formula="of:=[.N23]^2" office:value-type="float" office:value="0.000000821836528704" calcext:value-type="float">
            <text:p>0.000</text:p>
          </table:table-cell>
          <table:table-cell table:style-name="ce36" table:formula="of:=[.$G23]*(1+[.$G23]/[.$A$19]*[.$A$20] + ([.$G23]/[.$A$19]*[.$B$20])^2)" office:value-type="float" office:value="3357.60275939833" calcext:value-type="float">
            <text:p>3357.60275939833</text:p>
          </table:table-cell>
          <table:table-cell table:number-columns-repeated="7"/>
          <table:table-cell office:value-type="float" office:value="1962998" calcext:value-type="float">
            <text:p>1962998</text:p>
          </table:table-cell>
          <table:table-cell table:number-columns-repeated="985"/>
        </table:table-row>
        <table:table-row table:style-name="ro2">
          <table:table-cell table:number-columns-repeated="2" table:style-name="ce17" office:value-type="float" office:value="10" calcext:value-type="float">
            <text:p>10</text:p>
          </table:table-cell>
          <table:table-cell table:style-name="ce21" table:formula="of:=[.C23]+[.B24]" office:value-type="float" office:value="11.45" calcext:value-type="float">
            <text:p>11.5</text:p>
          </table:table-cell>
          <table:table-cell table:style-name="ce24" table:formula="of:=[.C24]*[.$A$16]/1000" office:value-type="float" office:value="15.2477842105263" calcext:value-type="float">
            <text:p>15.248</text:p>
          </table:table-cell>
          <table:table-cell table:style-name="ce24" table:formula="of:=[.D24]/([.$A$8]+[.C24]/1000)" office:value-type="float" office:value="1.47300950210128" calcext:value-type="float">
            <text:p>1.473</text:p>
          </table:table-cell>
          <table:table-cell table:style-name="ce27" table:formula="of:=[.$A$7]*[.E24]*100" office:value-type="float" office:value="927995.986323808" calcext:value-type="float">
            <text:p>927996</text:p>
          </table:table-cell>
          <table:table-cell table:style-name="ce17" table:formula="of:=[.Y15]" office:value-type="float" office:value="863732.6" calcext:value-type="float">
            <text:p>863732.6</text:p>
          </table:table-cell>
          <table:table-cell table:style-name="ce31" table:formula="of:=[.G24]/[.F24]" office:value-type="float" office:value="0.930750361778629" calcext:value-type="float">
            <text:p>0.93</text:p>
          </table:table-cell>
          <table:table-cell table:style-name="ce27" table:formula="of:=[.E24]*[.$A$18]" office:value-type="float" office:value="883805.701260769" calcext:value-type="float">
            <text:p>883806</text:p>
          </table:table-cell>
          <table:table-cell table:style-name="ce31" table:formula="of:=[.G24]/[.I24]" office:value-type="float" office:value="0.977287879867561" calcext:value-type="float">
            <text:p>0.98</text:p>
          </table:table-cell>
          <table:table-cell table:style-name="ce27" table:formula="of:=[.I24]*0.95" office:value-type="float" office:value="839615.416197731" calcext:value-type="float">
            <text:p>839615</text:p>
          </table:table-cell>
          <table:table-cell table:style-name="ce36" table:formula="of:=IF([.$G24]&lt;[.$A$19]; [.$G24]; [.$G24]*(1+[.$G24]/[.$A$19]*[.$A$20] + ([.$G24]/[.$A$19]*[.$B$20])^2))" office:value-type="float" office:value="863732.6" calcext:value-type="float">
            <text:p>863732.6</text:p>
          </table:table-cell>
          <table:table-cell table:style-name="ce39" table:formula="of:=[.L24]/[.I24]" office:value-type="float" office:value="0.977287879867561" calcext:value-type="float">
            <text:p>0.977287879867561</text:p>
          </table:table-cell>
          <table:table-cell table:style-name="ce2" table:formula="of:=([.G24]/[.$A$19])*[.$B$20]" office:value-type="float" office:value="0.233207802" calcext:value-type="float">
            <text:p>0.233</text:p>
          </table:table-cell>
          <table:table-cell table:style-name="ce2" table:formula="of:=[.N24]^2" office:value-type="float" office:value="0.0543858789136712" calcext:value-type="float">
            <text:p>0.054</text:p>
          </table:table-cell>
          <table:table-cell table:style-name="ce36" table:formula="of:=[.$G24]*(1+[.$G24]/[.$A$19]*[.$A$20] + ([.$G24]/[.$A$19]*[.$B$20])^2)" office:value-type="float" office:value="910707.456597391" calcext:value-type="float">
            <text:p>910707.456597391</text:p>
          </table:table-cell>
          <table:table-cell table:number-columns-repeated="7"/>
          <table:table-cell office:value-type="float" office:value="1968634" calcext:value-type="float">
            <text:p>1968634</text:p>
          </table:table-cell>
          <table:table-cell table:number-columns-repeated="985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4]+[.B25]" office:value-type="float" office:value="21.45" calcext:value-type="float">
            <text:p>21.5</text:p>
          </table:table-cell>
          <table:table-cell table:style-name="ce24" table:formula="of:=[.C25]*[.$A$16]/1000" office:value-type="float" office:value="28.5646263157895" calcext:value-type="float">
            <text:p>28.565</text:p>
          </table:table-cell>
          <table:table-cell table:style-name="ce24" table:formula="of:=[.D25]/([.$A$8]+[.C25]/1000)" office:value-type="float" office:value="2.75681746433071" calcext:value-type="float">
            <text:p>2.757</text:p>
          </table:table-cell>
          <table:table-cell table:style-name="ce27" table:formula="of:=[.$A$7]*[.E25]*100" office:value-type="float" office:value="1736795.00252835" calcext:value-type="float">
            <text:p>1736795</text:p>
          </table:table-cell>
          <table:table-cell table:style-name="ce17" table:formula="of:=[.Y20]" office:value-type="float" office:value="1480289.2" calcext:value-type="float">
            <text:p>1480289.2</text:p>
          </table:table-cell>
          <table:table-cell table:style-name="ce31" table:formula="of:=[.G25]/[.F25]" office:value-type="float" office:value="0.852310835674366" calcext:value-type="float">
            <text:p>0.85</text:p>
          </table:table-cell>
          <table:table-cell table:style-name="ce27" table:formula="of:=[.E25]*[.$A$18]" office:value-type="float" office:value="1654090.47859843" calcext:value-type="float">
            <text:p>1654090</text:p>
          </table:table-cell>
          <table:table-cell table:style-name="ce31" table:formula="of:=[.G25]/[.I25]" office:value-type="float" office:value="0.894926377458084" calcext:value-type="float">
            <text:p>0.89</text:p>
          </table:table-cell>
          <table:table-cell table:style-name="ce27" table:formula="of:=[.I25]*0.95" office:value-type="float" office:value="1571385.95466851" calcext:value-type="float">
            <text:p>1571386</text:p>
          </table:table-cell>
          <table:table-cell table:style-name="ce36" table:formula="of:=IF([.$G25]&lt;[.$A$19]; [.$G25]; [.$G25]*(1+[.$G25]/[.$A$19]*[.$A$20] + ([.$G25]/[.$A$19]*[.$B$20])^2))" office:value-type="float" office:value="1716754.40237975" calcext:value-type="float">
            <text:p>1716754.40237975</text:p>
          </table:table-cell>
          <table:table-cell table:style-name="ce39" table:formula="of:=[.L25]/[.I25]" office:value-type="float" office:value="1.03788421769674" calcext:value-type="float">
            <text:p>1.03788421769674</text:p>
          </table:table-cell>
          <table:table-cell table:style-name="ce2" table:formula="of:=([.G25]/[.$A$19])*[.$B$20]" office:value-type="float" office:value="0.399678084" calcext:value-type="float">
            <text:p>0.400</text:p>
          </table:table-cell>
          <table:table-cell table:style-name="ce2" table:formula="of:=[.N25]^2" office:value-type="float" office:value="0.159742570829911" calcext:value-type="float">
            <text:p>0.160</text:p>
          </table:table-cell>
          <table:table-cell table:style-name="ce36" table:formula="of:=[.$G25]*(1+[.$G25]/[.$A$19]*[.$A$20] + ([.$G25]/[.$A$19]*[.$B$20])^2)" office:value-type="float" office:value="1716754.40237975" calcext:value-type="float">
            <text:p>1716754.40237975</text:p>
          </table:table-cell>
          <table:table-cell table:number-columns-repeated="7"/>
          <table:table-cell office:value-type="float" office:value="1961405" calcext:value-type="float">
            <text:p>1961405</text:p>
          </table:table-cell>
          <table:table-cell table:formula="of:=AVERAGE([.X21:.X25])" office:value-type="float" office:value="1972736.4" calcext:value-type="float">
            <text:p>1972736.4</text:p>
          </table:table-cell>
          <table:table-cell table:number-columns-repeated="984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5]+[.B26]" office:value-type="float" office:value="31.45" calcext:value-type="float">
            <text:p>31.5</text:p>
          </table:table-cell>
          <table:table-cell table:style-name="ce24" table:formula="of:=[.C26]*[.$A$16]/1000" office:value-type="float" office:value="41.8814684210526" calcext:value-type="float">
            <text:p>41.881</text:p>
          </table:table-cell>
          <table:table-cell table:style-name="ce24" table:formula="of:=[.D26]/([.$A$8]+[.C26]/1000)" office:value-type="float" office:value="4.03814976893806" calcext:value-type="float">
            <text:p>4.038</text:p>
          </table:table-cell>
          <table:table-cell table:style-name="ce27" table:formula="of:=[.$A$7]*[.E26]*100" office:value-type="float" office:value="2544034.35443098" calcext:value-type="float">
            <text:p>2544034</text:p>
          </table:table-cell>
          <table:table-cell table:style-name="ce17" table:formula="of:=[.Y25]" office:value-type="float" office:value="1972736.4" calcext:value-type="float">
            <text:p>1972736.4</text:p>
          </table:table-cell>
          <table:table-cell table:style-name="ce31" table:formula="of:=[.G26]/[.F26]" office:value-type="float" office:value="0.775436226544685" calcext:value-type="float">
            <text:p>0.78</text:p>
          </table:table-cell>
          <table:table-cell table:style-name="ce27" table:formula="of:=[.E26]*[.$A$18]" office:value-type="float" office:value="2422889.86136284" calcext:value-type="float">
            <text:p>2422890</text:p>
          </table:table-cell>
          <table:table-cell table:style-name="ce31" table:formula="of:=[.G26]/[.I26]" office:value-type="float" office:value="0.814208037871919" calcext:value-type="float">
            <text:p>0.81</text:p>
          </table:table-cell>
          <table:table-cell table:style-name="ce27" table:formula="of:=[.I26]*0.95" office:value-type="float" office:value="2301745.36829469" calcext:value-type="float">
            <text:p>2301745</text:p>
          </table:table-cell>
          <table:table-cell table:style-name="ce36" table:formula="of:=IF([.$G26]&lt;[.$A$19]; [.$G26]; [.$G26]*(1+[.$G26]/[.$A$19]*[.$A$20] + ([.$G26]/[.$A$19]*[.$B$20])^2))" office:value-type="float" office:value="2532409.84651059" calcext:value-type="float">
            <text:p>2532409.84651059</text:p>
          </table:table-cell>
          <table:table-cell table:style-name="ce39" table:formula="of:=[.L26]/[.I26]" office:value-type="float" office:value="1.0452022136434" calcext:value-type="float">
            <text:p>1.0452022136434</text:p>
          </table:table-cell>
          <table:table-cell table:style-name="ce2" table:formula="of:=([.G26]/[.$A$19])*[.$B$20]" office:value-type="float" office:value="0.532638828" calcext:value-type="float">
            <text:p>0.533</text:p>
          </table:table-cell>
          <table:table-cell table:style-name="ce2" table:formula="of:=[.N26]^2" office:value-type="float" office:value="0.283704121093214" calcext:value-type="float">
            <text:p>0.284</text:p>
          </table:table-cell>
          <table:table-cell table:style-name="ce36" table:formula="of:=[.$G26]*(1+[.$G26]/[.$A$19]*[.$A$20] + ([.$G26]/[.$A$19]*[.$B$20])^2)" office:value-type="float" office:value="2532409.84651059" calcext:value-type="float">
            <text:p>2532409.84651059</text:p>
          </table:table-cell>
          <table:table-cell table:number-columns-repeated="7"/>
          <table:table-cell office:value-type="float" office:value="2389655" calcext:value-type="float">
            <text:p>2389655</text:p>
          </table:table-cell>
          <table:table-cell table:number-columns-repeated="985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6]+[.B27]" office:value-type="float" office:value="41.45" calcext:value-type="float">
            <text:p>41.5</text:p>
          </table:table-cell>
          <table:table-cell table:style-name="ce24" table:formula="of:=[.C27]*[.$A$16]/1000" office:value-type="float" office:value="55.1983105263158" calcext:value-type="float">
            <text:p>55.198</text:p>
          </table:table-cell>
          <table:table-cell table:style-name="ce24" table:formula="of:=[.D27]/([.$A$8]+[.C27]/1000)" office:value-type="float" office:value="5.31701357000379" calcext:value-type="float">
            <text:p>5.317</text:p>
          </table:table-cell>
          <table:table-cell table:style-name="ce27" table:formula="of:=[.$A$7]*[.E27]*100" office:value-type="float" office:value="3349718.54910238" calcext:value-type="float">
            <text:p>3349719</text:p>
          </table:table-cell>
          <table:table-cell table:style-name="ce17" table:formula="of:=[.Y30]" office:value-type="float" office:value="2367409.6" calcext:value-type="float">
            <text:p>2367409.6</text:p>
          </table:table-cell>
          <table:table-cell table:style-name="ce31" table:formula="of:=[.G27]/[.F27]" office:value-type="float" office:value="0.70674881047376" calcext:value-type="float">
            <text:p>0.71</text:p>
          </table:table-cell>
          <table:table-cell table:style-name="ce27" table:formula="of:=[.E27]*[.$A$18]" office:value-type="float" office:value="3190208.14200227" calcext:value-type="float">
            <text:p>3190208</text:p>
          </table:table-cell>
          <table:table-cell table:style-name="ce31" table:formula="of:=[.G27]/[.I27]" office:value-type="float" office:value="0.742086250997448" calcext:value-type="float">
            <text:p>0.74</text:p>
          </table:table-cell>
          <table:table-cell table:style-name="ce27" table:formula="of:=[.I27]*0.95" office:value-type="float" office:value="3030697.73490216" calcext:value-type="float">
            <text:p>3030698</text:p>
          </table:table-cell>
          <table:table-cell table:style-name="ce36" table:formula="of:=IF([.$G27]&lt;[.$A$19]; [.$G27]; [.$G27]*(1+[.$G27]/[.$A$19]*[.$A$20] + ([.$G27]/[.$A$19]*[.$B$20])^2))" office:value-type="float" office:value="3334679.65155846" calcext:value-type="float">
            <text:p>3334679.65155846</text:p>
          </table:table-cell>
          <table:table-cell table:style-name="ce39" table:formula="of:=[.L27]/[.I27]" office:value-type="float" office:value="1.04528591964082" calcext:value-type="float">
            <text:p>1.04528591964082</text:p>
          </table:table-cell>
          <table:table-cell table:style-name="ce2" table:formula="of:=([.G27]/[.$A$19])*[.$B$20]" office:value-type="float" office:value="0.639200592" calcext:value-type="float">
            <text:p>0.639</text:p>
          </table:table-cell>
          <table:table-cell table:style-name="ce2" table:formula="of:=[.N27]^2" office:value-type="float" office:value="0.408577396813151" calcext:value-type="float">
            <text:p>0.409</text:p>
          </table:table-cell>
          <table:table-cell table:style-name="ce36" table:formula="of:=[.$G27]*(1+[.$G27]/[.$A$19]*[.$A$20] + ([.$G27]/[.$A$19]*[.$B$20])^2)" office:value-type="float" office:value="3334679.65155846" calcext:value-type="float">
            <text:p>3334679.65155846</text:p>
          </table:table-cell>
          <table:table-cell table:style-name="ce4"/>
          <table:table-cell table:number-columns-repeated="6"/>
          <table:table-cell office:value-type="float" office:value="2340678" calcext:value-type="float">
            <text:p>2340678</text:p>
          </table:table-cell>
          <table:table-cell table:number-columns-repeated="5"/>
          <table:table-cell table:style-name="ce4" table:number-columns-repeated="980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7]+[.B28]" office:value-type="float" office:value="51.45" calcext:value-type="float">
            <text:p>51.5</text:p>
          </table:table-cell>
          <table:table-cell table:style-name="ce24" table:formula="of:=[.C28]*[.$A$16]/1000" office:value-type="float" office:value="68.515152631579" calcext:value-type="float">
            <text:p>68.515</text:p>
          </table:table-cell>
          <table:table-cell table:style-name="ce24" table:formula="of:=[.D28]/([.$A$8]+[.C28]/1000)" office:value-type="float" office:value="6.59341599407002" calcext:value-type="float">
            <text:p>6.593</text:p>
          </table:table-cell>
          <table:table-cell table:style-name="ce27" table:formula="of:=[.$A$7]*[.E28]*100" office:value-type="float" office:value="4153852.07626412" calcext:value-type="float">
            <text:p>4153852</text:p>
          </table:table-cell>
          <table:table-cell table:style-name="ce17" table:formula="of:=[.Y35]" office:value-type="float" office:value="2680435.4" calcext:value-type="float">
            <text:p>2680435.4</text:p>
          </table:table-cell>
          <table:table-cell table:style-name="ce31" table:formula="of:=[.G28]/[.F28]" office:value-type="float" office:value="0.645289083671638" calcext:value-type="float">
            <text:p>0.65</text:p>
          </table:table-cell>
          <table:table-cell table:style-name="ce27" table:formula="of:=[.E28]*[.$A$18]" office:value-type="float" office:value="3956049.59644201" calcext:value-type="float">
            <text:p>3956050</text:p>
          </table:table-cell>
          <table:table-cell table:style-name="ce31" table:formula="of:=[.G28]/[.I28]" office:value-type="float" office:value="0.677553537855219" calcext:value-type="float">
            <text:p>0.68</text:p>
          </table:table-cell>
          <table:table-cell table:style-name="ce27" table:formula="of:=[.I28]*0.95" office:value-type="float" office:value="3758247.11661991" calcext:value-type="float">
            <text:p>3758247</text:p>
          </table:table-cell>
          <table:table-cell table:style-name="ce36" table:formula="of:=IF([.$G28]&lt;[.$A$19]; [.$G28]; [.$G28]*(1+[.$G28]/[.$A$19]*[.$A$20] + ([.$G28]/[.$A$19]*[.$B$20])^2))" office:value-type="float" office:value="4084359.28626703" calcext:value-type="float">
            <text:p>4084359.28626703</text:p>
          </table:table-cell>
          <table:table-cell table:style-name="ce39" table:formula="of:=[.L28]/[.I28]" office:value-type="float" office:value="1.03243379201829" calcext:value-type="float">
            <text:p>1.03243379201829</text:p>
          </table:table-cell>
          <table:table-cell table:style-name="ce2" table:formula="of:=([.G28]/[.$A$19])*[.$B$20]" office:value-type="float" office:value="0.723717558" calcext:value-type="float">
            <text:p>0.724</text:p>
          </table:table-cell>
          <table:table-cell table:style-name="ce2" table:formula="of:=[.N28]^2" office:value-type="float" office:value="0.523767103757483" calcext:value-type="float">
            <text:p>0.524</text:p>
          </table:table-cell>
          <table:table-cell table:style-name="ce36" table:formula="of:=[.$G28]*(1+[.$G28]/[.$A$19]*[.$A$20] + ([.$G28]/[.$A$19]*[.$B$20])^2)" office:value-type="float" office:value="4084359.28626703" calcext:value-type="float">
            <text:p>4084359.28626703</text:p>
          </table:table-cell>
          <table:table-cell table:number-columns-repeated="7"/>
          <table:table-cell office:value-type="float" office:value="2410522" calcext:value-type="float">
            <text:p>2410522</text:p>
          </table:table-cell>
          <table:table-cell table:number-columns-repeated="985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[.C28]+[.B29]" office:value-type="float" office:value="61.45" calcext:value-type="float">
            <text:p>61.5</text:p>
          </table:table-cell>
          <table:table-cell table:style-name="ce25" table:formula="of:=[.C29]*[.$A$16]/1000" office:value-type="float" office:value="81.8319947368421" calcext:value-type="float">
            <text:p>81.832</text:p>
          </table:table-cell>
          <table:table-cell table:style-name="ce25" table:formula="of:=[.D29]/([.$A$8]+[.C29]/1000)" office:value-type="float" office:value="7.86736414027295" calcext:value-type="float">
            <text:p>7.867</text:p>
          </table:table-cell>
          <table:table-cell table:style-name="ce28" table:formula="of:=[.$A$7]*[.E29]*100" office:value-type="float" office:value="4956439.40837196" calcext:value-type="float">
            <text:p>4956439</text:p>
          </table:table-cell>
          <table:table-cell table:style-name="ce18" table:formula="of:=[.Y40]" office:value-type="float" office:value="2870681.2" calcext:value-type="float">
            <text:p>2870681.2</text:p>
          </table:table-cell>
          <table:table-cell table:style-name="ce32" table:formula="of:=[.G29]/[.F29]" office:value-type="float" office:value="0.579182143365076" calcext:value-type="float">
            <text:p>0.58</text:p>
          </table:table-cell>
          <table:table-cell table:style-name="ce27" table:formula="of:=[.E29]*[.$A$18]" office:value-type="float" office:value="4720418.48416377" calcext:value-type="float">
            <text:p>4720418</text:p>
          </table:table-cell>
          <table:table-cell table:style-name="ce32" table:formula="of:=[.G29]/[.I29]" office:value-type="float" office:value="0.60814125053333" calcext:value-type="float">
            <text:p>0.61</text:p>
          </table:table-cell>
          <table:table-cell table:style-name="ce28" table:formula="of:=[.I29]*0.95" office:value-type="float" office:value="4484397.55995558" calcext:value-type="float">
            <text:p>4484398</text:p>
          </table:table-cell>
          <table:table-cell table:style-name="ce36" table:formula="of:=IF([.$G29]&lt;[.$A$19]; [.$G29]; [.$G29]*(1+[.$G29]/[.$A$19]*[.$A$20] + ([.$G29]/[.$A$19]*[.$B$20])^2))" office:value-type="float" office:value="4595257.54049489" calcext:value-type="float">
            <text:p>4595257.54049489</text:p>
          </table:table-cell>
          <table:table-cell table:style-name="ce39" table:formula="of:=[.L29]/[.I29]" office:value-type="float" office:value="0.973485201769975" calcext:value-type="float">
            <text:p>0.973485201769975</text:p>
          </table:table-cell>
          <table:table-cell table:style-name="ce2" table:formula="of:=([.G29]/[.$A$19])*[.$B$20]" office:value-type="float" office:value="0.775083924" calcext:value-type="float">
            <text:p>0.775</text:p>
          </table:table-cell>
          <table:table-cell table:style-name="ce2" table:formula="of:=[.N29]^2" office:value-type="float" office:value="0.600755089243238" calcext:value-type="float">
            <text:p>0.601</text:p>
          </table:table-cell>
          <table:table-cell table:style-name="ce36" table:formula="of:=[.$G29]*(1+[.$G29]/[.$A$19]*[.$A$20] + ([.$G29]/[.$A$19]*[.$B$20])^2)" office:value-type="float" office:value="4595257.54049489" calcext:value-type="float">
            <text:p>4595257.54049489</text:p>
          </table:table-cell>
          <table:table-cell table:number-columns-repeated="7"/>
          <table:table-cell office:value-type="float" office:value="2329124" calcext:value-type="float">
            <text:p>2329124</text:p>
          </table:table-cell>
          <table:table-cell table:number-columns-repeated="985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9]+[.B30]" office:value-type="float" office:value="71.45" calcext:value-type="float">
            <text:p>71.5</text:p>
          </table:table-cell>
          <table:table-cell table:style-name="ce24" table:formula="of:=[.C30]*[.$A$16]/1000" office:value-type="float" office:value="95.1488368421053" calcext:value-type="float">
            <text:p>95.149</text:p>
          </table:table-cell>
          <table:table-cell table:style-name="ce24" table:formula="of:=[.D30]/([.$A$8]+[.C30]/1000)" office:value-type="float" office:value="9.13886508047441" calcext:value-type="float">
            <text:p>9.139</text:p>
          </table:table-cell>
          <table:table-cell table:style-name="ce27" table:formula="of:=[.$A$7]*[.E30]*100" office:value-type="float" office:value="5757485.00069888" calcext:value-type="float">
            <text:p>5757485</text:p>
          </table:table-cell>
          <table:table-cell table:style-name="ce17" table:formula="of:=[.Y45]" office:value-type="float" office:value="3166478.6" calcext:value-type="float">
            <text:p>3166478.6</text:p>
          </table:table-cell>
          <table:table-cell table:style-name="ce31" table:formula="of:=[.G30]/[.F30]" office:value-type="float" office:value="0.549976005081322" calcext:value-type="float">
            <text:p>0.55</text:p>
          </table:table-cell>
          <table:table-cell table:style-name="ce27" table:formula="of:=[.E30]*[.$A$18]" office:value-type="float" office:value="5483319.04828464" calcext:value-type="float">
            <text:p>5483319</text:p>
          </table:table-cell>
          <table:table-cell table:style-name="ce31" table:formula="of:=[.G30]/[.I30]" office:value-type="float" office:value="0.577474805335388" calcext:value-type="float">
            <text:p>0.58</text:p>
          </table:table-cell>
          <table:table-cell table:style-name="ce27" table:formula="of:=[.I30]*0.95" office:value-type="float" office:value="5209153.09587041" calcext:value-type="float">
            <text:p>5209153</text:p>
          </table:table-cell>
          <table:table-cell table:style-name="ce36" table:formula="of:=IF([.$G30]&lt;[.$A$19]; [.$G30]; [.$G30]*(1+[.$G30]/[.$A$19]*[.$A$20] + ([.$G30]/[.$A$19]*[.$B$20])^2))" office:value-type="float" office:value="5480978.68018937" calcext:value-type="float">
            <text:p>5480978.68018937</text:p>
          </table:table-cell>
          <table:table-cell table:style-name="ce39" table:formula="of:=[.L30]/[.I30]" office:value-type="float" office:value="0.999573184037867" calcext:value-type="float">
            <text:p>0.999573184037867</text:p>
          </table:table-cell>
          <table:table-cell table:style-name="ce2" table:formula="of:=([.G30]/[.$A$19])*[.$B$20]" office:value-type="float" office:value="0.854949222" calcext:value-type="float">
            <text:p>0.855</text:p>
          </table:table-cell>
          <table:table-cell table:style-name="ce2" table:formula="of:=[.N30]^2" office:value-type="float" office:value="0.730938172198406" calcext:value-type="float">
            <text:p>0.731</text:p>
          </table:table-cell>
          <table:table-cell table:style-name="ce36" table:formula="of:=[.$G30]*(1+[.$G30]/[.$A$19]*[.$A$20] + ([.$G30]/[.$A$19]*[.$B$20])^2)" office:value-type="float" office:value="5480978.68018937" calcext:value-type="float">
            <text:p>5480978.68018937</text:p>
          </table:table-cell>
          <table:table-cell table:number-columns-repeated="7"/>
          <table:table-cell office:value-type="float" office:value="2367069" calcext:value-type="float">
            <text:p>2367069</text:p>
          </table:table-cell>
          <table:table-cell table:formula="of:=AVERAGE([.X26:.X30])" office:value-type="float" office:value="2367409.6" calcext:value-type="float">
            <text:p>2367409.6</text:p>
          </table:table-cell>
          <table:table-cell table:number-columns-repeated="984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0]+[.B31]" office:value-type="float" office:value="81.45" calcext:value-type="float">
            <text:p>81.5</text:p>
          </table:table-cell>
          <table:table-cell table:style-name="ce24" table:formula="of:=[.C31]*[.$A$16]/1000" office:value-type="float" office:value="108.465678947368" calcext:value-type="float">
            <text:p>108.466</text:p>
          </table:table-cell>
          <table:table-cell table:style-name="ce24" table:formula="of:=[.D31]/([.$A$8]+[.C31]/1000)" office:value-type="float" office:value="10.4079258593927" calcext:value-type="float">
            <text:p>10.408</text:p>
          </table:table-cell>
          <table:table-cell table:style-name="ce27" table:formula="of:=[.$A$7]*[.E31]*100" office:value-type="float" office:value="6556993.29141742" calcext:value-type="float">
            <text:p>6556993</text:p>
          </table:table-cell>
          <table:table-cell table:style-name="ce17" table:formula="of:=[.Y50]" office:value-type="float" office:value="3354567.6" calcext:value-type="float">
            <text:p>3354567.6</text:p>
          </table:table-cell>
          <table:table-cell table:style-name="ce31" table:formula="of:=[.G31]/[.F31]" office:value-type="float" office:value="0.511601499484659" calcext:value-type="float">
            <text:p>0.51</text:p>
          </table:table-cell>
          <table:table-cell table:style-name="ce27" table:formula="of:=[.E31]*[.$A$18]" office:value-type="float" office:value="6244755.51563564" calcext:value-type="float">
            <text:p>6244756</text:p>
          </table:table-cell>
          <table:table-cell table:style-name="ce31" table:formula="of:=[.G31]/[.I31]" office:value-type="float" office:value="0.537181574458891" calcext:value-type="float">
            <text:p>0.54</text:p>
          </table:table-cell>
          <table:table-cell table:style-name="ce27" table:formula="of:=[.I31]*0.95" office:value-type="float" office:value="5932517.73985386" calcext:value-type="float">
            <text:p>5932518</text:p>
          </table:table-cell>
          <table:table-cell table:style-name="ce36" table:formula="of:=IF([.$G31]&lt;[.$A$19]; [.$G31]; [.$G31]*(1+[.$G31]/[.$A$19]*[.$A$20] + ([.$G31]/[.$A$19]*[.$B$20])^2))" office:value-type="float" office:value="6106496.26775909" calcext:value-type="float">
            <text:p>6106496.26775909</text:p>
          </table:table-cell>
          <table:table-cell table:style-name="ce39" table:formula="of:=[.L31]/[.I31]" office:value-type="float" office:value="0.977859942229864" calcext:value-type="float">
            <text:p>0.977859942229864</text:p>
          </table:table-cell>
          <table:table-cell table:style-name="ce2" table:formula="of:=([.G31]/[.$A$19])*[.$B$20]" office:value-type="float" office:value="0.905733252" calcext:value-type="float">
            <text:p>0.906</text:p>
          </table:table-cell>
          <table:table-cell table:style-name="ce2" table:formula="of:=[.N31]^2" office:value-type="float" office:value="0.820352723778496" calcext:value-type="float">
            <text:p>0.820</text:p>
          </table:table-cell>
          <table:table-cell table:style-name="ce36" table:formula="of:=[.$G31]*(1+[.$G31]/[.$A$19]*[.$A$20] + ([.$G31]/[.$A$19]*[.$B$20])^2)" office:value-type="float" office:value="6106496.26775909" calcext:value-type="float">
            <text:p>6106496.26775909</text:p>
          </table:table-cell>
          <table:table-cell table:number-columns-repeated="7"/>
          <table:table-cell office:value-type="float" office:value="2725570" calcext:value-type="float">
            <text:p>2725570</text:p>
          </table:table-cell>
          <table:table-cell table:style-name="ce4"/>
          <table:table-cell table:number-columns-repeated="984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1]+[.B32]" office:value-type="float" office:value="91.45" calcext:value-type="float">
            <text:p>91.5</text:p>
          </table:table-cell>
          <table:table-cell table:style-name="ce24" table:formula="of:=[.C32]*[.$A$16]/1000" office:value-type="float" office:value="121.782521052632" calcext:value-type="float">
            <text:p>121.783</text:p>
          </table:table-cell>
          <table:table-cell table:style-name="ce24" table:formula="of:=[.D32]/([.$A$8]+[.C32]/1000)" office:value-type="float" office:value="11.6745534947329" calcext:value-type="float">
            <text:p>11.675</text:p>
          </table:table-cell>
          <table:table-cell table:style-name="ce27" table:formula="of:=[.$A$7]*[.E32]*100" office:value-type="float" office:value="7354968.70168173" calcext:value-type="float">
            <text:p>7354969</text:p>
          </table:table-cell>
          <table:table-cell table:style-name="ce17" table:formula="of:=[.Y55]" office:value-type="float" office:value="3458586.6" calcext:value-type="float">
            <text:p>3458586.6</text:p>
          </table:table-cell>
          <table:table-cell table:style-name="ce31" table:formula="of:=[.G32]/[.F32]" office:value-type="float" office:value="0.470238112530538" calcext:value-type="float">
            <text:p>0.47</text:p>
          </table:table-cell>
          <table:table-cell table:style-name="ce27" table:formula="of:=[.E32]*[.$A$18]" office:value-type="float" office:value="7004732.09683975" calcext:value-type="float">
            <text:p>7004732</text:p>
          </table:table-cell>
          <table:table-cell table:style-name="ce31" table:formula="of:=[.G32]/[.I32]" office:value-type="float" office:value="0.493750018157065" calcext:value-type="float">
            <text:p>0.49</text:p>
          </table:table-cell>
          <table:table-cell table:style-name="ce27" table:formula="of:=[.I32]*0.95" office:value-type="float" office:value="6654495.49199776" calcext:value-type="float">
            <text:p>6654495</text:p>
          </table:table-cell>
          <table:table-cell table:style-name="ce36" table:formula="of:=IF([.$G32]&lt;[.$A$19]; [.$G32]; [.$G32]*(1+[.$G32]/[.$A$19]*[.$A$20] + ([.$G32]/[.$A$19]*[.$B$20])^2))" office:value-type="float" office:value="6474532.11763789" calcext:value-type="float">
            <text:p>6474532.11763789</text:p>
          </table:table-cell>
          <table:table-cell table:style-name="ce39" table:formula="of:=[.L32]/[.I32]" office:value-type="float" office:value="0.924308314454872" calcext:value-type="float">
            <text:p>0.924308314454872</text:p>
          </table:table-cell>
          <table:table-cell table:style-name="ce2" table:formula="of:=([.G32]/[.$A$19])*[.$B$20]" office:value-type="float" office:value="0.933818382" calcext:value-type="float">
            <text:p>0.934</text:p>
          </table:table-cell>
          <table:table-cell table:style-name="ce2" table:formula="of:=[.N32]^2" office:value-type="float" office:value="0.872016770561098" calcext:value-type="float">
            <text:p>0.872</text:p>
          </table:table-cell>
          <table:table-cell table:style-name="ce36" table:formula="of:=[.$G32]*(1+[.$G32]/[.$A$19]*[.$A$20] + ([.$G32]/[.$A$19]*[.$B$20])^2)" office:value-type="float" office:value="6474532.11763789" calcext:value-type="float">
            <text:p>6474532.11763789</text:p>
          </table:table-cell>
          <table:table-cell table:number-columns-repeated="7"/>
          <table:table-cell office:value-type="float" office:value="2685195" calcext:value-type="float">
            <text:p>2685195</text:p>
          </table:table-cell>
          <table:table-cell table:number-columns-repeated="985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2]+[.B33]" office:value-type="float" office:value="101.45" calcext:value-type="float">
            <text:p>101.5</text:p>
          </table:table-cell>
          <table:table-cell table:style-name="ce24" table:formula="of:=[.C33]*[.$A$16]/1000" office:value-type="float" office:value="135.099363157895" calcext:value-type="float">
            <text:p>135.099</text:p>
          </table:table-cell>
          <table:table-cell table:style-name="ce24" table:formula="of:=[.D33]/([.$A$8]+[.C33]/1000)" office:value-type="float" office:value="12.9387549773159" calcext:value-type="float">
            <text:p>12.939</text:p>
          </table:table-cell>
          <table:table-cell table:style-name="ce27" table:formula="of:=[.$A$7]*[.E33]*100" office:value-type="float" office:value="8151415.63570899" calcext:value-type="float">
            <text:p>8151416</text:p>
          </table:table-cell>
          <table:table-cell table:style-name="ce17" table:formula="of:=[.Y60]" office:value-type="float" office:value="3603050" calcext:value-type="float">
            <text:p>3603050</text:p>
          </table:table-cell>
          <table:table-cell table:style-name="ce31" table:formula="of:=[.G33]/[.F33]" office:value-type="float" office:value="0.442015247537628" calcext:value-type="float">
            <text:p>0.44</text:p>
          </table:table-cell>
          <table:table-cell table:style-name="ce27" table:formula="of:=[.E33]*[.$A$18]" office:value-type="float" office:value="7763252.98638952" calcext:value-type="float">
            <text:p>7763253</text:p>
          </table:table-cell>
          <table:table-cell table:style-name="ce31" table:formula="of:=[.G33]/[.I33]" office:value-type="float" office:value="0.464116009914509" calcext:value-type="float">
            <text:p>0.46</text:p>
          </table:table-cell>
          <table:table-cell table:style-name="ce27" table:formula="of:=[.I33]*0.95" office:value-type="float" office:value="7375090.33707004" calcext:value-type="float">
            <text:p>7375090</text:p>
          </table:table-cell>
          <table:table-cell table:style-name="ce36" table:formula="of:=IF([.$G33]&lt;[.$A$19]; [.$G33]; [.$G33]*(1+[.$G33]/[.$A$19]*[.$A$20] + ([.$G33]/[.$A$19]*[.$B$20])^2))" office:value-type="float" office:value="7012924.49971267" calcext:value-type="float">
            <text:p>7012924.49971267</text:p>
          </table:table-cell>
          <table:table-cell table:style-name="ce39" table:formula="of:=[.L33]/[.I33]" office:value-type="float" office:value="0.903348700861311" calcext:value-type="float">
            <text:p>0.903348700861311</text:p>
          </table:table-cell>
          <table:table-cell table:style-name="ce2" table:formula="of:=([.G33]/[.$A$19])*[.$B$20]" office:value-type="float" office:value="0.9728235" calcext:value-type="float">
            <text:p>0.973</text:p>
          </table:table-cell>
          <table:table-cell table:style-name="ce2" table:formula="of:=[.N33]^2" office:value-type="float" office:value="0.94638556215225" calcext:value-type="float">
            <text:p>0.946</text:p>
          </table:table-cell>
          <table:table-cell table:style-name="ce36" table:formula="of:=[.$G33]*(1+[.$G33]/[.$A$19]*[.$A$20] + ([.$G33]/[.$A$19]*[.$B$20])^2)" office:value-type="float" office:value="7012924.49971267" calcext:value-type="float">
            <text:p>7012924.49971267</text:p>
          </table:table-cell>
          <table:table-cell table:number-columns-repeated="7"/>
          <table:table-cell office:value-type="float" office:value="2662791" calcext:value-type="float">
            <text:p>2662791</text:p>
          </table:table-cell>
          <table:table-cell table:number-columns-repeated="985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21" table:formula="of:=[.C33]+[.B34]" office:value-type="float" office:value="101.45" calcext:value-type="float">
            <text:p>101.5</text:p>
          </table:table-cell>
          <table:table-cell table:style-name="ce24" table:formula="of:=[.C34]*[.$A$16]/1000" office:value-type="float" office:value="135.099363157895" calcext:value-type="float">
            <text:p>135.099</text:p>
          </table:table-cell>
          <table:table-cell table:style-name="ce24" table:formula="of:=[.D34]/([.$A$8]+[.C34]/1000)" office:value-type="float" office:value="12.9387549773159" calcext:value-type="float">
            <text:p>12.939</text:p>
          </table:table-cell>
          <table:table-cell table:style-name="ce27" table:formula="of:=[.$A$7]*[.E34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4]/[.F34]" office:value-type="float" office:value="0" calcext:value-type="float">
            <text:p>0.00</text:p>
          </table:table-cell>
          <table:table-cell table:style-name="ce27" table:formula="of:=[.E34]*[.$A$18]" office:value-type="float" office:value="7763252.98638952" calcext:value-type="float">
            <text:p>7763253</text:p>
          </table:table-cell>
          <table:table-cell table:style-name="ce31" table:formula="of:=[.G34]/[.I34]" office:value-type="float" office:value="0" calcext:value-type="float">
            <text:p>0.00</text:p>
          </table:table-cell>
          <table:table-cell table:style-name="ce27" table:formula="of:=[.I34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4]/[.I34]" office:value-type="float" office:value="0" calcext:value-type="float">
            <text:p>0</text:p>
          </table:table-cell>
          <table:table-cell table:style-name="ce2" table:formula="of:=([.G34]/[.$A$19])*[.$B$20]" office:value-type="float" office:value="0" calcext:value-type="float">
            <text:p>0.000</text:p>
          </table:table-cell>
          <table:table-cell table:style-name="ce2" table:formula="of:=[.N34]^2" office:value-type="float" office:value="0" calcext:value-type="float">
            <text:p>0.000</text:p>
          </table:table-cell>
          <table:table-cell table:style-name="ce36"/>
          <table:table-cell table:number-columns-repeated="7"/>
          <table:table-cell office:value-type="float" office:value="2660365" calcext:value-type="float">
            <text:p>2660365</text:p>
          </table:table-cell>
          <table:table-cell table:number-columns-repeated="985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1" table:formula="of:=[.C34]+[.B35]" office:value-type="float" office:value="101.45" calcext:value-type="float">
            <text:p>101.5</text:p>
          </table:table-cell>
          <table:table-cell table:style-name="ce24" table:formula="of:=[.C35]*[.$A$16]/1000" office:value-type="float" office:value="135.099363157895" calcext:value-type="float">
            <text:p>135.099</text:p>
          </table:table-cell>
          <table:table-cell table:style-name="ce24" table:formula="of:=[.D35]/([.$A$8]+[.C35]/1000)" office:value-type="float" office:value="12.9387549773159" calcext:value-type="float">
            <text:p>12.939</text:p>
          </table:table-cell>
          <table:table-cell table:style-name="ce27" table:formula="of:=[.$A$7]*[.E35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5]/[.F35]" office:value-type="float" office:value="0" calcext:value-type="float">
            <text:p>0.00</text:p>
          </table:table-cell>
          <table:table-cell table:style-name="ce27" table:formula="of:=[.E35]*[.$A$18]" office:value-type="float" office:value="7763252.98638952" calcext:value-type="float">
            <text:p>7763253</text:p>
          </table:table-cell>
          <table:table-cell table:style-name="ce31" table:formula="of:=[.G35]/[.I35]" office:value-type="float" office:value="0" calcext:value-type="float">
            <text:p>0.00</text:p>
          </table:table-cell>
          <table:table-cell table:style-name="ce27" table:formula="of:=[.I35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5]/[.I35]" office:value-type="float" office:value="0" calcext:value-type="float">
            <text:p>0</text:p>
          </table:table-cell>
          <table:table-cell table:style-name="ce2" table:formula="of:=([.G35]/[.$A$19])*[.$B$20]" office:value-type="float" office:value="0" calcext:value-type="float">
            <text:p>0.000</text:p>
          </table:table-cell>
          <table:table-cell table:style-name="ce2" table:formula="of:=[.N35]^2" office:value-type="float" office:value="0" calcext:value-type="float">
            <text:p>0.000</text:p>
          </table:table-cell>
          <table:table-cell table:style-name="ce36"/>
          <table:table-cell table:number-columns-repeated="7"/>
          <table:table-cell office:value-type="float" office:value="2668256" calcext:value-type="float">
            <text:p>2668256</text:p>
          </table:table-cell>
          <table:table-cell table:formula="of:=AVERAGE([.X31:.X35])" office:value-type="float" office:value="2680435.4" calcext:value-type="float">
            <text:p>2680435.4</text:p>
          </table:table-cell>
          <table:table-cell table:number-columns-repeated="984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/>
          <table:table-cell table:style-name="ce21" table:formula="of:=[.C35]+[.B36]" office:value-type="float" office:value="101.45" calcext:value-type="float">
            <text:p>101.5</text:p>
          </table:table-cell>
          <table:table-cell table:style-name="ce24" table:formula="of:=[.C36]*[.$A$16]/1000" office:value-type="float" office:value="135.099363157895" calcext:value-type="float">
            <text:p>135.099</text:p>
          </table:table-cell>
          <table:table-cell table:style-name="ce24" table:formula="of:=[.D36]/([.$A$8]+[.C36]/1000)" office:value-type="float" office:value="12.9387549773159" calcext:value-type="float">
            <text:p>12.939</text:p>
          </table:table-cell>
          <table:table-cell table:style-name="ce27" table:formula="of:=[.$A$7]*[.E36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6]/[.F36]" office:value-type="float" office:value="0" calcext:value-type="float">
            <text:p>0.00</text:p>
          </table:table-cell>
          <table:table-cell table:style-name="ce27" table:formula="of:=[.E36]*[.$A$18]" office:value-type="float" office:value="7763252.98638952" calcext:value-type="float">
            <text:p>7763253</text:p>
          </table:table-cell>
          <table:table-cell table:style-name="ce31" table:formula="of:=[.G36]/[.I36]" office:value-type="float" office:value="0" calcext:value-type="float">
            <text:p>0.00</text:p>
          </table:table-cell>
          <table:table-cell table:style-name="ce27" table:formula="of:=[.I36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6]/[.I36]" office:value-type="float" office:value="0" calcext:value-type="float">
            <text:p>0</text:p>
          </table:table-cell>
          <table:table-cell table:style-name="ce2" table:formula="of:=([.G36]/[.$A$19])*[.$B$20]" office:value-type="float" office:value="0" calcext:value-type="float">
            <text:p>0.000</text:p>
          </table:table-cell>
          <table:table-cell table:style-name="ce2" table:formula="of:=[.N36]^2" office:value-type="float" office:value="0" calcext:value-type="float">
            <text:p>0.000</text:p>
          </table:table-cell>
          <table:table-cell table:style-name="ce36"/>
          <table:table-cell table:number-columns-repeated="7"/>
          <table:table-cell office:value-type="float" office:value="2887237" calcext:value-type="float">
            <text:p>2887237</text:p>
          </table:table-cell>
          <table:table-cell table:number-columns-repeated="985"/>
        </table:table-row>
        <table:table-row table:style-name="ro2">
          <table:table-cell table:style-name="ce19" office:value-type="float" office:value="150" calcext:value-type="float">
            <text:p>150</text:p>
          </table:table-cell>
          <table:table-cell table:style-name="ce19"/>
          <table:table-cell table:style-name="ce23" table:formula="of:=[.C36]+[.B37]" office:value-type="float" office:value="101.45" calcext:value-type="float">
            <text:p>101.5</text:p>
          </table:table-cell>
          <table:table-cell table:style-name="ce26" table:formula="of:=[.C37]*[.$A$16]/1000" office:value-type="float" office:value="135.099363157895" calcext:value-type="float">
            <text:p>135.099</text:p>
          </table:table-cell>
          <table:table-cell table:style-name="ce26" table:formula="of:=[.D37]/([.$A$8]+[.C37]/1000)" office:value-type="float" office:value="12.9387549773159" calcext:value-type="float">
            <text:p>12.939</text:p>
          </table:table-cell>
          <table:table-cell table:style-name="ce29" table:formula="of:=[.$A$7]*[.E37]*100" office:value-type="float" office:value="8151415.63570899" calcext:value-type="float">
            <text:p>8151416</text:p>
          </table:table-cell>
          <table:table-cell table:style-name="ce19"/>
          <table:table-cell table:style-name="ce33" table:formula="of:=[.G37]/[.F37]" office:value-type="float" office:value="0" calcext:value-type="float">
            <text:p>0.00</text:p>
          </table:table-cell>
          <table:table-cell table:style-name="ce27" table:formula="of:=[.E37]*[.$A$18]" office:value-type="float" office:value="7763252.98638952" calcext:value-type="float">
            <text:p>7763253</text:p>
          </table:table-cell>
          <table:table-cell table:style-name="ce33" table:formula="of:=[.G37]/[.I37]" office:value-type="float" office:value="0" calcext:value-type="float">
            <text:p>0.00</text:p>
          </table:table-cell>
          <table:table-cell table:style-name="ce29" table:formula="of:=[.I37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7]/[.I37]" office:value-type="float" office:value="0" calcext:value-type="float">
            <text:p>0</text:p>
          </table:table-cell>
          <table:table-cell table:style-name="ce2" table:formula="of:=([.G37]/[.$A$19])*[.$B$20]" office:value-type="float" office:value="0" calcext:value-type="float">
            <text:p>0.000</text:p>
          </table:table-cell>
          <table:table-cell table:style-name="ce2" table:formula="of:=[.N37]^2" office:value-type="float" office:value="0" calcext:value-type="float">
            <text:p>0.000</text:p>
          </table:table-cell>
          <table:table-cell table:style-name="ce36"/>
          <table:table-cell table:number-columns-repeated="7"/>
          <table:table-cell office:value-type="float" office:value="2827855" calcext:value-type="float">
            <text:p>2827855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910753" calcext:value-type="float">
            <text:p>2910753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73013" calcext:value-type="float">
            <text:p>2873013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54548" calcext:value-type="float">
            <text:p>2854548</text:p>
          </table:table-cell>
          <table:table-cell table:formula="of:=AVERAGE([.X36:.X40])" office:value-type="float" office:value="2870681.2" calcext:value-type="float">
            <text:p>2870681.2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147500" calcext:value-type="float">
            <text:p>3147500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33622" calcext:value-type="float">
            <text:p>313362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208827" calcext:value-type="float">
            <text:p>3208827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82206" calcext:value-type="float">
            <text:p>3182206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60238" calcext:value-type="float">
            <text:p>3160238</text:p>
          </table:table-cell>
          <table:table-cell table:formula="of:=AVERAGE([.X41:.X45])" office:value-type="float" office:value="3166478.6" calcext:value-type="float">
            <text:p>3166478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360902" calcext:value-type="float">
            <text:p>336090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41590" calcext:value-type="float">
            <text:p>3341590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30439" calcext:value-type="float">
            <text:p>3330439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87471" calcext:value-type="float">
            <text:p>3387471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52436" calcext:value-type="float">
            <text:p>3352436</text:p>
          </table:table-cell>
          <table:table-cell table:formula="of:=AVERAGE([.X46:.X50])" office:value-type="float" office:value="3354567.6" calcext:value-type="float">
            <text:p>3354567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392091" calcext:value-type="float">
            <text:p>3392091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62385" calcext:value-type="float">
            <text:p>3462385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80754" calcext:value-type="float">
            <text:p>3480754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14548" calcext:value-type="float">
            <text:p>3514548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43155" calcext:value-type="float">
            <text:p>3443155</text:p>
          </table:table-cell>
          <table:table-cell table:formula="of:=AVERAGE([.X51:.X55])" office:value-type="float" office:value="3458586.6" calcext:value-type="float">
            <text:p>3458586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599548" calcext:value-type="float">
            <text:p>3599548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634496" calcext:value-type="float">
            <text:p>3634496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82602" calcext:value-type="float">
            <text:p>358260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633472" calcext:value-type="float">
            <text:p>363347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65132" calcext:value-type="float">
            <text:p>3565132</text:p>
          </table:table-cell>
          <table:table-cell table:formula="of:=AVERAGE([.X56:.X60])" office:value-type="float" office:value="3603050" calcext:value-type="float">
            <text:p>3603050</text:p>
          </table:table-cell>
          <table:table-cell table:number-columns-repeated="984"/>
        </table:table-row>
        <table:table-row table:style-name="ro2" table:number-rows-repeated="1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6"/>
          <table:table-cell office:value-type="string" calcext:value-type="string">
            <text:p><text:span text:style-name="T2">Regression</text:span>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000"/>
        </table:table-row>
        <table:table-row table:style-name="ro2">
          <table:table-cell/>
          <table:table-cell table:number-matrix-columns-spanned="2" table:number-matrix-rows-spanned="5" table:formula="of:=LINEST([.$G$23:.$G$27] ; [.$E$23:.$E$27] ; 0 ; 1)" office:value-type="float" office:value="476693.953181022" calcext:value-type="float">
            <text:p>476693.95318102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3:.$J$37]) ; LN([.$G$23:.$G$37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9650.505395007" calcext:value-type="float">
            <text:p>19650.50539500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0.993248719252472" calcext:value-type="float">
            <text:p>0.993248719252472</text:p>
          </table:table-cell>
          <table:table-cell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88.480175182248" calcext:value-type="float">
            <text:p>588.4801751822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349675662195.7" calcext:value-type="float">
            <text:p>12349675662195.7</text:p>
          </table:table-cell>
          <table:table-cell office:value-type="float" office:value="83942849278.6256" calcext:value-type="float">
            <text:p>83942849278.6256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9]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9]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9]"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9]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9])*([.$C$87] - 1)/([.$C$87] - [.$C$86])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9])*([.$J$87] - 1)/([.$J$87] - [.$J$86] - 1)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5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6]" office:value-type="float" office:value="1" calcext:value-type="float">
            <text:p>1</text:p>
          </table:table-cell>
          <table:table-cell table:formula="of:=[.$B$81]" office:value-type="float" office:value="12349675662195.7" calcext:value-type="float">
            <text:p>12349675662195.7</text:p>
          </table:table-cell>
          <table:table-cell table:formula="of:=[.$B$81] / [.$C$92]" office:value-type="float" office:value="12349675662195.7" calcext:value-type="float">
            <text:p>12349675662195.7</text:p>
          </table:table-cell>
          <table:table-cell table:formula="of:=[.$B$80]" office:value-type="float" office:value="588.480175182248" calcext:value-type="float">
            <text:p>588.480175182248</text:p>
          </table:table-cell>
          <table:table-cell table:formula="of:=LEGACY.FDIST([.$B$80] ; [.$C$92] ; [.$C$80])" office:value-type="float" office:value="0.0000171310338819394" calcext:value-type="float">
            <text:p>1.71310338819394E-05</text:p>
          </table:table-cell>
          <table:table-cell/>
          <table:table-cell office:value-type="string" calcext:value-type="string">
            <text:p>Regression</text:p>
          </table:table-cell>
          <table:table-cell table:formula="of:=[.$J$86]" office:value-type="float" office:value="1" calcext:value-type="float">
            <text:p>1</text:p>
          </table:table-cell>
          <table:table-cell table:formula="of:=[.$I$81]" office:value-type="string" office:string-value="" calcext:value-type="error">
            <text:p>Err:502</text:p>
          </table:table-cell>
          <table:table-cell table:formula="of:=[.$I$81] / [.$J$92]" office:value-type="string" office:string-value="" calcext:value-type="error">
            <text:p>Err:502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LEGACY.FDIST([.$I$80] ; [.$J$92] ; [.$J$80])" office:value-type="string" office:string-value="" calcext:value-type="error">
            <text:p>Err:502</text:p>
          </table:table-cell>
          <table:table-cell table:number-columns-repeated="995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80]" office:value-type="float" office:value="4" calcext:value-type="float">
            <text:p>4</text:p>
          </table:table-cell>
          <table:table-cell table:formula="of:=[.$C$81]" office:value-type="float" office:value="83942849278.6256" calcext:value-type="float">
            <text:p>83942849278.6256</text:p>
          </table:table-cell>
          <table:table-cell table:formula="of:=[.$C$81] / [.$C$80]" office:value-type="float" office:value="20985712319.6564" calcext:value-type="float">
            <text:p>20985712319.6564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80]" office:value-type="float" office:value="13" calcext:value-type="float">
            <text:p>13</text:p>
          </table:table-cell>
          <table:table-cell table:formula="of:=[.$J$81]" office:value-type="string" office:string-value="" calcext:value-type="error">
            <text:p>Err:502</text:p>
          </table:table-cell>
          <table:table-cell table:formula="of:=[.$J$81] / [.$J$80]" office:value-type="string" office:string-value="" calcext:value-type="error">
            <text:p>Err:502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2] + [.$C$80]" office:value-type="float" office:value="5" calcext:value-type="float">
            <text:p>5</text:p>
          </table:table-cell>
          <table:table-cell table:formula="of:=[.$B$81] + [.$C$81]" office:value-type="float" office:value="12433618511474.3" calcext:value-type="float">
            <text:p>12433618511474.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2] + [.$J$80]" office:value-type="float" office:value="14" calcext:value-type="float">
            <text:p>14</text:p>
          </table:table-cell>
          <table:table-cell table:formula="of:=[.$I$81] + [.$J$81]" office:value-type="string" office:string-value="" calcext:value-type="error">
            <text:p>Err:502</text:p>
          </table:table-cell>
          <table:table-cell table:number-columns-repeated="998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6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6] * 100) ; &quot;%&quot;)" office:value-type="string" office:string-value="Upper 95%" calcext:value-type="string">
            <text:p>Upper 95%</text:p>
          </table:table-cell>
          <table:table-cell table:number-columns-repeated="994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7:.$C$77]; 1 ; ROW([.$C$100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8:.$C$78]; 1 ; ROW([.$D$100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/ [.$D$99:.$D$100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9:.$E$100]) ; [.$C$80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- [.$D$99:.$D$100] * TINV(1 - [.$C$96] ; [.$C$80]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+ [.$D$99:.$D$100] * TINV(1 - [.$C$96] ; [.$C$80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7:.$J$77]; 1 ; ROW([.$J$100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8:.$J$78]; 1 ; ROW([.$K$100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/ [.$K$99:.$K$100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9:.$L$100]) ; [.$J$80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- [.$K$99:.$K$100] * TINV(1 - [.$J$96] ; [.$J$80]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+ [.$K$99:.$K$100] * TINV(1 - [.$J$96] ; [.$J$80])" office:value-type="string" office:string-value="" calcext:value-type="error">
            <text:p>Err:502</text:p>
          </table:table-cell>
          <table:table-cell table:number-columns-repeated="994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4" office:value-type="float" office:value="476693.953181022" calcext:value-type="float">
            <text:p>476693.953181022</text:p>
          </table:table-cell>
          <table:table-cell office:value-type="float" office:value="19650.505395007" calcext:value-type="float">
            <text:p>19650.505395007</text:p>
          </table:table-cell>
          <table:table-cell office:value-type="float" office:value="24.2586103308134" calcext:value-type="float">
            <text:p>24.2586103308134</text:p>
          </table:table-cell>
          <table:table-cell office:value-type="float" office:value="0.0000171310338819394" calcext:value-type="float">
            <text:p>1.71310338819394E-05</text:p>
          </table:table-cell>
          <table:table-cell office:value-type="float" office:value="422135.403662392" calcext:value-type="float">
            <text:p>422135.403662392</text:p>
          </table:table-cell>
          <table:table-cell office:value-type="float" office:value="531252.502699652" calcext:value-type="float">
            <text:p>531252.50269965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4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04"/>
        </table:table-row>
        <table:table-row table:style-name="ro2">
          <table:table-cell/>
          <table:table-cell table:number-matrix-columns-spanned="1" table:number-matrix-rows-spanned="5" table:formula="of:=[.$A$23:.$A$27]" office:value-type="float" office:value="0" calcext:value-type="float">
            <text:p>0</text:p>
          </table:table-cell>
          <table:table-cell table:number-matrix-columns-spanned="1" table:number-matrix-rows-spanned="5" table:formula="of:=MMULT([.$B$103:.$B$107] ; [.$C$100]) + [.$C$99]" office:value-type="float" office:value="0" calcext:value-type="float">
            <text:p>0</text:p>
          </table:table-cell>
          <table:table-cell table:number-matrix-columns-spanned="1" table:number-matrix-rows-spanned="5" table:formula="of:=[.$G$23:.$G$27]" office:value-type="float" office:value="3357.6" calcext:value-type="float">
            <text:p>3357.6</text:p>
          </table:table-cell>
          <table:table-cell table:number-matrix-columns-spanned="1" table:number-matrix-rows-spanned="5" table:formula="of:=[.$D$103:.$D$107] - [.$C$103:.$C$107]" office:value-type="float" office:value="3357.6" calcext:value-type="float">
            <text:p>3357.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766939.53181022" calcext:value-type="float">
            <text:p>4766939.53181022</text:p>
          </table:table-cell>
          <table:table-cell office:value-type="float" office:value="863732.6" calcext:value-type="float">
            <text:p>863732.6</text:p>
          </table:table-cell>
          <table:table-cell office:value-type="float" office:value="-3903206.93181022" calcext:value-type="float">
            <text:p>-3903206.9318102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533879.06362044" calcext:value-type="float">
            <text:p>9533879.06362044</text:p>
          </table:table-cell>
          <table:table-cell office:value-type="float" office:value="1480289.2" calcext:value-type="float">
            <text:p>1480289.2</text:p>
          </table:table-cell>
          <table:table-cell office:value-type="float" office:value="-8053589.86362044" calcext:value-type="float">
            <text:p>-8053589.8636204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300818.5954307" calcext:value-type="float">
            <text:p>14300818.5954307</text:p>
          </table:table-cell>
          <table:table-cell office:value-type="float" office:value="1972736.4" calcext:value-type="float">
            <text:p>1972736.4</text:p>
          </table:table-cell>
          <table:table-cell office:value-type="float" office:value="-12328082.1954307" calcext:value-type="float">
            <text:p>-12328082.195430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067758.1272409" calcext:value-type="float">
            <text:p>19067758.1272409</text:p>
          </table:table-cell>
          <table:table-cell office:value-type="float" office:value="2367409.6" calcext:value-type="float">
            <text:p>2367409.6</text:p>
          </table:table-cell>
          <table:table-cell office:value-type="float" office:value="-16700348.5272409" calcext:value-type="float">
            <text:p>-16700348.5272409</text:p>
          </table:table-cell>
          <table:table-cell table:number-columns-repeated="1004"/>
        </table:table-row>
      </table:table>
      <table:table table:name="CHART" table:style-name="ta1">
        <table:shapes>
          <draw:frame draw:z-index="0" draw:style-name="gr1" draw:text-style-name="P1" svg:width="53.423cm" svg:height="33.991cm" svg:x="0cm" svg:y="0cm">
            <draw:object draw:notify-on-update-of-ranges="'Annex B Coincidence Limit'.E22:'Annex B Coincidence Limit'.E36 'Annex B Coincidence Limit'.A1:'Annex B Coincidence Limit'.A1 'Annex B Coincidence Limit'.G22:'Annex B Coincidence Limit'.G36 'Annex B Coincidence Limit'.E22:'Annex B Coincidence Limit'.E36 'Annex B Coincidence Limit'.A1:'Annex B Coincidence Limit'.A1 'Annex B Coincidence Limit'.L22:'Annex B Coincidence Limit'.L36 'Annex B Coincidence Limit'.E22:'Annex B Coincidence Limit'.E35 'Annex B Coincidence Limit'.A1:'Annex B Coincidence Limit'.A1 'Annex B Coincidence Limit'.K22:'Annex B Coincidence Limit'.K36 'Annex B Coincidence Limit'.E22:'Annex B Coincidence Limit'.E36 'Annex B Coincidence Limit'.A1:'Annex B Coincidence Limit'.A1 'Annex B Coincidence Limit'.I22:'Annex B Coincidence Limit'.I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ATA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office:value-type="string" calcext:value-type="string">
            <text:p>TotalCount38</text:p>
          </table:table-cell>
          <table:table-cell office:value-type="string" calcext:value-type="string">
            <text:p>TotalCount50</text:p>
          </table:table-cell>
          <table:table-cell office:value-type="string" calcext:value-type="string">
            <text:p>TotalCount6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2025-02-18 16:11:58</text:p>
          </table:table-cell>
          <table:table-cell table:number-columns-repeated="2"/>
          <table:table-cell office:value-type="float" office:value="97126" calcext:value-type="float">
            <text:p>971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5:37</text:p>
          </table:table-cell>
          <table:table-cell table:number-columns-repeated="2"/>
          <table:table-cell office:value-type="float" office:value="167569" calcext:value-type="float">
            <text:p>167569</text:p>
          </table:table-cell>
          <table:table-cell office:value-type="float" office:value="47762" calcext:value-type="float">
            <text:p>47762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7:43</text:p>
          </table:table-cell>
          <table:table-cell table:number-columns-repeated="2"/>
          <table:table-cell office:value-type="float" office:value="169407" calcext:value-type="float">
            <text:p>169407</text:p>
          </table:table-cell>
          <table:table-cell office:value-type="float" office:value="48245" calcext:value-type="float">
            <text:p>48245</text:p>
          </table:table-cell>
          <table:table-cell office:value-type="float" office:value="538" calcext:value-type="float">
            <text:p>538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50:57</text:p>
          </table:table-cell>
          <table:table-cell table:number-columns-repeated="2"/>
          <table:table-cell office:value-type="float" office:value="169243" calcext:value-type="float">
            <text:p>169243</text:p>
          </table:table-cell>
          <table:table-cell office:value-type="float" office:value="47760" calcext:value-type="float">
            <text:p>47760</text:p>
          </table:table-cell>
          <table:table-cell office:value-type="float" office:value="442" calcext:value-type="float">
            <text:p>44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23</text:p>
          </table:table-cell>
          <table:table-cell table:number-columns-repeated="2"/>
          <table:table-cell office:value-type="float" office:value="292859" calcext:value-type="float">
            <text:p>292859</text:p>
          </table:table-cell>
          <table:table-cell office:value-type="float" office:value="80920" calcext:value-type="float">
            <text:p>80920</text:p>
          </table:table-cell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34</text:p>
          </table:table-cell>
          <table:table-cell table:number-columns-repeated="2"/>
          <table:table-cell office:value-type="float" office:value="301110" calcext:value-type="float">
            <text:p>301110</text:p>
          </table:table-cell>
          <table:table-cell office:value-type="float" office:value="85745" calcext:value-type="float">
            <text:p>85745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45</text:p>
          </table:table-cell>
          <table:table-cell table:number-columns-repeated="2"/>
          <table:table-cell office:value-type="float" office:value="299624" calcext:value-type="float">
            <text:p>299624</text:p>
          </table:table-cell>
          <table:table-cell office:value-type="float" office:value="84913" calcext:value-type="float">
            <text:p>84913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56</text:p>
          </table:table-cell>
          <table:table-cell table:number-columns-repeated="2"/>
          <table:table-cell office:value-type="float" office:value="285382" calcext:value-type="float">
            <text:p>285382</text:p>
          </table:table-cell>
          <table:table-cell office:value-type="float" office:value="80226" calcext:value-type="float">
            <text:p>80226</text:p>
          </table:table-cell>
          <table:table-cell office:value-type="float" office:value="749" calcext:value-type="float">
            <text:p>749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07</text:p>
          </table:table-cell>
          <table:table-cell table:number-columns-repeated="2"/>
          <table:table-cell office:value-type="float" office:value="458207" calcext:value-type="float">
            <text:p>458207</text:p>
          </table:table-cell>
          <table:table-cell office:value-type="float" office:value="130538" calcext:value-type="float">
            <text:p>130538</text:p>
          </table:table-cell>
          <table:table-cell office:value-type="float" office:value="778" calcext:value-type="float">
            <text:p>778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19</text:p>
          </table:table-cell>
          <table:table-cell table:number-columns-repeated="2"/>
          <table:table-cell office:value-type="float" office:value="465138" calcext:value-type="float">
            <text:p>465138</text:p>
          </table:table-cell>
          <table:table-cell office:value-type="float" office:value="137763" calcext:value-type="float">
            <text:p>137763</text:p>
          </table:table-cell>
          <table:table-cell office:value-type="float" office:value="822" calcext:value-type="float">
            <text:p>822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31</text:p>
          </table:table-cell>
          <table:table-cell table:number-columns-repeated="2"/>
          <table:table-cell office:value-type="float" office:value="454200" calcext:value-type="float">
            <text:p>454200</text:p>
          </table:table-cell>
          <table:table-cell office:value-type="float" office:value="132370" calcext:value-type="float">
            <text:p>132370</text:p>
          </table:table-cell>
          <table:table-cell office:value-type="float" office:value="898" calcext:value-type="float">
            <text:p>89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43</text:p>
          </table:table-cell>
          <table:table-cell table:number-columns-repeated="2"/>
          <table:table-cell office:value-type="float" office:value="445750" calcext:value-type="float">
            <text:p>445750</text:p>
          </table:table-cell>
          <table:table-cell office:value-type="float" office:value="128188" calcext:value-type="float">
            <text:p>128188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54</text:p>
          </table:table-cell>
          <table:table-cell table:number-columns-repeated="2"/>
          <table:table-cell office:value-type="float" office:value="443747" calcext:value-type="float">
            <text:p>443747</text:p>
          </table:table-cell>
          <table:table-cell office:value-type="float" office:value="127364" calcext:value-type="float">
            <text:p>127364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06</text:p>
          </table:table-cell>
          <table:table-cell table:number-columns-repeated="2"/>
          <table:table-cell office:value-type="float" office:value="453143" calcext:value-type="float">
            <text:p>453143</text:p>
          </table:table-cell>
          <table:table-cell office:value-type="float" office:value="126112" calcext:value-type="float">
            <text:p>126112</text:p>
          </table:table-cell>
          <table:table-cell office:value-type="float" office:value="1419" calcext:value-type="float">
            <text:p>1419</text:p>
          </table:table-cell>
          <table:table-cell office:value-type="float" office:value="236" calcext:value-type="float">
            <text:p>236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36</text:p>
          </table:table-cell>
          <table:table-cell table:number-columns-repeated="2"/>
          <table:table-cell office:value-type="float" office:value="436276" calcext:value-type="float">
            <text:p>436276</text:p>
          </table:table-cell>
          <table:table-cell office:value-type="float" office:value="123877" calcext:value-type="float">
            <text:p>123877</text:p>
          </table:table-cell>
          <table:table-cell office:value-type="float" office:value="1270" calcext:value-type="float">
            <text:p>1270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05</text:p>
          </table:table-cell>
          <table:table-cell table:number-columns-repeated="2"/>
          <table:table-cell office:value-type="float" office:value="454474" calcext:value-type="float">
            <text:p>454474</text:p>
          </table:table-cell>
          <table:table-cell office:value-type="float" office:value="128843" calcext:value-type="float">
            <text:p>128843</text:p>
          </table:table-cell>
          <table:table-cell office:value-type="float" office:value="1278" calcext:value-type="float">
            <text:p>1278</text:p>
          </table:table-cell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34</text:p>
          </table:table-cell>
          <table:table-cell table:number-columns-repeated="2"/>
          <table:table-cell office:value-type="float" office:value="454993" calcext:value-type="float">
            <text:p>454993</text:p>
          </table:table-cell>
          <table:table-cell office:value-type="float" office:value="128062" calcext:value-type="float">
            <text:p>128062</text:p>
          </table:table-cell>
          <table:table-cell office:value-type="float" office:value="1368" calcext:value-type="float">
            <text:p>1368</text:p>
          </table:table-cell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7:03</text:p>
          </table:table-cell>
          <table:table-cell table:number-columns-repeated="2"/>
          <table:table-cell office:value-type="float" office:value="462615" calcext:value-type="float">
            <text:p>462615</text:p>
          </table:table-cell>
          <table:table-cell office:value-type="float" office:value="127985" calcext:value-type="float">
            <text:p>127985</text:p>
          </table:table-cell>
          <table:table-cell office:value-type="float" office:value="1529" calcext:value-type="float">
            <text:p>1529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08</text:p>
          </table:table-cell>
          <table:table-cell table:number-columns-repeated="2"/>
          <table:table-cell office:value-type="float" office:value="578672" calcext:value-type="float">
            <text:p>578672</text:p>
          </table:table-cell>
          <table:table-cell office:value-type="float" office:value="162688" calcext:value-type="float">
            <text:p>162688</text:p>
          </table:table-cell>
          <table:table-cell office:value-type="float" office:value="1502" calcext:value-type="float">
            <text:p>1502</text:p>
          </table:table-cell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37</text:p>
          </table:table-cell>
          <table:table-cell table:number-columns-repeated="2"/>
          <table:table-cell office:value-type="float" office:value="581090" calcext:value-type="float">
            <text:p>581090</text:p>
          </table:table-cell>
          <table:table-cell office:value-type="float" office:value="166955" calcext:value-type="float">
            <text:p>166955</text:p>
          </table:table-cell>
          <table:table-cell office:value-type="float" office:value="1514" calcext:value-type="float">
            <text:p>1514</text:p>
          </table:table-cell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06</text:p>
          </table:table-cell>
          <table:table-cell table:number-columns-repeated="2"/>
          <table:table-cell office:value-type="float" office:value="592101" calcext:value-type="float">
            <text:p>592101</text:p>
          </table:table-cell>
          <table:table-cell office:value-type="float" office:value="167382" calcext:value-type="float">
            <text:p>167382</text:p>
          </table:table-cell>
          <table:table-cell office:value-type="float" office:value="1370" calcext:value-type="float">
            <text:p>1370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35</text:p>
          </table:table-cell>
          <table:table-cell table:number-columns-repeated="2"/>
          <table:table-cell office:value-type="float" office:value="600145" calcext:value-type="float">
            <text:p>600145</text:p>
          </table:table-cell>
          <table:table-cell office:value-type="float" office:value="170635" calcext:value-type="float">
            <text:p>170635</text:p>
          </table:table-cell>
          <table:table-cell office:value-type="float" office:value="1511" calcext:value-type="float">
            <text:p>1511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0:55</text:p>
          </table:table-cell>
          <table:table-cell table:number-columns-repeated="2"/>
          <table:table-cell office:value-type="float" office:value="599839" calcext:value-type="float">
            <text:p>599839</text:p>
          </table:table-cell>
          <table:table-cell office:value-type="float" office:value="170108" calcext:value-type="float">
            <text:p>170108</text:p>
          </table:table-cell>
          <table:table-cell office:value-type="float" office:value="1298" calcext:value-type="float">
            <text:p>1298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1:24</text:p>
          </table:table-cell>
          <table:table-cell table:number-columns-repeated="2"/>
          <table:table-cell office:value-type="float" office:value="606849" calcext:value-type="float">
            <text:p>606849</text:p>
          </table:table-cell>
          <table:table-cell office:value-type="float" office:value="174925" calcext:value-type="float">
            <text:p>174925</text:p>
          </table:table-cell>
          <table:table-cell office:value-type="float" office:value="1831" calcext:value-type="float">
            <text:p>1831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61110029" calcext:value-type="float">
            <text:p>61110029</text:p>
          </table:table-cell>
          <table:table-cell table:style-name="ce13" office:value-type="string" calcext:value-type="string">
            <text:p>2025-02-21 11:21:54</text:p>
          </table:table-cell>
          <table:table-cell table:style-name="ce4" table:number-columns-repeated="2"/>
          <table:table-cell table:style-name="ce4" office:value-type="float" office:value="607236" calcext:value-type="float">
            <text:p>607236</text:p>
          </table:table-cell>
          <table:table-cell table:style-name="ce4" office:value-type="float" office:value="172958" calcext:value-type="float">
            <text:p>172958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2:23</text:p>
          </table:table-cell>
          <table:table-cell table:number-columns-repeated="2"/>
          <table:table-cell office:value-type="float" office:value="615108" calcext:value-type="float">
            <text:p>615108</text:p>
          </table:table-cell>
          <table:table-cell office:value-type="float" office:value="179788" calcext:value-type="float">
            <text:p>179788</text:p>
          </table:table-cell>
          <table:table-cell office:value-type="float" office:value="1475" calcext:value-type="float">
            <text:p>1475</text:p>
          </table:table-cell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26</text:p>
          </table:table-cell>
          <table:table-cell table:number-columns-repeated="2"/>
          <table:table-cell office:value-type="float" office:value="723681" calcext:value-type="float">
            <text:p>723681</text:p>
          </table:table-cell>
          <table:table-cell office:value-type="float" office:value="206919" calcext:value-type="float">
            <text:p>206919</text:p>
          </table:table-cell>
          <table:table-cell office:value-type="float" office:value="1816" calcext:value-type="float">
            <text:p>1816</text:p>
          </table:table-cell>
          <table:table-cell office:value-type="float" office:value="349" calcext:value-type="float">
            <text:p>34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55</text:p>
          </table:table-cell>
          <table:table-cell table:number-columns-repeated="2"/>
          <table:table-cell office:value-type="float" office:value="707528" calcext:value-type="float">
            <text:p>707528</text:p>
          </table:table-cell>
          <table:table-cell office:value-type="float" office:value="205106" calcext:value-type="float">
            <text:p>205106</text:p>
          </table:table-cell>
          <table:table-cell office:value-type="float" office:value="1662" calcext:value-type="float">
            <text:p>1662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24</text:p>
          </table:table-cell>
          <table:table-cell table:number-columns-repeated="2"/>
          <table:table-cell office:value-type="float" office:value="726643" calcext:value-type="float">
            <text:p>726643</text:p>
          </table:table-cell>
          <table:table-cell office:value-type="float" office:value="213798" calcext:value-type="float">
            <text:p>213798</text:p>
          </table:table-cell>
          <table:table-cell office:value-type="float" office:value="1760" calcext:value-type="float">
            <text:p>1760</text:p>
          </table:table-cell>
          <table:table-cell office:value-type="float" office:value="273" calcext:value-type="float">
            <text:p>27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53</text:p>
          </table:table-cell>
          <table:table-cell table:number-columns-repeated="2"/>
          <table:table-cell office:value-type="float" office:value="726839" calcext:value-type="float">
            <text:p>726839</text:p>
          </table:table-cell>
          <table:table-cell office:value-type="float" office:value="210948" calcext:value-type="float">
            <text:p>210948</text:p>
          </table:table-cell>
          <table:table-cell office:value-type="float" office:value="1788" calcext:value-type="float">
            <text:p>1788</text:p>
          </table:table-cell>
          <table:table-cell office:value-type="float" office:value="234" calcext:value-type="float">
            <text:p>23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3:22</text:p>
          </table:table-cell>
          <table:table-cell table:number-columns-repeated="2"/>
          <table:table-cell office:value-type="float" office:value="732858" calcext:value-type="float">
            <text:p>732858</text:p>
          </table:table-cell>
          <table:table-cell office:value-type="float" office:value="213777" calcext:value-type="float">
            <text:p>213777</text:p>
          </table:table-cell>
          <table:table-cell office:value-type="float" office:value="1972" calcext:value-type="float">
            <text:p>1972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03</text:p>
          </table:table-cell>
          <table:table-cell table:number-columns-repeated="2"/>
          <table:table-cell office:value-type="float" office:value="705786" calcext:value-type="float">
            <text:p>705786</text:p>
          </table:table-cell>
          <table:table-cell office:value-type="float" office:value="200090" calcext:value-type="float">
            <text:p>200090</text:p>
          </table:table-cell>
          <table:table-cell office:value-type="float" office:value="1509" calcext:value-type="float">
            <text:p>1509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32</text:p>
          </table:table-cell>
          <table:table-cell table:number-columns-repeated="2"/>
          <table:table-cell office:value-type="float" office:value="700985" calcext:value-type="float">
            <text:p>700985</text:p>
          </table:table-cell>
          <table:table-cell office:value-type="float" office:value="202531" calcext:value-type="float">
            <text:p>202531</text:p>
          </table:table-cell>
          <table:table-cell office:value-type="float" office:value="1512" calcext:value-type="float">
            <text:p>1512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01</text:p>
          </table:table-cell>
          <table:table-cell table:number-columns-repeated="2"/>
          <table:table-cell office:value-type="float" office:value="726528" calcext:value-type="float">
            <text:p>726528</text:p>
          </table:table-cell>
          <table:table-cell office:value-type="float" office:value="212418" calcext:value-type="float">
            <text:p>212418</text:p>
          </table:table-cell>
          <table:table-cell office:value-type="float" office:value="1729" calcext:value-type="float">
            <text:p>1729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30</text:p>
          </table:table-cell>
          <table:table-cell table:number-columns-repeated="2"/>
          <table:table-cell office:value-type="float" office:value="735848" calcext:value-type="float">
            <text:p>735848</text:p>
          </table:table-cell>
          <table:table-cell office:value-type="float" office:value="215092" calcext:value-type="float">
            <text:p>215092</text:p>
          </table:table-cell>
          <table:table-cell office:value-type="float" office:value="1740" calcext:value-type="float">
            <text:p>174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59</text:p>
          </table:table-cell>
          <table:table-cell table:number-columns-repeated="2"/>
          <table:table-cell office:value-type="float" office:value="731747" calcext:value-type="float">
            <text:p>731747</text:p>
          </table:table-cell>
          <table:table-cell office:value-type="float" office:value="213716" calcext:value-type="float">
            <text:p>213716</text:p>
          </table:table-cell>
          <table:table-cell office:value-type="float" office:value="1847" calcext:value-type="float">
            <text:p>1847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09</text:p>
          </table:table-cell>
          <table:table-cell table:number-columns-repeated="2"/>
          <table:table-cell office:value-type="float" office:value="836817" calcext:value-type="float">
            <text:p>836817</text:p>
          </table:table-cell>
          <table:table-cell office:value-type="float" office:value="248954" calcext:value-type="float">
            <text:p>248954</text:p>
          </table:table-cell>
          <table:table-cell office:value-type="float" office:value="1681" calcext:value-type="float">
            <text:p>1681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37</text:p>
          </table:table-cell>
          <table:table-cell table:number-columns-repeated="2"/>
          <table:table-cell office:value-type="float" office:value="827707" calcext:value-type="float">
            <text:p>827707</text:p>
          </table:table-cell>
          <table:table-cell office:value-type="float" office:value="245687" calcext:value-type="float">
            <text:p>245687</text:p>
          </table:table-cell>
          <table:table-cell office:value-type="float" office:value="1639" calcext:value-type="float">
            <text:p>1639</text:p>
          </table:table-cell>
          <table:table-cell office:value-type="float" office:value="344" calcext:value-type="float">
            <text:p>344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05</text:p>
          </table:table-cell>
          <table:table-cell table:number-columns-repeated="2"/>
          <table:table-cell office:value-type="float" office:value="822322" calcext:value-type="float">
            <text:p>822322</text:p>
          </table:table-cell>
          <table:table-cell office:value-type="float" office:value="242847" calcext:value-type="float">
            <text:p>242847</text:p>
          </table:table-cell>
          <table:table-cell office:value-type="float" office:value="1884" calcext:value-type="float">
            <text:p>1884</text:p>
          </table:table-cell>
          <table:table-cell office:value-type="float" office:value="346" calcext:value-type="float">
            <text:p>346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35</text:p>
          </table:table-cell>
          <table:table-cell table:number-columns-repeated="2"/>
          <table:table-cell office:value-type="float" office:value="853847" calcext:value-type="float">
            <text:p>853847</text:p>
          </table:table-cell>
          <table:table-cell office:value-type="float" office:value="254873" calcext:value-type="float">
            <text:p>254873</text:p>
          </table:table-cell>
          <table:table-cell office:value-type="float" office:value="1500" calcext:value-type="float">
            <text:p>1500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6:04</text:p>
          </table:table-cell>
          <table:table-cell table:number-columns-repeated="2"/>
          <table:table-cell office:value-type="float" office:value="848079" calcext:value-type="float">
            <text:p>848079</text:p>
          </table:table-cell>
          <table:table-cell office:value-type="float" office:value="250478" calcext:value-type="float">
            <text:p>250478</text:p>
          </table:table-cell>
          <table:table-cell office:value-type="float" office:value="1643" calcext:value-type="float">
            <text:p>1643</text:p>
          </table:table-cell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3:51</text:p>
          </table:table-cell>
          <table:table-cell table:number-columns-repeated="2"/>
          <table:table-cell office:value-type="float" office:value="954372" calcext:value-type="float">
            <text:p>954372</text:p>
          </table:table-cell>
          <table:table-cell office:value-type="float" office:value="286482" calcext:value-type="float">
            <text:p>286482</text:p>
          </table:table-cell>
          <table:table-cell office:value-type="float" office:value="2024" calcext:value-type="float">
            <text:p>2024</text:p>
          </table:table-cell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21</text:p>
          </table:table-cell>
          <table:table-cell table:number-columns-repeated="2"/>
          <table:table-cell office:value-type="float" office:value="944582" calcext:value-type="float">
            <text:p>944582</text:p>
          </table:table-cell>
          <table:table-cell office:value-type="float" office:value="283347" calcext:value-type="float">
            <text:p>283347</text:p>
          </table:table-cell>
          <table:table-cell office:value-type="float" office:value="1919" calcext:value-type="float">
            <text:p>191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50</text:p>
          </table:table-cell>
          <table:table-cell table:number-columns-repeated="2"/>
          <table:table-cell office:value-type="float" office:value="968293" calcext:value-type="float">
            <text:p>968293</text:p>
          </table:table-cell>
          <table:table-cell office:value-type="float" office:value="292998" calcext:value-type="float">
            <text:p>292998</text:p>
          </table:table-cell>
          <table:table-cell office:value-type="float" office:value="2073" calcext:value-type="float">
            <text:p>2073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19</text:p>
          </table:table-cell>
          <table:table-cell table:number-columns-repeated="2"/>
          <table:table-cell office:value-type="float" office:value="955723" calcext:value-type="float">
            <text:p>955723</text:p>
          </table:table-cell>
          <table:table-cell office:value-type="float" office:value="287275" calcext:value-type="float">
            <text:p>287275</text:p>
          </table:table-cell>
          <table:table-cell office:value-type="float" office:value="1925" calcext:value-type="float">
            <text:p>1925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48</text:p>
          </table:table-cell>
          <table:table-cell table:number-columns-repeated="2"/>
          <table:table-cell office:value-type="float" office:value="964172" calcext:value-type="float">
            <text:p>964172</text:p>
          </table:table-cell>
          <table:table-cell office:value-type="float" office:value="292546" calcext:value-type="float">
            <text:p>292546</text:p>
          </table:table-cell>
          <table:table-cell office:value-type="float" office:value="1920" calcext:value-type="float">
            <text:p>1920</text:p>
          </table:table-cell>
          <table:table-cell office:value-type="float" office:value="320" calcext:value-type="float">
            <text:p>32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23</text:p>
          </table:table-cell>
          <table:table-cell table:number-columns-repeated="2"/>
          <table:table-cell office:value-type="float" office:value="920144" calcext:value-type="float">
            <text:p>920144</text:p>
          </table:table-cell>
          <table:table-cell office:value-type="float" office:value="272065" calcext:value-type="float">
            <text:p>272065</text:p>
          </table:table-cell>
          <table:table-cell office:value-type="float" office:value="1990" calcext:value-type="float">
            <text:p>1990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53</text:p>
          </table:table-cell>
          <table:table-cell table:number-columns-repeated="2"/>
          <table:table-cell office:value-type="float" office:value="949327" calcext:value-type="float">
            <text:p>949327</text:p>
          </table:table-cell>
          <table:table-cell office:value-type="float" office:value="286976" calcext:value-type="float">
            <text:p>286976</text:p>
          </table:table-cell>
          <table:table-cell office:value-type="float" office:value="2084" calcext:value-type="float">
            <text:p>2084</text:p>
          </table:table-cell>
          <table:table-cell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22</text:p>
          </table:table-cell>
          <table:table-cell table:number-columns-repeated="2"/>
          <table:table-cell office:value-type="float" office:value="956910" calcext:value-type="float">
            <text:p>956910</text:p>
          </table:table-cell>
          <table:table-cell office:value-type="float" office:value="285842" calcext:value-type="float">
            <text:p>285842</text:p>
          </table:table-cell>
          <table:table-cell office:value-type="float" office:value="2240" calcext:value-type="float">
            <text:p>2240</text:p>
          </table:table-cell>
          <table:table-cell office:value-type="float" office:value="375" calcext:value-type="float">
            <text:p>37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50</text:p>
          </table:table-cell>
          <table:table-cell table:number-columns-repeated="2"/>
          <table:table-cell office:value-type="float" office:value="951584" calcext:value-type="float">
            <text:p>951584</text:p>
          </table:table-cell>
          <table:table-cell office:value-type="float" office:value="283014" calcext:value-type="float">
            <text:p>283014</text:p>
          </table:table-cell>
          <table:table-cell office:value-type="float" office:value="1976" calcext:value-type="float">
            <text:p>1976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0:20</text:p>
          </table:table-cell>
          <table:table-cell table:number-columns-repeated="2"/>
          <table:table-cell office:value-type="float" office:value="971636" calcext:value-type="float">
            <text:p>971636</text:p>
          </table:table-cell>
          <table:table-cell office:value-type="float" office:value="294442" calcext:value-type="float">
            <text:p>294442</text:p>
          </table:table-cell>
          <table:table-cell office:value-type="float" office:value="2172" calcext:value-type="float">
            <text:p>2172</text:p>
          </table:table-cell>
          <table:table-cell office:value-type="float" office:value="359" calcext:value-type="float">
            <text:p>35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6:57</text:p>
          </table:table-cell>
          <table:table-cell table:number-columns-repeated="2"/>
          <table:table-cell office:value-type="float" office:value="1084905" calcext:value-type="float">
            <text:p>1084905</text:p>
          </table:table-cell>
          <table:table-cell office:value-type="float" office:value="330799" calcext:value-type="float">
            <text:p>330799</text:p>
          </table:table-cell>
          <table:table-cell office:value-type="float" office:value="2384" calcext:value-type="float">
            <text:p>2384</text:p>
          </table:table-cell>
          <table:table-cell office:value-type="float" office:value="445" calcext:value-type="float">
            <text:p>445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26</text:p>
          </table:table-cell>
          <table:table-cell table:number-columns-repeated="2"/>
          <table:table-cell office:value-type="float" office:value="1073791" calcext:value-type="float">
            <text:p>1073791</text:p>
          </table:table-cell>
          <table:table-cell office:value-type="float" office:value="329314" calcext:value-type="float">
            <text:p>329314</text:p>
          </table:table-cell>
          <table:table-cell office:value-type="float" office:value="2581" calcext:value-type="float">
            <text:p>2581</text:p>
          </table:table-cell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55</text:p>
          </table:table-cell>
          <table:table-cell table:number-columns-repeated="2"/>
          <table:table-cell office:value-type="float" office:value="1082662" calcext:value-type="float">
            <text:p>1082662</text:p>
          </table:table-cell>
          <table:table-cell office:value-type="float" office:value="330497" calcext:value-type="float">
            <text:p>330497</text:p>
          </table:table-cell>
          <table:table-cell office:value-type="float" office:value="2349" calcext:value-type="float">
            <text:p>2349</text:p>
          </table:table-cell>
          <table:table-cell office:value-type="float" office:value="335" calcext:value-type="float">
            <text:p>3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24</text:p>
          </table:table-cell>
          <table:table-cell table:number-columns-repeated="2"/>
          <table:table-cell office:value-type="float" office:value="1095580" calcext:value-type="float">
            <text:p>1095580</text:p>
          </table:table-cell>
          <table:table-cell office:value-type="float" office:value="340622" calcext:value-type="float">
            <text:p>340622</text:p>
          </table:table-cell>
          <table:table-cell office:value-type="float" office:value="2361" calcext:value-type="float">
            <text:p>2361</text:p>
          </table:table-cell>
          <table:table-cell office:value-type="float" office:value="361" calcext:value-type="float">
            <text:p>361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53</text:p>
          </table:table-cell>
          <table:table-cell table:number-columns-repeated="2"/>
          <table:table-cell office:value-type="float" office:value="1092684" calcext:value-type="float">
            <text:p>1092684</text:p>
          </table:table-cell>
          <table:table-cell office:value-type="float" office:value="339781" calcext:value-type="float">
            <text:p>339781</text:p>
          </table:table-cell>
          <table:table-cell office:value-type="float" office:value="2342" calcext:value-type="float">
            <text:p>2342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00</text:p>
          </table:table-cell>
          <table:table-cell table:number-columns-repeated="2"/>
          <table:table-cell office:value-type="float" office:value="1205750" calcext:value-type="float">
            <text:p>1205750</text:p>
          </table:table-cell>
          <table:table-cell office:value-type="float" office:value="375301" calcext:value-type="float">
            <text:p>375301</text:p>
          </table:table-cell>
          <table:table-cell office:value-type="float" office:value="2550" calcext:value-type="float">
            <text:p>2550</text:p>
          </table:table-cell>
          <table:table-cell office:value-type="float" office:value="368" calcext:value-type="float">
            <text:p>36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29</text:p>
          </table:table-cell>
          <table:table-cell table:number-columns-repeated="2"/>
          <table:table-cell office:value-type="float" office:value="1188471" calcext:value-type="float">
            <text:p>1188471</text:p>
          </table:table-cell>
          <table:table-cell office:value-type="float" office:value="371401" calcext:value-type="float">
            <text:p>371401</text:p>
          </table:table-cell>
          <table:table-cell office:value-type="float" office:value="2739" calcext:value-type="float">
            <text:p>2739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58</text:p>
          </table:table-cell>
          <table:table-cell table:number-columns-repeated="2"/>
          <table:table-cell office:value-type="float" office:value="1219844" calcext:value-type="float">
            <text:p>1219844</text:p>
          </table:table-cell>
          <table:table-cell office:value-type="float" office:value="386532" calcext:value-type="float">
            <text:p>386532</text:p>
          </table:table-cell>
          <table:table-cell office:value-type="float" office:value="2536" calcext:value-type="float">
            <text:p>2536</text:p>
          </table:table-cell>
          <table:table-cell office:value-type="float" office:value="420" calcext:value-type="float">
            <text:p>42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9:37</text:p>
          </table:table-cell>
          <table:table-cell table:number-columns-repeated="2"/>
          <table:table-cell office:value-type="float" office:value="1175662" calcext:value-type="float">
            <text:p>1175662</text:p>
          </table:table-cell>
          <table:table-cell office:value-type="float" office:value="374343" calcext:value-type="float">
            <text:p>374343</text:p>
          </table:table-cell>
          <table:table-cell office:value-type="float" office:value="2594" calcext:value-type="float">
            <text:p>2594</text:p>
          </table:table-cell>
          <table:table-cell office:value-type="float" office:value="625" calcext:value-type="float">
            <text:p>62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40:06</text:p>
          </table:table-cell>
          <table:table-cell table:number-columns-repeated="2"/>
          <table:table-cell office:value-type="float" office:value="1207639" calcext:value-type="float">
            <text:p>1207639</text:p>
          </table:table-cell>
          <table:table-cell office:value-type="float" office:value="380490" calcext:value-type="float">
            <text:p>380490</text:p>
          </table:table-cell>
          <table:table-cell office:value-type="float" office:value="2439" calcext:value-type="float">
            <text:p>2439</text:p>
          </table:table-cell>
          <table:table-cell office:value-type="float" office:value="348" calcext:value-type="float">
            <text:p>348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02</text:p>
          </table:table-cell>
          <table:table-cell table:number-columns-repeated="2"/>
          <table:table-cell office:value-type="float" office:value="1404845" calcext:value-type="float">
            <text:p>1404845</text:p>
          </table:table-cell>
          <table:table-cell office:value-type="float" office:value="461283" calcext:value-type="float">
            <text:p>461283</text:p>
          </table:table-cell>
          <table:table-cell office:value-type="float" office:value="2899" calcext:value-type="float">
            <text:p>2899</text:p>
          </table:table-cell>
          <table:table-cell office:value-type="float" office:value="557" calcext:value-type="float">
            <text:p>557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31</text:p>
          </table:table-cell>
          <table:table-cell table:number-columns-repeated="2"/>
          <table:table-cell office:value-type="float" office:value="1399177" calcext:value-type="float">
            <text:p>1399177</text:p>
          </table:table-cell>
          <table:table-cell office:value-type="float" office:value="460144" calcext:value-type="float">
            <text:p>460144</text:p>
          </table:table-cell>
          <table:table-cell office:value-type="float" office:value="3165" calcext:value-type="float">
            <text:p>3165</text:p>
          </table:table-cell>
          <table:table-cell office:value-type="float" office:value="477" calcext:value-type="float">
            <text:p>477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00</text:p>
          </table:table-cell>
          <table:table-cell table:number-columns-repeated="2"/>
          <table:table-cell office:value-type="float" office:value="1434430" calcext:value-type="float">
            <text:p>1434430</text:p>
          </table:table-cell>
          <table:table-cell office:value-type="float" office:value="463199" calcext:value-type="float">
            <text:p>463199</text:p>
          </table:table-cell>
          <table:table-cell office:value-type="float" office:value="3003" calcext:value-type="float">
            <text:p>3003</text:p>
          </table:table-cell>
          <table:table-cell office:value-type="float" office:value="466" calcext:value-type="float">
            <text:p>46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29</text:p>
          </table:table-cell>
          <table:table-cell table:number-columns-repeated="2"/>
          <table:table-cell office:value-type="float" office:value="1417323" calcext:value-type="float">
            <text:p>1417323</text:p>
          </table:table-cell>
          <table:table-cell office:value-type="float" office:value="471999" calcext:value-type="float">
            <text:p>471999</text:p>
          </table:table-cell>
          <table:table-cell office:value-type="float" office:value="3077" calcext:value-type="float">
            <text:p>3077</text:p>
          </table:table-cell>
          <table:table-cell office:value-type="float" office:value="522" calcext:value-type="float">
            <text:p>522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58</text:p>
          </table:table-cell>
          <table:table-cell table:number-columns-repeated="2"/>
          <table:table-cell office:value-type="float" office:value="1428968" calcext:value-type="float">
            <text:p>1428968</text:p>
          </table:table-cell>
          <table:table-cell office:value-type="float" office:value="472451" calcext:value-type="float">
            <text:p>472451</text:p>
          </table:table-cell>
          <table:table-cell office:value-type="float" office:value="3377" calcext:value-type="float">
            <text:p>3377</text:p>
          </table:table-cell>
          <table:table-cell office:value-type="float" office:value="646" calcext:value-type="float">
            <text:p>64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8:43</text:p>
          </table:table-cell>
          <table:table-cell table:number-columns-repeated="2"/>
          <table:table-cell office:value-type="float" office:value="1502457" calcext:value-type="float">
            <text:p>1502457</text:p>
          </table:table-cell>
          <table:table-cell office:value-type="float" office:value="497763" calcext:value-type="float">
            <text:p>497763</text:p>
          </table:table-cell>
          <table:table-cell office:value-type="float" office:value="3172" calcext:value-type="float">
            <text:p>3172</text:p>
          </table:table-cell>
          <table:table-cell office:value-type="float" office:value="373" calcext:value-type="float">
            <text:p>3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13</text:p>
          </table:table-cell>
          <table:table-cell table:number-columns-repeated="2"/>
          <table:table-cell office:value-type="float" office:value="1504837" calcext:value-type="float">
            <text:p>1504837</text:p>
          </table:table-cell>
          <table:table-cell office:value-type="float" office:value="498834" calcext:value-type="float">
            <text:p>498834</text:p>
          </table:table-cell>
          <table:table-cell office:value-type="float" office:value="3622" calcext:value-type="float">
            <text:p>3622</text:p>
          </table:table-cell>
          <table:table-cell office:value-type="float" office:value="606" calcext:value-type="float">
            <text:p>60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41</text:p>
          </table:table-cell>
          <table:table-cell table:number-columns-repeated="2"/>
          <table:table-cell office:value-type="float" office:value="1524086" calcext:value-type="float">
            <text:p>1524086</text:p>
          </table:table-cell>
          <table:table-cell office:value-type="float" office:value="505254" calcext:value-type="float">
            <text:p>505254</text:p>
          </table:table-cell>
          <table:table-cell office:value-type="float" office:value="2913" calcext:value-type="float">
            <text:p>2913</text:p>
          </table:table-cell>
          <table:table-cell office:value-type="float" office:value="427" calcext:value-type="float">
            <text:p>427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11</text:p>
          </table:table-cell>
          <table:table-cell table:number-columns-repeated="2"/>
          <table:table-cell office:value-type="float" office:value="1554010" calcext:value-type="float">
            <text:p>1554010</text:p>
          </table:table-cell>
          <table:table-cell office:value-type="float" office:value="519404" calcext:value-type="float">
            <text:p>519404</text:p>
          </table:table-cell>
          <table:table-cell office:value-type="float" office:value="3422" calcext:value-type="float">
            <text:p>3422</text:p>
          </table:table-cell>
          <table:table-cell office:value-type="float" office:value="480" calcext:value-type="float">
            <text:p>48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40</text:p>
          </table:table-cell>
          <table:table-cell table:number-columns-repeated="2"/>
          <table:table-cell office:value-type="float" office:value="1549983" calcext:value-type="float">
            <text:p>1549983</text:p>
          </table:table-cell>
          <table:table-cell office:value-type="float" office:value="519969" calcext:value-type="float">
            <text:p>519969</text:p>
          </table:table-cell>
          <table:table-cell office:value-type="float" office:value="3324" calcext:value-type="float">
            <text:p>3324</text:p>
          </table:table-cell>
          <table:table-cell office:value-type="float" office:value="495" calcext:value-type="float">
            <text:p>495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1:58</text:p>
          </table:table-cell>
          <table:table-cell table:number-columns-repeated="2"/>
          <table:table-cell office:value-type="float" office:value="1512338" calcext:value-type="float">
            <text:p>1512338</text:p>
          </table:table-cell>
          <table:table-cell office:value-type="float" office:value="499374" calcext:value-type="float">
            <text:p>499374</text:p>
          </table:table-cell>
          <table:table-cell office:value-type="float" office:value="3439" calcext:value-type="float">
            <text:p>3439</text:p>
          </table:table-cell>
          <table:table-cell office:value-type="float" office:value="618" calcext:value-type="float">
            <text:p>618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27</text:p>
          </table:table-cell>
          <table:table-cell table:number-columns-repeated="2"/>
          <table:table-cell office:value-type="float" office:value="1494015" calcext:value-type="float">
            <text:p>1494015</text:p>
          </table:table-cell>
          <table:table-cell office:value-type="float" office:value="500999" calcext:value-type="float">
            <text:p>500999</text:p>
          </table:table-cell>
          <table:table-cell office:value-type="float" office:value="3715" calcext:value-type="float">
            <text:p>3715</text:p>
          </table:table-cell>
          <table:table-cell office:value-type="float" office:value="635" calcext:value-type="float">
            <text:p>635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56</text:p>
          </table:table-cell>
          <table:table-cell table:number-columns-repeated="2"/>
          <table:table-cell office:value-type="float" office:value="1540956" calcext:value-type="float">
            <text:p>1540956</text:p>
          </table:table-cell>
          <table:table-cell office:value-type="float" office:value="513020" calcext:value-type="float">
            <text:p>513020</text:p>
          </table:table-cell>
          <table:table-cell office:value-type="float" office:value="3097" calcext:value-type="float">
            <text:p>3097</text:p>
          </table:table-cell>
          <table:table-cell office:value-type="float" office:value="625" calcext:value-type="float">
            <text:p>625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25</text:p>
          </table:table-cell>
          <table:table-cell table:number-columns-repeated="2"/>
          <table:table-cell office:value-type="float" office:value="1535685" calcext:value-type="float">
            <text:p>1535685</text:p>
          </table:table-cell>
          <table:table-cell office:value-type="float" office:value="514006" calcext:value-type="float">
            <text:p>514006</text:p>
          </table:table-cell>
          <table:table-cell office:value-type="float" office:value="3353" calcext:value-type="float">
            <text:p>3353</text:p>
          </table:table-cell>
          <table:table-cell office:value-type="float" office:value="452" calcext:value-type="float">
            <text:p>452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55</text:p>
          </table:table-cell>
          <table:table-cell table:number-columns-repeated="2"/>
          <table:table-cell office:value-type="float" office:value="1543844" calcext:value-type="float">
            <text:p>1543844</text:p>
          </table:table-cell>
          <table:table-cell office:value-type="float" office:value="512966" calcext:value-type="float">
            <text:p>512966</text:p>
          </table:table-cell>
          <table:table-cell office:value-type="float" office:value="3752" calcext:value-type="float">
            <text:p>3752</text:p>
          </table:table-cell>
          <table:table-cell office:value-type="float" office:value="708" calcext:value-type="float">
            <text:p>708</text:p>
          </table:table-cell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17</text:p>
          </table:table-cell>
          <table:table-cell table:number-columns-repeated="2"/>
          <table:table-cell office:value-type="float" office:value="1665079" calcext:value-type="float">
            <text:p>1665079</text:p>
          </table:table-cell>
          <table:table-cell office:value-type="float" office:value="573528" calcext:value-type="float">
            <text:p>573528</text:p>
          </table:table-cell>
          <table:table-cell office:value-type="float" office:value="3836" calcext:value-type="float">
            <text:p>3836</text:p>
          </table:table-cell>
          <table:table-cell office:value-type="float" office:value="656" calcext:value-type="float">
            <text:p>656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47</text:p>
          </table:table-cell>
          <table:table-cell table:number-columns-repeated="2"/>
          <table:table-cell office:value-type="float" office:value="1647703" calcext:value-type="float">
            <text:p>1647703</text:p>
          </table:table-cell>
          <table:table-cell office:value-type="float" office:value="566240" calcext:value-type="float">
            <text:p>566240</text:p>
          </table:table-cell>
          <table:table-cell office:value-type="float" office:value="3879" calcext:value-type="float">
            <text:p>3879</text:p>
          </table:table-cell>
          <table:table-cell office:value-type="float" office:value="713" calcext:value-type="float">
            <text:p>713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16</text:p>
          </table:table-cell>
          <table:table-cell table:number-columns-repeated="2"/>
          <table:table-cell office:value-type="float" office:value="1659088" calcext:value-type="float">
            <text:p>1659088</text:p>
          </table:table-cell>
          <table:table-cell office:value-type="float" office:value="574006" calcext:value-type="float">
            <text:p>574006</text:p>
          </table:table-cell>
          <table:table-cell office:value-type="float" office:value="4161" calcext:value-type="float">
            <text:p>4161</text:p>
          </table:table-cell>
          <table:table-cell office:value-type="float" office:value="731" calcext:value-type="float">
            <text:p>731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45</text:p>
          </table:table-cell>
          <table:table-cell table:number-columns-repeated="2"/>
          <table:table-cell office:value-type="float" office:value="1647890" calcext:value-type="float">
            <text:p>1647890</text:p>
          </table:table-cell>
          <table:table-cell office:value-type="float" office:value="565466" calcext:value-type="float">
            <text:p>565466</text:p>
          </table:table-cell>
          <table:table-cell office:value-type="float" office:value="4081" calcext:value-type="float">
            <text:p>4081</text:p>
          </table:table-cell>
          <table:table-cell office:value-type="float" office:value="726" calcext:value-type="float">
            <text:p>726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9:14</text:p>
          </table:table-cell>
          <table:table-cell table:number-columns-repeated="2"/>
          <table:table-cell office:value-type="float" office:value="1649454" calcext:value-type="float">
            <text:p>1649454</text:p>
          </table:table-cell>
          <table:table-cell office:value-type="float" office:value="561587" calcext:value-type="float">
            <text:p>561587</text:p>
          </table:table-cell>
          <table:table-cell office:value-type="float" office:value="4412" calcext:value-type="float">
            <text:p>4412</text:p>
          </table:table-cell>
          <table:table-cell office:value-type="float" office:value="753" calcext:value-type="float">
            <text:p>753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11</text:p>
          </table:table-cell>
          <table:table-cell table:number-columns-repeated="2"/>
          <table:table-cell office:value-type="float" office:value="1793367" calcext:value-type="float">
            <text:p>1793367</text:p>
          </table:table-cell>
          <table:table-cell office:value-type="float" office:value="647667" calcext:value-type="float">
            <text:p>647667</text:p>
          </table:table-cell>
          <table:table-cell office:value-type="float" office:value="4335" calcext:value-type="float">
            <text:p>4335</text:p>
          </table:table-cell>
          <table:table-cell office:value-type="float" office:value="671" calcext:value-type="float">
            <text:p>671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40</text:p>
          </table:table-cell>
          <table:table-cell table:number-columns-repeated="2"/>
          <table:table-cell office:value-type="float" office:value="1751541" calcext:value-type="float">
            <text:p>1751541</text:p>
          </table:table-cell>
          <table:table-cell office:value-type="float" office:value="624763" calcext:value-type="float">
            <text:p>624763</text:p>
          </table:table-cell>
          <table:table-cell office:value-type="float" office:value="4085" calcext:value-type="float">
            <text:p>4085</text:p>
          </table:table-cell>
          <table:table-cell office:value-type="float" office:value="559" calcext:value-type="float">
            <text:p>559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09</text:p>
          </table:table-cell>
          <table:table-cell table:number-columns-repeated="2"/>
          <table:table-cell office:value-type="float" office:value="1770996" calcext:value-type="float">
            <text:p>1770996</text:p>
          </table:table-cell>
          <table:table-cell office:value-type="float" office:value="635233" calcext:value-type="float">
            <text:p>635233</text:p>
          </table:table-cell>
          <table:table-cell office:value-type="float" office:value="4848" calcext:value-type="float">
            <text:p>4848</text:p>
          </table:table-cell>
          <table:table-cell office:value-type="float" office:value="690" calcext:value-type="float">
            <text:p>69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38</text:p>
          </table:table-cell>
          <table:table-cell table:number-columns-repeated="2"/>
          <table:table-cell office:value-type="float" office:value="1775754" calcext:value-type="float">
            <text:p>1775754</text:p>
          </table:table-cell>
          <table:table-cell office:value-type="float" office:value="634683" calcext:value-type="float">
            <text:p>634683</text:p>
          </table:table-cell>
          <table:table-cell office:value-type="float" office:value="4592" calcext:value-type="float">
            <text:p>4592</text:p>
          </table:table-cell>
          <table:table-cell office:value-type="float" office:value="629" calcext:value-type="float">
            <text:p>629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8:07</text:p>
          </table:table-cell>
          <table:table-cell table:number-columns-repeated="2"/>
          <table:table-cell office:value-type="float" office:value="1762332" calcext:value-type="float">
            <text:p>1762332</text:p>
          </table:table-cell>
          <table:table-cell office:value-type="float" office:value="626837" calcext:value-type="float">
            <text:p>626837</text:p>
          </table:table-cell>
          <table:table-cell office:value-type="float" office:value="4313" calcext:value-type="float">
            <text:p>4313</text:p>
          </table:table-cell>
          <table:table-cell office:value-type="float" office:value="571" calcext:value-type="float">
            <text:p>57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5:41</text:p>
          </table:table-cell>
          <table:table-cell table:number-columns-repeated="2"/>
          <table:table-cell office:value-type="float" office:value="1847092" calcext:value-type="float">
            <text:p>1847092</text:p>
          </table:table-cell>
          <table:table-cell office:value-type="float" office:value="679597" calcext:value-type="float">
            <text:p>679597</text:p>
          </table:table-cell>
          <table:table-cell office:value-type="float" office:value="4641" calcext:value-type="float">
            <text:p>4641</text:p>
          </table:table-cell>
          <table:table-cell office:value-type="float" office:value="666" calcext:value-type="float">
            <text:p>666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10</text:p>
          </table:table-cell>
          <table:table-cell table:number-columns-repeated="2"/>
          <table:table-cell office:value-type="float" office:value="1833359" calcext:value-type="float">
            <text:p>1833359</text:p>
          </table:table-cell>
          <table:table-cell office:value-type="float" office:value="669740" calcext:value-type="float">
            <text:p>669740</text:p>
          </table:table-cell>
          <table:table-cell office:value-type="float" office:value="4987" calcext:value-type="float">
            <text:p>4987</text:p>
          </table:table-cell>
          <table:table-cell office:value-type="float" office:value="788" calcext:value-type="float">
            <text:p>788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39</text:p>
          </table:table-cell>
          <table:table-cell table:number-columns-repeated="2"/>
          <table:table-cell office:value-type="float" office:value="1903999" calcext:value-type="float">
            <text:p>1903999</text:p>
          </table:table-cell>
          <table:table-cell office:value-type="float" office:value="692807" calcext:value-type="float">
            <text:p>692807</text:p>
          </table:table-cell>
          <table:table-cell office:value-type="float" office:value="5075" calcext:value-type="float">
            <text:p>5075</text:p>
          </table:table-cell>
          <table:table-cell office:value-type="float" office:value="732" calcext:value-type="float">
            <text:p>732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08</text:p>
          </table:table-cell>
          <table:table-cell table:number-columns-repeated="2"/>
          <table:table-cell office:value-type="float" office:value="1839722" calcext:value-type="float">
            <text:p>1839722</text:p>
          </table:table-cell>
          <table:table-cell office:value-type="float" office:value="666583" calcext:value-type="float">
            <text:p>666583</text:p>
          </table:table-cell>
          <table:table-cell office:value-type="float" office:value="4397" calcext:value-type="float">
            <text:p>4397</text:p>
          </table:table-cell>
          <table:table-cell office:value-type="float" office:value="591" calcext:value-type="float">
            <text:p>59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37</text:p>
          </table:table-cell>
          <table:table-cell table:number-columns-repeated="2"/>
          <table:table-cell office:value-type="float" office:value="1879761" calcext:value-type="float">
            <text:p>1879761</text:p>
          </table:table-cell>
          <table:table-cell office:value-type="float" office:value="683050" calcext:value-type="float">
            <text:p>683050</text:p>
          </table:table-cell>
          <table:table-cell office:value-type="float" office:value="4784" calcext:value-type="float">
            <text:p>4784</text:p>
          </table:table-cell>
          <table:table-cell office:value-type="float" office:value="924" calcext:value-type="float">
            <text:p>924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8:56</text:p>
          </table:table-cell>
          <table:table-cell table:number-columns-repeated="2"/>
          <table:table-cell office:value-type="float" office:value="1826056" calcext:value-type="float">
            <text:p>1826056</text:p>
          </table:table-cell>
          <table:table-cell office:value-type="float" office:value="650384" calcext:value-type="float">
            <text:p>650384</text:p>
          </table:table-cell>
          <table:table-cell office:value-type="float" office:value="5012" calcext:value-type="float">
            <text:p>5012</text:p>
          </table:table-cell>
          <table:table-cell office:value-type="float" office:value="868" calcext:value-type="float">
            <text:p>86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25</text:p>
          </table:table-cell>
          <table:table-cell table:number-columns-repeated="2"/>
          <table:table-cell office:value-type="float" office:value="1813477" calcext:value-type="float">
            <text:p>1813477</text:p>
          </table:table-cell>
          <table:table-cell office:value-type="float" office:value="655888" calcext:value-type="float">
            <text:p>655888</text:p>
          </table:table-cell>
          <table:table-cell office:value-type="float" office:value="5028" calcext:value-type="float">
            <text:p>5028</text:p>
          </table:table-cell>
          <table:table-cell office:value-type="float" office:value="722" calcext:value-type="float">
            <text:p>722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54</text:p>
          </table:table-cell>
          <table:table-cell table:number-columns-repeated="2"/>
          <table:table-cell office:value-type="float" office:value="1885554" calcext:value-type="float">
            <text:p>1885554</text:p>
          </table:table-cell>
          <table:table-cell office:value-type="float" office:value="675819" calcext:value-type="float">
            <text:p>675819</text:p>
          </table:table-cell>
          <table:table-cell office:value-type="float" office:value="5086" calcext:value-type="float">
            <text:p>5086</text:p>
          </table:table-cell>
          <table:table-cell office:value-type="float" office:value="859" calcext:value-type="float">
            <text:p>859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23</text:p>
          </table:table-cell>
          <table:table-cell table:number-columns-repeated="2"/>
          <table:table-cell office:value-type="float" office:value="1836044" calcext:value-type="float">
            <text:p>1836044</text:p>
          </table:table-cell>
          <table:table-cell office:value-type="float" office:value="663215" calcext:value-type="float">
            <text:p>663215</text:p>
          </table:table-cell>
          <table:table-cell office:value-type="float" office:value="4146" calcext:value-type="float">
            <text:p>4146</text:p>
          </table:table-cell>
          <table:table-cell office:value-type="float" office:value="606" calcext:value-type="float">
            <text:p>60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52</text:p>
          </table:table-cell>
          <table:table-cell table:number-columns-repeated="2"/>
          <table:table-cell office:value-type="float" office:value="1841236" calcext:value-type="float">
            <text:p>1841236</text:p>
          </table:table-cell>
          <table:table-cell office:value-type="float" office:value="669435" calcext:value-type="float">
            <text:p>669435</text:p>
          </table:table-cell>
          <table:table-cell office:value-type="float" office:value="4618" calcext:value-type="float">
            <text:p>4618</text:p>
          </table:table-cell>
          <table:table-cell office:value-type="float" office:value="817" calcext:value-type="float">
            <text:p>817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nnex B Coincidence Limit'.R1:'Annex B Coincidence Limit'.R1"/>
        <table:database-range table:name="__Anonymous_Sheet_DB__1" table:target-range-address="'Annex B Coincidence Limit_2'.R2:'Annex B Coincidence Limit_2'.R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6:03:14.0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56:43.396000000</meta:creation-date>
    <dc:date>2025-06-06T17:49:58.817000000</dc:date>
    <meta:editing-duration>P1DT22H24M1S</meta:editing-duration>
    <meta:editing-cycles>23</meta:editing-cycles>
    <meta:generator>LibreOffice/7.6.4.1$Windows_X86_64 LibreOffice_project/e19e193f88cd6c0525a17fb7a176ed8e6a3e2aa1</meta:generator>
    <meta:document-statistic meta:table-count="4" meta:cell-count="1974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B Coincidence Limit'.E22:'Annex B Coincidence Limit'.E36 'Annex B Coincidence Limit'.G22:'Annex B Coincidence Limit'.G36 'Annex B Coincidence Limit'.K22:'Annex B Coincidence Limit'.L36 'Annex B Coincidence Limit'.I22:'Annex B Coincidence Limit'.I36" chart:data-source-has-labels="row" svg:x="1.468cm" svg:y="0.304cm" svg:width="22.005cm" svg:height="13.673cm">
          <chart:coordinate-region svg:x="3.095cm" svg:y="0.502cm" svg:width="19.84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'.G22:'Annex B Coincidence Limit'.G36" loext:label-string="&quot;counts&quot;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loext:label-string="&quot;corrected&quot;" chart:class="chart:scatter">
            <chart:data-point chart:repeated="15"/>
          </chart:series>
          <chart:series chart:style-name="ch10" chart:values-cell-range-address="'Annex B Coincidence Limit'.K22:'Annex B Coincidence Limit'.K36" loext:label-string="&quot;95% projected&quot;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loext:label-string="&quot;projected linear fit&quot;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</table:table-cell>
              <table:table-cell office:value-type="string">
                <text:p>corrected</text:p>
              </table:table-cell>
              <table:table-cell office:value-type="string">
                <text:p>Column E</text:p>
              </table:table-cell>
              <table:table-cell office:value-type="string">
                <text:p>95% projected</text:p>
              </table:table-cell>
              <table:table-cell office:value-type="string">
                <text:p>projected linear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3357.6">
                <text:p>3357.6</text:p>
                <draw:g>
                  <svg:desc>'Annex B Coincidence Limit'.G22:'Annex B Coincidence Limit'.G36</svg:desc>
                </draw:g>
              </table:table-cell>
              <table:table-cell office:value-type="float" office:value="3357.6">
                <text:p>3357.6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667065.986498375">
                <text:p>667065.986498375</text:p>
              </table:table-cell>
              <table:table-cell office:value-type="float" office:value="702174.722629868">
                <text:p>702174.722629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480289.2">
                <text:p>1480289.2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248450.30450677">
                <text:p>1248450.30450677</text:p>
              </table:table-cell>
              <table:table-cell office:value-type="float" office:value="1314158.21527029">
                <text:p>1314158.21527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1972736.4">
                <text:p>1972736.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828713.49804751">
                <text:p>1828713.49804751</text:p>
              </table:table-cell>
              <table:table-cell office:value-type="float" office:value="1924961.57689211">
                <text:p>1924961.5768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3208103.83212582">
                <text:p>3208103.83212582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407858.80691213">
                <text:p>2407858.80691213</text:p>
              </table:table-cell>
              <table:table-cell office:value-type="float" office:value="2534588.21780225">
                <text:p>2534588.2178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3758145.49003597">
                <text:p>3758145.49003597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985889.45842121">
                <text:p>2985889.45842121</text:p>
              </table:table-cell>
              <table:table-cell office:value-type="float" office:value="3143041.53518022">
                <text:p>3143041.5351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4106802.78280502">
                <text:p>4106802.78280502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3562808.66748426">
                <text:p>3562808.66748426</text:p>
              </table:table-cell>
              <table:table-cell office:value-type="float" office:value="3750324.91314133">
                <text:p>3750324.91314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4670466.60863869">
                <text:p>4670466.60863869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4138619.63665938">
                <text:p>4138619.63665938</text:p>
              </table:table-cell>
              <table:table-cell office:value-type="float" office:value="4356441.72279935">
                <text:p>4356441.7227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5042536.16744546">
                <text:p>5042536.16744546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4713325.55621245">
                <text:p>4713325.55621245</text:p>
              </table:table-cell>
              <table:table-cell office:value-type="float" office:value="4961395.32232889">
                <text:p>4961395.32232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5252859.79045493">
                <text:p>5252859.79045493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5286929.60417617">
                <text:p>5286929.60417617</text:p>
              </table:table-cell>
              <table:table-cell office:value-type="float" office:value="5565189.05702754">
                <text:p>5565189.05702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5550345.395375">
                <text:p>5550345.39537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424cm" svg:height="33.992cm" xlink:href=".." xlink:type="simple" chart:class="chart:scatter" chart:style-name="ch1">
        <chart:legend chart:legend-position="end" svg:x="47.818cm" svg:y="15.956cm" style:legend-expansion="high" chart:style-name="ch2"/>
        <chart:plot-area chart:style-name="ch3" table:cell-range-address="'Annex B Coincidence Limit'.E22:'Annex B Coincidence Limit'.E36 'Annex B Coincidence Limit'.A1:'Annex B Coincidence Limit'.A1 'Annex B Coincidence Limit'.G22:'Annex B Coincidence Limit'.G36 'Annex B Coincidence Limit'.K22:'Annex B Coincidence Limit'.L36 'Annex B Coincidence Limit'.I22:'Annex B Coincidence Limit'.I36" chart:data-source-has-labels="row" svg:x="2.057cm" svg:y="0.679cm" svg:width="44.693cm" svg:height="31.675cm">
          <chart:coordinate-region svg:x="3.684cm" svg:y="0.877cm" svg:width="42.528cm" svg:height="30.833cm"/>
          <chart:axis chart:dimension="x" chart:name="primary-x" chart:style-name="ch4">
            <chart:title svg:x="21.511cm" svg:y="33.033cm" chart:style-name="ch5">
              <text:p>Percent of Estimated Coincidence Limit</text:p>
            </chart:title>
          </chart:axis>
          <chart:axis chart:dimension="y" chart:name="primary-y" chart:style-name="ch4">
            <chart:title svg:x="0.451cm" svg:y="17.548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'.G22:'Annex B Coincidence Limit'.G36" chart:label-cell-address="'Annex B Coincidence Limit'.A1:'Annex B Coincidence Limit'.A1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chart:label-cell-address="'Annex B Coincidence Limit'.A1:'Annex B Coincidence Limit'.A1" chart:class="chart:scatter">
            <chart:data-point chart:repeated="15"/>
          </chart:series>
          <chart:series chart:style-name="ch10" chart:values-cell-range-address="'Annex B Coincidence Limit'.K22:'Annex B Coincidence Limit'.K36" chart:label-cell-address="'Annex B Coincidence Limit'.A1:'Annex B Coincidence Limit'.A1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chart:label-cell-address="'Annex B Coincidence Limit'.A1:'Annex B Coincidence Limit'.A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3357.6">
                <text:p>3357.6</text:p>
                <draw:g>
                  <svg:desc>'Annex B Coincidence Limit'.G22:'Annex B Coincidence Limit'.G36</svg:desc>
                </draw:g>
              </table:table-cell>
              <table:table-cell office:value-type="float" office:value="3357.6">
                <text:p>3357.6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667065.986498376">
                <text:p>667065.986498376</text:p>
              </table:table-cell>
              <table:table-cell office:value-type="float" office:value="702174.722629869">
                <text:p>702174.722629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480289.2">
                <text:p>1480289.2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248450.30450678">
                <text:p>1248450.30450678</text:p>
              </table:table-cell>
              <table:table-cell office:value-type="float" office:value="1314158.21527029">
                <text:p>1314158.21527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1972736.4">
                <text:p>1972736.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828713.49804751">
                <text:p>1828713.49804751</text:p>
              </table:table-cell>
              <table:table-cell office:value-type="float" office:value="1924961.57689211">
                <text:p>1924961.5768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3208103.83212582">
                <text:p>3208103.83212582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407858.80691213">
                <text:p>2407858.80691213</text:p>
              </table:table-cell>
              <table:table-cell office:value-type="float" office:value="2534588.21780224">
                <text:p>2534588.2178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3758145.49003597">
                <text:p>3758145.49003597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985889.45842121">
                <text:p>2985889.45842121</text:p>
              </table:table-cell>
              <table:table-cell office:value-type="float" office:value="3143041.53518022">
                <text:p>3143041.5351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4106802.78280502">
                <text:p>4106802.78280502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3562808.66748426">
                <text:p>3562808.66748426</text:p>
              </table:table-cell>
              <table:table-cell office:value-type="float" office:value="3750324.91314133">
                <text:p>3750324.91314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4670466.60863869">
                <text:p>4670466.60863869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4138619.63665938">
                <text:p>4138619.63665938</text:p>
              </table:table-cell>
              <table:table-cell office:value-type="float" office:value="4356441.72279934">
                <text:p>4356441.7227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5042536.16744546">
                <text:p>5042536.16744546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4713325.55621246">
                <text:p>4713325.55621246</text:p>
              </table:table-cell>
              <table:table-cell office:value-type="float" office:value="4961395.32232891">
                <text:p>4961395.32232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5252859.79045493">
                <text:p>5252859.79045493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5286929.60417617">
                <text:p>5286929.60417617</text:p>
              </table:table-cell>
              <table:table-cell office:value-type="float" office:value="5565189.05702755">
                <text:p>5565189.0570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5550345.395375">
                <text:p>5550345.39537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6">
                <text:p>5859434.94640846</text:p>
              </table:table-cell>
              <table:table-cell office:value-type="float" office:value="6167826.25937733">
                <text:p>6167826.25937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6">
                <text:p>5859434.94640846</text:p>
              </table:table-cell>
              <table:table-cell office:value-type="float" office:value="6167826.25937733">
                <text:p>6167826.25937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6">
                <text:p>5859434.94640846</text:p>
              </table:table-cell>
              <table:table-cell office:value-type="float" office:value="6167826.25937733">
                <text:p>6167826.25937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6">
                <text:p>5859434.94640846</text:p>
              </table:table-cell>
              <table:table-cell office:value-type="float" office:value="6167826.25937733">
                <text:p>6167826.25937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859434.94640846">
                <text:p>5859434.94640846</text:p>
              </table:table-cell>
              <table:table-cell office:value-type="float" office:value="6167826.25937733">
                <text:p>6167826.25937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B Coincidence Limit'.I22:'Annex B Coincidence Limit'.J36 'Annex B Coincidence Limit'.M22:'Annex B Coincidence Limit'.M36" chart:data-source-has-labels="row" svg:x="1.395cm" svg:y="2.51cm" svg:width="18.548cm" svg:height="11.466cm">
          <chart:coordinate-region svg:x="2.13cm" svg:y="2.51cm" svg:width="17.124cm" svg:height="10.822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B Coincidence Limit'.J22:'Annex B Coincidence Limit'.J36" loext:label-string="&quot;fractional counts&quot;" chart:class="chart:scatter">
            <chart:domain table:cell-range-address="'Annex B Coincidence Limit'.I22:'Annex B Coincidence Limit'.I36"/>
            <chart:data-point chart:repeated="15"/>
          </chart:series>
          <chart:series chart:style-name="ch13" chart:values-cell-range-address="'Annex B Coincidence Limit'.M22:'Annex B Coincidence Limit'.M36" loext:label-string="&quot;corrected counts&quot;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ractional counts</text:p>
              </table:table-cell>
              <table:table-cell office:value-type="string">
                <text:p>corrected cou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  <table:table-cell office:value-type="float" office:value="1">
                <text:p>1</text:p>
                <draw:g>
                  <svg:desc>'Annex B Coincidence Limit'.J22:'Annex B Coincidence Limit'.J36</svg:desc>
                </draw:g>
              </table:table-cell>
              <table:table-cell office:value-type="float" office:value="1">
                <text:p>1</text:p>
                <draw:g>
                  <svg:desc>'Annex B Coincidence Limit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2174.722629868">
                <text:p>702174.722629868</text:p>
              </table:table-cell>
              <table:table-cell office:value-type="float" office:value="1.2300821606979">
                <text:p>1.2300821606979</text:p>
              </table:table-cell>
              <table:table-cell office:value-type="float" office:value="1.2300821606979">
                <text:p>1.2300821606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4158.21527029">
                <text:p>1314158.21527029</text:p>
              </table:table-cell>
              <table:table-cell office:value-type="float" office:value="1.12641627377838">
                <text:p>1.12641627377838</text:p>
              </table:table-cell>
              <table:table-cell office:value-type="float" office:value="1.12641627377838">
                <text:p>1.1264162737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961.57689211">
                <text:p>1924961.57689211</text:p>
              </table:table-cell>
              <table:table-cell office:value-type="float" office:value="1.02481858530653">
                <text:p>1.02481858530653</text:p>
              </table:table-cell>
              <table:table-cell office:value-type="float" office:value="1.02481858530653">
                <text:p>1.02481858530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4588.21780225">
                <text:p>2534588.21780225</text:p>
              </table:table-cell>
              <table:table-cell office:value-type="float" office:value="0.934041113018663">
                <text:p>0.934041113018663</text:p>
              </table:table-cell>
              <table:table-cell office:value-type="float" office:value="1.26572979768192">
                <text:p>1.26572979768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3041.53518022">
                <text:p>3143041.53518022</text:p>
              </table:table-cell>
              <table:table-cell office:value-type="float" office:value="0.852815774146716">
                <text:p>0.852815774146716</text:p>
              </table:table-cell>
              <table:table-cell office:value-type="float" office:value="1.1957034127519">
                <text:p>1.195703412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324.91314133">
                <text:p>3750324.91314133</text:p>
              </table:table-cell>
              <table:table-cell office:value-type="float" office:value="0.765448665511884">
                <text:p>0.765448665511884</text:p>
              </table:table-cell>
              <table:table-cell office:value-type="float" office:value="1.09505252955939">
                <text:p>1.09505252955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6441.72279935">
                <text:p>4356441.72279935</text:p>
              </table:table-cell>
              <table:table-cell office:value-type="float" office:value="0.726849755255144">
                <text:p>0.726849755255144</text:p>
              </table:table-cell>
              <table:table-cell office:value-type="float" office:value="1.07208288456974">
                <text:p>1.07208288456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1395.32232889">
                <text:p>4961395.32232889</text:p>
              </table:table-cell>
              <table:table-cell office:value-type="float" office:value="0.676133906303068">
                <text:p>0.676133906303068</text:p>
              </table:table-cell>
              <table:table-cell office:value-type="float" office:value="1.01635444060492">
                <text:p>1.01635444060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5189.05702754">
                <text:p>5565189.05702754</text:p>
              </table:table-cell>
              <table:table-cell office:value-type="float" office:value="0.62146794377679">
                <text:p>0.62146794377679</text:p>
              </table:table-cell>
              <table:table-cell office:value-type="float" office:value="0.943878049178183">
                <text:p>0.943878049178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.584168530123891">
                <text:p>0.584168530123891</text:p>
              </table:table-cell>
              <table:table-cell office:value-type="float" office:value="0.899886793493324">
                <text:p>0.899886793493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05cm" chart:symbol-height="0.05cm" chart:link-data-style-to-source="true"/>
      <style:graphic-properties svg:stroke-width="0.02cm" svg:stroke-color="#ccf4c6" draw:fill-color="#ccf4c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column-mapping="1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B Coincidence Limit_2'.E23:'Annex B Coincidence Limit_2'.E37 'Annex B Coincidence Limit_2'.G23:'Annex B Coincidence Limit_2'.G37 'Annex B Coincidence Limit_2'.P22:'Annex B Coincidence Limit_2'.P37 'Annex B Coincidence Limit_2'.K23:'Annex B Coincidence Limit_2'.L37 'Annex B Coincidence Limit_2'.I23:'Annex B Coincidence Limit_2'.I37" chart:data-source-has-labels="row" svg:x="1.468cm" svg:y="0.304cm" svg:width="22.005cm" svg:height="13.673cm">
          <chart:coordinate-region svg:x="3.095cm" svg:y="0.502cm" svg:width="19.84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_2'.G23:'Annex B Coincidence Limit_2'.G37" chart:class="chart:scatter">
            <chart:domain table:cell-range-address="'Annex B Coincidence Limit_2'.E23:'Annex B Coincidence Limit_2'.E37"/>
            <chart:data-point chart:repeated="15"/>
          </chart:series>
          <chart:series chart:style-name="ch9" chart:values-cell-range-address="'Annex B Coincidence Limit_2'.P23:'Annex B Coincidence Limit_2'.P37" chart:label-cell-address="'Annex B Coincidence Limit_2'.P22:'Annex B Coincidence Limit_2'.P22" chart:class="chart:scatter">
            <chart:data-point chart:repeated="15"/>
          </chart:series>
          <chart:series chart:style-name="ch10" chart:values-cell-range-address="'Annex B Coincidence Limit_2'.L23:'Annex B Coincidence Limit_2'.L37" chart:class="chart:scatter">
            <chart:data-point chart:repeated="15"/>
          </chart:series>
          <chart:series chart:style-name="ch11" chart:values-cell-range-address="'Annex B Coincidence Limit_2'.K23:'Annex B Coincidence Limit_2'.K37" chart:class="chart:scatter">
            <chart:domain table:cell-range-address="'Annex B Coincidence Limit_2'.E23:'Annex B Coincidence Limit_2'.E36"/>
            <chart:data-point chart:repeated="15"/>
          </chart:series>
          <chart:series chart:style-name="ch12" chart:values-cell-range-address="'Annex B Coincidence Limit_2'.I23:'Annex B Coincidence Limit_2'.I37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rrected 2</text:p>
                <draw:g>
                  <svg:desc>'Annex B Coincidence Limit_2'.P22:'Annex B Coincidence Limit_2'.P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_2'.E23:'Annex B Coincidence Limit_2'.E37</svg:desc>
                </draw:g>
              </table:table-cell>
              <table:table-cell office:value-type="float" office:value="3357.6">
                <text:p>3357.6</text:p>
                <draw:g>
                  <svg:desc>'Annex B Coincidence Limit_2'.G23:'Annex B Coincidence Limit_2'.G37</svg:desc>
                </draw:g>
              </table:table-cell>
              <table:table-cell office:value-type="float" office:value="3357.60275939833">
                <text:p>3357.60275939833</text:p>
                <draw:g>
                  <svg:desc>'Annex B Coincidence Limit_2'.P23:'Annex B Coincidence Limit_2'.P37</svg:desc>
                </draw:g>
              </table:table-cell>
              <table:table-cell office:value-type="float" office:value="3357.6">
                <text:p>3357.6</text:p>
                <draw:g>
                  <svg:desc>'Annex B Coincidence Limit_2'.L23:'Annex B Coincidence Limit_2'.L37</svg:desc>
                </draw:g>
              </table:table-cell>
              <table:table-cell office:value-type="float" office:value="0">
                <text:p>0</text:p>
                <draw:g>
                  <svg:desc>'Annex B Coincidence Limit_2'.E23:'Annex B Coincidence Limit_2'.E36</svg:desc>
                </draw:g>
              </table:table-cell>
              <table:table-cell office:value-type="float" office:value="0.95">
                <text:p>0.95</text:p>
                <draw:g>
                  <svg:desc>'Annex B Coincidence Limit_2'.K23:'Annex B Coincidence Limit_2'.K37</svg:desc>
                </draw:g>
              </table:table-cell>
              <table:table-cell office:value-type="float" office:value="1">
                <text:p>1</text:p>
                <draw:g>
                  <svg:desc>'Annex B Coincidence Limit_2'.I23:'Annex B Coincidence Limit_2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910707.456597391">
                <text:p>910707.456597391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39615.416197731">
                <text:p>839615.416197731</text:p>
              </table:table-cell>
              <table:table-cell office:value-type="float" office:value="883805.701260769">
                <text:p>883805.70126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716754.40237975">
                <text:p>1716754.40237975</text:p>
              </table:table-cell>
              <table:table-cell office:value-type="float" office:value="1716754.40237975">
                <text:p>1716754.40237975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571385.95466851">
                <text:p>1571385.95466851</text:p>
              </table:table-cell>
              <table:table-cell office:value-type="float" office:value="1654090.47859843">
                <text:p>1654090.47859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2532409.84651059">
                <text:p>2532409.84651059</text:p>
              </table:table-cell>
              <table:table-cell office:value-type="float" office:value="2532409.84651059">
                <text:p>2532409.84651059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2301745.36829469">
                <text:p>2301745.36829469</text:p>
              </table:table-cell>
              <table:table-cell office:value-type="float" office:value="2422889.86136284">
                <text:p>2422889.86136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3334679.65155846">
                <text:p>3334679.65155846</text:p>
              </table:table-cell>
              <table:table-cell office:value-type="float" office:value="3334679.65155846">
                <text:p>3334679.65155846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3030697.73490216">
                <text:p>3030697.73490216</text:p>
              </table:table-cell>
              <table:table-cell office:value-type="float" office:value="3190208.14200227">
                <text:p>3190208.14200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4084359.28626703">
                <text:p>4084359.28626703</text:p>
              </table:table-cell>
              <table:table-cell office:value-type="float" office:value="4084359.28626703">
                <text:p>4084359.28626703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3758247.11661991">
                <text:p>3758247.11661991</text:p>
              </table:table-cell>
              <table:table-cell office:value-type="float" office:value="3956049.59644201">
                <text:p>3956049.59644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4595257.54049489">
                <text:p>4595257.54049489</text:p>
              </table:table-cell>
              <table:table-cell office:value-type="float" office:value="4595257.54049489">
                <text:p>4595257.54049489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4484397.55995558">
                <text:p>4484397.55995558</text:p>
              </table:table-cell>
              <table:table-cell office:value-type="float" office:value="4720418.48416377">
                <text:p>4720418.4841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5480978.68018937">
                <text:p>5480978.68018937</text:p>
              </table:table-cell>
              <table:table-cell office:value-type="float" office:value="5480978.68018937">
                <text:p>5480978.68018937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5209153.09587041">
                <text:p>5209153.09587041</text:p>
              </table:table-cell>
              <table:table-cell office:value-type="float" office:value="5483319.04828464">
                <text:p>5483319.0482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6106496.26775909">
                <text:p>6106496.26775909</text:p>
              </table:table-cell>
              <table:table-cell office:value-type="float" office:value="6106496.26775909">
                <text:p>6106496.2677590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5932517.73985386">
                <text:p>5932517.73985386</text:p>
              </table:table-cell>
              <table:table-cell office:value-type="float" office:value="6244755.51563564">
                <text:p>6244755.51563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6474532.11763789">
                <text:p>6474532.11763789</text:p>
              </table:table-cell>
              <table:table-cell office:value-type="float" office:value="6474532.11763789">
                <text:p>6474532.11763789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6654495.49199776">
                <text:p>6654495.49199776</text:p>
              </table:table-cell>
              <table:table-cell office:value-type="float" office:value="7004732.09683975">
                <text:p>7004732.09683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7012924.49971267">
                <text:p>7012924.49971267</text:p>
              </table:table-cell>
              <table:table-cell office:value-type="float" office:value="7012924.49971267">
                <text:p>7012924.49971267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B Coincidence Limit_2'.I23:'Annex B Coincidence Limit_2'.J37 'Annex B Coincidence Limit_2'.M23:'Annex B Coincidence Limit_2'.M37" svg:x="1.395cm" svg:y="2.51cm" svg:width="18.548cm" svg:height="11.466cm">
          <chart:coordinate-region svg:x="2.326cm" svg:y="2.708cm" svg:width="16.927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B Coincidence Limit_2'.J23:'Annex B Coincidence Limit_2'.J37" chart:class="chart:scatter">
            <chart:domain table:cell-range-address="'Annex B Coincidence Limit_2'.I23:'Annex B Coincidence Limit_2'.I37"/>
            <chart:data-point chart:repeated="15"/>
          </chart:series>
          <chart:series chart:style-name="ch13" chart:values-cell-range-address="'Annex B Coincidence Limit_2'.M23:'Annex B Coincidence Limit_2'.M37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_2'.I23:'Annex B Coincidence Limit_2'.I37</svg:desc>
                </draw:g>
              </table:table-cell>
              <table:table-cell office:value-type="float" office:value="1">
                <text:p>1</text:p>
                <draw:g>
                  <svg:desc>'Annex B Coincidence Limit_2'.J23:'Annex B Coincidence Limit_2'.J37</svg:desc>
                </draw:g>
              </table:table-cell>
              <table:table-cell office:value-type="float" office:value="1">
                <text:p>1</text:p>
                <draw:g>
                  <svg:desc>'Annex B Coincidence Limit_2'.M23:'Annex B Coincidence Limit_2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3805.701260769">
                <text:p>883805.701260769</text:p>
              </table:table-cell>
              <table:table-cell office:value-type="float" office:value="0.977287879867561">
                <text:p>0.977287879867561</text:p>
              </table:table-cell>
              <table:table-cell office:value-type="float" office:value="0.977287879867561">
                <text:p>0.977287879867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4090.47859843">
                <text:p>1654090.47859843</text:p>
              </table:table-cell>
              <table:table-cell office:value-type="float" office:value="0.894926377458084">
                <text:p>0.894926377458084</text:p>
              </table:table-cell>
              <table:table-cell office:value-type="float" office:value="1.03788421769674">
                <text:p>1.03788421769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2889.86136284">
                <text:p>2422889.86136284</text:p>
              </table:table-cell>
              <table:table-cell office:value-type="float" office:value="0.814208037871919">
                <text:p>0.814208037871919</text:p>
              </table:table-cell>
              <table:table-cell office:value-type="float" office:value="1.0452022136434">
                <text:p>1.045202213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0208.14200227">
                <text:p>3190208.14200227</text:p>
              </table:table-cell>
              <table:table-cell office:value-type="float" office:value="0.742086250997448">
                <text:p>0.742086250997448</text:p>
              </table:table-cell>
              <table:table-cell office:value-type="float" office:value="1.04528591964082">
                <text:p>1.04528591964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6049.59644201">
                <text:p>3956049.59644201</text:p>
              </table:table-cell>
              <table:table-cell office:value-type="float" office:value="0.677553537855219">
                <text:p>0.677553537855219</text:p>
              </table:table-cell>
              <table:table-cell office:value-type="float" office:value="1.03243379201829">
                <text:p>1.0324337920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20418.48416377">
                <text:p>4720418.48416377</text:p>
              </table:table-cell>
              <table:table-cell office:value-type="float" office:value="0.60814125053333">
                <text:p>0.60814125053333</text:p>
              </table:table-cell>
              <table:table-cell office:value-type="float" office:value="0.973485201769975">
                <text:p>0.973485201769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83319.04828464">
                <text:p>5483319.04828464</text:p>
              </table:table-cell>
              <table:table-cell office:value-type="float" office:value="0.577474805335388">
                <text:p>0.577474805335388</text:p>
              </table:table-cell>
              <table:table-cell office:value-type="float" office:value="0.999573184037867">
                <text:p>0.999573184037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44755.51563564">
                <text:p>6244755.51563564</text:p>
              </table:table-cell>
              <table:table-cell office:value-type="float" office:value="0.537181574458891">
                <text:p>0.537181574458891</text:p>
              </table:table-cell>
              <table:table-cell office:value-type="float" office:value="0.977859942229864">
                <text:p>0.977859942229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4732.09683975">
                <text:p>7004732.09683975</text:p>
              </table:table-cell>
              <table:table-cell office:value-type="float" office:value="0.493750018157065">
                <text:p>0.493750018157065</text:p>
              </table:table-cell>
              <table:table-cell office:value-type="float" office:value="0.924308314454872">
                <text:p>0.924308314454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.464116009914509">
                <text:p>0.464116009914509</text:p>
              </table:table-cell>
              <table:table-cell office:value-type="float" office:value="0.903348700861311">
                <text:p>0.903348700861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