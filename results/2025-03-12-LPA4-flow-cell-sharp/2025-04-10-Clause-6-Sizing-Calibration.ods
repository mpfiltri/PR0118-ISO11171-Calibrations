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C0000022180CD1462.png" manifest:media-type="image/png"/>
  <manifest:file-entry manifest:full-path="Pictures/10000001000004BB0000019BF5628490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93cm"/>
    </style:style>
    <style:style style:name="ro1" style:family="table-row">
      <style:table-row-properties style:row-height="2.36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11">
      <style:table-cell-properties fo:background-color="#ccf4c6"/>
      <style:map style:condition="cell-content()&lt;[.J50]" style:apply-style-name="Accent" style:base-cell-address="'Clause 6 Sizing Calibration'.J49"/>
    </style:style>
    <style:style style:name="ce7" style:family="table-cell" style:parent-style-name="Default" style:data-style-name="N11"/>
    <style:style style:name="ce8" style:family="table-cell" style:parent-style-name="Default">
      <style:map style:condition="cell-content()=&quot;&lt;3% = PASS&quot;" style:apply-style-name="Good" style:base-cell-address="'Clause 6 Sizing Calibration'.K54"/>
      <style:map style:condition="cell-content()!=&quot;&lt;3% = PASS&quot;" style:apply-style-name="Bad" style:base-cell-address="'Clause 6 Sizing Calibration'.K54"/>
    </style:style>
    <style:style style:name="ce9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Clause 6 Sizing Calibra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&gt;1000 particles per bottle at max certified size</text:p>
            <text:p>Sample Cv per Table C.2</text:p>
          </table:table-cell>
          <table:table-cell table:style-name="ce2" office:value-type="string" calcext:value-type="string">
            <text:p>SRM2806/RM8631x</text:p>
          </table:table-cell>
          <table:table-cell table:style-name="ce1" office:value-type="string" calcext:value-type="string" table:number-columns-spanned="5" table:number-rows-spanned="1">
            <text:p>Clause 6. Sizing Calibration. 3 separate bottles, 5 sub-samples from each.</text:p>
          </table:table-cell>
          <table:covered-table-cell table:number-columns-repeated="4" table:style-name="ce2"/>
          <table:table-cell table:style-name="ce2" table:number-columns-repeated="1017"/>
        </table:table-row>
        <table:table-row table:style-name="ro2">
          <table:table-cell>
            <draw:frame draw:z-index="0" draw:name="Image 4" draw:style-name="gr1" draw:text-style-name="P1" svg:width="14.684cm" svg:height="5.975cm" svg:x="0.235cm" svg:y="0.067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LPA4-SH Calibration using test rig and MTD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3" office:value-type="string" calcext:value-type="string">
            <text:p>Test Rig</text:p>
          </table:table-cell>
          <table:table-cell table:number-columns-repeated="2"/>
          <table:table-cell table:style-name="ce4" office:value-type="float" office:value="304" calcext:value-type="float">
            <text:p>304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APC Model</text:p>
          </table:table-cell>
          <table:table-cell table:number-columns-repeated="2"/>
          <table:table-cell table:style-name="ce4" office:value-type="string" calcext:value-type="string">
            <text:p>LPA4-SH prototype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APC S/N</text:p>
          </table:table-cell>
          <table:table-cell table:number-columns-repeated="2"/>
          <table:table-cell table:style-name="ce4" office:value-type="float" office:value="61110029" calcext:value-type="float">
            <text:p>61110029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Sensor Model</text:p>
          </table:table-cell>
          <table:table-cell table:number-columns-repeated="2"/>
          <table:table-cell table:style-name="ce4" office:value-type="string" calcext:value-type="string">
            <text:p>LPA4-SH prototype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Sensor S/N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Date</text:p>
          </table:table-cell>
          <table:table-cell table:number-columns-repeated="2"/>
          <table:table-cell table:style-name="ce9" office:value-type="date" office:date-value="2025-04-10" calcext:value-type="date">
            <text:p>2025-04-10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Operator</text:p>
          </table:table-cell>
          <table:table-cell table:number-columns-repeated="2"/>
          <table:table-cell table:style-name="ce9" office:value-type="string" calcext:value-type="string">
            <text:p>JMD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Threshold Noise</text:p>
          </table:table-cell>
          <table:table-cell table:number-columns-repeated="2"/>
          <table:table-cell table:style-name="ce10" office:value-type="float" office:value="40" calcext:value-type="float">
            <text:p>40</text:p>
          </table:table-cell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4"/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MTD mg/l</text:p>
          </table:table-cell>
          <table:table-cell table:number-columns-repeated="2"/>
          <table:table-cell office:value-type="float" office:value="5.442" calcext:value-type="float">
            <text:p>5.442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Verification Data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TotalCount4</text:p>
          </table:table-cell>
          <table:table-cell office:value-type="string" calcext:value-type="string">
            <text:p>TotalCount6</text:p>
          </table:table-cell>
          <table:table-cell office:value-type="string" calcext:value-type="string">
            <text:p>TotalCount14</text:p>
          </table:table-cell>
          <table:table-cell office:value-type="string" calcext:value-type="string">
            <text:p>TotalCount21</text:p>
          </table:table-cell>
          <table:table-cell office:value-type="string" calcext:value-type="string">
            <text:p>TotalCount25</text:p>
          </table:table-cell>
          <table:table-cell office:value-type="string" calcext:value-type="string">
            <text:p>TotalCount38</text:p>
          </table:table-cell>
          <table:table-cell office:value-type="string" calcext:value-type="string">
            <text:p>TotalCount50</text:p>
          </table:table-cell>
          <table:table-cell office:value-type="string" calcext:value-type="string">
            <text:p>TotalCount68</text:p>
          </table:table-cell>
          <table:table-cell table:number-columns-repeated="1008"/>
        </table:table-row>
        <table:table-row table:style-name="ro2">
          <table:table-cell table:number-columns-repeated="8"/>
          <table:table-cell office:value-type="float" office:value="828443" calcext:value-type="float">
            <text:p>828443</text:p>
          </table:table-cell>
          <table:table-cell office:value-type="float" office:value="328316" calcext:value-type="float">
            <text:p>328316</text:p>
          </table:table-cell>
          <table:table-cell office:value-type="float" office:value="29694" calcext:value-type="float">
            <text:p>29694</text:p>
          </table:table-cell>
          <table:table-cell office:value-type="float" office:value="5867" calcext:value-type="float">
            <text:p>5867</text:p>
          </table:table-cell>
          <table:table-cell office:value-type="float" office:value="2757" calcext:value-type="float">
            <text:p>2757</text:p>
          </table:table-cell>
          <table:table-cell office:value-type="float" office:value="327" calcext:value-type="float">
            <text:p>327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number-columns-repeated="8"/>
          <table:table-cell office:value-type="float" office:value="842214" calcext:value-type="float">
            <text:p>842214</text:p>
          </table:table-cell>
          <table:table-cell office:value-type="float" office:value="335108" calcext:value-type="float">
            <text:p>335108</text:p>
          </table:table-cell>
          <table:table-cell office:value-type="float" office:value="29669" calcext:value-type="float">
            <text:p>29669</text:p>
          </table:table-cell>
          <table:table-cell office:value-type="float" office:value="6237" calcext:value-type="float">
            <text:p>6237</text:p>
          </table:table-cell>
          <table:table-cell office:value-type="float" office:value="3402" calcext:value-type="float">
            <text:p>3402</text:p>
          </table:table-cell>
          <table:table-cell office:value-type="float" office:value="452" calcext:value-type="float">
            <text:p>45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8"/>
          <table:table-cell office:value-type="float" office:value="818792" calcext:value-type="float">
            <text:p>818792</text:p>
          </table:table-cell>
          <table:table-cell office:value-type="float" office:value="325613" calcext:value-type="float">
            <text:p>325613</text:p>
          </table:table-cell>
          <table:table-cell office:value-type="float" office:value="29549" calcext:value-type="float">
            <text:p>29549</text:p>
          </table:table-cell>
          <table:table-cell office:value-type="float" office:value="6382" calcext:value-type="float">
            <text:p>6382</text:p>
          </table:table-cell>
          <table:table-cell office:value-type="float" office:value="3251" calcext:value-type="float">
            <text:p>3251</text:p>
          </table:table-cell>
          <table:table-cell office:value-type="float" office:value="428" calcext:value-type="float">
            <text:p>42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8"/>
          <table:table-cell office:value-type="float" office:value="826885" calcext:value-type="float">
            <text:p>826885</text:p>
          </table:table-cell>
          <table:table-cell office:value-type="float" office:value="329818" calcext:value-type="float">
            <text:p>329818</text:p>
          </table:table-cell>
          <table:table-cell office:value-type="float" office:value="29253" calcext:value-type="float">
            <text:p>29253</text:p>
          </table:table-cell>
          <table:table-cell office:value-type="float" office:value="6002" calcext:value-type="float">
            <text:p>6002</text:p>
          </table:table-cell>
          <table:table-cell office:value-type="float" office:value="2856" calcext:value-type="float">
            <text:p>2856</text:p>
          </table:table-cell>
          <table:table-cell office:value-type="float" office:value="518" calcext:value-type="float">
            <text:p>51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8"/>
          <table:table-cell office:value-type="float" office:value="824165" calcext:value-type="float">
            <text:p>824165</text:p>
          </table:table-cell>
          <table:table-cell office:value-type="float" office:value="323807" calcext:value-type="float">
            <text:p>323807</text:p>
          </table:table-cell>
          <table:table-cell office:value-type="float" office:value="27963" calcext:value-type="float">
            <text:p>27963</text:p>
          </table:table-cell>
          <table:table-cell office:value-type="float" office:value="5620" calcext:value-type="float">
            <text:p>5620</text:p>
          </table:table-cell>
          <table:table-cell office:value-type="float" office:value="2707" calcext:value-type="float">
            <text:p>2707</text:p>
          </table:table-cell>
          <table:table-cell office:value-type="float" office:value="281" calcext:value-type="float">
            <text:p>28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>
            <draw:frame draw:z-index="1" draw:name="Image 1" draw:style-name="gr1" draw:text-style-name="P1" svg:width="12.727cm" svg:height="4.319cm" svg:x="0cm" svg:y="0cm">
              <draw:image xlink:href="Pictures/10000001000004BB0000019BF5628490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"/>
          <table:table-cell table:style-name="ce3" office:value-type="string" calcext:value-type="string">
            <text:p>5ml samples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" office:value-type="string" calcext:value-type="string">
            <text:p>&gt;4μm(c)/100ml</text:p>
          </table:table-cell>
          <table:table-cell table:style-name="ce4" office:value-type="string" calcext:value-type="string">
            <text:p>Deviation</text:p>
          </table:table-cell>
          <table:table-cell table:style-name="ce4" office:value-type="string" calcext:value-type="string">
            <text:p>6μm</text:p>
          </table:table-cell>
          <table:table-cell/>
          <table:table-cell table:style-name="ce4" office:value-type="string" calcext:value-type="string">
            <text:p>14um</text:p>
          </table:table-cell>
          <table:table-cell/>
          <table:table-cell table:style-name="ce4" office:value-type="string" calcext:value-type="string">
            <text:p>21μm</text:p>
          </table:table-cell>
          <table:table-cell/>
          <table:table-cell table:style-name="ce4" office:value-type="string" calcext:value-type="string">
            <text:p>25μm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Portion 1</text:p>
          </table:table-cell>
          <table:table-cell table:formula="of:=[.I21]" office:value-type="float" office:value="828443" calcext:value-type="float">
            <text:p>828443</text:p>
          </table:table-cell>
          <table:table-cell table:style-name="ce7" table:formula="of:=([.J40]-[.J$46])/[.J$46]" office:value-type="percentage" office:value="0.000414442800251797" calcext:value-type="percentage">
            <text:p>0.04%</text:p>
          </table:table-cell>
          <table:table-cell table:formula="of:=[.J21]" office:value-type="float" office:value="328316" calcext:value-type="float">
            <text:p>328316</text:p>
          </table:table-cell>
          <table:table-cell table:style-name="ce7" table:formula="of:=([.L40]-[.L$46])/[.L$46]" office:value-type="percentage" office:value="-0.000658686936204841" calcext:value-type="percentage">
            <text:p>-0.07%</text:p>
          </table:table-cell>
          <table:table-cell table:formula="of:=[.K21]" office:value-type="float" office:value="29694" calcext:value-type="float">
            <text:p>29694</text:p>
          </table:table-cell>
          <table:table-cell table:style-name="ce7" table:formula="of:=([.N40]-[.N$46])/[.N$46]" office:value-type="percentage" office:value="0.0160270447826564" calcext:value-type="percentage">
            <text:p>1.60%</text:p>
          </table:table-cell>
          <table:table-cell table:formula="of:=[.L21]" office:value-type="float" office:value="5867" calcext:value-type="float">
            <text:p>5867</text:p>
          </table:table-cell>
          <table:table-cell table:style-name="ce7" table:formula="of:=([.P40]-[.P$46])/[.P$46]" office:value-type="percentage" office:value="-0.0256742394048094" calcext:value-type="percentage">
            <text:p>-2.57%</text:p>
          </table:table-cell>
          <table:table-cell table:formula="of:=[.M21]" office:value-type="float" office:value="2757" calcext:value-type="float">
            <text:p>2757</text:p>
          </table:table-cell>
          <table:table-cell table:style-name="ce7" table:formula="of:=([.R40]-[.R$46])/[.R$46]" office:value-type="percentage" office:value="-0.0793428170707273" calcext:value-type="percentage">
            <text:p>-7.93%</text:p>
          </table:table-cell>
          <table:table-cell table:number-columns-repeated="1005"/>
        </table:table-row>
        <table:table-row table:style-name="ro2">
          <table:table-cell table:number-columns-repeated="8"/>
          <table:table-cell office:value-type="string" calcext:value-type="string">
            <text:p>Portion 2</text:p>
          </table:table-cell>
          <table:table-cell table:formula="of:=[.I22]" office:value-type="float" office:value="842214" calcext:value-type="float">
            <text:p>842214</text:p>
          </table:table-cell>
          <table:table-cell table:style-name="ce7" table:formula="of:=([.J41]-[.J$46])/[.J$46]" office:value-type="percentage" office:value="0.0170440809187491" calcext:value-type="percentage">
            <text:p>1.70%</text:p>
          </table:table-cell>
          <table:table-cell table:formula="of:=[.J22]" office:value-type="float" office:value="335108" calcext:value-type="float">
            <text:p>335108</text:p>
          </table:table-cell>
          <table:table-cell table:style-name="ce7" table:formula="of:=([.L41]-[.L$46])/[.L$46]" office:value-type="percentage" office:value="0.0200150730947693" calcext:value-type="percentage">
            <text:p>2.00%</text:p>
          </table:table-cell>
          <table:table-cell table:formula="of:=[.K22]" office:value-type="float" office:value="29669" calcext:value-type="float">
            <text:p>29669</text:p>
          </table:table-cell>
          <table:table-cell table:style-name="ce7" table:formula="of:=([.N41]-[.N$46])/[.N$46]" office:value-type="percentage" office:value="0.0151716303514727" calcext:value-type="percentage">
            <text:p>1.52%</text:p>
          </table:table-cell>
          <table:table-cell table:formula="of:=[.L22]" office:value-type="float" office:value="6237" calcext:value-type="float">
            <text:p>6237</text:p>
          </table:table-cell>
          <table:table-cell table:style-name="ce7" table:formula="of:=([.P41]-[.P$46])/[.P$46]" office:value-type="percentage" office:value="0.0357712235950577" calcext:value-type="percentage">
            <text:p>3.58%</text:p>
          </table:table-cell>
          <table:table-cell table:formula="of:=[.M22]" office:value-type="float" office:value="3402" calcext:value-type="float">
            <text:p>3402</text:p>
          </table:table-cell>
          <table:table-cell table:style-name="ce7" table:formula="of:=([.R41]-[.R$46])/[.R$46]" office:value-type="percentage" office:value="0.136044880785414" calcext:value-type="percentage">
            <text:p>13.60%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ed &gt;10000 particles <text:span text:style-name="T1">at the smallest threshold setting</text:span><text:span text:style-name="T2"> for each sub-sample / test portion. </text:span></text:p>
          </table:table-cell>
          <table:table-cell table:number-columns-repeated="7"/>
          <table:table-cell office:value-type="string" calcext:value-type="string">
            <text:p>Portion 3</text:p>
          </table:table-cell>
          <table:table-cell table:formula="of:=[.I23]" office:value-type="float" office:value="818792" calcext:value-type="float">
            <text:p>818792</text:p>
          </table:table-cell>
          <table:table-cell table:style-name="ce7" table:formula="of:=([.J42]-[.J$46])/[.J$46]" office:value-type="percentage" office:value="-0.0112399495809564" calcext:value-type="percentage">
            <text:p>-1.12%</text:p>
          </table:table-cell>
          <table:table-cell table:formula="of:=[.J23]" office:value-type="float" office:value="325613" calcext:value-type="float">
            <text:p>325613</text:p>
          </table:table-cell>
          <table:table-cell table:style-name="ce7" table:formula="of:=([.L42]-[.L$46])/[.L$46]" office:value-type="percentage" office:value="-0.00888618595913226" calcext:value-type="percentage">
            <text:p>-0.89%</text:p>
          </table:table-cell>
          <table:table-cell table:formula="of:=[.K23]" office:value-type="float" office:value="29549" calcext:value-type="float">
            <text:p>29549</text:p>
          </table:table-cell>
          <table:table-cell table:style-name="ce7" table:formula="of:=([.N42]-[.N$46])/[.N$46]" office:value-type="percentage" office:value="0.0110656410817914" calcext:value-type="percentage">
            <text:p>1.11%</text:p>
          </table:table-cell>
          <table:table-cell table:formula="of:=[.L23]" office:value-type="float" office:value="6382" calcext:value-type="float">
            <text:p>6382</text:p>
          </table:table-cell>
          <table:table-cell table:style-name="ce7" table:formula="of:=([.P42]-[.P$46])/[.P$46]" office:value-type="percentage" office:value="0.0598512023382489" calcext:value-type="percentage">
            <text:p>5.99%</text:p>
          </table:table-cell>
          <table:table-cell table:formula="of:=[.M23]" office:value-type="float" office:value="3251" calcext:value-type="float">
            <text:p>3251</text:p>
          </table:table-cell>
          <table:table-cell table:style-name="ce7" table:formula="of:=([.R42]-[.R$46])/[.R$46]" office:value-type="percentage" office:value="0.0856207840780071" calcext:value-type="percentage">
            <text:p>8.56%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ed &gt;1000 particles <text:span text:style-name="T1">counted</text:span> at each calibrated size, for each of the three calibration tests.</text:p>
          </table:table-cell>
          <table:table-cell table:number-columns-repeated="7"/>
          <table:table-cell office:value-type="string" calcext:value-type="string">
            <text:p>Portion 4</text:p>
          </table:table-cell>
          <table:table-cell table:formula="of:=[.I24]" office:value-type="float" office:value="826885" calcext:value-type="float">
            <text:p>826885</text:p>
          </table:table-cell>
          <table:table-cell table:style-name="ce7" table:formula="of:=([.J43]-[.J$46])/[.J$46]" office:value-type="percentage" office:value="-0.00146697294215027" calcext:value-type="percentage">
            <text:p>-0.15%</text:p>
          </table:table-cell>
          <table:table-cell table:formula="of:=[.J24]" office:value-type="float" office:value="329818" calcext:value-type="float">
            <text:p>329818</text:p>
          </table:table-cell>
          <table:table-cell table:style-name="ce7" table:formula="of:=([.L43]-[.L$46])/[.L$46]" office:value-type="percentage" office:value="0.00391316046758243" calcext:value-type="percentage">
            <text:p>0.39%</text:p>
          </table:table-cell>
          <table:table-cell table:formula="of:=[.K24]" office:value-type="float" office:value="29253" calcext:value-type="float">
            <text:p>29253</text:p>
          </table:table-cell>
          <table:table-cell table:style-name="ce7" table:formula="of:=([.N43]-[.N$46])/[.N$46]" office:value-type="percentage" office:value="0.000937534216577297" calcext:value-type="percentage">
            <text:p>0.09%</text:p>
          </table:table-cell>
          <table:table-cell table:formula="of:=[.L24]" office:value-type="float" office:value="6002" calcext:value-type="float">
            <text:p>6002</text:p>
          </table:table-cell>
          <table:table-cell table:style-name="ce7" table:formula="of:=([.P43]-[.P$46])/[.P$46]" office:value-type="percentage" office:value="-0.00325494885080383" calcext:value-type="percentage">
            <text:p>-0.33%</text:p>
          </table:table-cell>
          <table:table-cell table:formula="of:=[.M24]" office:value-type="float" office:value="2856" calcext:value-type="float">
            <text:p>2856</text:p>
          </table:table-cell>
          <table:table-cell table:style-name="ce7" table:formula="of:=([.R43]-[.R$46])/[.R$46]" office:value-type="percentage" office:value="-0.0462833099579242" calcext:value-type="percentage">
            <text:p>-4.63%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RM2806D has 14/ml at 30um</text:p>
          </table:table-cell>
          <table:table-cell table:number-columns-repeated="7"/>
          <table:table-cell office:value-type="string" calcext:value-type="string">
            <text:p>Portion 5</text:p>
          </table:table-cell>
          <table:table-cell table:formula="of:=[.I25]" office:value-type="float" office:value="824165" calcext:value-type="float">
            <text:p>824165</text:p>
          </table:table-cell>
          <table:table-cell table:style-name="ce7" table:formula="of:=([.J44]-[.J$46])/[.J$46]" office:value-type="percentage" office:value="-0.00475160119589456" calcext:value-type="percentage">
            <text:p>-0.48%</text:p>
          </table:table-cell>
          <table:table-cell table:formula="of:=[.J25]" office:value-type="float" office:value="323807" calcext:value-type="float">
            <text:p>323807</text:p>
          </table:table-cell>
          <table:table-cell table:style-name="ce7" table:formula="of:=([.L44]-[.L$46])/[.L$46]" office:value-type="percentage" office:value="-0.014383360667015" calcext:value-type="percentage">
            <text:p>-1.44%</text:p>
          </table:table-cell>
          <table:table-cell table:formula="of:=[.K25]" office:value-type="float" office:value="27963" calcext:value-type="float">
            <text:p>27963</text:p>
          </table:table-cell>
          <table:table-cell table:style-name="ce7" table:formula="of:=([.N44]-[.N$46])/[.N$46]" office:value-type="percentage" office:value="-0.0432018504324975" calcext:value-type="percentage">
            <text:p>-4.32%</text:p>
          </table:table-cell>
          <table:table-cell table:formula="of:=[.L25]" office:value-type="float" office:value="5620" calcext:value-type="float">
            <text:p>5620</text:p>
          </table:table-cell>
          <table:table-cell table:style-name="ce7" table:formula="of:=([.P44]-[.P$46])/[.P$46]" office:value-type="percentage" office:value="-0.0666932376776937" calcext:value-type="percentage">
            <text:p>-6.67%</text:p>
          </table:table-cell>
          <table:table-cell table:formula="of:=[.M25]" office:value-type="float" office:value="2707" calcext:value-type="float">
            <text:p>2707</text:p>
          </table:table-cell>
          <table:table-cell table:style-name="ce7" table:formula="of:=([.R44]-[.R$46])/[.R$46]" office:value-type="percentage" office:value="-0.0960395378347692" calcext:value-type="percentage">
            <text:p>-9.60%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his implies we need at least 1000/14 = 71ml per test.</text:p>
          </table:table-cell>
          <table:table-cell table:number-columns-repeated="1023"/>
        </table:table-row>
        <table:table-row table:style-name="ro2">
          <table:table-cell table:number-columns-repeated="8"/>
          <table:table-cell office:value-type="string" calcext:value-type="string">
            <text:p>Mean</text:p>
          </table:table-cell>
          <table:table-cell table:style-name="ce5" table:formula="of:=AVERAGE([.J40:.J44])" office:value-type="float" office:value="828099.8" calcext:value-type="float">
            <text:p>828100</text:p>
          </table:table-cell>
          <table:table-cell/>
          <table:table-cell table:style-name="ce5" table:formula="of:=AVERAGE([.L40:.L44])" office:value-type="float" office:value="328532.4" calcext:value-type="float">
            <text:p>328532</text:p>
          </table:table-cell>
          <table:table-cell/>
          <table:table-cell table:style-name="ce5" table:formula="of:=AVERAGE([.N40:.N44])" office:value-type="float" office:value="29225.6" calcext:value-type="float">
            <text:p>29226</text:p>
          </table:table-cell>
          <table:table-cell/>
          <table:table-cell table:style-name="ce5" table:formula="of:=AVERAGE([.P40:.P44])" office:value-type="float" office:value="6021.6" calcext:value-type="float">
            <text:p>6022</text:p>
          </table:table-cell>
          <table:table-cell/>
          <table:table-cell table:style-name="ce5" table:formula="of:=AVERAGE([.R40:.R44])" office:value-type="float" office:value="2994.6" calcext:value-type="float">
            <text:p>299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t 21um we have 88.64/ml requiring 11.28ml counted volume per test which is more practical. </text:p>
          </table:table-cell>
          <table:table-cell table:number-columns-repeated="7"/>
          <table:table-cell office:value-type="string" calcext:value-type="string">
            <text:p>Sample StdDev</text:p>
          </table:table-cell>
          <table:table-cell table:style-name="ce5" table:formula="of:=STDEVP([.J40:.J44])" office:value-type="float" office:value="7783.59761035988" calcext:value-type="float">
            <text:p>7784</text:p>
          </table:table-cell>
          <table:table-cell/>
          <table:table-cell table:style-name="ce5" table:formula="of:=STDEVP([.L40:.L44])" office:value-type="float" office:value="3893.33823858138" calcext:value-type="float">
            <text:p>3893</text:p>
          </table:table-cell>
          <table:table-cell/>
          <table:table-cell table:style-name="ce5" table:formula="of:=STDEVP([.N40:.N44])" office:value-type="float" office:value="650.461251728341" calcext:value-type="float">
            <text:p>650</text:p>
          </table:table-cell>
          <table:table-cell/>
          <table:table-cell table:style-name="ce5" table:formula="of:=STDEVP([.P40:.P44])" office:value-type="float" office:value="269.017917618883" calcext:value-type="float">
            <text:p>269</text:p>
          </table:table-cell>
          <table:table-cell/>
          <table:table-cell table:style-name="ce5" table:formula="of:=STDEVP([.R40:.R44])" office:value-type="float" office:value="279.318169835047" calcext:value-type="float">
            <text:p>279</text:p>
          </table:table-cell>
          <table:table-cell table:number-columns-repeated="1006"/>
        </table:table-row>
        <table:table-row table:style-name="ro2">
          <table:table-cell table:number-columns-repeated="9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D<text:span text:style-name="T3">Q</text:span></text:p>
          </table:table-cell>
          <table:table-cell table:style-name="ce6" table:formula="of:=(MAX([.J40:.J44])-MIN([.J40:.J44]))/[.J46]" office:value-type="percentage" office:value="0.0282840304997055" calcext:value-type="percentage">
            <text:p>2.83%</text:p>
          </table:table-cell>
          <table:table-cell/>
          <table:table-cell table:style-name="ce6" table:formula="of:=(MAX([.L40:.L44])-MIN([.L40:.L44]))/[.L46]" office:value-type="percentage" office:value="0.0343984337617842" calcext:value-type="percentage">
            <text:p>3.44%</text:p>
          </table:table-cell>
          <table:table-cell/>
          <table:table-cell table:style-name="ce6" table:formula="of:=(MAX([.N40:.N44])-MIN([.N40:.N44]))/[.N46]" office:value-type="percentage" office:value="0.0592288952151538" calcext:value-type="percentage">
            <text:p>5.92%</text:p>
          </table:table-cell>
          <table:table-cell/>
          <table:table-cell table:style-name="ce6" table:formula="of:=(MAX([.P40:.P44])-MIN([.P40:.P44]))/[.P46]" office:value-type="percentage" office:value="0.126544440015943" calcext:value-type="percentage">
            <text:p>12.65%</text:p>
          </table:table-cell>
          <table:table-cell/>
          <table:table-cell table:style-name="ce6" table:formula="of:=(MAX([.R40:.R44])-MIN([.R40:.R44]))/[.R46]" office:value-type="percentage" office:value="0.232084418620183" calcext:value-type="percentage">
            <text:p>23.21%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riteria &lt;%</text:p>
          </table:table-cell>
          <table:table-cell table:style-name="ce7" office:value-type="percentage" office:value="0.11" calcext:value-type="percentage">
            <text:p>11.00%</text:p>
          </table:table-cell>
          <table:table-cell/>
          <table:table-cell table:style-name="ce7" office:value-type="percentage" office:value="0.11" calcext:value-type="percentage">
            <text:p>11.00%</text:p>
          </table:table-cell>
          <table:table-cell/>
          <table:table-cell table:style-name="ce7" office:value-type="percentage" office:value="0.11" calcext:value-type="percentage">
            <text:p>11.00%</text:p>
          </table:table-cell>
          <table:table-cell/>
          <table:table-cell table:style-name="ce7" office:value-type="percentage" office:value="0.113" calcext:value-type="percentage">
            <text:p>11.30%</text:p>
          </table:table-cell>
          <table:table-cell/>
          <table:table-cell table:style-name="ce7" office:value-type="percentage" office:value="0.119" calcext:value-type="percentage">
            <text:p>11.90%</text:p>
          </table:table-cell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CV<text:span text:style-name="T3">VOL</text:span></text:p>
          </table:table-cell>
          <table:table-cell table:style-name="ce7" table:formula="of:=[.J47]/[.J46]" office:value-type="percentage" office:value="0.00939934728925171" calcext:value-type="percentage">
            <text:p>0.94%</text:p>
          </table:table-cell>
          <table:table-cell table:style-name="ce8" table:formula="of:=IF([.J54]&lt;0.03;&quot;&lt;3% = PASS&quot;;&quot;&gt;3% = FAIL&quot;)" office:value-type="string" office:string-value="&lt;3% = PASS" calcext:value-type="string">
            <text:p>&lt;3% = PASS</text:p>
          </table:table-cell>
          <table:table-cell table:style-name="ce7" table:formula="of:=[.L47]/[.L46]" office:value-type="percentage" office:value="0.0118506979481518" calcext:value-type="percentage">
            <text:p>1.19%</text:p>
          </table:table-cell>
          <table:table-cell table:style-name="ce8" table:formula="of:=IF([.L54]&lt;0.03;&quot;&lt;3% = PASS&quot;;&quot;&gt;3% = FAIL&quot;)" office:value-type="string" office:string-value="&lt;3% = PASS" calcext:value-type="string">
            <text:p>&lt;3% = PASS</text:p>
          </table:table-cell>
          <table:table-cell table:style-name="ce7" table:formula="of:=[.N47]/[.N46]" office:value-type="percentage" office:value="0.0222565576661674" calcext:value-type="percentage">
            <text:p>2.23%</text:p>
          </table:table-cell>
          <table:table-cell table:style-name="ce8" table:formula="of:=IF([.N54]&lt;0.03;&quot;&lt;3% = PASS&quot;;&quot;&gt;3% = FAIL&quot;)" office:value-type="string" office:string-value="&lt;3% = PASS" calcext:value-type="string">
            <text:p>&lt;3% = PASS</text:p>
          </table:table-cell>
          <table:table-cell table:style-name="ce7"/>
          <table:table-cell/>
          <table:table-cell table:style-name="ce7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4" office:value-type="string" calcext:value-type="string">
            <text:p>&gt;4μm(c)/100m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office:value-type="float" office:value="1239489" calcext:value-type="float">
            <text:p>1239489</text:p>
          </table:table-cell>
          <table:table-cell table:style-name="ce7" table:formula="of:=([.J59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35922" calcext:value-type="float">
            <text:p>1235922</text:p>
          </table:table-cell>
          <table:table-cell table:style-name="ce7" table:formula="of:=([.J60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13694" calcext:value-type="float">
            <text:p>1213694</text:p>
          </table:table-cell>
          <table:table-cell table:style-name="ce7" table:formula="of:=([.J61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59898" calcext:value-type="float">
            <text:p>1259898</text:p>
          </table:table-cell>
          <table:table-cell table:style-name="ce7" table:formula="of:=([.J62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37332" calcext:value-type="float">
            <text:p>1237332</text:p>
          </table:table-cell>
          <table:table-cell table:style-name="ce7" table:formula="of:=([.J63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5" table:formula="of:=AVERAGE([.J59:.J63])" office:value-type="float" office:value="1237267" calcext:value-type="float">
            <text:p>1237267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5" table:formula="of:=STDEVP([.J59:.J63])" office:value-type="float" office:value="14660.1434099398" calcext:value-type="float">
            <text:p>1466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5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7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9"/>
          <table:table-cell table:style-name="ce7" table:formula="of:=[.J66]/[.J65]" office:value-type="percentage" office:value="0.0118488114610183" calcext:value-type="percentage">
            <text:p>1.18%</text:p>
          </table:table-cell>
          <table:table-cell table:style-name="ce8" table:formula="of:=IF([.J73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1013"/>
        </table:table-row>
        <calcext:conditional-formats>
          <calcext:conditional-format calcext:target-range-address="'Clause 6 Sizing Calibration'.K54:'Clause 6 Sizing Calibration'.K54 'Clause 6 Sizing Calibration'.K73:'Clause 6 Sizing Calibration'.K73 'Clause 6 Sizing Calibration'.M54:'Clause 6 Sizing Calibration'.M54 'Clause 6 Sizing Calibration'.O54:'Clause 6 Sizing Calibration'.O54">
            <calcext:condition calcext:apply-style-name="Good" calcext:value="=&quot;&lt;3% = PASS&quot;" calcext:base-cell-address="'Clause 6 Sizing Calibration'.K54"/>
            <calcext:condition calcext:apply-style-name="Bad" calcext:value="!=&quot;&lt;3% = PASS&quot;" calcext:base-cell-address="'Clause 6 Sizing Calibration'.K54"/>
          </calcext:conditional-format>
          <calcext:conditional-format calcext:target-range-address="'Clause 6 Sizing Calibration'.K54:'Clause 6 Sizing Calibration'.K54 'Clause 6 Sizing Calibration'.K73:'Clause 6 Sizing Calibration'.K73 'Clause 6 Sizing Calibration'.M54:'Clause 6 Sizing Calibration'.M54 'Clause 6 Sizing Calibration'.O54:'Clause 6 Sizing Calibration'.O54">
            <calcext:condition calcext:apply-style-name="Good" calcext:value="&lt;0.03" calcext:base-cell-address="'Clause 6 Sizing Calibration'.K54"/>
            <calcext:condition calcext:apply-style-name="Bad" calcext:value="&gt;=0.03" calcext:base-cell-address="'Clause 6 Sizing Calibration'.K54"/>
          </calcext:conditional-format>
          <calcext:conditional-format calcext:target-range-address="'Clause 6 Sizing Calibration'.J49:'Clause 6 Sizing Calibration'.J49 'Clause 6 Sizing Calibration'.L49:'Clause 6 Sizing Calibration'.L49 'Clause 6 Sizing Calibration'.N49:'Clause 6 Sizing Calibration'.N49 'Clause 6 Sizing Calibration'.P49:'Clause 6 Sizing Calibration'.P49 'Clause 6 Sizing Calibration'.R49:'Clause 6 Sizing Calibration'.R49">
            <calcext:condition calcext:apply-style-name="Accent" calcext:value="&lt;[.J50]" calcext:base-cell-address="'Clause 6 Sizing Calibration'.J49"/>
          </calcext:conditional-format>
        </calcext:conditional-formats>
      </table:table>
      <table:table table:name="Spheres" table:style-name="ta1">
        <table:table-column table:style-name="co4" table:default-cell-style-name="Default"/>
        <table:table-column table:style-name="co3" table:number-columns-repeated="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terative Calculator for sliding window half-count method of PSL sphere threshold measurement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Calibrated Channel Size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μm(c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Channel Threshold (LPA-View value)</text:p>
          </table:table-cell>
          <table:table-cell table:formula="of:=0.56*[.C8]" office:value-type="float" office:value="8568" calcext:value-type="float">
            <text:p>8568</text:p>
          </table:table-cell>
          <table:table-cell table:style-name="ce3" office:value-type="float" office:value="15300" calcext:value-type="float">
            <text:p>15300</text:p>
          </table:table-cell>
          <table:table-cell table:formula="of:=1.56*[.C8]" office:value-type="float" office:value="23868" calcext:value-type="float">
            <text:p>23868</text:p>
          </table:table-cell>
        </table:table-row>
        <table:table-row table:style-name="ro2">
          <table:table-cell office:value-type="string" calcext:value-type="string">
            <text:p>Cumulative Counts / 100ml</text:p>
          </table:table-cell>
          <table:table-cell office:value-type="float" office:value="10387" calcext:value-type="float">
            <text:p>10387</text:p>
          </table:table-cell>
          <table:table-cell office:value-type="float" office:value="5232" calcext:value-type="float">
            <text:p>523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ifferential Counts / 100ml</text:p>
          </table:table-cell>
          <table:table-cell table:formula="of:=[.B9]-[.C9]" office:value-type="float" office:value="5155" calcext:value-type="float">
            <text:p>5155</text:p>
          </table:table-cell>
          <table:table-cell table:formula="of:=[.C9]-[.D9]" office:value-type="float" office:value="5227" calcext:value-type="float">
            <text:p>5227</text:p>
          </table:table-cell>
          <table:table-cell table:formula="of:=[.D9]-[.E9]" office:value-type="float" office:value="5" calcext:value-type="float">
            <text:p>5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style-name="ce19" table:formula="of:=(1-[.B10]/[.C10])" office:value-type="percentage" office:value="0.0137746317199158" calcext:value-type="percentage">
            <text:p>1.38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4P0" style:volatile="true">
      <number:text>£</number:text>
      <number:number number:decimal-places="0" number:min-decimal-places="0" number:min-integer-digits="1" number:grouping="true"/>
    </number:number-style>
    <number:number-style style:name="N214">
      <number:text>-£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number:min-decimal-places="2" number:min-integer-digits="1" number:grouping="true"/>
    </number:number-style>
    <number:number-style style:name="N217">
      <number:text>-£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2:02:39.4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0T11:44:06.769000000</meta:creation-date>
    <dc:date>2025-04-14T15:22:05.325000000</dc:date>
    <meta:editing-duration>PT3H1M27S</meta:editing-duration>
    <meta:editing-cycles>8</meta:editing-cycles>
    <meta:generator>LibreOffice/7.6.4.1$Windows_X86_64 LibreOffice_project/e19e193f88cd6c0525a17fb7a176ed8e6a3e2aa1</meta:generator>
    <meta:document-statistic meta:table-count="2" meta:cell-count="201" meta:object-count="2"/>
  </office:meta>
</office:document-meta>
</file>