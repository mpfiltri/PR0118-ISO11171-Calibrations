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text-overline-style="solid" style:text-overline-width="auto" style:text-overline-color="font-color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ext-properties style:text-overline-style="solid" style:text-overline-width="auto" style:text-overline-color="font-color"/>
    </style:style>
    <style:style style:name="ce24" style:family="table-cell" style:parent-style-name="Default">
      <style:table-cell-properties style:vertical-align="middle"/>
    </style:style>
    <style:style style:name="ce26" style:family="table-cell" style:parent-style-name="Default">
      <style:text-properties fo:font-weight="bold" style:font-weight-asian="bold" style:font-weight-complex="bold"/>
      <style:map style:condition="cell-content-is-between([.$Q$52],[.$R$52])" style:apply-style-name="Good" style:base-cell-address="'Annex E Verify Counting Bottle 1'.C29"/>
    </style:style>
    <style:style style:name="ce27" style:family="table-cell" style:parent-style-name="Default" style:data-style-name="N11">
      <style:text-properties fo:font-weight="bold" style:font-weight-asian="bold" style:font-weight-complex="bold"/>
      <style:map style:condition="cell-content-is-between([.$Q$52],[.$R$52])" style:apply-style-name="Good" style:base-cell-address="'Annex E Verify Counting Bottle 1'.C29"/>
    </style:style>
    <style:style style:name="ce28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Bottle 1'.B4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11"/>
    <style:style style:name="ce33" style:family="table-cell" style:parent-style-name="Default" style:data-style-name="N11">
      <style:text-properties fo:font-weight="bold" style:font-weight-asian="bold" style:font-weight-complex="bold"/>
      <style:map style:condition="cell-content()&lt;[.B92]" style:apply-style-name="Good" style:base-cell-address="'Annex E Verify Counting Bottle 1'.B91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46" style:family="table-cell" style:parent-style-name="Default">
      <style:text-properties fo:font-weight="bold" style:font-weight-asian="bold" style:font-weight-complex="bold"/>
      <style:map style:condition="cell-content-is-between([.$Q$54],[.$R$54])" style:apply-style-name="Good" style:base-cell-address="'Annex E Verify Counting Bottle 1'.D29"/>
    </style:style>
    <style:style style:name="ce47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Bottle 1'.C42"/>
    </style:style>
    <style:style style:name="ce8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Bottle 2'.A29"/>
    </style:style>
    <style:style style:name="ce25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Bottle 2'.B29"/>
    </style:style>
    <style:style style:name="ce29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Bottle 2'.B55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Bottle 3'.A29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Bottle 3'.B29"/>
    </style:style>
    <style:style style:name="ce68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Bottle 3'.B55"/>
    </style:style>
    <style:style style:name="ce69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Annex E Verify Counting Accuracy_2_2_2_2'.A29"/>
    </style:style>
    <style:style style:name="ce70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Annex E Verify Counting Accuracy_2_2_2_2'.B29"/>
    </style:style>
    <style:style style:name="ce7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_2_2_2_2'.B55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1" style:text-overline-style="none" style:text-overline-color="font-color"/>
    </style:style>
    <style:style style:name="T4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Annex E Verify Counting Bottle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4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4"/>
          <table:table-cell table:number-columns-repeated="4"/>
          <table:table-cell table:style-name="ce24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1" draw:text-style-name="P1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incidence limit</text:p>
          </table:table-cell>
          <table:table-cell office:value-type="float" office:value="40000" calcext:value-type="float">
            <text:p>4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9"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4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9"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4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0"/>
          <table:table-cell table:number-columns-repeated="7"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number-columns-repeated="6"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Sample 1</text:p>
          </table:table-cell>
          <table:table-cell office:value-type="float" office:value="566795" calcext:value-type="float">
            <text:p>566795</text:p>
          </table:table-cell>
          <table:table-cell office:value-type="float" office:value="149199" calcext:value-type="float">
            <text:p>149199</text:p>
          </table:table-cell>
          <table:table-cell office:value-type="float" office:value="1279" calcext:value-type="float">
            <text:p>1279</text:p>
          </table:table-cell>
          <table:table-cell office:value-type="float" office:value="396" calcext:value-type="float">
            <text:p>396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79503" calcext:value-type="float">
            <text:p>579503</text:p>
          </table:table-cell>
          <table:table-cell office:value-type="float" office:value="156771" calcext:value-type="float">
            <text:p>156771</text:p>
          </table:table-cell>
          <table:table-cell office:value-type="float" office:value="3401" calcext:value-type="float">
            <text:p>3401</text:p>
          </table:table-cell>
          <table:table-cell office:value-type="float" office:value="1743" calcext:value-type="float">
            <text:p>1743</text:p>
          </table:table-cell>
          <table:table-cell office:value-type="float" office:value="1116" calcext:value-type="float">
            <text:p>1116</text:p>
          </table:table-cell>
          <table:table-cell table:number-columns-repeated="6"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63590" calcext:value-type="float">
            <text:p>563590</text:p>
          </table:table-cell>
          <table:table-cell office:value-type="float" office:value="152157" calcext:value-type="float">
            <text:p>152157</text:p>
          </table:table-cell>
          <table:table-cell office:value-type="float" office:value="2860" calcext:value-type="float">
            <text:p>2860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73014" calcext:value-type="float">
            <text:p>573014</text:p>
          </table:table-cell>
          <table:table-cell office:value-type="float" office:value="149937" calcext:value-type="float">
            <text:p>149937</text:p>
          </table:table-cell>
          <table:table-cell office:value-type="float" office:value="2654" calcext:value-type="float">
            <text:p>2654</text:p>
          </table:table-cell>
          <table:table-cell office:value-type="float" office:value="755" calcext:value-type="float">
            <text:p>755</text:p>
          </table:table-cell>
          <table:table-cell office:value-type="float" office:value="402" calcext:value-type="float">
            <text:p>402</text:p>
          </table:table-cell>
          <table:table-cell table:number-columns-repeated="6"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71346" calcext:value-type="float">
            <text:p>571346</text:p>
          </table:table-cell>
          <table:table-cell office:value-type="float" office:value="156872" calcext:value-type="float">
            <text:p>156872</text:p>
          </table:table-cell>
          <table:table-cell office:value-type="float" office:value="2810" calcext:value-type="float">
            <text:p>2810</text:p>
          </table:table-cell>
          <table:table-cell office:value-type="float" office:value="1077" calcext:value-type="float">
            <text:p>1077</text:p>
          </table:table-cell>
          <table:table-cell office:value-type="float" office:value="441" calcext:value-type="float">
            <text:p>441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X</text:p>
          </table:table-cell>
          <table:table-cell table:style-name="ce26" table:formula="of:=SUM([.B24:.B28])/5/100" office:value-type="float" office:value="5708.496" calcext:value-type="float">
            <text:p>5708.496</text:p>
          </table:table-cell>
          <table:table-cell table:style-name="ce46" table:formula="of:=SUM([.C24:.C28])/5/100" office:value-type="float" office:value="1529.872" calcext:value-type="float">
            <text:p>1529.872</text:p>
          </table:table-cell>
          <table:table-cell table:style-name="ce2" table:formula="of:=SUM([.D24:.D28])/5/100" office:value-type="float" office:value="26.008" calcext:value-type="float">
            <text:p>26.008</text:p>
          </table:table-cell>
          <table:table-cell table:style-name="ce2" table:formula="of:=SUM([.E24:.E28])/5/100" office:value-type="float" office:value="9.396" calcext:value-type="float">
            <text:p>9.396</text:p>
          </table:table-cell>
          <table:table-cell table:style-name="ce2" table:formula="of:=SUM([.F24:.F28])/5/100" office:value-type="float" office:value="4.874" calcext:value-type="float">
            <text:p>4.874</text:p>
          </table:table-cell>
          <table:table-cell table:style-name="ce5" office:value-type="string" calcext:value-type="string">
            <text:p>/ml</text:p>
          </table:table-cell>
          <table:table-cell office:value-type="string" calcext:value-type="string">
            <text:p>&lt; coincidence lim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X = </text:span><text:span text:style-name="T2">X </text:span><text:span text:style-name="T3">·V</text:span></text:p>
          </table:table-cell>
          <table:table-cell table:style-name="ce26" table:formula="of:=[.B29]*[.$B$15]" office:value-type="float" office:value="57084.96" calcext:value-type="float">
            <text:p>57084.96</text:p>
          </table:table-cell>
          <table:table-cell table:style-name="ce26" table:formula="of:=[.C29]*[.$B$15]" office:value-type="float" office:value="15298.72" calcext:value-type="float">
            <text:p>15298.72</text:p>
          </table:table-cell>
          <table:table-cell table:style-name="ce26" table:formula="of:=[.D29]*[.$B$15]" office:value-type="float" office:value="260.08" calcext:value-type="float">
            <text:p>260.08</text:p>
          </table:table-cell>
          <table:table-cell table:style-name="ce26" table:formula="of:=[.E29]*[.$B$15]" office:value-type="float" office:value="93.96" calcext:value-type="float">
            <text:p>93.96</text:p>
          </table:table-cell>
          <table:table-cell table:style-name="ce26" table:formula="of:=[.F29]*[.$B$15]" office:value-type="float" office:value="48.74" calcext:value-type="float">
            <text:p>48.74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N = 5X</text:p>
          </table:table-cell>
          <table:table-cell table:style-name="ce26" table:formula="of:=[.B30]*5" office:value-type="float" office:value="285424.8" calcext:value-type="float">
            <text:p>285424.8</text:p>
          </table:table-cell>
          <table:table-cell table:style-name="ce26" table:formula="of:=[.C30]*5" office:value-type="float" office:value="76493.6" calcext:value-type="float">
            <text:p>76493.6</text:p>
          </table:table-cell>
          <table:table-cell table:style-name="ce26" table:formula="of:=[.D30]*5" office:value-type="float" office:value="1300.4" calcext:value-type="float">
            <text:p>1300.4</text:p>
          </table:table-cell>
          <table:table-cell table:style-name="ce26" table:formula="of:=[.E30]*5" office:value-type="float" office:value="469.8" calcext:value-type="float">
            <text:p>469.8</text:p>
          </table:table-cell>
          <table:table-cell table:style-name="ce26" table:formula="of:=[.F30]*5" office:value-type="float" office:value="243.7" calcext:value-type="float">
            <text:p>243.7</text:p>
          </table:table-cell>
          <table:table-cell table:style-name="ce5" office:value-type="string" calcext:value-type="string">
            <text:p>&gt;1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text:span text:style-name="T4">Q</text:span></text:p>
          </table:table-cell>
          <table:table-cell table:style-name="ce27" table:formula="of:=(MAX([.B24:.B28])-MIN([.B24:.B28]))/100/[.B29]" office:value-type="percentage" office:value="0.0278759939570773" calcext:value-type="percentage">
            <text:p>2.79%</text:p>
          </table:table-cell>
          <table:table-cell table:style-name="ce27" table:formula="of:=(MAX([.C24:.C28])-MIN([.C24:.C28]))/[.C29]/100" office:value-type="percentage" office:value="0.0501545227313135" calcext:value-type="percentage">
            <text:p>5.02%</text:p>
          </table:table-cell>
          <table:table-cell table:style-name="ce27" table:formula="of:=(MAX([.D24:.D28])-MIN([.D24:.D28]))/[.D29]/100" office:value-type="percentage" office:value="0.815902799138727" calcext:value-type="percentage">
            <text:p>81.59%</text:p>
          </table:table-cell>
          <table:table-cell table:style-name="ce27" table:formula="of:=(MAX([.E24:.E28])-MIN([.E24:.E28]))/[.E29]/100" office:value-type="percentage" office:value="1.43358876117497" calcext:value-type="percentage">
            <text:p>143.36%</text:p>
          </table:table-cell>
          <table:table-cell table:style-name="ce27" table:formula="of:=(MAX([.F24:.F28])-MIN([.F24:.F28]))/[.F29]/100" office:value-type="percentage" office:value="1.81370537546163" calcext:value-type="percentage">
            <text:p>181.37%</text:p>
          </table:table-cell>
          <table:table-cell table:style-name="ce5" office:value-type="string" calcext:value-type="string">
            <text:p>&lt;11%</text:p>
          </table:table-cell>
          <table:table-cell office:value-type="string" calcext:value-type="string">
            <text:p>Table C.2</text:p>
          </table:table-cell>
          <table:table-cell table:number-columns-repeated="1016"/>
        </table:table-row>
        <table:table-row table:style-name="ro2" table:number-rows-repeated="4">
          <table:table-cell/>
          <table:table-cell table:style-name="ce26"/>
          <table:table-cell table:style-name="ce46"/>
          <table:table-cell table:style-name="ce2" table:number-columns-repeated="3"/>
          <table:table-cell table:style-name="ce5"/>
          <table:table-cell table:number-columns-repeated="1017"/>
        </table:table-row>
        <table:table-row table:style-name="ro2">
          <table:table-cell table:style-name="ce5" office:value-type="string" calcext:value-type="string">
            <text:p>Sample 2</text:p>
          </table:table-cell>
          <table:table-cell office:value-type="float" office:value="555791" calcext:value-type="float">
            <text:p>555791</text:p>
          </table:table-cell>
          <table:table-cell office:value-type="float" office:value="149419" calcext:value-type="float">
            <text:p>149419</text:p>
          </table:table-cell>
          <table:table-cell office:value-type="float" office:value="3300" calcext:value-type="float">
            <text:p>3300</text:p>
          </table:table-cell>
          <table:table-cell office:value-type="float" office:value="1175" calcext:value-type="float">
            <text:p>1175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float" office:value="562606" calcext:value-type="float">
            <text:p>562606</text:p>
          </table:table-cell>
          <table:table-cell office:value-type="float" office:value="147908" calcext:value-type="float">
            <text:p>147908</text:p>
          </table:table-cell>
          <table:table-cell office:value-type="float" office:value="3179" calcext:value-type="float">
            <text:p>3179</text:p>
          </table:table-cell>
          <table:table-cell office:value-type="float" office:value="1093" calcext:value-type="float">
            <text:p>1093</text:p>
          </table:table-cell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2956" calcext:value-type="float">
            <text:p>582956</text:p>
          </table:table-cell>
          <table:table-cell office:value-type="float" office:value="154017" calcext:value-type="float">
            <text:p>154017</text:p>
          </table:table-cell>
          <table:table-cell office:value-type="float" office:value="4809" calcext:value-type="float">
            <text:p>4809</text:p>
          </table:table-cell>
          <table:table-cell office:value-type="float" office:value="2332" calcext:value-type="float">
            <text:p>2332</text:p>
          </table:table-cell>
          <table:table-cell office:value-type="float" office:value="1429" calcext:value-type="float">
            <text:p>142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6933" calcext:value-type="float">
            <text:p>576933</text:p>
          </table:table-cell>
          <table:table-cell office:value-type="float" office:value="151764" calcext:value-type="float">
            <text:p>151764</text:p>
          </table:table-cell>
          <table:table-cell office:value-type="float" office:value="1972" calcext:value-type="float">
            <text:p>1972</text:p>
          </table:table-cell>
          <table:table-cell office:value-type="float" office:value="536" calcext:value-type="float">
            <text:p>536</text:p>
          </table:table-cell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2840" calcext:value-type="float">
            <text:p>592840</text:p>
          </table:table-cell>
          <table:table-cell office:value-type="float" office:value="155892" calcext:value-type="float">
            <text:p>155892</text:p>
          </table:table-cell>
          <table:table-cell office:value-type="float" office:value="2203" calcext:value-type="float">
            <text:p>2203</text:p>
          </table:table-cell>
          <table:table-cell office:value-type="float" office:value="606" calcext:value-type="float">
            <text:p>606</text:p>
          </table:table-cell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2">
          <table:table-cell/>
          <table:table-cell table:style-name="ce28" table:formula="of:=SUM([.B37:.B41])/5/100" office:value-type="float" office:value="5742.252" calcext:value-type="float">
            <text:p>5742.252</text:p>
          </table:table-cell>
          <table:table-cell table:style-name="ce47" table:formula="of:=SUM([.C37:.C41])/5/100" office:value-type="float" office:value="1518" calcext:value-type="float">
            <text:p>1518</text:p>
          </table:table-cell>
          <table:table-cell table:style-name="ce2" table:formula="of:=SUM([.D37:.D41])/5/100" office:value-type="float" office:value="30.926" calcext:value-type="float">
            <text:p>30.926</text:p>
          </table:table-cell>
          <table:table-cell table:style-name="ce2" table:formula="of:=SUM([.E37:.E41])/5/100" office:value-type="float" office:value="11.484" calcext:value-type="float">
            <text:p>11.484</text:p>
          </table:table-cell>
          <table:table-cell table:style-name="ce2" table:formula="of:=SUM([.F37:.F41])/5/100" office:value-type="float" office:value="5.426" calcext:value-type="float">
            <text:p>5.426</text:p>
          </table:table-cell>
          <table:table-cell table:style-name="ce5" office:value-type="string" calcext:value-type="string">
            <text:p>/ml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ample 3</text:p>
          </table:table-cell>
          <table:table-cell office:value-type="float" office:value="568449" calcext:value-type="float">
            <text:p>568449</text:p>
          </table:table-cell>
          <table:table-cell office:value-type="float" office:value="149256" calcext:value-type="float">
            <text:p>149256</text:p>
          </table:table-cell>
          <table:table-cell office:value-type="float" office:value="1346" calcext:value-type="float">
            <text:p>1346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64341" calcext:value-type="float">
            <text:p>564341</text:p>
          </table:table-cell>
          <table:table-cell office:value-type="float" office:value="148494" calcext:value-type="float">
            <text:p>148494</text:p>
          </table:table-cell>
          <table:table-cell office:value-type="float" office:value="2019" calcext:value-type="float">
            <text:p>2019</text:p>
          </table:table-cell>
          <table:table-cell office:value-type="float" office:value="1098" calcext:value-type="float">
            <text:p>1098</text:p>
          </table:table-cell>
          <table:table-cell office:value-type="float" office:value="600" calcext:value-type="float">
            <text:p>600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88596" calcext:value-type="float">
            <text:p>588596</text:p>
          </table:table-cell>
          <table:table-cell office:value-type="float" office:value="159498" calcext:value-type="float">
            <text:p>159498</text:p>
          </table:table-cell>
          <table:table-cell office:value-type="float" office:value="4975" calcext:value-type="float">
            <text:p>4975</text:p>
          </table:table-cell>
          <table:table-cell office:value-type="float" office:value="1727" calcext:value-type="float">
            <text:p>1727</text:p>
          </table:table-cell>
          <table:table-cell office:value-type="float" office:value="506" calcext:value-type="float">
            <text:p>506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60674" calcext:value-type="float">
            <text:p>560674</text:p>
          </table:table-cell>
          <table:table-cell office:value-type="float" office:value="150018" calcext:value-type="float">
            <text:p>150018</text:p>
          </table:table-cell>
          <table:table-cell office:value-type="float" office:value="2185" calcext:value-type="float">
            <text:p>2185</text:p>
          </table:table-cell>
          <table:table-cell office:value-type="float" office:value="840" calcext:value-type="float">
            <text:p>840</text:p>
          </table:table-cell>
          <table:table-cell office:value-type="float" office:value="349" calcext:value-type="float">
            <text:p>349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84006" calcext:value-type="float">
            <text:p>584006</text:p>
          </table:table-cell>
          <table:table-cell office:value-type="float" office:value="153866" calcext:value-type="float">
            <text:p>153866</text:p>
          </table:table-cell>
          <table:table-cell office:value-type="float" office:value="2303" calcext:value-type="float">
            <text:p>2303</text:p>
          </table:table-cell>
          <table:table-cell office:value-type="float" office:value="712" calcext:value-type="float">
            <text:p>712</text:p>
          </table:table-cell>
          <table:table-cell office:value-type="float" office:value="254" calcext:value-type="float">
            <text:p>254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table:style-name="ce28" table:formula="of:=SUM([.B43:.B47])/5/100" office:value-type="float" office:value="5732.132" calcext:value-type="float">
            <text:p>5732.132</text:p>
          </table:table-cell>
          <table:table-cell table:style-name="ce47" table:formula="of:=SUM([.C43:.C47])/5/100" office:value-type="float" office:value="1522.264" calcext:value-type="float">
            <text:p>1522.264</text:p>
          </table:table-cell>
          <table:table-cell table:style-name="ce2" table:formula="of:=SUM([.D43:.D47])/5/100" office:value-type="float" office:value="25.656" calcext:value-type="float">
            <text:p>25.656</text:p>
          </table:table-cell>
          <table:table-cell table:style-name="ce2" table:formula="of:=SUM([.E43:.E47])/5/100" office:value-type="float" office:value="9.632" calcext:value-type="float">
            <text:p>9.632</text:p>
          </table:table-cell>
          <table:table-cell table:style-name="ce2" table:formula="of:=SUM([.F43:.F47])/5/100" office:value-type="float" office:value="3.818" calcext:value-type="float">
            <text:p>3.818</text:p>
          </table:table-cell>
          <table:table-cell table:style-name="ce5" office:value-type="string" calcext:value-type="string">
            <text:p>/ml</text:p>
          </table:table-cell>
          <table:table-cell table:number-columns-repeated="7"/>
          <table:table-cell office:value-type="string" calcext:value-type="string">
            <text:p>Table A.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15"/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number-columns-repeated="1006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24]*[.$B$18]" office:value-type="float" office:value="39675.65" calcext:value-type="float">
            <text:p>39676</text:p>
          </table:table-cell>
          <table:table-cell table:style-name="ce15" table:formula="of:=([.B58]-[.B$83])/[.B$83]" office:value-type="percentage" office:value="-0.0104190915609026" calcext:value-type="percentage">
            <text:p>-1.04%</text:p>
          </table:table-cell>
          <table:table-cell table:style-name="ce14" table:formula="of:=[.C24]*[.$B$18]" office:value-type="float" office:value="10443.93" calcext:value-type="float">
            <text:p>10444</text:p>
          </table:table-cell>
          <table:table-cell table:style-name="ce15" table:formula="of:=([.D58]-[.D$83])/[.D$83]" office:value-type="percentage" office:value="-0.0206046384615249" calcext:value-type="percentage">
            <text:p>-2.06%</text:p>
          </table:table-cell>
          <table:table-cell table:style-name="ce14" table:formula="of:=[.D24]*[.$B$18]" office:value-type="float" office:value="89.53" calcext:value-type="float">
            <text:p>90</text:p>
          </table:table-cell>
          <table:table-cell table:style-name="ce15" table:formula="of:=([.F58]-[.F$83])/[.F$83]" office:value-type="percentage" office:value="-0.535415909916455" calcext:value-type="percentage">
            <text:p>-53.54%</text:p>
          </table:table-cell>
          <table:table-cell table:style-name="ce14" table:formula="of:=[.E24]*[.$B$18]" office:value-type="float" office:value="27.72" calcext:value-type="float">
            <text:p>28</text:p>
          </table:table-cell>
          <table:table-cell table:style-name="ce15" table:formula="of:=([.H58]-[.H$83])/[.H$83]" office:value-type="percentage" office:value="-0.610644992134242" calcext:value-type="percentage">
            <text:p>-61.06%</text:p>
          </table:table-cell>
          <table:table-cell table:style-name="ce14" table:formula="of:=[.F24]*[.$B$18]" office:value-type="float" office:value="17.22" calcext:value-type="float">
            <text:p>17</text:p>
          </table:table-cell>
          <table:table-cell table:style-name="ce15" table:formula="of:=([.J58]-[.J$83])/[.J$83]" office:value-type="percentage" office:value="-0.477263068423289" calcext:value-type="percentage">
            <text:p>-47.73%</text:p>
          </table:table-cell>
          <table:table-cell table:number-columns-repeated="3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25]*[.$B$18]" office:value-type="float" office:value="40565.21" calcext:value-type="float">
            <text:p>40565</text:p>
          </table:table-cell>
          <table:table-cell table:style-name="ce15" table:formula="of:=([.B59]-[.B$83])/[.B$83]" office:value-type="percentage" office:value="0.01176810872217" calcext:value-type="percentage">
            <text:p>1.18%</text:p>
          </table:table-cell>
          <table:table-cell table:style-name="ce14" table:formula="of:=[.C25]*[.$B$18]" office:value-type="float" office:value="10973.97" calcext:value-type="float">
            <text:p>10974</text:p>
          </table:table-cell>
          <table:table-cell table:style-name="ce15" table:formula="of:=([.D59]-[.D$83])/[.D$83]" office:value-type="percentage" office:value="0.0291006657132306" calcext:value-type="percentage">
            <text:p>2.91%</text:p>
          </table:table-cell>
          <table:table-cell table:style-name="ce14" table:formula="of:=[.D25]*[.$B$18]" office:value-type="float" office:value="238.07" calcext:value-type="float">
            <text:p>238</text:p>
          </table:table-cell>
          <table:table-cell table:style-name="ce15" table:formula="of:=([.F59]-[.F$83])/[.F$83]" office:value-type="percentage" office:value="0.235379585906284" calcext:value-type="percentage">
            <text:p>23.54%</text:p>
          </table:table-cell>
          <table:table-cell table:style-name="ce14" table:formula="of:=[.E25]*[.$B$18]" office:value-type="float" office:value="122.01" calcext:value-type="float">
            <text:p>122</text:p>
          </table:table-cell>
          <table:table-cell table:style-name="ce15" table:formula="of:=([.H59]-[.H$83])/[.H$83]" office:value-type="percentage" office:value="0.713751966439434" calcext:value-type="percentage">
            <text:p>71.38%</text:p>
          </table:table-cell>
          <table:table-cell table:style-name="ce14" table:formula="of:=[.F25]*[.$B$18]" office:value-type="float" office:value="78.12" calcext:value-type="float">
            <text:p>78</text:p>
          </table:table-cell>
          <table:table-cell table:style-name="ce15" table:formula="of:=([.J59]-[.J$83])/[.J$83]" office:value-type="percentage" office:value="1.37144071398215" calcext:value-type="percentage">
            <text:p>137.14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26]*[.$B$18]" office:value-type="float" office:value="39451.3" calcext:value-type="float">
            <text:p>39451</text:p>
          </table:table-cell>
          <table:table-cell table:style-name="ce15" table:formula="of:=([.B60]-[.B$83])/[.B$83]" office:value-type="percentage" office:value="-0.0160147774994647" calcext:value-type="percentage">
            <text:p>-1.60%</text:p>
          </table:table-cell>
          <table:table-cell table:style-name="ce14" table:formula="of:=[.C26]*[.$B$18]" office:value-type="float" office:value="10650.99" calcext:value-type="float">
            <text:p>10651</text:p>
          </table:table-cell>
          <table:table-cell table:style-name="ce15" table:formula="of:=([.D60]-[.D$83])/[.D$83]" office:value-type="percentage" office:value="-0.00118727320149755" calcext:value-type="percentage">
            <text:p>-0.12%</text:p>
          </table:table-cell>
          <table:table-cell table:style-name="ce14" table:formula="of:=[.D26]*[.$B$18]" office:value-type="float" office:value="200.2" calcext:value-type="float">
            <text:p>200</text:p>
          </table:table-cell>
          <table:table-cell table:style-name="ce15" table:formula="of:=([.F60]-[.F$83])/[.F$83]" office:value-type="percentage" office:value="0.0388666908826733" calcext:value-type="percentage">
            <text:p>3.89%</text:p>
          </table:table-cell>
          <table:table-cell table:style-name="ce14" table:formula="of:=[.E26]*[.$B$18]" office:value-type="float" office:value="50.89" calcext:value-type="float">
            <text:p>51</text:p>
          </table:table-cell>
          <table:table-cell table:style-name="ce15" table:formula="of:=([.H60]-[.H$83])/[.H$83]" office:value-type="percentage" office:value="-0.285199265862611" calcext:value-type="percentage">
            <text:p>-28.52%</text:p>
          </table:table-cell>
          <table:table-cell table:style-name="ce14" table:formula="of:=[.F26]*[.$B$18]" office:value-type="float" office:value="16.24" calcext:value-type="float">
            <text:p>16</text:p>
          </table:table-cell>
          <table:table-cell table:style-name="ce15" table:formula="of:=([.J60]-[.J$83])/[.J$83]" office:value-type="percentage" office:value="-0.507012324691883" calcext:value-type="percentage">
            <text:p>-50.7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27]*[.$B$18]" office:value-type="float" office:value="40110.98" calcext:value-type="float">
            <text:p>40111</text:p>
          </table:table-cell>
          <table:table-cell table:style-name="ce15" table:formula="of:=([.B61]-[.B$83])/[.B$83]" office:value-type="percentage" office:value="0.000438808860912652" calcext:value-type="percentage">
            <text:p>0.04%</text:p>
          </table:table-cell>
          <table:table-cell table:style-name="ce14" table:formula="of:=[.C27]*[.$B$18]" office:value-type="float" office:value="10495.59" calcext:value-type="float">
            <text:p>10496</text:p>
          </table:table-cell>
          <table:table-cell table:style-name="ce15" table:formula="of:=([.D61]-[.D$83])/[.D$83]" office:value-type="percentage" office:value="-0.0157601436806257" calcext:value-type="percentage">
            <text:p>-1.58%</text:p>
          </table:table-cell>
          <table:table-cell table:style-name="ce14" table:formula="of:=[.D27]*[.$B$18]" office:value-type="float" office:value="185.78" calcext:value-type="float">
            <text:p>186</text:p>
          </table:table-cell>
          <table:table-cell table:style-name="ce15" table:formula="of:=([.F61]-[.F$83])/[.F$83]" office:value-type="percentage" office:value="-0.0359607700690157" calcext:value-type="percentage">
            <text:p>-3.60%</text:p>
          </table:table-cell>
          <table:table-cell table:style-name="ce14" table:formula="of:=[.E27]*[.$B$18]" office:value-type="float" office:value="52.85" calcext:value-type="float">
            <text:p>53</text:p>
          </table:table-cell>
          <table:table-cell table:style-name="ce15" table:formula="of:=([.H61]-[.H$83])/[.H$83]" office:value-type="percentage" office:value="-0.257669113791295" calcext:value-type="percentage">
            <text:p>-25.77%</text:p>
          </table:table-cell>
          <table:table-cell table:style-name="ce14" table:formula="of:=[.F27]*[.$B$18]" office:value-type="float" office:value="28.14" calcext:value-type="float">
            <text:p>28</text:p>
          </table:table-cell>
          <table:table-cell table:style-name="ce15" table:formula="of:=([.J61]-[.J$83])/[.J$83]" office:value-type="percentage" office:value="-0.145771355716107" calcext:value-type="percentage">
            <text:p>-14.58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28]*[.$B$18]" office:value-type="float" office:value="39994.22" calcext:value-type="float">
            <text:p>39994</text:p>
          </table:table-cell>
          <table:table-cell table:style-name="ce15" table:formula="of:=([.B62]-[.B$83])/[.B$83]" office:value-type="percentage" office:value="-0.00247339212052939" calcext:value-type="percentage">
            <text:p>-0.25%</text:p>
          </table:table-cell>
          <table:table-cell table:style-name="ce14" table:formula="of:=[.C28]*[.$B$18]" office:value-type="float" office:value="10981.04" calcext:value-type="float">
            <text:p>10981</text:p>
          </table:table-cell>
          <table:table-cell table:style-name="ce15" table:formula="of:=([.D62]-[.D$83])/[.D$83]" office:value-type="percentage" office:value="0.0297636656764701" calcext:value-type="percentage">
            <text:p>2.98%</text:p>
          </table:table-cell>
          <table:table-cell table:style-name="ce14" table:formula="of:=[.D28]*[.$B$18]" office:value-type="float" office:value="196.7" calcext:value-type="float">
            <text:p>197</text:p>
          </table:table-cell>
          <table:table-cell table:style-name="ce15" table:formula="of:=([.F62]-[.F$83])/[.F$83]" office:value-type="percentage" office:value="0.0207046857973119" calcext:value-type="percentage">
            <text:p>2.07%</text:p>
          </table:table-cell>
          <table:table-cell table:style-name="ce14" table:formula="of:=[.E28]*[.$B$18]" office:value-type="float" office:value="75.39" calcext:value-type="float">
            <text:p>75</text:p>
          </table:table-cell>
          <table:table-cell table:style-name="ce15" table:formula="of:=([.H62]-[.H$83])/[.H$83]" office:value-type="percentage" office:value="0.058927635028841" calcext:value-type="percentage">
            <text:p>5.89%</text:p>
          </table:table-cell>
          <table:table-cell table:style-name="ce14" table:formula="of:=[.F28]*[.$B$18]" office:value-type="float" office:value="30.87" calcext:value-type="float">
            <text:p>31</text:p>
          </table:table-cell>
          <table:table-cell table:style-name="ce15" table:formula="of:=([.J62]-[.J$83])/[.J$83]" office:value-type="percentage" office:value="-0.0628984275393114" calcext:value-type="percentage">
            <text:p>-6.29%</text:p>
          </table:table-cell>
          <table:table-cell table:number-columns-repeated="1013"/>
        </table:table-row>
        <table:table-row table:style-name="ro2">
          <table:table-cell table:number-columns-repeated="11"/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37]*[.$B$18]" office:value-type="float" office:value="38905.37" calcext:value-type="float">
            <text:p>38905</text:p>
          </table:table-cell>
          <table:table-cell table:style-name="ce15" table:formula="of:=([.B64]-[.B$83])/[.B$83]" office:value-type="percentage" office:value="-0.0296312376039407" calcext:value-type="percentage">
            <text:p>-2.96%</text:p>
          </table:table-cell>
          <table:table-cell table:style-name="ce14" table:formula="of:=[.C37]*[.$B$18]" office:value-type="float" office:value="10459.33" calcext:value-type="float">
            <text:p>10459</text:p>
          </table:table-cell>
          <table:table-cell table:style-name="ce15" table:formula="of:=([.D64]-[.D$83])/[.D$83]" office:value-type="percentage" office:value="-0.0191604801257554" calcext:value-type="percentage">
            <text:p>-1.92%</text:p>
          </table:table-cell>
          <table:table-cell table:style-name="ce14" table:formula="of:=[.D37]*[.$B$18]" office:value-type="float" office:value="231" calcext:value-type="float">
            <text:p>231</text:p>
          </table:table-cell>
          <table:table-cell table:style-name="ce15" table:formula="of:=([.F64]-[.F$83])/[.F$83]" office:value-type="percentage" office:value="0.198692335633854" calcext:value-type="percentage">
            <text:p>19.87%</text:p>
          </table:table-cell>
          <table:table-cell table:style-name="ce14" table:formula="of:=[.E37]*[.$B$18]" office:value-type="float" office:value="82.25" calcext:value-type="float">
            <text:p>82</text:p>
          </table:table-cell>
          <table:table-cell table:style-name="ce15" table:formula="of:=([.H64]-[.H$83])/[.H$83]" office:value-type="percentage" office:value="0.155283167278448" calcext:value-type="percentage">
            <text:p>15.53%</text:p>
          </table:table-cell>
          <table:table-cell table:style-name="ce14" table:formula="of:=[.F37]*[.$B$18]" office:value-type="float" office:value="32.2" calcext:value-type="float">
            <text:p>32</text:p>
          </table:table-cell>
          <table:table-cell table:style-name="ce15" table:formula="of:=([.J64]-[.J$83])/[.J$83]" office:value-type="percentage" office:value="-0.0225244368890777" calcext:value-type="percentage">
            <text:p>-2.25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38]*[.$B$18]" office:value-type="float" office:value="39382.42" calcext:value-type="float">
            <text:p>39382</text:p>
          </table:table-cell>
          <table:table-cell table:style-name="ce15" table:formula="of:=([.B65]-[.B$83])/[.B$83]" office:value-type="percentage" office:value="-0.0177327665676534" calcext:value-type="percentage">
            <text:p>-1.77%</text:p>
          </table:table-cell>
          <table:table-cell table:style-name="ce14" table:formula="of:=[.C38]*[.$B$18]" office:value-type="float" office:value="10353.56" calcext:value-type="float">
            <text:p>10354</text:p>
          </table:table-cell>
          <table:table-cell table:style-name="ce15" table:formula="of:=([.D65]-[.D$83])/[.D$83]" office:value-type="percentage" office:value="-0.0290792221500628" calcext:value-type="percentage">
            <text:p>-2.91%</text:p>
          </table:table-cell>
          <table:table-cell table:style-name="ce14" table:formula="of:=[.D38]*[.$B$18]" office:value-type="float" office:value="222.53" calcext:value-type="float">
            <text:p>223</text:p>
          </table:table-cell>
          <table:table-cell table:style-name="ce15" table:formula="of:=([.F65]-[.F$83])/[.F$83]" office:value-type="percentage" office:value="0.154740283327279" calcext:value-type="percentage">
            <text:p>15.47%</text:p>
          </table:table-cell>
          <table:table-cell table:style-name="ce14" table:formula="of:=[.E38]*[.$B$18]" office:value-type="float" office:value="76.51" calcext:value-type="float">
            <text:p>77</text:p>
          </table:table-cell>
          <table:table-cell table:style-name="ce15" table:formula="of:=([.H65]-[.H$83])/[.H$83]" office:value-type="percentage" office:value="0.0746591504981646" calcext:value-type="percentage">
            <text:p>7.47%</text:p>
          </table:table-cell>
          <table:table-cell table:style-name="ce14" table:formula="of:=[.F38]*[.$B$18]" office:value-type="float" office:value="20.86" calcext:value-type="float">
            <text:p>21</text:p>
          </table:table-cell>
          <table:table-cell table:style-name="ce15" table:formula="of:=([.J65]-[.J$83])/[.J$83]" office:value-type="percentage" office:value="-0.366765830854229" calcext:value-type="percentage">
            <text:p>-36.68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39]*[.$B$18]" office:value-type="float" office:value="40806.92" calcext:value-type="float">
            <text:p>40807</text:p>
          </table:table-cell>
          <table:table-cell table:style-name="ce15" table:formula="of:=([.B66]-[.B$83])/[.B$83]" office:value-type="percentage" office:value="0.0177967837754788" calcext:value-type="percentage">
            <text:p>1.78%</text:p>
          </table:table-cell>
          <table:table-cell table:style-name="ce14" table:formula="of:=[.C39]*[.$B$18]" office:value-type="float" office:value="10781.19" calcext:value-type="float">
            <text:p>10781</text:p>
          </table:table-cell>
          <table:table-cell table:style-name="ce15" table:formula="of:=([.D66]-[.D$83])/[.D$83]" office:value-type="percentage" office:value="0.0110224290918258" calcext:value-type="percentage">
            <text:p>1.10%</text:p>
          </table:table-cell>
          <table:table-cell table:style-name="ce14" table:formula="of:=[.D39]*[.$B$18]" office:value-type="float" office:value="336.63" calcext:value-type="float">
            <text:p>337</text:p>
          </table:table-cell>
          <table:table-cell table:style-name="ce15" table:formula="of:=([.F66]-[.F$83])/[.F$83]" office:value-type="percentage" office:value="0.746821649110062" calcext:value-type="percentage">
            <text:p>74.68%</text:p>
          </table:table-cell>
          <table:table-cell table:style-name="ce14" table:formula="of:=[.E39]*[.$B$18]" office:value-type="float" office:value="163.24" calcext:value-type="float">
            <text:p>163</text:p>
          </table:table-cell>
          <table:table-cell table:style-name="ce15" table:formula="of:=([.H66]-[.H$83])/[.H$83]" office:value-type="percentage" office:value="1.29286837965391" calcext:value-type="percentage">
            <text:p>129.29%</text:p>
          </table:table-cell>
          <table:table-cell table:style-name="ce14" table:formula="of:=[.F39]*[.$B$18]" office:value-type="float" office:value="100.03" calcext:value-type="float">
            <text:p>100</text:p>
          </table:table-cell>
          <table:table-cell table:style-name="ce15" table:formula="of:=([.J66]-[.J$83])/[.J$83]" office:value-type="percentage" office:value="2.03654908627284" calcext:value-type="percentage">
            <text:p>203.65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40]*[.$B$18]" office:value-type="float" office:value="40385.31" calcext:value-type="float">
            <text:p>40385</text:p>
          </table:table-cell>
          <table:table-cell table:style-name="ce15" table:formula="of:=([.B67]-[.B$83])/[.B$83]" office:value-type="percentage" office:value="0.00728108442822155" calcext:value-type="percentage">
            <text:p>0.73%</text:p>
          </table:table-cell>
          <table:table-cell table:style-name="ce14" table:formula="of:=[.C40]*[.$B$18]" office:value-type="float" office:value="10623.48" calcext:value-type="float">
            <text:p>10623</text:p>
          </table:table-cell>
          <table:table-cell table:style-name="ce15" table:formula="of:=([.D67]-[.D$83])/[.D$83]" office:value-type="percentage" office:value="-0.00376706513766752" calcext:value-type="percentage">
            <text:p>-0.38%</text:p>
          </table:table-cell>
          <table:table-cell table:style-name="ce14" table:formula="of:=[.D40]*[.$B$18]" office:value-type="float" office:value="138.04" calcext:value-type="float">
            <text:p>138</text:p>
          </table:table-cell>
          <table:table-cell table:style-name="ce15" table:formula="of:=([.F67]-[.F$83])/[.F$83]" office:value-type="percentage" office:value="-0.283690519433345" calcext:value-type="percentage">
            <text:p>-28.37%</text:p>
          </table:table-cell>
          <table:table-cell table:style-name="ce14" table:formula="of:=[.E40]*[.$B$18]" office:value-type="float" office:value="37.52" calcext:value-type="float">
            <text:p>38</text:p>
          </table:table-cell>
          <table:table-cell table:style-name="ce15" table:formula="of:=([.H67]-[.H$83])/[.H$83]" office:value-type="percentage" office:value="-0.472994231777661" calcext:value-type="percentage">
            <text:p>-47.30%</text:p>
          </table:table-cell>
          <table:table-cell table:style-name="ce14" table:formula="of:=[.F40]*[.$B$18]" office:value-type="float" office:value="17.57" calcext:value-type="float">
            <text:p>18</text:p>
          </table:table-cell>
          <table:table-cell table:style-name="ce15" table:formula="of:=([.J67]-[.J$83])/[.J$83]" office:value-type="percentage" office:value="-0.466638334041649" calcext:value-type="percentage">
            <text:p>-46.66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41]*[.$B$18]" office:value-type="float" office:value="41498.8" calcext:value-type="float">
            <text:p>41499</text:p>
          </table:table-cell>
          <table:table-cell table:style-name="ce15" table:formula="of:=([.B68]-[.B$83])/[.B$83]" office:value-type="percentage" office:value="0.0350534951067573" calcext:value-type="percentage">
            <text:p>3.51%</text:p>
          </table:table-cell>
          <table:table-cell table:style-name="ce14" table:formula="of:=[.C41]*[.$B$18]" office:value-type="float" office:value="10912.44" calcext:value-type="float">
            <text:p>10912</text:p>
          </table:table-cell>
          <table:table-cell table:style-name="ce15" table:formula="of:=([.D68]-[.D$83])/[.D$83]" office:value-type="percentage" office:value="0.0233305967262244" calcext:value-type="percentage">
            <text:p>2.33%</text:p>
          </table:table-cell>
          <table:table-cell table:style-name="ce14" table:formula="of:=[.D41]*[.$B$18]" office:value-type="float" office:value="154.21" calcext:value-type="float">
            <text:p>154</text:p>
          </table:table-cell>
          <table:table-cell table:style-name="ce15" table:formula="of:=([.F68]-[.F$83])/[.F$83]" office:value-type="percentage" office:value="-0.199782055938976" calcext:value-type="percentage">
            <text:p>-19.98%</text:p>
          </table:table-cell>
          <table:table-cell table:style-name="ce14" table:formula="of:=[.E41]*[.$B$18]" office:value-type="float" office:value="42.42" calcext:value-type="float">
            <text:p>42</text:p>
          </table:table-cell>
          <table:table-cell table:style-name="ce15" table:formula="of:=([.H68]-[.H$83])/[.H$83]" office:value-type="percentage" office:value="-0.404168851599371" calcext:value-type="percentage">
            <text:p>-40.42%</text:p>
          </table:table-cell>
          <table:table-cell table:style-name="ce14" table:formula="of:=[.F41]*[.$B$18]" office:value-type="float" office:value="19.25" calcext:value-type="float">
            <text:p>19</text:p>
          </table:table-cell>
          <table:table-cell table:style-name="ce15" table:formula="of:=([.J68]-[.J$83])/[.J$83]" office:value-type="percentage" office:value="-0.415639609009775" calcext:value-type="percentage">
            <text:p>-41.56%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11"/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B43]*[.$B$18]" office:value-type="float" office:value="39791.43" calcext:value-type="float">
            <text:p>39791</text:p>
          </table:table-cell>
          <table:table-cell table:style-name="ce15" table:formula="of:=([.B70]-[.B$83])/[.B$83]" office:value-type="percentage" office:value="-0.00753133351335762" calcext:value-type="percentage">
            <text:p>-0.75%</text:p>
          </table:table-cell>
          <table:table-cell table:style-name="ce14" table:formula="of:=[.C43]*[.$B$18]" office:value-type="float" office:value="10447.92" calcext:value-type="float">
            <text:p>10448</text:p>
          </table:table-cell>
          <table:table-cell table:style-name="ce15" table:formula="of:=([.D70]-[.D$83])/[.D$83]" office:value-type="percentage" office:value="-0.0202304701654391" calcext:value-type="percentage">
            <text:p>-2.02%</text:p>
          </table:table-cell>
          <table:table-cell table:style-name="ce14" table:formula="of:=[.D43]*[.$B$18]" office:value-type="float" office:value="94.22" calcext:value-type="float">
            <text:p>94</text:p>
          </table:table-cell>
          <table:table-cell table:style-name="ce15" table:formula="of:=([.F70]-[.F$83])/[.F$83]" office:value-type="percentage" office:value="-0.511078823102071" calcext:value-type="percentage">
            <text:p>-51.11%</text:p>
          </table:table-cell>
          <table:table-cell table:style-name="ce14" table:formula="of:=[.E43]*[.$B$18]" office:value-type="float" office:value="30.73" calcext:value-type="float">
            <text:p>31</text:p>
          </table:table-cell>
          <table:table-cell table:style-name="ce15" table:formula="of:=([.H70]-[.H$83])/[.H$83]" office:value-type="percentage" office:value="-0.568366544310435" calcext:value-type="percentage">
            <text:p>-56.84%</text:p>
          </table:table-cell>
          <table:table-cell table:style-name="ce14" table:formula="of:=[.F43]*[.$B$18]" office:value-type="float" office:value="14" calcext:value-type="float">
            <text:p>14</text:p>
          </table:table-cell>
          <table:table-cell table:style-name="ce15" table:formula="of:=([.J70]-[.J$83])/[.J$83]" office:value-type="percentage" office:value="-0.575010624734382" calcext:value-type="percentage">
            <text:p>-57.50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B44]*[.$B$18]" office:value-type="float" office:value="39503.87" calcext:value-type="float">
            <text:p>39504</text:p>
          </table:table-cell>
          <table:table-cell table:style-name="ce15" table:formula="of:=([.B71]-[.B$83])/[.B$83]" office:value-type="percentage" office:value="-0.0147035886882759" calcext:value-type="percentage">
            <text:p>-1.47%</text:p>
          </table:table-cell>
          <table:table-cell table:style-name="ce14" table:formula="of:=[.C44]*[.$B$18]" office:value-type="float" office:value="10394.58" calcext:value-type="float">
            <text:p>10395</text:p>
          </table:table-cell>
          <table:table-cell table:style-name="ce15" table:formula="of:=([.D71]-[.D$83])/[.D$83]" office:value-type="percentage" office:value="-0.0252325094920587" calcext:value-type="percentage">
            <text:p>-2.52%</text:p>
          </table:table-cell>
          <table:table-cell table:style-name="ce14" table:formula="of:=[.D44]*[.$B$18]" office:value-type="float" office:value="141.33" calcext:value-type="float">
            <text:p>141</text:p>
          </table:table-cell>
          <table:table-cell table:style-name="ce15" table:formula="of:=([.F71]-[.F$83])/[.F$83]" office:value-type="percentage" office:value="-0.266618234653106" calcext:value-type="percentage">
            <text:p>-26.66%</text:p>
          </table:table-cell>
          <table:table-cell table:style-name="ce14" table:formula="of:=[.E44]*[.$B$18]" office:value-type="float" office:value="76.86" calcext:value-type="float">
            <text:p>77</text:p>
          </table:table-cell>
          <table:table-cell table:style-name="ce15" table:formula="of:=([.H71]-[.H$83])/[.H$83]" office:value-type="percentage" office:value="0.0795752490823283" calcext:value-type="percentage">
            <text:p>7.96%</text:p>
          </table:table-cell>
          <table:table-cell table:style-name="ce14" table:formula="of:=[.F44]*[.$B$18]" office:value-type="float" office:value="42" calcext:value-type="float">
            <text:p>42</text:p>
          </table:table-cell>
          <table:table-cell table:style-name="ce15" table:formula="of:=([.J71]-[.J$83])/[.J$83]" office:value-type="percentage" office:value="0.274968125796855" calcext:value-type="percentage">
            <text:p>27.50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B45]*[.$B$18]" office:value-type="float" office:value="41201.72" calcext:value-type="float">
            <text:p>41202</text:p>
          </table:table-cell>
          <table:table-cell table:style-name="ce15" table:formula="of:=([.B72]-[.B$83])/[.B$83]" office:value-type="percentage" office:value="0.0276437942882682" calcext:value-type="percentage">
            <text:p>2.76%</text:p>
          </table:table-cell>
          <table:table-cell table:style-name="ce14" table:formula="of:=[.C45]*[.$B$18]" office:value-type="float" office:value="11164.86" calcext:value-type="float">
            <text:p>11165</text:p>
          </table:table-cell>
          <table:table-cell table:style-name="ce15" table:formula="of:=([.D72]-[.D$83])/[.D$83]" office:value-type="percentage" office:value="0.0470016647206999" calcext:value-type="percentage">
            <text:p>4.70%</text:p>
          </table:table-cell>
          <table:table-cell table:style-name="ce14" table:formula="of:=[.D45]*[.$B$18]" office:value-type="float" office:value="348.25" calcext:value-type="float">
            <text:p>348</text:p>
          </table:table-cell>
          <table:table-cell table:style-name="ce15" table:formula="of:=([.F72]-[.F$83])/[.F$83]" office:value-type="percentage" office:value="0.807119505993462" calcext:value-type="percentage">
            <text:p>80.71%</text:p>
          </table:table-cell>
          <table:table-cell table:style-name="ce14" table:formula="of:=[.E45]*[.$B$18]" office:value-type="float" office:value="120.89" calcext:value-type="float">
            <text:p>121</text:p>
          </table:table-cell>
          <table:table-cell table:style-name="ce15" table:formula="of:=([.H72]-[.H$83])/[.H$83]" office:value-type="percentage" office:value="0.69802045097011" calcext:value-type="percentage">
            <text:p>69.80%</text:p>
          </table:table-cell>
          <table:table-cell table:style-name="ce14" table:formula="of:=[.F45]*[.$B$18]" office:value-type="float" office:value="35.42" calcext:value-type="float">
            <text:p>35</text:p>
          </table:table-cell>
          <table:table-cell table:style-name="ce15" table:formula="of:=([.J72]-[.J$83])/[.J$83]" office:value-type="percentage" office:value="0.0752231194220145" calcext:value-type="percentage">
            <text:p>7.52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B46]*[.$B$18]" office:value-type="float" office:value="39247.18" calcext:value-type="float">
            <text:p>39247</text:p>
          </table:table-cell>
          <table:table-cell table:style-name="ce15" table:formula="of:=([.B73]-[.B$83])/[.B$83]" office:value-type="percentage" office:value="-0.0211058914454389" calcext:value-type="percentage">
            <text:p>-2.11%</text:p>
          </table:table-cell>
          <table:table-cell table:style-name="ce14" table:formula="of:=[.C46]*[.$B$18]" office:value-type="float" office:value="10501.26" calcext:value-type="float">
            <text:p>10501</text:p>
          </table:table-cell>
          <table:table-cell table:style-name="ce15" table:formula="of:=([.D73]-[.D$83])/[.D$83]" office:value-type="percentage" office:value="-0.0152284308388196" calcext:value-type="percentage">
            <text:p>-1.52%</text:p>
          </table:table-cell>
          <table:table-cell table:style-name="ce14" table:formula="of:=[.D46]*[.$B$18]" office:value-type="float" office:value="152.95" calcext:value-type="float">
            <text:p>153</text:p>
          </table:table-cell>
          <table:table-cell table:style-name="ce15" table:formula="of:=([.F73]-[.F$83])/[.F$83]" office:value-type="percentage" office:value="-0.206320377769706" calcext:value-type="percentage">
            <text:p>-20.63%</text:p>
          </table:table-cell>
          <table:table-cell table:style-name="ce14" table:formula="of:=[.E46]*[.$B$18]" office:value-type="float" office:value="58.8" calcext:value-type="float">
            <text:p>59</text:p>
          </table:table-cell>
          <table:table-cell table:style-name="ce15" table:formula="of:=([.H73]-[.H$83])/[.H$83]" office:value-type="percentage" office:value="-0.174095437860514" calcext:value-type="percentage">
            <text:p>-17.41%</text:p>
          </table:table-cell>
          <table:table-cell table:style-name="ce14" table:formula="of:=[.F46]*[.$B$18]" office:value-type="float" office:value="24.43" calcext:value-type="float">
            <text:p>24</text:p>
          </table:table-cell>
          <table:table-cell table:style-name="ce15" table:formula="of:=([.J73]-[.J$83])/[.J$83]" office:value-type="percentage" office:value="-0.258393540161496" calcext:value-type="percentage">
            <text:p>-25.84%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B47]*[.$B$18]" office:value-type="float" office:value="40880.42" calcext:value-type="float">
            <text:p>40880</text:p>
          </table:table-cell>
          <table:table-cell table:style-name="ce15" table:formula="of:=([.B74]-[.B$83])/[.B$83]" office:value-type="percentage" office:value="0.0196300038177535" calcext:value-type="percentage">
            <text:p>1.96%</text:p>
          </table:table-cell>
          <table:table-cell table:style-name="ce14" table:formula="of:=[.C47]*[.$B$18]" office:value-type="float" office:value="10770.62" calcext:value-type="float">
            <text:p>10771</text:p>
          </table:table-cell>
          <table:table-cell table:style-name="ce15" table:formula="of:=([.D74]-[.D$83])/[.D$83]" office:value-type="percentage" office:value="0.0100312113250022" calcext:value-type="percentage">
            <text:p>1.00%</text:p>
          </table:table-cell>
          <table:table-cell table:style-name="ce14" table:formula="of:=[.D47]*[.$B$18]" office:value-type="float" office:value="161.21" calcext:value-type="float">
            <text:p>161</text:p>
          </table:table-cell>
          <table:table-cell table:style-name="ce15" table:formula="of:=([.F74]-[.F$83])/[.F$83]" office:value-type="percentage" office:value="-0.163458045768253" calcext:value-type="percentage">
            <text:p>-16.35%</text:p>
          </table:table-cell>
          <table:table-cell table:style-name="ce14" table:formula="of:=[.E47]*[.$B$18]" office:value-type="float" office:value="49.84" calcext:value-type="float">
            <text:p>50</text:p>
          </table:table-cell>
          <table:table-cell table:style-name="ce15" table:formula="of:=([.H74]-[.H$83])/[.H$83]" office:value-type="percentage" office:value="-0.299947561615102" calcext:value-type="percentage">
            <text:p>-29.99%</text:p>
          </table:table-cell>
          <table:table-cell table:style-name="ce14" table:formula="of:=[.F47]*[.$B$18]" office:value-type="float" office:value="17.78" calcext:value-type="float">
            <text:p>18</text:p>
          </table:table-cell>
          <table:table-cell table:style-name="ce15" table:formula="of:=([.J74]-[.J$83])/[.J$83]" office:value-type="percentage" office:value="-0.460263493412665" calcext:value-type="percentage">
            <text:p>-46.03%</text:p>
          </table:table-cell>
          <table:table-cell table:style-name="ce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9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style-name="ce14" table:formula="of:=SUM([.B58:.B74])" office:value-type="float" office:value="601400.8" calcext:value-type="float">
            <text:p>601401</text:p>
          </table:table-cell>
          <table:table-cell table:style-name="ce14"/>
          <table:table-cell table:style-name="ce14" table:formula="of:=SUM([.D58:.D74])" office:value-type="float" office:value="159954.76" calcext:value-type="float">
            <text:p>159955</text:p>
          </table:table-cell>
          <table:table-cell table:style-name="ce14"/>
          <table:table-cell table:style-name="ce14" table:formula="of:=SUM([.F58:.F74])" office:value-type="float" office:value="2890.65" calcext:value-type="float">
            <text:p>2891</text:p>
          </table:table-cell>
          <table:table-cell table:style-name="ce14"/>
          <table:table-cell table:style-name="ce14" table:formula="of:=SUM([.H58:.H74])" office:value-type="float" office:value="1067.92" calcext:value-type="float">
            <text:p>1068</text:p>
          </table:table-cell>
          <table:table-cell table:style-name="ce14"/>
          <table:table-cell table:style-name="ce14" table:formula="of:=SUM([.J58:.J74])" office:value-type="float" office:value="494.13" calcext:value-type="float">
            <text:p>49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80]/[.$B$19]/3" office:value-type="float" office:value="5727.62666666667" calcext:value-type="float">
            <text:p>5728</text:p>
          </table:table-cell>
          <table:table-cell table:style-name="ce14"/>
          <table:table-cell table:style-name="ce14" table:formula="of:=[.D80]/[.$B$19]/3" office:value-type="float" office:value="1523.37866666667" calcext:value-type="float">
            <text:p>1523</text:p>
          </table:table-cell>
          <table:table-cell table:style-name="ce14"/>
          <table:table-cell table:style-name="ce14" table:formula="of:=[.F80]/[.$B$19]/3" office:value-type="float" office:value="27.53" calcext:value-type="float">
            <text:p>28</text:p>
          </table:table-cell>
          <table:table-cell table:style-name="ce14"/>
          <table:table-cell table:style-name="ce14" table:formula="of:=[.H80]/[.$B$19]/3" office:value-type="float" office:value="10.1706666666667" calcext:value-type="float">
            <text:p>10</text:p>
          </table:table-cell>
          <table:table-cell table:style-name="ce14"/>
          <table:table-cell table:style-name="ce14" table:formula="of:=[.J80]/[.$B$19]/3" office:value-type="float" office:value="4.706" calcext:value-type="float">
            <text:p>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58:.B74])" office:value-type="float" office:value="40093.3866666667" calcext:value-type="float">
            <text:p>40093</text:p>
          </table:table-cell>
          <table:table-cell/>
          <table:table-cell table:style-name="ce14" table:formula="of:=AVERAGE([.D58:.D74])" office:value-type="float" office:value="10663.6506666667" calcext:value-type="float">
            <text:p>10664</text:p>
          </table:table-cell>
          <table:table-cell/>
          <table:table-cell table:style-name="ce14" table:formula="of:=AVERAGE([.F58:.F74])" office:value-type="float" office:value="192.71" calcext:value-type="float">
            <text:p>193</text:p>
          </table:table-cell>
          <table:table-cell/>
          <table:table-cell table:style-name="ce14" table:formula="of:=AVERAGE([.H58:.H74])" office:value-type="float" office:value="71.1946666666667" calcext:value-type="float">
            <text:p>71</text:p>
          </table:table-cell>
          <table:table-cell/>
          <table:table-cell table:style-name="ce14" table:formula="of:=AVERAGE([.J58:.J74])" office:value-type="float" office:value="32.942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58:.B74])" office:value-type="float" office:value="744.245954306923" calcext:value-type="float">
            <text:p>744</text:p>
          </table:table-cell>
          <table:table-cell/>
          <table:table-cell table:style-name="ce14" table:formula="of:=STDEVP([.D58:.D74])" office:value-type="float" office:value="244.527721958518" calcext:value-type="float">
            <text:p>245</text:p>
          </table:table-cell>
          <table:table-cell/>
          <table:table-cell table:style-name="ce14" table:formula="of:=STDEVP([.F58:.F74])" office:value-type="float" office:value="72.786927672488" calcext:value-type="float">
            <text:p>73</text:p>
          </table:table-cell>
          <table:table-cell/>
          <table:table-cell table:style-name="ce14" table:formula="of:=STDEVP([.H58:.H74])" office:value-type="float" office:value="37.0334929249487" calcext:value-type="float">
            <text:p>37</text:p>
          </table:table-cell>
          <table:table-cell/>
          <table:table-cell table:style-name="ce14" table:formula="of:=STDEVP([.J58:.J74])" office:value-type="float" office:value="23.6853879568536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81]*[.$B$20]" office:value-type="float" office:value="40093.3866666667" calcext:value-type="float">
            <text:p>40093</text:p>
          </table:table-cell>
          <table:table-cell table:style-name="ce14"/>
          <table:table-cell table:style-name="ce14" table:formula="of:=[.D81]*[.$B$20]" office:value-type="float" office:value="10663.6506666667" calcext:value-type="float">
            <text:p>10664</text:p>
          </table:table-cell>
          <table:table-cell table:style-name="ce14"/>
          <table:table-cell table:style-name="ce14" table:formula="of:=[.F81]*[.$B$20]" office:value-type="float" office:value="192.71" calcext:value-type="float">
            <text:p>193</text:p>
          </table:table-cell>
          <table:table-cell table:style-name="ce14"/>
          <table:table-cell table:style-name="ce14" table:formula="of:=[.H81]*[.$B$20]" office:value-type="float" office:value="71.1946666666667" calcext:value-type="float">
            <text:p>71</text:p>
          </table:table-cell>
          <table:table-cell table:style-name="ce14"/>
          <table:table-cell table:style-name="ce14" table:formula="of:=[.J81]*[.$B$20]" office:value-type="float" office:value="32.942" calcext:value-type="float">
            <text:p>3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formula="of:=[.$B$14]*[.B85]" office:value-type="float" office:value="200466.933333333" calcext:value-type="float">
            <text:p>200466.933333333</text:p>
          </table:table-cell>
          <table:table-cell/>
          <table:table-cell table:formula="of:=[.$B$14]*[.D85]" office:value-type="float" office:value="53318.2533333333" calcext:value-type="float">
            <text:p>53318.2533333333</text:p>
          </table:table-cell>
          <table:table-cell/>
          <table:table-cell table:formula="of:=[.$B$14]*[.F85]" office:value-type="float" office:value="963.55" calcext:value-type="float">
            <text:p>963.55</text:p>
          </table:table-cell>
          <table:table-cell/>
          <table:table-cell table:formula="of:=[.$B$14]*[.H85]" office:value-type="float" office:value="355.973333333333" calcext:value-type="float">
            <text:p>355.973333333333</text:p>
          </table:table-cell>
          <table:table-cell/>
          <table:table-cell table:formula="of:=[.$B$14]*[.J85]" office:value-type="float" office:value="164.71" calcext:value-type="float">
            <text:p>164.71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84]/[.B83]" office:value-type="percentage" office:value="0.0185628108818676" calcext:value-type="percentage">
            <text:p>1.86%</text:p>
          </table:table-cell>
          <table:table-cell/>
          <table:table-cell table:style-name="ce15" table:formula="of:=[.D84]/[.D83]" office:value-type="percentage" office:value="0.0229309576618899" calcext:value-type="percentage">
            <text:p>2.29%</text:p>
          </table:table-cell>
          <table:table-cell/>
          <table:table-cell table:style-name="ce15" table:formula="of:=[.F84]/[.F83]" office:value-type="percentage" office:value="0.377701871581589" calcext:value-type="percentage">
            <text:p>37.77%</text:p>
          </table:table-cell>
          <table:table-cell/>
          <table:table-cell table:style-name="ce15" table:formula="of:=[.H84]/[.H83]" office:value-type="percentage" office:value="0.520172291814209" calcext:value-type="percentage">
            <text:p>52.02%</text:p>
          </table:table-cell>
          <table:table-cell/>
          <table:table-cell table:style-name="ce15" table:formula="of:=[.J84]/[.J83]" office:value-type="percentage" office:value="0.719002730764788" calcext:value-type="percentage">
            <text:p>71.90%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<text:span text:style-name="T4">Q</text:span></text:p>
          </table:table-cell>
          <table:table-cell table:style-name="ce33" table:formula="of:=(MAX([.B58:.B62])-MIN([.B58:.B62]))/[.B83]" office:value-type="percentage" office:value="0.0277828862216346" calcext:value-type="percentage">
            <text:p>2.78%</text:p>
          </table:table-cell>
          <table:table-cell/>
          <table:table-cell table:style-name="ce33" table:formula="of:=(MAX([.D58:.D62])-MIN([.D58:.D62]))/[.D83]" office:value-type="percentage" office:value="0.0503683041379951" calcext:value-type="percentage">
            <text:p>5.04%</text:p>
          </table:table-cell>
          <table:table-cell/>
          <table:table-cell table:style-name="ce16" table:formula="of:=(MAX([.F58:.F62])-MIN([.F58:.F62]))/[.F83]" office:value-type="percentage" office:value="0.770795495822739" calcext:value-type="percentage">
            <text:p>77.08%</text:p>
          </table:table-cell>
          <table:table-cell/>
          <table:table-cell table:style-name="ce16" table:formula="of:=(MAX([.H58:.H62])-MIN([.H58:.H62]))/[.H83]" office:value-type="percentage" office:value="1.32439695857368" calcext:value-type="percentage">
            <text:p>132.44%</text:p>
          </table:table-cell>
          <table:table-cell/>
          <table:table-cell table:style-name="ce16" table:formula="of:=(MAX([.J58:.J62])-MIN([.J58:.J62]))/[.J83]" office:value-type="percentage" office:value="1.87845303867403" calcext:value-type="percentage">
            <text:p>187.8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4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Annex E Verify Counting Bottle 1'.C33:'Annex E Verify Counting Bottle 1'.C36 'Annex E Verify Counting Bottle 1'.C29:'Annex E Verify Counting Bottle 1'.C29">
            <calcext:condition calcext:apply-style-name="Good" calcext:value="between([.$Q$52],[.$R$52])" calcext:base-cell-address="'Annex E Verify Counting Bottle 1'.C29"/>
          </calcext:conditional-format>
          <calcext:conditional-format calcext:target-range-address="'Annex E Verify Counting Bottle 1'.D33:'Annex E Verify Counting Bottle 1'.D36 'Annex E Verify Counting Bottle 1'.D29:'Annex E Verify Counting Bottle 1'.D29">
            <calcext:condition calcext:apply-style-name="Good" calcext:value="between([.$Q$54],[.$R$54])" calcext:base-cell-address="'Annex E Verify Counting Bottle 1'.D29"/>
          </calcext:conditional-format>
          <calcext:conditional-format calcext:target-range-address="'Annex E Verify Counting Bottle 1'.B91:'Annex E Verify Counting Bottle 1'.B91 'Annex E Verify Counting Bottle 1'.D91:'Annex E Verify Counting Bottle 1'.D91">
            <calcext:condition calcext:apply-style-name="Good" calcext:value="&lt;[.B92]" calcext:base-cell-address="'Annex E Verify Counting Bottle 1'.B91"/>
          </calcext:conditional-format>
          <calcext:conditional-format calcext:target-range-address="'Annex E Verify Counting Bottle 1'.B42:'Annex E Verify Counting Bottle 1'.B42 'Annex E Verify Counting Bottle 1'.B48:'Annex E Verify Counting Bottle 1'.B48">
            <calcext:condition calcext:apply-style-name="Good" calcext:value="between([.$J$23],[.$K$23])" calcext:base-cell-address="'Annex E Verify Counting Bottle 1'.B42"/>
          </calcext:conditional-format>
          <calcext:conditional-format calcext:target-range-address="'Annex E Verify Counting Bottle 1'.C42:'Annex E Verify Counting Bottle 1'.C42 'Annex E Verify Counting Bottle 1'.C48:'Annex E Verify Counting Bottle 1'.C48">
            <calcext:condition calcext:apply-style-name="Good" calcext:value="between([.$J$25],[.$K$25])" calcext:base-cell-address="'Annex E Verify Counting Bottle 1'.C42"/>
          </calcext:conditional-format>
        </calcext:conditional-formats>
      </table:table>
      <table:table table:name="Annex E Verify Counting Bottle 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4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4"/>
          <table:table-cell table:number-columns-repeated="4"/>
          <table:table-cell table:style-name="ce24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1" draw:text-style-name="P1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4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4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table:style-name="ce7" table:number-columns-repeated="3"/>
          <table:table-cell table:style-name="ce1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555791" calcext:value-type="float">
            <text:p>555791</text:p>
          </table:table-cell>
          <table:table-cell office:value-type="float" office:value="149419" calcext:value-type="float">
            <text:p>149419</text:p>
          </table:table-cell>
          <table:table-cell office:value-type="float" office:value="3300" calcext:value-type="float">
            <text:p>3300</text:p>
          </table:table-cell>
          <table:table-cell office:value-type="float" office:value="1175" calcext:value-type="float">
            <text:p>1175</text:p>
          </table:table-cell>
          <table:table-cell office:value-type="float" office:value="460" calcext:value-type="float">
            <text:p>460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562606" calcext:value-type="float">
            <text:p>562606</text:p>
          </table:table-cell>
          <table:table-cell office:value-type="float" office:value="147908" calcext:value-type="float">
            <text:p>147908</text:p>
          </table:table-cell>
          <table:table-cell office:value-type="float" office:value="3179" calcext:value-type="float">
            <text:p>3179</text:p>
          </table:table-cell>
          <table:table-cell office:value-type="float" office:value="1093" calcext:value-type="float">
            <text:p>1093</text:p>
          </table:table-cell>
          <table:table-cell office:value-type="float" office:value="298" calcext:value-type="float">
            <text:p>298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582956" calcext:value-type="float">
            <text:p>582956</text:p>
          </table:table-cell>
          <table:table-cell office:value-type="float" office:value="154017" calcext:value-type="float">
            <text:p>154017</text:p>
          </table:table-cell>
          <table:table-cell office:value-type="float" office:value="4809" calcext:value-type="float">
            <text:p>4809</text:p>
          </table:table-cell>
          <table:table-cell office:value-type="float" office:value="2332" calcext:value-type="float">
            <text:p>2332</text:p>
          </table:table-cell>
          <table:table-cell office:value-type="float" office:value="1429" calcext:value-type="float">
            <text:p>1429</text:p>
          </table:table-cell>
          <table:table-cell table:style-name="ce5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576933" calcext:value-type="float">
            <text:p>576933</text:p>
          </table:table-cell>
          <table:table-cell office:value-type="float" office:value="151764" calcext:value-type="float">
            <text:p>151764</text:p>
          </table:table-cell>
          <table:table-cell office:value-type="float" office:value="1972" calcext:value-type="float">
            <text:p>1972</text:p>
          </table:table-cell>
          <table:table-cell office:value-type="float" office:value="536" calcext:value-type="float">
            <text:p>536</text:p>
          </table:table-cell>
          <table:table-cell office:value-type="float" office:value="251" calcext:value-type="float">
            <text:p>251</text:p>
          </table:table-cell>
          <table:table-cell table:style-name="ce5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592840" calcext:value-type="float">
            <text:p>592840</text:p>
          </table:table-cell>
          <table:table-cell office:value-type="float" office:value="155892" calcext:value-type="float">
            <text:p>155892</text:p>
          </table:table-cell>
          <table:table-cell office:value-type="float" office:value="2203" calcext:value-type="float">
            <text:p>2203</text:p>
          </table:table-cell>
          <table:table-cell office:value-type="float" office:value="606" calcext:value-type="float">
            <text:p>606</text:p>
          </table:table-cell>
          <table:table-cell office:value-type="float" office:value="275" calcext:value-type="float">
            <text:p>275</text:p>
          </table:table-cell>
          <table:table-cell table:style-name="ce5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19" table:formula="of:=SUM([.A24:.A28])/5/100" office:value-type="float" office:value="5742.252" calcext:value-type="float">
            <text:p>5742.252</text:p>
          </table:table-cell>
          <table:table-cell table:style-name="ce25" table:formula="of:=SUM([.B24:.B28])/5/100" office:value-type="float" office:value="1518" calcext:value-type="float">
            <text:p>1518</text:p>
          </table:table-cell>
          <table:table-cell table:style-name="ce2" table:formula="of:=SUM([.C24:.C28])/5/100" office:value-type="float" office:value="30.926" calcext:value-type="float">
            <text:p>30.926</text:p>
          </table:table-cell>
          <table:table-cell table:style-name="ce2" table:formula="of:=SUM([.D24:.D28])/5/100" office:value-type="float" office:value="11.484" calcext:value-type="float">
            <text:p>11.484</text:p>
          </table:table-cell>
          <table:table-cell table:style-name="ce2" table:formula="of:=SUM([.E24:.E28])/5/100" office:value-type="float" office:value="5.426" calcext:value-type="float">
            <text:p>5.426</text:p>
          </table:table-cell>
          <table:table-cell table:style-name="ce5" office:value-type="string" calcext:value-type="string">
            <text:p>/ml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5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A24]*[.$B$18]" office:value-type="float" office:value="38905.37" calcext:value-type="float">
            <text:p>38905</text:p>
          </table:table-cell>
          <table:table-cell table:style-name="ce15" table:formula="of:=([.B35]-[.B$47])/[.B$47]" office:value-type="percentage" office:value="-0.0321027359997437" calcext:value-type="percentage">
            <text:p>-3.21%</text:p>
          </table:table-cell>
          <table:table-cell table:style-name="ce14" table:formula="of:=[.B24]*[.$B$18]" office:value-type="float" office:value="10459.33" calcext:value-type="float">
            <text:p>10459</text:p>
          </table:table-cell>
          <table:table-cell table:style-name="ce15" table:formula="of:=([.D35]-[.D$47])/[.D$47]" office:value-type="percentage" office:value="-0.0156851119894598" calcext:value-type="percentage">
            <text:p>-1.57%</text:p>
          </table:table-cell>
          <table:table-cell table:style-name="ce14" table:formula="of:=[.C24]*[.$B$18]" office:value-type="float" office:value="231" calcext:value-type="float">
            <text:p>231</text:p>
          </table:table-cell>
          <table:table-cell table:style-name="ce15" table:formula="of:=([.F35]-[.F$47])/[.F$47]" office:value-type="percentage" office:value="0.0670633124232038" calcext:value-type="percentage">
            <text:p>6.71%</text:p>
          </table:table-cell>
          <table:table-cell table:style-name="ce14" table:formula="of:=[.D24]*[.$B$18]" office:value-type="float" office:value="82.25" calcext:value-type="float">
            <text:p>82</text:p>
          </table:table-cell>
          <table:table-cell table:style-name="ce15" table:formula="of:=([.H35]-[.H$47])/[.H$47]" office:value-type="percentage" office:value="0.0231626610936957" calcext:value-type="percentage">
            <text:p>2.32%</text:p>
          </table:table-cell>
          <table:table-cell table:style-name="ce14" table:formula="of:=[.E24]*[.$B$18]" office:value-type="float" office:value="32.2" calcext:value-type="float">
            <text:p>32</text:p>
          </table:table-cell>
          <table:table-cell table:style-name="ce15" table:formula="of:=([.J35]-[.J$47])/[.J$47]" office:value-type="percentage" office:value="-0.152230003685957" calcext:value-type="percentage">
            <text:p>-15.22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A25]*[.$B$18]" office:value-type="float" office:value="39382.42" calcext:value-type="float">
            <text:p>39382</text:p>
          </table:table-cell>
          <table:table-cell table:style-name="ce15" table:formula="of:=([.B36]-[.B$47])/[.B$47]" office:value-type="percentage" office:value="-0.0202345699910069" calcext:value-type="percentage">
            <text:p>-2.02%</text:p>
          </table:table-cell>
          <table:table-cell table:style-name="ce14" table:formula="of:=[.B25]*[.$B$18]" office:value-type="float" office:value="10353.56" calcext:value-type="float">
            <text:p>10354</text:p>
          </table:table-cell>
          <table:table-cell table:style-name="ce15" table:formula="of:=([.D36]-[.D$47])/[.D$47]" office:value-type="percentage" office:value="-0.025638998682477" calcext:value-type="percentage">
            <text:p>-2.56%</text:p>
          </table:table-cell>
          <table:table-cell table:style-name="ce14" table:formula="of:=[.C25]*[.$B$18]" office:value-type="float" office:value="222.53" calcext:value-type="float">
            <text:p>223</text:p>
          </table:table-cell>
          <table:table-cell table:style-name="ce15" table:formula="of:=([.F36]-[.F$47])/[.F$47]" office:value-type="percentage" office:value="0.027937657634353" calcext:value-type="percentage">
            <text:p>2.79%</text:p>
          </table:table-cell>
          <table:table-cell table:style-name="ce14" table:formula="of:=[.D25]*[.$B$18]" office:value-type="float" office:value="76.51" calcext:value-type="float">
            <text:p>77</text:p>
          </table:table-cell>
          <table:table-cell table:style-name="ce15" table:formula="of:=([.H36]-[.H$47])/[.H$47]" office:value-type="percentage" office:value="-0.0482410309996517" calcext:value-type="percentage">
            <text:p>-4.82%</text:p>
          </table:table-cell>
          <table:table-cell table:style-name="ce14" table:formula="of:=[.E25]*[.$B$18]" office:value-type="float" office:value="20.86" calcext:value-type="float">
            <text:p>21</text:p>
          </table:table-cell>
          <table:table-cell table:style-name="ce15" table:formula="of:=([.J36]-[.J$47])/[.J$47]" office:value-type="percentage" office:value="-0.450792480648728" calcext:value-type="percentage">
            <text:p>-45.08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A26]*[.$B$18]" office:value-type="float" office:value="40806.92" calcext:value-type="float">
            <text:p>40807</text:p>
          </table:table-cell>
          <table:table-cell table:style-name="ce15" table:formula="of:=([.B37]-[.B$47])/[.B$47]" office:value-type="percentage" office:value="0.0152044877166659" calcext:value-type="percentage">
            <text:p>1.52%</text:p>
          </table:table-cell>
          <table:table-cell table:style-name="ce14" table:formula="of:=[.B26]*[.$B$18]" office:value-type="float" office:value="10781.19" calcext:value-type="float">
            <text:p>10781</text:p>
          </table:table-cell>
          <table:table-cell table:style-name="ce15" table:formula="of:=([.D37]-[.D$47])/[.D$47]" office:value-type="percentage" office:value="0.0146047430830038" calcext:value-type="percentage">
            <text:p>1.46%</text:p>
          </table:table-cell>
          <table:table-cell table:style-name="ce14" table:formula="of:=[.C26]*[.$B$18]" office:value-type="float" office:value="336.63" calcext:value-type="float">
            <text:p>337</text:p>
          </table:table-cell>
          <table:table-cell table:style-name="ce15" table:formula="of:=([.F37]-[.F$47])/[.F$47]" office:value-type="percentage" office:value="0.555002263467633" calcext:value-type="percentage">
            <text:p>55.50%</text:p>
          </table:table-cell>
          <table:table-cell table:style-name="ce14" table:formula="of:=[.D26]*[.$B$18]" office:value-type="float" office:value="163.24" calcext:value-type="float">
            <text:p>163</text:p>
          </table:table-cell>
          <table:table-cell table:style-name="ce15" table:formula="of:=([.H37]-[.H$47])/[.H$47]" office:value-type="percentage" office:value="1.03065134099617" calcext:value-type="percentage">
            <text:p>103.07%</text:p>
          </table:table-cell>
          <table:table-cell table:style-name="ce14" table:formula="of:=[.E26]*[.$B$18]" office:value-type="float" office:value="100.03" calcext:value-type="float">
            <text:p>100</text:p>
          </table:table-cell>
          <table:table-cell table:style-name="ce15" table:formula="of:=([.J37]-[.J$47])/[.J$47]" office:value-type="percentage" office:value="1.6336159233321" calcext:value-type="percentage">
            <text:p>163.36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A27]*[.$B$18]" office:value-type="float" office:value="40385.31" calcext:value-type="float">
            <text:p>40385</text:p>
          </table:table-cell>
          <table:table-cell table:style-name="ce15" table:formula="of:=([.B38]-[.B$47])/[.B$47]" office:value-type="percentage" office:value="0.00471557152141709" calcext:value-type="percentage">
            <text:p>0.47%</text:p>
          </table:table-cell>
          <table:table-cell table:style-name="ce14" table:formula="of:=[.B27]*[.$B$18]" office:value-type="float" office:value="10623.48" calcext:value-type="float">
            <text:p>10623</text:p>
          </table:table-cell>
          <table:table-cell table:style-name="ce15" table:formula="of:=([.D38]-[.D$47])/[.D$47]" office:value-type="percentage" office:value="-0.00023715415019767" calcext:value-type="percentage">
            <text:p>-0.02%</text:p>
          </table:table-cell>
          <table:table-cell table:style-name="ce14" table:formula="of:=[.C27]*[.$B$18]" office:value-type="float" office:value="138.04" calcext:value-type="float">
            <text:p>138</text:p>
          </table:table-cell>
          <table:table-cell table:style-name="ce15" table:formula="of:=([.F38]-[.F$47])/[.F$47]" office:value-type="percentage" office:value="-0.362348832697407" calcext:value-type="percentage">
            <text:p>-36.23%</text:p>
          </table:table-cell>
          <table:table-cell table:style-name="ce14" table:formula="of:=[.D27]*[.$B$18]" office:value-type="float" office:value="37.52" calcext:value-type="float">
            <text:p>38</text:p>
          </table:table-cell>
          <table:table-cell table:style-name="ce15" table:formula="of:=([.H38]-[.H$47])/[.H$47]" office:value-type="percentage" office:value="-0.533263671194706" calcext:value-type="percentage">
            <text:p>-53.33%</text:p>
          </table:table-cell>
          <table:table-cell table:style-name="ce14" table:formula="of:=[.E27]*[.$B$18]" office:value-type="float" office:value="17.57" calcext:value-type="float">
            <text:p>18</text:p>
          </table:table-cell>
          <table:table-cell table:style-name="ce15" table:formula="of:=([.J38]-[.J$47])/[.J$47]" office:value-type="percentage" office:value="-0.537412458532989" calcext:value-type="percentage">
            <text:p>-53.74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A28]*[.$B$18]" office:value-type="float" office:value="41498.8" calcext:value-type="float">
            <text:p>41499</text:p>
          </table:table-cell>
          <table:table-cell table:style-name="ce15" table:formula="of:=([.B39]-[.B$47])/[.B$47]" office:value-type="percentage" office:value="0.0324172467526678" calcext:value-type="percentage">
            <text:p>3.24%</text:p>
          </table:table-cell>
          <table:table-cell table:style-name="ce14" table:formula="of:=[.B28]*[.$B$18]" office:value-type="float" office:value="10912.44" calcext:value-type="float">
            <text:p>10912</text:p>
          </table:table-cell>
          <table:table-cell table:style-name="ce15" table:formula="of:=([.D39]-[.D$47])/[.D$47]" office:value-type="percentage" office:value="0.0269565217391303" calcext:value-type="percentage">
            <text:p>2.70%</text:p>
          </table:table-cell>
          <table:table-cell table:style-name="ce14" table:formula="of:=[.C28]*[.$B$18]" office:value-type="float" office:value="154.21" calcext:value-type="float">
            <text:p>154</text:p>
          </table:table-cell>
          <table:table-cell table:style-name="ce15" table:formula="of:=([.F39]-[.F$47])/[.F$47]" office:value-type="percentage" office:value="-0.287654400827783" calcext:value-type="percentage">
            <text:p>-28.77%</text:p>
          </table:table-cell>
          <table:table-cell table:style-name="ce14" table:formula="of:=[.D28]*[.$B$18]" office:value-type="float" office:value="42.42" calcext:value-type="float">
            <text:p>42</text:p>
          </table:table-cell>
          <table:table-cell table:style-name="ce15" table:formula="of:=([.H39]-[.H$47])/[.H$47]" office:value-type="percentage" office:value="-0.472309299895507" calcext:value-type="percentage">
            <text:p>-47.23%</text:p>
          </table:table-cell>
          <table:table-cell table:style-name="ce14" table:formula="of:=[.E28]*[.$B$18]" office:value-type="float" office:value="19.25" calcext:value-type="float">
            <text:p>19</text:p>
          </table:table-cell>
          <table:table-cell table:style-name="ce15" table:formula="of:=([.J39]-[.J$47])/[.J$47]" office:value-type="percentage" office:value="-0.493180980464431" calcext:value-type="percentage">
            <text:p>-49.32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style-name="ce14" table:formula="of:=SUM([.B35:.B39])" office:value-type="float" office:value="200978.82" calcext:value-type="float">
            <text:p>200979</text:p>
          </table:table-cell>
          <table:table-cell table:style-name="ce14"/>
          <table:table-cell table:style-name="ce14" table:formula="of:=SUM([.D35:.D39])" office:value-type="float" office:value="53130" calcext:value-type="float">
            <text:p>53130</text:p>
          </table:table-cell>
          <table:table-cell table:style-name="ce14"/>
          <table:table-cell table:style-name="ce14" table:formula="of:=SUM([.F35:.F39])" office:value-type="float" office:value="1082.41" calcext:value-type="float">
            <text:p>1082</text:p>
          </table:table-cell>
          <table:table-cell table:style-name="ce14"/>
          <table:table-cell table:style-name="ce14" table:formula="of:=SUM([.H35:.H39])" office:value-type="float" office:value="401.94" calcext:value-type="float">
            <text:p>402</text:p>
          </table:table-cell>
          <table:table-cell table:style-name="ce14"/>
          <table:table-cell table:style-name="ce14" table:formula="of:=SUM([.J35:.J39])" office:value-type="float" office:value="189.91" calcext:value-type="float">
            <text:p>19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44]/[.$B$19]" office:value-type="float" office:value="5742.252" calcext:value-type="float">
            <text:p>5742</text:p>
          </table:table-cell>
          <table:table-cell table:style-name="ce14"/>
          <table:table-cell table:style-name="ce14" table:formula="of:=[.D44]/[.$B$19]" office:value-type="float" office:value="1518" calcext:value-type="float">
            <text:p>1518</text:p>
          </table:table-cell>
          <table:table-cell table:style-name="ce14"/>
          <table:table-cell table:style-name="ce14" table:formula="of:=[.F44]/[.$B$19]" office:value-type="float" office:value="30.926" calcext:value-type="float">
            <text:p>31</text:p>
          </table:table-cell>
          <table:table-cell table:style-name="ce14"/>
          <table:table-cell table:style-name="ce14" table:formula="of:=[.H44]/[.$B$19]" office:value-type="float" office:value="11.484" calcext:value-type="float">
            <text:p>11</text:p>
          </table:table-cell>
          <table:table-cell table:style-name="ce14"/>
          <table:table-cell table:style-name="ce14" table:formula="of:=[.J44]/[.$B$19]" office:value-type="float" office:value="5.426" calcext:value-type="float">
            <text:p>5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35:.B39])" office:value-type="float" office:value="40195.764" calcext:value-type="float">
            <text:p>40196</text:p>
          </table:table-cell>
          <table:table-cell/>
          <table:table-cell table:style-name="ce14" table:formula="of:=AVERAGE([.D35:.D39])" office:value-type="float" office:value="10626" calcext:value-type="float">
            <text:p>10626</text:p>
          </table:table-cell>
          <table:table-cell/>
          <table:table-cell table:style-name="ce14" table:formula="of:=AVERAGE([.F35:.F39])" office:value-type="float" office:value="216.482" calcext:value-type="float">
            <text:p>216</text:p>
          </table:table-cell>
          <table:table-cell/>
          <table:table-cell table:style-name="ce14" table:formula="of:=AVERAGE([.H35:.H39])" office:value-type="float" office:value="80.388" calcext:value-type="float">
            <text:p>80</text:p>
          </table:table-cell>
          <table:table-cell/>
          <table:table-cell table:style-name="ce14" table:formula="of:=AVERAGE([.J35:.J39])" office:value-type="float" office:value="37.982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35:.B39])" office:value-type="float" office:value="941.699240449943" calcext:value-type="float">
            <text:p>942</text:p>
          </table:table-cell>
          <table:table-cell/>
          <table:table-cell table:style-name="ce14" table:formula="of:=STDEVP([.D35:.D39])" office:value-type="float" office:value="204.02970499415" calcext:value-type="float">
            <text:p>204</text:p>
          </table:table-cell>
          <table:table-cell/>
          <table:table-cell table:style-name="ce14" table:formula="of:=STDEVP([.F35:.F39])" office:value-type="float" office:value="70.304824699305" calcext:value-type="float">
            <text:p>70</text:p>
          </table:table-cell>
          <table:table-cell/>
          <table:table-cell table:style-name="ce14" table:formula="of:=STDEVP([.H35:.H39])" office:value-type="float" office:value="45.0825781871445" calcext:value-type="float">
            <text:p>45</text:p>
          </table:table-cell>
          <table:table-cell/>
          <table:table-cell table:style-name="ce14" table:formula="of:=STDEVP([.J35:.J39])" office:value-type="float" office:value="31.4454647922399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45]*[.$B$20]" office:value-type="float" office:value="40195.764" calcext:value-type="float">
            <text:p>40196</text:p>
          </table:table-cell>
          <table:table-cell table:style-name="ce14"/>
          <table:table-cell table:style-name="ce14" table:formula="of:=[.D45]*[.$B$20]" office:value-type="float" office:value="10626" calcext:value-type="float">
            <text:p>10626</text:p>
          </table:table-cell>
          <table:table-cell table:style-name="ce14"/>
          <table:table-cell table:style-name="ce14" table:formula="of:=[.F45]*[.$B$20]" office:value-type="float" office:value="216.482" calcext:value-type="float">
            <text:p>216</text:p>
          </table:table-cell>
          <table:table-cell table:style-name="ce14"/>
          <table:table-cell table:style-name="ce14" table:formula="of:=[.H45]*[.$B$20]" office:value-type="float" office:value="80.388" calcext:value-type="float">
            <text:p>80</text:p>
          </table:table-cell>
          <table:table-cell table:style-name="ce14"/>
          <table:table-cell table:style-name="ce14" table:formula="of:=[.J45]*[.$B$20]" office:value-type="float" office:value="37.982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formula="of:=[.$B$14]*[.B49]" office:value-type="float" office:value="200978.82" calcext:value-type="float">
            <text:p>200978.82</text:p>
          </table:table-cell>
          <table:table-cell/>
          <table:table-cell table:formula="of:=[.$B$14]*[.D49]" office:value-type="float" office:value="53130" calcext:value-type="float">
            <text:p>53130</text:p>
          </table:table-cell>
          <table:table-cell/>
          <table:table-cell table:formula="of:=[.$B$14]*[.F49]" office:value-type="float" office:value="1082.41" calcext:value-type="float">
            <text:p>1082.41</text:p>
          </table:table-cell>
          <table:table-cell/>
          <table:table-cell table:formula="of:=[.$B$14]*[.H49]" office:value-type="float" office:value="401.94" calcext:value-type="float">
            <text:p>401.94</text:p>
          </table:table-cell>
          <table:table-cell/>
          <table:table-cell table:formula="of:=[.$B$14]*[.J49]" office:value-type="float" office:value="189.91" calcext:value-type="float">
            <text:p>189.91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48]/[.B47]" office:value-type="percentage" office:value="0.0234278229031781" calcext:value-type="percentage">
            <text:p>2.34%</text:p>
          </table:table-cell>
          <table:table-cell/>
          <table:table-cell table:style-name="ce15" table:formula="of:=[.D48]/[.D47]" office:value-type="percentage" office:value="0.0192009886122859" calcext:value-type="percentage">
            <text:p>1.92%</text:p>
          </table:table-cell>
          <table:table-cell/>
          <table:table-cell table:style-name="ce15" table:formula="of:=[.F48]/[.F47]" office:value-type="percentage" office:value="0.324760602263953" calcext:value-type="percentage">
            <text:p>32.48%</text:p>
          </table:table-cell>
          <table:table-cell/>
          <table:table-cell table:style-name="ce15" table:formula="of:=[.H48]/[.H47]" office:value-type="percentage" office:value="0.56081228774375" calcext:value-type="percentage">
            <text:p>56.08%</text:p>
          </table:table-cell>
          <table:table-cell/>
          <table:table-cell table:style-name="ce15" table:formula="of:=[.J48]/[.J47]" office:value-type="percentage" office:value="0.827904396615237" calcext:value-type="percentage">
            <text:p>82.79%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<text:span text:style-name="T4">Q</text:span></text:p>
          </table:table-cell>
          <table:table-cell table:style-name="ce29" table:formula="of:=(MAX([.B35:.B39])-MIN([.B35:.B39]))/[.B47]" office:value-type="percentage" office:value="0.0645199827524114" calcext:value-type="percentage">
            <text:p>6.45%</text:p>
          </table:table-cell>
          <table:table-cell/>
          <table:table-cell table:style-name="ce29" table:formula="of:=(MAX([.D35:.D39])-MIN([.D35:.D39]))/[.D47]" office:value-type="percentage" office:value="0.0525955204216073" calcext:value-type="percentage">
            <text:p>5.26%</text:p>
          </table:table-cell>
          <table:table-cell/>
          <table:table-cell table:style-name="ce16" table:formula="of:=(MAX([.F35:.F39])-MIN([.F35:.F39]))/[.F47]" office:value-type="percentage" office:value="0.917351096165039" calcext:value-type="percentage">
            <text:p>91.74%</text:p>
          </table:table-cell>
          <table:table-cell/>
          <table:table-cell table:style-name="ce16" table:formula="of:=(MAX([.H35:.H39])-MIN([.H35:.H39]))/[.H47]" office:value-type="percentage" office:value="1.56391501219087" calcext:value-type="percentage">
            <text:p>156.39%</text:p>
          </table:table-cell>
          <table:table-cell/>
          <table:table-cell table:style-name="ce16" table:formula="of:=(MAX([.J35:.J39])-MIN([.J35:.J39]))/[.J47]" office:value-type="percentage" office:value="2.17102838186509" calcext:value-type="percentage">
            <text:p>217.1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4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Annex E Verify Counting Bottle 2'.A29:'Annex E Verify Counting Bottle 2'.A29">
            <calcext:condition calcext:apply-style-name="Good" calcext:value="between([.$J$23],[.$K$23])" calcext:base-cell-address="'Annex E Verify Counting Bottle 2'.A29"/>
          </calcext:conditional-format>
          <calcext:conditional-format calcext:target-range-address="'Annex E Verify Counting Bottle 2'.B29:'Annex E Verify Counting Bottle 2'.B29">
            <calcext:condition calcext:apply-style-name="Good" calcext:value="between([.$J$25],[.$K$25])" calcext:base-cell-address="'Annex E Verify Counting Bottle 2'.B29"/>
          </calcext:conditional-format>
          <calcext:conditional-format calcext:target-range-address="'Annex E Verify Counting Bottle 2'.B55:'Annex E Verify Counting Bottle 2'.B55 'Annex E Verify Counting Bottle 2'.D55:'Annex E Verify Counting Bottle 2'.D55">
            <calcext:condition calcext:apply-style-name="Good" calcext:value="&lt;[.B56]" calcext:base-cell-address="'Annex E Verify Counting Bottle 2'.B55"/>
          </calcext:conditional-format>
        </calcext:conditional-formats>
      </table:table>
      <table:table table:name="Annex E Verify Counting Bottle 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4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4"/>
          <table:table-cell table:number-columns-repeated="4"/>
          <table:table-cell table:style-name="ce24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1" draw:text-style-name="P1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4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4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table:style-name="ce7" table:number-columns-repeated="3"/>
          <table:table-cell table:style-name="ce1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568449" calcext:value-type="float">
            <text:p>568449</text:p>
          </table:table-cell>
          <table:table-cell office:value-type="float" office:value="149256" calcext:value-type="float">
            <text:p>149256</text:p>
          </table:table-cell>
          <table:table-cell office:value-type="float" office:value="1346" calcext:value-type="float">
            <text:p>1346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564341" calcext:value-type="float">
            <text:p>564341</text:p>
          </table:table-cell>
          <table:table-cell office:value-type="float" office:value="148494" calcext:value-type="float">
            <text:p>148494</text:p>
          </table:table-cell>
          <table:table-cell office:value-type="float" office:value="2019" calcext:value-type="float">
            <text:p>2019</text:p>
          </table:table-cell>
          <table:table-cell office:value-type="float" office:value="1098" calcext:value-type="float">
            <text:p>1098</text:p>
          </table:table-cell>
          <table:table-cell office:value-type="float" office:value="600" calcext:value-type="float">
            <text:p>600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588596" calcext:value-type="float">
            <text:p>588596</text:p>
          </table:table-cell>
          <table:table-cell office:value-type="float" office:value="159498" calcext:value-type="float">
            <text:p>159498</text:p>
          </table:table-cell>
          <table:table-cell office:value-type="float" office:value="4975" calcext:value-type="float">
            <text:p>4975</text:p>
          </table:table-cell>
          <table:table-cell office:value-type="float" office:value="1727" calcext:value-type="float">
            <text:p>1727</text:p>
          </table:table-cell>
          <table:table-cell office:value-type="float" office:value="506" calcext:value-type="float">
            <text:p>506</text:p>
          </table:table-cell>
          <table:table-cell table:style-name="ce5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560674" calcext:value-type="float">
            <text:p>560674</text:p>
          </table:table-cell>
          <table:table-cell office:value-type="float" office:value="150018" calcext:value-type="float">
            <text:p>150018</text:p>
          </table:table-cell>
          <table:table-cell office:value-type="float" office:value="2185" calcext:value-type="float">
            <text:p>2185</text:p>
          </table:table-cell>
          <table:table-cell office:value-type="float" office:value="840" calcext:value-type="float">
            <text:p>840</text:p>
          </table:table-cell>
          <table:table-cell office:value-type="float" office:value="349" calcext:value-type="float">
            <text:p>349</text:p>
          </table:table-cell>
          <table:table-cell table:style-name="ce5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584006" calcext:value-type="float">
            <text:p>584006</text:p>
          </table:table-cell>
          <table:table-cell office:value-type="float" office:value="153866" calcext:value-type="float">
            <text:p>153866</text:p>
          </table:table-cell>
          <table:table-cell office:value-type="float" office:value="2303" calcext:value-type="float">
            <text:p>2303</text:p>
          </table:table-cell>
          <table:table-cell office:value-type="float" office:value="712" calcext:value-type="float">
            <text:p>712</text:p>
          </table:table-cell>
          <table:table-cell office:value-type="float" office:value="254" calcext:value-type="float">
            <text:p>254</text:p>
          </table:table-cell>
          <table:table-cell table:style-name="ce5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66" table:formula="of:=SUM([.A24:.A28])/5/100" office:value-type="float" office:value="5732.132" calcext:value-type="float">
            <text:p>5732.132</text:p>
          </table:table-cell>
          <table:table-cell table:style-name="ce67" table:formula="of:=SUM([.B24:.B28])/5/100" office:value-type="float" office:value="1522.264" calcext:value-type="float">
            <text:p>1522.264</text:p>
          </table:table-cell>
          <table:table-cell table:style-name="ce2" table:formula="of:=SUM([.C24:.C28])/5/100" office:value-type="float" office:value="25.656" calcext:value-type="float">
            <text:p>25.656</text:p>
          </table:table-cell>
          <table:table-cell table:style-name="ce2" table:formula="of:=SUM([.D24:.D28])/5/100" office:value-type="float" office:value="9.632" calcext:value-type="float">
            <text:p>9.632</text:p>
          </table:table-cell>
          <table:table-cell table:style-name="ce2" table:formula="of:=SUM([.E24:.E28])/5/100" office:value-type="float" office:value="3.818" calcext:value-type="float">
            <text:p>3.818</text:p>
          </table:table-cell>
          <table:table-cell table:style-name="ce5" office:value-type="string" calcext:value-type="string">
            <text:p>/ml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5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A24]*[.$B$18]" office:value-type="float" office:value="39791.43" calcext:value-type="float">
            <text:p>39791</text:p>
          </table:table-cell>
          <table:table-cell table:style-name="ce15" table:formula="of:=([.B35]-[.B$47])/[.B$47]" office:value-type="percentage" office:value="-0.00831139268949142" calcext:value-type="percentage">
            <text:p>-0.83%</text:p>
          </table:table-cell>
          <table:table-cell table:style-name="ce14" table:formula="of:=[.B24]*[.$B$18]" office:value-type="float" office:value="10447.92" calcext:value-type="float">
            <text:p>10448</text:p>
          </table:table-cell>
          <table:table-cell table:style-name="ce15" table:formula="of:=([.D35]-[.D$47])/[.D$47]" office:value-type="percentage" office:value="-0.0195130411019376" calcext:value-type="percentage">
            <text:p>-1.95%</text:p>
          </table:table-cell>
          <table:table-cell table:style-name="ce14" table:formula="of:=[.C24]*[.$B$18]" office:value-type="float" office:value="94.22" calcext:value-type="float">
            <text:p>94</text:p>
          </table:table-cell>
          <table:table-cell table:style-name="ce15" table:formula="of:=([.F35]-[.F$47])/[.F$47]" office:value-type="percentage" office:value="-0.475366386030558" calcext:value-type="percentage">
            <text:p>-47.54%</text:p>
          </table:table-cell>
          <table:table-cell table:style-name="ce14" table:formula="of:=[.D24]*[.$B$18]" office:value-type="float" office:value="30.73" calcext:value-type="float">
            <text:p>31</text:p>
          </table:table-cell>
          <table:table-cell table:style-name="ce15" table:formula="of:=([.H35]-[.H$47])/[.H$47]" office:value-type="percentage" office:value="-0.544227574750831" calcext:value-type="percentage">
            <text:p>-54.42%</text:p>
          </table:table-cell>
          <table:table-cell table:style-name="ce14" table:formula="of:=[.E24]*[.$B$18]" office:value-type="float" office:value="14" calcext:value-type="float">
            <text:p>14</text:p>
          </table:table-cell>
          <table:table-cell table:style-name="ce15" table:formula="of:=([.J35]-[.J$47])/[.J$47]" office:value-type="percentage" office:value="-0.476165531691985" calcext:value-type="percentage">
            <text:p>-47.62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A25]*[.$B$18]" office:value-type="float" office:value="39503.87" calcext:value-type="float">
            <text:p>39504</text:p>
          </table:table-cell>
          <table:table-cell table:style-name="ce15" table:formula="of:=([.B36]-[.B$47])/[.B$47]" office:value-type="percentage" office:value="-0.0154780106250169" calcext:value-type="percentage">
            <text:p>-1.55%</text:p>
          </table:table-cell>
          <table:table-cell table:style-name="ce14" table:formula="of:=[.B25]*[.$B$18]" office:value-type="float" office:value="10394.58" calcext:value-type="float">
            <text:p>10395</text:p>
          </table:table-cell>
          <table:table-cell table:style-name="ce15" table:formula="of:=([.D36]-[.D$47])/[.D$47]" office:value-type="percentage" office:value="-0.0245187431352249" calcext:value-type="percentage">
            <text:p>-2.45%</text:p>
          </table:table-cell>
          <table:table-cell table:style-name="ce14" table:formula="of:=[.C25]*[.$B$18]" office:value-type="float" office:value="141.33" calcext:value-type="float">
            <text:p>141</text:p>
          </table:table-cell>
          <table:table-cell table:style-name="ce15" table:formula="of:=([.F36]-[.F$47])/[.F$47]" office:value-type="percentage" office:value="-0.213049579045837" calcext:value-type="percentage">
            <text:p>-21.30%</text:p>
          </table:table-cell>
          <table:table-cell table:style-name="ce14" table:formula="of:=[.D25]*[.$B$18]" office:value-type="float" office:value="76.86" calcext:value-type="float">
            <text:p>77</text:p>
          </table:table-cell>
          <table:table-cell table:style-name="ce15" table:formula="of:=([.H36]-[.H$47])/[.H$47]" office:value-type="percentage" office:value="0.139950166112957" calcext:value-type="percentage">
            <text:p>14.00%</text:p>
          </table:table-cell>
          <table:table-cell table:style-name="ce14" table:formula="of:=[.E25]*[.$B$18]" office:value-type="float" office:value="42" calcext:value-type="float">
            <text:p>42</text:p>
          </table:table-cell>
          <table:table-cell table:style-name="ce15" table:formula="of:=([.J36]-[.J$47])/[.J$47]" office:value-type="percentage" office:value="0.571503404924044" calcext:value-type="percentage">
            <text:p>57.15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A26]*[.$B$18]" office:value-type="float" office:value="41201.72" calcext:value-type="float">
            <text:p>41202</text:p>
          </table:table-cell>
          <table:table-cell table:style-name="ce15" table:formula="of:=([.B37]-[.B$47])/[.B$47]" office:value-type="percentage" office:value="0.0268360882129023" calcext:value-type="percentage">
            <text:p>2.68%</text:p>
          </table:table-cell>
          <table:table-cell table:style-name="ce14" table:formula="of:=[.B26]*[.$B$18]" office:value-type="float" office:value="11164.86" calcext:value-type="float">
            <text:p>11165</text:p>
          </table:table-cell>
          <table:table-cell table:style-name="ce15" table:formula="of:=([.D37]-[.D$47])/[.D$47]" office:value-type="percentage" office:value="0.0477683240226398" calcext:value-type="percentage">
            <text:p>4.78%</text:p>
          </table:table-cell>
          <table:table-cell table:style-name="ce14" table:formula="of:=[.C26]*[.$B$18]" office:value-type="float" office:value="348.25" calcext:value-type="float">
            <text:p>348</text:p>
          </table:table-cell>
          <table:table-cell table:style-name="ce15" table:formula="of:=([.F37]-[.F$47])/[.F$47]" office:value-type="percentage" office:value="0.939117555347677" calcext:value-type="percentage">
            <text:p>93.91%</text:p>
          </table:table-cell>
          <table:table-cell table:style-name="ce14" table:formula="of:=[.D26]*[.$B$18]" office:value-type="float" office:value="120.89" calcext:value-type="float">
            <text:p>121</text:p>
          </table:table-cell>
          <table:table-cell table:style-name="ce15" table:formula="of:=([.H37]-[.H$47])/[.H$47]" office:value-type="percentage" office:value="0.792981727574751" calcext:value-type="percentage">
            <text:p>79.30%</text:p>
          </table:table-cell>
          <table:table-cell table:style-name="ce14" table:formula="of:=[.E26]*[.$B$18]" office:value-type="float" office:value="35.42" calcext:value-type="float">
            <text:p>35</text:p>
          </table:table-cell>
          <table:table-cell table:style-name="ce15" table:formula="of:=([.J37]-[.J$47])/[.J$47]" office:value-type="percentage" office:value="0.325301204819277" calcext:value-type="percentage">
            <text:p>32.5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A27]*[.$B$18]" office:value-type="float" office:value="39247.18" calcext:value-type="float">
            <text:p>39247</text:p>
          </table:table-cell>
          <table:table-cell table:style-name="ce15" table:formula="of:=([.B38]-[.B$47])/[.B$47]" office:value-type="percentage" office:value="-0.021875281308944" calcext:value-type="percentage">
            <text:p>-2.19%</text:p>
          </table:table-cell>
          <table:table-cell table:style-name="ce14" table:formula="of:=[.B27]*[.$B$18]" office:value-type="float" office:value="10501.26" calcext:value-type="float">
            <text:p>10501</text:p>
          </table:table-cell>
          <table:table-cell table:style-name="ce15" table:formula="of:=([.D38]-[.D$47])/[.D$47]" office:value-type="percentage" office:value="-0.0145073390686505" calcext:value-type="percentage">
            <text:p>-1.45%</text:p>
          </table:table-cell>
          <table:table-cell table:style-name="ce14" table:formula="of:=[.C27]*[.$B$18]" office:value-type="float" office:value="152.95" calcext:value-type="float">
            <text:p>153</text:p>
          </table:table-cell>
          <table:table-cell table:style-name="ce15" table:formula="of:=([.F38]-[.F$47])/[.F$47]" office:value-type="percentage" office:value="-0.148347365138759" calcext:value-type="percentage">
            <text:p>-14.83%</text:p>
          </table:table-cell>
          <table:table-cell table:style-name="ce14" table:formula="of:=[.D27]*[.$B$18]" office:value-type="float" office:value="58.8" calcext:value-type="float">
            <text:p>59</text:p>
          </table:table-cell>
          <table:table-cell table:style-name="ce15" table:formula="of:=([.H38]-[.H$47])/[.H$47]" office:value-type="percentage" office:value="-0.127906976744186" calcext:value-type="percentage">
            <text:p>-12.79%</text:p>
          </table:table-cell>
          <table:table-cell table:style-name="ce14" table:formula="of:=[.E27]*[.$B$18]" office:value-type="float" office:value="24.43" calcext:value-type="float">
            <text:p>24</text:p>
          </table:table-cell>
          <table:table-cell table:style-name="ce15" table:formula="of:=([.J38]-[.J$47])/[.J$47]" office:value-type="percentage" office:value="-0.0859088528025145" calcext:value-type="percentage">
            <text:p>-8.59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A28]*[.$B$18]" office:value-type="float" office:value="40880.42" calcext:value-type="float">
            <text:p>40880</text:p>
          </table:table-cell>
          <table:table-cell table:style-name="ce15" table:formula="of:=([.B39]-[.B$47])/[.B$47]" office:value-type="percentage" office:value="0.0188285964105504" calcext:value-type="percentage">
            <text:p>1.88%</text:p>
          </table:table-cell>
          <table:table-cell table:style-name="ce14" table:formula="of:=[.B28]*[.$B$18]" office:value-type="float" office:value="10770.62" calcext:value-type="float">
            <text:p>10771</text:p>
          </table:table-cell>
          <table:table-cell table:style-name="ce15" table:formula="of:=([.D39]-[.D$47])/[.D$47]" office:value-type="percentage" office:value="0.0107707992831729" calcext:value-type="percentage">
            <text:p>1.08%</text:p>
          </table:table-cell>
          <table:table-cell table:style-name="ce14" table:formula="of:=[.C28]*[.$B$18]" office:value-type="float" office:value="161.21" calcext:value-type="float">
            <text:p>161</text:p>
          </table:table-cell>
          <table:table-cell table:style-name="ce15" table:formula="of:=([.F39]-[.F$47])/[.F$47]" office:value-type="percentage" office:value="-0.102354225132523" calcext:value-type="percentage">
            <text:p>-10.24%</text:p>
          </table:table-cell>
          <table:table-cell table:style-name="ce14" table:formula="of:=[.D28]*[.$B$18]" office:value-type="float" office:value="49.84" calcext:value-type="float">
            <text:p>50</text:p>
          </table:table-cell>
          <table:table-cell table:style-name="ce15" table:formula="of:=([.H39]-[.H$47])/[.H$47]" office:value-type="percentage" office:value="-0.260797342192691" calcext:value-type="percentage">
            <text:p>-26.08%</text:p>
          </table:table-cell>
          <table:table-cell table:style-name="ce14" table:formula="of:=[.E28]*[.$B$18]" office:value-type="float" office:value="17.78" calcext:value-type="float">
            <text:p>18</text:p>
          </table:table-cell>
          <table:table-cell table:style-name="ce15" table:formula="of:=([.J39]-[.J$47])/[.J$47]" office:value-type="percentage" office:value="-0.334730225248822" calcext:value-type="percentage">
            <text:p>-33.47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style-name="ce14" table:formula="of:=SUM([.B35:.B39])" office:value-type="float" office:value="200624.62" calcext:value-type="float">
            <text:p>200625</text:p>
          </table:table-cell>
          <table:table-cell table:style-name="ce14"/>
          <table:table-cell table:style-name="ce14" table:formula="of:=SUM([.D35:.D39])" office:value-type="float" office:value="53279.24" calcext:value-type="float">
            <text:p>53279</text:p>
          </table:table-cell>
          <table:table-cell table:style-name="ce14"/>
          <table:table-cell table:style-name="ce14" table:formula="of:=SUM([.F35:.F39])" office:value-type="float" office:value="897.96" calcext:value-type="float">
            <text:p>898</text:p>
          </table:table-cell>
          <table:table-cell table:style-name="ce14"/>
          <table:table-cell table:style-name="ce14" table:formula="of:=SUM([.H35:.H39])" office:value-type="float" office:value="337.12" calcext:value-type="float">
            <text:p>337</text:p>
          </table:table-cell>
          <table:table-cell table:style-name="ce14"/>
          <table:table-cell table:style-name="ce14" table:formula="of:=SUM([.J35:.J39])" office:value-type="float" office:value="133.63" calcext:value-type="float">
            <text:p>13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44]/[.$B$19]" office:value-type="float" office:value="5732.132" calcext:value-type="float">
            <text:p>5732</text:p>
          </table:table-cell>
          <table:table-cell table:style-name="ce14"/>
          <table:table-cell table:style-name="ce14" table:formula="of:=[.D44]/[.$B$19]" office:value-type="float" office:value="1522.264" calcext:value-type="float">
            <text:p>1522</text:p>
          </table:table-cell>
          <table:table-cell table:style-name="ce14"/>
          <table:table-cell table:style-name="ce14" table:formula="of:=[.F44]/[.$B$19]" office:value-type="float" office:value="25.656" calcext:value-type="float">
            <text:p>26</text:p>
          </table:table-cell>
          <table:table-cell table:style-name="ce14"/>
          <table:table-cell table:style-name="ce14" table:formula="of:=[.H44]/[.$B$19]" office:value-type="float" office:value="9.632" calcext:value-type="float">
            <text:p>10</text:p>
          </table:table-cell>
          <table:table-cell table:style-name="ce14"/>
          <table:table-cell table:style-name="ce14" table:formula="of:=[.J44]/[.$B$19]" office:value-type="float" office:value="3.818" calcext:value-type="float">
            <text:p>4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35:.B39])" office:value-type="float" office:value="40124.924" calcext:value-type="float">
            <text:p>40125</text:p>
          </table:table-cell>
          <table:table-cell/>
          <table:table-cell table:style-name="ce14" table:formula="of:=AVERAGE([.D35:.D39])" office:value-type="float" office:value="10655.848" calcext:value-type="float">
            <text:p>10656</text:p>
          </table:table-cell>
          <table:table-cell/>
          <table:table-cell table:style-name="ce14" table:formula="of:=AVERAGE([.F35:.F39])" office:value-type="float" office:value="179.592" calcext:value-type="float">
            <text:p>180</text:p>
          </table:table-cell>
          <table:table-cell/>
          <table:table-cell table:style-name="ce14" table:formula="of:=AVERAGE([.H35:.H39])" office:value-type="float" office:value="67.424" calcext:value-type="float">
            <text:p>67</text:p>
          </table:table-cell>
          <table:table-cell/>
          <table:table-cell table:style-name="ce14" table:formula="of:=AVERAGE([.J35:.J39])" office:value-type="float" office:value="26.726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35:.B39])" office:value-type="float" office:value="774.289956039727" calcext:value-type="float">
            <text:p>774</text:p>
          </table:table-cell>
          <table:table-cell/>
          <table:table-cell table:style-name="ce14" table:formula="of:=STDEVP([.D35:.D39])" office:value-type="float" office:value="285.537492767587" calcext:value-type="float">
            <text:p>286</text:p>
          </table:table-cell>
          <table:table-cell/>
          <table:table-cell table:style-name="ce14" table:formula="of:=STDEVP([.F35:.F39])" office:value-type="float" office:value="87.4592180161703" calcext:value-type="float">
            <text:p>87</text:p>
          </table:table-cell>
          <table:table-cell/>
          <table:table-cell table:style-name="ce14" table:formula="of:=STDEVP([.H35:.H39])" office:value-type="float" office:value="30.5865046057898" calcext:value-type="float">
            <text:p>31</text:p>
          </table:table-cell>
          <table:table-cell/>
          <table:table-cell table:style-name="ce14" table:formula="of:=STDEVP([.J35:.J39])" office:value-type="float" office:value="10.5464147462538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45]*[.$B$20]" office:value-type="float" office:value="40124.924" calcext:value-type="float">
            <text:p>40125</text:p>
          </table:table-cell>
          <table:table-cell table:style-name="ce14"/>
          <table:table-cell table:style-name="ce14" table:formula="of:=[.D45]*[.$B$20]" office:value-type="float" office:value="10655.848" calcext:value-type="float">
            <text:p>10656</text:p>
          </table:table-cell>
          <table:table-cell table:style-name="ce14"/>
          <table:table-cell table:style-name="ce14" table:formula="of:=[.F45]*[.$B$20]" office:value-type="float" office:value="179.592" calcext:value-type="float">
            <text:p>180</text:p>
          </table:table-cell>
          <table:table-cell table:style-name="ce14"/>
          <table:table-cell table:style-name="ce14" table:formula="of:=[.H45]*[.$B$20]" office:value-type="float" office:value="67.424" calcext:value-type="float">
            <text:p>67</text:p>
          </table:table-cell>
          <table:table-cell table:style-name="ce14"/>
          <table:table-cell table:style-name="ce14" table:formula="of:=[.J45]*[.$B$20]" office:value-type="float" office:value="26.726" calcext:value-type="float">
            <text:p>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formula="of:=[.$B$14]*[.B49]" office:value-type="float" office:value="200624.62" calcext:value-type="float">
            <text:p>200624.62</text:p>
          </table:table-cell>
          <table:table-cell/>
          <table:table-cell table:formula="of:=[.$B$14]*[.D49]" office:value-type="float" office:value="53279.24" calcext:value-type="float">
            <text:p>53279.24</text:p>
          </table:table-cell>
          <table:table-cell/>
          <table:table-cell table:formula="of:=[.$B$14]*[.F49]" office:value-type="float" office:value="897.96" calcext:value-type="float">
            <text:p>897.96</text:p>
          </table:table-cell>
          <table:table-cell/>
          <table:table-cell table:formula="of:=[.$B$14]*[.H49]" office:value-type="float" office:value="337.12" calcext:value-type="float">
            <text:p>337.12</text:p>
          </table:table-cell>
          <table:table-cell/>
          <table:table-cell table:formula="of:=[.$B$14]*[.J49]" office:value-type="float" office:value="133.63" calcext:value-type="float">
            <text:p>133.63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48]/[.B47]" office:value-type="percentage" office:value="0.0192969824949631" calcext:value-type="percentage">
            <text:p>1.93%</text:p>
          </table:table-cell>
          <table:table-cell/>
          <table:table-cell table:style-name="ce15" table:formula="of:=[.D48]/[.D47]" office:value-type="percentage" office:value="0.026796318112607" calcext:value-type="percentage">
            <text:p>2.68%</text:p>
          </table:table-cell>
          <table:table-cell/>
          <table:table-cell table:style-name="ce15" table:formula="of:=[.F48]/[.F47]" office:value-type="percentage" office:value="0.486988384873325" calcext:value-type="percentage">
            <text:p>48.70%</text:p>
          </table:table-cell>
          <table:table-cell/>
          <table:table-cell table:style-name="ce15" table:formula="of:=[.H48]/[.H47]" office:value-type="percentage" office:value="0.453644171300869" calcext:value-type="percentage">
            <text:p>45.36%</text:p>
          </table:table-cell>
          <table:table-cell/>
          <table:table-cell table:style-name="ce15" table:formula="of:=[.J48]/[.J47]" office:value-type="percentage" office:value="0.394612540082834" calcext:value-type="percentage">
            <text:p>39.46%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<text:span text:style-name="T4">Q</text:span></text:p>
          </table:table-cell>
          <table:table-cell table:style-name="ce68" table:formula="of:=(MAX([.B35:.B39])-MIN([.B35:.B39]))/[.B47]" office:value-type="percentage" office:value="0.0487113695218463" calcext:value-type="percentage">
            <text:p>4.87%</text:p>
          </table:table-cell>
          <table:table-cell/>
          <table:table-cell table:style-name="ce68" table:formula="of:=(MAX([.D35:.D39])-MIN([.D35:.D39]))/[.D47]" office:value-type="percentage" office:value="0.0722870671578648" calcext:value-type="percentage">
            <text:p>7.23%</text:p>
          </table:table-cell>
          <table:table-cell/>
          <table:table-cell table:style-name="ce16" table:formula="of:=(MAX([.F35:.F39])-MIN([.F35:.F39]))/[.F47]" office:value-type="percentage" office:value="1.41448394137823" calcext:value-type="percentage">
            <text:p>141.45%</text:p>
          </table:table-cell>
          <table:table-cell/>
          <table:table-cell table:style-name="ce16" table:formula="of:=(MAX([.H35:.H39])-MIN([.H35:.H39]))/[.H47]" office:value-type="percentage" office:value="1.33720930232558" calcext:value-type="percentage">
            <text:p>133.72%</text:p>
          </table:table-cell>
          <table:table-cell/>
          <table:table-cell table:style-name="ce16" table:formula="of:=(MAX([.J35:.J39])-MIN([.J35:.J39]))/[.J47]" office:value-type="percentage" office:value="1.04766893661603" calcext:value-type="percentage">
            <text:p>104.77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4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Annex E Verify Counting Bottle 3'.A29:'Annex E Verify Counting Bottle 3'.A29">
            <calcext:condition calcext:apply-style-name="Good" calcext:value="between([.$J$23],[.$K$23])" calcext:base-cell-address="'Annex E Verify Counting Bottle 3'.A29"/>
          </calcext:conditional-format>
          <calcext:conditional-format calcext:target-range-address="'Annex E Verify Counting Bottle 3'.B29:'Annex E Verify Counting Bottle 3'.B29">
            <calcext:condition calcext:apply-style-name="Good" calcext:value="between([.$J$25],[.$K$25])" calcext:base-cell-address="'Annex E Verify Counting Bottle 3'.B29"/>
          </calcext:conditional-format>
          <calcext:conditional-format calcext:target-range-address="'Annex E Verify Counting Bottle 3'.B55:'Annex E Verify Counting Bottle 3'.B55 'Annex E Verify Counting Bottle 3'.D55:'Annex E Verify Counting Bottle 3'.D55">
            <calcext:condition calcext:apply-style-name="Good" calcext:value="&lt;[.B56]" calcext:base-cell-address="'Annex E Verify Counting Bottle 3'.B55"/>
          </calcext:conditional-format>
        </calcext:conditional-formats>
      </table:table>
      <table:table table:name="Annex E Verify Counting Accuracy_2_2_2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4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4"/>
          <table:table-cell table:number-columns-repeated="4"/>
          <table:table-cell table:style-name="ce24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1" draw:text-style-name="P1" svg:width="13.801cm" svg:height="5.615cm" svg:x="0.288cm" svg:y="0.51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6.6666666666667" calcext:value-type="float">
            <text:p>16.666666666666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116666666666667" calcext:value-type="float">
            <text:p>0.11666666666666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4"/>
          <table:table-cell table:style-name="ce39" office:value-type="string" calcext:value-type="string">
            <text:p>Mean counted X</text:p>
          </table:table-cell>
          <table:table-cell table:style-name="ce4"/>
          <table:table-cell table:style-name="ce41" office:value-type="string" calcext:value-type="string">
            <text:p>C<text:span text:style-name="T4">V_MAX</text:span></text:p>
          </table:table-cell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11.6666666666667" calcext:value-type="float">
            <text:p>11.666666666666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34" office:value-type="string" calcext:value-type="string">
            <text:p>μm(c)</text:p>
          </table:table-cell>
          <table:table-cell table:style-name="ce34" office:value-type="string" calcext:value-type="string">
            <text:p>Median</text:p>
          </table:table-cell>
          <table:table-cell table:style-name="ce34" office:value-type="string" calcext:value-type="string">
            <text:p>Minimum</text:p>
          </table:table-cell>
          <table:table-cell table:style-name="ce34" office:value-type="string" calcext:value-type="string">
            <text:p>Maximum</text:p>
          </table:table-cell>
          <table:table-cell/>
          <table:table-cell table:style-name="ce36" office:value-type="string" calcext:value-type="string">
            <text:p>X &gt;=</text:p>
          </table:table-cell>
          <table:table-cell table:style-name="ce40" office:value-type="string" calcext:value-type="string">
            <text:p>X &lt;</text:p>
          </table:table-cell>
          <table:table-cell table:style-name="ce36" office:value-type="string" calcext:value-type="string">
            <text:p>D<text:span text:style-name="T4">QMAX / SAMPLE</text:span></text:p>
          </table:table-cell>
          <table:table-cell table:style-name="ce36" office:value-type="string" calcext:value-type="string">
            <text:p>N=3</text:p>
          </table:table-cell>
          <table:table-cell table:style-name="ce40" office:value-type="string" calcext:value-type="string">
            <text:p>N=6</text:p>
          </table:table-cell>
          <table:table-cell table:style-name="ce40" office:value-type="string" calcext:value-type="string">
            <text:p>N=10</text:p>
          </table:table-cell>
          <table:table-cell table:style-name="ce40" office:value-type="string" calcext:value-type="string">
            <text:p>N=20</text:p>
          </table:table-cell>
          <table:table-cell table:style-name="ce42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37" office:value-type="float" office:value="10000" calcext:value-type="float">
            <text:p>10000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3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7" office:value-type="float" office:value="11.3" calcext:value-type="float">
            <text:p>11.3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43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5"/>
          <table:table-cell table:number-columns-repeated="4"/>
          <table:table-cell table:style-name="ce5"/>
          <table:table-cell/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/>
          <table:table-cell table:style-name="ce37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3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13.4" calcext:value-type="float">
            <text:p>13.4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43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/>
          <table:table-cell table:style-name="ce37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5.6" calcext:value-type="float">
            <text:p>15.6</text:p>
          </table:table-cell>
          <table:table-cell table:style-name="ce37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19.3" calcext:value-type="float">
            <text:p>19.3</text:p>
          </table:table-cell>
          <table:table-cell table:style-name="ce37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43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float" office:value="27.5" calcext:value-type="float">
            <text:p>27.5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.1" calcext:value-type="float">
            <text:p>6.1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5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69"/>
          <table:table-cell table:style-name="ce70"/>
          <table:table-cell table:style-name="ce2" table:number-columns-repeated="3"/>
          <table:table-cell table:style-name="ce5" office:value-type="string" calcext:value-type="string">
            <text:p>/ml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8.9" calcext:value-type="float">
            <text:p>88.9</text:p>
          </table:table-cell>
          <table:table-cell table:style-name="ce35" office:value-type="float" office:value="27.89" calcext:value-type="float">
            <text:p>27.89</text:p>
          </table:table-cell>
          <table:table-cell table:style-name="ce35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5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1</text:p>
          </table:table-cell>
          <table:table-cell table:style-name="ce14" table:formula="of:=[.A24]*[.$B$18]" office:value-type="float" office:value="0" calcext:value-type="float">
            <text:p>0</text:p>
          </table:table-cell>
          <table:table-cell table:style-name="ce15" table:formula="of:=([.B35]-[.B$47])/[.B$47]" office:value-type="string" office:string-value="" calcext:value-type="error">
            <text:p>#DIV/0!</text:p>
          </table:table-cell>
          <table:table-cell table:style-name="ce14" table:formula="of:=[.B24]*[.$B$18]" office:value-type="float" office:value="0" calcext:value-type="float">
            <text:p>0</text:p>
          </table:table-cell>
          <table:table-cell table:style-name="ce15" table:formula="of:=([.D35]-[.D$47])/[.D$47]" office:value-type="string" office:string-value="" calcext:value-type="error">
            <text:p>#DIV/0!</text:p>
          </table:table-cell>
          <table:table-cell table:style-name="ce14" table:formula="of:=[.C24]*[.$B$18]" office:value-type="float" office:value="0" calcext:value-type="float">
            <text:p>0</text:p>
          </table:table-cell>
          <table:table-cell table:style-name="ce15" table:formula="of:=([.F35]-[.F$47])/[.F$47]" office:value-type="string" office:string-value="" calcext:value-type="error">
            <text:p>#DIV/0!</text:p>
          </table:table-cell>
          <table:table-cell table:style-name="ce14" table:formula="of:=[.D24]*[.$B$18]" office:value-type="float" office:value="0" calcext:value-type="float">
            <text:p>0</text:p>
          </table:table-cell>
          <table:table-cell table:style-name="ce15" table:formula="of:=([.H35]-[.H$47])/[.H$47]" office:value-type="string" office:string-value="" calcext:value-type="error">
            <text:p>#DIV/0!</text:p>
          </table:table-cell>
          <table:table-cell table:style-name="ce14" table:formula="of:=[.E24]*[.$B$18]" office:value-type="float" office:value="0" calcext:value-type="float">
            <text:p>0</text:p>
          </table:table-cell>
          <table:table-cell table:style-name="ce15" table:formula="of:=([.J35]-[.J$47])/[.J$4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ample 2</text:p>
          </table:table-cell>
          <table:table-cell table:style-name="ce14" table:formula="of:=[.A25]*[.$B$18]" office:value-type="float" office:value="0" calcext:value-type="float">
            <text:p>0</text:p>
          </table:table-cell>
          <table:table-cell table:style-name="ce15" table:formula="of:=([.B36]-[.B$47])/[.B$47]" office:value-type="string" office:string-value="" calcext:value-type="error">
            <text:p>#DIV/0!</text:p>
          </table:table-cell>
          <table:table-cell table:style-name="ce14" table:formula="of:=[.B25]*[.$B$18]" office:value-type="float" office:value="0" calcext:value-type="float">
            <text:p>0</text:p>
          </table:table-cell>
          <table:table-cell table:style-name="ce15" table:formula="of:=([.D36]-[.D$47])/[.D$47]" office:value-type="string" office:string-value="" calcext:value-type="error">
            <text:p>#DIV/0!</text:p>
          </table:table-cell>
          <table:table-cell table:style-name="ce14" table:formula="of:=[.C25]*[.$B$18]" office:value-type="float" office:value="0" calcext:value-type="float">
            <text:p>0</text:p>
          </table:table-cell>
          <table:table-cell table:style-name="ce15" table:formula="of:=([.F36]-[.F$47])/[.F$47]" office:value-type="string" office:string-value="" calcext:value-type="error">
            <text:p>#DIV/0!</text:p>
          </table:table-cell>
          <table:table-cell table:style-name="ce14" table:formula="of:=[.D25]*[.$B$18]" office:value-type="float" office:value="0" calcext:value-type="float">
            <text:p>0</text:p>
          </table:table-cell>
          <table:table-cell table:style-name="ce15" table:formula="of:=([.H36]-[.H$47])/[.H$47]" office:value-type="string" office:string-value="" calcext:value-type="error">
            <text:p>#DIV/0!</text:p>
          </table:table-cell>
          <table:table-cell table:style-name="ce14" table:formula="of:=[.E25]*[.$B$18]" office:value-type="float" office:value="0" calcext:value-type="float">
            <text:p>0</text:p>
          </table:table-cell>
          <table:table-cell table:style-name="ce15" table:formula="of:=([.J36]-[.J$47])/[.J$4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ample 3</text:p>
          </table:table-cell>
          <table:table-cell table:style-name="ce14" table:formula="of:=[.A26]*[.$B$18]" office:value-type="float" office:value="0" calcext:value-type="float">
            <text:p>0</text:p>
          </table:table-cell>
          <table:table-cell table:style-name="ce15" table:formula="of:=([.B37]-[.B$47])/[.B$47]" office:value-type="string" office:string-value="" calcext:value-type="error">
            <text:p>#DIV/0!</text:p>
          </table:table-cell>
          <table:table-cell table:style-name="ce14" table:formula="of:=[.B26]*[.$B$18]" office:value-type="float" office:value="0" calcext:value-type="float">
            <text:p>0</text:p>
          </table:table-cell>
          <table:table-cell table:style-name="ce15" table:formula="of:=([.D37]-[.D$47])/[.D$47]" office:value-type="string" office:string-value="" calcext:value-type="error">
            <text:p>#DIV/0!</text:p>
          </table:table-cell>
          <table:table-cell table:style-name="ce14" table:formula="of:=[.C26]*[.$B$18]" office:value-type="float" office:value="0" calcext:value-type="float">
            <text:p>0</text:p>
          </table:table-cell>
          <table:table-cell table:style-name="ce15" table:formula="of:=([.F37]-[.F$47])/[.F$47]" office:value-type="string" office:string-value="" calcext:value-type="error">
            <text:p>#DIV/0!</text:p>
          </table:table-cell>
          <table:table-cell table:style-name="ce14" table:formula="of:=[.D26]*[.$B$18]" office:value-type="float" office:value="0" calcext:value-type="float">
            <text:p>0</text:p>
          </table:table-cell>
          <table:table-cell table:style-name="ce15" table:formula="of:=([.H37]-[.H$47])/[.H$47]" office:value-type="string" office:string-value="" calcext:value-type="error">
            <text:p>#DIV/0!</text:p>
          </table:table-cell>
          <table:table-cell table:style-name="ce14" table:formula="of:=[.E26]*[.$B$18]" office:value-type="float" office:value="0" calcext:value-type="float">
            <text:p>0</text:p>
          </table:table-cell>
          <table:table-cell table:style-name="ce15" table:formula="of:=([.J37]-[.J$47])/[.J$4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style-name="ce14" table:formula="of:=SUM([.B35:.B39])" office:value-type="float" office:value="0" calcext:value-type="float">
            <text:p>0</text:p>
          </table:table-cell>
          <table:table-cell table:style-name="ce14"/>
          <table:table-cell table:style-name="ce14" table:formula="of:=SUM([.D35:.D39])" office:value-type="float" office:value="0" calcext:value-type="float">
            <text:p>0</text:p>
          </table:table-cell>
          <table:table-cell table:style-name="ce14"/>
          <table:table-cell table:style-name="ce14" table:formula="of:=SUM([.F35:.F39])" office:value-type="float" office:value="0" calcext:value-type="float">
            <text:p>0</text:p>
          </table:table-cell>
          <table:table-cell table:style-name="ce14"/>
          <table:table-cell table:style-name="ce14" table:formula="of:=SUM([.H35:.H39])" office:value-type="float" office:value="0" calcext:value-type="float">
            <text:p>0</text:p>
          </table:table-cell>
          <table:table-cell table:style-name="ce14"/>
          <table:table-cell table:style-name="ce14" table:formula="of:=SUM([.J35:.J39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X /ml</text:p>
          </table:table-cell>
          <table:table-cell table:style-name="ce14" table:formula="of:=[.B44]/[.$B$19]" office:value-type="float" office:value="0" calcext:value-type="float">
            <text:p>0</text:p>
          </table:table-cell>
          <table:table-cell table:style-name="ce14"/>
          <table:table-cell table:style-name="ce14" table:formula="of:=[.D44]/[.$B$19]" office:value-type="float" office:value="0" calcext:value-type="float">
            <text:p>0</text:p>
          </table:table-cell>
          <table:table-cell table:style-name="ce14"/>
          <table:table-cell table:style-name="ce14" table:formula="of:=[.F44]/[.$B$19]" office:value-type="float" office:value="0" calcext:value-type="float">
            <text:p>0</text:p>
          </table:table-cell>
          <table:table-cell table:style-name="ce14"/>
          <table:table-cell table:style-name="ce14" table:formula="of:=[.H44]/[.$B$19]" office:value-type="float" office:value="0" calcext:value-type="float">
            <text:p>0</text:p>
          </table:table-cell>
          <table:table-cell table:style-name="ce14"/>
          <table:table-cell table:style-name="ce14" table:formula="of:=[.J44]/[.$B$19]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35:.B39])" office:value-type="float" office:value="0" calcext:value-type="float">
            <text:p>0</text:p>
          </table:table-cell>
          <table:table-cell/>
          <table:table-cell table:style-name="ce14" table:formula="of:=AVERAGE([.D35:.D39])" office:value-type="float" office:value="0" calcext:value-type="float">
            <text:p>0</text:p>
          </table:table-cell>
          <table:table-cell/>
          <table:table-cell table:style-name="ce14" table:formula="of:=AVERAGE([.F35:.F39])" office:value-type="float" office:value="0" calcext:value-type="float">
            <text:p>0</text:p>
          </table:table-cell>
          <table:table-cell/>
          <table:table-cell table:style-name="ce14" table:formula="of:=AVERAGE([.H35:.H39])" office:value-type="float" office:value="0" calcext:value-type="float">
            <text:p>0</text:p>
          </table:table-cell>
          <table:table-cell/>
          <table:table-cell table:style-name="ce14" table:formula="of:=AVERAGE([.J35:.J39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35:.B39])" office:value-type="float" office:value="0" calcext:value-type="float">
            <text:p>0</text:p>
          </table:table-cell>
          <table:table-cell/>
          <table:table-cell table:style-name="ce14" table:formula="of:=STDEVP([.D35:.D39])" office:value-type="float" office:value="0" calcext:value-type="float">
            <text:p>0</text:p>
          </table:table-cell>
          <table:table-cell/>
          <table:table-cell table:style-name="ce14" table:formula="of:=STDEVP([.F35:.F39])" office:value-type="float" office:value="0" calcext:value-type="float">
            <text:p>0</text:p>
          </table:table-cell>
          <table:table-cell/>
          <table:table-cell table:style-name="ce14" table:formula="of:=STDEVP([.H35:.H39])" office:value-type="float" office:value="0" calcext:value-type="float">
            <text:p>0</text:p>
          </table:table-cell>
          <table:table-cell/>
          <table:table-cell table:style-name="ce14" table:formula="of:=STDEVP([.J35:.J39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45]*[.$B$20]" office:value-type="float" office:value="0" calcext:value-type="float">
            <text:p>0</text:p>
          </table:table-cell>
          <table:table-cell table:style-name="ce14"/>
          <table:table-cell table:style-name="ce14" table:formula="of:=[.D45]*[.$B$20]" office:value-type="float" office:value="0" calcext:value-type="float">
            <text:p>0</text:p>
          </table:table-cell>
          <table:table-cell table:style-name="ce14"/>
          <table:table-cell table:style-name="ce14" table:formula="of:=[.F45]*[.$B$20]" office:value-type="float" office:value="0" calcext:value-type="float">
            <text:p>0</text:p>
          </table:table-cell>
          <table:table-cell table:style-name="ce14"/>
          <table:table-cell table:style-name="ce14" table:formula="of:=[.H45]*[.$B$20]" office:value-type="float" office:value="0" calcext:value-type="float">
            <text:p>0</text:p>
          </table:table-cell>
          <table:table-cell table:style-name="ce14"/>
          <table:table-cell table:style-name="ce14" table:formula="of:=[.J45]*[.$B$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<text:span text:style-name="T4">TOTAL</text:span></text:p>
          </table:table-cell>
          <table:table-cell table:formula="of:=[.$B$14]*[.B49]" office:value-type="float" office:value="0" calcext:value-type="float">
            <text:p>0</text:p>
          </table:table-cell>
          <table:table-cell/>
          <table:table-cell table:formula="of:=[.$B$14]*[.D49]" office:value-type="float" office:value="0" calcext:value-type="float">
            <text:p>0</text:p>
          </table:table-cell>
          <table:table-cell/>
          <table:table-cell table:formula="of:=[.$B$14]*[.F49]" office:value-type="float" office:value="0" calcext:value-type="float">
            <text:p>0</text:p>
          </table:table-cell>
          <table:table-cell/>
          <table:table-cell table:formula="of:=[.$B$14]*[.H49]" office:value-type="float" office:value="0" calcext:value-type="float">
            <text:p>0</text:p>
          </table:table-cell>
          <table:table-cell/>
          <table:table-cell table:formula="of:=[.$B$14]*[.J49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48]/[.B47]" office:value-type="string" office:string-value="" calcext:value-type="error">
            <text:p>#DIV/0!</text:p>
          </table:table-cell>
          <table:table-cell/>
          <table:table-cell table:style-name="ce15" table:formula="of:=[.D48]/[.D47]" office:value-type="string" office:string-value="" calcext:value-type="error">
            <text:p>#DIV/0!</text:p>
          </table:table-cell>
          <table:table-cell/>
          <table:table-cell table:style-name="ce15" table:formula="of:=[.F48]/[.F47]" office:value-type="string" office:string-value="" calcext:value-type="error">
            <text:p>#DIV/0!</text:p>
          </table:table-cell>
          <table:table-cell/>
          <table:table-cell table:style-name="ce15" table:formula="of:=[.H48]/[.H47]" office:value-type="string" office:string-value="" calcext:value-type="error">
            <text:p>#DIV/0!</text:p>
          </table:table-cell>
          <table:table-cell/>
          <table:table-cell table:style-name="ce15" table:formula="of:=[.J48]/[.J4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<text:span text:style-name="T4">Q</text:span></text:p>
          </table:table-cell>
          <table:table-cell table:style-name="ce71" table:formula="of:=(MAX([.B35:.B39])-MIN([.B35:.B39]))/[.B47]" office:value-type="string" office:string-value="" calcext:value-type="error">
            <text:p>#DIV/0!</text:p>
          </table:table-cell>
          <table:table-cell/>
          <table:table-cell table:style-name="ce71" table:formula="of:=(MAX([.D35:.D39])-MIN([.D35:.D39]))/[.D47]" office:value-type="string" office:string-value="" calcext:value-type="error">
            <text:p>#DIV/0!</text:p>
          </table:table-cell>
          <table:table-cell/>
          <table:table-cell table:style-name="ce16" table:formula="of:=(MAX([.F35:.F39])-MIN([.F35:.F39]))/[.F47]" office:value-type="string" office:string-value="" calcext:value-type="error">
            <text:p>#DIV/0!</text:p>
          </table:table-cell>
          <table:table-cell/>
          <table:table-cell table:style-name="ce16" table:formula="of:=(MAX([.H35:.H39])-MIN([.H35:.H39]))/[.H47]" office:value-type="string" office:string-value="" calcext:value-type="error">
            <text:p>#DIV/0!</text:p>
          </table:table-cell>
          <table:table-cell/>
          <table:table-cell table:style-name="ce16" table:formula="of:=(MAX([.J35:.J39])-MIN([.J35:.J39]))/[.J4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4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calcext:conditional-formats>
          <calcext:conditional-format calcext:target-range-address="'Annex E Verify Counting Accuracy_2_2_2_2'.A29:'Annex E Verify Counting Accuracy_2_2_2_2'.A29">
            <calcext:condition calcext:apply-style-name="Good" calcext:value="between([.$J$23],[.$K$23])" calcext:base-cell-address="'Annex E Verify Counting Accuracy_2_2_2_2'.A29"/>
          </calcext:conditional-format>
          <calcext:conditional-format calcext:target-range-address="'Annex E Verify Counting Accuracy_2_2_2_2'.B29:'Annex E Verify Counting Accuracy_2_2_2_2'.B29">
            <calcext:condition calcext:apply-style-name="Good" calcext:value="between([.$J$25],[.$K$25])" calcext:base-cell-address="'Annex E Verify Counting Accuracy_2_2_2_2'.B29"/>
          </calcext:conditional-format>
          <calcext:conditional-format calcext:target-range-address="'Annex E Verify Counting Accuracy_2_2_2_2'.B55:'Annex E Verify Counting Accuracy_2_2_2_2'.B55 'Annex E Verify Counting Accuracy_2_2_2_2'.D55:'Annex E Verify Counting Accuracy_2_2_2_2'.D55">
            <calcext:condition calcext:apply-style-name="Good" calcext:value="&lt;[.B56]" calcext:base-cell-address="'Annex E Verify Counting Accuracy_2_2_2_2'.B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6:11:50.9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4:44:51.022000000</meta:creation-date>
    <dc:date>2025-04-10T19:56:17.181000000</dc:date>
    <meta:editing-duration>PT7H30M50S</meta:editing-duration>
    <meta:editing-cycles>21</meta:editing-cycles>
    <meta:generator>LibreOffice/7.6.4.1$Windows_X86_64 LibreOffice_project/e19e193f88cd6c0525a17fb7a176ed8e6a3e2aa1</meta:generator>
    <meta:document-statistic meta:table-count="4" meta:cell-count="1342" meta:object-count="4"/>
  </office:meta>
</office:document-meta>
</file>