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7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 style:data-style-name="N61">
      <style:table-cell-properties style:rotation-align="none"/>
    </style:style>
    <style:style style:name="ce9" style:family="table-cell" style:parent-style-name="Default" style:data-style-name="N61">
      <style:table-cell-properties style:text-align-source="fix" style:repeat-content="false" style:rotation-align="none"/>
      <style:paragraph-properties fo:text-align="end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rotation-align="none"/>
      <style:paragraph-properties fo:text-align="end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53">
      <style:table-cell-properties style:rotation-align="none"/>
    </style:style>
    <style:style style:name="ce13" style:family="table-cell" style:parent-style-name="Default" style:data-style-name="N61">
      <style:table-cell-properties style:text-align-source="fix" style:repeat-content="false" style:rotation-align="none"/>
      <style:paragraph-properties fo:text-align="end" fo:margin-left="0cm"/>
      <style:text-properties fo:font-weight="bold" style:font-weight-asian="bold" style:font-weight-complex="bold" style:text-overline-style="solid" style:text-overline-width="auto" style:text-overline-color="font-color"/>
    </style:style>
    <style:style style:name="ce15" style:family="table-cell" style:parent-style-name="Default" style:data-style-name="N61">
      <style:table-cell-properties style:text-align-source="fix" style:repeat-content="false" style:rotation-align="none"/>
      <style:paragraph-properties fo:text-align="end" fo:margin-left="0cm"/>
      <style:text-properties style:font-name="Liberation Sans1" fo:font-weight="bold" style:font-weight-asian="bold" style:font-weight-complex="bold"/>
    </style:style>
    <style:style style:name="ce16" style:family="table-cell" style:parent-style-name="Default" style:data-style-name="N11">
      <style:table-cell-properties style:rotation-align="none"/>
    </style:style>
    <style:style style:name="ce17" style:family="table-cell" style:parent-style-name="Default" style:data-style-name="N11">
      <style:table-cell-properties style:text-align-source="fix" style:repeat-content="false" style:rotation-align="none"/>
      <style:paragraph-properties fo:text-align="end" fo:margin-left="0cm"/>
    </style:style>
    <style:style style:name="ce4" style:family="table-cell" style:parent-style-name="Default" style:data-style-name="N119"/>
    <style:style style:name="ce19" style:family="table-cell" style:parent-style-name="Default" style:data-style-name="N153"/>
    <style:style style:name="ce2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120"/>
    <style:style style:name="ce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4"/>
    <style:style style:name="ce12" style:family="table-cell" style:parent-style-name="Default" style:data-style-name="N2"/>
    <style:style style:name="ce8" style:family="table-cell" style:parent-style-name="Default" style:data-style-name="N49"/>
    <style:style style:name="ce14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stroke="none" svg:stroke-color="#000000" draw:fill="none" draw:fill-color="#ffffff" fo:min-height="8.326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T1" style:family="text">
      <style:text-properties style:text-position="sub 58%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tability" table:style-name="ta1">
        <table:shapes>
          <draw:frame draw:z-index="0" draw:style-name="gr1" draw:text-style-name="P1" svg:width="29.449cm" svg:height="16.564cm" svg:x="6.29cm" svg:y="37.265cm">
            <draw:object draw:notify-on-update-of-ranges="Stability.D75:Stability.AG75 Stability.C78:Stability.C78 Stability.D78:Stability.AG78 Stability.D75:Stability.AG75 Stability.C79:Stability.C79 Stability.D79:Stability.AG7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6"/>
        <table:table-column table:style-name="co1" table:number-columns-repeated="31" table:default-cell-style-name="ce11"/>
        <table:table-row table:style-name="ro1" table:number-rows-repeated="4">
          <table:table-cell/>
          <table:table-cell table:style-name="Default" table:number-columns-repeated="32"/>
        </table:table-row>
        <table:table-row table:style-name="ro1">
          <table:table-cell/>
          <table:table-cell table:style-name="ce1" office:value-type="string" calcext:value-type="string">
            <text:p>Time</text:p>
          </table:table-cell>
          <table:table-cell table:style-name="ce10" office:value-type="string" calcext:value-type="string">
            <text:p>volume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time" office:time-value="PT1108450H54M47.999999989S" calcext:value-type="time">
            <text:p>10:54:48</text:p>
          </table:table-cell>
          <table:table-cell office:value-type="float" office:value="21.066746" calcext:value-type="float">
            <text:p>21.1</text:p>
          </table:table-cell>
          <table:table-cell office:value-type="float" office:value="22184.964844" calcext:value-type="float">
            <text:p>22185.0</text:p>
          </table:table-cell>
          <table:table-cell office:value-type="float" office:value="14552.983398" calcext:value-type="float">
            <text:p>14553.0</text:p>
          </table:table-cell>
          <table:table-cell office:value-type="float" office:value="9652.65332" calcext:value-type="float">
            <text:p>9652.7</text:p>
          </table:table-cell>
          <table:table-cell office:value-type="float" office:value="6798.439453" calcext:value-type="float">
            <text:p>6798.4</text:p>
          </table:table-cell>
          <table:table-cell office:value-type="float" office:value="4676.802246" calcext:value-type="float">
            <text:p>4676.8</text:p>
          </table:table-cell>
          <table:table-cell office:value-type="float" office:value="3187.108398" calcext:value-type="float">
            <text:p>3187.1</text:p>
          </table:table-cell>
          <table:table-cell office:value-type="float" office:value="2242.349121" calcext:value-type="float">
            <text:p>2242.3</text:p>
          </table:table-cell>
          <table:table-cell office:value-type="float" office:value="1587.098511" calcext:value-type="float">
            <text:p>1587.1</text:p>
          </table:table-cell>
          <table:table-cell office:value-type="float" office:value="1154.283691" calcext:value-type="float">
            <text:p>1154.3</text:p>
          </table:table-cell>
          <table:table-cell office:value-type="float" office:value="873.034668" calcext:value-type="float">
            <text:p>873.0</text:p>
          </table:table-cell>
          <table:table-cell office:value-type="float" office:value="681.737976" calcext:value-type="float">
            <text:p>681.7</text:p>
          </table:table-cell>
          <table:table-cell office:value-type="float" office:value="545.361877" calcext:value-type="float">
            <text:p>545.4</text:p>
          </table:table-cell>
          <table:table-cell office:value-type="float" office:value="445.536316" calcext:value-type="float">
            <text:p>445.5</text:p>
          </table:table-cell>
          <table:table-cell office:value-type="float" office:value="369.017609" calcext:value-type="float">
            <text:p>369.0</text:p>
          </table:table-cell>
          <table:table-cell office:value-type="float" office:value="311.343781" calcext:value-type="float">
            <text:p>311.3</text:p>
          </table:table-cell>
          <table:table-cell office:value-type="float" office:value="266.011658" calcext:value-type="float">
            <text:p>266.0</text:p>
          </table:table-cell>
          <table:table-cell office:value-type="float" office:value="224.999161" calcext:value-type="float">
            <text:p>225.0</text:p>
          </table:table-cell>
          <table:table-cell office:value-type="float" office:value="186.217651" calcext:value-type="float">
            <text:p>186.2</text:p>
          </table:table-cell>
          <table:table-cell office:value-type="float" office:value="153.22728" calcext:value-type="float">
            <text:p>153.2</text:p>
          </table:table-cell>
          <table:table-cell office:value-type="float" office:value="126.550156" calcext:value-type="float">
            <text:p>126.6</text:p>
          </table:table-cell>
          <table:table-cell office:value-type="float" office:value="104.429985" calcext:value-type="float">
            <text:p>104.4</text:p>
          </table:table-cell>
          <table:table-cell office:value-type="float" office:value="85.395248" calcext:value-type="float">
            <text:p>85.4</text:p>
          </table:table-cell>
          <table:table-cell office:value-type="float" office:value="69.066193" calcext:value-type="float">
            <text:p>69.1</text:p>
          </table:table-cell>
          <table:table-cell office:value-type="float" office:value="57.009281" calcext:value-type="float">
            <text:p>57.0</text:p>
          </table:table-cell>
          <table:table-cell office:value-type="float" office:value="48.132732" calcext:value-type="float">
            <text:p>48.1</text:p>
          </table:table-cell>
          <table:table-cell office:value-type="float" office:value="41.534653" calcext:value-type="float">
            <text:p>41.5</text:p>
          </table:table-cell>
          <table:table-cell office:value-type="float" office:value="34.604301" calcext:value-type="float">
            <text:p>34.6</text:p>
          </table:table-cell>
          <table:table-cell office:value-type="float" office:value="6.218331" calcext:value-type="float">
            <text:p>6.2</text:p>
          </table:table-cell>
          <table:table-cell office:value-type="float" office:value="1.329109" calcext:value-type="float">
            <text:p>1.3</text:p>
          </table:table-cell>
          <table:table-cell office:value-type="float" office:value="0.379745" calcext:value-type="float">
            <text:p>0.4</text:p>
          </table:table-cell>
        </table:table-row>
        <table:table-row table:style-name="ro1">
          <table:table-cell/>
          <table:table-cell office:value-type="time" office:time-value="PT1108450H56M57.000000179S" calcext:value-type="time">
            <text:p>10:56:57</text:p>
          </table:table-cell>
          <table:table-cell office:value-type="float" office:value="21.04044" calcext:value-type="float">
            <text:p>21.0</text:p>
          </table:table-cell>
          <table:table-cell office:value-type="float" office:value="22140.697266" calcext:value-type="float">
            <text:p>22140.7</text:p>
          </table:table-cell>
          <table:table-cell office:value-type="float" office:value="14487.245117" calcext:value-type="float">
            <text:p>14487.2</text:p>
          </table:table-cell>
          <table:table-cell office:value-type="float" office:value="9578.839844" calcext:value-type="float">
            <text:p>9578.8</text:p>
          </table:table-cell>
          <table:table-cell office:value-type="float" office:value="6734.365234" calcext:value-type="float">
            <text:p>6734.4</text:p>
          </table:table-cell>
          <table:table-cell office:value-type="float" office:value="4640.777344" calcext:value-type="float">
            <text:p>4640.8</text:p>
          </table:table-cell>
          <table:table-cell office:value-type="float" office:value="3166.093506" calcext:value-type="float">
            <text:p>3166.1</text:p>
          </table:table-cell>
          <table:table-cell office:value-type="float" office:value="2238.593994" calcext:value-type="float">
            <text:p>2238.6</text:p>
          </table:table-cell>
          <table:table-cell office:value-type="float" office:value="1592.171997" calcext:value-type="float">
            <text:p>1592.2</text:p>
          </table:table-cell>
          <table:table-cell office:value-type="float" office:value="1151.259155" calcext:value-type="float">
            <text:p>1151.3</text:p>
          </table:table-cell>
          <table:table-cell office:value-type="float" office:value="868.375366" calcext:value-type="float">
            <text:p>868.4</text:p>
          </table:table-cell>
          <table:table-cell office:value-type="float" office:value="679.310913" calcext:value-type="float">
            <text:p>679.3</text:p>
          </table:table-cell>
          <table:table-cell office:value-type="float" office:value="542.479187" calcext:value-type="float">
            <text:p>542.5</text:p>
          </table:table-cell>
          <table:table-cell office:value-type="float" office:value="440.247467" calcext:value-type="float">
            <text:p>440.2</text:p>
          </table:table-cell>
          <table:table-cell office:value-type="float" office:value="361.969635" calcext:value-type="float">
            <text:p>362.0</text:p>
          </table:table-cell>
          <table:table-cell office:value-type="float" office:value="306.980286" calcext:value-type="float">
            <text:p>307.0</text:p>
          </table:table-cell>
          <table:table-cell office:value-type="float" office:value="261.876648" calcext:value-type="float">
            <text:p>261.9</text:p>
          </table:table-cell>
          <table:table-cell office:value-type="float" office:value="222.191177" calcext:value-type="float">
            <text:p>222.2</text:p>
          </table:table-cell>
          <table:table-cell office:value-type="float" office:value="183.97905" calcext:value-type="float">
            <text:p>184.0</text:p>
          </table:table-cell>
          <table:table-cell office:value-type="float" office:value="151.993027" calcext:value-type="float">
            <text:p>152.0</text:p>
          </table:table-cell>
          <table:table-cell office:value-type="float" office:value="121.717987" calcext:value-type="float">
            <text:p>121.7</text:p>
          </table:table-cell>
          <table:table-cell office:value-type="float" office:value="101.756432" calcext:value-type="float">
            <text:p>101.8</text:p>
          </table:table-cell>
          <table:table-cell office:value-type="float" office:value="82.412727" calcext:value-type="float">
            <text:p>82.4</text:p>
          </table:table-cell>
          <table:table-cell office:value-type="float" office:value="66.681114" calcext:value-type="float">
            <text:p>66.7</text:p>
          </table:table-cell>
          <table:table-cell office:value-type="float" office:value="54.751709" calcext:value-type="float">
            <text:p>54.8</text:p>
          </table:table-cell>
          <table:table-cell office:value-type="float" office:value="45.816532" calcext:value-type="float">
            <text:p>45.8</text:p>
          </table:table-cell>
          <table:table-cell office:value-type="float" office:value="38.212128" calcext:value-type="float">
            <text:p>38.2</text:p>
          </table:table-cell>
          <table:table-cell office:value-type="float" office:value="31.795914" calcext:value-type="float">
            <text:p>31.8</text:p>
          </table:table-cell>
          <table:table-cell office:value-type="float" office:value="6.368688" calcext:value-type="float">
            <text:p>6.4</text:p>
          </table:table-cell>
          <table:table-cell office:value-type="float" office:value="1.188188" calcext:value-type="float">
            <text:p>1.2</text:p>
          </table:table-cell>
          <table:table-cell office:value-type="float" office:value="0.237638" calcext:value-type="float">
            <text:p>0.2</text:p>
          </table:table-cell>
        </table:table-row>
        <table:table-row table:style-name="ro1">
          <table:table-cell/>
          <table:table-cell office:value-type="time" office:time-value="PT1108450H59M06.999999974S" calcext:value-type="time">
            <text:p>10:59:07</text:p>
          </table:table-cell>
          <table:table-cell office:value-type="float" office:value="21.061777" calcext:value-type="float">
            <text:p>21.1</text:p>
          </table:table-cell>
          <table:table-cell office:value-type="float" office:value="21934.332031" calcext:value-type="float">
            <text:p>21934.3</text:p>
          </table:table-cell>
          <table:table-cell office:value-type="float" office:value="14381.549805" calcext:value-type="float">
            <text:p>14381.5</text:p>
          </table:table-cell>
          <table:table-cell office:value-type="float" office:value="9548.339844" calcext:value-type="float">
            <text:p>9548.3</text:p>
          </table:table-cell>
          <table:table-cell office:value-type="float" office:value="6757.45459" calcext:value-type="float">
            <text:p>6757.5</text:p>
          </table:table-cell>
          <table:table-cell office:value-type="float" office:value="4637.975098" calcext:value-type="float">
            <text:p>4638.0</text:p>
          </table:table-cell>
          <table:table-cell office:value-type="float" office:value="3177.034912" calcext:value-type="float">
            <text:p>3177.0</text:p>
          </table:table-cell>
          <table:table-cell office:value-type="float" office:value="2256.172363" calcext:value-type="float">
            <text:p>2256.2</text:p>
          </table:table-cell>
          <table:table-cell office:value-type="float" office:value="1599.200317" calcext:value-type="float">
            <text:p>1599.2</text:p>
          </table:table-cell>
          <table:table-cell office:value-type="float" office:value="1167.280396" calcext:value-type="float">
            <text:p>1167.3</text:p>
          </table:table-cell>
          <table:table-cell office:value-type="float" office:value="880.742371" calcext:value-type="float">
            <text:p>880.7</text:p>
          </table:table-cell>
          <table:table-cell office:value-type="float" office:value="689.258057" calcext:value-type="float">
            <text:p>689.3</text:p>
          </table:table-cell>
          <table:table-cell office:value-type="float" office:value="544.208618" calcext:value-type="float">
            <text:p>544.2</text:p>
          </table:table-cell>
          <table:table-cell office:value-type="float" office:value="443.932159" calcext:value-type="float">
            <text:p>443.9</text:p>
          </table:table-cell>
          <table:table-cell office:value-type="float" office:value="367.490356" calcext:value-type="float">
            <text:p>367.5</text:p>
          </table:table-cell>
          <table:table-cell office:value-type="float" office:value="309.518036" calcext:value-type="float">
            <text:p>309.5</text:p>
          </table:table-cell>
          <table:table-cell office:value-type="float" office:value="263.225647" calcext:value-type="float">
            <text:p>263.2</text:p>
          </table:table-cell>
          <table:table-cell office:value-type="float" office:value="224.00769" calcext:value-type="float">
            <text:p>224.0</text:p>
          </table:table-cell>
          <table:table-cell office:value-type="float" office:value="185.501923" calcext:value-type="float">
            <text:p>185.5</text:p>
          </table:table-cell>
          <table:table-cell office:value-type="float" office:value="156.064697" calcext:value-type="float">
            <text:p>156.1</text:p>
          </table:table-cell>
          <table:table-cell office:value-type="float" office:value="126.20018" calcext:value-type="float">
            <text:p>126.2</text:p>
          </table:table-cell>
          <table:table-cell office:value-type="float" office:value="103.647476" calcext:value-type="float">
            <text:p>103.6</text:p>
          </table:table-cell>
          <table:table-cell office:value-type="float" office:value="83.041428" calcext:value-type="float">
            <text:p>83.0</text:p>
          </table:table-cell>
          <table:table-cell office:value-type="float" office:value="67.848022" calcext:value-type="float">
            <text:p>67.8</text:p>
          </table:table-cell>
          <table:table-cell office:value-type="float" office:value="56.168098" calcext:value-type="float">
            <text:p>56.2</text:p>
          </table:table-cell>
          <table:table-cell office:value-type="float" office:value="46.33987" calcext:value-type="float">
            <text:p>46.3</text:p>
          </table:table-cell>
          <table:table-cell office:value-type="float" office:value="38.69569" calcext:value-type="float">
            <text:p>38.7</text:p>
          </table:table-cell>
          <table:table-cell office:value-type="float" office:value="32.475891" calcext:value-type="float">
            <text:p>32.5</text:p>
          </table:table-cell>
          <table:table-cell office:value-type="float" office:value="6.979468" calcext:value-type="float">
            <text:p>7.0</text:p>
          </table:table-cell>
          <table:table-cell office:value-type="float" office:value="2.041613" calcext:value-type="float">
            <text:p>2.0</text:p>
          </table:table-cell>
          <table:table-cell office:value-type="float" office:value="0.379835" calcext:value-type="float">
            <text:p>0.4</text:p>
          </table:table-cell>
        </table:table-row>
        <table:table-row table:style-name="ro1">
          <table:table-cell/>
          <table:table-cell office:value-type="time" office:time-value="PT1108451H01M16.999999769S" calcext:value-type="time">
            <text:p>11:01:17</text:p>
          </table:table-cell>
          <table:table-cell office:value-type="float" office:value="21.044771" calcext:value-type="float">
            <text:p>21.0</text:p>
          </table:table-cell>
          <table:table-cell office:value-type="float" office:value="21968.6875" calcext:value-type="float">
            <text:p>21968.7</text:p>
          </table:table-cell>
          <table:table-cell office:value-type="float" office:value="14448.386719" calcext:value-type="float">
            <text:p>14448.4</text:p>
          </table:table-cell>
          <table:table-cell office:value-type="float" office:value="9605.141602" calcext:value-type="float">
            <text:p>9605.1</text:p>
          </table:table-cell>
          <table:table-cell office:value-type="float" office:value="6791.330566" calcext:value-type="float">
            <text:p>6791.3</text:p>
          </table:table-cell>
          <table:table-cell office:value-type="float" office:value="4666.384766" calcext:value-type="float">
            <text:p>4666.4</text:p>
          </table:table-cell>
          <table:table-cell office:value-type="float" office:value="3190.246094" calcext:value-type="float">
            <text:p>3190.2</text:p>
          </table:table-cell>
          <table:table-cell office:value-type="float" office:value="2250.677734" calcext:value-type="float">
            <text:p>2250.7</text:p>
          </table:table-cell>
          <table:table-cell office:value-type="float" office:value="1602.535889" calcext:value-type="float">
            <text:p>1602.5</text:p>
          </table:table-cell>
          <table:table-cell office:value-type="float" office:value="1167.083252" calcext:value-type="float">
            <text:p>1167.1</text:p>
          </table:table-cell>
          <table:table-cell office:value-type="float" office:value="878.650574" calcext:value-type="float">
            <text:p>878.7</text:p>
          </table:table-cell>
          <table:table-cell office:value-type="float" office:value="692.190918" calcext:value-type="float">
            <text:p>692.2</text:p>
          </table:table-cell>
          <table:table-cell office:value-type="float" office:value="554.437012" calcext:value-type="float">
            <text:p>554.4</text:p>
          </table:table-cell>
          <table:table-cell office:value-type="float" office:value="453.60437" calcext:value-type="float">
            <text:p>453.6</text:p>
          </table:table-cell>
          <table:table-cell office:value-type="float" office:value="373.251862" calcext:value-type="float">
            <text:p>373.3</text:p>
          </table:table-cell>
          <table:table-cell office:value-type="float" office:value="312.001495" calcext:value-type="float">
            <text:p>312.0</text:p>
          </table:table-cell>
          <table:table-cell office:value-type="float" office:value="263.72348" calcext:value-type="float">
            <text:p>263.7</text:p>
          </table:table-cell>
          <table:table-cell office:value-type="float" office:value="223.380905" calcext:value-type="float">
            <text:p>223.4</text:p>
          </table:table-cell>
          <table:table-cell office:value-type="float" office:value="186.602173" calcext:value-type="float">
            <text:p>186.6</text:p>
          </table:table-cell>
          <table:table-cell office:value-type="float" office:value="154.242584" calcext:value-type="float">
            <text:p>154.2</text:p>
          </table:table-cell>
          <table:table-cell office:value-type="float" office:value="126.682297" calcext:value-type="float">
            <text:p>126.7</text:p>
          </table:table-cell>
          <table:table-cell office:value-type="float" office:value="103.778748" calcext:value-type="float">
            <text:p>103.8</text:p>
          </table:table-cell>
          <table:table-cell office:value-type="float" office:value="83.631226" calcext:value-type="float">
            <text:p>83.6</text:p>
          </table:table-cell>
          <table:table-cell office:value-type="float" office:value="68.520584" calcext:value-type="float">
            <text:p>68.5</text:p>
          </table:table-cell>
          <table:table-cell office:value-type="float" office:value="56.736183" calcext:value-type="float">
            <text:p>56.7</text:p>
          </table:table-cell>
          <table:table-cell office:value-type="float" office:value="46.234764" calcext:value-type="float">
            <text:p>46.2</text:p>
          </table:table-cell>
          <table:table-cell office:value-type="float" office:value="39.392208" calcext:value-type="float">
            <text:p>39.4</text:p>
          </table:table-cell>
          <table:table-cell office:value-type="float" office:value="32.407101" calcext:value-type="float">
            <text:p>32.4</text:p>
          </table:table-cell>
          <table:table-cell office:value-type="float" office:value="5.702129" calcext:value-type="float">
            <text:p>5.7</text:p>
          </table:table-cell>
          <table:table-cell office:value-type="float" office:value="1.04539" calcext:value-type="float">
            <text:p>1.0</text:p>
          </table:table-cell>
          <table:table-cell office:value-type="float" office:value="0.095035" calcext:value-type="float">
            <text:p>0.1</text:p>
          </table:table-cell>
        </table:table-row>
        <table:table-row table:style-name="ro1">
          <table:table-cell/>
          <table:table-cell office:value-type="time" office:time-value="PT1108451H03M27.000000402S" calcext:value-type="time">
            <text:p>11:03:27</text:p>
          </table:table-cell>
          <table:table-cell office:value-type="float" office:value="20.989532" calcext:value-type="float">
            <text:p>21.0</text:p>
          </table:table-cell>
          <table:table-cell office:value-type="float" office:value="22297.400391" calcext:value-type="float">
            <text:p>22297.4</text:p>
          </table:table-cell>
          <table:table-cell office:value-type="float" office:value="14623.098633" calcext:value-type="float">
            <text:p>14623.1</text:p>
          </table:table-cell>
          <table:table-cell office:value-type="float" office:value="9717.795898" calcext:value-type="float">
            <text:p>9717.8</text:p>
          </table:table-cell>
          <table:table-cell office:value-type="float" office:value="6867.232422" calcext:value-type="float">
            <text:p>6867.2</text:p>
          </table:table-cell>
          <table:table-cell office:value-type="float" office:value="4720.066895" calcext:value-type="float">
            <text:p>4720.1</text:p>
          </table:table-cell>
          <table:table-cell office:value-type="float" office:value="3221.510498" calcext:value-type="float">
            <text:p>3221.5</text:p>
          </table:table-cell>
          <table:table-cell office:value-type="float" office:value="2269.083496" calcext:value-type="float">
            <text:p>2269.1</text:p>
          </table:table-cell>
          <table:table-cell office:value-type="float" office:value="1612.803955" calcext:value-type="float">
            <text:p>1612.8</text:p>
          </table:table-cell>
          <table:table-cell office:value-type="float" office:value="1178.778076" calcext:value-type="float">
            <text:p>1178.8</text:p>
          </table:table-cell>
          <table:table-cell office:value-type="float" office:value="892.301941" calcext:value-type="float">
            <text:p>892.3</text:p>
          </table:table-cell>
          <table:table-cell office:value-type="float" office:value="699.491516" calcext:value-type="float">
            <text:p>699.5</text:p>
          </table:table-cell>
          <table:table-cell office:value-type="float" office:value="557.897156" calcext:value-type="float">
            <text:p>557.9</text:p>
          </table:table-cell>
          <table:table-cell office:value-type="float" office:value="449.89093" calcext:value-type="float">
            <text:p>449.9</text:p>
          </table:table-cell>
          <table:table-cell office:value-type="float" office:value="372.56665" calcext:value-type="float">
            <text:p>372.6</text:p>
          </table:table-cell>
          <table:table-cell office:value-type="float" office:value="313.680176" calcext:value-type="float">
            <text:p>313.7</text:p>
          </table:table-cell>
          <table:table-cell office:value-type="float" office:value="268.324219" calcext:value-type="float">
            <text:p>268.3</text:p>
          </table:table-cell>
          <table:table-cell office:value-type="float" office:value="230.067062" calcext:value-type="float">
            <text:p>230.1</text:p>
          </table:table-cell>
          <table:table-cell office:value-type="float" office:value="192.667465" calcext:value-type="float">
            <text:p>192.7</text:p>
          </table:table-cell>
          <table:table-cell office:value-type="float" office:value="160.460938" calcext:value-type="float">
            <text:p>160.5</text:p>
          </table:table-cell>
          <table:table-cell office:value-type="float" office:value="131.970551" calcext:value-type="float">
            <text:p>132.0</text:p>
          </table:table-cell>
          <table:table-cell office:value-type="float" office:value="108.768501" calcext:value-type="float">
            <text:p>108.8</text:p>
          </table:table-cell>
          <table:table-cell office:value-type="float" office:value="89.234955" calcext:value-type="float">
            <text:p>89.2</text:p>
          </table:table-cell>
          <table:table-cell office:value-type="float" office:value="72.369408" calcext:value-type="float">
            <text:p>72.4</text:p>
          </table:table-cell>
          <table:table-cell office:value-type="float" office:value="59.553493" calcext:value-type="float">
            <text:p>59.6</text:p>
          </table:table-cell>
          <table:table-cell office:value-type="float" office:value="49.834362" calcext:value-type="float">
            <text:p>49.8</text:p>
          </table:table-cell>
          <table:table-cell office:value-type="float" office:value="41.544518" calcext:value-type="float">
            <text:p>41.5</text:p>
          </table:table-cell>
          <table:table-cell office:value-type="float" office:value="33.921669" calcext:value-type="float">
            <text:p>33.9</text:p>
          </table:table-cell>
          <table:table-cell office:value-type="float" office:value="6.288849" calcext:value-type="float">
            <text:p>6.3</text:p>
          </table:table-cell>
          <table:table-cell office:value-type="float" office:value="1.238713" calcext:value-type="float">
            <text:p>1.2</text:p>
          </table:table-cell>
          <table:table-cell office:value-type="float" office:value="0.190571" calcext:value-type="float">
            <text:p>0.2</text:p>
          </table:table-cell>
        </table:table-row>
        <table:table-row table:style-name="ro1">
          <table:table-cell/>
          <table:table-cell office:value-type="time" office:time-value="PT1108451H05M37.999999803S" calcext:value-type="time">
            <text:p>11:05:38</text:p>
          </table:table-cell>
          <table:table-cell office:value-type="float" office:value="21.171135" calcext:value-type="float">
            <text:p>21.2</text:p>
          </table:table-cell>
          <table:table-cell office:value-type="float" office:value="21856.078125" calcext:value-type="float">
            <text:p>21856.1</text:p>
          </table:table-cell>
          <table:table-cell office:value-type="float" office:value="14425.537109" calcext:value-type="float">
            <text:p>14425.5</text:p>
          </table:table-cell>
          <table:table-cell office:value-type="float" office:value="9642.042969" calcext:value-type="float">
            <text:p>9642.0</text:p>
          </table:table-cell>
          <table:table-cell office:value-type="float" office:value="6814.041992" calcext:value-type="float">
            <text:p>6814.0</text:p>
          </table:table-cell>
          <table:table-cell office:value-type="float" office:value="4682.129883" calcext:value-type="float">
            <text:p>4682.1</text:p>
          </table:table-cell>
          <table:table-cell office:value-type="float" office:value="3210.786865" calcext:value-type="float">
            <text:p>3210.8</text:p>
          </table:table-cell>
          <table:table-cell office:value-type="float" office:value="2276.731934" calcext:value-type="float">
            <text:p>2276.7</text:p>
          </table:table-cell>
          <table:table-cell office:value-type="float" office:value="1617.201904" calcext:value-type="float">
            <text:p>1617.2</text:p>
          </table:table-cell>
          <table:table-cell office:value-type="float" office:value="1176.885376" calcext:value-type="float">
            <text:p>1176.9</text:p>
          </table:table-cell>
          <table:table-cell office:value-type="float" office:value="891.544067" calcext:value-type="float">
            <text:p>891.5</text:p>
          </table:table-cell>
          <table:table-cell office:value-type="float" office:value="696.986694" calcext:value-type="float">
            <text:p>697.0</text:p>
          </table:table-cell>
          <table:table-cell office:value-type="float" office:value="553.914551" calcext:value-type="float">
            <text:p>553.9</text:p>
          </table:table-cell>
          <table:table-cell office:value-type="float" office:value="449.763336" calcext:value-type="float">
            <text:p>449.8</text:p>
          </table:table-cell>
          <table:table-cell office:value-type="float" office:value="370.740631" calcext:value-type="float">
            <text:p>370.7</text:p>
          </table:table-cell>
          <table:table-cell office:value-type="float" office:value="311.272888" calcext:value-type="float">
            <text:p>311.3</text:p>
          </table:table-cell>
          <table:table-cell office:value-type="float" office:value="265.691956" calcext:value-type="float">
            <text:p>265.7</text:p>
          </table:table-cell>
          <table:table-cell office:value-type="float" office:value="226.062515" calcext:value-type="float">
            <text:p>226.1</text:p>
          </table:table-cell>
          <table:table-cell office:value-type="float" office:value="187.708405" calcext:value-type="float">
            <text:p>187.7</text:p>
          </table:table-cell>
          <table:table-cell office:value-type="float" office:value="154.927917" calcext:value-type="float">
            <text:p>154.9</text:p>
          </table:table-cell>
          <table:table-cell office:value-type="float" office:value="126.77639" calcext:value-type="float">
            <text:p>126.8</text:p>
          </table:table-cell>
          <table:table-cell office:value-type="float" office:value="102.54528" calcext:value-type="float">
            <text:p>102.5</text:p>
          </table:table-cell>
          <table:table-cell office:value-type="float" office:value="83.604401" calcext:value-type="float">
            <text:p>83.6</text:p>
          </table:table-cell>
          <table:table-cell office:value-type="float" office:value="67.261391" calcext:value-type="float">
            <text:p>67.3</text:p>
          </table:table-cell>
          <table:table-cell office:value-type="float" office:value="55.027752" calcext:value-type="float">
            <text:p>55.0</text:p>
          </table:table-cell>
          <table:table-cell office:value-type="float" office:value="46.525612" calcext:value-type="float">
            <text:p>46.5</text:p>
          </table:table-cell>
          <table:table-cell office:value-type="float" office:value="39.487728" calcext:value-type="float">
            <text:p>39.5</text:p>
          </table:table-cell>
          <table:table-cell office:value-type="float" office:value="32.449844" calcext:value-type="float">
            <text:p>32.4</text:p>
          </table:table-cell>
          <table:table-cell office:value-type="float" office:value="5.101285" calcext:value-type="float">
            <text:p>5.1</text:p>
          </table:table-cell>
          <table:table-cell office:value-type="float" office:value="1.228087" calcext:value-type="float">
            <text:p>1.2</text:p>
          </table:table-cell>
          <table:table-cell office:value-type="float" office:value="0.094468" calcext:value-type="float">
            <text:p>0.1</text:p>
          </table:table-cell>
        </table:table-row>
        <table:table-row table:style-name="ro1">
          <table:table-cell/>
          <table:table-cell office:value-type="time" office:time-value="PT1108451H07M48.000000436S" calcext:value-type="time">
            <text:p>11:07:48</text:p>
          </table:table-cell>
          <table:table-cell office:value-type="float" office:value="20.974035" calcext:value-type="float">
            <text:p>21.0</text:p>
          </table:table-cell>
          <table:table-cell office:value-type="float" office:value="22150.673828" calcext:value-type="float">
            <text:p>22150.7</text:p>
          </table:table-cell>
          <table:table-cell office:value-type="float" office:value="14572.255859" calcext:value-type="float">
            <text:p>14572.3</text:p>
          </table:table-cell>
          <table:table-cell office:value-type="float" office:value="9638.917969" calcext:value-type="float">
            <text:p>9638.9</text:p>
          </table:table-cell>
          <table:table-cell office:value-type="float" office:value="6789.82373" calcext:value-type="float">
            <text:p>6789.8</text:p>
          </table:table-cell>
          <table:table-cell office:value-type="float" office:value="4684.029297" calcext:value-type="float">
            <text:p>4684.0</text:p>
          </table:table-cell>
          <table:table-cell office:value-type="float" office:value="3215.451904" calcext:value-type="float">
            <text:p>3215.5</text:p>
          </table:table-cell>
          <table:table-cell office:value-type="float" office:value="2280.724609" calcext:value-type="float">
            <text:p>2280.7</text:p>
          </table:table-cell>
          <table:table-cell office:value-type="float" office:value="1625.199951" calcext:value-type="float">
            <text:p>1625.2</text:p>
          </table:table-cell>
          <table:table-cell office:value-type="float" office:value="1188.564819" calcext:value-type="float">
            <text:p>1188.6</text:p>
          </table:table-cell>
          <table:table-cell office:value-type="float" office:value="899.2547" calcext:value-type="float">
            <text:p>899.3</text:p>
          </table:table-cell>
          <table:table-cell office:value-type="float" office:value="706.444885" calcext:value-type="float">
            <text:p>706.4</text:p>
          </table:table-cell>
          <table:table-cell office:value-type="float" office:value="567.797302" calcext:value-type="float">
            <text:p>567.8</text:p>
          </table:table-cell>
          <table:table-cell office:value-type="float" office:value="461.666046" calcext:value-type="float">
            <text:p>461.7</text:p>
          </table:table-cell>
          <table:table-cell office:value-type="float" office:value="382.234497" calcext:value-type="float">
            <text:p>382.2</text:p>
          </table:table-cell>
          <table:table-cell office:value-type="float" office:value="322.493988" calcext:value-type="float">
            <text:p>322.5</text:p>
          </table:table-cell>
          <table:table-cell office:value-type="float" office:value="276.675415" calcext:value-type="float">
            <text:p>276.7</text:p>
          </table:table-cell>
          <table:table-cell office:value-type="float" office:value="233.574509" calcext:value-type="float">
            <text:p>233.6</text:p>
          </table:table-cell>
          <table:table-cell office:value-type="float" office:value="194.716934" calcext:value-type="float">
            <text:p>194.7</text:p>
          </table:table-cell>
          <table:table-cell office:value-type="float" office:value="161.437698" calcext:value-type="float">
            <text:p>161.4</text:p>
          </table:table-cell>
          <table:table-cell office:value-type="float" office:value="132.687866" calcext:value-type="float">
            <text:p>132.7</text:p>
          </table:table-cell>
          <table:table-cell office:value-type="float" office:value="108.515121" calcext:value-type="float">
            <text:p>108.5</text:p>
          </table:table-cell>
          <table:table-cell office:value-type="float" office:value="89.0625" calcext:value-type="float">
            <text:p>89.1</text:p>
          </table:table-cell>
          <table:table-cell office:value-type="float" office:value="72.851982" calcext:value-type="float">
            <text:p>72.9</text:p>
          </table:table-cell>
          <table:table-cell office:value-type="float" office:value="59.120716" calcext:value-type="float">
            <text:p>59.1</text:p>
          </table:table-cell>
          <table:table-cell office:value-type="float" office:value="48.536201" calcext:value-type="float">
            <text:p>48.5</text:p>
          </table:table-cell>
          <table:table-cell office:value-type="float" office:value="41.479858" calcext:value-type="float">
            <text:p>41.5</text:p>
          </table:table-cell>
          <table:table-cell office:value-type="float" office:value="33.565311" calcext:value-type="float">
            <text:p>33.6</text:p>
          </table:table-cell>
          <table:table-cell office:value-type="float" office:value="6.388852" calcext:value-type="float">
            <text:p>6.4</text:p>
          </table:table-cell>
          <table:table-cell office:value-type="float" office:value="1.334984" calcext:value-type="float">
            <text:p>1.3</text:p>
          </table:table-cell>
          <table:table-cell office:value-type="float" office:value="0.190712" calcext:value-type="float">
            <text:p>0.2</text:p>
          </table:table-cell>
        </table:table-row>
        <table:table-row table:style-name="ro1">
          <table:table-cell/>
          <table:table-cell office:value-type="time" office:time-value="PT1108451H10M00.000000279S" calcext:value-type="time">
            <text:p>11:10:00</text:p>
          </table:table-cell>
          <table:table-cell office:value-type="float" office:value="20.915182" calcext:value-type="float">
            <text:p>20.9</text:p>
          </table:table-cell>
          <table:table-cell office:value-type="float" office:value="22067.080078" calcext:value-type="float">
            <text:p>22067.1</text:p>
          </table:table-cell>
          <table:table-cell office:value-type="float" office:value="14585.337891" calcext:value-type="float">
            <text:p>14585.3</text:p>
          </table:table-cell>
          <table:table-cell office:value-type="float" office:value="9739.576172" calcext:value-type="float">
            <text:p>9739.6</text:p>
          </table:table-cell>
          <table:table-cell office:value-type="float" office:value="6896.425781" calcext:value-type="float">
            <text:p>6896.4</text:p>
          </table:table-cell>
          <table:table-cell office:value-type="float" office:value="4761.947754" calcext:value-type="float">
            <text:p>4761.9</text:p>
          </table:table-cell>
          <table:table-cell office:value-type="float" office:value="3263.657959" calcext:value-type="float">
            <text:p>3263.7</text:p>
          </table:table-cell>
          <table:table-cell office:value-type="float" office:value="2306.984375" calcext:value-type="float">
            <text:p>2307.0</text:p>
          </table:table-cell>
          <table:table-cell office:value-type="float" office:value="1648.515381" calcext:value-type="float">
            <text:p>1648.5</text:p>
          </table:table-cell>
          <table:table-cell office:value-type="float" office:value="1205.870483" calcext:value-type="float">
            <text:p>1205.9</text:p>
          </table:table-cell>
          <table:table-cell office:value-type="float" office:value="913.164429" calcext:value-type="float">
            <text:p>913.2</text:p>
          </table:table-cell>
          <table:table-cell office:value-type="float" office:value="717.086731" calcext:value-type="float">
            <text:p>717.1</text:p>
          </table:table-cell>
          <table:table-cell office:value-type="float" office:value="572.168091" calcext:value-type="float">
            <text:p>572.2</text:p>
          </table:table-cell>
          <table:table-cell office:value-type="float" office:value="468.463531" calcext:value-type="float">
            <text:p>468.5</text:p>
          </table:table-cell>
          <table:table-cell office:value-type="float" office:value="382.736328" calcext:value-type="float">
            <text:p>382.7</text:p>
          </table:table-cell>
          <table:table-cell office:value-type="float" office:value="323.975189" calcext:value-type="float">
            <text:p>324.0</text:p>
          </table:table-cell>
          <table:table-cell office:value-type="float" office:value="275.589294" calcext:value-type="float">
            <text:p>275.6</text:p>
          </table:table-cell>
          <table:table-cell office:value-type="float" office:value="235.570511" calcext:value-type="float">
            <text:p>235.6</text:p>
          </table:table-cell>
          <table:table-cell office:value-type="float" office:value="195.647354" calcext:value-type="float">
            <text:p>195.6</text:p>
          </table:table-cell>
          <table:table-cell office:value-type="float" office:value="162.56134" calcext:value-type="float">
            <text:p>162.6</text:p>
          </table:table-cell>
          <table:table-cell office:value-type="float" office:value="132.104996" calcext:value-type="float">
            <text:p>132.1</text:p>
          </table:table-cell>
          <table:table-cell office:value-type="float" office:value="107.194862" calcext:value-type="float">
            <text:p>107.2</text:p>
          </table:table-cell>
          <table:table-cell office:value-type="float" office:value="87.830933" calcext:value-type="float">
            <text:p>87.8</text:p>
          </table:table-cell>
          <table:table-cell office:value-type="float" office:value="72.435417" calcext:value-type="float">
            <text:p>72.4</text:p>
          </table:table-cell>
          <table:table-cell office:value-type="float" office:value="59.000202" calcext:value-type="float">
            <text:p>59.0</text:p>
          </table:table-cell>
          <table:table-cell office:value-type="float" office:value="49.724644" calcext:value-type="float">
            <text:p>49.7</text:p>
          </table:table-cell>
          <table:table-cell office:value-type="float" office:value="41.83564" calcext:value-type="float">
            <text:p>41.8</text:p>
          </table:table-cell>
          <table:table-cell office:value-type="float" office:value="34.329128" calcext:value-type="float">
            <text:p>34.3</text:p>
          </table:table-cell>
          <table:table-cell office:value-type="float" office:value="6.64589" calcext:value-type="float">
            <text:p>6.6</text:p>
          </table:table-cell>
          <table:table-cell office:value-type="float" office:value="1.290928" calcext:value-type="float">
            <text:p>1.3</text:p>
          </table:table-cell>
          <table:table-cell office:value-type="float" office:value="0.191249" calcext:value-type="float">
            <text:p>0.2</text:p>
          </table:table-cell>
        </table:table-row>
        <table:table-row table:style-name="ro1">
          <table:table-cell/>
          <table:table-cell office:value-type="time" office:time-value="PT1108451H12M11.999999285S" calcext:value-type="time">
            <text:p>11:12:12</text:p>
          </table:table-cell>
          <table:table-cell office:value-type="float" office:value="20.937191" calcext:value-type="float">
            <text:p>20.9</text:p>
          </table:table-cell>
          <table:table-cell office:value-type="float" office:value="22253.033203" calcext:value-type="float">
            <text:p>22253.0</text:p>
          </table:table-cell>
          <table:table-cell office:value-type="float" office:value="14623.881836" calcext:value-type="float">
            <text:p>14623.9</text:p>
          </table:table-cell>
          <table:table-cell office:value-type="float" office:value="9734.400391" calcext:value-type="float">
            <text:p>9734.4</text:p>
          </table:table-cell>
          <table:table-cell office:value-type="float" office:value="6866.011719" calcext:value-type="float">
            <text:p>6866.0</text:p>
          </table:table-cell>
          <table:table-cell office:value-type="float" office:value="4725.323242" calcext:value-type="float">
            <text:p>4725.3</text:p>
          </table:table-cell>
          <table:table-cell office:value-type="float" office:value="3243.653809" calcext:value-type="float">
            <text:p>3243.7</text:p>
          </table:table-cell>
          <table:table-cell office:value-type="float" office:value="2310.290771" calcext:value-type="float">
            <text:p>2310.3</text:p>
          </table:table-cell>
          <table:table-cell office:value-type="float" office:value="1650.125854" calcext:value-type="float">
            <text:p>1650.1</text:p>
          </table:table-cell>
          <table:table-cell office:value-type="float" office:value="1205.367065" calcext:value-type="float">
            <text:p>1205.4</text:p>
          </table:table-cell>
          <table:table-cell office:value-type="float" office:value="915.356812" calcext:value-type="float">
            <text:p>915.4</text:p>
          </table:table-cell>
          <table:table-cell office:value-type="float" office:value="721.682312" calcext:value-type="float">
            <text:p>721.7</text:p>
          </table:table-cell>
          <table:table-cell office:value-type="float" office:value="574.766663" calcext:value-type="float">
            <text:p>574.8</text:p>
          </table:table-cell>
          <table:table-cell office:value-type="float" office:value="469.595001" calcext:value-type="float">
            <text:p>469.6</text:p>
          </table:table-cell>
          <table:table-cell office:value-type="float" office:value="389.737091" calcext:value-type="float">
            <text:p>389.7</text:p>
          </table:table-cell>
          <table:table-cell office:value-type="float" office:value="329.748138" calcext:value-type="float">
            <text:p>329.7</text:p>
          </table:table-cell>
          <table:table-cell office:value-type="float" office:value="281.747437" calcext:value-type="float">
            <text:p>281.7</text:p>
          </table:table-cell>
          <table:table-cell office:value-type="float" office:value="239.382645" calcext:value-type="float">
            <text:p>239.4</text:p>
          </table:table-cell>
          <table:table-cell office:value-type="float" office:value="202.176117" calcext:value-type="float">
            <text:p>202.2</text:p>
          </table:table-cell>
          <table:table-cell office:value-type="float" office:value="165.877075" calcext:value-type="float">
            <text:p>165.9</text:p>
          </table:table-cell>
          <table:table-cell office:value-type="float" office:value="136.837845" calcext:value-type="float">
            <text:p>136.8</text:p>
          </table:table-cell>
          <table:table-cell office:value-type="float" office:value="110.712082" calcext:value-type="float">
            <text:p>110.7</text:p>
          </table:table-cell>
          <table:table-cell office:value-type="float" office:value="90.747604" calcext:value-type="float">
            <text:p>90.7</text:p>
          </table:table-cell>
          <table:table-cell office:value-type="float" office:value="74.41304" calcext:value-type="float">
            <text:p>74.4</text:p>
          </table:table-cell>
          <table:table-cell office:value-type="float" office:value="61.421803" calcext:value-type="float">
            <text:p>61.4</text:p>
          </table:table-cell>
          <table:table-cell office:value-type="float" office:value="50.05447" calcext:value-type="float">
            <text:p>50.1</text:p>
          </table:table-cell>
          <table:table-cell office:value-type="float" office:value="43.03347" calcext:value-type="float">
            <text:p>43.0</text:p>
          </table:table-cell>
          <table:table-cell office:value-type="float" office:value="35.391567" calcext:value-type="float">
            <text:p>35.4</text:p>
          </table:table-cell>
          <table:table-cell office:value-type="float" office:value="6.925475" calcext:value-type="float">
            <text:p>6.9</text:p>
          </table:table-cell>
          <table:table-cell office:value-type="float" office:value="0.907476" calcext:value-type="float">
            <text:p>0.9</text:p>
          </table:table-cell>
          <table:table-cell office:value-type="float" office:value="0.095524" calcext:value-type="float">
            <text:p>0.1</text:p>
          </table:table-cell>
        </table:table-row>
        <table:table-row table:style-name="ro1">
          <table:table-cell/>
          <table:table-cell office:value-type="time" office:time-value="PT1108451H14M25.00000041S" calcext:value-type="time">
            <text:p>11:14:25</text:p>
          </table:table-cell>
          <table:table-cell office:value-type="float" office:value="20.928505" calcext:value-type="float">
            <text:p>20.9</text:p>
          </table:table-cell>
          <table:table-cell office:value-type="float" office:value="22301.59375" calcext:value-type="float">
            <text:p>22301.6</text:p>
          </table:table-cell>
          <table:table-cell office:value-type="float" office:value="14590.72168" calcext:value-type="float">
            <text:p>14590.7</text:p>
          </table:table-cell>
          <table:table-cell office:value-type="float" office:value="9743.983398" calcext:value-type="float">
            <text:p>9744.0</text:p>
          </table:table-cell>
          <table:table-cell office:value-type="float" office:value="6910.097168" calcext:value-type="float">
            <text:p>6910.1</text:p>
          </table:table-cell>
          <table:table-cell office:value-type="float" office:value="4767.421387" calcext:value-type="float">
            <text:p>4767.4</text:p>
          </table:table-cell>
          <table:table-cell office:value-type="float" office:value="3290.488281" calcext:value-type="float">
            <text:p>3290.5</text:p>
          </table:table-cell>
          <table:table-cell office:value-type="float" office:value="2338.294189" calcext:value-type="float">
            <text:p>2338.3</text:p>
          </table:table-cell>
          <table:table-cell office:value-type="float" office:value="1676.947266" calcext:value-type="float">
            <text:p>1676.9</text:p>
          </table:table-cell>
          <table:table-cell office:value-type="float" office:value="1228.468018" calcext:value-type="float">
            <text:p>1228.5</text:p>
          </table:table-cell>
          <table:table-cell office:value-type="float" office:value="933.702637" calcext:value-type="float">
            <text:p>933.7</text:p>
          </table:table-cell>
          <table:table-cell office:value-type="float" office:value="731.681519" calcext:value-type="float">
            <text:p>731.7</text:p>
          </table:table-cell>
          <table:table-cell office:value-type="float" office:value="586.377319" calcext:value-type="float">
            <text:p>586.4</text:p>
          </table:table-cell>
          <table:table-cell office:value-type="float" office:value="479.585144" calcext:value-type="float">
            <text:p>479.6</text:p>
          </table:table-cell>
          <table:table-cell office:value-type="float" office:value="396.970551" calcext:value-type="float">
            <text:p>397.0</text:p>
          </table:table-cell>
          <table:table-cell office:value-type="float" office:value="335.953278" calcext:value-type="float">
            <text:p>336.0</text:p>
          </table:table-cell>
          <table:table-cell office:value-type="float" office:value="285.591339" calcext:value-type="float">
            <text:p>285.6</text:p>
          </table:table-cell>
          <table:table-cell office:value-type="float" office:value="241.154343" calcext:value-type="float">
            <text:p>241.2</text:p>
          </table:table-cell>
          <table:table-cell office:value-type="float" office:value="199.10643" calcext:value-type="float">
            <text:p>199.1</text:p>
          </table:table-cell>
          <table:table-cell office:value-type="float" office:value="165.229187" calcext:value-type="float">
            <text:p>165.2</text:p>
          </table:table-cell>
          <table:table-cell office:value-type="float" office:value="135.84343" calcext:value-type="float">
            <text:p>135.8</text:p>
          </table:table-cell>
          <table:table-cell office:value-type="float" office:value="111.952576" calcext:value-type="float">
            <text:p>112.0</text:p>
          </table:table-cell>
          <table:table-cell office:value-type="float" office:value="91.024178" calcext:value-type="float">
            <text:p>91.0</text:p>
          </table:table-cell>
          <table:table-cell office:value-type="float" office:value="72.867126" calcext:value-type="float">
            <text:p>72.9</text:p>
          </table:table-cell>
          <table:table-cell office:value-type="float" office:value="58.867081" calcext:value-type="float">
            <text:p>58.9</text:p>
          </table:table-cell>
          <table:table-cell office:value-type="float" office:value="48.450665" calcext:value-type="float">
            <text:p>48.5</text:p>
          </table:table-cell>
          <table:table-cell office:value-type="float" office:value="41.856789" calcext:value-type="float">
            <text:p>41.9</text:p>
          </table:table-cell>
          <table:table-cell office:value-type="float" office:value="34.11615" calcext:value-type="float">
            <text:p>34.1</text:p>
          </table:table-cell>
          <table:table-cell office:value-type="float" office:value="6.020497" calcext:value-type="float">
            <text:p>6.0</text:p>
          </table:table-cell>
          <table:table-cell office:value-type="float" office:value="1.003416" calcext:value-type="float">
            <text:p>1.0</text:p>
          </table:table-cell>
          <table:table-cell office:value-type="float" office:value="0.143345" calcext:value-type="float">
            <text:p>0.1</text:p>
          </table:table-cell>
        </table:table-row>
        <table:table-row table:style-name="ro1">
          <table:table-cell/>
          <table:table-cell office:value-type="time" office:time-value="PT1108451H22M57.000000235S" calcext:value-type="time">
            <text:p>11:22:57</text:p>
          </table:table-cell>
          <table:table-cell office:value-type="float" office:value="10.095458" calcext:value-type="float">
            <text:p>10.1</text:p>
          </table:table-cell>
          <table:table-cell office:value-type="float" office:value="21776.128906" calcext:value-type="float">
            <text:p>21776.1</text:p>
          </table:table-cell>
          <table:table-cell office:value-type="float" office:value="14335.457031" calcext:value-type="float">
            <text:p>14335.5</text:p>
          </table:table-cell>
          <table:table-cell office:value-type="float" office:value="9517.349609" calcext:value-type="float">
            <text:p>9517.3</text:p>
          </table:table-cell>
          <table:table-cell office:value-type="float" office:value="6738.87207" calcext:value-type="float">
            <text:p>6738.9</text:p>
          </table:table-cell>
          <table:table-cell office:value-type="float" office:value="4645.752441" calcext:value-type="float">
            <text:p>4645.8</text:p>
          </table:table-cell>
          <table:table-cell office:value-type="float" office:value="3192.029541" calcext:value-type="float">
            <text:p>3192.0</text:p>
          </table:table-cell>
          <table:table-cell office:value-type="float" office:value="2284.492676" calcext:value-type="float">
            <text:p>2284.5</text:p>
          </table:table-cell>
          <table:table-cell office:value-type="float" office:value="1635.388916" calcext:value-type="float">
            <text:p>1635.4</text:p>
          </table:table-cell>
          <table:table-cell office:value-type="float" office:value="1198.855957" calcext:value-type="float">
            <text:p>1198.9</text:p>
          </table:table-cell>
          <table:table-cell office:value-type="float" office:value="912.291443" calcext:value-type="float">
            <text:p>912.3</text:p>
          </table:table-cell>
          <table:table-cell office:value-type="float" office:value="711.111877" calcext:value-type="float">
            <text:p>711.1</text:p>
          </table:table-cell>
          <table:table-cell office:value-type="float" office:value="568.077271" calcext:value-type="float">
            <text:p>568.1</text:p>
          </table:table-cell>
          <table:table-cell office:value-type="float" office:value="466.447388" calcext:value-type="float">
            <text:p>466.4</text:p>
          </table:table-cell>
          <table:table-cell office:value-type="float" office:value="387.203827" calcext:value-type="float">
            <text:p>387.2</text:p>
          </table:table-cell>
          <table:table-cell office:value-type="float" office:value="325.39386" calcext:value-type="float">
            <text:p>325.4</text:p>
          </table:table-cell>
          <table:table-cell office:value-type="float" office:value="277.352448" calcext:value-type="float">
            <text:p>277.4</text:p>
          </table:table-cell>
          <table:table-cell office:value-type="float" office:value="234.957138" calcext:value-type="float">
            <text:p>235.0</text:p>
          </table:table-cell>
          <table:table-cell office:value-type="float" office:value="194.542938" calcext:value-type="float">
            <text:p>194.5</text:p>
          </table:table-cell>
          <table:table-cell office:value-type="float" office:value="162.6474" calcext:value-type="float">
            <text:p>162.6</text:p>
          </table:table-cell>
          <table:table-cell office:value-type="float" office:value="133.228226" calcext:value-type="float">
            <text:p>133.2</text:p>
          </table:table-cell>
          <table:table-cell office:value-type="float" office:value="111.436249" calcext:value-type="float">
            <text:p>111.4</text:p>
          </table:table-cell>
          <table:table-cell office:value-type="float" office:value="91.328201" calcext:value-type="float">
            <text:p>91.3</text:p>
          </table:table-cell>
          <table:table-cell office:value-type="float" office:value="71.913528" calcext:value-type="float">
            <text:p>71.9</text:p>
          </table:table-cell>
          <table:table-cell office:value-type="float" office:value="58.144958" calcext:value-type="float">
            <text:p>58.1</text:p>
          </table:table-cell>
          <table:table-cell office:value-type="float" office:value="50.616821" calcext:value-type="float">
            <text:p>50.6</text:p>
          </table:table-cell>
          <table:table-cell office:value-type="float" office:value="42.395302" calcext:value-type="float">
            <text:p>42.4</text:p>
          </table:table-cell>
          <table:table-cell office:value-type="float" office:value="34.966221" calcext:value-type="float">
            <text:p>35.0</text:p>
          </table:table-cell>
          <table:table-cell office:value-type="float" office:value="6.042321" calcext:value-type="float">
            <text:p>6.0</text:p>
          </table:table-cell>
          <table:table-cell office:value-type="float" office:value="1.089599" calcext:value-type="float">
            <text:p>1.1</text:p>
          </table:table-cell>
          <table:table-cell office:value-type="float" office:value="0.099054" calcext:value-type="float">
            <text:p>0.1</text:p>
          </table:table-cell>
        </table:table-row>
        <table:table-row table:style-name="ro1">
          <table:table-cell/>
          <table:table-cell office:value-type="time" office:time-value="PT1108451H24M01.000000108S" calcext:value-type="time">
            <text:p>11:24:01</text:p>
          </table:table-cell>
          <table:table-cell office:value-type="float" office:value="10.13731" calcext:value-type="float">
            <text:p>10.1</text:p>
          </table:table-cell>
          <table:table-cell office:value-type="float" office:value="22100.931641" calcext:value-type="float">
            <text:p>22100.9</text:p>
          </table:table-cell>
          <table:table-cell office:value-type="float" office:value="14516.474609" calcext:value-type="float">
            <text:p>14516.5</text:p>
          </table:table-cell>
          <table:table-cell office:value-type="float" office:value="9655.915039" calcext:value-type="float">
            <text:p>9655.9</text:p>
          </table:table-cell>
          <table:table-cell office:value-type="float" office:value="6846.39209" calcext:value-type="float">
            <text:p>6846.4</text:p>
          </table:table-cell>
          <table:table-cell office:value-type="float" office:value="4716.635742" calcext:value-type="float">
            <text:p>4716.6</text:p>
          </table:table-cell>
          <table:table-cell office:value-type="float" office:value="3258.556641" calcext:value-type="float">
            <text:p>3258.6</text:p>
          </table:table-cell>
          <table:table-cell office:value-type="float" office:value="2306.627686" calcext:value-type="float">
            <text:p>2306.6</text:p>
          </table:table-cell>
          <table:table-cell office:value-type="float" office:value="1657.343018" calcext:value-type="float">
            <text:p>1657.3</text:p>
          </table:table-cell>
          <table:table-cell office:value-type="float" office:value="1213.142334" calcext:value-type="float">
            <text:p>1213.1</text:p>
          </table:table-cell>
          <table:table-cell office:value-type="float" office:value="924.111023" calcext:value-type="float">
            <text:p>924.1</text:p>
          </table:table-cell>
          <table:table-cell office:value-type="float" office:value="729.483459" calcext:value-type="float">
            <text:p>729.5</text:p>
          </table:table-cell>
          <table:table-cell office:value-type="float" office:value="587.532593" calcext:value-type="float">
            <text:p>587.5</text:p>
          </table:table-cell>
          <table:table-cell office:value-type="float" office:value="482.573792" calcext:value-type="float">
            <text:p>482.6</text:p>
          </table:table-cell>
          <table:table-cell office:value-type="float" office:value="407.208618" calcext:value-type="float">
            <text:p>407.2</text:p>
          </table:table-cell>
          <table:table-cell office:value-type="float" office:value="342.595825" calcext:value-type="float">
            <text:p>342.6</text:p>
          </table:table-cell>
          <table:table-cell office:value-type="float" office:value="294.950043" calcext:value-type="float">
            <text:p>295.0</text:p>
          </table:table-cell>
          <table:table-cell office:value-type="float" office:value="249.07988" calcext:value-type="float">
            <text:p>249.1</text:p>
          </table:table-cell>
          <table:table-cell office:value-type="float" office:value="208.635223" calcext:value-type="float">
            <text:p>208.6</text:p>
          </table:table-cell>
          <table:table-cell office:value-type="float" office:value="175.687637" calcext:value-type="float">
            <text:p>175.7</text:p>
          </table:table-cell>
          <table:table-cell office:value-type="float" office:value="145.206177" calcext:value-type="float">
            <text:p>145.2</text:p>
          </table:table-cell>
          <table:table-cell office:value-type="float" office:value="118.966469" calcext:value-type="float">
            <text:p>119.0</text:p>
          </table:table-cell>
          <table:table-cell office:value-type="float" office:value="97.560394" calcext:value-type="float">
            <text:p>97.6</text:p>
          </table:table-cell>
          <table:table-cell office:value-type="float" office:value="78.028587" calcext:value-type="float">
            <text:p>78.0</text:p>
          </table:table-cell>
          <table:table-cell office:value-type="float" office:value="66.289772" calcext:value-type="float">
            <text:p>66.3</text:p>
          </table:table-cell>
          <table:table-cell office:value-type="float" office:value="54.057732" calcext:value-type="float">
            <text:p>54.1</text:p>
          </table:table-cell>
          <table:table-cell office:value-type="float" office:value="44.587765" calcext:value-type="float">
            <text:p>44.6</text:p>
          </table:table-cell>
          <table:table-cell office:value-type="float" office:value="36.498833" calcext:value-type="float">
            <text:p>36.5</text:p>
          </table:table-cell>
          <table:table-cell office:value-type="float" office:value="7.299767" calcext:value-type="float">
            <text:p>7.3</text:p>
          </table:table-cell>
          <table:table-cell office:value-type="float" office:value="1.479682" calcext:value-type="float">
            <text:p>1.5</text:p>
          </table:table-cell>
          <table:table-cell office:value-type="float" office:value="0.098646" calcext:value-type="float">
            <text:p>0.1</text:p>
          </table:table-cell>
        </table:table-row>
        <table:table-row table:style-name="ro1">
          <table:table-cell/>
          <table:table-cell office:value-type="time" office:time-value="PT1108451H25M04.999999981S" calcext:value-type="time">
            <text:p>11:25:05</text:p>
          </table:table-cell>
          <table:table-cell office:value-type="float" office:value="10.15552" calcext:value-type="float">
            <text:p>10.2</text:p>
          </table:table-cell>
          <table:table-cell office:value-type="float" office:value="22331.007812" calcext:value-type="float">
            <text:p>22331.0</text:p>
          </table:table-cell>
          <table:table-cell office:value-type="float" office:value="14700.378906" calcext:value-type="float">
            <text:p>14700.4</text:p>
          </table:table-cell>
          <table:table-cell office:value-type="float" office:value="9811.708008" calcext:value-type="float">
            <text:p>9811.7</text:p>
          </table:table-cell>
          <table:table-cell office:value-type="float" office:value="6918.109375" calcext:value-type="float">
            <text:p>6918.1</text:p>
          </table:table-cell>
          <table:table-cell office:value-type="float" office:value="4758.495605" calcext:value-type="float">
            <text:p>4758.5</text:p>
          </table:table-cell>
          <table:table-cell office:value-type="float" office:value="3267.385498" calcext:value-type="float">
            <text:p>3267.4</text:p>
          </table:table-cell>
          <table:table-cell office:value-type="float" office:value="2308.30127" calcext:value-type="float">
            <text:p>2308.3</text:p>
          </table:table-cell>
          <table:table-cell office:value-type="float" office:value="1644.130371" calcext:value-type="float">
            <text:p>1644.1</text:p>
          </table:table-cell>
          <table:table-cell office:value-type="float" office:value="1214.70874" calcext:value-type="float">
            <text:p>1214.7</text:p>
          </table:table-cell>
          <table:table-cell office:value-type="float" office:value="931.710022" calcext:value-type="float">
            <text:p>931.7</text:p>
          </table:table-cell>
          <table:table-cell office:value-type="float" office:value="732.803406" calcext:value-type="float">
            <text:p>732.8</text:p>
          </table:table-cell>
          <table:table-cell office:value-type="float" office:value="587.857605" calcext:value-type="float">
            <text:p>587.9</text:p>
          </table:table-cell>
          <table:table-cell office:value-type="float" office:value="477.868164" calcext:value-type="float">
            <text:p>477.9</text:p>
          </table:table-cell>
          <table:table-cell office:value-type="float" office:value="393.77597" calcext:value-type="float">
            <text:p>393.8</text:p>
          </table:table-cell>
          <table:table-cell office:value-type="float" office:value="333.414734" calcext:value-type="float">
            <text:p>333.4</text:p>
          </table:table-cell>
          <table:table-cell office:value-type="float" office:value="282.014099" calcext:value-type="float">
            <text:p>282.0</text:p>
          </table:table-cell>
          <table:table-cell office:value-type="float" office:value="241.641968" calcext:value-type="float">
            <text:p>241.6</text:p>
          </table:table-cell>
          <table:table-cell office:value-type="float" office:value="199.989746" calcext:value-type="float">
            <text:p>200.0</text:p>
          </table:table-cell>
          <table:table-cell office:value-type="float" office:value="164.639526" calcext:value-type="float">
            <text:p>164.6</text:p>
          </table:table-cell>
          <table:table-cell office:value-type="float" office:value="135.000473" calcext:value-type="float">
            <text:p>135.0</text:p>
          </table:table-cell>
          <table:table-cell office:value-type="float" office:value="109.792503" calcext:value-type="float">
            <text:p>109.8</text:p>
          </table:table-cell>
          <table:table-cell office:value-type="float" office:value="90.985001" calcext:value-type="float">
            <text:p>91.0</text:p>
          </table:table-cell>
          <table:table-cell office:value-type="float" office:value="70.503525" calcext:value-type="float">
            <text:p>70.5</text:p>
          </table:table-cell>
          <table:table-cell office:value-type="float" office:value="58.785763" calcext:value-type="float">
            <text:p>58.8</text:p>
          </table:table-cell>
          <table:table-cell office:value-type="float" office:value="48.9389" calcext:value-type="float">
            <text:p>48.9</text:p>
          </table:table-cell>
          <table:table-cell office:value-type="float" office:value="41.159882" calcext:value-type="float">
            <text:p>41.2</text:p>
          </table:table-cell>
          <table:table-cell office:value-type="float" office:value="31.90383" calcext:value-type="float">
            <text:p>31.9</text:p>
          </table:table-cell>
          <table:table-cell office:value-type="float" office:value="5.908117" calcext:value-type="float">
            <text:p>5.9</text:p>
          </table:table-cell>
          <table:table-cell office:value-type="float" office:value="1.280092" calcext:value-type="float">
            <text:p>1.3</text:p>
          </table:table-cell>
          <table:table-cell office:value-type="float" office:value="0.393874" calcext:value-type="float">
            <text:p>0.4</text:p>
          </table:table-cell>
        </table:table-row>
        <table:table-row table:style-name="ro1">
          <table:table-cell/>
          <table:table-cell office:value-type="time" office:time-value="PT1108451H26M08.999999855S" calcext:value-type="time">
            <text:p>11:26:09</text:p>
          </table:table-cell>
          <table:table-cell office:value-type="float" office:value="10.179069" calcext:value-type="float">
            <text:p>10.2</text:p>
          </table:table-cell>
          <table:table-cell office:value-type="float" office:value="22133.65625" calcext:value-type="float">
            <text:p>22133.7</text:p>
          </table:table-cell>
          <table:table-cell office:value-type="float" office:value="14516.848633" calcext:value-type="float">
            <text:p>14516.8</text:p>
          </table:table-cell>
          <table:table-cell office:value-type="float" office:value="9633.297852" calcext:value-type="float">
            <text:p>9633.3</text:p>
          </table:table-cell>
          <table:table-cell office:value-type="float" office:value="6844.143066" calcext:value-type="float">
            <text:p>6844.1</text:p>
          </table:table-cell>
          <table:table-cell office:value-type="float" office:value="4751.318848" calcext:value-type="float">
            <text:p>4751.3</text:p>
          </table:table-cell>
          <table:table-cell office:value-type="float" office:value="3258.05835" calcext:value-type="float">
            <text:p>3258.1</text:p>
          </table:table-cell>
          <table:table-cell office:value-type="float" office:value="2322.51123" calcext:value-type="float">
            <text:p>2322.5</text:p>
          </table:table-cell>
          <table:table-cell office:value-type="float" office:value="1667.736084" calcext:value-type="float">
            <text:p>1667.7</text:p>
          </table:table-cell>
          <table:table-cell office:value-type="float" office:value="1233.413452" calcext:value-type="float">
            <text:p>1233.4</text:p>
          </table:table-cell>
          <table:table-cell office:value-type="float" office:value="945.764343" calcext:value-type="float">
            <text:p>945.8</text:p>
          </table:table-cell>
          <table:table-cell office:value-type="float" office:value="744.174194" calcext:value-type="float">
            <text:p>744.2</text:p>
          </table:table-cell>
          <table:table-cell office:value-type="float" office:value="600.349609" calcext:value-type="float">
            <text:p>600.3</text:p>
          </table:table-cell>
          <table:table-cell office:value-type="float" office:value="491.302307" calcext:value-type="float">
            <text:p>491.3</text:p>
          </table:table-cell>
          <table:table-cell office:value-type="float" office:value="404.752167" calcext:value-type="float">
            <text:p>404.8</text:p>
          </table:table-cell>
          <table:table-cell office:value-type="float" office:value="339.029053" calcext:value-type="float">
            <text:p>339.0</text:p>
          </table:table-cell>
          <table:table-cell office:value-type="float" office:value="289.515686" calcext:value-type="float">
            <text:p>289.5</text:p>
          </table:table-cell>
          <table:table-cell office:value-type="float" office:value="245.602036" calcext:value-type="float">
            <text:p>245.6</text:p>
          </table:table-cell>
          <table:table-cell office:value-type="float" office:value="204.63562" calcext:value-type="float">
            <text:p>204.6</text:p>
          </table:table-cell>
          <table:table-cell office:value-type="float" office:value="171.135498" calcext:value-type="float">
            <text:p>171.1</text:p>
          </table:table-cell>
          <table:table-cell office:value-type="float" office:value="140.287888" calcext:value-type="float">
            <text:p>140.3</text:p>
          </table:table-cell>
          <table:table-cell office:value-type="float" office:value="113.861107" calcext:value-type="float">
            <text:p>113.9</text:p>
          </table:table-cell>
          <table:table-cell office:value-type="float" office:value="92.83757" calcext:value-type="float">
            <text:p>92.8</text:p>
          </table:table-cell>
          <table:table-cell office:value-type="float" office:value="74.270058" calcext:value-type="float">
            <text:p>74.3</text:p>
          </table:table-cell>
          <table:table-cell office:value-type="float" office:value="61.105789" calcext:value-type="float">
            <text:p>61.1</text:p>
          </table:table-cell>
          <table:table-cell office:value-type="float" office:value="49.709854" calcext:value-type="float">
            <text:p>49.7</text:p>
          </table:table-cell>
          <table:table-cell office:value-type="float" office:value="40.868179" calcext:value-type="float">
            <text:p>40.9</text:p>
          </table:table-cell>
          <table:table-cell office:value-type="float" office:value="33.107155" calcext:value-type="float">
            <text:p>33.1</text:p>
          </table:table-cell>
          <table:table-cell office:value-type="float" office:value="5.894449" calcext:value-type="float">
            <text:p>5.9</text:p>
          </table:table-cell>
          <table:table-cell office:value-type="float" office:value="1.375371" calcext:value-type="float">
            <text:p>1.4</text:p>
          </table:table-cell>
          <table:table-cell office:value-type="float" office:value="0.196482" calcext:value-type="float">
            <text:p>0.2</text:p>
          </table:table-cell>
        </table:table-row>
        <table:table-row table:style-name="ro1">
          <table:table-cell/>
          <table:table-cell office:value-type="time" office:time-value="PT1108451H27M12.000000123S" calcext:value-type="time">
            <text:p>11:27:12</text:p>
          </table:table-cell>
          <table:table-cell office:value-type="float" office:value="10.263468" calcext:value-type="float">
            <text:p>10.3</text:p>
          </table:table-cell>
          <table:table-cell office:value-type="float" office:value="22031.734375" calcext:value-type="float">
            <text:p>22031.7</text:p>
          </table:table-cell>
          <table:table-cell office:value-type="float" office:value="14572.950195" calcext:value-type="float">
            <text:p>14573.0</text:p>
          </table:table-cell>
          <table:table-cell office:value-type="float" office:value="9739.788086" calcext:value-type="float">
            <text:p>9739.8</text:p>
          </table:table-cell>
          <table:table-cell office:value-type="float" office:value="6905.170898" calcext:value-type="float">
            <text:p>6905.2</text:p>
          </table:table-cell>
          <table:table-cell office:value-type="float" office:value="4772.168945" calcext:value-type="float">
            <text:p>4772.2</text:p>
          </table:table-cell>
          <table:table-cell office:value-type="float" office:value="3291.967285" calcext:value-type="float">
            <text:p>3292.0</text:p>
          </table:table-cell>
          <table:table-cell office:value-type="float" office:value="2336.637207" calcext:value-type="float">
            <text:p>2336.6</text:p>
          </table:table-cell>
          <table:table-cell office:value-type="float" office:value="1673.313599" calcext:value-type="float">
            <text:p>1673.3</text:p>
          </table:table-cell>
          <table:table-cell office:value-type="float" office:value="1237.495972" calcext:value-type="float">
            <text:p>1237.5</text:p>
          </table:table-cell>
          <table:table-cell office:value-type="float" office:value="952.407166" calcext:value-type="float">
            <text:p>952.4</text:p>
          </table:table-cell>
          <table:table-cell office:value-type="float" office:value="747.992798" calcext:value-type="float">
            <text:p>748.0</text:p>
          </table:table-cell>
          <table:table-cell office:value-type="float" office:value="596.484558" calcext:value-type="float">
            <text:p>596.5</text:p>
          </table:table-cell>
          <table:table-cell office:value-type="float" office:value="484.144348" calcext:value-type="float">
            <text:p>484.1</text:p>
          </table:table-cell>
          <table:table-cell office:value-type="float" office:value="406.003113" calcext:value-type="float">
            <text:p>406.0</text:p>
          </table:table-cell>
          <table:table-cell office:value-type="float" office:value="340.23587" calcext:value-type="float">
            <text:p>340.2</text:p>
          </table:table-cell>
          <table:table-cell office:value-type="float" office:value="286.258026" calcext:value-type="float">
            <text:p>286.3</text:p>
          </table:table-cell>
          <table:table-cell office:value-type="float" office:value="244.849014" calcext:value-type="float">
            <text:p>244.8</text:p>
          </table:table-cell>
          <table:table-cell office:value-type="float" office:value="201.783646" calcext:value-type="float">
            <text:p>201.8</text:p>
          </table:table-cell>
          <table:table-cell office:value-type="float" office:value="160.959244" calcext:value-type="float">
            <text:p>161.0</text:p>
          </table:table-cell>
          <table:table-cell office:value-type="float" office:value="132.216522" calcext:value-type="float">
            <text:p>132.2</text:p>
          </table:table-cell>
          <table:table-cell office:value-type="float" office:value="111.365868" calcext:value-type="float">
            <text:p>111.4</text:p>
          </table:table-cell>
          <table:table-cell office:value-type="float" office:value="92.756172" calcext:value-type="float">
            <text:p>92.8</text:p>
          </table:table-cell>
          <table:table-cell office:value-type="float" office:value="74.633644" calcext:value-type="float">
            <text:p>74.6</text:p>
          </table:table-cell>
          <table:table-cell office:value-type="float" office:value="62.35709" calcext:value-type="float">
            <text:p>62.4</text:p>
          </table:table-cell>
          <table:table-cell office:value-type="float" office:value="53.588127" calcext:value-type="float">
            <text:p>53.6</text:p>
          </table:table-cell>
          <table:table-cell office:value-type="float" office:value="45.403759" calcext:value-type="float">
            <text:p>45.4</text:p>
          </table:table-cell>
          <table:table-cell office:value-type="float" office:value="36.732224" calcext:value-type="float">
            <text:p>36.7</text:p>
          </table:table-cell>
          <table:table-cell office:value-type="float" office:value="6.430575" calcext:value-type="float">
            <text:p>6.4</text:p>
          </table:table-cell>
          <table:table-cell office:value-type="float" office:value="1.65636" calcext:value-type="float">
            <text:p>1.7</text:p>
          </table:table-cell>
          <table:table-cell office:value-type="float" office:value="0.097433" calcext:value-type="float">
            <text:p>0.1</text:p>
          </table:table-cell>
        </table:table-row>
        <table:table-row table:style-name="ro1">
          <table:table-cell/>
          <table:table-cell office:value-type="time" office:time-value="PT1108451H28M15.999999996S" calcext:value-type="time">
            <text:p>11:28:16</text:p>
          </table:table-cell>
          <table:table-cell office:value-type="float" office:value="10.237685" calcext:value-type="float">
            <text:p>10.2</text:p>
          </table:table-cell>
          <table:table-cell office:value-type="float" office:value="22168.976562" calcext:value-type="float">
            <text:p>22169.0</text:p>
          </table:table-cell>
          <table:table-cell office:value-type="float" office:value="14602.714844" calcext:value-type="float">
            <text:p>14602.7</text:p>
          </table:table-cell>
          <table:table-cell office:value-type="float" office:value="9752.399414" calcext:value-type="float">
            <text:p>9752.4</text:p>
          </table:table-cell>
          <table:table-cell office:value-type="float" office:value="6921.388672" calcext:value-type="float">
            <text:p>6921.4</text:p>
          </table:table-cell>
          <table:table-cell office:value-type="float" office:value="4763.479004" calcext:value-type="float">
            <text:p>4763.5</text:p>
          </table:table-cell>
          <table:table-cell office:value-type="float" office:value="3283.359375" calcext:value-type="float">
            <text:p>3283.4</text:p>
          </table:table-cell>
          <table:table-cell office:value-type="float" office:value="2328.163086" calcext:value-type="float">
            <text:p>2328.2</text:p>
          </table:table-cell>
          <table:table-cell office:value-type="float" office:value="1670.983154" calcext:value-type="float">
            <text:p>1671.0</text:p>
          </table:table-cell>
          <table:table-cell office:value-type="float" office:value="1221.858276" calcext:value-type="float">
            <text:p>1221.9</text:p>
          </table:table-cell>
          <table:table-cell office:value-type="float" office:value="932.92572" calcext:value-type="float">
            <text:p>932.9</text:p>
          </table:table-cell>
          <table:table-cell office:value-type="float" office:value="737.178345" calcext:value-type="float">
            <text:p>737.2</text:p>
          </table:table-cell>
          <table:table-cell office:value-type="float" office:value="587.828186" calcext:value-type="float">
            <text:p>587.8</text:p>
          </table:table-cell>
          <table:table-cell office:value-type="float" office:value="478.819183" calcext:value-type="float">
            <text:p>478.8</text:p>
          </table:table-cell>
          <table:table-cell office:value-type="float" office:value="399.504364" calcext:value-type="float">
            <text:p>399.5</text:p>
          </table:table-cell>
          <table:table-cell office:value-type="float" office:value="339.43219" calcext:value-type="float">
            <text:p>339.4</text:p>
          </table:table-cell>
          <table:table-cell office:value-type="float" office:value="286.588226" calcext:value-type="float">
            <text:p>286.6</text:p>
          </table:table-cell>
          <table:table-cell office:value-type="float" office:value="242.828323" calcext:value-type="float">
            <text:p>242.8</text:p>
          </table:table-cell>
          <table:table-cell office:value-type="float" office:value="204.245392" calcext:value-type="float">
            <text:p>204.2</text:p>
          </table:table-cell>
          <table:table-cell office:value-type="float" office:value="167.029938" calcext:value-type="float">
            <text:p>167.0</text:p>
          </table:table-cell>
          <table:table-cell office:value-type="float" office:value="136.847336" calcext:value-type="float">
            <text:p>136.8</text:p>
          </table:table-cell>
          <table:table-cell office:value-type="float" office:value="113.697578" calcext:value-type="float">
            <text:p>113.7</text:p>
          </table:table-cell>
          <table:table-cell office:value-type="float" office:value="93.868874" calcext:value-type="float">
            <text:p>93.9</text:p>
          </table:table-cell>
          <table:table-cell office:value-type="float" office:value="75.01696" calcext:value-type="float">
            <text:p>75.0</text:p>
          </table:table-cell>
          <table:table-cell office:value-type="float" office:value="61.439671" calcext:value-type="float">
            <text:p>61.4</text:p>
          </table:table-cell>
          <table:table-cell office:value-type="float" office:value="51.476479" calcext:value-type="float">
            <text:p>51.5</text:p>
          </table:table-cell>
          <table:table-cell office:value-type="float" office:value="42.978466" calcext:value-type="float">
            <text:p>43.0</text:p>
          </table:table-cell>
          <table:table-cell office:value-type="float" office:value="35.261879" calcext:value-type="float">
            <text:p>35.3</text:p>
          </table:table-cell>
          <table:table-cell office:value-type="float" office:value="6.153735" calcext:value-type="float">
            <text:p>6.2</text:p>
          </table:table-cell>
          <table:table-cell office:value-type="float" office:value="0.683748" calcext:value-type="float">
            <text:p>0.7</text:p>
          </table:table-cell>
          <table:table-cell office:value-type="float" office:value="0.097678" calcext:value-type="float">
            <text:p>0.1</text:p>
          </table:table-cell>
        </table:table-row>
        <table:table-row table:style-name="ro1">
          <table:table-cell/>
          <table:table-cell office:value-type="time" office:time-value="PT1108451H30M21.999999695S" calcext:value-type="time">
            <text:p>11:30:22</text:p>
          </table:table-cell>
          <table:table-cell office:value-type="float" office:value="10.145321" calcext:value-type="float">
            <text:p>10.1</text:p>
          </table:table-cell>
          <table:table-cell office:value-type="float" office:value="22192.201172" calcext:value-type="float">
            <text:p>22192.2</text:p>
          </table:table-cell>
          <table:table-cell office:value-type="float" office:value="14517.727539" calcext:value-type="float">
            <text:p>14517.7</text:p>
          </table:table-cell>
          <table:table-cell office:value-type="float" office:value="9699.446289" calcext:value-type="float">
            <text:p>9699.4</text:p>
          </table:table-cell>
          <table:table-cell office:value-type="float" office:value="6878.244629" calcext:value-type="float">
            <text:p>6878.2</text:p>
          </table:table-cell>
          <table:table-cell office:value-type="float" office:value="4780.332031" calcext:value-type="float">
            <text:p>4780.3</text:p>
          </table:table-cell>
          <table:table-cell office:value-type="float" office:value="3299.15625" calcext:value-type="float">
            <text:p>3299.2</text:p>
          </table:table-cell>
          <table:table-cell office:value-type="float" office:value="2351.921631" calcext:value-type="float">
            <text:p>2351.9</text:p>
          </table:table-cell>
          <table:table-cell office:value-type="float" office:value="1696.545654" calcext:value-type="float">
            <text:p>1696.5</text:p>
          </table:table-cell>
          <table:table-cell office:value-type="float" office:value="1245.303101" calcext:value-type="float">
            <text:p>1245.3</text:p>
          </table:table-cell>
          <table:table-cell office:value-type="float" office:value="947.727539" calcext:value-type="float">
            <text:p>947.7</text:p>
          </table:table-cell>
          <table:table-cell office:value-type="float" office:value="743.29834" calcext:value-type="float">
            <text:p>743.3</text:p>
          </table:table-cell>
          <table:table-cell office:value-type="float" office:value="594.066956" calcext:value-type="float">
            <text:p>594.1</text:p>
          </table:table-cell>
          <table:table-cell office:value-type="float" office:value="482.981262" calcext:value-type="float">
            <text:p>483.0</text:p>
          </table:table-cell>
          <table:table-cell office:value-type="float" office:value="397.424591" calcext:value-type="float">
            <text:p>397.4</text:p>
          </table:table-cell>
          <table:table-cell office:value-type="float" office:value="332.172821" calcext:value-type="float">
            <text:p>332.2</text:p>
          </table:table-cell>
          <table:table-cell office:value-type="float" office:value="283.480438" calcext:value-type="float">
            <text:p>283.5</text:p>
          </table:table-cell>
          <table:table-cell office:value-type="float" office:value="244.053391" calcext:value-type="float">
            <text:p>244.1</text:p>
          </table:table-cell>
          <table:table-cell office:value-type="float" office:value="204.429214" calcext:value-type="float">
            <text:p>204.4</text:p>
          </table:table-cell>
          <table:table-cell office:value-type="float" office:value="169.930557" calcext:value-type="float">
            <text:p>169.9</text:p>
          </table:table-cell>
          <table:table-cell office:value-type="float" office:value="138.980331" calcext:value-type="float">
            <text:p>139.0</text:p>
          </table:table-cell>
          <table:table-cell office:value-type="float" office:value="114.239853" calcext:value-type="float">
            <text:p>114.2</text:p>
          </table:table-cell>
          <table:table-cell office:value-type="float" office:value="92.949257" calcext:value-type="float">
            <text:p>92.9</text:p>
          </table:table-cell>
          <table:table-cell office:value-type="float" office:value="76.882736" calcext:value-type="float">
            <text:p>76.9</text:p>
          </table:table-cell>
          <table:table-cell office:value-type="float" office:value="62.097591" calcext:value-type="float">
            <text:p>62.1</text:p>
          </table:table-cell>
          <table:table-cell office:value-type="float" office:value="52.832237" calcext:value-type="float">
            <text:p>52.8</text:p>
          </table:table-cell>
          <table:table-cell office:value-type="float" office:value="43.172611" calcext:value-type="float">
            <text:p>43.2</text:p>
          </table:table-cell>
          <table:table-cell office:value-type="float" office:value="35.780041" calcext:value-type="float">
            <text:p>35.8</text:p>
          </table:table-cell>
          <table:table-cell office:value-type="float" office:value="6.111192" calcext:value-type="float">
            <text:p>6.1</text:p>
          </table:table-cell>
          <table:table-cell office:value-type="float" office:value="0.689973" calcext:value-type="float">
            <text:p>0.7</text:p>
          </table:table-cell>
          <table:table-cell office:value-type="float" office:value="0.098568" calcext:value-type="float">
            <text:p>0.1</text:p>
          </table:table-cell>
        </table:table-row>
        <table:table-row table:style-name="ro1">
          <table:table-cell/>
          <table:table-cell office:value-type="time" office:time-value="PT1108451H32M24.000000134S" calcext:value-type="time">
            <text:p>11:32:24</text:p>
          </table:table-cell>
          <table:table-cell office:value-type="float" office:value="10.117262" calcext:value-type="float">
            <text:p>10.1</text:p>
          </table:table-cell>
          <table:table-cell office:value-type="float" office:value="22405.074219" calcext:value-type="float">
            <text:p>22405.1</text:p>
          </table:table-cell>
          <table:table-cell office:value-type="float" office:value="14727.99707" calcext:value-type="float">
            <text:p>14728.0</text:p>
          </table:table-cell>
          <table:table-cell office:value-type="float" office:value="9793.361328" calcext:value-type="float">
            <text:p>9793.4</text:p>
          </table:table-cell>
          <table:table-cell office:value-type="float" office:value="6956.328613" calcext:value-type="float">
            <text:p>6956.3</text:p>
          </table:table-cell>
          <table:table-cell office:value-type="float" office:value="4830.556152" calcext:value-type="float">
            <text:p>4830.6</text:p>
          </table:table-cell>
          <table:table-cell office:value-type="float" office:value="3321.056641" calcext:value-type="float">
            <text:p>3321.1</text:p>
          </table:table-cell>
          <table:table-cell office:value-type="float" office:value="2366.648193" calcext:value-type="float">
            <text:p>2366.6</text:p>
          </table:table-cell>
          <table:table-cell office:value-type="float" office:value="1694.529663" calcext:value-type="float">
            <text:p>1694.5</text:p>
          </table:table-cell>
          <table:table-cell office:value-type="float" office:value="1246.681152" calcext:value-type="float">
            <text:p>1246.7</text:p>
          </table:table-cell>
          <table:table-cell office:value-type="float" office:value="945.611572" calcext:value-type="float">
            <text:p>945.6</text:p>
          </table:table-cell>
          <table:table-cell office:value-type="float" office:value="747.633118" calcext:value-type="float">
            <text:p>747.6</text:p>
          </table:table-cell>
          <table:table-cell office:value-type="float" office:value="599.569336" calcext:value-type="float">
            <text:p>599.6</text:p>
          </table:table-cell>
          <table:table-cell office:value-type="float" office:value="487.879028" calcext:value-type="float">
            <text:p>487.9</text:p>
          </table:table-cell>
          <table:table-cell office:value-type="float" office:value="401.195496" calcext:value-type="float">
            <text:p>401.2</text:p>
          </table:table-cell>
          <table:table-cell office:value-type="float" office:value="340.012939" calcext:value-type="float">
            <text:p>340.0</text:p>
          </table:table-cell>
          <table:table-cell office:value-type="float" office:value="287.824921" calcext:value-type="float">
            <text:p>287.8</text:p>
          </table:table-cell>
          <table:table-cell office:value-type="float" office:value="242.852264" calcext:value-type="float">
            <text:p>242.9</text:p>
          </table:table-cell>
          <table:table-cell office:value-type="float" office:value="201.932114" calcext:value-type="float">
            <text:p>201.9</text:p>
          </table:table-cell>
          <table:table-cell office:value-type="float" office:value="166.151672" calcext:value-type="float">
            <text:p>166.2</text:p>
          </table:table-cell>
          <table:table-cell office:value-type="float" office:value="137.487793" calcext:value-type="float">
            <text:p>137.5</text:p>
          </table:table-cell>
          <table:table-cell office:value-type="float" office:value="112.283348" calcext:value-type="float">
            <text:p>112.3</text:p>
          </table:table-cell>
          <table:table-cell office:value-type="float" office:value="91.427902" calcext:value-type="float">
            <text:p>91.4</text:p>
          </table:table-cell>
          <table:table-cell office:value-type="float" office:value="74.427254" calcext:value-type="float">
            <text:p>74.4</text:p>
          </table:table-cell>
          <table:table-cell office:value-type="float" office:value="62.170971" calcext:value-type="float">
            <text:p>62.2</text:p>
          </table:table-cell>
          <table:table-cell office:value-type="float" office:value="51.594986" calcext:value-type="float">
            <text:p>51.6</text:p>
          </table:table-cell>
          <table:table-cell office:value-type="float" office:value="42.798141" calcext:value-type="float">
            <text:p>42.8</text:p>
          </table:table-cell>
          <table:table-cell office:value-type="float" office:value="35.187386" calcext:value-type="float">
            <text:p>35.2</text:p>
          </table:table-cell>
          <table:table-cell office:value-type="float" office:value="6.622345" calcext:value-type="float">
            <text:p>6.6</text:p>
          </table:table-cell>
          <table:table-cell office:value-type="float" office:value="1.087251" calcext:value-type="float">
            <text:p>1.1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/>
          <table:table-cell office:value-type="time" office:time-value="PT1108451H34M25.999999736S" calcext:value-type="time">
            <text:p>11:34:26</text:p>
          </table:table-cell>
          <table:table-cell office:value-type="float" office:value="10.082671" calcext:value-type="float">
            <text:p>10.1</text:p>
          </table:table-cell>
          <table:table-cell office:value-type="float" office:value="22464.78125" calcext:value-type="float">
            <text:p>22464.8</text:p>
          </table:table-cell>
          <table:table-cell office:value-type="float" office:value="14684.898438" calcext:value-type="float">
            <text:p>14684.9</text:p>
          </table:table-cell>
          <table:table-cell office:value-type="float" office:value="9739.878906" calcext:value-type="float">
            <text:p>9739.9</text:p>
          </table:table-cell>
          <table:table-cell office:value-type="float" office:value="6900.949219" calcext:value-type="float">
            <text:p>6900.9</text:p>
          </table:table-cell>
          <table:table-cell office:value-type="float" office:value="4758.758789" calcext:value-type="float">
            <text:p>4758.8</text:p>
          </table:table-cell>
          <table:table-cell office:value-type="float" office:value="3271.355225" calcext:value-type="float">
            <text:p>3271.4</text:p>
          </table:table-cell>
          <table:table-cell office:value-type="float" office:value="2308.416016" calcext:value-type="float">
            <text:p>2308.4</text:p>
          </table:table-cell>
          <table:table-cell office:value-type="float" office:value="1652.637451" calcext:value-type="float">
            <text:p>1652.6</text:p>
          </table:table-cell>
          <table:table-cell office:value-type="float" office:value="1217.73291" calcext:value-type="float">
            <text:p>1217.7</text:p>
          </table:table-cell>
          <table:table-cell office:value-type="float" office:value="931.697571" calcext:value-type="float">
            <text:p>931.7</text:p>
          </table:table-cell>
          <table:table-cell office:value-type="float" office:value="737.998901" calcext:value-type="float">
            <text:p>738.0</text:p>
          </table:table-cell>
          <table:table-cell office:value-type="float" office:value="593.394348" calcext:value-type="float">
            <text:p>593.4</text:p>
          </table:table-cell>
          <table:table-cell office:value-type="float" office:value="487.073303" calcext:value-type="float">
            <text:p>487.1</text:p>
          </table:table-cell>
          <table:table-cell office:value-type="float" office:value="403.861237" calcext:value-type="float">
            <text:p>403.9</text:p>
          </table:table-cell>
          <table:table-cell office:value-type="float" office:value="341.377777" calcext:value-type="float">
            <text:p>341.4</text:p>
          </table:table-cell>
          <table:table-cell office:value-type="float" office:value="291.093506" calcext:value-type="float">
            <text:p>291.1</text:p>
          </table:table-cell>
          <table:table-cell office:value-type="float" office:value="245.470673" calcext:value-type="float">
            <text:p>245.5</text:p>
          </table:table-cell>
          <table:table-cell office:value-type="float" office:value="202.525696" calcext:value-type="float">
            <text:p>202.5</text:p>
          </table:table-cell>
          <table:table-cell office:value-type="float" office:value="166.424149" calcext:value-type="float">
            <text:p>166.4</text:p>
          </table:table-cell>
          <table:table-cell office:value-type="float" office:value="135.479965" calcext:value-type="float">
            <text:p>135.5</text:p>
          </table:table-cell>
          <table:table-cell office:value-type="float" office:value="108.304634" calcext:value-type="float">
            <text:p>108.3</text:p>
          </table:table-cell>
          <table:table-cell office:value-type="float" office:value="86.187477" calcext:value-type="float">
            <text:p>86.2</text:p>
          </table:table-cell>
          <table:table-cell office:value-type="float" office:value="70.91375" calcext:value-type="float">
            <text:p>70.9</text:p>
          </table:table-cell>
          <table:table-cell office:value-type="float" office:value="57.425259" calcext:value-type="float">
            <text:p>57.4</text:p>
          </table:table-cell>
          <table:table-cell office:value-type="float" office:value="48.003151" calcext:value-type="float">
            <text:p>48.0</text:p>
          </table:table-cell>
          <table:table-cell office:value-type="float" office:value="38.878586" calcext:value-type="float">
            <text:p>38.9</text:p>
          </table:table-cell>
          <table:table-cell office:value-type="float" office:value="30.944181" calcext:value-type="float">
            <text:p>30.9</text:p>
          </table:table-cell>
          <table:table-cell office:value-type="float" office:value="2.975402" calcext:value-type="float">
            <text:p>3.0</text:p>
          </table:table-cell>
          <table:table-cell office:value-type="float" office:value="0.69426" calcext:value-type="float">
            <text:p>0.7</text:p>
          </table:table-cell>
          <table:table-cell office:value-type="float" office:value="0.09918" calcext:value-type="float">
            <text:p>0.1</text:p>
          </table:table-cell>
        </table:table-row>
        <table:table-row table:style-name="ro1">
          <table:table-cell/>
          <table:table-cell office:value-type="time" office:time-value="PT1108451H36M28.000000175S" calcext:value-type="time">
            <text:p>11:36:28</text:p>
          </table:table-cell>
          <table:table-cell office:value-type="float" office:value="10.107396" calcext:value-type="float">
            <text:p>10.1</text:p>
          </table:table-cell>
          <table:table-cell office:value-type="float" office:value="22342.945312" calcext:value-type="float">
            <text:p>22342.9</text:p>
          </table:table-cell>
          <table:table-cell office:value-type="float" office:value="14667.081055" calcext:value-type="float">
            <text:p>14667.1</text:p>
          </table:table-cell>
          <table:table-cell office:value-type="float" office:value="9777.889648" calcext:value-type="float">
            <text:p>9777.9</text:p>
          </table:table-cell>
          <table:table-cell office:value-type="float" office:value="6945.705566" calcext:value-type="float">
            <text:p>6945.7</text:p>
          </table:table-cell>
          <table:table-cell office:value-type="float" office:value="4790.056641" calcext:value-type="float">
            <text:p>4790.1</text:p>
          </table:table-cell>
          <table:table-cell office:value-type="float" office:value="3309.556641" calcext:value-type="float">
            <text:p>3309.6</text:p>
          </table:table-cell>
          <table:table-cell office:value-type="float" office:value="2359.855957" calcext:value-type="float">
            <text:p>2359.9</text:p>
          </table:table-cell>
          <table:table-cell office:value-type="float" office:value="1679.067505" calcext:value-type="float">
            <text:p>1679.1</text:p>
          </table:table-cell>
          <table:table-cell office:value-type="float" office:value="1241.56604" calcext:value-type="float">
            <text:p>1241.6</text:p>
          </table:table-cell>
          <table:table-cell office:value-type="float" office:value="941.290894" calcext:value-type="float">
            <text:p>941.3</text:p>
          </table:table-cell>
          <table:table-cell office:value-type="float" office:value="741.437256" calcext:value-type="float">
            <text:p>741.4</text:p>
          </table:table-cell>
          <table:table-cell office:value-type="float" office:value="595.504517" calcext:value-type="float">
            <text:p>595.5</text:p>
          </table:table-cell>
          <table:table-cell office:value-type="float" office:value="486.475433" calcext:value-type="float">
            <text:p>486.5</text:p>
          </table:table-cell>
          <table:table-cell office:value-type="float" office:value="400.300934" calcext:value-type="float">
            <text:p>400.3</text:p>
          </table:table-cell>
          <table:table-cell office:value-type="float" office:value="339.355469" calcext:value-type="float">
            <text:p>339.4</text:p>
          </table:table-cell>
          <table:table-cell office:value-type="float" office:value="291.865479" calcext:value-type="float">
            <text:p>291.9</text:p>
          </table:table-cell>
          <table:table-cell office:value-type="float" office:value="251.400055" calcext:value-type="float">
            <text:p>251.4</text:p>
          </table:table-cell>
          <table:table-cell office:value-type="float" office:value="211.825073" calcext:value-type="float">
            <text:p>211.8</text:p>
          </table:table-cell>
          <table:table-cell office:value-type="float" office:value="174.921417" calcext:value-type="float">
            <text:p>174.9</text:p>
          </table:table-cell>
          <table:table-cell office:value-type="float" office:value="139.007111" calcext:value-type="float">
            <text:p>139.0</text:p>
          </table:table-cell>
          <table:table-cell office:value-type="float" office:value="112.491882" calcext:value-type="float">
            <text:p>112.5</text:p>
          </table:table-cell>
          <table:table-cell office:value-type="float" office:value="91.022453" calcext:value-type="float">
            <text:p>91.0</text:p>
          </table:table-cell>
          <table:table-cell office:value-type="float" office:value="73.114777" calcext:value-type="float">
            <text:p>73.1</text:p>
          </table:table-cell>
          <table:table-cell office:value-type="float" office:value="58.867783" calcext:value-type="float">
            <text:p>58.9</text:p>
          </table:table-cell>
          <table:table-cell office:value-type="float" office:value="49.072975" calcext:value-type="float">
            <text:p>49.1</text:p>
          </table:table-cell>
          <table:table-cell office:value-type="float" office:value="40.465416" calcext:value-type="float">
            <text:p>40.5</text:p>
          </table:table-cell>
          <table:table-cell office:value-type="float" office:value="33.836609" calcext:value-type="float">
            <text:p>33.8</text:p>
          </table:table-cell>
          <table:table-cell office:value-type="float" office:value="4.452185" calcext:value-type="float">
            <text:p>4.5</text:p>
          </table:table-cell>
          <table:table-cell office:value-type="float" office:value="0.7915" calcext:value-type="float">
            <text:p>0.8</text:p>
          </table:table-cell>
          <table:table-cell office:value-type="float" office:value="0.098937" calcext:value-type="float">
            <text:p>0.1</text:p>
          </table:table-cell>
        </table:table-row>
        <table:table-row table:style-name="ro1">
          <table:table-cell/>
          <table:table-cell office:value-type="time" office:time-value="PT1108451H38M29.999999776S" calcext:value-type="time">
            <text:p>11:38:30</text:p>
          </table:table-cell>
          <table:table-cell office:value-type="float" office:value="10.129753" calcext:value-type="float">
            <text:p>10.1</text:p>
          </table:table-cell>
          <table:table-cell office:value-type="float" office:value="22261.056641" calcext:value-type="float">
            <text:p>22261.1</text:p>
          </table:table-cell>
          <table:table-cell office:value-type="float" office:value="14563.040039" calcext:value-type="float">
            <text:p>14563.0</text:p>
          </table:table-cell>
          <table:table-cell office:value-type="float" office:value="9656.602539" calcext:value-type="float">
            <text:p>9656.6</text:p>
          </table:table-cell>
          <table:table-cell office:value-type="float" office:value="6844.786621" calcext:value-type="float">
            <text:p>6844.8</text:p>
          </table:table-cell>
          <table:table-cell office:value-type="float" office:value="4732.395508" calcext:value-type="float">
            <text:p>4732.4</text:p>
          </table:table-cell>
          <table:table-cell office:value-type="float" office:value="3276.881348" calcext:value-type="float">
            <text:p>3276.9</text:p>
          </table:table-cell>
          <table:table-cell office:value-type="float" office:value="2331.350098" calcext:value-type="float">
            <text:p>2331.4</text:p>
          </table:table-cell>
          <table:table-cell office:value-type="float" office:value="1678.421997" calcext:value-type="float">
            <text:p>1678.4</text:p>
          </table:table-cell>
          <table:table-cell office:value-type="float" office:value="1231.421875" calcext:value-type="float">
            <text:p>1231.4</text:p>
          </table:table-cell>
          <table:table-cell office:value-type="float" office:value="942.964722" calcext:value-type="float">
            <text:p>943.0</text:p>
          </table:table-cell>
          <table:table-cell office:value-type="float" office:value="742.466248" calcext:value-type="float">
            <text:p>742.5</text:p>
          </table:table-cell>
          <table:table-cell office:value-type="float" office:value="600.903076" calcext:value-type="float">
            <text:p>600.9</text:p>
          </table:table-cell>
          <table:table-cell office:value-type="float" office:value="488.856934" calcext:value-type="float">
            <text:p>488.9</text:p>
          </table:table-cell>
          <table:table-cell office:value-type="float" office:value="406.722656" calcext:value-type="float">
            <text:p>406.7</text:p>
          </table:table-cell>
          <table:table-cell office:value-type="float" office:value="346.010406" calcext:value-type="float">
            <text:p>346.0</text:p>
          </table:table-cell>
          <table:table-cell office:value-type="float" office:value="295.76239" calcext:value-type="float">
            <text:p>295.8</text:p>
          </table:table-cell>
          <table:table-cell office:value-type="float" office:value="253.905502" calcext:value-type="float">
            <text:p>253.9</text:p>
          </table:table-cell>
          <table:table-cell office:value-type="float" office:value="212.640915" calcext:value-type="float">
            <text:p>212.6</text:p>
          </table:table-cell>
          <table:table-cell office:value-type="float" office:value="178.878983" calcext:value-type="float">
            <text:p>178.9</text:p>
          </table:table-cell>
          <table:table-cell office:value-type="float" office:value="145.413223" calcext:value-type="float">
            <text:p>145.4</text:p>
          </table:table-cell>
          <table:table-cell office:value-type="float" office:value="117.574432" calcext:value-type="float">
            <text:p>117.6</text:p>
          </table:table-cell>
          <table:table-cell office:value-type="float" office:value="96.645988" calcext:value-type="float">
            <text:p>96.6</text:p>
          </table:table-cell>
          <table:table-cell office:value-type="float" office:value="79.567589" calcext:value-type="float">
            <text:p>79.6</text:p>
          </table:table-cell>
          <table:table-cell office:value-type="float" office:value="64.167404" calcext:value-type="float">
            <text:p>64.2</text:p>
          </table:table-cell>
          <table:table-cell office:value-type="float" office:value="54.394218" calcext:value-type="float">
            <text:p>54.4</text:p>
          </table:table-cell>
          <table:table-cell office:value-type="float" office:value="46.397972" calcext:value-type="float">
            <text:p>46.4</text:p>
          </table:table-cell>
          <table:table-cell office:value-type="float" office:value="38.599163" calcext:value-type="float">
            <text:p>38.6</text:p>
          </table:table-cell>
          <table:table-cell office:value-type="float" office:value="6.614179" calcext:value-type="float">
            <text:p>6.6</text:p>
          </table:table-cell>
          <table:table-cell office:value-type="float" office:value="0.789753" calcext:value-type="float">
            <text:p>0.8</text:p>
          </table:table-cell>
          <table:table-cell office:value-type="float" office:value="0.197438" calcext:value-type="float">
            <text:p>0.2</text:p>
          </table:table-cell>
        </table:table-row>
        <table:table-row table:style-name="ro1">
          <table:table-cell/>
          <table:table-cell office:value-type="time" office:time-value="PT1108451H40M32.000000216S" calcext:value-type="time">
            <text:p>11:40:32</text:p>
          </table:table-cell>
          <table:table-cell office:value-type="float" office:value="10.112735" calcext:value-type="float">
            <text:p>10.1</text:p>
          </table:table-cell>
          <table:table-cell office:value-type="float" office:value="22081.564453" calcext:value-type="float">
            <text:p>22081.6</text:p>
          </table:table-cell>
          <table:table-cell office:value-type="float" office:value="14495.485352" calcext:value-type="float">
            <text:p>14495.5</text:p>
          </table:table-cell>
          <table:table-cell office:value-type="float" office:value="9651.889648" calcext:value-type="float">
            <text:p>9651.9</text:p>
          </table:table-cell>
          <table:table-cell office:value-type="float" office:value="6849.581543" calcext:value-type="float">
            <text:p>6849.6</text:p>
          </table:table-cell>
          <table:table-cell office:value-type="float" office:value="4714.847168" calcext:value-type="float">
            <text:p>4714.8</text:p>
          </table:table-cell>
          <table:table-cell office:value-type="float" office:value="3254.114746" calcext:value-type="float">
            <text:p>3254.1</text:p>
          </table:table-cell>
          <table:table-cell office:value-type="float" office:value="2318.16626" calcext:value-type="float">
            <text:p>2318.2</text:p>
          </table:table-cell>
          <table:table-cell office:value-type="float" office:value="1666.512573" calcext:value-type="float">
            <text:p>1666.5</text:p>
          </table:table-cell>
          <table:table-cell office:value-type="float" office:value="1222.814575" calcext:value-type="float">
            <text:p>1222.8</text:p>
          </table:table-cell>
          <table:table-cell office:value-type="float" office:value="934.267578" calcext:value-type="float">
            <text:p>934.3</text:p>
          </table:table-cell>
          <table:table-cell office:value-type="float" office:value="740.650269" calcext:value-type="float">
            <text:p>740.7</text:p>
          </table:table-cell>
          <table:table-cell office:value-type="float" office:value="593.607971" calcext:value-type="float">
            <text:p>593.6</text:p>
          </table:table-cell>
          <table:table-cell office:value-type="float" office:value="486.317505" calcext:value-type="float">
            <text:p>486.3</text:p>
          </table:table-cell>
          <table:table-cell office:value-type="float" office:value="402.858398" calcext:value-type="float">
            <text:p>402.9</text:p>
          </table:table-cell>
          <table:table-cell office:value-type="float" office:value="340.956238" calcext:value-type="float">
            <text:p>341.0</text:p>
          </table:table-cell>
          <table:table-cell office:value-type="float" office:value="286.47049" calcext:value-type="float">
            <text:p>286.5</text:p>
          </table:table-cell>
          <table:table-cell office:value-type="float" office:value="244.740921" calcext:value-type="float">
            <text:p>244.7</text:p>
          </table:table-cell>
          <table:table-cell office:value-type="float" office:value="205.977905" calcext:value-type="float">
            <text:p>206.0</text:p>
          </table:table-cell>
          <table:table-cell office:value-type="float" office:value="168.401535" calcext:value-type="float">
            <text:p>168.4</text:p>
          </table:table-cell>
          <table:table-cell office:value-type="float" office:value="137.252686" calcext:value-type="float">
            <text:p>137.3</text:p>
          </table:table-cell>
          <table:table-cell office:value-type="float" office:value="111.443642" calcext:value-type="float">
            <text:p>111.4</text:p>
          </table:table-cell>
          <table:table-cell office:value-type="float" office:value="90.578857" calcext:value-type="float">
            <text:p>90.6</text:p>
          </table:table-cell>
          <table:table-cell office:value-type="float" office:value="73.966141" calcext:value-type="float">
            <text:p>74.0</text:p>
          </table:table-cell>
          <table:table-cell office:value-type="float" office:value="61.605492" calcext:value-type="float">
            <text:p>61.6</text:p>
          </table:table-cell>
          <table:table-cell office:value-type="float" office:value="50.530346" calcext:value-type="float">
            <text:p>50.5</text:p>
          </table:table-cell>
          <table:table-cell office:value-type="float" office:value="43.41061" calcext:value-type="float">
            <text:p>43.4</text:p>
          </table:table-cell>
          <table:table-cell office:value-type="float" office:value="35.400909" calcext:value-type="float">
            <text:p>35.4</text:p>
          </table:table-cell>
          <table:table-cell office:value-type="float" office:value="6.82308" calcext:value-type="float">
            <text:p>6.8</text:p>
          </table:table-cell>
          <table:table-cell office:value-type="float" office:value="1.483278" calcext:value-type="float">
            <text:p>1.5</text:p>
          </table:table-cell>
          <table:table-cell office:value-type="float" office:value="0.098885" calcext:value-type="float">
            <text:p>0.1</text:p>
          </table:table-cell>
        </table:table-row>
        <table:table-row table:style-name="ro1">
          <table:table-cell/>
          <table:table-cell office:value-type="time" office:time-value="PT1108451H42M33.999999817S" calcext:value-type="time">
            <text:p>11:42:34</text:p>
          </table:table-cell>
          <table:table-cell office:value-type="float" office:value="10.207784" calcext:value-type="float">
            <text:p>10.2</text:p>
          </table:table-cell>
          <table:table-cell office:value-type="float" office:value="22076.388672" calcext:value-type="float">
            <text:p>22076.4</text:p>
          </table:table-cell>
          <table:table-cell office:value-type="float" office:value="14391.371094" calcext:value-type="float">
            <text:p>14391.4</text:p>
          </table:table-cell>
          <table:table-cell office:value-type="float" office:value="9558.686523" calcext:value-type="float">
            <text:p>9558.7</text:p>
          </table:table-cell>
          <table:table-cell office:value-type="float" office:value="6750.338867" calcext:value-type="float">
            <text:p>6750.3</text:p>
          </table:table-cell>
          <table:table-cell office:value-type="float" office:value="4664.577637" calcext:value-type="float">
            <text:p>4664.6</text:p>
          </table:table-cell>
          <table:table-cell office:value-type="float" office:value="3220.189697" calcext:value-type="float">
            <text:p>3220.2</text:p>
          </table:table-cell>
          <table:table-cell office:value-type="float" office:value="2295.209229" calcext:value-type="float">
            <text:p>2295.2</text:p>
          </table:table-cell>
          <table:table-cell office:value-type="float" office:value="1640.218872" calcext:value-type="float">
            <text:p>1640.2</text:p>
          </table:table-cell>
          <table:table-cell office:value-type="float" office:value="1200.064575" calcext:value-type="float">
            <text:p>1200.1</text:p>
          </table:table-cell>
          <table:table-cell office:value-type="float" office:value="914.400269" calcext:value-type="float">
            <text:p>914.4</text:p>
          </table:table-cell>
          <table:table-cell office:value-type="float" office:value="721.410278" calcext:value-type="float">
            <text:p>721.4</text:p>
          </table:table-cell>
          <table:table-cell office:value-type="float" office:value="576.031006" calcext:value-type="float">
            <text:p>576.0</text:p>
          </table:table-cell>
          <table:table-cell office:value-type="float" office:value="473.070374" calcext:value-type="float">
            <text:p>473.1</text:p>
          </table:table-cell>
          <table:table-cell office:value-type="float" office:value="391.368011" calcext:value-type="float">
            <text:p>391.4</text:p>
          </table:table-cell>
          <table:table-cell office:value-type="float" office:value="328.964661" calcext:value-type="float">
            <text:p>329.0</text:p>
          </table:table-cell>
          <table:table-cell office:value-type="float" office:value="283.117279" calcext:value-type="float">
            <text:p>283.1</text:p>
          </table:table-cell>
          <table:table-cell office:value-type="float" office:value="242.266098" calcext:value-type="float">
            <text:p>242.3</text:p>
          </table:table-cell>
          <table:table-cell office:value-type="float" office:value="201.708817" calcext:value-type="float">
            <text:p>201.7</text:p>
          </table:table-cell>
          <table:table-cell office:value-type="float" office:value="165.853821" calcext:value-type="float">
            <text:p>165.9</text:p>
          </table:table-cell>
          <table:table-cell office:value-type="float" office:value="135.190948" calcext:value-type="float">
            <text:p>135.2</text:p>
          </table:table-cell>
          <table:table-cell office:value-type="float" office:value="111.973373" calcext:value-type="float">
            <text:p>112.0</text:p>
          </table:table-cell>
          <table:table-cell office:value-type="float" office:value="90.715088" calcext:value-type="float">
            <text:p>90.7</text:p>
          </table:table-cell>
          <table:table-cell office:value-type="float" office:value="74.061127" calcext:value-type="float">
            <text:p>74.1</text:p>
          </table:table-cell>
          <table:table-cell office:value-type="float" office:value="59.366463" calcext:value-type="float">
            <text:p>59.4</text:p>
          </table:table-cell>
          <table:table-cell office:value-type="float" office:value="49.080193" calcext:value-type="float">
            <text:p>49.1</text:p>
          </table:table-cell>
          <table:table-cell office:value-type="float" office:value="39.185783" calcext:value-type="float">
            <text:p>39.2</text:p>
          </table:table-cell>
          <table:table-cell office:value-type="float" office:value="32.230309" calcext:value-type="float">
            <text:p>32.2</text:p>
          </table:table-cell>
          <table:table-cell office:value-type="float" office:value="5.48601" calcext:value-type="float">
            <text:p>5.5</text:p>
          </table:table-cell>
          <table:table-cell office:value-type="float" office:value="0.88168" calcext:value-type="float">
            <text:p>0.9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/>
          <table:table-cell office:value-type="time" office:time-value="PT1108451H44M36.999999862S" calcext:value-type="time">
            <text:p>11:44:37</text:p>
          </table:table-cell>
          <table:table-cell office:value-type="float" office:value="10.169561" calcext:value-type="float">
            <text:p>10.2</text:p>
          </table:table-cell>
          <table:table-cell office:value-type="float" office:value="22446.199219" calcext:value-type="float">
            <text:p>22446.2</text:p>
          </table:table-cell>
          <table:table-cell office:value-type="float" office:value="14770.056641" calcext:value-type="float">
            <text:p>14770.1</text:p>
          </table:table-cell>
          <table:table-cell office:value-type="float" office:value="9805.338867" calcext:value-type="float">
            <text:p>9805.3</text:p>
          </table:table-cell>
          <table:table-cell office:value-type="float" office:value="6930.092285" calcext:value-type="float">
            <text:p>6930.1</text:p>
          </table:table-cell>
          <table:table-cell office:value-type="float" office:value="4785.653809" calcext:value-type="float">
            <text:p>4785.7</text:p>
          </table:table-cell>
          <table:table-cell office:value-type="float" office:value="3311.942139" calcext:value-type="float">
            <text:p>3311.9</text:p>
          </table:table-cell>
          <table:table-cell office:value-type="float" office:value="2357.13208" calcext:value-type="float">
            <text:p>2357.1</text:p>
          </table:table-cell>
          <table:table-cell office:value-type="float" office:value="1687.68335" calcext:value-type="float">
            <text:p>1687.7</text:p>
          </table:table-cell>
          <table:table-cell office:value-type="float" office:value="1254.036377" calcext:value-type="float">
            <text:p>1254.0</text:p>
          </table:table-cell>
          <table:table-cell office:value-type="float" office:value="949.106812" calcext:value-type="float">
            <text:p>949.1</text:p>
          </table:table-cell>
          <table:table-cell office:value-type="float" office:value="748.114868" calcext:value-type="float">
            <text:p>748.1</text:p>
          </table:table-cell>
          <table:table-cell office:value-type="float" office:value="601.795837" calcext:value-type="float">
            <text:p>601.8</text:p>
          </table:table-cell>
          <table:table-cell office:value-type="float" office:value="496.38327" calcext:value-type="float">
            <text:p>496.4</text:p>
          </table:table-cell>
          <table:table-cell office:value-type="float" office:value="417.323792" calcext:value-type="float">
            <text:p>417.3</text:p>
          </table:table-cell>
          <table:table-cell office:value-type="float" office:value="346.229279" calcext:value-type="float">
            <text:p>346.2</text:p>
          </table:table-cell>
          <table:table-cell office:value-type="float" office:value="296.669617" calcext:value-type="float">
            <text:p>296.7</text:p>
          </table:table-cell>
          <table:table-cell office:value-type="float" office:value="252.616592" calcext:value-type="float">
            <text:p>252.6</text:p>
          </table:table-cell>
          <table:table-cell office:value-type="float" office:value="212.693542" calcext:value-type="float">
            <text:p>212.7</text:p>
          </table:table-cell>
          <table:table-cell office:value-type="float" office:value="178.768768" calcext:value-type="float">
            <text:p>178.8</text:p>
          </table:table-cell>
          <table:table-cell office:value-type="float" office:value="145.434006" calcext:value-type="float">
            <text:p>145.4</text:p>
          </table:table-cell>
          <table:table-cell office:value-type="float" office:value="118.392517" calcext:value-type="float">
            <text:p>118.4</text:p>
          </table:table-cell>
          <table:table-cell office:value-type="float" office:value="100.397644" calcext:value-type="float">
            <text:p>100.4</text:p>
          </table:table-cell>
          <table:table-cell office:value-type="float" office:value="81.616104" calcext:value-type="float">
            <text:p>81.6</text:p>
          </table:table-cell>
          <table:table-cell office:value-type="float" office:value="65.686218" calcext:value-type="float">
            <text:p>65.7</text:p>
          </table:table-cell>
          <table:table-cell office:value-type="float" office:value="54.181293" calcext:value-type="float">
            <text:p>54.2</text:p>
          </table:table-cell>
          <table:table-cell office:value-type="float" office:value="45.233021" calcext:value-type="float">
            <text:p>45.2</text:p>
          </table:table-cell>
          <table:table-cell office:value-type="float" office:value="37.661407" calcext:value-type="float">
            <text:p>37.7</text:p>
          </table:table-cell>
          <table:table-cell office:value-type="float" office:value="6.489955" calcext:value-type="float">
            <text:p>6.5</text:p>
          </table:table-cell>
          <table:table-cell office:value-type="float" office:value="1.179992" calcext:value-type="float">
            <text:p>1.2</text:p>
          </table:table-cell>
          <table:table-cell office:value-type="float" office:value="0.294998" calcext:value-type="float">
            <text:p>0.3</text:p>
          </table:table-cell>
        </table:table-row>
        <table:table-row table:style-name="ro1">
          <table:table-cell/>
          <table:table-cell office:value-type="time" office:time-value="PT1108451H46M39.00000114S" calcext:value-type="time">
            <text:p>11:46:39</text:p>
          </table:table-cell>
          <table:table-cell office:value-type="float" office:value="10.174986" calcext:value-type="float">
            <text:p>10.2</text:p>
          </table:table-cell>
          <table:table-cell office:value-type="float" office:value="22171.234375" calcext:value-type="float">
            <text:p>22171.2</text:p>
          </table:table-cell>
          <table:table-cell office:value-type="float" office:value="14554.320312" calcext:value-type="float">
            <text:p>14554.3</text:p>
          </table:table-cell>
          <table:table-cell office:value-type="float" office:value="9648.662109" calcext:value-type="float">
            <text:p>9648.7</text:p>
          </table:table-cell>
          <table:table-cell office:value-type="float" office:value="6799.321289" calcext:value-type="float">
            <text:p>6799.3</text:p>
          </table:table-cell>
          <table:table-cell office:value-type="float" office:value="4709.195801" calcext:value-type="float">
            <text:p>4709.2</text:p>
          </table:table-cell>
          <table:table-cell office:value-type="float" office:value="3249.439453" calcext:value-type="float">
            <text:p>3249.4</text:p>
          </table:table-cell>
          <table:table-cell office:value-type="float" office:value="2309.487305" calcext:value-type="float">
            <text:p>2309.5</text:p>
          </table:table-cell>
          <table:table-cell office:value-type="float" office:value="1668.405273" calcext:value-type="float">
            <text:p>1668.4</text:p>
          </table:table-cell>
          <table:table-cell office:value-type="float" office:value="1237.053345" calcext:value-type="float">
            <text:p>1237.1</text:p>
          </table:table-cell>
          <table:table-cell office:value-type="float" office:value="948.502563" calcext:value-type="float">
            <text:p>948.5</text:p>
          </table:table-cell>
          <table:table-cell office:value-type="float" office:value="745.160767" calcext:value-type="float">
            <text:p>745.2</text:p>
          </table:table-cell>
          <table:table-cell office:value-type="float" office:value="597.740356" calcext:value-type="float">
            <text:p>597.7</text:p>
          </table:table-cell>
          <table:table-cell office:value-type="float" office:value="490.811493" calcext:value-type="float">
            <text:p>490.8</text:p>
          </table:table-cell>
          <table:table-cell office:value-type="float" office:value="403.145508" calcext:value-type="float">
            <text:p>403.1</text:p>
          </table:table-cell>
          <table:table-cell office:value-type="float" office:value="337.887451" calcext:value-type="float">
            <text:p>337.9</text:p>
          </table:table-cell>
          <table:table-cell office:value-type="float" office:value="286.388611" calcext:value-type="float">
            <text:p>286.4</text:p>
          </table:table-cell>
          <table:table-cell office:value-type="float" office:value="243.243576" calcext:value-type="float">
            <text:p>243.2</text:p>
          </table:table-cell>
          <table:table-cell office:value-type="float" office:value="204.02977" calcext:value-type="float">
            <text:p>204.0</text:p>
          </table:table-cell>
          <table:table-cell office:value-type="float" office:value="168.550598" calcext:value-type="float">
            <text:p>168.6</text:p>
          </table:table-cell>
          <table:table-cell office:value-type="float" office:value="135.823288" calcext:value-type="float">
            <text:p>135.8</text:p>
          </table:table-cell>
          <table:table-cell office:value-type="float" office:value="110.368706" calcext:value-type="float">
            <text:p>110.4</text:p>
          </table:table-cell>
          <table:table-cell office:value-type="float" office:value="88.05909" calcext:value-type="float">
            <text:p>88.1</text:p>
          </table:table-cell>
          <table:table-cell office:value-type="float" office:value="71.351448" calcext:value-type="float">
            <text:p>71.4</text:p>
          </table:table-cell>
          <table:table-cell office:value-type="float" office:value="58.869862" calcext:value-type="float">
            <text:p>58.9</text:p>
          </table:table-cell>
          <table:table-cell office:value-type="float" office:value="48.845276" calcext:value-type="float">
            <text:p>48.8</text:p>
          </table:table-cell>
          <table:table-cell office:value-type="float" office:value="39.803493" calcext:value-type="float">
            <text:p>39.8</text:p>
          </table:table-cell>
          <table:table-cell office:value-type="float" office:value="32.334198" calcext:value-type="float">
            <text:p>32.3</text:p>
          </table:table-cell>
          <table:table-cell office:value-type="float" office:value="4.422611" calcext:value-type="float">
            <text:p>4.4</text:p>
          </table:table-cell>
          <table:table-cell office:value-type="float" office:value="0.982802" calcext:value-type="float">
            <text:p>1.0</text:p>
          </table:table-cell>
          <table:table-cell office:value-type="float" office:value="0.09828" calcext:value-type="float">
            <text:p>0.1</text:p>
          </table:table-cell>
        </table:table-row>
        <table:table-row table:style-name="ro1">
          <table:table-cell/>
          <table:table-cell office:value-type="time" office:time-value="PT1108451H48M40.999999903S" calcext:value-type="time">
            <text:p>11:48:41</text:p>
          </table:table-cell>
          <table:table-cell office:value-type="float" office:value="10.118071" calcext:value-type="float">
            <text:p>10.1</text:p>
          </table:table-cell>
          <table:table-cell office:value-type="float" office:value="22011.310547" calcext:value-type="float">
            <text:p>22011.3</text:p>
          </table:table-cell>
          <table:table-cell office:value-type="float" office:value="14378.235352" calcext:value-type="float">
            <text:p>14378.2</text:p>
          </table:table-cell>
          <table:table-cell office:value-type="float" office:value="9515.648438" calcext:value-type="float">
            <text:p>9515.6</text:p>
          </table:table-cell>
          <table:table-cell office:value-type="float" office:value="6741.799316" calcext:value-type="float">
            <text:p>6741.8</text:p>
          </table:table-cell>
          <table:table-cell office:value-type="float" office:value="4637.84082" calcext:value-type="float">
            <text:p>4637.8</text:p>
          </table:table-cell>
          <table:table-cell office:value-type="float" office:value="3198.831299" calcext:value-type="float">
            <text:p>3198.8</text:p>
          </table:table-cell>
          <table:table-cell office:value-type="float" office:value="2273.951416" calcext:value-type="float">
            <text:p>2274.0</text:p>
          </table:table-cell>
          <table:table-cell office:value-type="float" office:value="1634.698975" calcext:value-type="float">
            <text:p>1634.7</text:p>
          </table:table-cell>
          <table:table-cell office:value-type="float" office:value="1196.275513" calcext:value-type="float">
            <text:p>1196.3</text:p>
          </table:table-cell>
          <table:table-cell office:value-type="float" office:value="910.054932" calcext:value-type="float">
            <text:p>910.1</text:p>
          </table:table-cell>
          <table:table-cell office:value-type="float" office:value="720.987244" calcext:value-type="float">
            <text:p>721.0</text:p>
          </table:table-cell>
          <table:table-cell office:value-type="float" office:value="581.929138" calcext:value-type="float">
            <text:p>581.9</text:p>
          </table:table-cell>
          <table:table-cell office:value-type="float" office:value="473.311584" calcext:value-type="float">
            <text:p>473.3</text:p>
          </table:table-cell>
          <table:table-cell office:value-type="float" office:value="393.157959" calcext:value-type="float">
            <text:p>393.2</text:p>
          </table:table-cell>
          <table:table-cell office:value-type="float" office:value="329.311798" calcext:value-type="float">
            <text:p>329.3</text:p>
          </table:table-cell>
          <table:table-cell office:value-type="float" office:value="284.342743" calcext:value-type="float">
            <text:p>284.3</text:p>
          </table:table-cell>
          <table:table-cell office:value-type="float" office:value="241.152695" calcext:value-type="float">
            <text:p>241.2</text:p>
          </table:table-cell>
          <table:table-cell office:value-type="float" office:value="197.666138" calcext:value-type="float">
            <text:p>197.7</text:p>
          </table:table-cell>
          <table:table-cell office:value-type="float" office:value="163.07457" calcext:value-type="float">
            <text:p>163.1</text:p>
          </table:table-cell>
          <table:table-cell office:value-type="float" office:value="132.633987" calcext:value-type="float">
            <text:p>132.6</text:p>
          </table:table-cell>
          <table:table-cell office:value-type="float" office:value="107.431549" calcext:value-type="float">
            <text:p>107.4</text:p>
          </table:table-cell>
          <table:table-cell office:value-type="float" office:value="86.874268" calcext:value-type="float">
            <text:p>86.9</text:p>
          </table:table-cell>
          <table:table-cell office:value-type="float" office:value="69.380814" calcext:value-type="float">
            <text:p>69.4</text:p>
          </table:table-cell>
          <table:table-cell office:value-type="float" office:value="57.91618" calcext:value-type="float">
            <text:p>57.9</text:p>
          </table:table-cell>
          <table:table-cell office:value-type="float" office:value="46.846874" calcext:value-type="float">
            <text:p>46.8</text:p>
          </table:table-cell>
          <table:table-cell office:value-type="float" office:value="39.236729" calcext:value-type="float">
            <text:p>39.2</text:p>
          </table:table-cell>
          <table:table-cell office:value-type="float" office:value="32.219582" calcext:value-type="float">
            <text:p>32.2</text:p>
          </table:table-cell>
          <table:table-cell office:value-type="float" office:value="5.633485" calcext:value-type="float">
            <text:p>5.6</text:p>
          </table:table-cell>
          <table:table-cell office:value-type="float" office:value="1.28483" calcext:value-type="float">
            <text:p>1.3</text:p>
          </table:table-cell>
          <table:table-cell office:value-type="float" office:value="0.098833" calcext:value-type="float">
            <text:p>0.1</text:p>
          </table:table-cell>
        </table:table-row>
        <table:table-row table:style-name="ro1">
          <table:table-cell/>
          <table:table-cell office:value-type="time" office:time-value="PT1108451H50M43.000000343S" calcext:value-type="time">
            <text:p>11:50:43</text:p>
          </table:table-cell>
          <table:table-cell office:value-type="float" office:value="10.141549" calcext:value-type="float">
            <text:p>10.1</text:p>
          </table:table-cell>
          <table:table-cell office:value-type="float" office:value="22239.599609" calcext:value-type="float">
            <text:p>22239.6</text:p>
          </table:table-cell>
          <table:table-cell office:value-type="float" office:value="14577.654297" calcext:value-type="float">
            <text:p>14577.7</text:p>
          </table:table-cell>
          <table:table-cell office:value-type="float" office:value="9682.642578" calcext:value-type="float">
            <text:p>9682.6</text:p>
          </table:table-cell>
          <table:table-cell office:value-type="float" office:value="6842.840332" calcext:value-type="float">
            <text:p>6842.8</text:p>
          </table:table-cell>
          <table:table-cell office:value-type="float" office:value="4731.032715" calcext:value-type="float">
            <text:p>4731.0</text:p>
          </table:table-cell>
          <table:table-cell office:value-type="float" office:value="3261.631836" calcext:value-type="float">
            <text:p>3261.6</text:p>
          </table:table-cell>
          <table:table-cell office:value-type="float" office:value="2319.172363" calcext:value-type="float">
            <text:p>2319.2</text:p>
          </table:table-cell>
          <table:table-cell office:value-type="float" office:value="1660.791626" calcext:value-type="float">
            <text:p>1660.8</text:p>
          </table:table-cell>
          <table:table-cell office:value-type="float" office:value="1220.425049" calcext:value-type="float">
            <text:p>1220.4</text:p>
          </table:table-cell>
          <table:table-cell office:value-type="float" office:value="931.810303" calcext:value-type="float">
            <text:p>931.8</text:p>
          </table:table-cell>
          <table:table-cell office:value-type="float" office:value="733.319946" calcext:value-type="float">
            <text:p>733.3</text:p>
          </table:table-cell>
          <table:table-cell office:value-type="float" office:value="587.286987" calcext:value-type="float">
            <text:p>587.3</text:p>
          </table:table-cell>
          <table:table-cell office:value-type="float" office:value="480.104156" calcext:value-type="float">
            <text:p>480.1</text:p>
          </table:table-cell>
          <table:table-cell office:value-type="float" office:value="399.938904" calcext:value-type="float">
            <text:p>399.9</text:p>
          </table:table-cell>
          <table:table-cell office:value-type="float" office:value="332.394989" calcext:value-type="float">
            <text:p>332.4</text:p>
          </table:table-cell>
          <table:table-cell office:value-type="float" office:value="285.064941" calcext:value-type="float">
            <text:p>285.1</text:p>
          </table:table-cell>
          <table:table-cell office:value-type="float" office:value="239.805573" calcext:value-type="float">
            <text:p>239.8</text:p>
          </table:table-cell>
          <table:table-cell office:value-type="float" office:value="199.673645" calcext:value-type="float">
            <text:p>199.7</text:p>
          </table:table-cell>
          <table:table-cell office:value-type="float" office:value="165.457962" calcext:value-type="float">
            <text:p>165.5</text:p>
          </table:table-cell>
          <table:table-cell office:value-type="float" office:value="130.552048" calcext:value-type="float">
            <text:p>130.6</text:p>
          </table:table-cell>
          <table:table-cell office:value-type="float" office:value="106.591209" calcext:value-type="float">
            <text:p>106.6</text:p>
          </table:table-cell>
          <table:table-cell office:value-type="float" office:value="85.489899" calcext:value-type="float">
            <text:p>85.5</text:p>
          </table:table-cell>
          <table:table-cell office:value-type="float" office:value="69.713219" calcext:value-type="float">
            <text:p>69.7</text:p>
          </table:table-cell>
          <table:table-cell office:value-type="float" office:value="54.429554" calcext:value-type="float">
            <text:p>54.4</text:p>
          </table:table-cell>
          <table:table-cell office:value-type="float" office:value="44.174709" calcext:value-type="float">
            <text:p>44.2</text:p>
          </table:table-cell>
          <table:table-cell office:value-type="float" office:value="37.666828" calcext:value-type="float">
            <text:p>37.7</text:p>
          </table:table-cell>
          <table:table-cell office:value-type="float" office:value="31.060343" calcext:value-type="float">
            <text:p>31.1</text:p>
          </table:table-cell>
          <table:table-cell office:value-type="float" office:value="4.535796" calcext:value-type="float">
            <text:p>4.5</text:p>
          </table:table-cell>
          <table:table-cell office:value-type="float" office:value="1.183251" calcext:value-type="float">
            <text:p>1.2</text:p>
          </table:table-cell>
          <table:table-cell office:value-type="float" office:value="0.098604" calcext:value-type="float">
            <text:p>0.1</text:p>
          </table:table-cell>
        </table:table-row>
        <table:table-row table:style-name="ro1">
          <table:table-cell/>
          <table:table-cell office:value-type="time" office:time-value="PT1108451H52M44.999999944S" calcext:value-type="time">
            <text:p>11:52:45</text:p>
          </table:table-cell>
          <table:table-cell office:value-type="float" office:value="10.171449" calcext:value-type="float">
            <text:p>10.2</text:p>
          </table:table-cell>
          <table:table-cell office:value-type="float" office:value="21868.173828" calcext:value-type="float">
            <text:p>21868.2</text:p>
          </table:table-cell>
          <table:table-cell office:value-type="float" office:value="14363.539062" calcext:value-type="float">
            <text:p>14363.5</text:p>
          </table:table-cell>
          <table:table-cell office:value-type="float" office:value="9574.938477" calcext:value-type="float">
            <text:p>9574.9</text:p>
          </table:table-cell>
          <table:table-cell office:value-type="float" office:value="6774.846191" calcext:value-type="float">
            <text:p>6774.8</text:p>
          </table:table-cell>
          <table:table-cell office:value-type="float" office:value="4699.232422" calcext:value-type="float">
            <text:p>4699.2</text:p>
          </table:table-cell>
          <table:table-cell office:value-type="float" office:value="3247.030029" calcext:value-type="float">
            <text:p>3247.0</text:p>
          </table:table-cell>
          <table:table-cell office:value-type="float" office:value="2306.35791" calcext:value-type="float">
            <text:p>2306.4</text:p>
          </table:table-cell>
          <table:table-cell office:value-type="float" office:value="1648.241089" calcext:value-type="float">
            <text:p>1648.2</text:p>
          </table:table-cell>
          <table:table-cell office:value-type="float" office:value="1219.393677" calcext:value-type="float">
            <text:p>1219.4</text:p>
          </table:table-cell>
          <table:table-cell office:value-type="float" office:value="932.217285" calcext:value-type="float">
            <text:p>932.2</text:p>
          </table:table-cell>
          <table:table-cell office:value-type="float" office:value="733.130554" calcext:value-type="float">
            <text:p>733.1</text:p>
          </table:table-cell>
          <table:table-cell office:value-type="float" office:value="590.378052" calcext:value-type="float">
            <text:p>590.4</text:p>
          </table:table-cell>
          <table:table-cell office:value-type="float" office:value="480.659149" calcext:value-type="float">
            <text:p>480.7</text:p>
          </table:table-cell>
          <table:table-cell office:value-type="float" office:value="403.580658" calcext:value-type="float">
            <text:p>403.6</text:p>
          </table:table-cell>
          <table:table-cell office:value-type="float" office:value="339.872925" calcext:value-type="float">
            <text:p>339.9</text:p>
          </table:table-cell>
          <table:table-cell office:value-type="float" office:value="290.519073" calcext:value-type="float">
            <text:p>290.5</text:p>
          </table:table-cell>
          <table:table-cell office:value-type="float" office:value="244.606262" calcext:value-type="float">
            <text:p>244.6</text:p>
          </table:table-cell>
          <table:table-cell office:value-type="float" office:value="202.724319" calcext:value-type="float">
            <text:p>202.7</text:p>
          </table:table-cell>
          <table:table-cell office:value-type="float" office:value="166.151352" calcext:value-type="float">
            <text:p>166.2</text:p>
          </table:table-cell>
          <table:table-cell office:value-type="float" office:value="135.870514" calcext:value-type="float">
            <text:p>135.9</text:p>
          </table:table-cell>
          <table:table-cell office:value-type="float" office:value="110.112144" calcext:value-type="float">
            <text:p>110.1</text:p>
          </table:table-cell>
          <table:table-cell office:value-type="float" office:value="87.598145" calcext:value-type="float">
            <text:p>87.6</text:p>
          </table:table-cell>
          <table:table-cell office:value-type="float" office:value="70.589745" calcext:value-type="float">
            <text:p>70.6</text:p>
          </table:table-cell>
          <table:table-cell office:value-type="float" office:value="55.74427" calcext:value-type="float">
            <text:p>55.7</text:p>
          </table:table-cell>
          <table:table-cell office:value-type="float" office:value="45.322945" calcext:value-type="float">
            <text:p>45.3</text:p>
          </table:table-cell>
          <table:table-cell office:value-type="float" office:value="38.932507" calcext:value-type="float">
            <text:p>38.9</text:p>
          </table:table-cell>
          <table:table-cell office:value-type="float" office:value="32.050499" calcext:value-type="float">
            <text:p>32.1</text:p>
          </table:table-cell>
          <table:table-cell office:value-type="float" office:value="5.505607" calcext:value-type="float">
            <text:p>5.5</text:p>
          </table:table-cell>
          <table:table-cell office:value-type="float" office:value="1.081459" calcext:value-type="float">
            <text:p>1.1</text:p>
          </table:table-cell>
          <table:table-cell office:value-type="float" office:value="0.196629" calcext:value-type="float">
            <text:p>0.2</text:p>
          </table:table-cell>
        </table:table-row>
        <table:table-row table:style-name="ro1">
          <table:table-cell table:number-columns-repeated="33"/>
        </table:table-row>
        <table:table-row table:style-name="ro1">
          <table:table-cell/>
          <table:table-cell table:style-name="Default"/>
          <table:table-cell table:style-name="ce9" office:value-type="string" calcext:value-type="string">
            <text:p>CV</text:p>
          </table:table-cell>
          <table:table-cell table:style-name="ce16" table:formula="of:=STDEV([.D6:.D33])/AVERAGE([.D6:.D33])" office:value-type="percentage" office:value="0.00795860747781328" calcext:value-type="percentage">
            <text:p>0.80%</text:p>
          </table:table-cell>
          <table:table-cell table:style-name="ce16" table:formula="of:=STDEV([.E6:.E33])/AVERAGE([.E6:.E33])" office:value-type="percentage" office:value="0.00784920492365135" calcext:value-type="percentage">
            <text:p>0.78%</text:p>
          </table:table-cell>
          <table:table-cell table:style-name="ce16" table:formula="of:=STDEV([.F6:.F33])/AVERAGE([.F6:.F33])" office:value-type="percentage" office:value="0.00889589034823201" calcext:value-type="percentage">
            <text:p>0.89%</text:p>
          </table:table-cell>
          <table:table-cell table:style-name="ce16" table:formula="of:=STDEV([.G6:.G33])/AVERAGE([.G6:.G33])" office:value-type="percentage" office:value="0.00987971043736012" calcext:value-type="percentage">
            <text:p>0.99%</text:p>
          </table:table-cell>
          <table:table-cell table:style-name="ce16" table:formula="of:=STDEV([.H6:.H33])/AVERAGE([.H6:.H33])" office:value-type="percentage" office:value="0.0111094987272583" calcext:value-type="percentage">
            <text:p>1.11%</text:p>
          </table:table-cell>
          <table:table-cell table:style-name="ce16" table:formula="of:=STDEV([.I6:.I33])/AVERAGE([.I6:.I33])" office:value-type="percentage" office:value="0.0134518312574444" calcext:value-type="percentage">
            <text:p>1.35%</text:p>
          </table:table-cell>
          <table:table-cell table:style-name="ce16" table:formula="of:=STDEV([.J6:.J33])/AVERAGE([.J6:.J33])" office:value-type="percentage" office:value="0.0153125768657484" calcext:value-type="percentage">
            <text:p>1.53%</text:p>
          </table:table-cell>
          <table:table-cell table:style-name="ce16" table:formula="of:=STDEV([.K6:.K33])/AVERAGE([.K6:.K33])" office:value-type="percentage" office:value="0.0187442491239517" calcext:value-type="percentage">
            <text:p>1.87%</text:p>
          </table:table-cell>
          <table:table-cell table:style-name="ce16" table:formula="of:=STDEV([.L6:.L33])/AVERAGE([.L6:.L33])" office:value-type="percentage" office:value="0.0236785983414844" calcext:value-type="percentage">
            <text:p>2.37%</text:p>
          </table:table-cell>
          <table:table-cell table:style-name="ce16" table:formula="of:=STDEV([.M6:.M33])/AVERAGE([.M6:.M33])" office:value-type="percentage" office:value="0.0274948724739398" calcext:value-type="percentage">
            <text:p>2.75%</text:p>
          </table:table-cell>
          <table:table-cell table:style-name="ce16" table:formula="of:=STDEV([.N6:.N33])/AVERAGE([.N6:.N33])" office:value-type="percentage" office:value="0.0296528149338337" calcext:value-type="percentage">
            <text:p>2.97%</text:p>
          </table:table-cell>
          <table:table-cell table:style-name="ce16" table:formula="of:=STDEV([.O6:.O33])/AVERAGE([.O6:.O33])" office:value-type="percentage" office:value="0.0324941578732763" calcext:value-type="percentage">
            <text:p>3.25%</text:p>
          </table:table-cell>
          <table:table-cell table:style-name="ce16" table:formula="of:=STDEV([.P6:.P33])/AVERAGE([.P6:.P33])" office:value-type="percentage" office:value="0.034185637594484" calcext:value-type="percentage">
            <text:p>3.42%</text:p>
          </table:table-cell>
          <table:table-cell table:style-name="ce16" table:formula="of:=STDEV([.Q6:.Q33])/AVERAGE([.Q6:.Q33])" office:value-type="percentage" office:value="0.0370782223400681" calcext:value-type="percentage">
            <text:p>3.71%</text:p>
          </table:table-cell>
          <table:table-cell table:style-name="ce16" table:formula="of:=STDEV([.R6:.R33])/AVERAGE([.R6:.R33])" office:value-type="percentage" office:value="0.0366400724457543" calcext:value-type="percentage">
            <text:p>3.66%</text:p>
          </table:table-cell>
          <table:table-cell table:style-name="ce16" table:formula="of:=STDEV([.S6:.S33])/AVERAGE([.S6:.S33])" office:value-type="percentage" office:value="0.0368761917189976" calcext:value-type="percentage">
            <text:p>3.69%</text:p>
          </table:table-cell>
          <table:table-cell table:style-name="ce16" table:formula="of:=STDEV([.T6:.T33])/AVERAGE([.T6:.T33])" office:value-type="percentage" office:value="0.0376353578804106" calcext:value-type="percentage">
            <text:p>3.76%</text:p>
          </table:table-cell>
          <table:table-cell table:style-name="ce16" table:formula="of:=STDEV([.U6:.U33])/AVERAGE([.U6:.U33])" office:value-type="percentage" office:value="0.0408354702914801" calcext:value-type="percentage">
            <text:p>4.08%</text:p>
          </table:table-cell>
          <table:table-cell table:style-name="ce16" table:formula="of:=STDEV([.V6:.V33])/AVERAGE([.V6:.V33])" office:value-type="percentage" office:value="0.043027044343641" calcext:value-type="percentage">
            <text:p>4.30%</text:p>
          </table:table-cell>
          <table:table-cell table:style-name="ce16" table:formula="of:=STDEV([.W6:.W33])/AVERAGE([.W6:.W33])" office:value-type="percentage" office:value="0.0433370252722343" calcext:value-type="percentage">
            <text:p>4.33%</text:p>
          </table:table-cell>
          <table:table-cell table:style-name="ce16" table:formula="of:=STDEV([.X6:.X33])/AVERAGE([.X6:.X33])" office:value-type="percentage" office:value="0.0408488357329336" calcext:value-type="percentage">
            <text:p>4.08%</text:p>
          </table:table-cell>
          <table:table-cell table:style-name="ce16" table:formula="of:=STDEV([.Y6:.Y33])/AVERAGE([.Y6:.Y33])" office:value-type="percentage" office:value="0.0490993682512591" calcext:value-type="percentage">
            <text:p>4.91%</text:p>
          </table:table-cell>
          <table:table-cell table:style-name="ce16" table:formula="of:=STDEV([.Z6:.Z33])/AVERAGE([.Z6:.Z33])" office:value-type="percentage" office:value="0.0494644038835949" calcext:value-type="percentage">
            <text:p>4.95%</text:p>
          </table:table-cell>
          <table:table-cell table:style-name="ce16" table:formula="of:=STDEV([.AA6:.AA33])/AVERAGE([.AA6:.AA33])" office:value-type="percentage" office:value="0.05227481669756" calcext:value-type="percentage">
            <text:p>5.23%</text:p>
          </table:table-cell>
          <table:table-cell table:style-name="ce16" table:formula="of:=STDEV([.AB6:.AB33])/AVERAGE([.AB6:.AB33])" office:value-type="percentage" office:value="0.0562490393168199" calcext:value-type="percentage">
            <text:p>5.62%</text:p>
          </table:table-cell>
          <table:table-cell table:style-name="ce16" table:formula="of:=STDEV([.AC6:.AC33])/AVERAGE([.AC6:.AC33])" office:value-type="percentage" office:value="0.0562395989229673" calcext:value-type="percentage">
            <text:p>5.62%</text:p>
          </table:table-cell>
          <table:table-cell table:style-name="ce16" table:formula="of:=STDEV([.AD6:.AD33])/AVERAGE([.AD6:.AD33])" office:value-type="percentage" office:value="0.0589230369809134" calcext:value-type="percentage">
            <text:p>5.89%</text:p>
          </table:table-cell>
          <table:table-cell table:style-name="ce16" table:formula="of:=STDEV([.AE6:.AE33])/AVERAGE([.AE6:.AE33])" office:value-type="percentage" office:value="0.158472142698292" calcext:value-type="percentage">
            <text:p>15.85%</text:p>
          </table:table-cell>
          <table:table-cell table:style-name="ce16" table:formula="of:=STDEV([.AF6:.AF33])/AVERAGE([.AF6:.AF33])" office:value-type="percentage" office:value="0.26683921314271" calcext:value-type="percentage">
            <text:p>26.68%</text:p>
          </table:table-cell>
          <table:table-cell table:style-name="ce16" table:formula="of:=STDEV([.AG6:.AG33])/AVERAGE([.AG6:.AG33])" office:value-type="percentage" office:value="0.662641108328745" calcext:value-type="percentage">
            <text:p>66.26%</text:p>
          </table:table-cell>
        </table:table-row>
        <table:table-row table:style-name="ro1">
          <table:table-cell/>
          <table:table-cell table:style-name="Default"/>
          <table:table-cell table:style-name="ce13" office:value-type="string" calcext:value-type="string">
            <text:p>x</text:p>
          </table:table-cell>
          <table:table-cell table:formula="of:=AVERAGE([.D6:.D33])" office:value-type="float" office:value="22152.0537806786" calcext:value-type="float">
            <text:p>22152.1</text:p>
          </table:table-cell>
          <table:table-cell table:formula="of:=AVERAGE([.E6:.E33])" office:value-type="float" office:value="14543.8295898571" calcext:value-type="float">
            <text:p>14543.8</text:p>
          </table:table-cell>
          <table:table-cell table:formula="of:=AVERAGE([.F6:.F33])" office:value-type="float" office:value="9672.04052732143" calcext:value-type="float">
            <text:p>9672.0</text:p>
          </table:table-cell>
          <table:table-cell table:formula="of:=AVERAGE([.G6:.G33])" office:value-type="float" office:value="6843.36190346429" calcext:value-type="float">
            <text:p>6843.4</text:p>
          </table:table-cell>
          <table:table-cell table:formula="of:=AVERAGE([.H6:.H33])" office:value-type="float" office:value="4721.61385678571" calcext:value-type="float">
            <text:p>4721.6</text:p>
          </table:table-cell>
          <table:table-cell table:formula="of:=AVERAGE([.I6:.I33])" office:value-type="float" office:value="3247.80622214286" calcext:value-type="float">
            <text:p>3247.8</text:p>
          </table:table-cell>
          <table:table-cell table:formula="of:=AVERAGE([.J6:.J33])" office:value-type="float" office:value="2305.51086425" calcext:value-type="float">
            <text:p>2305.5</text:p>
          </table:table-cell>
          <table:table-cell table:formula="of:=AVERAGE([.K6:.K33])" office:value-type="float" office:value="1648.87322125" calcext:value-type="float">
            <text:p>1648.9</text:p>
          </table:table-cell>
          <table:table-cell table:formula="of:=AVERAGE([.L6:.L33])" office:value-type="float" office:value="1209.86011610714" calcext:value-type="float">
            <text:p>1209.9</text:p>
          </table:table-cell>
          <table:table-cell table:formula="of:=AVERAGE([.M6:.M33])" office:value-type="float" office:value="920.535332928572" calcext:value-type="float">
            <text:p>920.5</text:p>
          </table:table-cell>
          <table:table-cell table:formula="of:=AVERAGE([.N6:.N33])" office:value-type="float" office:value="724.07940675" calcext:value-type="float">
            <text:p>724.1</text:p>
          </table:table-cell>
          <table:table-cell table:formula="of:=AVERAGE([.O6:.O33])" office:value-type="float" office:value="579.990899214286" calcext:value-type="float">
            <text:p>580.0</text:p>
          </table:table-cell>
          <table:table-cell table:formula="of:=AVERAGE([.P6:.P33])" office:value-type="float" office:value="473.477249035714" calcext:value-type="float">
            <text:p>473.5</text:p>
          </table:table-cell>
          <table:table-cell table:formula="of:=AVERAGE([.Q6:.Q33])" office:value-type="float" office:value="392.358621892857" calcext:value-type="float">
            <text:p>392.4</text:p>
          </table:table-cell>
          <table:table-cell table:formula="of:=AVERAGE([.R6:.R33])" office:value-type="float" office:value="330.414840714286" calcext:value-type="float">
            <text:p>330.4</text:p>
          </table:table-cell>
          <table:table-cell table:formula="of:=AVERAGE([.S6:.S33])" office:value-type="float" office:value="281.704825321429" calcext:value-type="float">
            <text:p>281.7</text:p>
          </table:table-cell>
          <table:table-cell table:formula="of:=AVERAGE([.T6:.T33])" office:value-type="float" office:value="239.480802821429" calcext:value-type="float">
            <text:p>239.5</text:p>
          </table:table-cell>
          <table:table-cell table:formula="of:=AVERAGE([.U6:.U33])" office:value-type="float" office:value="199.499400535714" calcext:value-type="float">
            <text:p>199.5</text:p>
          </table:table-cell>
          <table:table-cell table:formula="of:=AVERAGE([.V6:.V33])" office:value-type="float" office:value="165.024513214286" calcext:value-type="float">
            <text:p>165.0</text:p>
          </table:table-cell>
          <table:table-cell table:formula="of:=AVERAGE([.W6:.W33])" office:value-type="float" office:value="134.617293571429" calcext:value-type="float">
            <text:p>134.6</text:p>
          </table:table-cell>
          <table:table-cell table:formula="of:=AVERAGE([.X6:.X33])" office:value-type="float" office:value="110.129575928571" calcext:value-type="float">
            <text:p>110.1</text:p>
          </table:table-cell>
          <table:table-cell table:formula="of:=AVERAGE([.Y6:.Y33])" office:value-type="float" office:value="89.7595528571429" calcext:value-type="float">
            <text:p>89.8</text:p>
          </table:table-cell>
          <table:table-cell table:formula="of:=AVERAGE([.Z6:.Z33])" office:value-type="float" office:value="72.6523315357143" calcext:value-type="float">
            <text:p>72.7</text:p>
          </table:table-cell>
          <table:table-cell table:formula="of:=AVERAGE([.AA6:.AA33])" office:value-type="float" office:value="59.433086" calcext:value-type="float">
            <text:p>59.4</text:p>
          </table:table-cell>
          <table:table-cell table:formula="of:=AVERAGE([.AB6:.AB33])" office:value-type="float" office:value="49.3898917142857" calcext:value-type="float">
            <text:p>49.4</text:p>
          </table:table-cell>
          <table:table-cell table:formula="of:=AVERAGE([.AC6:.AC33])" office:value-type="float" office:value="41.4159904285714" calcext:value-type="float">
            <text:p>41.4</text:p>
          </table:table-cell>
          <table:table-cell table:formula="of:=AVERAGE([.AD6:.AD33])" office:value-type="float" office:value="33.9582730357143" calcext:value-type="float">
            <text:p>34.0</text:p>
          </table:table-cell>
          <table:table-cell table:formula="of:=AVERAGE([.AE6:.AE33])" office:value-type="float" office:value="5.93000982142857" calcext:value-type="float">
            <text:p>5.9</text:p>
          </table:table-cell>
          <table:table-cell table:formula="of:=AVERAGE([.AF6:.AF33])" office:value-type="float" office:value="1.15367089285714" calcext:value-type="float">
            <text:p>1.2</text:p>
          </table:table-cell>
          <table:table-cell table:formula="of:=AVERAGE([.AG6:.AG33])" office:value-type="float" office:value="0.155772892857143" calcext:value-type="float">
            <text:p>0.2</text:p>
          </table:table-cell>
        </table:table-row>
        <table:table-row table:style-name="ro1">
          <table:table-cell/>
          <table:table-cell table:style-name="Default"/>
          <table:table-cell table:style-name="ce15" office:value-type="string" calcext:value-type="string">
            <text:p>σ</text:p>
          </table:table-cell>
          <table:table-cell table:formula="of:=STDEV([.D6:.D33])" office:value-type="float" office:value="176.29950086783" calcext:value-type="float">
            <text:p>176.3</text:p>
          </table:table-cell>
          <table:table-cell table:formula="of:=STDEV([.E6:.E33])" office:value-type="float" office:value="114.157498825453" calcext:value-type="float">
            <text:p>114.2</text:p>
          </table:table-cell>
          <table:table-cell table:formula="of:=STDEV([.F6:.F33])" office:value-type="float" office:value="86.0414119747076" calcext:value-type="float">
            <text:p>86.0</text:p>
          </table:table-cell>
          <table:table-cell table:formula="of:=STDEV([.G6:.G33])" office:value-type="float" office:value="67.6104340242887" calcext:value-type="float">
            <text:p>67.6</text:p>
          </table:table-cell>
          <table:table-cell table:formula="of:=STDEV([.H6:.H33])" office:value-type="float" office:value="52.454763132566" calcext:value-type="float">
            <text:p>52.5</text:p>
          </table:table-cell>
          <table:table-cell table:formula="of:=STDEV([.I6:.I33])" office:value-type="float" office:value="43.6889412571436" calcext:value-type="float">
            <text:p>43.7</text:p>
          </table:table-cell>
          <table:table-cell table:formula="of:=STDEV([.J6:.J33])" office:value-type="float" office:value="35.3033123236461" calcext:value-type="float">
            <text:p>35.3</text:p>
          </table:table-cell>
          <table:table-cell table:formula="of:=STDEV([.K6:.K33])" office:value-type="float" office:value="30.9068904329227" calcext:value-type="float">
            <text:p>30.9</text:p>
          </table:table-cell>
          <table:table-cell table:formula="of:=STDEV([.L6:.L33])" office:value-type="float" office:value="28.6477917386827" calcext:value-type="float">
            <text:p>28.6</text:p>
          </table:table-cell>
          <table:table-cell table:formula="of:=STDEV([.M6:.M33])" office:value-type="float" office:value="25.3100015866268" calcext:value-type="float">
            <text:p>25.3</text:p>
          </table:table-cell>
          <table:table-cell table:formula="of:=STDEV([.N6:.N33])" office:value-type="float" office:value="21.4709926457578" calcext:value-type="float">
            <text:p>21.5</text:p>
          </table:table-cell>
          <table:table-cell table:formula="of:=STDEV([.O6:.O33])" office:value-type="float" office:value="18.8463158441325" calcext:value-type="float">
            <text:p>18.8</text:p>
          </table:table-cell>
          <table:table-cell table:formula="of:=STDEV([.P6:.P33])" office:value-type="float" office:value="16.1861216447682" calcext:value-type="float">
            <text:p>16.2</text:p>
          </table:table-cell>
          <table:table-cell table:formula="of:=STDEV([.Q6:.Q33])" office:value-type="float" office:value="14.5479602195861" calcext:value-type="float">
            <text:p>14.5</text:p>
          </table:table-cell>
          <table:table-cell table:formula="of:=STDEV([.R6:.R33])" office:value-type="float" office:value="12.1064237009238" calcext:value-type="float">
            <text:p>12.1</text:p>
          </table:table-cell>
          <table:table-cell table:formula="of:=STDEV([.S6:.S33])" office:value-type="float" office:value="10.3882011467197" calcext:value-type="float">
            <text:p>10.4</text:p>
          </table:table-cell>
          <table:table-cell table:formula="of:=STDEV([.T6:.T33])" office:value-type="float" office:value="9.01294571967252" calcext:value-type="float">
            <text:p>9.0</text:p>
          </table:table-cell>
          <table:table-cell table:formula="of:=STDEV([.U6:.U33])" office:value-type="float" office:value="8.14665184374425" calcext:value-type="float">
            <text:p>8.1</text:p>
          </table:table-cell>
          <table:table-cell table:formula="of:=STDEV([.V6:.V33])" office:value-type="float" office:value="7.10051704785884" calcext:value-type="float">
            <text:p>7.1</text:p>
          </table:table-cell>
          <table:table-cell table:formula="of:=STDEV([.W6:.W33])" office:value-type="float" office:value="5.83391305358478" calcext:value-type="float">
            <text:p>5.8</text:p>
          </table:table-cell>
          <table:table-cell table:formula="of:=STDEV([.X6:.X33])" office:value-type="float" office:value="4.49866495644386" calcext:value-type="float">
            <text:p>4.5</text:p>
          </table:table-cell>
          <table:table-cell table:formula="of:=STDEV([.Y6:.Y33])" office:value-type="float" office:value="4.40713733980121" calcext:value-type="float">
            <text:p>4.4</text:p>
          </table:table-cell>
          <table:table-cell table:formula="of:=STDEV([.Z6:.Z33])" office:value-type="float" office:value="3.59370427016741" calcext:value-type="float">
            <text:p>3.6</text:p>
          </table:table-cell>
          <table:table-cell table:formula="of:=STDEV([.AA6:.AA33])" office:value-type="float" office:value="3.10685367642032" calcext:value-type="float">
            <text:p>3.1</text:p>
          </table:table-cell>
          <table:table-cell table:formula="of:=STDEV([.AB6:.AB33])" office:value-type="float" office:value="2.77813396089033" calcext:value-type="float">
            <text:p>2.8</text:p>
          </table:table-cell>
          <table:table-cell table:formula="of:=STDEV([.AC6:.AC33])" office:value-type="float" office:value="2.32921869070031" calcext:value-type="float">
            <text:p>2.3</text:p>
          </table:table-cell>
          <table:table-cell table:formula="of:=STDEV([.AD6:.AD33])" office:value-type="float" office:value="2.00092457789135" calcext:value-type="float">
            <text:p>2.0</text:p>
          </table:table-cell>
          <table:table-cell table:formula="of:=STDEV([.AE6:.AE33])" office:value-type="float" office:value="0.939741362623704" calcext:value-type="float">
            <text:p>0.9</text:p>
          </table:table-cell>
          <table:table-cell table:formula="of:=STDEV([.AF6:.AF33])" office:value-type="float" office:value="0.307844633275647" calcext:value-type="float">
            <text:p>0.3</text:p>
          </table:table-cell>
          <table:table-cell table:formula="of:=STDEV([.AG6:.AG33])" office:value-type="float" office:value="0.103221522370432" calcext:value-type="float">
            <text:p>0.1</text:p>
          </table:table-cell>
        </table:table-row>
        <table:table-row table:style-name="ro1">
          <table:table-cell/>
          <table:table-cell table:style-name="Default"/>
          <table:table-cell table:style-name="ce15" office:value-type="string" calcext:value-type="string">
            <text:p>σ<text:span text:style-name="T1">acceptable</text:span></text:p>
          </table:table-cell>
          <table:table-cell table:formula="of:=SQRT([.D36]+0.0004*([.D36])^2)" office:value-type="float" office:value="467.372922259633" calcext:value-type="float">
            <text:p>467.4</text:p>
          </table:table-cell>
          <table:table-cell table:formula="of:=SQRT([.E36]+0.0004*([.E36])^2)" office:value-type="float" office:value="314.88572728115" calcext:value-type="float">
            <text:p>314.9</text:p>
          </table:table-cell>
          <table:table-cell table:formula="of:=SQRT([.F36]+0.0004*([.F36])^2)" office:value-type="float" office:value="217.005501571229" calcext:value-type="float">
            <text:p>217.0</text:p>
          </table:table-cell>
          <table:table-cell table:formula="of:=SQRT([.G36]+0.0004*([.G36])^2)" office:value-type="float" office:value="159.924991043235" calcext:value-type="float">
            <text:p>159.9</text:p>
          </table:table-cell>
          <table:table-cell table:formula="of:=SQRT([.H36]+0.0004*([.H36])^2)" office:value-type="float" office:value="116.786423961957" calcext:value-type="float">
            <text:p>116.8</text:p>
          </table:table-cell>
          <table:table-cell table:formula="of:=SQRT([.I36]+0.0004*([.I36])^2)" office:value-type="float" office:value="86.4124083958942" calcext:value-type="float">
            <text:p>86.4</text:p>
          </table:table-cell>
          <table:table-cell table:formula="of:=SQRT([.J36]+0.0004*([.J36])^2)" office:value-type="float" office:value="66.5707368317334" calcext:value-type="float">
            <text:p>66.6</text:p>
          </table:table-cell>
          <table:table-cell table:formula="of:=SQRT([.K36]+0.0004*([.K36])^2)" office:value-type="float" office:value="52.3104806052491" calcext:value-type="float">
            <text:p>52.3</text:p>
          </table:table-cell>
          <table:table-cell table:formula="of:=SQRT([.L36]+0.0004*([.L36])^2)" office:value-type="float" office:value="42.3717443153555" calcext:value-type="float">
            <text:p>42.4</text:p>
          </table:table-cell>
          <table:table-cell table:formula="of:=SQRT([.M36]+0.0004*([.M36])^2)" office:value-type="float" office:value="35.4892864481175" calcext:value-type="float">
            <text:p>35.5</text:p>
          </table:table-cell>
          <table:table-cell table:formula="of:=SQRT([.N36]+0.0004*([.N36])^2)" office:value-type="float" office:value="30.5580726103885" calcext:value-type="float">
            <text:p>30.6</text:p>
          </table:table-cell>
          <table:table-cell table:formula="of:=SQRT([.O36]+0.0004*([.O36])^2)" office:value-type="float" office:value="26.7310059010664" calcext:value-type="float">
            <text:p>26.7</text:p>
          </table:table-cell>
          <table:table-cell table:formula="of:=SQRT([.P36]+0.0004*([.P36])^2)" office:value-type="float" office:value="23.7307718200965" calcext:value-type="float">
            <text:p>23.7</text:p>
          </table:table-cell>
          <table:table-cell table:formula="of:=SQRT([.Q36]+0.0004*([.Q36])^2)" office:value-type="float" office:value="21.3057911648998" calcext:value-type="float">
            <text:p>21.3</text:p>
          </table:table-cell>
          <table:table-cell table:formula="of:=SQRT([.R36]+0.0004*([.R36])^2)" office:value-type="float" office:value="19.341262303686" calcext:value-type="float">
            <text:p>19.3</text:p>
          </table:table-cell>
          <table:table-cell table:formula="of:=SQRT([.S36]+0.0004*([.S36])^2)" office:value-type="float" office:value="17.7044590079782" calcext:value-type="float">
            <text:p>17.7</text:p>
          </table:table-cell>
          <table:table-cell table:formula="of:=SQRT([.T36]+0.0004*([.T36])^2)" office:value-type="float" office:value="16.1994205078276" calcext:value-type="float">
            <text:p>16.2</text:p>
          </table:table-cell>
          <table:table-cell table:formula="of:=SQRT([.U36]+0.0004*([.U36])^2)" office:value-type="float" office:value="14.6771729178803" calcext:value-type="float">
            <text:p>14.7</text:p>
          </table:table-cell>
          <table:table-cell table:formula="of:=SQRT([.V36]+0.0004*([.V36])^2)" office:value-type="float" office:value="13.2633988554567" calcext:value-type="float">
            <text:p>13.3</text:p>
          </table:table-cell>
          <table:table-cell table:formula="of:=SQRT([.W36]+0.0004*([.W36])^2)" office:value-type="float" office:value="11.9107522794669" calcext:value-type="float">
            <text:p>11.9</text:p>
          </table:table-cell>
          <table:table-cell table:formula="of:=SQRT([.X36]+0.0004*([.X36])^2)" office:value-type="float" office:value="10.7229186943786" calcext:value-type="float">
            <text:p>10.7</text:p>
          </table:table-cell>
          <table:table-cell table:formula="of:=SQRT([.Y36]+0.0004*([.Y36])^2)" office:value-type="float" office:value="9.64273113743137" calcext:value-type="float">
            <text:p>9.6</text:p>
          </table:table-cell>
          <table:table-cell table:formula="of:=SQRT([.Z36]+0.0004*([.Z36])^2)" office:value-type="float" office:value="8.64659910292737" calcext:value-type="float">
            <text:p>8.6</text:p>
          </table:table-cell>
          <table:table-cell table:formula="of:=SQRT([.AA36]+0.0004*([.AA36])^2)" office:value-type="float" office:value="7.80038477798329" calcext:value-type="float">
            <text:p>7.8</text:p>
          </table:table-cell>
          <table:table-cell table:formula="of:=SQRT([.AB36]+0.0004*([.AB36])^2)" office:value-type="float" office:value="7.09687510639051" calcext:value-type="float">
            <text:p>7.1</text:p>
          </table:table-cell>
          <table:table-cell table:formula="of:=SQRT([.AC36]+0.0004*([.AC36])^2)" office:value-type="float" office:value="6.48861342151335" calcext:value-type="float">
            <text:p>6.5</text:p>
          </table:table-cell>
          <table:table-cell table:formula="of:=SQRT([.AD36]+0.0004*([.AD36])^2)" office:value-type="float" office:value="5.86681674835183" calcext:value-type="float">
            <text:p>5.9</text:p>
          </table:table-cell>
          <table:table-cell table:formula="of:=SQRT([.AE36]+0.0004*([.AE36])^2)" office:value-type="float" office:value="2.43804754424959" calcext:value-type="float">
            <text:p>2.4</text:p>
          </table:table-cell>
          <table:table-cell table:formula="of:=SQRT([.AF36]+0.0004*([.AF36])^2)" office:value-type="float" office:value="1.07433852926755" calcext:value-type="float">
            <text:p>1.1</text:p>
          </table:table-cell>
          <table:table-cell table:formula="of:=SQRT([.AG36]+0.0004*([.AG36])^2)" office:value-type="float" office:value="0.394693043940228" calcext:value-type="float">
            <text:p>0.4</text:p>
          </table:table-cell>
        </table:table-row>
        <table:table-row table:style-name="ro1">
          <table:table-cell/>
          <table:table-cell table:style-name="Default"/>
          <table:table-cell table:style-name="ce9" office:value-type="string" calcext:value-type="string">
            <text:p>PASS</text:p>
          </table:table-cell>
          <table:table-cell table:style-name="ce17" table:formula="of:=IF([.D38]&gt;[.D37];&quot;✅&quot;;&quot;❌&quot;)" office:value-type="string" office:string-value="✅" calcext:value-type="string">
            <text:p>✅</text:p>
          </table:table-cell>
          <table:table-cell table:style-name="ce17" table:formula="of:=IF([.E38]&gt;[.E37];&quot;✅&quot;;&quot;❌&quot;)" office:value-type="string" office:string-value="✅" calcext:value-type="string">
            <text:p>✅</text:p>
          </table:table-cell>
          <table:table-cell table:style-name="ce17" table:formula="of:=IF([.F38]&gt;[.F37];&quot;✅&quot;;&quot;❌&quot;)" office:value-type="string" office:string-value="✅" calcext:value-type="string">
            <text:p>✅</text:p>
          </table:table-cell>
          <table:table-cell table:style-name="ce17" table:formula="of:=IF([.G38]&gt;[.G37];&quot;✅&quot;;&quot;❌&quot;)" office:value-type="string" office:string-value="✅" calcext:value-type="string">
            <text:p>✅</text:p>
          </table:table-cell>
          <table:table-cell table:style-name="ce17" table:formula="of:=IF([.H38]&gt;[.H37];&quot;✅&quot;;&quot;❌&quot;)" office:value-type="string" office:string-value="✅" calcext:value-type="string">
            <text:p>✅</text:p>
          </table:table-cell>
          <table:table-cell table:style-name="ce17" table:formula="of:=IF([.I38]&gt;[.I37];&quot;✅&quot;;&quot;❌&quot;)" office:value-type="string" office:string-value="✅" calcext:value-type="string">
            <text:p>✅</text:p>
          </table:table-cell>
          <table:table-cell table:style-name="ce17" table:formula="of:=IF([.J38]&gt;[.J37];&quot;✅&quot;;&quot;❌&quot;)" office:value-type="string" office:string-value="✅" calcext:value-type="string">
            <text:p>✅</text:p>
          </table:table-cell>
          <table:table-cell table:style-name="ce17" table:formula="of:=IF([.K38]&gt;[.K37];&quot;✅&quot;;&quot;❌&quot;)" office:value-type="string" office:string-value="✅" calcext:value-type="string">
            <text:p>✅</text:p>
          </table:table-cell>
          <table:table-cell table:style-name="ce17" table:formula="of:=IF([.L38]&gt;[.L37];&quot;✅&quot;;&quot;❌&quot;)" office:value-type="string" office:string-value="✅" calcext:value-type="string">
            <text:p>✅</text:p>
          </table:table-cell>
          <table:table-cell table:style-name="ce17" table:formula="of:=IF([.M38]&gt;[.M37];&quot;✅&quot;;&quot;❌&quot;)" office:value-type="string" office:string-value="✅" calcext:value-type="string">
            <text:p>✅</text:p>
          </table:table-cell>
          <table:table-cell table:style-name="ce17" table:formula="of:=IF([.N38]&gt;[.N37];&quot;✅&quot;;&quot;❌&quot;)" office:value-type="string" office:string-value="✅" calcext:value-type="string">
            <text:p>✅</text:p>
          </table:table-cell>
          <table:table-cell table:style-name="ce17" table:formula="of:=IF([.O38]&gt;[.O37];&quot;✅&quot;;&quot;❌&quot;)" office:value-type="string" office:string-value="✅" calcext:value-type="string">
            <text:p>✅</text:p>
          </table:table-cell>
          <table:table-cell table:style-name="ce17" table:formula="of:=IF([.P38]&gt;[.P37];&quot;✅&quot;;&quot;❌&quot;)" office:value-type="string" office:string-value="✅" calcext:value-type="string">
            <text:p>✅</text:p>
          </table:table-cell>
          <table:table-cell table:style-name="ce17" table:formula="of:=IF([.Q38]&gt;[.Q37];&quot;✅&quot;;&quot;❌&quot;)" office:value-type="string" office:string-value="✅" calcext:value-type="string">
            <text:p>✅</text:p>
          </table:table-cell>
          <table:table-cell table:style-name="ce17" table:formula="of:=IF([.R38]&gt;[.R37];&quot;✅&quot;;&quot;❌&quot;)" office:value-type="string" office:string-value="✅" calcext:value-type="string">
            <text:p>✅</text:p>
          </table:table-cell>
          <table:table-cell table:style-name="ce17" table:formula="of:=IF([.S38]&gt;[.S37];&quot;✅&quot;;&quot;❌&quot;)" office:value-type="string" office:string-value="✅" calcext:value-type="string">
            <text:p>✅</text:p>
          </table:table-cell>
          <table:table-cell table:style-name="ce17" table:formula="of:=IF([.T38]&gt;[.T37];&quot;✅&quot;;&quot;❌&quot;)" office:value-type="string" office:string-value="✅" calcext:value-type="string">
            <text:p>✅</text:p>
          </table:table-cell>
          <table:table-cell table:style-name="ce17" table:formula="of:=IF([.U38]&gt;[.U37];&quot;✅&quot;;&quot;❌&quot;)" office:value-type="string" office:string-value="✅" calcext:value-type="string">
            <text:p>✅</text:p>
          </table:table-cell>
          <table:table-cell table:style-name="ce17" table:formula="of:=IF([.V38]&gt;[.V37];&quot;✅&quot;;&quot;❌&quot;)" office:value-type="string" office:string-value="✅" calcext:value-type="string">
            <text:p>✅</text:p>
          </table:table-cell>
          <table:table-cell table:style-name="ce17" table:formula="of:=IF([.W38]&gt;[.W37];&quot;✅&quot;;&quot;❌&quot;)" office:value-type="string" office:string-value="✅" calcext:value-type="string">
            <text:p>✅</text:p>
          </table:table-cell>
          <table:table-cell table:style-name="ce17" table:formula="of:=IF([.X38]&gt;[.X37];&quot;✅&quot;;&quot;❌&quot;)" office:value-type="string" office:string-value="✅" calcext:value-type="string">
            <text:p>✅</text:p>
          </table:table-cell>
          <table:table-cell table:style-name="ce17" table:formula="of:=IF([.Y38]&gt;[.Y37];&quot;✅&quot;;&quot;❌&quot;)" office:value-type="string" office:string-value="✅" calcext:value-type="string">
            <text:p>✅</text:p>
          </table:table-cell>
          <table:table-cell table:style-name="ce17" table:formula="of:=IF([.Z38]&gt;[.Z37];&quot;✅&quot;;&quot;❌&quot;)" office:value-type="string" office:string-value="✅" calcext:value-type="string">
            <text:p>✅</text:p>
          </table:table-cell>
          <table:table-cell table:style-name="ce17" table:formula="of:=IF([.AA38]&gt;[.AA37];&quot;✅&quot;;&quot;❌&quot;)" office:value-type="string" office:string-value="✅" calcext:value-type="string">
            <text:p>✅</text:p>
          </table:table-cell>
          <table:table-cell table:style-name="ce17" table:formula="of:=IF([.AB38]&gt;[.AB37];&quot;✅&quot;;&quot;❌&quot;)" office:value-type="string" office:string-value="✅" calcext:value-type="string">
            <text:p>✅</text:p>
          </table:table-cell>
          <table:table-cell table:style-name="ce17" table:formula="of:=IF([.AC38]&gt;[.AC37];&quot;✅&quot;;&quot;❌&quot;)" office:value-type="string" office:string-value="✅" calcext:value-type="string">
            <text:p>✅</text:p>
          </table:table-cell>
          <table:table-cell table:style-name="ce17" table:formula="of:=IF([.AD38]&gt;[.AD37];&quot;✅&quot;;&quot;❌&quot;)" office:value-type="string" office:string-value="✅" calcext:value-type="string">
            <text:p>✅</text:p>
          </table:table-cell>
          <table:table-cell table:style-name="ce17" table:formula="of:=IF([.AE38]&gt;[.AE37];&quot;✅&quot;;&quot;❌&quot;)" office:value-type="string" office:string-value="✅" calcext:value-type="string">
            <text:p>✅</text:p>
          </table:table-cell>
          <table:table-cell table:style-name="ce17" table:formula="of:=IF([.AF38]&gt;[.AF37];&quot;✅&quot;;&quot;❌&quot;)" office:value-type="string" office:string-value="✅" calcext:value-type="string">
            <text:p>✅</text:p>
          </table:table-cell>
          <table:table-cell table:style-name="ce17" table:formula="of:=IF([.AG38]&gt;[.AG37];&quot;✅&quot;;&quot;❌&quot;)" office:value-type="string" office:string-value="✅" calcext:value-type="string">
            <text:p>✅</text:p>
          </table:table-cell>
        </table:table-row>
        <table:table-row table:style-name="ro1">
          <table:table-cell/>
          <table:table-cell table:style-name="ce9"/>
          <table:table-cell/>
          <table:table-cell table:style-name="ce16" table:number-columns-repeated="30"/>
        </table:table-row>
        <table:table-row table:style-name="ro1">
          <table:table-cell table:number-columns-repeated="33"/>
        </table:table-row>
        <table:table-row table:style-name="ro1">
          <table:table-cell/>
          <table:table-cell office:value-type="time" office:time-value="PT1108451H54M45.99999994S" calcext:value-type="time">
            <text:p>11:54:46</text:p>
          </table:table-cell>
          <table:table-cell office:value-type="float" office:value="10.07333" calcext:value-type="float">
            <text:p>10.1</text:p>
          </table:table-cell>
          <table:table-cell office:value-type="float" office:value="22265.923828" calcext:value-type="float">
            <text:p>22265.9</text:p>
          </table:table-cell>
          <table:table-cell office:value-type="float" office:value="14626.046875" calcext:value-type="float">
            <text:p>14626.0</text:p>
          </table:table-cell>
          <table:table-cell office:value-type="float" office:value="9705.628906" calcext:value-type="float">
            <text:p>9705.6</text:p>
          </table:table-cell>
          <table:table-cell office:value-type="float" office:value="6848.777832" calcext:value-type="float">
            <text:p>6848.8</text:p>
          </table:table-cell>
          <table:table-cell office:value-type="float" office:value="4752.450195" calcext:value-type="float">
            <text:p>4752.5</text:p>
          </table:table-cell>
          <table:table-cell office:value-type="float" office:value="3267.340576" calcext:value-type="float">
            <text:p>3267.3</text:p>
          </table:table-cell>
          <table:table-cell office:value-type="float" office:value="2320.682373" calcext:value-type="float">
            <text:p>2320.7</text:p>
          </table:table-cell>
          <table:table-cell office:value-type="float" office:value="1668.862305" calcext:value-type="float">
            <text:p>1668.9</text:p>
          </table:table-cell>
          <table:table-cell office:value-type="float" office:value="1230.079834" calcext:value-type="float">
            <text:p>1230.1</text:p>
          </table:table-cell>
          <table:table-cell office:value-type="float" office:value="932.164429" calcext:value-type="float">
            <text:p>932.2</text:p>
          </table:table-cell>
          <table:table-cell office:value-type="float" office:value="733.620361" calcext:value-type="float">
            <text:p>733.6</text:p>
          </table:table-cell>
          <table:table-cell office:value-type="float" office:value="591.661377" calcext:value-type="float">
            <text:p>591.7</text:p>
          </table:table-cell>
          <table:table-cell office:value-type="float" office:value="478.789032" calcext:value-type="float">
            <text:p>478.8</text:p>
          </table:table-cell>
          <table:table-cell office:value-type="float" office:value="401.158295" calcext:value-type="float">
            <text:p>401.2</text:p>
          </table:table-cell>
          <table:table-cell office:value-type="float" office:value="336.234406" calcext:value-type="float">
            <text:p>336.2</text:p>
          </table:table-cell>
          <table:table-cell office:value-type="float" office:value="285.407104" calcext:value-type="float">
            <text:p>285.4</text:p>
          </table:table-cell>
          <table:table-cell office:value-type="float" office:value="244.705582" calcext:value-type="float">
            <text:p>244.7</text:p>
          </table:table-cell>
          <table:table-cell office:value-type="float" office:value="203.90477" calcext:value-type="float">
            <text:p>203.9</text:p>
          </table:table-cell>
          <table:table-cell office:value-type="float" office:value="169.358093" calcext:value-type="float">
            <text:p>169.4</text:p>
          </table:table-cell>
          <table:table-cell office:value-type="float" office:value="139.179398" calcext:value-type="float">
            <text:p>139.2</text:p>
          </table:table-cell>
          <table:table-cell office:value-type="float" office:value="115.254837" calcext:value-type="float">
            <text:p>115.3</text:p>
          </table:table-cell>
          <table:table-cell office:value-type="float" office:value="92.720085" calcext:value-type="float">
            <text:p>92.7</text:p>
          </table:table-cell>
          <table:table-cell office:value-type="float" office:value="76.042381" calcext:value-type="float">
            <text:p>76.0</text:p>
          </table:table-cell>
          <table:table-cell office:value-type="float" office:value="61.151577" calcext:value-type="float">
            <text:p>61.2</text:p>
          </table:table-cell>
          <table:table-cell office:value-type="float" office:value="48.444756" calcext:value-type="float">
            <text:p>48.4</text:p>
          </table:table-cell>
          <table:table-cell office:value-type="float" office:value="40.900082" calcext:value-type="float">
            <text:p>40.9</text:p>
          </table:table-cell>
          <table:table-cell office:value-type="float" office:value="32.6605" calcext:value-type="float">
            <text:p>32.7</text:p>
          </table:table-cell>
          <table:table-cell office:value-type="float" office:value="5.261418" calcext:value-type="float">
            <text:p>5.3</text:p>
          </table:table-cell>
          <table:table-cell office:value-type="float" office:value="1.489081" calcext:value-type="float">
            <text:p>1.5</text:p>
          </table:table-cell>
          <table:table-cell office:value-type="float" office:value="0.198544" calcext:value-type="float">
            <text:p>0.2</text:p>
          </table:table-cell>
        </table:table-row>
        <table:table-row table:style-name="ro1">
          <table:table-cell/>
          <table:table-cell office:value-type="time" office:time-value="PT1108451H56M47.999999542S" calcext:value-type="time">
            <text:p>11:56:48</text:p>
          </table:table-cell>
          <table:table-cell office:value-type="float" office:value="10.173282" calcext:value-type="float">
            <text:p>10.2</text:p>
          </table:table-cell>
          <table:table-cell office:value-type="float" office:value="22011.580078" calcext:value-type="float">
            <text:p>22011.6</text:p>
          </table:table-cell>
          <table:table-cell office:value-type="float" office:value="14488.933594" calcext:value-type="float">
            <text:p>14488.9</text:p>
          </table:table-cell>
          <table:table-cell office:value-type="float" office:value="9633.371094" calcext:value-type="float">
            <text:p>9633.4</text:p>
          </table:table-cell>
          <table:table-cell office:value-type="float" office:value="6812.157715" calcext:value-type="float">
            <text:p>6812.2</text:p>
          </table:table-cell>
          <table:table-cell office:value-type="float" office:value="4709.39502" calcext:value-type="float">
            <text:p>4709.4</text:p>
          </table:table-cell>
          <table:table-cell office:value-type="float" office:value="3229.046631" calcext:value-type="float">
            <text:p>3229.0</text:p>
          </table:table-cell>
          <table:table-cell office:value-type="float" office:value="2295.817627" calcext:value-type="float">
            <text:p>2295.8</text:p>
          </table:table-cell>
          <table:table-cell office:value-type="float" office:value="1642.734375" calcext:value-type="float">
            <text:p>1642.7</text:p>
          </table:table-cell>
          <table:table-cell office:value-type="float" office:value="1208.754517" calcext:value-type="float">
            <text:p>1208.8</text:p>
          </table:table-cell>
          <table:table-cell office:value-type="float" office:value="927.13446" calcext:value-type="float">
            <text:p>927.1</text:p>
          </table:table-cell>
          <table:table-cell office:value-type="float" office:value="737.126953" calcext:value-type="float">
            <text:p>737.1</text:p>
          </table:table-cell>
          <table:table-cell office:value-type="float" office:value="594.400146" calcext:value-type="float">
            <text:p>594.4</text:p>
          </table:table-cell>
          <table:table-cell office:value-type="float" office:value="495.808533" calcext:value-type="float">
            <text:p>495.8</text:p>
          </table:table-cell>
          <table:table-cell office:value-type="float" office:value="408.619385" calcext:value-type="float">
            <text:p>408.6</text:p>
          </table:table-cell>
          <table:table-cell office:value-type="float" office:value="342.465698" calcext:value-type="float">
            <text:p>342.5</text:p>
          </table:table-cell>
          <table:table-cell office:value-type="float" office:value="293.513947" calcext:value-type="float">
            <text:p>293.5</text:p>
          </table:table-cell>
          <table:table-cell office:value-type="float" office:value="250.656586" calcext:value-type="float">
            <text:p>250.7</text:p>
          </table:table-cell>
          <table:table-cell office:value-type="float" office:value="205.2435" calcext:value-type="float">
            <text:p>205.2</text:p>
          </table:table-cell>
          <table:table-cell office:value-type="float" office:value="169.856689" calcext:value-type="float">
            <text:p>169.9</text:p>
          </table:table-cell>
          <table:table-cell office:value-type="float" office:value="140.0728" calcext:value-type="float">
            <text:p>140.1</text:p>
          </table:table-cell>
          <table:table-cell office:value-type="float" office:value="115.105431" calcext:value-type="float">
            <text:p>115.1</text:p>
          </table:table-cell>
          <table:table-cell office:value-type="float" office:value="96.035873" calcext:value-type="float">
            <text:p>96.0</text:p>
          </table:table-cell>
          <table:table-cell office:value-type="float" office:value="78.342468" calcext:value-type="float">
            <text:p>78.3</text:p>
          </table:table-cell>
          <table:table-cell office:value-type="float" office:value="64.974121" calcext:value-type="float">
            <text:p>65.0</text:p>
          </table:table-cell>
          <table:table-cell office:value-type="float" office:value="53.080215" calcext:value-type="float">
            <text:p>53.1</text:p>
          </table:table-cell>
          <table:table-cell office:value-type="float" office:value="45.413074" calcext:value-type="float">
            <text:p>45.4</text:p>
          </table:table-cell>
          <table:table-cell office:value-type="float" office:value="37.549339" calcext:value-type="float">
            <text:p>37.5</text:p>
          </table:table-cell>
          <table:table-cell office:value-type="float" office:value="7.175659" calcext:value-type="float">
            <text:p>7.2</text:p>
          </table:table-cell>
          <table:table-cell office:value-type="float" office:value="1.769341" calcext:value-type="float">
            <text:p>1.8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/>
          <table:table-cell office:value-type="time" office:time-value="PT1108451H58M49.999999981S" calcext:value-type="time">
            <text:p>11:58:50</text:p>
          </table:table-cell>
          <table:table-cell office:value-type="float" office:value="10.145092" calcext:value-type="float">
            <text:p>10.1</text:p>
          </table:table-cell>
          <table:table-cell office:value-type="float" office:value="22505.759766" calcext:value-type="float">
            <text:p>22505.8</text:p>
          </table:table-cell>
          <table:table-cell office:value-type="float" office:value="14721.700195" calcext:value-type="float">
            <text:p>14721.7</text:p>
          </table:table-cell>
          <table:table-cell office:value-type="float" office:value="9736.530273" calcext:value-type="float">
            <text:p>9736.5</text:p>
          </table:table-cell>
          <table:table-cell office:value-type="float" office:value="6892.29834" calcext:value-type="float">
            <text:p>6892.3</text:p>
          </table:table-cell>
          <table:table-cell office:value-type="float" office:value="4761.316895" calcext:value-type="float">
            <text:p>4761.3</text:p>
          </table:table-cell>
          <table:table-cell office:value-type="float" office:value="3276.362549" calcext:value-type="float">
            <text:p>3276.4</text:p>
          </table:table-cell>
          <table:table-cell office:value-type="float" office:value="2336.5979" calcext:value-type="float">
            <text:p>2336.6</text:p>
          </table:table-cell>
          <table:table-cell office:value-type="float" office:value="1669.181519" calcext:value-type="float">
            <text:p>1669.2</text:p>
          </table:table-cell>
          <table:table-cell office:value-type="float" office:value="1225.912964" calcext:value-type="float">
            <text:p>1225.9</text:p>
          </table:table-cell>
          <table:table-cell office:value-type="float" office:value="924.880737" calcext:value-type="float">
            <text:p>924.9</text:p>
          </table:table-cell>
          <table:table-cell office:value-type="float" office:value="723.798279" calcext:value-type="float">
            <text:p>723.8</text:p>
          </table:table-cell>
          <table:table-cell office:value-type="float" office:value="577.422058" calcext:value-type="float">
            <text:p>577.4</text:p>
          </table:table-cell>
          <table:table-cell office:value-type="float" office:value="475.106598" calcext:value-type="float">
            <text:p>475.1</text:p>
          </table:table-cell>
          <table:table-cell office:value-type="float" office:value="399.207825" calcext:value-type="float">
            <text:p>399.2</text:p>
          </table:table-cell>
          <table:table-cell office:value-type="float" office:value="334.250305" calcext:value-type="float">
            <text:p>334.3</text:p>
          </table:table-cell>
          <table:table-cell office:value-type="float" office:value="282.205414" calcext:value-type="float">
            <text:p>282.2</text:p>
          </table:table-cell>
          <table:table-cell office:value-type="float" office:value="239.820404" calcext:value-type="float">
            <text:p>239.8</text:p>
          </table:table-cell>
          <table:table-cell office:value-type="float" office:value="201.772446" calcext:value-type="float">
            <text:p>201.8</text:p>
          </table:table-cell>
          <table:table-cell office:value-type="float" office:value="168.061554" calcext:value-type="float">
            <text:p>168.1</text:p>
          </table:table-cell>
          <table:table-cell office:value-type="float" office:value="136.026367" calcext:value-type="float">
            <text:p>136.0</text:p>
          </table:table-cell>
          <table:table-cell office:value-type="float" office:value="111.482475" calcext:value-type="float">
            <text:p>111.5</text:p>
          </table:table-cell>
          <table:table-cell office:value-type="float" office:value="88.318565" calcext:value-type="float">
            <text:p>88.3</text:p>
          </table:table-cell>
          <table:table-cell office:value-type="float" office:value="72.645966" calcext:value-type="float">
            <text:p>72.6</text:p>
          </table:table-cell>
          <table:table-cell office:value-type="float" office:value="57.663349" calcext:value-type="float">
            <text:p>57.7</text:p>
          </table:table-cell>
          <table:table-cell office:value-type="float" office:value="49.087776" calcext:value-type="float">
            <text:p>49.1</text:p>
          </table:table-cell>
          <table:table-cell office:value-type="float" office:value="41.892178" calcext:value-type="float">
            <text:p>41.9</text:p>
          </table:table-cell>
          <table:table-cell office:value-type="float" office:value="34.99229" calcext:value-type="float">
            <text:p>35.0</text:p>
          </table:table-cell>
          <table:table-cell office:value-type="float" office:value="4.632782" calcext:value-type="float">
            <text:p>4.6</text:p>
          </table:table-cell>
          <table:table-cell office:value-type="float" office:value="0.887128" calcext:value-type="float">
            <text:p>0.9</text:p>
          </table:table-cell>
          <table:table-cell office:value-type="float" office:value="0.09857" calcext:value-type="float">
            <text:p>0.1</text:p>
          </table:table-cell>
        </table:table-row>
        <table:table-row table:style-name="ro1">
          <table:table-cell/>
          <table:table-cell office:value-type="time" office:time-value="PT1108452H00M52.000000421S" calcext:value-type="time">
            <text:p>12:00:52</text:p>
          </table:table-cell>
          <table:table-cell office:value-type="float" office:value="10.122394" calcext:value-type="float">
            <text:p>10.1</text:p>
          </table:table-cell>
          <table:table-cell office:value-type="float" office:value="22401.914062" calcext:value-type="float">
            <text:p>22401.9</text:p>
          </table:table-cell>
          <table:table-cell office:value-type="float" office:value="14680.618164" calcext:value-type="float">
            <text:p>14680.6</text:p>
          </table:table-cell>
          <table:table-cell office:value-type="float" office:value="9711.438477" calcext:value-type="float">
            <text:p>9711.4</text:p>
          </table:table-cell>
          <table:table-cell office:value-type="float" office:value="6839.884277" calcext:value-type="float">
            <text:p>6839.9</text:p>
          </table:table-cell>
          <table:table-cell office:value-type="float" office:value="4737.812012" calcext:value-type="float">
            <text:p>4737.8</text:p>
          </table:table-cell>
          <table:table-cell office:value-type="float" office:value="3253.479492" calcext:value-type="float">
            <text:p>3253.5</text:p>
          </table:table-cell>
          <table:table-cell office:value-type="float" office:value="2307.853271" calcext:value-type="float">
            <text:p>2307.9</text:p>
          </table:table-cell>
          <table:table-cell office:value-type="float" office:value="1654.845703" calcext:value-type="float">
            <text:p>1654.8</text:p>
          </table:table-cell>
          <table:table-cell office:value-type="float" office:value="1220.46228" calcext:value-type="float">
            <text:p>1220.5</text:p>
          </table:table-cell>
          <table:table-cell office:value-type="float" office:value="925.077637" calcext:value-type="float">
            <text:p>925.1</text:p>
          </table:table-cell>
          <table:table-cell office:value-type="float" office:value="731.151184" calcext:value-type="float">
            <text:p>731.2</text:p>
          </table:table-cell>
          <table:table-cell office:value-type="float" office:value="590.472961" calcext:value-type="float">
            <text:p>590.5</text:p>
          </table:table-cell>
          <table:table-cell office:value-type="float" office:value="483.383698" calcext:value-type="float">
            <text:p>483.4</text:p>
          </table:table-cell>
          <table:table-cell office:value-type="float" office:value="399.115082" calcext:value-type="float">
            <text:p>399.1</text:p>
          </table:table-cell>
          <table:table-cell office:value-type="float" office:value="336.580475" calcext:value-type="float">
            <text:p>336.6</text:p>
          </table:table-cell>
          <table:table-cell office:value-type="float" office:value="285.999542" calcext:value-type="float">
            <text:p>286.0</text:p>
          </table:table-cell>
          <table:table-cell office:value-type="float" office:value="242.926727" calcext:value-type="float">
            <text:p>242.9</text:p>
          </table:table-cell>
          <table:table-cell office:value-type="float" office:value="203.114014" calcext:value-type="float">
            <text:p>203.1</text:p>
          </table:table-cell>
          <table:table-cell office:value-type="float" office:value="170.513031" calcext:value-type="float">
            <text:p>170.5</text:p>
          </table:table-cell>
          <table:table-cell office:value-type="float" office:value="140.480606" calcext:value-type="float">
            <text:p>140.5</text:p>
          </table:table-cell>
          <table:table-cell office:value-type="float" office:value="114.301025" calcext:value-type="float">
            <text:p>114.3</text:p>
          </table:table-cell>
          <table:table-cell office:value-type="float" office:value="92.567039" calcext:value-type="float">
            <text:p>92.6</text:p>
          </table:table-cell>
          <table:table-cell office:value-type="float" office:value="74.68589" calcext:value-type="float">
            <text:p>74.7</text:p>
          </table:table-cell>
          <table:table-cell office:value-type="float" office:value="61.052753" calcext:value-type="float">
            <text:p>61.1</text:p>
          </table:table-cell>
          <table:table-cell office:value-type="float" office:value="49.09906" calcext:value-type="float">
            <text:p>49.1</text:p>
          </table:table-cell>
          <table:table-cell office:value-type="float" office:value="41.689743" calcext:value-type="float">
            <text:p>41.7</text:p>
          </table:table-cell>
          <table:table-cell office:value-type="float" office:value="33.09494" calcext:value-type="float">
            <text:p>33.1</text:p>
          </table:table-cell>
          <table:table-cell office:value-type="float" office:value="5.631079" calcext:value-type="float">
            <text:p>5.6</text:p>
          </table:table-cell>
          <table:table-cell office:value-type="float" office:value="0.889118" calcext:value-type="float">
            <text:p>0.9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/>
          <table:table-cell office:value-type="time" office:time-value="PT1108452H02M54.000000022S" calcext:value-type="time">
            <text:p>12:02:54</text:p>
          </table:table-cell>
          <table:table-cell office:value-type="float" office:value="10.102073" calcext:value-type="float">
            <text:p>10.1</text:p>
          </table:table-cell>
          <table:table-cell office:value-type="float" office:value="22350.166016" calcext:value-type="float">
            <text:p>22350.2</text:p>
          </table:table-cell>
          <table:table-cell office:value-type="float" office:value="14618.287109" calcext:value-type="float">
            <text:p>14618.3</text:p>
          </table:table-cell>
          <table:table-cell office:value-type="float" office:value="9666.234375" calcext:value-type="float">
            <text:p>9666.2</text:p>
          </table:table-cell>
          <table:table-cell office:value-type="float" office:value="6820.481445" calcext:value-type="float">
            <text:p>6820.5</text:p>
          </table:table-cell>
          <table:table-cell office:value-type="float" office:value="4718.239746" calcext:value-type="float">
            <text:p>4718.2</text:p>
          </table:table-cell>
          <table:table-cell office:value-type="float" office:value="3241.512939" calcext:value-type="float">
            <text:p>3241.5</text:p>
          </table:table-cell>
          <table:table-cell office:value-type="float" office:value="2314.376465" calcext:value-type="float">
            <text:p>2314.4</text:p>
          </table:table-cell>
          <table:table-cell office:value-type="float" office:value="1659.362427" calcext:value-type="float">
            <text:p>1659.4</text:p>
          </table:table-cell>
          <table:table-cell office:value-type="float" office:value="1211.43457" calcext:value-type="float">
            <text:p>1211.4</text:p>
          </table:table-cell>
          <table:table-cell office:value-type="float" office:value="920.50415" calcext:value-type="float">
            <text:p>920.5</text:p>
          </table:table-cell>
          <table:table-cell office:value-type="float" office:value="730.147217" calcext:value-type="float">
            <text:p>730.1</text:p>
          </table:table-cell>
          <table:table-cell office:value-type="float" office:value="582.65271" calcext:value-type="float">
            <text:p>582.7</text:p>
          </table:table-cell>
          <table:table-cell office:value-type="float" office:value="474.853058" calcext:value-type="float">
            <text:p>474.9</text:p>
          </table:table-cell>
          <table:table-cell office:value-type="float" office:value="390.315948" calcext:value-type="float">
            <text:p>390.3</text:p>
          </table:table-cell>
          <table:table-cell office:value-type="float" office:value="330.427246" calcext:value-type="float">
            <text:p>330.4</text:p>
          </table:table-cell>
          <table:table-cell office:value-type="float" office:value="279.150635" calcext:value-type="float">
            <text:p>279.2</text:p>
          </table:table-cell>
          <table:table-cell office:value-type="float" office:value="239.059845" calcext:value-type="float">
            <text:p>239.1</text:p>
          </table:table-cell>
          <table:table-cell office:value-type="float" office:value="200.354919" calcext:value-type="float">
            <text:p>200.4</text:p>
          </table:table-cell>
          <table:table-cell office:value-type="float" office:value="166.401489" calcext:value-type="float">
            <text:p>166.4</text:p>
          </table:table-cell>
          <table:table-cell office:value-type="float" office:value="137.892487" calcext:value-type="float">
            <text:p>137.9</text:p>
          </table:table-cell>
          <table:table-cell office:value-type="float" office:value="110.86834" calcext:value-type="float">
            <text:p>110.9</text:p>
          </table:table-cell>
          <table:table-cell office:value-type="float" office:value="89.189621" calcext:value-type="float">
            <text:p>89.2</text:p>
          </table:table-cell>
          <table:table-cell office:value-type="float" office:value="72.064423" calcext:value-type="float">
            <text:p>72.1</text:p>
          </table:table-cell>
          <table:table-cell office:value-type="float" office:value="58.106888" calcext:value-type="float">
            <text:p>58.1</text:p>
          </table:table-cell>
          <table:table-cell office:value-type="float" office:value="48.504898" calcext:value-type="float">
            <text:p>48.5</text:p>
          </table:table-cell>
          <table:table-cell office:value-type="float" office:value="39.496845" calcext:value-type="float">
            <text:p>39.5</text:p>
          </table:table-cell>
          <table:table-cell office:value-type="float" office:value="32.864544" calcext:value-type="float">
            <text:p>32.9</text:p>
          </table:table-cell>
          <table:table-cell office:value-type="float" office:value="4.553521" calcext:value-type="float">
            <text:p>4.6</text:p>
          </table:table-cell>
          <table:table-cell office:value-type="float" office:value="0.989896" calcext:value-type="float">
            <text:p>1.0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/>
          <table:table-cell office:value-type="time" office:time-value="PT1108452H04M56.000000462S" calcext:value-type="time">
            <text:p>12:04:56</text:p>
          </table:table-cell>
          <table:table-cell office:value-type="float" office:value="10.176349" calcext:value-type="float">
            <text:p>10.2</text:p>
          </table:table-cell>
          <table:table-cell office:value-type="float" office:value="22260.341797" calcext:value-type="float">
            <text:p>22260.3</text:p>
          </table:table-cell>
          <table:table-cell office:value-type="float" office:value="14569.272461" calcext:value-type="float">
            <text:p>14569.3</text:p>
          </table:table-cell>
          <table:table-cell office:value-type="float" office:value="9705.347656" calcext:value-type="float">
            <text:p>9705.3</text:p>
          </table:table-cell>
          <table:table-cell office:value-type="float" office:value="6839.879395" calcext:value-type="float">
            <text:p>6839.9</text:p>
          </table:table-cell>
          <table:table-cell office:value-type="float" office:value="4718.883301" calcext:value-type="float">
            <text:p>4718.9</text:p>
          </table:table-cell>
          <table:table-cell office:value-type="float" office:value="3235.050293" calcext:value-type="float">
            <text:p>3235.1</text:p>
          </table:table-cell>
          <table:table-cell office:value-type="float" office:value="2293.1604" calcext:value-type="float">
            <text:p>2293.2</text:p>
          </table:table-cell>
          <table:table-cell office:value-type="float" office:value="1643.615112" calcext:value-type="float">
            <text:p>1643.6</text:p>
          </table:table-cell>
          <table:table-cell office:value-type="float" office:value="1207.604004" calcext:value-type="float">
            <text:p>1207.6</text:p>
          </table:table-cell>
          <table:table-cell office:value-type="float" office:value="919.190186" calcext:value-type="float">
            <text:p>919.2</text:p>
          </table:table-cell>
          <table:table-cell office:value-type="float" office:value="723.049133" calcext:value-type="float">
            <text:p>723.0</text:p>
          </table:table-cell>
          <table:table-cell office:value-type="float" office:value="576.532898" calcext:value-type="float">
            <text:p>576.5</text:p>
          </table:table-cell>
          <table:table-cell office:value-type="float" office:value="469.618347" calcext:value-type="float">
            <text:p>469.6</text:p>
          </table:table-cell>
          <table:table-cell office:value-type="float" office:value="383.929443" calcext:value-type="float">
            <text:p>383.9</text:p>
          </table:table-cell>
          <table:table-cell office:value-type="float" office:value="316.911316" calcext:value-type="float">
            <text:p>316.9</text:p>
          </table:table-cell>
          <table:table-cell office:value-type="float" office:value="271.217133" calcext:value-type="float">
            <text:p>271.2</text:p>
          </table:table-cell>
          <table:table-cell office:value-type="float" office:value="229.355347" calcext:value-type="float">
            <text:p>229.4</text:p>
          </table:table-cell>
          <table:table-cell office:value-type="float" office:value="191.031189" calcext:value-type="float">
            <text:p>191.0</text:p>
          </table:table-cell>
          <table:table-cell office:value-type="float" office:value="158.799591" calcext:value-type="float">
            <text:p>158.8</text:p>
          </table:table-cell>
          <table:table-cell office:value-type="float" office:value="128.238525" calcext:value-type="float">
            <text:p>128.2</text:p>
          </table:table-cell>
          <table:table-cell office:value-type="float" office:value="105.145767" calcext:value-type="float">
            <text:p>105.1</text:p>
          </table:table-cell>
          <table:table-cell office:value-type="float" office:value="83.133942" calcext:value-type="float">
            <text:p>83.1</text:p>
          </table:table-cell>
          <table:table-cell office:value-type="float" office:value="67.411209" calcext:value-type="float">
            <text:p>67.4</text:p>
          </table:table-cell>
          <table:table-cell office:value-type="float" office:value="55.815697" calcext:value-type="float">
            <text:p>55.8</text:p>
          </table:table-cell>
          <table:table-cell office:value-type="float" office:value="45.202854" calcext:value-type="float">
            <text:p>45.2</text:p>
          </table:table-cell>
          <table:table-cell office:value-type="float" office:value="38.225891" calcext:value-type="float">
            <text:p>38.2</text:p>
          </table:table-cell>
          <table:table-cell office:value-type="float" office:value="30.659327" calcext:value-type="float">
            <text:p>30.7</text:p>
          </table:table-cell>
          <table:table-cell office:value-type="float" office:value="4.02895" calcext:value-type="float">
            <text:p>4.0</text:p>
          </table:table-cell>
          <table:table-cell office:value-type="float" office:value="0.687869" calcext:value-type="float">
            <text:p>0.7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/>
          <table:table-cell office:value-type="time" office:time-value="PT1108452H06M56.99999962S" calcext:value-type="time">
            <text:p>12:06:57</text:p>
          </table:table-cell>
          <table:table-cell office:value-type="float" office:value="10.072859" calcext:value-type="float">
            <text:p>10.1</text:p>
          </table:table-cell>
          <table:table-cell office:value-type="float" office:value="22001.300781" calcext:value-type="float">
            <text:p>22001.3</text:p>
          </table:table-cell>
          <table:table-cell office:value-type="float" office:value="14456.967773" calcext:value-type="float">
            <text:p>14457.0</text:p>
          </table:table-cell>
          <table:table-cell office:value-type="float" office:value="9617.130859" calcext:value-type="float">
            <text:p>9617.1</text:p>
          </table:table-cell>
          <table:table-cell office:value-type="float" office:value="6777.619141" calcext:value-type="float">
            <text:p>6777.6</text:p>
          </table:table-cell>
          <table:table-cell office:value-type="float" office:value="4669.280273" calcext:value-type="float">
            <text:p>4669.3</text:p>
          </table:table-cell>
          <table:table-cell office:value-type="float" office:value="3207.629639" calcext:value-type="float">
            <text:p>3207.6</text:p>
          </table:table-cell>
          <table:table-cell office:value-type="float" office:value="2286.342041" calcext:value-type="float">
            <text:p>2286.3</text:p>
          </table:table-cell>
          <table:table-cell office:value-type="float" office:value="1634.491333" calcext:value-type="float">
            <text:p>1634.5</text:p>
          </table:table-cell>
          <table:table-cell office:value-type="float" office:value="1197.276733" calcext:value-type="float">
            <text:p>1197.3</text:p>
          </table:table-cell>
          <table:table-cell office:value-type="float" office:value="911.955627" calcext:value-type="float">
            <text:p>912.0</text:p>
          </table:table-cell>
          <table:table-cell office:value-type="float" office:value="718.465332" calcext:value-type="float">
            <text:p>718.5</text:p>
          </table:table-cell>
          <table:table-cell office:value-type="float" office:value="572.826477" calcext:value-type="float">
            <text:p>572.8</text:p>
          </table:table-cell>
          <table:table-cell office:value-type="float" office:value="466.00473" calcext:value-type="float">
            <text:p>466.0</text:p>
          </table:table-cell>
          <table:table-cell office:value-type="float" office:value="384.101471" calcext:value-type="float">
            <text:p>384.1</text:p>
          </table:table-cell>
          <table:table-cell office:value-type="float" office:value="324.932587" calcext:value-type="float">
            <text:p>324.9</text:p>
          </table:table-cell>
          <table:table-cell office:value-type="float" office:value="275.889893" calcext:value-type="float">
            <text:p>275.9</text:p>
          </table:table-cell>
          <table:table-cell office:value-type="float" office:value="230.321899" calcext:value-type="float">
            <text:p>230.3</text:p>
          </table:table-cell>
          <table:table-cell office:value-type="float" office:value="190.015564" calcext:value-type="float">
            <text:p>190.0</text:p>
          </table:table-cell>
          <table:table-cell office:value-type="float" office:value="155.070175" calcext:value-type="float">
            <text:p>155.1</text:p>
          </table:table-cell>
          <table:table-cell office:value-type="float" office:value="128.563309" calcext:value-type="float">
            <text:p>128.6</text:p>
          </table:table-cell>
          <table:table-cell office:value-type="float" office:value="104.7369" calcext:value-type="float">
            <text:p>104.7</text:p>
          </table:table-cell>
          <table:table-cell office:value-type="float" office:value="83.193863" calcext:value-type="float">
            <text:p>83.2</text:p>
          </table:table-cell>
          <table:table-cell office:value-type="float" office:value="65.522614" calcext:value-type="float">
            <text:p>65.5</text:p>
          </table:table-cell>
          <table:table-cell office:value-type="float" office:value="53.807961" calcext:value-type="float">
            <text:p>53.8</text:p>
          </table:table-cell>
          <table:table-cell office:value-type="float" office:value="46.064381" calcext:value-type="float">
            <text:p>46.1</text:p>
          </table:table-cell>
          <table:table-cell office:value-type="float" office:value="39.809948" calcext:value-type="float">
            <text:p>39.8</text:p>
          </table:table-cell>
          <table:table-cell office:value-type="float" office:value="32.463474" calcext:value-type="float">
            <text:p>32.5</text:p>
          </table:table-cell>
          <table:table-cell office:value-type="float" office:value="5.559494" calcext:value-type="float">
            <text:p>5.6</text:p>
          </table:table-cell>
          <table:table-cell office:value-type="float" office:value="1.290597" calcext:value-type="float">
            <text:p>1.3</text:p>
          </table:table-cell>
          <table:table-cell office:value-type="float" office:value="0.099277" calcext:value-type="float">
            <text:p>0.1</text:p>
          </table:table-cell>
        </table:table-row>
        <table:table-row table:style-name="ro1">
          <table:table-cell/>
          <table:table-cell office:value-type="time" office:time-value="PT1108452H08M59.999999665S" calcext:value-type="time">
            <text:p>12:09:00</text:p>
          </table:table-cell>
          <table:table-cell office:value-type="float" office:value="10.194119" calcext:value-type="float">
            <text:p>10.2</text:p>
          </table:table-cell>
          <table:table-cell office:value-type="float" office:value="21853.382812" calcext:value-type="float">
            <text:p>21853.4</text:p>
          </table:table-cell>
          <table:table-cell office:value-type="float" office:value="14350.234375" calcext:value-type="float">
            <text:p>14350.2</text:p>
          </table:table-cell>
          <table:table-cell office:value-type="float" office:value="9551.683594" calcext:value-type="float">
            <text:p>9551.7</text:p>
          </table:table-cell>
          <table:table-cell office:value-type="float" office:value="6777.927246" calcext:value-type="float">
            <text:p>6777.9</text:p>
          </table:table-cell>
          <table:table-cell office:value-type="float" office:value="4670.928223" calcext:value-type="float">
            <text:p>4670.9</text:p>
          </table:table-cell>
          <table:table-cell office:value-type="float" office:value="3220.385986" calcext:value-type="float">
            <text:p>3220.4</text:p>
          </table:table-cell>
          <table:table-cell office:value-type="float" office:value="2287.691406" calcext:value-type="float">
            <text:p>2287.7</text:p>
          </table:table-cell>
          <table:table-cell office:value-type="float" office:value="1639.376465" calcext:value-type="float">
            <text:p>1639.4</text:p>
          </table:table-cell>
          <table:table-cell office:value-type="float" office:value="1212.561768" calcext:value-type="float">
            <text:p>1212.6</text:p>
          </table:table-cell>
          <table:table-cell office:value-type="float" office:value="926.808838" calcext:value-type="float">
            <text:p>926.8</text:p>
          </table:table-cell>
          <table:table-cell office:value-type="float" office:value="728.949646" calcext:value-type="float">
            <text:p>728.9</text:p>
          </table:table-cell>
          <table:table-cell office:value-type="float" office:value="589.261292" calcext:value-type="float">
            <text:p>589.3</text:p>
          </table:table-cell>
          <table:table-cell office:value-type="float" office:value="479.786407" calcext:value-type="float">
            <text:p>479.8</text:p>
          </table:table-cell>
          <table:table-cell office:value-type="float" office:value="398.661224" calcext:value-type="float">
            <text:p>398.7</text:p>
          </table:table-cell>
          <table:table-cell office:value-type="float" office:value="337.449463" calcext:value-type="float">
            <text:p>337.4</text:p>
          </table:table-cell>
          <table:table-cell office:value-type="float" office:value="283.496765" calcext:value-type="float">
            <text:p>283.5</text:p>
          </table:table-cell>
          <table:table-cell office:value-type="float" office:value="239.746063" calcext:value-type="float">
            <text:p>239.7</text:p>
          </table:table-cell>
          <table:table-cell office:value-type="float" office:value="197.466782" calcext:value-type="float">
            <text:p>197.5</text:p>
          </table:table-cell>
          <table:table-cell office:value-type="float" office:value="162.740891" calcext:value-type="float">
            <text:p>162.7</text:p>
          </table:table-cell>
          <table:table-cell office:value-type="float" office:value="132.429291" calcext:value-type="float">
            <text:p>132.4</text:p>
          </table:table-cell>
          <table:table-cell office:value-type="float" office:value="106.826294" calcext:value-type="float">
            <text:p>106.8</text:p>
          </table:table-cell>
          <table:table-cell office:value-type="float" office:value="87.207138" calcext:value-type="float">
            <text:p>87.2</text:p>
          </table:table-cell>
          <table:table-cell office:value-type="float" office:value="69.647995" calcext:value-type="float">
            <text:p>69.6</text:p>
          </table:table-cell>
          <table:table-cell office:value-type="float" office:value="55.42411" calcext:value-type="float">
            <text:p>55.4</text:p>
          </table:table-cell>
          <table:table-cell office:value-type="float" office:value="46.3993" calcext:value-type="float">
            <text:p>46.4</text:p>
          </table:table-cell>
          <table:table-cell office:value-type="float" office:value="39.630692" calcext:value-type="float">
            <text:p>39.6</text:p>
          </table:table-cell>
          <table:table-cell office:value-type="float" office:value="31.78303" calcext:value-type="float">
            <text:p>31.8</text:p>
          </table:table-cell>
          <table:table-cell office:value-type="float" office:value="5.10098" calcext:value-type="float">
            <text:p>5.1</text:p>
          </table:table-cell>
          <table:table-cell office:value-type="float" office:value="0.784766" calcext:value-type="float">
            <text:p>0.8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/>
          <table:table-cell office:value-type="time" office:time-value="PT1108452H11M00.999998823S" calcext:value-type="time">
            <text:p>12:11:01</text:p>
          </table:table-cell>
          <table:table-cell office:value-type="float" office:value="10.153531" calcext:value-type="float">
            <text:p>10.2</text:p>
          </table:table-cell>
          <table:table-cell office:value-type="float" office:value="21326.078125" calcext:value-type="float">
            <text:p>21326.1</text:p>
          </table:table-cell>
          <table:table-cell office:value-type="float" office:value="14050.875" calcext:value-type="float">
            <text:p>14050.9</text:p>
          </table:table-cell>
          <table:table-cell office:value-type="float" office:value="9412.094727" calcext:value-type="float">
            <text:p>9412.1</text:p>
          </table:table-cell>
          <table:table-cell office:value-type="float" office:value="6666.646484" calcext:value-type="float">
            <text:p>6666.6</text:p>
          </table:table-cell>
          <table:table-cell office:value-type="float" office:value="4619.870605" calcext:value-type="float">
            <text:p>4619.9</text:p>
          </table:table-cell>
          <table:table-cell office:value-type="float" office:value="3169.734619" calcext:value-type="float">
            <text:p>3169.7</text:p>
          </table:table-cell>
          <table:table-cell office:value-type="float" office:value="2263.744385" calcext:value-type="float">
            <text:p>2263.7</text:p>
          </table:table-cell>
          <table:table-cell office:value-type="float" office:value="1610.375732" calcext:value-type="float">
            <text:p>1610.4</text:p>
          </table:table-cell>
          <table:table-cell office:value-type="float" office:value="1187.665649" calcext:value-type="float">
            <text:p>1187.7</text:p>
          </table:table-cell>
          <table:table-cell office:value-type="float" office:value="899.29303" calcext:value-type="float">
            <text:p>899.3</text:p>
          </table:table-cell>
          <table:table-cell office:value-type="float" office:value="707.241638" calcext:value-type="float">
            <text:p>707.2</text:p>
          </table:table-cell>
          <table:table-cell office:value-type="float" office:value="567.388794" calcext:value-type="float">
            <text:p>567.4</text:p>
          </table:table-cell>
          <table:table-cell office:value-type="float" office:value="463.38559" calcext:value-type="float">
            <text:p>463.4</text:p>
          </table:table-cell>
          <table:table-cell office:value-type="float" office:value="382.625519" calcext:value-type="float">
            <text:p>382.6</text:p>
          </table:table-cell>
          <table:table-cell office:value-type="float" office:value="319.494751" calcext:value-type="float">
            <text:p>319.5</text:p>
          </table:table-cell>
          <table:table-cell office:value-type="float" office:value="271.82663" calcext:value-type="float">
            <text:p>271.8</text:p>
          </table:table-cell>
          <table:table-cell office:value-type="float" office:value="229.378326" calcext:value-type="float">
            <text:p>229.4</text:p>
          </table:table-cell>
          <table:table-cell office:value-type="float" office:value="188.111893" calcext:value-type="float">
            <text:p>188.1</text:p>
          </table:table-cell>
          <table:table-cell office:value-type="float" office:value="154.133575" calcext:value-type="float">
            <text:p>154.1</text:p>
          </table:table-cell>
          <table:table-cell office:value-type="float" office:value="124.193245" calcext:value-type="float">
            <text:p>124.2</text:p>
          </table:table-cell>
          <table:table-cell office:value-type="float" office:value="101.344055" calcext:value-type="float">
            <text:p>101.3</text:p>
          </table:table-cell>
          <table:table-cell office:value-type="float" office:value="81.547981" calcext:value-type="float">
            <text:p>81.5</text:p>
          </table:table-cell>
          <table:table-cell office:value-type="float" office:value="66.479332" calcext:value-type="float">
            <text:p>66.5</text:p>
          </table:table-cell>
          <table:table-cell office:value-type="float" office:value="51.607662" calcext:value-type="float">
            <text:p>51.6</text:p>
          </table:table-cell>
          <table:table-cell office:value-type="float" office:value="43.039215" calcext:value-type="float">
            <text:p>43.0</text:p>
          </table:table-cell>
          <table:table-cell office:value-type="float" office:value="36.342037" calcext:value-type="float">
            <text:p>36.3</text:p>
          </table:table-cell>
          <table:table-cell office:value-type="float" office:value="29.546371" calcext:value-type="float">
            <text:p>29.5</text:p>
          </table:table-cell>
          <table:table-cell office:value-type="float" office:value="3.644053" calcext:value-type="float">
            <text:p>3.6</text:p>
          </table:table-cell>
          <table:table-cell office:value-type="float" office:value="0.49244" calcext:value-type="float">
            <text:p>0.5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/>
          <table:table-cell office:value-type="time" office:time-value="PT1108452H13M03.000000101S" calcext:value-type="time">
            <text:p>12:13:03</text:p>
          </table:table-cell>
          <table:table-cell office:value-type="float" office:value="10.099489" calcext:value-type="float">
            <text:p>10.1</text:p>
          </table:table-cell>
          <table:table-cell office:value-type="float" office:value="21661.689453" calcext:value-type="float">
            <text:p>21661.7</text:p>
          </table:table-cell>
          <table:table-cell office:value-type="float" office:value="14202.995117" calcext:value-type="float">
            <text:p>14203.0</text:p>
          </table:table-cell>
          <table:table-cell office:value-type="float" office:value="9485.826172" calcext:value-type="float">
            <text:p>9485.8</text:p>
          </table:table-cell>
          <table:table-cell office:value-type="float" office:value="6713.507812" calcext:value-type="float">
            <text:p>6713.5</text:p>
          </table:table-cell>
          <table:table-cell office:value-type="float" office:value="4643.40332" calcext:value-type="float">
            <text:p>4643.4</text:p>
          </table:table-cell>
          <table:table-cell office:value-type="float" office:value="3192.73584" calcext:value-type="float">
            <text:p>3192.7</text:p>
          </table:table-cell>
          <table:table-cell office:value-type="float" office:value="2281.20459" calcext:value-type="float">
            <text:p>2281.2</text:p>
          </table:table-cell>
          <table:table-cell office:value-type="float" office:value="1644.835693" calcext:value-type="float">
            <text:p>1644.8</text:p>
          </table:table-cell>
          <table:table-cell office:value-type="float" office:value="1210.160156" calcext:value-type="float">
            <text:p>1210.2</text:p>
          </table:table-cell>
          <table:table-cell office:value-type="float" office:value="924.007141" calcext:value-type="float">
            <text:p>924.0</text:p>
          </table:table-cell>
          <table:table-cell office:value-type="float" office:value="724.789124" calcext:value-type="float">
            <text:p>724.8</text:p>
          </table:table-cell>
          <table:table-cell office:value-type="float" office:value="585.970215" calcext:value-type="float">
            <text:p>586.0</text:p>
          </table:table-cell>
          <table:table-cell office:value-type="float" office:value="481.509491" calcext:value-type="float">
            <text:p>481.5</text:p>
          </table:table-cell>
          <table:table-cell office:value-type="float" office:value="395.564545" calcext:value-type="float">
            <text:p>395.6</text:p>
          </table:table-cell>
          <table:table-cell office:value-type="float" office:value="329.521606" calcext:value-type="float">
            <text:p>329.5</text:p>
          </table:table-cell>
          <table:table-cell office:value-type="float" office:value="279.123016" calcext:value-type="float">
            <text:p>279.1</text:p>
          </table:table-cell>
          <table:table-cell office:value-type="float" office:value="230.803757" calcext:value-type="float">
            <text:p>230.8</text:p>
          </table:table-cell>
          <table:table-cell office:value-type="float" office:value="189.019455" calcext:value-type="float">
            <text:p>189.0</text:p>
          </table:table-cell>
          <table:table-cell office:value-type="float" office:value="155.651443" calcext:value-type="float">
            <text:p>155.7</text:p>
          </table:table-cell>
          <table:table-cell office:value-type="float" office:value="125.748932" calcext:value-type="float">
            <text:p>125.7</text:p>
          </table:table-cell>
          <table:table-cell office:value-type="float" office:value="103.074516" calcext:value-type="float">
            <text:p>103.1</text:p>
          </table:table-cell>
          <table:table-cell office:value-type="float" office:value="84.06366" calcext:value-type="float">
            <text:p>84.1</text:p>
          </table:table-cell>
          <table:table-cell office:value-type="float" office:value="66.240974" calcext:value-type="float">
            <text:p>66.2</text:p>
          </table:table-cell>
          <table:table-cell office:value-type="float" office:value="54.953274" calcext:value-type="float">
            <text:p>55.0</text:p>
          </table:table-cell>
          <table:table-cell office:value-type="float" office:value="43.566559" calcext:value-type="float">
            <text:p>43.6</text:p>
          </table:table-cell>
          <table:table-cell office:value-type="float" office:value="36.635517" calcext:value-type="float">
            <text:p>36.6</text:p>
          </table:table-cell>
          <table:table-cell office:value-type="float" office:value="28.615309" calcext:value-type="float">
            <text:p>28.6</text:p>
          </table:table-cell>
          <table:table-cell office:value-type="float" office:value="3.465522" calcext:value-type="float">
            <text:p>3.5</text:p>
          </table:table-cell>
          <table:table-cell office:value-type="float" office:value="0.594089" calcext:value-type="float">
            <text:p>0.6</text:p>
          </table:table-cell>
          <table:table-cell office:value-type="float" office:value="0.099015" calcext:value-type="float">
            <text:p>0.1</text:p>
          </table:table-cell>
        </table:table-row>
        <table:table-row table:style-name="ro1">
          <table:table-cell/>
          <table:table-cell office:value-type="time" office:time-value="PT1108452H15M04.999999702S" calcext:value-type="time">
            <text:p>12:15:05</text:p>
          </table:table-cell>
          <table:table-cell office:value-type="float" office:value="10.163274" calcext:value-type="float">
            <text:p>10.2</text:p>
          </table:table-cell>
          <table:table-cell office:value-type="float" office:value="21440.630859" calcext:value-type="float">
            <text:p>21440.6</text:p>
          </table:table-cell>
          <table:table-cell office:value-type="float" office:value="14086.897461" calcext:value-type="float">
            <text:p>14086.9</text:p>
          </table:table-cell>
          <table:table-cell office:value-type="float" office:value="9399.431641" calcext:value-type="float">
            <text:p>9399.4</text:p>
          </table:table-cell>
          <table:table-cell office:value-type="float" office:value="6676.785645" calcext:value-type="float">
            <text:p>6676.8</text:p>
          </table:table-cell>
          <table:table-cell office:value-type="float" office:value="4617.508301" calcext:value-type="float">
            <text:p>4617.5</text:p>
          </table:table-cell>
          <table:table-cell office:value-type="float" office:value="3179.388916" calcext:value-type="float">
            <text:p>3179.4</text:p>
          </table:table-cell>
          <table:table-cell office:value-type="float" office:value="2265.116699" calcext:value-type="float">
            <text:p>2265.1</text:p>
          </table:table-cell>
          <table:table-cell office:value-type="float" office:value="1619.064941" calcext:value-type="float">
            <text:p>1619.1</text:p>
          </table:table-cell>
          <table:table-cell office:value-type="float" office:value="1193.808228" calcext:value-type="float">
            <text:p>1193.8</text:p>
          </table:table-cell>
          <table:table-cell office:value-type="float" office:value="908.565491" calcext:value-type="float">
            <text:p>908.6</text:p>
          </table:table-cell>
          <table:table-cell office:value-type="float" office:value="711.876892" calcext:value-type="float">
            <text:p>711.9</text:p>
          </table:table-cell>
          <table:table-cell office:value-type="float" office:value="565.959351" calcext:value-type="float">
            <text:p>566.0</text:p>
          </table:table-cell>
          <table:table-cell office:value-type="float" office:value="456.644196" calcext:value-type="float">
            <text:p>456.6</text:p>
          </table:table-cell>
          <table:table-cell office:value-type="float" office:value="383.144257" calcext:value-type="float">
            <text:p>383.1</text:p>
          </table:table-cell>
          <table:table-cell office:value-type="float" office:value="318.302948" calcext:value-type="float">
            <text:p>318.3</text:p>
          </table:table-cell>
          <table:table-cell office:value-type="float" office:value="270.7789" calcext:value-type="float">
            <text:p>270.8</text:p>
          </table:table-cell>
          <table:table-cell office:value-type="float" office:value="227.485748" calcext:value-type="float">
            <text:p>227.5</text:p>
          </table:table-cell>
          <table:table-cell office:value-type="float" office:value="186.062088" calcext:value-type="float">
            <text:p>186.1</text:p>
          </table:table-cell>
          <table:table-cell office:value-type="float" office:value="151.132401" calcext:value-type="float">
            <text:p>151.1</text:p>
          </table:table-cell>
          <table:table-cell office:value-type="float" office:value="121.023994" calcext:value-type="float">
            <text:p>121.0</text:p>
          </table:table-cell>
          <table:table-cell office:value-type="float" office:value="97.015984" calcext:value-type="float">
            <text:p>97.0</text:p>
          </table:table-cell>
          <table:table-cell office:value-type="float" office:value="77.534073" calcext:value-type="float">
            <text:p>77.5</text:p>
          </table:table-cell>
          <table:table-cell office:value-type="float" office:value="60.315212" calcext:value-type="float">
            <text:p>60.3</text:p>
          </table:table-cell>
          <table:table-cell office:value-type="float" office:value="47.720844" calcext:value-type="float">
            <text:p>47.7</text:p>
          </table:table-cell>
          <table:table-cell office:value-type="float" office:value="39.750969" calcext:value-type="float">
            <text:p>39.8</text:p>
          </table:table-cell>
          <table:table-cell office:value-type="float" office:value="33.060215" calcext:value-type="float">
            <text:p>33.1</text:p>
          </table:table-cell>
          <table:table-cell office:value-type="float" office:value="27.156603" calcext:value-type="float">
            <text:p>27.2</text:p>
          </table:table-cell>
          <table:table-cell office:value-type="float" office:value="4.132527" calcext:value-type="float">
            <text:p>4.1</text:p>
          </table:table-cell>
          <table:table-cell office:value-type="float" office:value="0.590361" calcext:value-type="float">
            <text:p>0.6</text:p>
          </table:table-cell>
          <table:table-cell office:value-type="float" office:value="0.196787" calcext:value-type="float">
            <text:p>0.2</text:p>
          </table:table-cell>
        </table:table-row>
        <table:table-row table:style-name="ro1">
          <table:table-cell/>
          <table:table-cell office:value-type="time" office:time-value="PT1108452H17M07.000000142S" calcext:value-type="time">
            <text:p>12:17:07</text:p>
          </table:table-cell>
          <table:table-cell office:value-type="float" office:value="10.028913" calcext:value-type="float">
            <text:p>10.0</text:p>
          </table:table-cell>
          <table:table-cell office:value-type="float" office:value="21775.140625" calcext:value-type="float">
            <text:p>21775.1</text:p>
          </table:table-cell>
          <table:table-cell office:value-type="float" office:value="14331.5625" calcext:value-type="float">
            <text:p>14331.6</text:p>
          </table:table-cell>
          <table:table-cell office:value-type="float" office:value="9499.733398" calcext:value-type="float">
            <text:p>9499.7</text:p>
          </table:table-cell>
          <table:table-cell office:value-type="float" office:value="6690.455566" calcext:value-type="float">
            <text:p>6690.5</text:p>
          </table:table-cell>
          <table:table-cell office:value-type="float" office:value="4640.48291" calcext:value-type="float">
            <text:p>4640.5</text:p>
          </table:table-cell>
          <table:table-cell office:value-type="float" office:value="3198.053223" calcext:value-type="float">
            <text:p>3198.1</text:p>
          </table:table-cell>
          <table:table-cell office:value-type="float" office:value="2281.702881" calcext:value-type="float">
            <text:p>2281.7</text:p>
          </table:table-cell>
          <table:table-cell office:value-type="float" office:value="1628.790649" calcext:value-type="float">
            <text:p>1628.8</text:p>
          </table:table-cell>
          <table:table-cell office:value-type="float" office:value="1207.907471" calcext:value-type="float">
            <text:p>1207.9</text:p>
          </table:table-cell>
          <table:table-cell office:value-type="float" office:value="923.729187" calcext:value-type="float">
            <text:p>923.7</text:p>
          </table:table-cell>
          <table:table-cell office:value-type="float" office:value="725.801453" calcext:value-type="float">
            <text:p>725.8</text:p>
          </table:table-cell>
          <table:table-cell office:value-type="float" office:value="583.213745" calcext:value-type="float">
            <text:p>583.2</text:p>
          </table:table-cell>
          <table:table-cell office:value-type="float" office:value="473.730286" calcext:value-type="float">
            <text:p>473.7</text:p>
          </table:table-cell>
          <table:table-cell office:value-type="float" office:value="391.667542" calcext:value-type="float">
            <text:p>391.7</text:p>
          </table:table-cell>
          <table:table-cell office:value-type="float" office:value="328.849182" calcext:value-type="float">
            <text:p>328.8</text:p>
          </table:table-cell>
          <table:table-cell office:value-type="float" office:value="279.691315" calcext:value-type="float">
            <text:p>279.7</text:p>
          </table:table-cell>
          <table:table-cell office:value-type="float" office:value="235.818161" calcext:value-type="float">
            <text:p>235.8</text:p>
          </table:table-cell>
          <table:table-cell office:value-type="float" office:value="194.138672" calcext:value-type="float">
            <text:p>194.1</text:p>
          </table:table-cell>
          <table:table-cell office:value-type="float" office:value="157.843613" calcext:value-type="float">
            <text:p>157.8</text:p>
          </table:table-cell>
          <table:table-cell office:value-type="float" office:value="127.531265" calcext:value-type="float">
            <text:p>127.5</text:p>
          </table:table-cell>
          <table:table-cell office:value-type="float" office:value="104.896706" calcext:value-type="float">
            <text:p>104.9</text:p>
          </table:table-cell>
          <table:table-cell office:value-type="float" office:value="84.954369" calcext:value-type="float">
            <text:p>85.0</text:p>
          </table:table-cell>
          <table:table-cell office:value-type="float" office:value="66.308281" calcext:value-type="float">
            <text:p>66.3</text:p>
          </table:table-cell>
          <table:table-cell office:value-type="float" office:value="52.548065" calcext:value-type="float">
            <text:p>52.5</text:p>
          </table:table-cell>
          <table:table-cell office:value-type="float" office:value="42.776318" calcext:value-type="float">
            <text:p>42.8</text:p>
          </table:table-cell>
          <table:table-cell office:value-type="float" office:value="34.500248" calcext:value-type="float">
            <text:p>34.5</text:p>
          </table:table-cell>
          <table:table-cell office:value-type="float" office:value="26.722734" calcext:value-type="float">
            <text:p>26.7</text:p>
          </table:table-cell>
          <table:table-cell office:value-type="float" office:value="2.991351" calcext:value-type="float">
            <text:p>3.0</text:p>
          </table:table-cell>
          <table:table-cell office:value-type="float" office:value="0.099712" calcext:value-type="float">
            <text:p>0.1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/>
          <table:table-cell office:value-type="time" office:time-value="PT1108452H19M08.000000138S" calcext:value-type="time">
            <text:p>12:19:08</text:p>
          </table:table-cell>
          <table:table-cell office:value-type="float" office:value="10.068703" calcext:value-type="float">
            <text:p>10.1</text:p>
          </table:table-cell>
          <table:table-cell office:value-type="float" office:value="21860.314453" calcext:value-type="float">
            <text:p>21860.3</text:p>
          </table:table-cell>
          <table:table-cell office:value-type="float" office:value="14414.568359" calcext:value-type="float">
            <text:p>14414.6</text:p>
          </table:table-cell>
          <table:table-cell office:value-type="float" office:value="9558.927734" calcext:value-type="float">
            <text:p>9558.9</text:p>
          </table:table-cell>
          <table:table-cell office:value-type="float" office:value="6764.029297" calcext:value-type="float">
            <text:p>6764.0</text:p>
          </table:table-cell>
          <table:table-cell office:value-type="float" office:value="4667.830566" calcext:value-type="float">
            <text:p>4667.8</text:p>
          </table:table-cell>
          <table:table-cell office:value-type="float" office:value="3200.511719" calcext:value-type="float">
            <text:p>3200.5</text:p>
          </table:table-cell>
          <table:table-cell office:value-type="float" office:value="2284.405518" calcext:value-type="float">
            <text:p>2284.4</text:p>
          </table:table-cell>
          <table:table-cell office:value-type="float" office:value="1639.635254" calcext:value-type="float">
            <text:p>1639.6</text:p>
          </table:table-cell>
          <table:table-cell office:value-type="float" office:value="1201.843018" calcext:value-type="float">
            <text:p>1201.8</text:p>
          </table:table-cell>
          <table:table-cell office:value-type="float" office:value="916.304749" calcext:value-type="float">
            <text:p>916.3</text:p>
          </table:table-cell>
          <table:table-cell office:value-type="float" office:value="717.967346" calcext:value-type="float">
            <text:p>718.0</text:p>
          </table:table-cell>
          <table:table-cell office:value-type="float" office:value="575.14856" calcext:value-type="float">
            <text:p>575.1</text:p>
          </table:table-cell>
          <table:table-cell office:value-type="float" office:value="468.481415" calcext:value-type="float">
            <text:p>468.5</text:p>
          </table:table-cell>
          <table:table-cell office:value-type="float" office:value="387.040924" calcext:value-type="float">
            <text:p>387.0</text:p>
          </table:table-cell>
          <table:table-cell office:value-type="float" office:value="325.662598" calcext:value-type="float">
            <text:p>325.7</text:p>
          </table:table-cell>
          <table:table-cell office:value-type="float" office:value="280.17511" calcext:value-type="float">
            <text:p>280.2</text:p>
          </table:table-cell>
          <table:table-cell office:value-type="float" office:value="233.29718" calcext:value-type="float">
            <text:p>233.3</text:p>
          </table:table-cell>
          <table:table-cell office:value-type="float" office:value="192.775574" calcext:value-type="float">
            <text:p>192.8</text:p>
          </table:table-cell>
          <table:table-cell office:value-type="float" office:value="158.808945" calcext:value-type="float">
            <text:p>158.8</text:p>
          </table:table-cell>
          <table:table-cell office:value-type="float" office:value="126.530701" calcext:value-type="float">
            <text:p>126.5</text:p>
          </table:table-cell>
          <table:table-cell office:value-type="float" office:value="102.694458" calcext:value-type="float">
            <text:p>102.7</text:p>
          </table:table-cell>
          <table:table-cell office:value-type="float" office:value="83.228203" calcext:value-type="float">
            <text:p>83.2</text:p>
          </table:table-cell>
          <table:table-cell office:value-type="float" office:value="63.861256" calcext:value-type="float">
            <text:p>63.9</text:p>
          </table:table-cell>
          <table:table-cell office:value-type="float" office:value="52.042454" calcext:value-type="float">
            <text:p>52.0</text:p>
          </table:table-cell>
          <table:table-cell office:value-type="float" office:value="42.309322" calcext:value-type="float">
            <text:p>42.3</text:p>
          </table:table-cell>
          <table:table-cell office:value-type="float" office:value="34.661865" calcext:value-type="float">
            <text:p>34.7</text:p>
          </table:table-cell>
          <table:table-cell office:value-type="float" office:value="28.404852" calcext:value-type="float">
            <text:p>28.4</text:p>
          </table:table-cell>
          <table:table-cell office:value-type="float" office:value="3.972706" calcext:value-type="float">
            <text:p>4.0</text:p>
          </table:table-cell>
          <table:table-cell office:value-type="float" office:value="0.695224" calcext:value-type="float">
            <text:p>0.7</text:p>
          </table:table-cell>
          <table:table-cell office:value-type="float" office:value="0.099318" calcext:value-type="float">
            <text:p>0.1</text:p>
          </table:table-cell>
        </table:table-row>
        <table:table-row table:style-name="ro1">
          <table:table-cell/>
          <table:table-cell office:value-type="time" office:time-value="PT1108452H21M09.999999739S" calcext:value-type="time">
            <text:p>12:21:10</text:p>
          </table:table-cell>
          <table:table-cell office:value-type="float" office:value="10.128601" calcext:value-type="float">
            <text:p>10.1</text:p>
          </table:table-cell>
          <table:table-cell office:value-type="float" office:value="21814.859375" calcext:value-type="float">
            <text:p>21814.9</text:p>
          </table:table-cell>
          <table:table-cell office:value-type="float" office:value="14295.458984" calcext:value-type="float">
            <text:p>14295.5</text:p>
          </table:table-cell>
          <table:table-cell office:value-type="float" office:value="9493.414062" calcext:value-type="float">
            <text:p>9493.4</text:p>
          </table:table-cell>
          <table:table-cell office:value-type="float" office:value="6690.657227" calcext:value-type="float">
            <text:p>6690.7</text:p>
          </table:table-cell>
          <table:table-cell office:value-type="float" office:value="4596.390137" calcext:value-type="float">
            <text:p>4596.4</text:p>
          </table:table-cell>
          <table:table-cell office:value-type="float" office:value="3151.767822" calcext:value-type="float">
            <text:p>3151.8</text:p>
          </table:table-cell>
          <table:table-cell office:value-type="float" office:value="2238.117676" calcext:value-type="float">
            <text:p>2238.1</text:p>
          </table:table-cell>
          <table:table-cell office:value-type="float" office:value="1615.425415" calcext:value-type="float">
            <text:p>1615.4</text:p>
          </table:table-cell>
          <table:table-cell office:value-type="float" office:value="1182.591797" calcext:value-type="float">
            <text:p>1182.6</text:p>
          </table:table-cell>
          <table:table-cell office:value-type="float" office:value="904.073547" calcext:value-type="float">
            <text:p>904.1</text:p>
          </table:table-cell>
          <table:table-cell office:value-type="float" office:value="713.030334" calcext:value-type="float">
            <text:p>713.0</text:p>
          </table:table-cell>
          <table:table-cell office:value-type="float" office:value="569.377747" calcext:value-type="float">
            <text:p>569.4</text:p>
          </table:table-cell>
          <table:table-cell office:value-type="float" office:value="465.315979" calcext:value-type="float">
            <text:p>465.3</text:p>
          </table:table-cell>
          <table:table-cell office:value-type="float" office:value="379.716797" calcext:value-type="float">
            <text:p>379.7</text:p>
          </table:table-cell>
          <table:table-cell office:value-type="float" office:value="321.663361" calcext:value-type="float">
            <text:p>321.7</text:p>
          </table:table-cell>
          <table:table-cell office:value-type="float" office:value="273.877899" calcext:value-type="float">
            <text:p>273.9</text:p>
          </table:table-cell>
          <table:table-cell office:value-type="float" office:value="232.312439" calcext:value-type="float">
            <text:p>232.3</text:p>
          </table:table-cell>
          <table:table-cell office:value-type="float" office:value="189.364746" calcext:value-type="float">
            <text:p>189.4</text:p>
          </table:table-cell>
          <table:table-cell office:value-type="float" office:value="156.586288" calcext:value-type="float">
            <text:p>156.6</text:p>
          </table:table-cell>
          <table:table-cell office:value-type="float" office:value="124.4002" calcext:value-type="float">
            <text:p>124.4</text:p>
          </table:table-cell>
          <table:table-cell office:value-type="float" office:value="101.69223" calcext:value-type="float">
            <text:p>101.7</text:p>
          </table:table-cell>
          <table:table-cell office:value-type="float" office:value="83.130928" calcext:value-type="float">
            <text:p>83.1</text:p>
          </table:table-cell>
          <table:table-cell office:value-type="float" office:value="67.630264" calcext:value-type="float">
            <text:p>67.6</text:p>
          </table:table-cell>
          <table:table-cell office:value-type="float" office:value="54.795326" calcext:value-type="float">
            <text:p>54.8</text:p>
          </table:table-cell>
          <table:table-cell office:value-type="float" office:value="44.527374" calcext:value-type="float">
            <text:p>44.5</text:p>
          </table:table-cell>
          <table:table-cell office:value-type="float" office:value="36.135296" calcext:value-type="float">
            <text:p>36.1</text:p>
          </table:table-cell>
          <table:table-cell office:value-type="float" office:value="29.717825" calcext:value-type="float">
            <text:p>29.7</text:p>
          </table:table-cell>
          <table:table-cell office:value-type="float" office:value="4.344134" calcext:value-type="float">
            <text:p>4.3</text:p>
          </table:table-cell>
          <table:table-cell office:value-type="float" office:value="0.394921" calcext:value-type="float">
            <text:p>0.4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/>
          <table:table-cell office:value-type="time" office:time-value="PT1108452H23M12.000000179S" calcext:value-type="time">
            <text:p>12:23:12</text:p>
          </table:table-cell>
          <table:table-cell office:value-type="float" office:value="10.152562" calcext:value-type="float">
            <text:p>10.2</text:p>
          </table:table-cell>
          <table:table-cell office:value-type="float" office:value="21833.996094" calcext:value-type="float">
            <text:p>21834.0</text:p>
          </table:table-cell>
          <table:table-cell office:value-type="float" office:value="14354.40625" calcext:value-type="float">
            <text:p>14354.4</text:p>
          </table:table-cell>
          <table:table-cell office:value-type="float" office:value="9518.484375" calcext:value-type="float">
            <text:p>9518.5</text:p>
          </table:table-cell>
          <table:table-cell office:value-type="float" office:value="6737.806641" calcext:value-type="float">
            <text:p>6737.8</text:p>
          </table:table-cell>
          <table:table-cell office:value-type="float" office:value="4644.049316" calcext:value-type="float">
            <text:p>4644.0</text:p>
          </table:table-cell>
          <table:table-cell office:value-type="float" office:value="3163.043945" calcext:value-type="float">
            <text:p>3163.0</text:p>
          </table:table-cell>
          <table:table-cell office:value-type="float" office:value="2269.476318" calcext:value-type="float">
            <text:p>2269.5</text:p>
          </table:table-cell>
          <table:table-cell office:value-type="float" office:value="1623.038574" calcext:value-type="float">
            <text:p>1623.0</text:p>
          </table:table-cell>
          <table:table-cell office:value-type="float" office:value="1200.091187" calcext:value-type="float">
            <text:p>1200.1</text:p>
          </table:table-cell>
          <table:table-cell office:value-type="float" office:value="914.054993" calcext:value-type="float">
            <text:p>914.1</text:p>
          </table:table-cell>
          <table:table-cell office:value-type="float" office:value="724.546143" calcext:value-type="float">
            <text:p>724.5</text:p>
          </table:table-cell>
          <table:table-cell office:value-type="float" office:value="576.110718" calcext:value-type="float">
            <text:p>576.1</text:p>
          </table:table-cell>
          <table:table-cell office:value-type="float" office:value="475.544983" calcext:value-type="float">
            <text:p>475.5</text:p>
          </table:table-cell>
          <table:table-cell office:value-type="float" office:value="393.102753" calcext:value-type="float">
            <text:p>393.1</text:p>
          </table:table-cell>
          <table:table-cell office:value-type="float" office:value="332.132904" calcext:value-type="float">
            <text:p>332.1</text:p>
          </table:table-cell>
          <table:table-cell office:value-type="float" office:value="282.687256" calcext:value-type="float">
            <text:p>282.7</text:p>
          </table:table-cell>
          <table:table-cell office:value-type="float" office:value="237.772491" calcext:value-type="float">
            <text:p>237.8</text:p>
          </table:table-cell>
          <table:table-cell office:value-type="float" office:value="196.009628" calcext:value-type="float">
            <text:p>196.0</text:p>
          </table:table-cell>
          <table:table-cell office:value-type="float" office:value="158.482162" calcext:value-type="float">
            <text:p>158.5</text:p>
          </table:table-cell>
          <table:table-cell office:value-type="float" office:value="127.947998" calcext:value-type="float">
            <text:p>127.9</text:p>
          </table:table-cell>
          <table:table-cell office:value-type="float" office:value="102.240204" calcext:value-type="float">
            <text:p>102.2</text:p>
          </table:table-cell>
          <table:table-cell office:value-type="float" office:value="81.752762" calcext:value-type="float">
            <text:p>81.8</text:p>
          </table:table-cell>
          <table:table-cell office:value-type="float" office:value="64.318741" calcext:value-type="float">
            <text:p>64.3</text:p>
          </table:table-cell>
          <table:table-cell office:value-type="float" office:value="51.711086" calcext:value-type="float">
            <text:p>51.7</text:p>
          </table:table-cell>
          <table:table-cell office:value-type="float" office:value="43.634304" calcext:value-type="float">
            <text:p>43.6</text:p>
          </table:table-cell>
          <table:table-cell office:value-type="float" office:value="37.034985" calcext:value-type="float">
            <text:p>37.0</text:p>
          </table:table-cell>
          <table:table-cell office:value-type="float" office:value="29.056705" calcext:value-type="float">
            <text:p>29.1</text:p>
          </table:table-cell>
          <table:table-cell office:value-type="float" office:value="3.742898" calcext:value-type="float">
            <text:p>3.7</text:p>
          </table:table-cell>
          <table:table-cell office:value-type="float" office:value="0.590984" calcext:value-type="float">
            <text:p>0.6</text:p>
          </table:table-cell>
          <table:table-cell office:value-type="float" office:value="0.098497" calcext:value-type="float">
            <text:p>0.1</text:p>
          </table:table-cell>
        </table:table-row>
        <table:table-row table:style-name="ro1">
          <table:table-cell/>
          <table:table-cell office:value-type="time" office:time-value="PT1108452H25M12.999999337S" calcext:value-type="time">
            <text:p>12:25:13</text:p>
          </table:table-cell>
          <table:table-cell office:value-type="float" office:value="10.035506" calcext:value-type="float">
            <text:p>10.0</text:p>
          </table:table-cell>
          <table:table-cell office:value-type="float" office:value="21994.505859" calcext:value-type="float">
            <text:p>21994.5</text:p>
          </table:table-cell>
          <table:table-cell office:value-type="float" office:value="14452.982422" calcext:value-type="float">
            <text:p>14453.0</text:p>
          </table:table-cell>
          <table:table-cell office:value-type="float" office:value="9599.316406" calcext:value-type="float">
            <text:p>9599.3</text:p>
          </table:table-cell>
          <table:table-cell office:value-type="float" office:value="6770.859375" calcext:value-type="float">
            <text:p>6770.9</text:p>
          </table:table-cell>
          <table:table-cell office:value-type="float" office:value="4671.114746" calcext:value-type="float">
            <text:p>4671.1</text:p>
          </table:table-cell>
          <table:table-cell office:value-type="float" office:value="3198.543213" calcext:value-type="float">
            <text:p>3198.5</text:p>
          </table:table-cell>
          <table:table-cell office:value-type="float" office:value="2266.651855" calcext:value-type="float">
            <text:p>2266.7</text:p>
          </table:table-cell>
          <table:table-cell office:value-type="float" office:value="1627.82019" calcext:value-type="float">
            <text:p>1627.8</text:p>
          </table:table-cell>
          <table:table-cell office:value-type="float" office:value="1193.362793" calcext:value-type="float">
            <text:p>1193.4</text:p>
          </table:table-cell>
          <table:table-cell office:value-type="float" office:value="907.378235" calcext:value-type="float">
            <text:p>907.4</text:p>
          </table:table-cell>
          <table:table-cell office:value-type="float" office:value="708.285156" calcext:value-type="float">
            <text:p>708.3</text:p>
          </table:table-cell>
          <table:table-cell office:value-type="float" office:value="570.275146" calcext:value-type="float">
            <text:p>570.3</text:p>
          </table:table-cell>
          <table:table-cell office:value-type="float" office:value="465.845947" calcext:value-type="float">
            <text:p>465.8</text:p>
          </table:table-cell>
          <table:table-cell office:value-type="float" office:value="383.737488" calcext:value-type="float">
            <text:p>383.7</text:p>
          </table:table-cell>
          <table:table-cell office:value-type="float" office:value="324.746948" calcext:value-type="float">
            <text:p>324.7</text:p>
          </table:table-cell>
          <table:table-cell office:value-type="float" office:value="276.717468" calcext:value-type="float">
            <text:p>276.7</text:p>
          </table:table-cell>
          <table:table-cell office:value-type="float" office:value="234.268204" calcext:value-type="float">
            <text:p>234.3</text:p>
          </table:table-cell>
          <table:table-cell office:value-type="float" office:value="188.729889" calcext:value-type="float">
            <text:p>188.7</text:p>
          </table:table-cell>
          <table:table-cell office:value-type="float" office:value="155.149124" calcext:value-type="float">
            <text:p>155.1</text:p>
          </table:table-cell>
          <table:table-cell office:value-type="float" office:value="127.447479" calcext:value-type="float">
            <text:p>127.4</text:p>
          </table:table-cell>
          <table:table-cell office:value-type="float" office:value="98.749374" calcext:value-type="float">
            <text:p>98.7</text:p>
          </table:table-cell>
          <table:table-cell office:value-type="float" office:value="79.418015" calcext:value-type="float">
            <text:p>79.4</text:p>
          </table:table-cell>
          <table:table-cell office:value-type="float" office:value="64.67038" calcext:value-type="float">
            <text:p>64.7</text:p>
          </table:table-cell>
          <table:table-cell office:value-type="float" office:value="51.716373" calcext:value-type="float">
            <text:p>51.7</text:p>
          </table:table-cell>
          <table:table-cell office:value-type="float" office:value="41.353172" calcext:value-type="float">
            <text:p>41.4</text:p>
          </table:table-cell>
          <table:table-cell office:value-type="float" office:value="34.676876" calcext:value-type="float">
            <text:p>34.7</text:p>
          </table:table-cell>
          <table:table-cell office:value-type="float" office:value="27.801289" calcext:value-type="float">
            <text:p>27.8</text:p>
          </table:table-cell>
          <table:table-cell office:value-type="float" office:value="4.484079" calcext:value-type="float">
            <text:p>4.5</text:p>
          </table:table-cell>
          <table:table-cell office:value-type="float" office:value="0.697523" calcext:value-type="float">
            <text:p>0.7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/>
          <table:table-cell office:value-type="time" office:time-value="PT1108452H27M14.999999776S" calcext:value-type="time">
            <text:p>12:27:15</text:p>
          </table:table-cell>
          <table:table-cell office:value-type="float" office:value="10.066354" calcext:value-type="float">
            <text:p>10.1</text:p>
          </table:table-cell>
          <table:table-cell office:value-type="float" office:value="21566.994141" calcext:value-type="float">
            <text:p>21567.0</text:p>
          </table:table-cell>
          <table:table-cell office:value-type="float" office:value="14204.249023" calcext:value-type="float">
            <text:p>14204.2</text:p>
          </table:table-cell>
          <table:table-cell office:value-type="float" office:value="9414.431641" calcext:value-type="float">
            <text:p>9414.4</text:p>
          </table:table-cell>
          <table:table-cell office:value-type="float" office:value="6677.492188" calcext:value-type="float">
            <text:p>6677.5</text:p>
          </table:table-cell>
          <table:table-cell office:value-type="float" office:value="4607.825195" calcext:value-type="float">
            <text:p>4607.8</text:p>
          </table:table-cell>
          <table:table-cell office:value-type="float" office:value="3141.852539" calcext:value-type="float">
            <text:p>3141.9</text:p>
          </table:table-cell>
          <table:table-cell office:value-type="float" office:value="2240.831299" calcext:value-type="float">
            <text:p>2240.8</text:p>
          </table:table-cell>
          <table:table-cell office:value-type="float" office:value="1607.036743" calcext:value-type="float">
            <text:p>1607.0</text:p>
          </table:table-cell>
          <table:table-cell office:value-type="float" office:value="1174.705444" calcext:value-type="float">
            <text:p>1174.7</text:p>
          </table:table-cell>
          <table:table-cell office:value-type="float" office:value="900.922058" calcext:value-type="float">
            <text:p>900.9</text:p>
          </table:table-cell>
          <table:table-cell office:value-type="float" office:value="723.499329" calcext:value-type="float">
            <text:p>723.5</text:p>
          </table:table-cell>
          <table:table-cell office:value-type="float" office:value="578.263" calcext:value-type="float">
            <text:p>578.3</text:p>
          </table:table-cell>
          <table:table-cell office:value-type="float" office:value="470.378845" calcext:value-type="float">
            <text:p>470.4</text:p>
          </table:table-cell>
          <table:table-cell office:value-type="float" office:value="390.608154" calcext:value-type="float">
            <text:p>390.6</text:p>
          </table:table-cell>
          <table:table-cell office:value-type="float" office:value="327.427399" calcext:value-type="float">
            <text:p>327.4</text:p>
          </table:table-cell>
          <table:table-cell office:value-type="float" office:value="277.061584" calcext:value-type="float">
            <text:p>277.1</text:p>
          </table:table-cell>
          <table:table-cell office:value-type="float" office:value="231.066788" calcext:value-type="float">
            <text:p>231.1</text:p>
          </table:table-cell>
          <table:table-cell office:value-type="float" office:value="190.734406" calcext:value-type="float">
            <text:p>190.7</text:p>
          </table:table-cell>
          <table:table-cell office:value-type="float" office:value="155.468414" calcext:value-type="float">
            <text:p>155.5</text:p>
          </table:table-cell>
          <table:table-cell office:value-type="float" office:value="127.454292" calcext:value-type="float">
            <text:p>127.5</text:p>
          </table:table-cell>
          <table:table-cell office:value-type="float" office:value="105.897331" calcext:value-type="float">
            <text:p>105.9</text:p>
          </table:table-cell>
          <table:table-cell office:value-type="float" office:value="86.426529" calcext:value-type="float">
            <text:p>86.4</text:p>
          </table:table-cell>
          <table:table-cell office:value-type="float" office:value="69.339905" calcext:value-type="float">
            <text:p>69.3</text:p>
          </table:table-cell>
          <table:table-cell office:value-type="float" office:value="55.630867" calcext:value-type="float">
            <text:p>55.6</text:p>
          </table:table-cell>
          <table:table-cell office:value-type="float" office:value="44.802715" calcext:value-type="float">
            <text:p>44.8</text:p>
          </table:table-cell>
          <table:table-cell office:value-type="float" office:value="36.458088" calcext:value-type="float">
            <text:p>36.5</text:p>
          </table:table-cell>
          <table:table-cell office:value-type="float" office:value="29.702909" calcext:value-type="float">
            <text:p>29.7</text:p>
          </table:table-cell>
          <table:table-cell office:value-type="float" office:value="3.874293" calcext:value-type="float">
            <text:p>3.9</text:p>
          </table:table-cell>
          <table:table-cell office:value-type="float" office:value="0.695386" calcext:value-type="float">
            <text:p>0.7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/>
          <table:table-cell office:value-type="time" office:time-value="PT1108452H29M17.000000216S" calcext:value-type="time">
            <text:p>12:29:17</text:p>
          </table:table-cell>
          <table:table-cell office:value-type="float" office:value="10.021994" calcext:value-type="float">
            <text:p>10.0</text:p>
          </table:table-cell>
          <table:table-cell office:value-type="float" office:value="21788.378906" calcext:value-type="float">
            <text:p>21788.4</text:p>
          </table:table-cell>
          <table:table-cell office:value-type="float" office:value="14310.226562" calcext:value-type="float">
            <text:p>14310.2</text:p>
          </table:table-cell>
          <table:table-cell office:value-type="float" office:value="9516.070312" calcext:value-type="float">
            <text:p>9516.1</text:p>
          </table:table-cell>
          <table:table-cell office:value-type="float" office:value="6742.969727" calcext:value-type="float">
            <text:p>6743.0</text:p>
          </table:table-cell>
          <table:table-cell office:value-type="float" office:value="4649.773438" calcext:value-type="float">
            <text:p>4649.8</text:p>
          </table:table-cell>
          <table:table-cell office:value-type="float" office:value="3206.747314" calcext:value-type="float">
            <text:p>3206.7</text:p>
          </table:table-cell>
          <table:table-cell office:value-type="float" office:value="2277.59082" calcext:value-type="float">
            <text:p>2277.6</text:p>
          </table:table-cell>
          <table:table-cell office:value-type="float" office:value="1633.208008" calcext:value-type="float">
            <text:p>1633.2</text:p>
          </table:table-cell>
          <table:table-cell office:value-type="float" office:value="1196.069458" calcext:value-type="float">
            <text:p>1196.1</text:p>
          </table:table-cell>
          <table:table-cell office:value-type="float" office:value="910.59729" calcext:value-type="float">
            <text:p>910.6</text:p>
          </table:table-cell>
          <table:table-cell office:value-type="float" office:value="712.732422" calcext:value-type="float">
            <text:p>712.7</text:p>
          </table:table-cell>
          <table:table-cell office:value-type="float" office:value="566.753479" calcext:value-type="float">
            <text:p>566.8</text:p>
          </table:table-cell>
          <table:table-cell office:value-type="float" office:value="464.378662" calcext:value-type="float">
            <text:p>464.4</text:p>
          </table:table-cell>
          <table:table-cell office:value-type="float" office:value="384.055328" calcext:value-type="float">
            <text:p>384.1</text:p>
          </table:table-cell>
          <table:table-cell office:value-type="float" office:value="322.690277" calcext:value-type="float">
            <text:p>322.7</text:p>
          </table:table-cell>
          <table:table-cell office:value-type="float" office:value="273.897614" calcext:value-type="float">
            <text:p>273.9</text:p>
          </table:table-cell>
          <table:table-cell office:value-type="float" office:value="230.493057" calcext:value-type="float">
            <text:p>230.5</text:p>
          </table:table-cell>
          <table:table-cell office:value-type="float" office:value="192.376892" calcext:value-type="float">
            <text:p>192.4</text:p>
          </table:table-cell>
          <table:table-cell office:value-type="float" office:value="159.249756" calcext:value-type="float">
            <text:p>159.2</text:p>
          </table:table-cell>
          <table:table-cell office:value-type="float" office:value="130.512955" calcext:value-type="float">
            <text:p>130.5</text:p>
          </table:table-cell>
          <table:table-cell office:value-type="float" office:value="104.869354" calcext:value-type="float">
            <text:p>104.9</text:p>
          </table:table-cell>
          <table:table-cell office:value-type="float" office:value="83.715881" calcext:value-type="float">
            <text:p>83.7</text:p>
          </table:table-cell>
          <table:table-cell office:value-type="float" office:value="66.753189" calcext:value-type="float">
            <text:p>66.8</text:p>
          </table:table-cell>
          <table:table-cell office:value-type="float" office:value="54.97908" calcext:value-type="float">
            <text:p>55.0</text:p>
          </table:table-cell>
          <table:table-cell office:value-type="float" office:value="43.404537" calcext:value-type="float">
            <text:p>43.4</text:p>
          </table:table-cell>
          <table:table-cell office:value-type="float" office:value="37.417706" calcext:value-type="float">
            <text:p>37.4</text:p>
          </table:table-cell>
          <table:table-cell office:value-type="float" office:value="29.634823" calcext:value-type="float">
            <text:p>29.6</text:p>
          </table:table-cell>
          <table:table-cell office:value-type="float" office:value="3.991222" calcext:value-type="float">
            <text:p>4.0</text:p>
          </table:table-cell>
          <table:table-cell office:value-type="float" office:value="0.399122" calcext:value-type="float">
            <text:p>0.4</text:p>
          </table:table-cell>
          <table:table-cell office:value-type="float" office:value="0.099781" calcext:value-type="float">
            <text:p>0.1</text:p>
          </table:table-cell>
        </table:table-row>
        <table:table-row table:style-name="ro1">
          <table:table-cell/>
          <table:table-cell office:value-type="time" office:time-value="PT1108452H31M18.000000212S" calcext:value-type="time">
            <text:p>12:31:18</text:p>
          </table:table-cell>
          <table:table-cell office:value-type="float" office:value="10.068234" calcext:value-type="float">
            <text:p>10.1</text:p>
          </table:table-cell>
          <table:table-cell office:value-type="float" office:value="21406.632812" calcext:value-type="float">
            <text:p>21406.6</text:p>
          </table:table-cell>
          <table:table-cell office:value-type="float" office:value="14151.338867" calcext:value-type="float">
            <text:p>14151.3</text:p>
          </table:table-cell>
          <table:table-cell office:value-type="float" office:value="9418.930664" calcext:value-type="float">
            <text:p>9418.9</text:p>
          </table:table-cell>
          <table:table-cell office:value-type="float" office:value="6662.439453" calcext:value-type="float">
            <text:p>6662.4</text:p>
          </table:table-cell>
          <table:table-cell office:value-type="float" office:value="4603.885742" calcext:value-type="float">
            <text:p>4603.9</text:p>
          </table:table-cell>
          <table:table-cell office:value-type="float" office:value="3166.791504" calcext:value-type="float">
            <text:p>3166.8</text:p>
          </table:table-cell>
          <table:table-cell office:value-type="float" office:value="2262.95874" calcext:value-type="float">
            <text:p>2263.0</text:p>
          </table:table-cell>
          <table:table-cell office:value-type="float" office:value="1627.395508" calcext:value-type="float">
            <text:p>1627.4</text:p>
          </table:table-cell>
          <table:table-cell office:value-type="float" office:value="1189.285034" calcext:value-type="float">
            <text:p>1189.3</text:p>
          </table:table-cell>
          <table:table-cell office:value-type="float" office:value="905.819214" calcext:value-type="float">
            <text:p>905.8</text:p>
          </table:table-cell>
          <table:table-cell office:value-type="float" office:value="711.246826" calcext:value-type="float">
            <text:p>711.2</text:p>
          </table:table-cell>
          <table:table-cell office:value-type="float" office:value="571.897705" calcext:value-type="float">
            <text:p>571.9</text:p>
          </table:table-cell>
          <table:table-cell office:value-type="float" office:value="466.914032" calcext:value-type="float">
            <text:p>466.9</text:p>
          </table:table-cell>
          <table:table-cell office:value-type="float" office:value="387.853516" calcext:value-type="float">
            <text:p>387.9</text:p>
          </table:table-cell>
          <table:table-cell office:value-type="float" office:value="325.081818" calcext:value-type="float">
            <text:p>325.1</text:p>
          </table:table-cell>
          <table:table-cell office:value-type="float" office:value="277.009827" calcext:value-type="float">
            <text:p>277.0</text:p>
          </table:table-cell>
          <table:table-cell office:value-type="float" office:value="232.712097" calcext:value-type="float">
            <text:p>232.7</text:p>
          </table:table-cell>
          <table:table-cell office:value-type="float" office:value="190.698776" calcext:value-type="float">
            <text:p>190.7</text:p>
          </table:table-cell>
          <table:table-cell office:value-type="float" office:value="156.631241" calcext:value-type="float">
            <text:p>156.6</text:p>
          </table:table-cell>
          <table:table-cell office:value-type="float" office:value="125.642685" calcext:value-type="float">
            <text:p>125.6</text:p>
          </table:table-cell>
          <table:table-cell office:value-type="float" office:value="100.315506" calcext:value-type="float">
            <text:p>100.3</text:p>
          </table:table-cell>
          <table:table-cell office:value-type="float" office:value="80.053757" calcext:value-type="float">
            <text:p>80.1</text:p>
          </table:table-cell>
          <table:table-cell office:value-type="float" office:value="65.652023" calcext:value-type="float">
            <text:p>65.7</text:p>
          </table:table-cell>
          <table:table-cell office:value-type="float" office:value="54.031319" calcext:value-type="float">
            <text:p>54.0</text:p>
          </table:table-cell>
          <table:table-cell office:value-type="float" office:value="43.900448" calcext:value-type="float">
            <text:p>43.9</text:p>
          </table:table-cell>
          <table:table-cell office:value-type="float" office:value="35.160088" calcext:value-type="float">
            <text:p>35.2</text:p>
          </table:table-cell>
          <table:table-cell office:value-type="float" office:value="28.604816" calcext:value-type="float">
            <text:p>28.6</text:p>
          </table:table-cell>
          <table:table-cell office:value-type="float" office:value="3.873569" calcext:value-type="float">
            <text:p>3.9</text:p>
          </table:table-cell>
          <table:table-cell office:value-type="float" office:value="0.297967" calcext:value-type="float">
            <text:p>0.3</text:p>
          </table:table-cell>
          <table:table-cell office:value-type="float" office:value="0.099322" calcext:value-type="float">
            <text:p>0.1</text:p>
          </table:table-cell>
        </table:table-row>
        <table:table-row table:style-name="ro1">
          <table:table-cell/>
          <table:table-cell office:value-type="time" office:time-value="PT1108452H33M19.999999814S" calcext:value-type="time">
            <text:p>12:33:20</text:p>
          </table:table-cell>
          <table:table-cell office:value-type="float" office:value="10.072055" calcext:value-type="float">
            <text:p>10.1</text:p>
          </table:table-cell>
          <table:table-cell office:value-type="float" office:value="21329.113281" calcext:value-type="float">
            <text:p>21329.1</text:p>
          </table:table-cell>
          <table:table-cell office:value-type="float" office:value="14062.076172" calcext:value-type="float">
            <text:p>14062.1</text:p>
          </table:table-cell>
          <table:table-cell office:value-type="float" office:value="9355.489258" calcext:value-type="float">
            <text:p>9355.5</text:p>
          </table:table-cell>
          <table:table-cell office:value-type="float" office:value="6603.716797" calcext:value-type="float">
            <text:p>6603.7</text:p>
          </table:table-cell>
          <table:table-cell office:value-type="float" office:value="4567.290527" calcext:value-type="float">
            <text:p>4567.3</text:p>
          </table:table-cell>
          <table:table-cell office:value-type="float" office:value="3173.632324" calcext:value-type="float">
            <text:p>3173.6</text:p>
          </table:table-cell>
          <table:table-cell office:value-type="float" office:value="2252.866943" calcext:value-type="float">
            <text:p>2252.9</text:p>
          </table:table-cell>
          <table:table-cell office:value-type="float" office:value="1616.750488" calcext:value-type="float">
            <text:p>1616.8</text:p>
          </table:table-cell>
          <table:table-cell office:value-type="float" office:value="1191.415283" calcext:value-type="float">
            <text:p>1191.4</text:p>
          </table:table-cell>
          <table:table-cell office:value-type="float" office:value="908.057007" calcext:value-type="float">
            <text:p>908.1</text:p>
          </table:table-cell>
          <table:table-cell office:value-type="float" office:value="718.224854" calcext:value-type="float">
            <text:p>718.2</text:p>
          </table:table-cell>
          <table:table-cell office:value-type="float" office:value="581.509949" calcext:value-type="float">
            <text:p>581.5</text:p>
          </table:table-cell>
          <table:table-cell office:value-type="float" office:value="475.275421" calcext:value-type="float">
            <text:p>475.3</text:p>
          </table:table-cell>
          <table:table-cell office:value-type="float" office:value="395.351288" calcext:value-type="float">
            <text:p>395.4</text:p>
          </table:table-cell>
          <table:table-cell office:value-type="float" office:value="329.426331" calcext:value-type="float">
            <text:p>329.4</text:p>
          </table:table-cell>
          <table:table-cell office:value-type="float" office:value="276.606903" calcext:value-type="float">
            <text:p>276.6</text:p>
          </table:table-cell>
          <table:table-cell office:value-type="float" office:value="233.616684" calcext:value-type="float">
            <text:p>233.6</text:p>
          </table:table-cell>
          <table:table-cell office:value-type="float" office:value="194.49855" calcext:value-type="float">
            <text:p>194.5</text:p>
          </table:table-cell>
          <table:table-cell office:value-type="float" office:value="162.628189" calcext:value-type="float">
            <text:p>162.6</text:p>
          </table:table-cell>
          <table:table-cell office:value-type="float" office:value="132.644241" calcext:value-type="float">
            <text:p>132.6</text:p>
          </table:table-cell>
          <table:table-cell office:value-type="float" office:value="107.32666" calcext:value-type="float">
            <text:p>107.3</text:p>
          </table:table-cell>
          <table:table-cell office:value-type="float" office:value="86.377609" calcext:value-type="float">
            <text:p>86.4</text:p>
          </table:table-cell>
          <table:table-cell office:value-type="float" office:value="69.896362" calcext:value-type="float">
            <text:p>69.9</text:p>
          </table:table-cell>
          <table:table-cell office:value-type="float" office:value="57.386501" calcext:value-type="float">
            <text:p>57.4</text:p>
          </table:table-cell>
          <table:table-cell office:value-type="float" office:value="46.862335" calcext:value-type="float">
            <text:p>46.9</text:p>
          </table:table-cell>
          <table:table-cell office:value-type="float" office:value="39.614559" calcext:value-type="float">
            <text:p>39.6</text:p>
          </table:table-cell>
          <table:table-cell office:value-type="float" office:value="32.863205" calcext:value-type="float">
            <text:p>32.9</text:p>
          </table:table-cell>
          <table:table-cell office:value-type="float" office:value="3.67353" calcext:value-type="float">
            <text:p>3.7</text:p>
          </table:table-cell>
          <table:table-cell office:value-type="float" office:value="0.595708" calcext:value-type="float">
            <text:p>0.6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/>
          <table:table-cell office:value-type="time" office:time-value="PT1108452H35M20.99999981S" calcext:value-type="time">
            <text:p>12:35:21</text:p>
          </table:table-cell>
          <table:table-cell office:value-type="float" office:value="10.039492" calcext:value-type="float">
            <text:p>10.0</text:p>
          </table:table-cell>
          <table:table-cell office:value-type="float" office:value="21384.548828" calcext:value-type="float">
            <text:p>21384.5</text:p>
          </table:table-cell>
          <table:table-cell office:value-type="float" office:value="14053.5" calcext:value-type="float">
            <text:p>14053.5</text:p>
          </table:table-cell>
          <table:table-cell office:value-type="float" office:value="9354.557617" calcext:value-type="float">
            <text:p>9354.6</text:p>
          </table:table-cell>
          <table:table-cell office:value-type="float" office:value="6615.773438" calcext:value-type="float">
            <text:p>6615.8</text:p>
          </table:table-cell>
          <table:table-cell office:value-type="float" office:value="4575.530273" calcext:value-type="float">
            <text:p>4575.5</text:p>
          </table:table-cell>
          <table:table-cell office:value-type="float" office:value="3160.319336" calcext:value-type="float">
            <text:p>3160.3</text:p>
          </table:table-cell>
          <table:table-cell office:value-type="float" office:value="2266.449463" calcext:value-type="float">
            <text:p>2266.4</text:p>
          </table:table-cell>
          <table:table-cell office:value-type="float" office:value="1626.576416" calcext:value-type="float">
            <text:p>1626.6</text:p>
          </table:table-cell>
          <table:table-cell office:value-type="float" office:value="1198.168213" calcext:value-type="float">
            <text:p>1198.2</text:p>
          </table:table-cell>
          <table:table-cell office:value-type="float" office:value="915.982605" calcext:value-type="float">
            <text:p>916.0</text:p>
          </table:table-cell>
          <table:table-cell office:value-type="float" office:value="728.722168" calcext:value-type="float">
            <text:p>728.7</text:p>
          </table:table-cell>
          <table:table-cell office:value-type="float" office:value="581.50354" calcext:value-type="float">
            <text:p>581.5</text:p>
          </table:table-cell>
          <table:table-cell office:value-type="float" office:value="473.629547" calcext:value-type="float">
            <text:p>473.6</text:p>
          </table:table-cell>
          <table:table-cell office:value-type="float" office:value="395.936371" calcext:value-type="float">
            <text:p>395.9</text:p>
          </table:table-cell>
          <table:table-cell office:value-type="float" office:value="334.080658" calcext:value-type="float">
            <text:p>334.1</text:p>
          </table:table-cell>
          <table:table-cell office:value-type="float" office:value="282.783234" calcext:value-type="float">
            <text:p>282.8</text:p>
          </table:table-cell>
          <table:table-cell office:value-type="float" office:value="241.944519" calcext:value-type="float">
            <text:p>241.9</text:p>
          </table:table-cell>
          <table:table-cell office:value-type="float" office:value="199.910522" calcext:value-type="float">
            <text:p>199.9</text:p>
          </table:table-cell>
          <table:table-cell office:value-type="float" office:value="166.143875" calcext:value-type="float">
            <text:p>166.1</text:p>
          </table:table-cell>
          <table:table-cell office:value-type="float" office:value="136.261887" calcext:value-type="float">
            <text:p>136.3</text:p>
          </table:table-cell>
          <table:table-cell office:value-type="float" office:value="109.666908" calcext:value-type="float">
            <text:p>109.7</text:p>
          </table:table-cell>
          <table:table-cell office:value-type="float" office:value="85.960526" calcext:value-type="float">
            <text:p>86.0</text:p>
          </table:table-cell>
          <table:table-cell office:value-type="float" office:value="69.525429" calcext:value-type="float">
            <text:p>69.5</text:p>
          </table:table-cell>
          <table:table-cell office:value-type="float" office:value="55.680111" calcext:value-type="float">
            <text:p>55.7</text:p>
          </table:table-cell>
          <table:table-cell office:value-type="float" office:value="45.121807" calcext:value-type="float">
            <text:p>45.1</text:p>
          </table:table-cell>
          <table:table-cell office:value-type="float" office:value="36.954063" calcext:value-type="float">
            <text:p>37.0</text:p>
          </table:table-cell>
          <table:table-cell office:value-type="float" office:value="28.686712" calcext:value-type="float">
            <text:p>28.7</text:p>
          </table:table-cell>
          <table:table-cell office:value-type="float" office:value="3.884659" calcext:value-type="float">
            <text:p>3.9</text:p>
          </table:table-cell>
          <table:table-cell office:value-type="float" office:value="0.796853" calcext:value-type="float">
            <text:p>0.8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/>
          <table:table-cell office:value-type="time" office:time-value="PT1108452H37M23.000001088S" calcext:value-type="time">
            <text:p>12:37:23</text:p>
          </table:table-cell>
          <table:table-cell office:value-type="float" office:value="10.096044" calcext:value-type="float">
            <text:p>10.1</text:p>
          </table:table-cell>
          <table:table-cell office:value-type="float" office:value="21447.412109" calcext:value-type="float">
            <text:p>21447.4</text:p>
          </table:table-cell>
          <table:table-cell office:value-type="float" office:value="14124.542969" calcext:value-type="float">
            <text:p>14124.5</text:p>
          </table:table-cell>
          <table:table-cell office:value-type="float" office:value="9409.230469" calcext:value-type="float">
            <text:p>9409.2</text:p>
          </table:table-cell>
          <table:table-cell office:value-type="float" office:value="6670.831055" calcext:value-type="float">
            <text:p>6670.8</text:p>
          </table:table-cell>
          <table:table-cell office:value-type="float" office:value="4616.957031" calcext:value-type="float">
            <text:p>4617.0</text:p>
          </table:table-cell>
          <table:table-cell office:value-type="float" office:value="3181.840576" calcext:value-type="float">
            <text:p>3181.8</text:p>
          </table:table-cell>
          <table:table-cell office:value-type="float" office:value="2271.186768" calcext:value-type="float">
            <text:p>2271.2</text:p>
          </table:table-cell>
          <table:table-cell office:value-type="float" office:value="1632.124512" calcext:value-type="float">
            <text:p>1632.1</text:p>
          </table:table-cell>
          <table:table-cell office:value-type="float" office:value="1199.875977" calcext:value-type="float">
            <text:p>1199.9</text:p>
          </table:table-cell>
          <table:table-cell office:value-type="float" office:value="913.129944" calcext:value-type="float">
            <text:p>913.1</text:p>
          </table:table-cell>
          <table:table-cell office:value-type="float" office:value="717.01355" calcext:value-type="float">
            <text:p>717.0</text:p>
          </table:table-cell>
          <table:table-cell office:value-type="float" office:value="574.482483" calcext:value-type="float">
            <text:p>574.5</text:p>
          </table:table-cell>
          <table:table-cell office:value-type="float" office:value="465.925079" calcext:value-type="float">
            <text:p>465.9</text:p>
          </table:table-cell>
          <table:table-cell office:value-type="float" office:value="385.992798" calcext:value-type="float">
            <text:p>386.0</text:p>
          </table:table-cell>
          <table:table-cell office:value-type="float" office:value="324.483551" calcext:value-type="float">
            <text:p>324.5</text:p>
          </table:table-cell>
          <table:table-cell office:value-type="float" office:value="273.57251" calcext:value-type="float">
            <text:p>273.6</text:p>
          </table:table-cell>
          <table:table-cell office:value-type="float" office:value="231.773956" calcext:value-type="float">
            <text:p>231.8</text:p>
          </table:table-cell>
          <table:table-cell office:value-type="float" office:value="192.550674" calcext:value-type="float">
            <text:p>192.6</text:p>
          </table:table-cell>
          <table:table-cell office:value-type="float" office:value="156.397903" calcext:value-type="float">
            <text:p>156.4</text:p>
          </table:table-cell>
          <table:table-cell office:value-type="float" office:value="124.999458" calcext:value-type="float">
            <text:p>125.0</text:p>
          </table:table-cell>
          <table:table-cell office:value-type="float" office:value="102.614456" calcext:value-type="float">
            <text:p>102.6</text:p>
          </table:table-cell>
          <table:table-cell office:value-type="float" office:value="82.507568" calcext:value-type="float">
            <text:p>82.5</text:p>
          </table:table-cell>
          <table:table-cell office:value-type="float" office:value="66.758827" calcext:value-type="float">
            <text:p>66.8</text:p>
          </table:table-cell>
          <table:table-cell office:value-type="float" office:value="54.872982" calcext:value-type="float">
            <text:p>54.9</text:p>
          </table:table-cell>
          <table:table-cell office:value-type="float" office:value="44.17572" calcext:value-type="float">
            <text:p>44.2</text:p>
          </table:table-cell>
          <table:table-cell office:value-type="float" office:value="37.143261" calcext:value-type="float">
            <text:p>37.1</text:p>
          </table:table-cell>
          <table:table-cell office:value-type="float" office:value="29.516512" calcext:value-type="float">
            <text:p>29.5</text:p>
          </table:table-cell>
          <table:table-cell office:value-type="float" office:value="4.358143" calcext:value-type="float">
            <text:p>4.4</text:p>
          </table:table-cell>
          <table:table-cell office:value-type="float" office:value="0.495243" calcext:value-type="float">
            <text:p>0.5</text:p>
          </table:table-cell>
          <table:table-cell office:value-type="float" office:value="0.099049" calcext:value-type="float">
            <text:p>0.1</text:p>
          </table:table-cell>
        </table:table-row>
        <table:table-row table:style-name="ro1">
          <table:table-cell/>
          <table:table-cell office:value-type="time" office:time-value="PT1108452H39M24.999999851S" calcext:value-type="time">
            <text:p>12:39:25</text:p>
          </table:table-cell>
          <table:table-cell office:value-type="float" office:value="10.052601" calcext:value-type="float">
            <text:p>10.1</text:p>
          </table:table-cell>
          <table:table-cell office:value-type="float" office:value="22469.607422" calcext:value-type="float">
            <text:p>22469.6</text:p>
          </table:table-cell>
          <table:table-cell office:value-type="float" office:value="14584.881836" calcext:value-type="float">
            <text:p>14584.9</text:p>
          </table:table-cell>
          <table:table-cell office:value-type="float" office:value="9602.191406" calcext:value-type="float">
            <text:p>9602.2</text:p>
          </table:table-cell>
          <table:table-cell office:value-type="float" office:value="6788.889648" calcext:value-type="float">
            <text:p>6788.9</text:p>
          </table:table-cell>
          <table:table-cell office:value-type="float" office:value="4683.563965" calcext:value-type="float">
            <text:p>4683.6</text:p>
          </table:table-cell>
          <table:table-cell office:value-type="float" office:value="3191.412842" calcext:value-type="float">
            <text:p>3191.4</text:p>
          </table:table-cell>
          <table:table-cell office:value-type="float" office:value="2259.017334" calcext:value-type="float">
            <text:p>2259.0</text:p>
          </table:table-cell>
          <table:table-cell office:value-type="float" office:value="1634.402954" calcext:value-type="float">
            <text:p>1634.4</text:p>
          </table:table-cell>
          <table:table-cell office:value-type="float" office:value="1192.029785" calcext:value-type="float">
            <text:p>1192.0</text:p>
          </table:table-cell>
          <table:table-cell office:value-type="float" office:value="905.536804" calcext:value-type="float">
            <text:p>905.5</text:p>
          </table:table-cell>
          <table:table-cell office:value-type="float" office:value="714.342468" calcext:value-type="float">
            <text:p>714.3</text:p>
          </table:table-cell>
          <table:table-cell office:value-type="float" office:value="564.331543" calcext:value-type="float">
            <text:p>564.3</text:p>
          </table:table-cell>
          <table:table-cell office:value-type="float" office:value="458.488312" calcext:value-type="float">
            <text:p>458.5</text:p>
          </table:table-cell>
          <table:table-cell office:value-type="float" office:value="379.603241" calcext:value-type="float">
            <text:p>379.6</text:p>
          </table:table-cell>
          <table:table-cell office:value-type="float" office:value="319.41983" calcext:value-type="float">
            <text:p>319.4</text:p>
          </table:table-cell>
          <table:table-cell office:value-type="float" office:value="271.273071" calcext:value-type="float">
            <text:p>271.3</text:p>
          </table:table-cell>
          <table:table-cell office:value-type="float" office:value="227.801743" calcext:value-type="float">
            <text:p>227.8</text:p>
          </table:table-cell>
          <table:table-cell office:value-type="float" office:value="188.110519" calcext:value-type="float">
            <text:p>188.1</text:p>
          </table:table-cell>
          <table:table-cell office:value-type="float" office:value="153.890518" calcext:value-type="float">
            <text:p>153.9</text:p>
          </table:table-cell>
          <table:table-cell office:value-type="float" office:value="123.64959" calcext:value-type="float">
            <text:p>123.6</text:p>
          </table:table-cell>
          <table:table-cell office:value-type="float" office:value="98.780403" calcext:value-type="float">
            <text:p>98.8</text:p>
          </table:table-cell>
          <table:table-cell office:value-type="float" office:value="76.000229" calcext:value-type="float">
            <text:p>76.0</text:p>
          </table:table-cell>
          <table:table-cell office:value-type="float" office:value="61.277676" calcext:value-type="float">
            <text:p>61.3</text:p>
          </table:table-cell>
          <table:table-cell office:value-type="float" office:value="50.335232" calcext:value-type="float">
            <text:p>50.3</text:p>
          </table:table-cell>
          <table:table-cell office:value-type="float" office:value="40.089127" calcext:value-type="float">
            <text:p>40.1</text:p>
          </table:table-cell>
          <table:table-cell office:value-type="float" office:value="32.031513" calcext:value-type="float">
            <text:p>32.0</text:p>
          </table:table-cell>
          <table:table-cell office:value-type="float" office:value="26.162384" calcext:value-type="float">
            <text:p>26.2</text:p>
          </table:table-cell>
          <table:table-cell office:value-type="float" office:value="3.68064" calcext:value-type="float">
            <text:p>3.7</text:p>
          </table:table-cell>
          <table:table-cell office:value-type="float" office:value="0.497384" calcext:value-type="float">
            <text:p>0.5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/>
          <table:table-cell office:value-type="time" office:time-value="PT1108452H41M26.000000685S" calcext:value-type="time">
            <text:p>12:41:26</text:p>
          </table:table-cell>
          <table:table-cell office:value-type="float" office:value="10.088013" calcext:value-type="float">
            <text:p>10.1</text:p>
          </table:table-cell>
          <table:table-cell office:value-type="float" office:value="22149.357422" calcext:value-type="float">
            <text:p>22149.4</text:p>
          </table:table-cell>
          <table:table-cell office:value-type="float" office:value="14435.648438" calcext:value-type="float">
            <text:p>14435.6</text:p>
          </table:table-cell>
          <table:table-cell office:value-type="float" office:value="9552.228516" calcext:value-type="float">
            <text:p>9552.2</text:p>
          </table:table-cell>
          <table:table-cell office:value-type="float" office:value="6750.586426" calcext:value-type="float">
            <text:p>6750.6</text:p>
          </table:table-cell>
          <table:table-cell office:value-type="float" office:value="4655.525391" calcext:value-type="float">
            <text:p>4655.5</text:p>
          </table:table-cell>
          <table:table-cell office:value-type="float" office:value="3205.784912" calcext:value-type="float">
            <text:p>3205.8</text:p>
          </table:table-cell>
          <table:table-cell office:value-type="float" office:value="2273.292236" calcext:value-type="float">
            <text:p>2273.3</text:p>
          </table:table-cell>
          <table:table-cell office:value-type="float" office:value="1623.610229" calcext:value-type="float">
            <text:p>1623.6</text:p>
          </table:table-cell>
          <table:table-cell office:value-type="float" office:value="1188.83667" calcext:value-type="float">
            <text:p>1188.8</text:p>
          </table:table-cell>
          <table:table-cell office:value-type="float" office:value="905.530212" calcext:value-type="float">
            <text:p>905.5</text:p>
          </table:table-cell>
          <table:table-cell office:value-type="float" office:value="712.033203" calcext:value-type="float">
            <text:p>712.0</text:p>
          </table:table-cell>
          <table:table-cell office:value-type="float" office:value="567.703491" calcext:value-type="float">
            <text:p>567.7</text:p>
          </table:table-cell>
          <table:table-cell office:value-type="float" office:value="461.636993" calcext:value-type="float">
            <text:p>461.6</text:p>
          </table:table-cell>
          <table:table-cell office:value-type="float" office:value="382.632355" calcext:value-type="float">
            <text:p>382.6</text:p>
          </table:table-cell>
          <table:table-cell office:value-type="float" office:value="319.587219" calcext:value-type="float">
            <text:p>319.6</text:p>
          </table:table-cell>
          <table:table-cell office:value-type="float" office:value="269.626953" calcext:value-type="float">
            <text:p>269.6</text:p>
          </table:table-cell>
          <table:table-cell office:value-type="float" office:value="226.10994" calcext:value-type="float">
            <text:p>226.1</text:p>
          </table:table-cell>
          <table:table-cell office:value-type="float" office:value="187.747589" calcext:value-type="float">
            <text:p>187.7</text:p>
          </table:table-cell>
          <table:table-cell office:value-type="float" office:value="152.557297" calcext:value-type="float">
            <text:p>152.6</text:p>
          </table:table-cell>
          <table:table-cell office:value-type="float" office:value="124.305946" calcext:value-type="float">
            <text:p>124.3</text:p>
          </table:table-cell>
          <table:table-cell office:value-type="float" office:value="102.795273" calcext:value-type="float">
            <text:p>102.8</text:p>
          </table:table-cell>
          <table:table-cell office:value-type="float" office:value="83.068886" calcext:value-type="float">
            <text:p>83.1</text:p>
          </table:table-cell>
          <table:table-cell office:value-type="float" office:value="64.928543" calcext:value-type="float">
            <text:p>64.9</text:p>
          </table:table-cell>
          <table:table-cell office:value-type="float" office:value="50.753307" calcext:value-type="float">
            <text:p>50.8</text:p>
          </table:table-cell>
          <table:table-cell office:value-type="float" office:value="40.642296" calcext:value-type="float">
            <text:p>40.6</text:p>
          </table:table-cell>
          <table:table-cell office:value-type="float" office:value="34.992027" calcext:value-type="float">
            <text:p>35.0</text:p>
          </table:table-cell>
          <table:table-cell office:value-type="float" office:value="27.061821" calcext:value-type="float">
            <text:p>27.1</text:p>
          </table:table-cell>
          <table:table-cell office:value-type="float" office:value="3.370337" calcext:value-type="float">
            <text:p>3.4</text:p>
          </table:table-cell>
          <table:table-cell office:value-type="float" office:value="0.495638" calcext:value-type="float">
            <text:p>0.5</text:p>
          </table:table-cell>
          <table:table-cell office:value-type="float" office:value="0.099128" calcext:value-type="float">
            <text:p>0.1</text:p>
          </table:table-cell>
        </table:table-row>
        <table:table-row table:style-name="ro1">
          <table:table-cell/>
          <table:table-cell office:value-type="time" office:time-value="PT1108452H43M27.999999449S" calcext:value-type="time">
            <text:p>12:43:28</text:p>
          </table:table-cell>
          <table:table-cell office:value-type="float" office:value="9.963431" calcext:value-type="float">
            <text:p>10.0</text:p>
          </table:table-cell>
          <table:table-cell office:value-type="float" office:value="21632.205078" calcext:value-type="float">
            <text:p>21632.2</text:p>
          </table:table-cell>
          <table:table-cell office:value-type="float" office:value="14239.271484" calcext:value-type="float">
            <text:p>14239.3</text:p>
          </table:table-cell>
          <table:table-cell office:value-type="float" office:value="9444.938477" calcext:value-type="float">
            <text:p>9444.9</text:p>
          </table:table-cell>
          <table:table-cell office:value-type="float" office:value="6711.442871" calcext:value-type="float">
            <text:p>6711.4</text:p>
          </table:table-cell>
          <table:table-cell office:value-type="float" office:value="4655.625" calcext:value-type="float">
            <text:p>4655.6</text:p>
          </table:table-cell>
          <table:table-cell office:value-type="float" office:value="3215.960449" calcext:value-type="float">
            <text:p>3216.0</text:p>
          </table:table-cell>
          <table:table-cell office:value-type="float" office:value="2299.9104" calcext:value-type="float">
            <text:p>2299.9</text:p>
          </table:table-cell>
          <table:table-cell office:value-type="float" office:value="1650.033936" calcext:value-type="float">
            <text:p>1650.0</text:p>
          </table:table-cell>
          <table:table-cell office:value-type="float" office:value="1206.311279" calcext:value-type="float">
            <text:p>1206.3</text:p>
          </table:table-cell>
          <table:table-cell office:value-type="float" office:value="916.150208" calcext:value-type="float">
            <text:p>916.2</text:p>
          </table:table-cell>
          <table:table-cell office:value-type="float" office:value="716.620605" calcext:value-type="float">
            <text:p>716.6</text:p>
          </table:table-cell>
          <table:table-cell office:value-type="float" office:value="573.798279" calcext:value-type="float">
            <text:p>573.8</text:p>
          </table:table-cell>
          <table:table-cell office:value-type="float" office:value="460.58429" calcext:value-type="float">
            <text:p>460.6</text:p>
          </table:table-cell>
          <table:table-cell office:value-type="float" office:value="378.584442" calcext:value-type="float">
            <text:p>378.6</text:p>
          </table:table-cell>
          <table:table-cell office:value-type="float" office:value="315.754669" calcext:value-type="float">
            <text:p>315.8</text:p>
          </table:table-cell>
          <table:table-cell office:value-type="float" office:value="266.17337" calcext:value-type="float">
            <text:p>266.2</text:p>
          </table:table-cell>
          <table:table-cell office:value-type="float" office:value="225.725449" calcext:value-type="float">
            <text:p>225.7</text:p>
          </table:table-cell>
          <table:table-cell office:value-type="float" office:value="189.894424" calcext:value-type="float">
            <text:p>189.9</text:p>
          </table:table-cell>
          <table:table-cell office:value-type="float" office:value="155.267792" calcext:value-type="float">
            <text:p>155.3</text:p>
          </table:table-cell>
          <table:table-cell office:value-type="float" office:value="125.659523" calcext:value-type="float">
            <text:p>125.7</text:p>
          </table:table-cell>
          <table:table-cell office:value-type="float" office:value="102.374367" calcext:value-type="float">
            <text:p>102.4</text:p>
          </table:table-cell>
          <table:table-cell office:value-type="float" office:value="80.795456" calcext:value-type="float">
            <text:p>80.8</text:p>
          </table:table-cell>
          <table:table-cell office:value-type="float" office:value="63.933796" calcext:value-type="float">
            <text:p>63.9</text:p>
          </table:table-cell>
          <table:table-cell office:value-type="float" office:value="50.384247" calcext:value-type="float">
            <text:p>50.4</text:p>
          </table:table-cell>
          <table:table-cell office:value-type="float" office:value="41.551949" calcext:value-type="float">
            <text:p>41.6</text:p>
          </table:table-cell>
          <table:table-cell office:value-type="float" office:value="34.526257" calcext:value-type="float">
            <text:p>34.5</text:p>
          </table:table-cell>
          <table:table-cell office:value-type="float" office:value="28.002401" calcext:value-type="float">
            <text:p>28.0</text:p>
          </table:table-cell>
          <table:table-cell office:value-type="float" office:value="3.211745" calcext:value-type="float">
            <text:p>3.2</text:p>
          </table:table-cell>
          <table:table-cell office:value-type="float" office:value="0.401468" calcext:value-type="float">
            <text:p>0.4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/>
          <table:table-cell office:value-type="time" office:time-value="PT1108452H45M29.999999888S" calcext:value-type="time">
            <text:p>12:45:30</text:p>
          </table:table-cell>
          <table:table-cell office:value-type="float" office:value="10.103598" calcext:value-type="float">
            <text:p>10.1</text:p>
          </table:table-cell>
          <table:table-cell office:value-type="float" office:value="21753.242188" calcext:value-type="float">
            <text:p>21753.2</text:p>
          </table:table-cell>
          <table:table-cell office:value-type="float" office:value="14358.450195" calcext:value-type="float">
            <text:p>14358.5</text:p>
          </table:table-cell>
          <table:table-cell office:value-type="float" office:value="9546.005859" calcext:value-type="float">
            <text:p>9546.0</text:p>
          </table:table-cell>
          <table:table-cell office:value-type="float" office:value="6751.951172" calcext:value-type="float">
            <text:p>6752.0</text:p>
          </table:table-cell>
          <table:table-cell office:value-type="float" office:value="4668.436035" calcext:value-type="float">
            <text:p>4668.4</text:p>
          </table:table-cell>
          <table:table-cell office:value-type="float" office:value="3237.955566" calcext:value-type="float">
            <text:p>3238.0</text:p>
          </table:table-cell>
          <table:table-cell office:value-type="float" office:value="2320.262695" calcext:value-type="float">
            <text:p>2320.3</text:p>
          </table:table-cell>
          <table:table-cell office:value-type="float" office:value="1670.988892" calcext:value-type="float">
            <text:p>1671.0</text:p>
          </table:table-cell>
          <table:table-cell office:value-type="float" office:value="1223.623535" calcext:value-type="float">
            <text:p>1223.6</text:p>
          </table:table-cell>
          <table:table-cell office:value-type="float" office:value="932.04425" calcext:value-type="float">
            <text:p>932.0</text:p>
          </table:table-cell>
          <table:table-cell office:value-type="float" office:value="731.620605" calcext:value-type="float">
            <text:p>731.6</text:p>
          </table:table-cell>
          <table:table-cell office:value-type="float" office:value="587.711426" calcext:value-type="float">
            <text:p>587.7</text:p>
          </table:table-cell>
          <table:table-cell office:value-type="float" office:value="476.463959" calcext:value-type="float">
            <text:p>476.5</text:p>
          </table:table-cell>
          <table:table-cell office:value-type="float" office:value="392.533447" calcext:value-type="float">
            <text:p>392.5</text:p>
          </table:table-cell>
          <table:table-cell office:value-type="float" office:value="332.257874" calcext:value-type="float">
            <text:p>332.3</text:p>
          </table:table-cell>
          <table:table-cell office:value-type="float" office:value="282.077728" calcext:value-type="float">
            <text:p>282.1</text:p>
          </table:table-cell>
          <table:table-cell office:value-type="float" office:value="234.569916" calcext:value-type="float">
            <text:p>234.6</text:p>
          </table:table-cell>
          <table:table-cell office:value-type="float" office:value="195.672882" calcext:value-type="float">
            <text:p>195.7</text:p>
          </table:table-cell>
          <table:table-cell office:value-type="float" office:value="162.615341" calcext:value-type="float">
            <text:p>162.6</text:p>
          </table:table-cell>
          <table:table-cell office:value-type="float" office:value="133.615768" calcext:value-type="float">
            <text:p>133.6</text:p>
          </table:table-cell>
          <table:table-cell office:value-type="float" office:value="107.486465" calcext:value-type="float">
            <text:p>107.5</text:p>
          </table:table-cell>
          <table:table-cell office:value-type="float" office:value="86.899742" calcext:value-type="float">
            <text:p>86.9</text:p>
          </table:table-cell>
          <table:table-cell office:value-type="float" office:value="69.777122" calcext:value-type="float">
            <text:p>69.8</text:p>
          </table:table-cell>
          <table:table-cell office:value-type="float" office:value="55.920673" calcext:value-type="float">
            <text:p>55.9</text:p>
          </table:table-cell>
          <table:table-cell office:value-type="float" office:value="45.033463" calcext:value-type="float">
            <text:p>45.0</text:p>
          </table:table-cell>
          <table:table-cell office:value-type="float" office:value="37.709339" calcext:value-type="float">
            <text:p>37.7</text:p>
          </table:table-cell>
          <table:table-cell office:value-type="float" office:value="29.692394" calcext:value-type="float">
            <text:p>29.7</text:p>
          </table:table-cell>
          <table:table-cell office:value-type="float" office:value="2.870265" calcext:value-type="float">
            <text:p>2.9</text:p>
          </table:table-cell>
          <table:table-cell office:value-type="float" office:value="0.395899" calcext:value-type="float">
            <text:p>0.4</text:p>
          </table:table-cell>
          <table:table-cell office:value-type="float" office:value="0.098975" calcext:value-type="float">
            <text:p>0.1</text:p>
          </table:table-cell>
        </table:table-row>
        <table:table-row table:style-name="ro1">
          <table:table-cell/>
          <table:table-cell office:value-type="time" office:time-value="PT1108452H47M30.999999885S" calcext:value-type="time">
            <text:p>12:47:31</text:p>
          </table:table-cell>
          <table:table-cell office:value-type="float" office:value="10.025001" calcext:value-type="float">
            <text:p>10.0</text:p>
          </table:table-cell>
          <table:table-cell office:value-type="float" office:value="21790.322266" calcext:value-type="float">
            <text:p>21790.3</text:p>
          </table:table-cell>
          <table:table-cell office:value-type="float" office:value="14331.371094" calcext:value-type="float">
            <text:p>14331.4</text:p>
          </table:table-cell>
          <table:table-cell office:value-type="float" office:value="9498.453125" calcext:value-type="float">
            <text:p>9498.5</text:p>
          </table:table-cell>
          <table:table-cell office:value-type="float" office:value="6706.83252" calcext:value-type="float">
            <text:p>6706.8</text:p>
          </table:table-cell>
          <table:table-cell office:value-type="float" office:value="4642.792969" calcext:value-type="float">
            <text:p>4642.8</text:p>
          </table:table-cell>
          <table:table-cell office:value-type="float" office:value="3206.982422" calcext:value-type="float">
            <text:p>3207.0</text:p>
          </table:table-cell>
          <table:table-cell office:value-type="float" office:value="2291.770508" calcext:value-type="float">
            <text:p>2291.8</text:p>
          </table:table-cell>
          <table:table-cell office:value-type="float" office:value="1648.47876" calcext:value-type="float">
            <text:p>1648.5</text:p>
          </table:table-cell>
          <table:table-cell office:value-type="float" office:value="1201.895142" calcext:value-type="float">
            <text:p>1201.9</text:p>
          </table:table-cell>
          <table:table-cell office:value-type="float" office:value="924.388977" calcext:value-type="float">
            <text:p>924.4</text:p>
          </table:table-cell>
          <table:table-cell office:value-type="float" office:value="734.66333" calcext:value-type="float">
            <text:p>734.7</text:p>
          </table:table-cell>
          <table:table-cell office:value-type="float" office:value="587.531128" calcext:value-type="float">
            <text:p>587.5</text:p>
          </table:table-cell>
          <table:table-cell office:value-type="float" office:value="480.897736" calcext:value-type="float">
            <text:p>480.9</text:p>
          </table:table-cell>
          <table:table-cell office:value-type="float" office:value="394.713196" calcext:value-type="float">
            <text:p>394.7</text:p>
          </table:table-cell>
          <table:table-cell office:value-type="float" office:value="325.68576" calcext:value-type="float">
            <text:p>325.7</text:p>
          </table:table-cell>
          <table:table-cell office:value-type="float" office:value="276.209473" calcext:value-type="float">
            <text:p>276.2</text:p>
          </table:table-cell>
          <table:table-cell office:value-type="float" office:value="232.917694" calcext:value-type="float">
            <text:p>232.9</text:p>
          </table:table-cell>
          <table:table-cell office:value-type="float" office:value="192.319199" calcext:value-type="float">
            <text:p>192.3</text:p>
          </table:table-cell>
          <table:table-cell office:value-type="float" office:value="158.204483" calcext:value-type="float">
            <text:p>158.2</text:p>
          </table:table-cell>
          <table:table-cell office:value-type="float" office:value="128.678299" calcext:value-type="float">
            <text:p>128.7</text:p>
          </table:table-cell>
          <table:table-cell office:value-type="float" office:value="103.341637" calcext:value-type="float">
            <text:p>103.3</text:p>
          </table:table-cell>
          <table:table-cell office:value-type="float" office:value="83.192017" calcext:value-type="float">
            <text:p>83.2</text:p>
          </table:table-cell>
          <table:table-cell office:value-type="float" office:value="65.336655" calcext:value-type="float">
            <text:p>65.3</text:p>
          </table:table-cell>
          <table:table-cell office:value-type="float" office:value="53.16708" calcext:value-type="float">
            <text:p>53.2</text:p>
          </table:table-cell>
          <table:table-cell office:value-type="float" office:value="42.593513" calcext:value-type="float">
            <text:p>42.6</text:p>
          </table:table-cell>
          <table:table-cell office:value-type="float" office:value="35.211967" calcext:value-type="float">
            <text:p>35.2</text:p>
          </table:table-cell>
          <table:table-cell office:value-type="float" office:value="28.827929" calcext:value-type="float">
            <text:p>28.8</text:p>
          </table:table-cell>
          <table:table-cell office:value-type="float" office:value="3.29177" calcext:value-type="float">
            <text:p>3.3</text:p>
          </table:table-cell>
          <table:table-cell office:value-type="float" office:value="0.399002" calcext:value-type="float">
            <text:p>0.4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/>
          <table:table-cell office:value-type="time" office:time-value="PT1108452H49M32.999999486S" calcext:value-type="time">
            <text:p>12:49:33</text:p>
          </table:table-cell>
          <table:table-cell office:value-type="float" office:value="10.062071" calcext:value-type="float">
            <text:p>10.1</text:p>
          </table:table-cell>
          <table:table-cell office:value-type="float" office:value="21527.476562" calcext:value-type="float">
            <text:p>21527.5</text:p>
          </table:table-cell>
          <table:table-cell office:value-type="float" office:value="14202.941406" calcext:value-type="float">
            <text:p>14202.9</text:p>
          </table:table-cell>
          <table:table-cell office:value-type="float" office:value="9470.317383" calcext:value-type="float">
            <text:p>9470.3</text:p>
          </table:table-cell>
          <table:table-cell office:value-type="float" office:value="6687.390625" calcext:value-type="float">
            <text:p>6687.4</text:p>
          </table:table-cell>
          <table:table-cell office:value-type="float" office:value="4620.619629" calcext:value-type="float">
            <text:p>4620.6</text:p>
          </table:table-cell>
          <table:table-cell office:value-type="float" office:value="3202.322998" calcext:value-type="float">
            <text:p>3202.3</text:p>
          </table:table-cell>
          <table:table-cell office:value-type="float" office:value="2283.029053" calcext:value-type="float">
            <text:p>2283.0</text:p>
          </table:table-cell>
          <table:table-cell office:value-type="float" office:value="1644.393066" calcext:value-type="float">
            <text:p>1644.4</text:p>
          </table:table-cell>
          <table:table-cell office:value-type="float" office:value="1210.287598" calcext:value-type="float">
            <text:p>1210.3</text:p>
          </table:table-cell>
          <table:table-cell office:value-type="float" office:value="919.691406" calcext:value-type="float">
            <text:p>919.7</text:p>
          </table:table-cell>
          <table:table-cell office:value-type="float" office:value="722.71405" calcext:value-type="float">
            <text:p>722.7</text:p>
          </table:table-cell>
          <table:table-cell office:value-type="float" office:value="584.86969" calcext:value-type="float">
            <text:p>584.9</text:p>
          </table:table-cell>
          <table:table-cell office:value-type="float" office:value="477.436523" calcext:value-type="float">
            <text:p>477.4</text:p>
          </table:table-cell>
          <table:table-cell office:value-type="float" office:value="397.433105" calcext:value-type="float">
            <text:p>397.4</text:p>
          </table:table-cell>
          <table:table-cell office:value-type="float" office:value="337.107544" calcext:value-type="float">
            <text:p>337.1</text:p>
          </table:table-cell>
          <table:table-cell office:value-type="float" office:value="288.111664" calcext:value-type="float">
            <text:p>288.1</text:p>
          </table:table-cell>
          <table:table-cell office:value-type="float" office:value="242.792969" calcext:value-type="float">
            <text:p>242.8</text:p>
          </table:table-cell>
          <table:table-cell office:value-type="float" office:value="197.076721" calcext:value-type="float">
            <text:p>197.1</text:p>
          </table:table-cell>
          <table:table-cell office:value-type="float" office:value="163.684006" calcext:value-type="float">
            <text:p>163.7</text:p>
          </table:table-cell>
          <table:table-cell office:value-type="float" office:value="133.272766" calcext:value-type="float">
            <text:p>133.3</text:p>
          </table:table-cell>
          <table:table-cell office:value-type="float" office:value="108.725136" calcext:value-type="float">
            <text:p>108.7</text:p>
          </table:table-cell>
          <table:table-cell office:value-type="float" office:value="85.270714" calcext:value-type="float">
            <text:p>85.3</text:p>
          </table:table-cell>
          <table:table-cell office:value-type="float" office:value="67.87867" calcext:value-type="float">
            <text:p>67.9</text:p>
          </table:table-cell>
          <table:table-cell office:value-type="float" office:value="55.45578" calcext:value-type="float">
            <text:p>55.5</text:p>
          </table:table-cell>
          <table:table-cell office:value-type="float" office:value="46.610683" calcext:value-type="float">
            <text:p>46.6</text:p>
          </table:table-cell>
          <table:table-cell office:value-type="float" office:value="37.368053" calcext:value-type="float">
            <text:p>37.4</text:p>
          </table:table-cell>
          <table:table-cell office:value-type="float" office:value="29.91432" calcext:value-type="float">
            <text:p>29.9</text:p>
          </table:table-cell>
          <table:table-cell office:value-type="float" office:value="3.677176" calcext:value-type="float">
            <text:p>3.7</text:p>
          </table:table-cell>
          <table:table-cell office:value-type="float" office:value="0.993831" calcext:value-type="float">
            <text:p>1.0</text:p>
          </table:table-cell>
          <table:table-cell office:value-type="float" office:value="0.099383" calcext:value-type="float">
            <text:p>0.1</text:p>
          </table:table-cell>
        </table:table-row>
        <table:table-row table:style-name="ro1">
          <table:table-cell/>
          <table:table-cell office:value-type="time" office:time-value="PT1108452H51M34.999999925S" calcext:value-type="time">
            <text:p>12:51:35</text:p>
          </table:table-cell>
          <table:table-cell office:value-type="float" office:value="10.018273" calcext:value-type="float">
            <text:p>10.0</text:p>
          </table:table-cell>
          <table:table-cell office:value-type="float" office:value="21667.306641" calcext:value-type="float">
            <text:p>21667.3</text:p>
          </table:table-cell>
          <table:table-cell office:value-type="float" office:value="14309.452148" calcext:value-type="float">
            <text:p>14309.5</text:p>
          </table:table-cell>
          <table:table-cell office:value-type="float" office:value="9519.604492" calcext:value-type="float">
            <text:p>9519.6</text:p>
          </table:table-cell>
          <table:table-cell office:value-type="float" office:value="6698.260254" calcext:value-type="float">
            <text:p>6698.3</text:p>
          </table:table-cell>
          <table:table-cell office:value-type="float" office:value="4631.936035" calcext:value-type="float">
            <text:p>4631.9</text:p>
          </table:table-cell>
          <table:table-cell office:value-type="float" office:value="3188.772949" calcext:value-type="float">
            <text:p>3188.8</text:p>
          </table:table-cell>
          <table:table-cell office:value-type="float" office:value="2275.342285" calcext:value-type="float">
            <text:p>2275.3</text:p>
          </table:table-cell>
          <table:table-cell office:value-type="float" office:value="1647.289795" calcext:value-type="float">
            <text:p>1647.3</text:p>
          </table:table-cell>
          <table:table-cell office:value-type="float" office:value="1218.573242" calcext:value-type="float">
            <text:p>1218.6</text:p>
          </table:table-cell>
          <table:table-cell office:value-type="float" office:value="937.187439" calcext:value-type="float">
            <text:p>937.2</text:p>
          </table:table-cell>
          <table:table-cell office:value-type="float" office:value="744.53949" calcext:value-type="float">
            <text:p>744.5</text:p>
          </table:table-cell>
          <table:table-cell office:value-type="float" office:value="597.108887" calcext:value-type="float">
            <text:p>597.1</text:p>
          </table:table-cell>
          <table:table-cell office:value-type="float" office:value="484.614441" calcext:value-type="float">
            <text:p>484.6</text:p>
          </table:table-cell>
          <table:table-cell office:value-type="float" office:value="398.172394" calcext:value-type="float">
            <text:p>398.2</text:p>
          </table:table-cell>
          <table:table-cell office:value-type="float" office:value="334.788239" calcext:value-type="float">
            <text:p>334.8</text:p>
          </table:table-cell>
          <table:table-cell office:value-type="float" office:value="285.079071" calcext:value-type="float">
            <text:p>285.1</text:p>
          </table:table-cell>
          <table:table-cell office:value-type="float" office:value="240.859863" calcext:value-type="float">
            <text:p>240.9</text:p>
          </table:table-cell>
          <table:table-cell office:value-type="float" office:value="200.932831" calcext:value-type="float">
            <text:p>200.9</text:p>
          </table:table-cell>
          <table:table-cell office:value-type="float" office:value="164.798859" calcext:value-type="float">
            <text:p>164.8</text:p>
          </table:table-cell>
          <table:table-cell office:value-type="float" office:value="135.552307" calcext:value-type="float">
            <text:p>135.6</text:p>
          </table:table-cell>
          <table:table-cell office:value-type="float" office:value="108.801186" calcext:value-type="float">
            <text:p>108.8</text:p>
          </table:table-cell>
          <table:table-cell office:value-type="float" office:value="85.044594" calcext:value-type="float">
            <text:p>85.0</text:p>
          </table:table-cell>
          <table:table-cell office:value-type="float" office:value="67.4767" calcext:value-type="float">
            <text:p>67.5</text:p>
          </table:table-cell>
          <table:table-cell office:value-type="float" office:value="53.70187" calcext:value-type="float">
            <text:p>53.7</text:p>
          </table:table-cell>
          <table:table-cell office:value-type="float" office:value="46.415184" calcext:value-type="float">
            <text:p>46.4</text:p>
          </table:table-cell>
          <table:table-cell office:value-type="float" office:value="37.830872" calcext:value-type="float">
            <text:p>37.8</text:p>
          </table:table-cell>
          <table:table-cell office:value-type="float" office:value="29.94528" calcext:value-type="float">
            <text:p>29.9</text:p>
          </table:table-cell>
          <table:table-cell office:value-type="float" office:value="3.493616" calcext:value-type="float">
            <text:p>3.5</text:p>
          </table:table-cell>
          <table:table-cell office:value-type="float" office:value="0.598906" calcext:value-type="float">
            <text:p>0.6</text:p>
          </table:table-cell>
          <table:table-cell office:value-type="float" office:value="0.099818" calcext:value-type="float">
            <text:p>0.1</text:p>
          </table:table-cell>
        </table:table-row>
        <table:table-row table:style-name="ro1">
          <table:table-cell/>
          <table:table-cell office:value-type="time" office:time-value="PT1108452H53M35.999999922S" calcext:value-type="time">
            <text:p>12:53:36</text:p>
          </table:table-cell>
          <table:table-cell office:value-type="float" office:value="10.05841" calcext:value-type="float">
            <text:p>10.1</text:p>
          </table:table-cell>
          <table:table-cell office:value-type="float" office:value="21906.046875" calcext:value-type="float">
            <text:p>21906.0</text:p>
          </table:table-cell>
          <table:table-cell office:value-type="float" office:value="14437.669922" calcext:value-type="float">
            <text:p>14437.7</text:p>
          </table:table-cell>
          <table:table-cell office:value-type="float" office:value="9576.365234" calcext:value-type="float">
            <text:p>9576.4</text:p>
          </table:table-cell>
          <table:table-cell office:value-type="float" office:value="6750.669434" calcext:value-type="float">
            <text:p>6750.7</text:p>
          </table:table-cell>
          <table:table-cell office:value-type="float" office:value="4659.782227" calcext:value-type="float">
            <text:p>4659.8</text:p>
          </table:table-cell>
          <table:table-cell office:value-type="float" office:value="3223.571289" calcext:value-type="float">
            <text:p>3223.6</text:p>
          </table:table-cell>
          <table:table-cell office:value-type="float" office:value="2306.129883" calcext:value-type="float">
            <text:p>2306.1</text:p>
          </table:table-cell>
          <table:table-cell office:value-type="float" office:value="1671.238403" calcext:value-type="float">
            <text:p>1671.2</text:p>
          </table:table-cell>
          <table:table-cell office:value-type="float" office:value="1234.191162" calcext:value-type="float">
            <text:p>1234.2</text:p>
          </table:table-cell>
          <table:table-cell office:value-type="float" office:value="942.892578" calcext:value-type="float">
            <text:p>942.9</text:p>
          </table:table-cell>
          <table:table-cell office:value-type="float" office:value="744.252869" calcext:value-type="float">
            <text:p>744.3</text:p>
          </table:table-cell>
          <table:table-cell office:value-type="float" office:value="597.112305" calcext:value-type="float">
            <text:p>597.1</text:p>
          </table:table-cell>
          <table:table-cell office:value-type="float" office:value="485.066742" calcext:value-type="float">
            <text:p>485.1</text:p>
          </table:table-cell>
          <table:table-cell office:value-type="float" office:value="401.753357" calcext:value-type="float">
            <text:p>401.8</text:p>
          </table:table-cell>
          <table:table-cell office:value-type="float" office:value="336.236053" calcext:value-type="float">
            <text:p>336.2</text:p>
          </table:table-cell>
          <table:table-cell office:value-type="float" office:value="282.052551" calcext:value-type="float">
            <text:p>282.1</text:p>
          </table:table-cell>
          <table:table-cell office:value-type="float" office:value="235.822571" calcext:value-type="float">
            <text:p>235.8</text:p>
          </table:table-cell>
          <table:table-cell office:value-type="float" office:value="194.662979" calcext:value-type="float">
            <text:p>194.7</text:p>
          </table:table-cell>
          <table:table-cell office:value-type="float" office:value="160.562164" calcext:value-type="float">
            <text:p>160.6</text:p>
          </table:table-cell>
          <table:table-cell office:value-type="float" office:value="127.356117" calcext:value-type="float">
            <text:p>127.4</text:p>
          </table:table-cell>
          <table:table-cell office:value-type="float" office:value="104.29084" calcext:value-type="float">
            <text:p>104.3</text:p>
          </table:table-cell>
          <table:table-cell office:value-type="float" office:value="83.015114" calcext:value-type="float">
            <text:p>83.0</text:p>
          </table:table-cell>
          <table:table-cell office:value-type="float" office:value="65.616737" calcext:value-type="float">
            <text:p>65.6</text:p>
          </table:table-cell>
          <table:table-cell office:value-type="float" office:value="51.896873" calcext:value-type="float">
            <text:p>51.9</text:p>
          </table:table-cell>
          <table:table-cell office:value-type="float" office:value="41.457848" calcext:value-type="float">
            <text:p>41.5</text:p>
          </table:table-cell>
          <table:table-cell office:value-type="float" office:value="34.100819" calcext:value-type="float">
            <text:p>34.1</text:p>
          </table:table-cell>
          <table:table-cell office:value-type="float" office:value="28.632757" calcext:value-type="float">
            <text:p>28.6</text:p>
          </table:table-cell>
          <table:table-cell office:value-type="float" office:value="2.982579" calcext:value-type="float">
            <text:p>3.0</text:p>
          </table:table-cell>
          <table:table-cell office:value-type="float" office:value="0.198839" calcext:value-type="float">
            <text:p>0.2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/>
          <table:table-cell office:value-type="time" office:time-value="PT1108452H55M38.0000012S" calcext:value-type="time">
            <text:p>12:55:38</text:p>
          </table:table-cell>
          <table:table-cell office:value-type="float" office:value="10.046991" calcext:value-type="float">
            <text:p>10.0</text:p>
          </table:table-cell>
          <table:table-cell office:value-type="float" office:value="22032.964844" calcext:value-type="float">
            <text:p>22033.0</text:p>
          </table:table-cell>
          <table:table-cell office:value-type="float" office:value="14465.723633" calcext:value-type="float">
            <text:p>14465.7</text:p>
          </table:table-cell>
          <table:table-cell office:value-type="float" office:value="9607.054688" calcext:value-type="float">
            <text:p>9607.1</text:p>
          </table:table-cell>
          <table:table-cell office:value-type="float" office:value="6776.954102" calcext:value-type="float">
            <text:p>6777.0</text:p>
          </table:table-cell>
          <table:table-cell office:value-type="float" office:value="4689.165039" calcext:value-type="float">
            <text:p>4689.2</text:p>
          </table:table-cell>
          <table:table-cell office:value-type="float" office:value="3226.438477" calcext:value-type="float">
            <text:p>3226.4</text:p>
          </table:table-cell>
          <table:table-cell office:value-type="float" office:value="2306.959229" calcext:value-type="float">
            <text:p>2307.0</text:p>
          </table:table-cell>
          <table:table-cell office:value-type="float" office:value="1655.520508" calcext:value-type="float">
            <text:p>1655.5</text:p>
          </table:table-cell>
          <table:table-cell office:value-type="float" office:value="1212.502319" calcext:value-type="float">
            <text:p>1212.5</text:p>
          </table:table-cell>
          <table:table-cell office:value-type="float" office:value="928.63623" calcext:value-type="float">
            <text:p>928.6</text:p>
          </table:table-cell>
          <table:table-cell office:value-type="float" office:value="727.979126" calcext:value-type="float">
            <text:p>728.0</text:p>
          </table:table-cell>
          <table:table-cell office:value-type="float" office:value="581.069458" calcext:value-type="float">
            <text:p>581.1</text:p>
          </table:table-cell>
          <table:table-cell office:value-type="float" office:value="476.759644" calcext:value-type="float">
            <text:p>476.8</text:p>
          </table:table-cell>
          <table:table-cell office:value-type="float" office:value="395.342224" calcext:value-type="float">
            <text:p>395.3</text:p>
          </table:table-cell>
          <table:table-cell office:value-type="float" office:value="333.134552" calcext:value-type="float">
            <text:p>333.1</text:p>
          </table:table-cell>
          <table:table-cell office:value-type="float" office:value="283.965607" calcext:value-type="float">
            <text:p>284.0</text:p>
          </table:table-cell>
          <table:table-cell office:value-type="float" office:value="236.986374" calcext:value-type="float">
            <text:p>237.0</text:p>
          </table:table-cell>
          <table:table-cell office:value-type="float" office:value="194.287018" calcext:value-type="float">
            <text:p>194.3</text:p>
          </table:table-cell>
          <table:table-cell office:value-type="float" office:value="160.545578" calcext:value-type="float">
            <text:p>160.5</text:p>
          </table:table-cell>
          <table:table-cell office:value-type="float" office:value="128.297119" calcext:value-type="float">
            <text:p>128.3</text:p>
          </table:table-cell>
          <table:table-cell office:value-type="float" office:value="105.703285" calcext:value-type="float">
            <text:p>105.7</text:p>
          </table:table-cell>
          <table:table-cell office:value-type="float" office:value="85.100105" calcext:value-type="float">
            <text:p>85.1</text:p>
          </table:table-cell>
          <table:table-cell office:value-type="float" office:value="67.482887" calcext:value-type="float">
            <text:p>67.5</text:p>
          </table:table-cell>
          <table:table-cell office:value-type="float" office:value="53.6479" calcext:value-type="float">
            <text:p>53.6</text:p>
          </table:table-cell>
          <table:table-cell office:value-type="float" office:value="41.007301" calcext:value-type="float">
            <text:p>41.0</text:p>
          </table:table-cell>
          <table:table-cell office:value-type="float" office:value="32.447525" calcext:value-type="float">
            <text:p>32.4</text:p>
          </table:table-cell>
          <table:table-cell office:value-type="float" office:value="26.674652" calcext:value-type="float">
            <text:p>26.7</text:p>
          </table:table-cell>
          <table:table-cell office:value-type="float" office:value="3.284565" calcext:value-type="float">
            <text:p>3.3</text:p>
          </table:table-cell>
          <table:table-cell office:value-type="float" office:value="0.199065" calcext:value-type="float">
            <text:p>0.2</text:p>
          </table:table-cell>
          <table:table-cell office:value-type="float" office:value="0" calcext:value-type="float">
            <text:p>0.0</text:p>
          </table:table-cell>
        </table:table-row>
        <table:table-row table:style-name="ro1" table:number-rows-repeated="2">
          <table:table-cell/>
          <table:table-cell table:style-name="Default" table:number-columns-repeated="32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um(c)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70" calcext:value-type="float">
            <text:p>70</text:p>
          </table:table-cell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CV</text:p>
          </table:table-cell>
          <table:table-cell table:style-name="ce4" table:formula="of:=STDEV([.D$6:.D$33]; [.D$42:.D$72])/AVERAGE([.D$6:.D$33]; [.D$42:.D$72])" office:value-type="percentage" office:value="0.0143062036435914" calcext:value-type="percentage">
            <text:p>1.4%</text:p>
          </table:table-cell>
          <table:table-cell table:style-name="ce4" table:formula="of:=STDEV([.E6:.E33]; [.E42:.E72])/AVERAGE([.E6:.E33]; [.E42:.E72])" office:value-type="percentage" office:value="0.0127205576163819" calcext:value-type="percentage">
            <text:p>1.3%</text:p>
          </table:table-cell>
          <table:table-cell table:style-name="ce4" table:formula="of:=STDEV([.F6:.F33]; [.F42:.F72])/AVERAGE([.F6:.F33]; [.F42:.F72])" office:value-type="percentage" office:value="0.0123789460982937" calcext:value-type="percentage">
            <text:p>1.2%</text:p>
          </table:table-cell>
          <table:table-cell table:style-name="ce4" table:formula="of:=STDEV([.G6:.G33]; [.G42:.G72])/AVERAGE([.G6:.G33]; [.G42:.G72])" office:value-type="percentage" office:value="0.0126574233707988" calcext:value-type="percentage">
            <text:p>1.3%</text:p>
          </table:table-cell>
          <table:table-cell table:style-name="ce4" table:formula="of:=STDEV([.H6:.H33]; [.H42:.H72])/AVERAGE([.H6:.H33]; [.H42:.H72])" office:value-type="percentage" office:value="0.0127144745780966" calcext:value-type="percentage">
            <text:p>1.3%</text:p>
          </table:table-cell>
          <table:table-cell table:style-name="ce4" table:formula="of:=STDEV([.I6:.I33]; [.I42:.I72])/AVERAGE([.I6:.I33]; [.I42:.I72])" office:value-type="percentage" office:value="0.0136682120108407" calcext:value-type="percentage">
            <text:p>1.4%</text:p>
          </table:table-cell>
          <table:table-cell table:style-name="ce4" table:formula="of:=STDEV([.J6:.J33]; [.J42:.J72])/AVERAGE([.J6:.J33]; [.J42:.J72])" office:value-type="percentage" office:value="0.0137170808381209" calcext:value-type="percentage">
            <text:p>1.4%</text:p>
          </table:table-cell>
          <table:table-cell table:style-name="ce4" table:formula="of:=STDEV([.K6:.K33]; [.K42:.K72])/AVERAGE([.K6:.K33]; [.K42:.K72])" office:value-type="percentage" office:value="0.0153277349547595" calcext:value-type="percentage">
            <text:p>1.5%</text:p>
          </table:table-cell>
          <table:table-cell table:style-name="ce4" table:formula="of:=STDEV([.L6:.L33]; [.L42:.L72])/AVERAGE([.L6:.L33]; [.L42:.L72])" office:value-type="percentage" office:value="0.0184127477801383" calcext:value-type="percentage">
            <text:p>1.8%</text:p>
          </table:table-cell>
          <table:table-cell table:style-name="ce4" table:formula="of:=STDEV([.M6:.M33]; [.M42:.M72])/AVERAGE([.M6:.M33]; [.M42:.M72])" office:value-type="percentage" office:value="0.0207125035432361" calcext:value-type="percentage">
            <text:p>2.1%</text:p>
          </table:table-cell>
          <table:table-cell table:style-name="ce4" table:formula="of:=STDEV([.N6:.N33]; [.N42:.N72])/AVERAGE([.N6:.N33]; [.N42:.N72])" office:value-type="percentage" office:value="0.0225116294471718" calcext:value-type="percentage">
            <text:p>2.3%</text:p>
          </table:table-cell>
          <table:table-cell table:style-name="ce4" table:formula="of:=STDEV([.O6:.O33]; [.O42:.O72])/AVERAGE([.O6:.O33]; [.O42:.O72])" office:value-type="percentage" office:value="0.0251101278168246" calcext:value-type="percentage">
            <text:p>2.5%</text:p>
          </table:table-cell>
          <table:table-cell table:style-name="ce4" table:formula="of:=STDEV([.P6:.P33]; [.P42:.P72])/AVERAGE([.P6:.P33]; [.P42:.P72])" office:value-type="percentage" office:value="0.0270296701744559" calcext:value-type="percentage">
            <text:p>2.7%</text:p>
          </table:table-cell>
          <table:table-cell table:style-name="ce4" table:formula="of:=STDEV([.Q6:.Q33]; [.Q42:.Q72])/AVERAGE([.Q6:.Q33]; [.Q42:.Q72])" office:value-type="percentage" office:value="0.0290739723910805" calcext:value-type="percentage">
            <text:p>2.9%</text:p>
          </table:table-cell>
          <table:table-cell table:style-name="ce4" table:formula="of:=STDEV([.R6:.R33]; [.R42:.R72])/AVERAGE([.R6:.R33]; [.R42:.R72])" office:value-type="percentage" office:value="0.0296018366877512" calcext:value-type="percentage">
            <text:p>3.0%</text:p>
          </table:table-cell>
          <table:table-cell table:style-name="ce4" table:formula="of:=STDEV([.S6:.S33]; [.S42:.S72])/AVERAGE([.S6:.S33]; [.S42:.S72])" office:value-type="percentage" office:value="0.0303211723383211" calcext:value-type="percentage">
            <text:p>3.0%</text:p>
          </table:table-cell>
          <table:table-cell table:style-name="ce4" table:formula="of:=STDEV([.T6:.T33]; [.T42:.T72])/AVERAGE([.T6:.T33]; [.T42:.T72])" office:value-type="percentage" office:value="0.0330577627746215" calcext:value-type="percentage">
            <text:p>3.3%</text:p>
          </table:table-cell>
          <table:table-cell table:style-name="ce4" table:formula="of:=STDEV([.U6:.U33]; [.U42:.U72])/AVERAGE([.U6:.U33]; [.U42:.U72])" office:value-type="percentage" office:value="0.0368732746139348" calcext:value-type="percentage">
            <text:p>3.7%</text:p>
          </table:table-cell>
          <table:table-cell table:style-name="ce4" table:formula="of:=STDEV([.V6:.V33]; [.V42:.V72])/AVERAGE([.V6:.V33]; [.V42:.V72])" office:value-type="percentage" office:value="0.0413082899617193" calcext:value-type="percentage">
            <text:p>4.1%</text:p>
          </table:table-cell>
          <table:table-cell table:style-name="ce4" table:formula="of:=STDEV([.W6:.W33]; [.W42:.W72])/AVERAGE([.W6:.W33]; [.W42:.W72])" office:value-type="percentage" office:value="0.0455889788130229" calcext:value-type="percentage">
            <text:p>4.6%</text:p>
          </table:table-cell>
          <table:table-cell table:style-name="ce4" table:formula="of:=STDEV([.X6:.X33]; [.X42:.X72])/AVERAGE([.X6:.X33]; [.X42:.X72])" office:value-type="percentage" office:value="0.0476580861263703" calcext:value-type="percentage">
            <text:p>4.8%</text:p>
          </table:table-cell>
          <table:table-cell table:style-name="ce4" table:formula="of:=STDEV([.Y6:.Y33]; [.Y42:.Y72])/AVERAGE([.Y6:.Y33]; [.Y42:.Y72])" office:value-type="percentage" office:value="0.057691224022134" calcext:value-type="percentage">
            <text:p>5.8%</text:p>
          </table:table-cell>
          <table:table-cell table:style-name="ce4" table:formula="of:=STDEV([.Z6:.Z33]; [.Z42:.Z72])/AVERAGE([.Z6:.Z33]; [.Z42:.Z72])" office:value-type="percentage" office:value="0.0645987174540492" calcext:value-type="percentage">
            <text:p>6.5%</text:p>
          </table:table-cell>
          <table:table-cell table:style-name="ce4" table:formula="of:=STDEV([.AA6:.AA33]; [.AA42:.AA72])/AVERAGE([.AA6:.AA33]; [.AA42:.AA72])" office:value-type="percentage" office:value="0.0721713231751291" calcext:value-type="percentage">
            <text:p>7.2%</text:p>
          </table:table-cell>
          <table:table-cell table:style-name="ce4" table:formula="of:=STDEV([.AB6:.AB33]; [.AB42:.AB72])/AVERAGE([.AB6:.AB33]; [.AB42:.AB72])" office:value-type="percentage" office:value="0.0811378540591081" calcext:value-type="percentage">
            <text:p>8.1%</text:p>
          </table:table-cell>
          <table:table-cell table:style-name="ce4" table:formula="of:=STDEV([.AC6:.AC33]; [.AC42:.AC72])/AVERAGE([.AC6:.AC33]; [.AC42:.AC72])" office:value-type="percentage" office:value="0.0882871575411476" calcext:value-type="percentage">
            <text:p>8.8%</text:p>
          </table:table-cell>
          <table:table-cell table:style-name="ce4" table:formula="of:=STDEV([.AD6:.AD33]; [.AD42:.AD72])/AVERAGE([.AD6:.AD33]; [.AD42:.AD72])" office:value-type="percentage" office:value="0.096709525854389" calcext:value-type="percentage">
            <text:p>9.7%</text:p>
          </table:table-cell>
          <table:table-cell table:style-name="ce4" table:formula="of:=STDEV([.AE6:.AE33]; [.AE42:.AE72])/AVERAGE([.AE6:.AE33]; [.AE42:.AE72])" office:value-type="percentage" office:value="0.265187445045847" calcext:value-type="percentage">
            <text:p>26.5%</text:p>
          </table:table-cell>
          <table:table-cell table:style-name="ce4" table:formula="of:=STDEV([.AF6:.AF33]; [.AF42:.AF72])/AVERAGE([.AF6:.AF33]; [.AF42:.AF72])" office:value-type="percentage" office:value="0.46928281720044" calcext:value-type="percentage">
            <text:p>46.9%</text:p>
          </table:table-cell>
          <table:table-cell table:style-name="ce4" table:formula="of:=STDEV([.AG6:.AG33]; [.AG42:.AG72])/AVERAGE([.AG6:.AG33]; [.AG42:.AG72])" office:value-type="percentage" office:value="0.978147658764158" calcext:value-type="percentage">
            <text:p>97.8%</text:p>
          </table:table-cell>
        </table:table-row>
        <table:table-row table:style-name="ro1">
          <table:table-cell/>
          <table:table-cell table:style-name="Default"/>
          <table:table-cell table:style-name="ce13" office:value-type="string" calcext:value-type="string">
            <text:p>x</text:p>
          </table:table-cell>
          <table:table-cell table:style-name="ce19" table:formula="of:=AVERAGE([.D$6:.D$33]; [.D$42:.D$72])" office:value-type="float" office:value="21990.961003678" calcext:value-type="float">
            <text:p>21991.0</text:p>
          </table:table-cell>
          <table:table-cell table:style-name="ce19" table:formula="of:=AVERAGE([.E$6:.E$33]; [.E$42:.E$72])" office:value-type="float" office:value="14444.0742187119" calcext:value-type="float">
            <text:p>14444.1</text:p>
          </table:table-cell>
          <table:table-cell table:style-name="ce19" table:formula="of:=AVERAGE([.F$6:.F$33]; [.F$42:.F$72])" office:value-type="float" office:value="9599.95928228814" calcext:value-type="float">
            <text:p>9600.0</text:p>
          </table:table-cell>
          <table:table-cell table:style-name="ce19" table:formula="of:=AVERAGE([.G$6:.G$33]; [.G$42:.G$72])" office:value-type="float" office:value="6788.64587194915" calcext:value-type="float">
            <text:p>6788.6</text:p>
          </table:table-cell>
          <table:table-cell table:style-name="ce19" table:formula="of:=AVERAGE([.H$6:.H$33]; [.H$42:.H$72])" office:value-type="float" office:value="4687.67545850848" calcext:value-type="float">
            <text:p>4687.7</text:p>
          </table:table-cell>
          <table:table-cell table:style-name="ce19" table:formula="of:=AVERAGE([.I$6:.I$33]; [.I$42:.I$72])" office:value-type="float" office:value="3224.63639184746" calcext:value-type="float">
            <text:p>3224.6</text:p>
          </table:table-cell>
          <table:table-cell table:style-name="ce19" table:formula="of:=AVERAGE([.J$6:.J$33]; [.J$42:.J$72])" office:value-type="float" office:value="2293.81090271186" calcext:value-type="float">
            <text:p>2293.8</text:p>
          </table:table-cell>
          <table:table-cell table:style-name="ce19" table:formula="of:=AVERAGE([.K$6:.K$33]; [.K$42:.K$72])" office:value-type="float" office:value="1643.71108644068" calcext:value-type="float">
            <text:p>1643.7</text:p>
          </table:table-cell>
          <table:table-cell table:style-name="ce19" table:formula="of:=AVERAGE([.L$6:.L$33]; [.L$42:.L$72])" office:value-type="float" office:value="1206.87068408475" calcext:value-type="float">
            <text:p>1206.9</text:p>
          </table:table-cell>
          <table:table-cell table:style-name="ce19" table:formula="of:=AVERAGE([.M$6:.M$33]; [.M$42:.M$72])" office:value-type="float" office:value="919.096236966102" calcext:value-type="float">
            <text:p>919.1</text:p>
          </table:table-cell>
          <table:table-cell table:style-name="ce19" table:formula="of:=AVERAGE([.N$6:.N$33]; [.N$42:.N$72])" office:value-type="float" office:value="723.631770762712" calcext:value-type="float">
            <text:p>723.6</text:p>
          </table:table-cell>
          <table:table-cell table:style-name="ce19" table:formula="of:=AVERAGE([.O$6:.O$33]; [.O$42:.O$72])" office:value-type="float" office:value="579.729927728814" calcext:value-type="float">
            <text:p>579.7</text:p>
          </table:table-cell>
          <table:table-cell table:style-name="ce19" table:formula="of:=AVERAGE([.P$6:.P$33]; [.P$42:.P$72])" office:value-type="float" office:value="473.044432016949" calcext:value-type="float">
            <text:p>473.0</text:p>
          </table:table-cell>
          <table:table-cell table:style-name="ce19" table:formula="of:=AVERAGE([.Q$6:.Q$33]; [.Q$42:.Q$72])" office:value-type="float" office:value="391.666358084746" calcext:value-type="float">
            <text:p>391.7</text:p>
          </table:table-cell>
          <table:table-cell table:style-name="ce19" table:formula="of:=AVERAGE([.R$6:.R$33]; [.R$42:.R$72])" office:value-type="float" office:value="329.294967932203" calcext:value-type="float">
            <text:p>329.3</text:p>
          </table:table-cell>
          <table:table-cell table:style-name="ce19" table:formula="of:=AVERAGE([.S$6:.S$33]; [.S$42:.S$72])" office:value-type="float" office:value="280.084649084746" calcext:value-type="float">
            <text:p>280.1</text:p>
          </table:table-cell>
          <table:table-cell table:style-name="ce19" table:formula="of:=AVERAGE([.T$6:.T$33]; [.T$42:.T$72])" office:value-type="float" office:value="237.091268779661" calcext:value-type="float">
            <text:p>237.1</text:p>
          </table:table-cell>
          <table:table-cell table:style-name="ce19" table:formula="of:=AVERAGE([.U$6:.U$33]; [.U$42:.U$72])" office:value-type="float" office:value="196.687666542373" calcext:value-type="float">
            <text:p>196.7</text:p>
          </table:table-cell>
          <table:table-cell table:style-name="ce19" table:formula="of:=AVERAGE([.V$6:.V$33]; [.V$42:.V$72])" office:value-type="float" office:value="162.337641525424" calcext:value-type="float">
            <text:p>162.3</text:p>
          </table:table-cell>
          <table:table-cell table:style-name="ce19" table:formula="of:=AVERAGE([.W$6:.W$33]; [.W$42:.W$72])" office:value-type="float" office:value="132.116843559322" calcext:value-type="float">
            <text:p>132.1</text:p>
          </table:table-cell>
          <table:table-cell table:style-name="ce19" table:formula="of:=AVERAGE([.X$6:.X$33]; [.X$42:.X$72])" office:value-type="float" office:value="107.661788627119" calcext:value-type="float">
            <text:p>107.7</text:p>
          </table:table-cell>
          <table:table-cell table:style-name="ce19" table:formula="of:=AVERAGE([.Y$6:.Y$33]; [.Y$42:.Y$72])" office:value-type="float" office:value="87.0286834576271" calcext:value-type="float">
            <text:p>87.0</text:p>
          </table:table-cell>
          <table:table-cell table:style-name="ce19" table:formula="of:=AVERAGE([.Z$6:.Z$33]; [.Z$42:.Z$72])" office:value-type="float" office:value="70.0353761016949" calcext:value-type="float">
            <text:p>70.0</text:p>
          </table:table-cell>
          <table:table-cell table:style-name="ce19" table:formula="of:=AVERAGE([.AA$6:.AA$33]; [.AA$42:.AA$72])" office:value-type="float" office:value="56.8993520338983" calcext:value-type="float">
            <text:p>56.9</text:p>
          </table:table-cell>
          <table:table-cell table:style-name="ce19" table:formula="of:=AVERAGE([.AB$6:.AB$33]; [.AB$42:.AB$72])" office:value-type="float" office:value="46.8377350338983" calcext:value-type="float">
            <text:p>46.8</text:p>
          </table:table-cell>
          <table:table-cell table:style-name="ce19" table:formula="of:=AVERAGE([.AC$6:.AC$33]; [.AC$42:.AC$72])" office:value-type="float" office:value="39.1308366271186" calcext:value-type="float">
            <text:p>39.1</text:p>
          </table:table-cell>
          <table:table-cell table:style-name="ce19" table:formula="of:=AVERAGE([.AD$6:.AD$33]; [.AD$42:.AD$72])" office:value-type="float" office:value="31.8278591864407" calcext:value-type="float">
            <text:p>31.8</text:p>
          </table:table-cell>
          <table:table-cell table:style-name="ce19" table:formula="of:=AVERAGE([.AE$6:.AE$33]; [.AE$42:.AE$72])" office:value-type="float" office:value="4.95389045762712" calcext:value-type="float">
            <text:p>5.0</text:p>
          </table:table-cell>
          <table:table-cell table:style-name="ce19" table:formula="of:=AVERAGE([.AF$6:.AF$33]; [.AF$42:.AF$72])" office:value-type="float" office:value="0.893324508474576" calcext:value-type="float">
            <text:p>0.9</text:p>
          </table:table-cell>
          <table:table-cell table:style-name="ce19" table:formula="of:=AVERAGE([.AG$6:.AG$33]; [.AG$42:.AG$72])" office:value-type="float" office:value="0.100798389830508" calcext:value-type="float">
            <text:p>0.1</text:p>
          </table:table-cell>
        </table:table-row>
        <table:table-row table:style-name="ro1">
          <table:table-cell/>
          <table:table-cell table:style-name="Default"/>
          <table:table-cell table:style-name="ce15" office:value-type="string" calcext:value-type="string">
            <text:p>σ</text:p>
          </table:table-cell>
          <table:table-cell table:style-name="ce19" table:formula="of:=STDEV([.D$6:.D$33]; [.D$42:.D$72])" office:value-type="float" office:value="314.607166436894" calcext:value-type="float">
            <text:p>314.6</text:p>
          </table:table-cell>
          <table:table-cell table:style-name="ce19" table:formula="of:=STDEV([.E$6:.E$33]; [.E$42:.E$72])" office:value-type="float" office:value="183.736678314421" calcext:value-type="float">
            <text:p>183.7</text:p>
          </table:table-cell>
          <table:table-cell table:style-name="ce19" table:formula="of:=STDEV([.F$6:.F$33]; [.F$42:.F$72])" office:value-type="float" office:value="118.837378501259" calcext:value-type="float">
            <text:p>118.8</text:p>
          </table:table-cell>
          <table:table-cell table:style-name="ce19" table:formula="of:=STDEV([.G$6:.G$33]; [.G$42:.G$72])" office:value-type="float" office:value="85.926764915686" calcext:value-type="float">
            <text:p>85.9</text:p>
          </table:table-cell>
          <table:table-cell table:style-name="ce19" table:formula="of:=STDEV([.H$6:.H$33]; [.H$42:.H$72])" office:value-type="float" office:value="59.6013304475735" calcext:value-type="float">
            <text:p>59.6</text:p>
          </table:table-cell>
          <table:table-cell table:style-name="ce19" table:formula="of:=STDEV([.I$6:.I$33]; [.I$42:.I$72])" office:value-type="float" office:value="44.0750138616435" calcext:value-type="float">
            <text:p>44.1</text:p>
          </table:table-cell>
          <table:table-cell table:style-name="ce19" table:formula="of:=STDEV([.J$6:.J$33]; [.J$42:.J$72])" office:value-type="float" office:value="31.4643895798618" calcext:value-type="float">
            <text:p>31.5</text:p>
          </table:table-cell>
          <table:table-cell table:style-name="ce19" table:formula="of:=STDEV([.K$6:.K$33]; [.K$42:.K$72])" office:value-type="float" office:value="25.1943678751625" calcext:value-type="float">
            <text:p>25.2</text:p>
          </table:table-cell>
          <table:table-cell table:style-name="ce19" table:formula="of:=STDEV([.L$6:.L$33]; [.L$42:.L$72])" office:value-type="float" office:value="22.2218055092954" calcext:value-type="float">
            <text:p>22.2</text:p>
          </table:table-cell>
          <table:table-cell table:style-name="ce19" table:formula="of:=STDEV([.M$6:.M$33]; [.M$42:.M$72])" office:value-type="float" office:value="19.0367840647353" calcext:value-type="float">
            <text:p>19.0</text:p>
          </table:table-cell>
          <table:table-cell table:style-name="ce19" table:formula="of:=STDEV([.N$6:.N$33]; [.N$42:.N$72])" office:value-type="float" office:value="16.2901302796109" calcext:value-type="float">
            <text:p>16.3</text:p>
          </table:table-cell>
          <table:table-cell table:style-name="ce19" table:formula="of:=STDEV([.O$6:.O$33]; [.O$42:.O$72])" office:value-type="float" office:value="14.557092584509" calcext:value-type="float">
            <text:p>14.6</text:p>
          </table:table-cell>
          <table:table-cell table:style-name="ce19" table:formula="of:=STDEV([.P$6:.P$33]; [.P$42:.P$72])" office:value-type="float" office:value="12.786234975281" calcext:value-type="float">
            <text:p>12.8</text:p>
          </table:table-cell>
          <table:table-cell table:style-name="ce19" table:formula="of:=STDEV([.Q$6:.Q$33]; [.Q$42:.Q$72])" office:value-type="float" office:value="11.387296881471" calcext:value-type="float">
            <text:p>11.4</text:p>
          </table:table-cell>
          <table:table-cell table:style-name="ce19" table:formula="of:=STDEV([.R$6:.R$33]; [.R$42:.R$72])" office:value-type="float" office:value="9.74773586282734" calcext:value-type="float">
            <text:p>9.7</text:p>
          </table:table-cell>
          <table:table-cell table:style-name="ce19" table:formula="of:=STDEV([.S$6:.S$33]; [.S$42:.S$72])" office:value-type="float" office:value="8.49249491421676" calcext:value-type="float">
            <text:p>8.5</text:p>
          </table:table-cell>
          <table:table-cell table:style-name="ce19" table:formula="of:=STDEV([.T$6:.T$33]; [.T$42:.T$72])" office:value-type="float" office:value="7.83770691925205" calcext:value-type="float">
            <text:p>7.8</text:p>
          </table:table-cell>
          <table:table-cell table:style-name="ce19" table:formula="of:=STDEV([.U$6:.U$33]; [.U$42:.U$72])" office:value-type="float" office:value="7.25251834159095" calcext:value-type="float">
            <text:p>7.3</text:p>
          </table:table-cell>
          <table:table-cell table:style-name="ce19" table:formula="of:=STDEV([.V$6:.V$33]; [.V$42:.V$72])" office:value-type="float" office:value="6.70589036783384" calcext:value-type="float">
            <text:p>6.7</text:p>
          </table:table-cell>
          <table:table-cell table:style-name="ce19" table:formula="of:=STDEV([.W$6:.W$33]; [.W$42:.W$72])" office:value-type="float" office:value="6.0230719818694" calcext:value-type="float">
            <text:p>6.0</text:p>
          </table:table-cell>
          <table:table-cell table:style-name="ce19" table:formula="of:=STDEV([.X$6:.X$33]; [.X$42:.X$72])" office:value-type="float" office:value="5.13095479491029" calcext:value-type="float">
            <text:p>5.1</text:p>
          </table:table-cell>
          <table:table-cell table:style-name="ce19" table:formula="of:=STDEV([.Y$6:.Y$33]; [.Y$42:.Y$72])" office:value-type="float" office:value="5.02079127370535" calcext:value-type="float">
            <text:p>5.0</text:p>
          </table:table-cell>
          <table:table-cell table:style-name="ce19" table:formula="of:=STDEV([.Z$6:.Z$33]; [.Z$42:.Z$72])" office:value-type="float" office:value="4.52419547258146" calcext:value-type="float">
            <text:p>4.5</text:p>
          </table:table-cell>
          <table:table-cell table:style-name="ce19" table:formula="of:=STDEV([.AA$6:.AA$33]; [.AA$42:.AA$72])" office:value-type="float" office:value="4.10650152409391" calcext:value-type="float">
            <text:p>4.1</text:p>
          </table:table-cell>
          <table:table-cell table:style-name="ce19" table:formula="of:=STDEV([.AB$6:.AB$33]; [.AB$42:.AB$72])" office:value-type="float" office:value="3.80031330963961" calcext:value-type="float">
            <text:p>3.8</text:p>
          </table:table-cell>
          <table:table-cell table:style-name="ce19" table:formula="of:=STDEV([.AC$6:.AC$33]; [.AC$42:.AC$72])" office:value-type="float" office:value="3.45475033801533" calcext:value-type="float">
            <text:p>3.5</text:p>
          </table:table-cell>
          <table:table-cell table:style-name="ce19" table:formula="of:=STDEV([.AD$6:.AD$33]; [.AD$42:.AD$72])" office:value-type="float" office:value="3.07805717088094" calcext:value-type="float">
            <text:p>3.1</text:p>
          </table:table-cell>
          <table:table-cell table:style-name="ce19" table:formula="of:=STDEV([.AE$6:.AE$33]; [.AE$42:.AE$72])" office:value-type="float" office:value="1.31370955349514" calcext:value-type="float">
            <text:p>1.3</text:p>
          </table:table-cell>
          <table:table-cell table:style-name="ce19" table:formula="of:=STDEV([.AF$6:.AF$33]; [.AF$42:.AF$72])" office:value-type="float" office:value="0.419221842011148" calcext:value-type="float">
            <text:p>0.4</text:p>
          </table:table-cell>
          <table:table-cell table:style-name="ce19" table:formula="of:=STDEV([.AG$6:.AG$33]; [.AG$42:.AG$72])" office:value-type="float" office:value="0.0985957090199087" calcext:value-type="float">
            <text:p>0.1</text:p>
          </table:table-cell>
        </table:table-row>
        <table:table-row table:style-name="ro1">
          <table:table-cell/>
          <table:table-cell table:style-name="Default"/>
          <table:table-cell table:style-name="ce15" office:value-type="string" calcext:value-type="string">
            <text:p>σ<text:span text:style-name="T1">acceptable</text:span></text:p>
          </table:table-cell>
          <table:table-cell table:formula="of:=SQRT([.D77]+0.0004*([.D77])^2)" office:value-type="float" office:value="464.146428780608" calcext:value-type="float">
            <text:p>464.1</text:p>
          </table:table-cell>
          <table:table-cell table:formula="of:=SQRT([.E77]+0.0004*([.E77])^2)" office:value-type="float" office:value="312.884301672319" calcext:value-type="float">
            <text:p>312.9</text:p>
          </table:table-cell>
          <table:table-cell table:formula="of:=SQRT([.F77]+0.0004*([.F77])^2)" office:value-type="float" office:value="215.554277551906" calcext:value-type="float">
            <text:p>215.6</text:p>
          </table:table-cell>
          <table:table-cell table:formula="of:=SQRT([.G77]+0.0004*([.G77])^2)" office:value-type="float" office:value="158.817288044602" calcext:value-type="float">
            <text:p>158.8</text:p>
          </table:table-cell>
          <table:table-cell table:formula="of:=SQRT([.H77]+0.0004*([.H77])^2)" office:value-type="float" office:value="116.092187248882" calcext:value-type="float">
            <text:p>116.1</text:p>
          </table:table-cell>
          <table:table-cell table:formula="of:=SQRT([.I77]+0.0004*([.I77])^2)" office:value-type="float" office:value="85.9299036174151" calcext:value-type="float">
            <text:p>85.9</text:p>
          </table:table-cell>
          <table:table-cell table:formula="of:=SQRT([.J77]+0.0004*([.J77])^2)" office:value-type="float" office:value="66.3207228976871" calcext:value-type="float">
            <text:p>66.3</text:p>
          </table:table-cell>
          <table:table-cell table:formula="of:=SQRT([.K77]+0.0004*([.K77])^2)" office:value-type="float" office:value="52.1960299325138" calcext:value-type="float">
            <text:p>52.2</text:p>
          </table:table-cell>
          <table:table-cell table:formula="of:=SQRT([.L77]+0.0004*([.L77])^2)" office:value-type="float" office:value="42.3023099053234" calcext:value-type="float">
            <text:p>42.3</text:p>
          </table:table-cell>
          <table:table-cell table:formula="of:=SQRT([.M77]+0.0004*([.M77])^2)" office:value-type="float" office:value="35.4540744356442" calcext:value-type="float">
            <text:p>35.5</text:p>
          </table:table-cell>
          <table:table-cell table:formula="of:=SQRT([.N77]+0.0004*([.N77])^2)" office:value-type="float" office:value="30.5465046547978" calcext:value-type="float">
            <text:p>30.5</text:p>
          </table:table-cell>
          <table:table-cell table:formula="of:=SQRT([.O77]+0.0004*([.O77])^2)" office:value-type="float" office:value="26.7238590658347" calcext:value-type="float">
            <text:p>26.7</text:p>
          </table:table-cell>
          <table:table-cell table:formula="of:=SQRT([.P77]+0.0004*([.P77])^2)" office:value-type="float" office:value="23.718196514108" calcext:value-type="float">
            <text:p>23.7</text:p>
          </table:table-cell>
          <table:table-cell table:formula="of:=SQRT([.Q77]+0.0004*([.Q77])^2)" office:value-type="float" office:value="21.2844396803602" calcext:value-type="float">
            <text:p>21.3</text:p>
          </table:table-cell>
          <table:table-cell table:formula="of:=SQRT([.R77]+0.0004*([.R77])^2)" office:value-type="float" office:value="19.3046377405636" calcext:value-type="float">
            <text:p>19.3</text:p>
          </table:table-cell>
          <table:table-cell table:formula="of:=SQRT([.S77]+0.0004*([.S77])^2)" office:value-type="float" office:value="17.6483317439897" calcext:value-type="float">
            <text:p>17.6</text:p>
          </table:table-cell>
          <table:table-cell table:formula="of:=SQRT([.T77]+0.0004*([.T77])^2)" office:value-type="float" office:value="16.1113679329932" calcext:value-type="float">
            <text:p>16.1</text:p>
          </table:table-cell>
          <table:table-cell table:formula="of:=SQRT([.U77]+0.0004*([.U77])^2)" office:value-type="float" office:value="14.5657846273493" calcext:value-type="float">
            <text:p>14.6</text:p>
          </table:table-cell>
          <table:table-cell table:formula="of:=SQRT([.V77]+0.0004*([.V77])^2)" office:value-type="float" office:value="13.1483476326053" calcext:value-type="float">
            <text:p>13.1</text:p>
          </table:table-cell>
          <table:table-cell table:formula="of:=SQRT([.W77]+0.0004*([.W77])^2)" office:value-type="float" office:value="11.7940149101209" calcext:value-type="float">
            <text:p>11.8</text:p>
          </table:table-cell>
          <table:table-cell table:formula="of:=SQRT([.X77]+0.0004*([.X77])^2)" office:value-type="float" office:value="10.5970851142791" calcext:value-type="float">
            <text:p>10.6</text:p>
          </table:table-cell>
          <table:table-cell table:formula="of:=SQRT([.Y77]+0.0004*([.Y77])^2)" office:value-type="float" office:value="9.48990411729087" calcext:value-type="float">
            <text:p>9.5</text:p>
          </table:table-cell>
          <table:table-cell table:formula="of:=SQRT([.Z77]+0.0004*([.Z77])^2)" office:value-type="float" office:value="8.4851256716667" calcext:value-type="float">
            <text:p>8.5</text:p>
          </table:table-cell>
          <table:table-cell table:formula="of:=SQRT([.AA77]+0.0004*([.AA77])^2)" office:value-type="float" office:value="7.62852322134824" calcext:value-type="float">
            <text:p>7.6</text:p>
          </table:table-cell>
          <table:table-cell table:formula="of:=SQRT([.AB77]+0.0004*([.AB77])^2)" office:value-type="float" office:value="6.90762219603393" calcext:value-type="float">
            <text:p>6.9</text:p>
          </table:table-cell>
          <table:table-cell table:formula="of:=SQRT([.AC77]+0.0004*([.AC77])^2)" office:value-type="float" office:value="6.30423076807741" calcext:value-type="float">
            <text:p>6.3</text:p>
          </table:table-cell>
          <table:table-cell table:formula="of:=SQRT([.AD77]+0.0004*([.AD77])^2)" office:value-type="float" office:value="5.67741703898854" calcext:value-type="float">
            <text:p>5.7</text:p>
          </table:table-cell>
          <table:table-cell table:formula="of:=SQRT([.AE77]+0.0004*([.AE77])^2)" office:value-type="float" office:value="2.2279378065587" calcext:value-type="float">
            <text:p>2.2</text:p>
          </table:table-cell>
          <table:table-cell table:formula="of:=SQRT([.AF77]+0.0004*([.AF77])^2)" office:value-type="float" office:value="0.945327308367611" calcext:value-type="float">
            <text:p>0.9</text:p>
          </table:table-cell>
          <table:table-cell table:formula="of:=SQRT([.AG77]+0.0004*([.AG77])^2)" office:value-type="float" office:value="0.317494021922721" calcext:value-type="float">
            <text:p>0.3</text:p>
          </table:table-cell>
        </table:table-row>
        <table:table-row table:style-name="ro1">
          <table:table-cell/>
          <table:table-cell table:style-name="Default"/>
          <table:table-cell table:style-name="ce9" office:value-type="string" calcext:value-type="string">
            <text:p>PASS</text:p>
          </table:table-cell>
          <table:table-cell table:style-name="ce17" table:formula="of:=IF([.D79]&gt;[.D78];&quot;✅&quot;;&quot;❌&quot;)" office:value-type="string" office:string-value="✅" calcext:value-type="string">
            <text:p>✅</text:p>
          </table:table-cell>
          <table:table-cell table:style-name="ce17" table:formula="of:=IF([.E79]&gt;[.E78];&quot;✅&quot;;&quot;❌&quot;)" office:value-type="string" office:string-value="✅" calcext:value-type="string">
            <text:p>✅</text:p>
          </table:table-cell>
          <table:table-cell table:style-name="ce17" table:formula="of:=IF([.F79]&gt;[.F78];&quot;✅&quot;;&quot;❌&quot;)" office:value-type="string" office:string-value="✅" calcext:value-type="string">
            <text:p>✅</text:p>
          </table:table-cell>
          <table:table-cell table:style-name="ce17" table:formula="of:=IF([.G79]&gt;[.G78];&quot;✅&quot;;&quot;❌&quot;)" office:value-type="string" office:string-value="✅" calcext:value-type="string">
            <text:p>✅</text:p>
          </table:table-cell>
          <table:table-cell table:style-name="ce17" table:formula="of:=IF([.H79]&gt;[.H78];&quot;✅&quot;;&quot;❌&quot;)" office:value-type="string" office:string-value="✅" calcext:value-type="string">
            <text:p>✅</text:p>
          </table:table-cell>
          <table:table-cell table:style-name="ce17" table:formula="of:=IF([.I79]&gt;[.I78];&quot;✅&quot;;&quot;❌&quot;)" office:value-type="string" office:string-value="✅" calcext:value-type="string">
            <text:p>✅</text:p>
          </table:table-cell>
          <table:table-cell table:style-name="ce17" table:formula="of:=IF([.J79]&gt;[.J78];&quot;✅&quot;;&quot;❌&quot;)" office:value-type="string" office:string-value="✅" calcext:value-type="string">
            <text:p>✅</text:p>
          </table:table-cell>
          <table:table-cell table:style-name="ce17" table:formula="of:=IF([.K79]&gt;[.K78];&quot;✅&quot;;&quot;❌&quot;)" office:value-type="string" office:string-value="✅" calcext:value-type="string">
            <text:p>✅</text:p>
          </table:table-cell>
          <table:table-cell table:style-name="ce17" table:formula="of:=IF([.L79]&gt;[.L78];&quot;✅&quot;;&quot;❌&quot;)" office:value-type="string" office:string-value="✅" calcext:value-type="string">
            <text:p>✅</text:p>
          </table:table-cell>
          <table:table-cell table:style-name="ce17" table:formula="of:=IF([.M79]&gt;[.M78];&quot;✅&quot;;&quot;❌&quot;)" office:value-type="string" office:string-value="✅" calcext:value-type="string">
            <text:p>✅</text:p>
          </table:table-cell>
          <table:table-cell table:style-name="ce17" table:formula="of:=IF([.N79]&gt;[.N78];&quot;✅&quot;;&quot;❌&quot;)" office:value-type="string" office:string-value="✅" calcext:value-type="string">
            <text:p>✅</text:p>
          </table:table-cell>
          <table:table-cell table:style-name="ce17" table:formula="of:=IF([.O79]&gt;[.O78];&quot;✅&quot;;&quot;❌&quot;)" office:value-type="string" office:string-value="✅" calcext:value-type="string">
            <text:p>✅</text:p>
          </table:table-cell>
          <table:table-cell table:style-name="ce17" table:formula="of:=IF([.P79]&gt;[.P78];&quot;✅&quot;;&quot;❌&quot;)" office:value-type="string" office:string-value="✅" calcext:value-type="string">
            <text:p>✅</text:p>
          </table:table-cell>
          <table:table-cell table:style-name="ce17" table:formula="of:=IF([.Q79]&gt;[.Q78];&quot;✅&quot;;&quot;❌&quot;)" office:value-type="string" office:string-value="✅" calcext:value-type="string">
            <text:p>✅</text:p>
          </table:table-cell>
          <table:table-cell table:style-name="ce17" table:formula="of:=IF([.R79]&gt;[.R78];&quot;✅&quot;;&quot;❌&quot;)" office:value-type="string" office:string-value="✅" calcext:value-type="string">
            <text:p>✅</text:p>
          </table:table-cell>
          <table:table-cell table:style-name="ce17" table:formula="of:=IF([.S79]&gt;[.S78];&quot;✅&quot;;&quot;❌&quot;)" office:value-type="string" office:string-value="✅" calcext:value-type="string">
            <text:p>✅</text:p>
          </table:table-cell>
          <table:table-cell table:style-name="ce17" table:formula="of:=IF([.T79]&gt;[.T78];&quot;✅&quot;;&quot;❌&quot;)" office:value-type="string" office:string-value="✅" calcext:value-type="string">
            <text:p>✅</text:p>
          </table:table-cell>
          <table:table-cell table:style-name="ce17" table:formula="of:=IF([.U79]&gt;[.U78];&quot;✅&quot;;&quot;❌&quot;)" office:value-type="string" office:string-value="✅" calcext:value-type="string">
            <text:p>✅</text:p>
          </table:table-cell>
          <table:table-cell table:style-name="ce17" table:formula="of:=IF([.V79]&gt;[.V78];&quot;✅&quot;;&quot;❌&quot;)" office:value-type="string" office:string-value="✅" calcext:value-type="string">
            <text:p>✅</text:p>
          </table:table-cell>
          <table:table-cell table:style-name="ce17" table:formula="of:=IF([.W79]&gt;[.W78];&quot;✅&quot;;&quot;❌&quot;)" office:value-type="string" office:string-value="✅" calcext:value-type="string">
            <text:p>✅</text:p>
          </table:table-cell>
          <table:table-cell table:style-name="ce17" table:formula="of:=IF([.X79]&gt;[.X78];&quot;✅&quot;;&quot;❌&quot;)" office:value-type="string" office:string-value="✅" calcext:value-type="string">
            <text:p>✅</text:p>
          </table:table-cell>
          <table:table-cell table:style-name="ce17" table:formula="of:=IF([.Y79]&gt;[.Y78];&quot;✅&quot;;&quot;❌&quot;)" office:value-type="string" office:string-value="✅" calcext:value-type="string">
            <text:p>✅</text:p>
          </table:table-cell>
          <table:table-cell table:style-name="ce17" table:formula="of:=IF([.Z79]&gt;[.Z78];&quot;✅&quot;;&quot;❌&quot;)" office:value-type="string" office:string-value="✅" calcext:value-type="string">
            <text:p>✅</text:p>
          </table:table-cell>
          <table:table-cell table:style-name="ce17" table:formula="of:=IF([.AA79]&gt;[.AA78];&quot;✅&quot;;&quot;❌&quot;)" office:value-type="string" office:string-value="✅" calcext:value-type="string">
            <text:p>✅</text:p>
          </table:table-cell>
          <table:table-cell table:style-name="ce17" table:formula="of:=IF([.AB79]&gt;[.AB78];&quot;✅&quot;;&quot;❌&quot;)" office:value-type="string" office:string-value="✅" calcext:value-type="string">
            <text:p>✅</text:p>
          </table:table-cell>
          <table:table-cell table:style-name="ce17" table:formula="of:=IF([.AC79]&gt;[.AC78];&quot;✅&quot;;&quot;❌&quot;)" office:value-type="string" office:string-value="✅" calcext:value-type="string">
            <text:p>✅</text:p>
          </table:table-cell>
          <table:table-cell table:style-name="ce17" table:formula="of:=IF([.AD79]&gt;[.AD78];&quot;✅&quot;;&quot;❌&quot;)" office:value-type="string" office:string-value="✅" calcext:value-type="string">
            <text:p>✅</text:p>
          </table:table-cell>
          <table:table-cell table:style-name="ce17" table:formula="of:=IF([.AE79]&gt;[.AE78];&quot;✅&quot;;&quot;❌&quot;)" office:value-type="string" office:string-value="✅" calcext:value-type="string">
            <text:p>✅</text:p>
          </table:table-cell>
          <table:table-cell table:style-name="ce17" table:formula="of:=IF([.AF79]&gt;[.AF78];&quot;✅&quot;;&quot;❌&quot;)" office:value-type="string" office:string-value="✅" calcext:value-type="string">
            <text:p>✅</text:p>
          </table:table-cell>
          <table:table-cell table:style-name="ce17" table:formula="of:=IF([.AG79]&gt;[.AG78];&quot;✅&quot;;&quot;❌&quot;)" office:value-type="string" office:string-value="✅" calcext:value-type="string">
            <text:p>✅</text:p>
          </table:table-cell>
        </table:table-row>
        <table:table-row table:style-name="ro1" table:number-rows-repeated="2">
          <table:table-cell/>
          <table:table-cell table:style-name="Default" table:number-columns-repeated="32"/>
        </table:table-row>
        <table:table-row table:style-name="ro1">
          <table:table-cell/>
          <table:table-cell table:style-name="Default" table:number-columns-repeated="14"/>
          <table:table-cell table:style-name="Default">
            <draw:frame draw:z-index="1" draw:style-name="gr1" draw:text-style-name="P1" svg:width="29.449cm" svg:height="16.564cm" svg:x="2.091cm" svg:y="0.361cm">
              <draw:object draw:notify-on-update-of-ranges="Stability.D75:Stability.AG75 Stability.C37:Stability.C37 Stability.D37:Stability.AG37 Stability.D75:Stability.AG75 Stability.C38:Stability.C38 Stability.D38:Stability.AG38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Default" table:number-columns-repeated="17"/>
        </table:table-row>
      </table:table>
      <table:table table:name="Sheet1" table:style-name="ta1">
        <table:shapes>
          <draw:frame draw:z-index="0" draw:style-name="gr1" draw:text-style-name="P1" svg:width="15.998cm" svg:height="9.004cm" svg:x="18.824cm" svg:y="1.27cm">
            <draw:object draw:notify-on-update-of-ranges="Sheet1.J27:Sheet1.J38 Sheet1.K26:Sheet1.K26 Sheet1.K27:Sheet1.K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Text Frame 1" draw:style-name="gr2" draw:text-style-name="P2" svg:width="21.165cm" svg:height="8.326cm" svg:x="23.45cm" svg:y="18.235cm">
            <draw:text-box>
              <text:p>Procedure</text:p>
              <text:p/>
              <text:p>Filters switched out of circuit.</text:p>
              <text:p/>
            </draw:text-box>
          </draw:frame>
        </table:shapes>
        <table:table-column table:style-name="co1" table:number-columns-repeated="18" table:default-cell-style-name="Default"/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2"/>
          <table:table-cell office:value-type="float" office:value="3216" calcext:value-type="float">
            <text:p>3216</text:p>
          </table:table-cell>
          <table:table-cell table:style-name="ce20" office:value-type="string" calcext:value-type="string">
            <text:p>OLD</text:p>
          </table:table-cell>
          <table:table-cell table:style-name="ce20" office:value-type="string" calcext:value-type="string">
            <text:p>NEW</text:p>
          </table:table-cell>
          <table:table-cell/>
          <table:table-cell table:style-name="ce20" office:value-type="string" calcext:value-type="string">
            <text:p>NEW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Level 3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InpHI</text:p>
          </table:table-cell>
          <table:table-cell office:value-type="float" office:value="49.8" calcext:value-type="float">
            <text:p>49.8</text:p>
          </table:table-cell>
          <table:table-cell/>
          <table:table-cell office:value-type="string" calcext:value-type="string">
            <text:p>InpHI</text:p>
          </table:table-cell>
          <table:table-cell office:value-type="float" office:value="49.8" calcext:value-type="float">
            <text:p>49.8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InpLO</text:p>
          </table:table-cell>
          <table:table-cell office:value-type="float" office:value="9.96" calcext:value-type="float">
            <text:p>9.96</text:p>
          </table:table-cell>
          <table:table-cell/>
          <table:table-cell office:value-type="string" calcext:value-type="string">
            <text:p>InpLO</text:p>
          </table:table-cell>
          <table:table-cell office:value-type="float" office:value="9.96" calcext:value-type="float">
            <text:p>9.96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RngHI</text:p>
          </table:table-cell>
          <table:table-cell office:value-type="float" office:value="45.2" calcext:value-type="float">
            <text:p>45.2</text:p>
          </table:table-cell>
          <table:table-cell office:value-type="float" office:value="44.02" calcext:value-type="float">
            <text:p>44.02</text:p>
          </table:table-cell>
          <table:table-cell office:value-type="string" calcext:value-type="string">
            <text:p>RngHI</text:p>
          </table:table-cell>
          <table:table-cell table:style-name="ce3" office:value-type="float" office:value="43.78" calcext:value-type="float">
            <text:p>43.78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RngLO</text:p>
          </table:table-cell>
          <table:table-cell office:value-type="float" office:value="0.8" calcext:value-type="float">
            <text:p>0.8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RngLO</text:p>
          </table:table-cell>
          <table:table-cell table:style-name="ce3" office:value-type="float" office:value="0.78" calcext:value-type="float">
            <text:p>0.78</text:p>
          </table:table-cell>
          <table:table-cell table:number-columns-repeated="11"/>
        </table:table-row>
        <table:table-row table:style-name="ro1">
          <table:table-cell table:number-columns-repeated="6"/>
          <table:table-cell table:style-name="ce3"/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Pvoffset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string" calcext:value-type="string">
            <text:p>Pvoffset</text:p>
          </table:table-cell>
          <table:table-cell table:style-name="ce3" office:value-type="float" office:value="-1.11" calcext:value-type="float">
            <text:p>-1.11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Filt.t</text:p>
          </table:table-cell>
          <table:table-cell office:value-type="float" office:value="1.6" calcext:value-type="float">
            <text:p>1.6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filt.d</text:p>
          </table:table-cell>
          <table:table-cell office:value-type="string" calcext:value-type="string">
            <text:p>OFF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SV.type</text:p>
          </table:table-cell>
          <table:table-cell office:value-type="string" calcext:value-type="string">
            <text:p>ON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SV.DIR</text:p>
          </table:table-cell>
          <table:table-cell office:value-type="string" calcext:value-type="string">
            <text:p>UP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vin</text:p>
          </table:table-cell>
          <table:table-cell office:value-type="float" office:value="12.07" calcext:value-type="float">
            <text:p>12.07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Nvin</text:p>
          </table:table-cell>
          <table:table-cell office:value-type="float" office:value="20.17" calcext:value-type="float">
            <text:p>20.17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.RST</text:p>
          </table:table-cell>
          <table:table-cell office:value-type="string" calcext:value-type="string">
            <text:p>OFF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HI</text:p>
          </table:table-cell>
          <table:table-cell office:value-type="float" office:value="12.1" calcext:value-type="float">
            <text:p>12.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</text:p>
          </table:table-cell>
          <table:table-cell office:value-type="float" office:value="1.05" calcext:value-type="float">
            <text:p>1.05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TA.OFFS</text:p>
          </table:table-cell>
          <table:table-cell office:value-type="float" office:value="1.51" calcext:value-type="float">
            <text:p>1.51</text:p>
          </table:table-cell>
          <table:table-cell table:number-columns-repeated="14"/>
        </table:table-row>
        <table:table-row table:style-name="ro1">
          <table:table-cell table:number-columns-repeated="9"/>
          <table:table-cell table:style-name="ce20" office:value-type="string" calcext:value-type="string">
            <text:p>Level</text:p>
          </table:table-cell>
          <table:table-cell table:style-name="ce20" office:value-type="string" calcext:value-type="string">
            <text:p>Reading</text:p>
          </table:table-cell>
          <table:table-cell table:number-columns-repeated="2"/>
          <table:table-cell office:value-type="string" calcext:value-type="string">
            <text:p>Level</text:p>
          </table:table-cell>
          <table:table-cell table:style-name="ce20" office:value-type="string" calcext:value-type="string">
            <text:p>Reading</text:p>
          </table:table-cell>
          <table:table-cell/>
          <table:table-cell table:style-name="ce20" office:value-type="string" calcext:value-type="string">
            <text:p>Reading</text:p>
          </table:table-cell>
          <table:table-cell office:value-type="string" calcext:value-type="string">
            <text:p>DEVIATION %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2.11" calcext:value-type="float">
            <text:p>2.11</text:p>
          </table:table-cell>
          <table:table-cell table:style-name="ce4" table:formula="of:=[.K28]/[.J28]-1" office:value-type="percentage" office:value="0.0549999999999999" calcext:value-type="percentage">
            <text:p>5.5%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"/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3.16" calcext:value-type="float">
            <text:p>3.16</text:p>
          </table:table-cell>
          <table:table-cell table:style-name="ce4" table:formula="of:=[.K29]/[.J29]-1" office:value-type="percentage" office:value="0.0533333333333335" calcext:value-type="percentage">
            <text:p>5.3%</text:p>
          </table:table-cell>
          <table:table-cell/>
          <table:table-cell office:value-type="float" office:value="2.7" calcext:value-type="float">
            <text:p>2.7</text:p>
          </table:table-cell>
          <table:table-cell table:formula="of:=[.Q29]-2.51" office:value-type="float" office:value="0.11" calcext:value-type="float">
            <text:p>0.11</text:p>
          </table:table-cell>
          <table:table-cell/>
          <table:table-cell office:value-type="float" office:value="2.62" calcext:value-type="float">
            <text:p>2.62</text:p>
          </table:table-cell>
          <table:table-cell table:style-name="ce4" table:formula="of:=[.Q29]/[.N29]-1" office:value-type="percentage" office:value="-0.0296296296296297" calcext:value-type="percentage">
            <text:p>-3.0%</text:p>
          </table:table-cell>
        </table:table-row>
        <table:table-row table:style-name="ro2">
          <table:table-cell table:number-columns-repeated="3"/>
          <table:table-cell table:style-name="ce2"/>
          <table:table-cell table:style-name="ce2" office:value-type="string" calcext:value-type="string">
            <text:p>RngLO: 0.68 → 0.7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4.18" calcext:value-type="float">
            <text:p>4.18</text:p>
          </table:table-cell>
          <table:table-cell table:style-name="ce4" table:formula="of:=[.K30]/[.J30]-1" office:value-type="percentage" office:value="0.0449999999999999" calcext:value-type="percentage">
            <text:p>4.5%</text:p>
          </table:table-cell>
          <table:table-cell/>
          <table:table-cell office:value-type="float" office:value="3.7" calcext:value-type="float">
            <text:p>3.7</text:p>
          </table:table-cell>
          <table:table-cell table:formula="of:=[.Q30]-2.51" office:value-type="float" office:value="1.11" calcext:value-type="float">
            <text:p>1.11</text:p>
          </table:table-cell>
          <table:table-cell/>
          <table:table-cell office:value-type="float" office:value="3.62" calcext:value-type="float">
            <text:p>3.62</text:p>
          </table:table-cell>
          <table:table-cell table:style-name="ce4" table:formula="of:=[.Q30]/[.N30]-1" office:value-type="percentage" office:value="-0.0216216216216216" calcext:value-type="percentage">
            <text:p>-2.2%</text:p>
          </table:table-cell>
        </table:table-row>
        <table:table-row table:style-name="ro2">
          <table:table-cell table:number-columns-repeated="4"/>
          <table:table-cell table:style-name="ce2" office:value-type="string" calcext:value-type="string">
            <text:p>RngHI: 44.02 → 43.78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5.19" calcext:value-type="float">
            <text:p>5.19</text:p>
          </table:table-cell>
          <table:table-cell table:style-name="ce4" table:formula="of:=[.K31]/[.J31]-1" office:value-type="percentage" office:value="0.038" calcext:value-type="percentage">
            <text:p>3.8%</text:p>
          </table:table-cell>
          <table:table-cell/>
          <table:table-cell office:value-type="float" office:value="4.7" calcext:value-type="float">
            <text:p>4.7</text:p>
          </table:table-cell>
          <table:table-cell table:formula="of:=[.Q31]-2.51" office:value-type="float" office:value="2.11" calcext:value-type="float">
            <text:p>2.11</text:p>
          </table:table-cell>
          <table:table-cell/>
          <table:table-cell office:value-type="float" office:value="4.62" calcext:value-type="float">
            <text:p>4.62</text:p>
          </table:table-cell>
          <table:table-cell table:style-name="ce4" table:formula="of:=[.Q31]/[.N31]-1" office:value-type="percentage" office:value="-0.0170212765957447" calcext:value-type="percentage">
            <text:p>-1.7%</text:p>
          </table:table-cell>
        </table:table-row>
        <table:table-row table:style-name="ro1">
          <table:table-cell table:number-columns-repeated="9"/>
          <table:table-cell office:value-type="float" office:value="6" calcext:value-type="float">
            <text:p>6</text:p>
          </table:table-cell>
          <table:table-cell office:value-type="float" office:value="6.21" calcext:value-type="float">
            <text:p>6.21</text:p>
          </table:table-cell>
          <table:table-cell table:style-name="ce4" table:formula="of:=[.K32]/[.J32]-1" office:value-type="percentage" office:value="0.0349999999999999" calcext:value-type="percentage">
            <text:p>3.5%</text:p>
          </table:table-cell>
          <table:table-cell/>
          <table:table-cell office:value-type="float" office:value="5.7" calcext:value-type="float">
            <text:p>5.7</text:p>
          </table:table-cell>
          <table:table-cell table:formula="of:=[.Q32]-2.51" office:value-type="float" office:value="3.11" calcext:value-type="float">
            <text:p>3.11</text:p>
          </table:table-cell>
          <table:table-cell/>
          <table:table-cell office:value-type="float" office:value="5.62" calcext:value-type="float">
            <text:p>5.62</text:p>
          </table:table-cell>
          <table:table-cell table:style-name="ce4" table:formula="of:=[.Q32]/[.N32]-1" office:value-type="percentage" office:value="-0.0140350877192983" calcext:value-type="percentage">
            <text:p>-1.4%</text:p>
          </table:table-cell>
        </table:table-row>
        <table:table-row table:style-name="ro1">
          <table:table-cell table:number-columns-repeated="9"/>
          <table:table-cell office:value-type="float" office:value="7" calcext:value-type="float">
            <text:p>7</text:p>
          </table:table-cell>
          <table:table-cell office:value-type="float" office:value="7.24" calcext:value-type="float">
            <text:p>7.24</text:p>
          </table:table-cell>
          <table:table-cell table:style-name="ce4" table:formula="of:=[.K33]/[.J33]-1" office:value-type="percentage" office:value="0.0342857142857143" calcext:value-type="percentage">
            <text:p>3.4%</text:p>
          </table:table-cell>
          <table:table-cell/>
          <table:table-cell office:value-type="float" office:value="6.7" calcext:value-type="float">
            <text:p>6.7</text:p>
          </table:table-cell>
          <table:table-cell table:formula="of:=[.Q33]-2.51" office:value-type="float" office:value="4.12" calcext:value-type="float">
            <text:p>4.12</text:p>
          </table:table-cell>
          <table:table-cell/>
          <table:table-cell office:value-type="float" office:value="6.63" calcext:value-type="float">
            <text:p>6.63</text:p>
          </table:table-cell>
          <table:table-cell table:style-name="ce4" table:formula="of:=[.Q33]/[.N33]-1" office:value-type="percentage" office:value="-0.0104477611940299" calcext:value-type="percentage">
            <text:p>-1.0%</text:p>
          </table:table-cell>
        </table:table-row>
        <table:table-row table:style-name="ro1">
          <table:table-cell table:number-columns-repeated="9"/>
          <table:table-cell office:value-type="float" office:value="8" calcext:value-type="float">
            <text:p>8</text:p>
          </table:table-cell>
          <table:table-cell office:value-type="float" office:value="8.26" calcext:value-type="float">
            <text:p>8.26</text:p>
          </table:table-cell>
          <table:table-cell table:style-name="ce4" table:formula="of:=[.K34]/[.J34]-1" office:value-type="percentage" office:value="0.0325" calcext:value-type="percentage">
            <text:p>3.3%</text:p>
          </table:table-cell>
          <table:table-cell/>
          <table:table-cell office:value-type="float" office:value="7.7" calcext:value-type="float">
            <text:p>7.7</text:p>
          </table:table-cell>
          <table:table-cell table:formula="of:=[.Q34]-2.51" office:value-type="float" office:value="5.13" calcext:value-type="float">
            <text:p>5.13</text:p>
          </table:table-cell>
          <table:table-cell/>
          <table:table-cell office:value-type="float" office:value="7.64" calcext:value-type="float">
            <text:p>7.64</text:p>
          </table:table-cell>
          <table:table-cell table:style-name="ce4" table:formula="of:=[.Q34]/[.N34]-1" office:value-type="percentage" office:value="-0.00779220779220791" calcext:value-type="percentage">
            <text:p>-0.8%</text:p>
          </table:table-cell>
        </table:table-row>
        <table:table-row table:style-name="ro1">
          <table:table-cell office:value-type="string" calcext:value-type="string">
            <text:p>We established 2.51 litres in pipes and filters after draining tank via lower outlet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9.3" calcext:value-type="float">
            <text:p>9.3</text:p>
          </table:table-cell>
          <table:table-cell table:style-name="ce4" table:formula="of:=[.K35]/[.J35]-1" office:value-type="percentage" office:value="0.0333333333333334" calcext:value-type="percentage">
            <text:p>3.3%</text:p>
          </table:table-cell>
          <table:table-cell/>
          <table:table-cell office:value-type="float" office:value="8.7" calcext:value-type="float">
            <text:p>8.7</text:p>
          </table:table-cell>
          <table:table-cell table:formula="of:=[.Q35]-2.51" office:value-type="float" office:value="6.14" calcext:value-type="float">
            <text:p>6.14</text:p>
          </table:table-cell>
          <table:table-cell/>
          <table:table-cell office:value-type="float" office:value="8.65" calcext:value-type="float">
            <text:p>8.65</text:p>
          </table:table-cell>
          <table:table-cell table:style-name="ce4" table:formula="of:=[.Q35]/[.N35]-1" office:value-type="percentage" office:value="-0.00574712643678144" calcext:value-type="percentage">
            <text:p>-0.6%</text:p>
          </table:table-cell>
        </table:table-row>
        <table:table-row table:style-name="ro1">
          <table:table-cell table:number-columns-repeated="9"/>
          <table:table-cell office:value-type="float" office:value="10" calcext:value-type="float">
            <text:p>10</text:p>
          </table:table-cell>
          <table:table-cell office:value-type="float" office:value="10.31" calcext:value-type="float">
            <text:p>10.31</text:p>
          </table:table-cell>
          <table:table-cell table:style-name="ce4" table:formula="of:=[.K36]/[.J36]-1" office:value-type="percentage" office:value="0.0310000000000001" calcext:value-type="percentage">
            <text:p>3.1%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[.Q36]-2.51" office:value-type="float" office:value="7.16" calcext:value-type="float">
            <text:p>7.16</text:p>
          </table:table-cell>
          <table:table-cell/>
          <table:table-cell office:value-type="float" office:value="9.67" calcext:value-type="float">
            <text:p>9.67</text:p>
          </table:table-cell>
          <table:table-cell table:style-name="ce4" table:formula="of:=[.Q36]/[.N36]-1" office:value-type="percentage" office:value="-0.00309278350515463" calcext:value-type="percentage">
            <text:p>-0.3%</text:p>
          </table:table-cell>
        </table:table-row>
        <table:table-row table:style-name="ro1">
          <table:table-cell table:number-columns-repeated="9"/>
          <table:table-cell office:value-type="float" office:value="11" calcext:value-type="float">
            <text:p>11</text:p>
          </table:table-cell>
          <table:table-cell office:value-type="float" office:value="11.33" calcext:value-type="float">
            <text:p>11.33</text:p>
          </table:table-cell>
          <table:table-cell table:style-name="ce4" table:formula="of:=[.K37]/[.J37]-1" office:value-type="percentage" office:value="0.03" calcext:value-type="percentage">
            <text:p>3.0%</text:p>
          </table:table-cell>
          <table:table-cell/>
          <table:table-cell office:value-type="float" office:value="10.7" calcext:value-type="float">
            <text:p>10.7</text:p>
          </table:table-cell>
          <table:table-cell table:formula="of:=[.Q37]-2.51" office:value-type="float" office:value="8.17" calcext:value-type="float">
            <text:p>8.17</text:p>
          </table:table-cell>
          <table:table-cell/>
          <table:table-cell office:value-type="float" office:value="10.68" calcext:value-type="float">
            <text:p>10.68</text:p>
          </table:table-cell>
          <table:table-cell table:style-name="ce4" table:formula="of:=[.Q37]/[.N37]-1" office:value-type="percentage" office:value="-0.00186915887850458" calcext:value-type="percentage">
            <text:p>-0.2%</text:p>
          </table:table-cell>
        </table:table-row>
        <table:table-row table:style-name="ro1">
          <table:table-cell table:number-columns-repeated="4"/>
          <table:table-cell table:style-name="ce8" office:value-type="date" office:date-value="2026-06-10" calcext:value-type="date">
            <text:p>2026-06-10</text:p>
          </table:table-cell>
          <table:table-cell table:number-columns-repeated="4"/>
          <table:table-cell office:value-type="float" office:value="11.7" calcext:value-type="float">
            <text:p>11.7</text:p>
          </table:table-cell>
          <table:table-cell office:value-type="float" office:value="12.07" calcext:value-type="float">
            <text:p>12.07</text:p>
          </table:table-cell>
          <table:table-cell table:style-name="ce4" table:formula="of:=[.K38]/[.J38]-1" office:value-type="percentage" office:value="0.0316239316239317" calcext:value-type="percentage">
            <text:p>3.2%</text:p>
          </table:table-cell>
          <table:table-cell/>
          <table:table-cell office:value-type="float" office:value="11.7" calcext:value-type="float">
            <text:p>11.7</text:p>
          </table:table-cell>
          <table:table-cell table:formula="of:=[.Q38]-2.51" office:value-type="float" office:value="9.17" calcext:value-type="float">
            <text:p>9.17</text:p>
          </table:table-cell>
          <table:table-cell/>
          <table:table-cell office:value-type="float" office:value="11.68" calcext:value-type="float">
            <text:p>11.68</text:p>
          </table:table-cell>
          <table:table-cell table:style-name="ce4" table:formula="of:=[.Q38]/[.N38]-1" office:value-type="percentage" office:value="-0.0017094017094017" calcext:value-type="percentage">
            <text:p>-0.2%</text:p>
          </table:table-cell>
        </table:table-row>
        <table:table-row table:style-name="ro1">
          <table:table-cell table:number-columns-repeated="2"/>
          <table:table-cell table:style-name="ce20" office:value-type="string" calcext:value-type="string">
            <text:p>Depth</text:p>
          </table:table-cell>
          <table:table-cell table:style-name="ce20" office:value-type="string" calcext:value-type="string">
            <text:p>Indication</text:p>
          </table:table-cell>
          <table:table-cell table:style-name="ce20" office:value-type="string" calcext:value-type="string">
            <text:p>Removed</text:p>
          </table:table-cell>
          <table:table-cell office:value-type="string" calcext:value-type="string">
            <text:p>Error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5" office:value-type="float" office:value="172" calcext:value-type="float">
            <text:p>172.0</text:p>
          </table:table-cell>
          <table:table-cell table:style-name="ce7" office:value-type="float" office:value="12.3" calcext:value-type="float">
            <text:p>12.30</text:p>
          </table:table-cell>
          <table:table-cell office:value-type="float" office:value="0" calcext:value-type="float">
            <text:p>0</text:p>
          </table:table-cell>
          <table:table-cell table:style-name="ce7" table:formula="of:=[.$D$40]-[.D40]-[.E40]" office:value-type="float" office:value="0" calcext:value-type="float">
            <text:p>0.0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5"/>
          <table:table-cell table:style-name="ce7" office:value-type="float" office:value="11.3" calcext:value-type="float">
            <text:p>11.30</text:p>
          </table:table-cell>
          <table:table-cell office:value-type="float" office:value="1" calcext:value-type="float">
            <text:p>1</text:p>
          </table:table-cell>
          <table:table-cell table:style-name="ce7" table:formula="of:=[.$D$40]-[.D41]-[.E41]" office:value-type="float" office:value="0" calcext:value-type="float">
            <text:p>0.0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5" office:value-type="float" office:value="225" calcext:value-type="float">
            <text:p>225.0</text:p>
          </table:table-cell>
          <table:table-cell table:style-name="ce7" office:value-type="float" office:value="10.31" calcext:value-type="float">
            <text:p>10.31</text:p>
          </table:table-cell>
          <table:table-cell office:value-type="float" office:value="2" calcext:value-type="float">
            <text:p>2</text:p>
          </table:table-cell>
          <table:table-cell table:style-name="ce7" table:formula="of:=[.$D$40]-[.D42]-[.E42]" office:value-type="float" office:value="-0.00999999999999979" calcext:value-type="float">
            <text:p>-0.0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5" office:value-type="float" office:value="244" calcext:value-type="float">
            <text:p>244.0</text:p>
          </table:table-cell>
          <table:table-cell table:style-name="ce7" office:value-type="float" office:value="9.29" calcext:value-type="float">
            <text:p>9.29</text:p>
          </table:table-cell>
          <table:table-cell office:value-type="float" office:value="3" calcext:value-type="float">
            <text:p>3</text:p>
          </table:table-cell>
          <table:table-cell table:style-name="ce7" table:formula="of:=[.$D$40]-[.D43]-[.E43]" office:value-type="float" office:value="0.0100000000000016" calcext:value-type="float">
            <text:p>0.0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5" office:value-type="float" office:value="270" calcext:value-type="float">
            <text:p>270.0</text:p>
          </table:table-cell>
          <table:table-cell table:style-name="ce7" office:value-type="float" office:value="8.3" calcext:value-type="float">
            <text:p>8.30</text:p>
          </table:table-cell>
          <table:table-cell office:value-type="float" office:value="4" calcext:value-type="float">
            <text:p>4</text:p>
          </table:table-cell>
          <table:table-cell table:style-name="ce7" table:formula="of:=[.$D$40]-[.D44]-[.E44]" office:value-type="float" office:value="0" calcext:value-type="float">
            <text:p>0.0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5" office:value-type="float" office:value="298" calcext:value-type="float">
            <text:p>298.0</text:p>
          </table:table-cell>
          <table:table-cell table:style-name="ce7" office:value-type="float" office:value="7.3" calcext:value-type="float">
            <text:p>7.30</text:p>
          </table:table-cell>
          <table:table-cell office:value-type="float" office:value="5" calcext:value-type="float">
            <text:p>5</text:p>
          </table:table-cell>
          <table:table-cell table:style-name="ce7" table:formula="of:=[.$D$40]-[.D45]-[.E45]" office:value-type="float" office:value="0" calcext:value-type="float">
            <text:p>0.0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5"/>
          <table:table-cell table:style-name="ce7" office:value-type="float" office:value="6.32" calcext:value-type="float">
            <text:p>6.32</text:p>
          </table:table-cell>
          <table:table-cell office:value-type="float" office:value="6" calcext:value-type="float">
            <text:p>6</text:p>
          </table:table-cell>
          <table:table-cell table:style-name="ce7" table:formula="of:=[.$D$40]-[.D46]-[.E46]" office:value-type="float" office:value="-0.0199999999999996" calcext:value-type="float">
            <text:p>-0.0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5"/>
          <table:table-cell table:style-name="ce7" office:value-type="float" office:value="5.33" calcext:value-type="float">
            <text:p>5.33</text:p>
          </table:table-cell>
          <table:table-cell office:value-type="float" office:value="7" calcext:value-type="float">
            <text:p>7</text:p>
          </table:table-cell>
          <table:table-cell table:style-name="ce7" table:formula="of:=[.$D$40]-[.D47]-[.E47]" office:value-type="float" office:value="-0.0299999999999994" calcext:value-type="float">
            <text:p>-0.0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5"/>
          <table:table-cell table:style-name="ce7" office:value-type="float" office:value="4.28" calcext:value-type="float">
            <text:p>4.28</text:p>
          </table:table-cell>
          <table:table-cell office:value-type="float" office:value="8" calcext:value-type="float">
            <text:p>8</text:p>
          </table:table-cell>
          <table:table-cell table:style-name="ce7" table:formula="of:=[.$D$40]-[.D48]-[.E48]" office:value-type="float" office:value="0.0199999999999996" calcext:value-type="float">
            <text:p>0.0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5"/>
          <table:table-cell table:style-name="ce7" office:value-type="float" office:value="3.71" calcext:value-type="float">
            <text:p>3.71</text:p>
          </table:table-cell>
          <table:table-cell office:value-type="float" office:value="9" calcext:value-type="float">
            <text:p>9</text:p>
          </table:table-cell>
          <table:table-cell table:style-name="ce7" table:formula="of:=[.$D$40]-[.D49]-[.E49]" office:value-type="float" office:value="-0.41" calcext:value-type="float">
            <text:p>-0.4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5"/>
          <table:table-cell table:style-name="ce7"/>
          <table:table-cell table:formula="of:=9.75" office:value-type="float" office:value="9.75" calcext:value-type="float">
            <text:p>9.75</text:p>
          </table:table-cell>
          <table:table-cell table:style-name="ce7" table:formula="of:=[.$D$40]-[.D50]-[.E50]" office:value-type="float" office:value="2.55" calcext:value-type="float">
            <text:p>2.55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Tank only drained leaving 2.51L in rig filter circuit. Added 1300ml to get above sensor level then adjusted Poffset to get 2.51+1.3 = 3.81L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20" office:value-type="string" calcext:value-type="string">
            <text:p>Added</text:p>
          </table:table-cell>
          <table:table-cell table:number-columns-repeated="15"/>
        </table:table-row>
        <table:table-row table:style-name="ro1">
          <table:table-cell table:number-columns-repeated="2"/>
          <table:table-cell table:formula="of:=1.3+2.51" office:value-type="float" office:value="3.81" calcext:value-type="float">
            <text:p>3.81</text:p>
          </table:table-cell>
          <table:table-cell office:value-type="float" office:value="3.81" calcext:value-type="float">
            <text:p>3.81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.81" calcext:value-type="float">
            <text:p>4.8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number-columns-repeated="2" office:value-type="float" office:value="5.81" calcext:value-type="float">
            <text:p>5.8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.81" calcext:value-type="float">
            <text:p>6.81</text:p>
          </table:table-cell>
          <table:table-cell office:value-type="float" office:value="6.79" calcext:value-type="float">
            <text:p>6.79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.81" calcext:value-type="float">
            <text:p>7.81</text:p>
          </table:table-cell>
          <table:table-cell office:value-type="float" office:value="7.77" calcext:value-type="float">
            <text:p>7.77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.81" calcext:value-type="float">
            <text:p>8.81</text:p>
          </table:table-cell>
          <table:table-cell office:value-type="float" office:value="8.75" calcext:value-type="float">
            <text:p>8.7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9.81" calcext:value-type="float">
            <text:p>9.81</text:p>
          </table:table-cell>
          <table:table-cell office:value-type="float" office:value="9.75" calcext:value-type="float">
            <text:p>9.7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.81" calcext:value-type="float">
            <text:p>10.81</text:p>
          </table:table-cell>
          <table:table-cell office:value-type="float" office:value="10.73" calcext:value-type="float">
            <text:p>10.73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1.28" calcext:value-type="float">
            <text:p>11.28</text:p>
          </table:table-cell>
          <table:table-cell office:value-type="float" office:value="11.18" calcext:value-type="float">
            <text:p>11.1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formula="of:=[.C63]+1" office:value-type="float" office:value="12.28" calcext:value-type="float">
            <text:p>12.28</text:p>
          </table:table-cell>
          <table:table-cell office:value-type="float" office:value="12.17" calcext:value-type="float">
            <text:p>12.1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formula="of:=[.C64]+1" office:value-type="float" office:value="13.28" calcext:value-type="float">
            <text:p>13.28</text:p>
          </table:table-cell>
          <table:table-cell office:value-type="float" office:value="13.13" calcext:value-type="float">
            <text:p>13.13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Final level validation after draining test mode circuit (excludes filter loop sinc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inal adjustment of PvOffset to make read 12.25 so is best value at operating level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Added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etrospective corrected</text:p>
          </table:table-cell>
          <table:table-cell table:style-name="ce20" office:value-type="string" calcext:value-type="string">
            <text:p>Error %FS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table:style-name="ce12" office:value-type="float" office:value="2.5" calcext:value-type="float">
            <text:p>2.50</text:p>
          </table:table-cell>
          <table:table-cell table:formula="of:=[.D71]+([.$C$82]-[.$D$82])" office:value-type="float" office:value="2.68" calcext:value-type="float">
            <text:p>2.68</text:p>
          </table:table-cell>
          <table:table-cell table:style-name="ce14" table:formula="of:=([.E71]-[.C71])/[.$C$82]" office:value-type="percentage" office:value="0.0146938775510204" calcext:value-type="percentage">
            <text:p>1.47%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.C71]+1" office:value-type="float" office:value="3.5" calcext:value-type="float">
            <text:p>3.5</text:p>
          </table:table-cell>
          <table:table-cell table:style-name="ce12" office:value-type="float" office:value="3.46" calcext:value-type="float">
            <text:p>3.46</text:p>
          </table:table-cell>
          <table:table-cell table:formula="of:=[.D72]+([.$C$82]-[.$D$82])" office:value-type="float" office:value="3.64" calcext:value-type="float">
            <text:p>3.64</text:p>
          </table:table-cell>
          <table:table-cell table:style-name="ce14" table:formula="of:=([.E72]-[.C72])/[.$C$82]" office:value-type="percentage" office:value="0.0114285714285714" calcext:value-type="percentage">
            <text:p>1.14%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.C72]+1" office:value-type="float" office:value="4.5" calcext:value-type="float">
            <text:p>4.5</text:p>
          </table:table-cell>
          <table:table-cell table:style-name="ce12" office:value-type="float" office:value="4.44" calcext:value-type="float">
            <text:p>4.44</text:p>
          </table:table-cell>
          <table:table-cell table:formula="of:=[.D73]+([.$C$82]-[.$D$82])" office:value-type="float" office:value="4.62" calcext:value-type="float">
            <text:p>4.62</text:p>
          </table:table-cell>
          <table:table-cell table:style-name="ce14" table:formula="of:=([.E73]-[.C73])/[.$C$82]" office:value-type="percentage" office:value="0.00979591836734695" calcext:value-type="percentage">
            <text:p>0.98%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.C73]+1" office:value-type="float" office:value="5.5" calcext:value-type="float">
            <text:p>5.5</text:p>
          </table:table-cell>
          <table:table-cell table:style-name="ce12" office:value-type="float" office:value="5.42" calcext:value-type="float">
            <text:p>5.42</text:p>
          </table:table-cell>
          <table:table-cell table:formula="of:=[.D74]+([.$C$82]-[.$D$82])" office:value-type="float" office:value="5.6" calcext:value-type="float">
            <text:p>5.6</text:p>
          </table:table-cell>
          <table:table-cell table:style-name="ce14" table:formula="of:=([.E74]-[.C74])/[.$C$82]" office:value-type="percentage" office:value="0.00816326530612242" calcext:value-type="percentage">
            <text:p>0.82%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.C74]+1" office:value-type="float" office:value="6.5" calcext:value-type="float">
            <text:p>6.5</text:p>
          </table:table-cell>
          <table:table-cell table:style-name="ce12" office:value-type="float" office:value="6.42" calcext:value-type="float">
            <text:p>6.42</text:p>
          </table:table-cell>
          <table:table-cell table:formula="of:=[.D75]+([.$C$82]-[.$D$82])" office:value-type="float" office:value="6.6" calcext:value-type="float">
            <text:p>6.6</text:p>
          </table:table-cell>
          <table:table-cell table:style-name="ce14" table:formula="of:=([.E75]-[.C75])/[.$C$82]" office:value-type="percentage" office:value="0.00816326530612242" calcext:value-type="percentage">
            <text:p>0.82%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.C75]+1" office:value-type="float" office:value="7.5" calcext:value-type="float">
            <text:p>7.5</text:p>
          </table:table-cell>
          <table:table-cell table:style-name="ce12" office:value-type="float" office:value="7.4" calcext:value-type="float">
            <text:p>7.40</text:p>
          </table:table-cell>
          <table:table-cell table:formula="of:=[.D76]+([.$C$82]-[.$D$82])" office:value-type="float" office:value="7.58" calcext:value-type="float">
            <text:p>7.58</text:p>
          </table:table-cell>
          <table:table-cell table:style-name="ce14" table:formula="of:=([.E76]-[.C76])/[.$C$82]" office:value-type="percentage" office:value="0.00653061224489797" calcext:value-type="percentage">
            <text:p>0.65%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.C76]+1" office:value-type="float" office:value="8.5" calcext:value-type="float">
            <text:p>8.5</text:p>
          </table:table-cell>
          <table:table-cell table:style-name="ce12" office:value-type="float" office:value="8.38" calcext:value-type="float">
            <text:p>8.38</text:p>
          </table:table-cell>
          <table:table-cell table:formula="of:=[.D77]+([.$C$82]-[.$D$82])" office:value-type="float" office:value="8.56" calcext:value-type="float">
            <text:p>8.56</text:p>
          </table:table-cell>
          <table:table-cell table:style-name="ce14" table:formula="of:=([.E77]-[.C77])/[.$C$82]" office:value-type="percentage" office:value="0.00489795918367351" calcext:value-type="percentage">
            <text:p>0.49%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.C77]+1" office:value-type="float" office:value="9.5" calcext:value-type="float">
            <text:p>9.5</text:p>
          </table:table-cell>
          <table:table-cell table:style-name="ce12" office:value-type="float" office:value="9.36" calcext:value-type="float">
            <text:p>9.36</text:p>
          </table:table-cell>
          <table:table-cell table:formula="of:=[.D78]+([.$C$82]-[.$D$82])" office:value-type="float" office:value="9.54" calcext:value-type="float">
            <text:p>9.54</text:p>
          </table:table-cell>
          <table:table-cell table:style-name="ce14" table:formula="of:=([.E78]-[.C78])/[.$C$82]" office:value-type="percentage" office:value="0.00326530612244891" calcext:value-type="percentage">
            <text:p>0.33%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.C78]+1" office:value-type="float" office:value="10.5" calcext:value-type="float">
            <text:p>10.5</text:p>
          </table:table-cell>
          <table:table-cell table:style-name="ce12" office:value-type="float" office:value="10.34" calcext:value-type="float">
            <text:p>10.34</text:p>
          </table:table-cell>
          <table:table-cell table:formula="of:=[.D79]+([.$C$82]-[.$D$82])" office:value-type="float" office:value="10.52" calcext:value-type="float">
            <text:p>10.52</text:p>
          </table:table-cell>
          <table:table-cell table:style-name="ce14" table:formula="of:=([.E79]-[.C79])/[.$C$82]" office:value-type="percentage" office:value="0.00163265306122446" calcext:value-type="percentage">
            <text:p>0.16%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.C79]+1" office:value-type="float" office:value="11.5" calcext:value-type="float">
            <text:p>11.5</text:p>
          </table:table-cell>
          <table:table-cell table:style-name="ce12" office:value-type="float" office:value="11.34" calcext:value-type="float">
            <text:p>11.34</text:p>
          </table:table-cell>
          <table:table-cell table:formula="of:=[.D80]+([.$C$82]-[.$D$82])" office:value-type="float" office:value="11.52" calcext:value-type="float">
            <text:p>11.52</text:p>
          </table:table-cell>
          <table:table-cell table:style-name="ce14" table:formula="of:=([.E80]-[.C80])/[.$C$82]" office:value-type="percentage" office:value="0.00163265306122446" calcext:value-type="percentage">
            <text:p>0.16%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.C80]+0.25" office:value-type="float" office:value="11.75" calcext:value-type="float">
            <text:p>11.75</text:p>
          </table:table-cell>
          <table:table-cell table:style-name="ce12" office:value-type="float" office:value="11.58" calcext:value-type="float">
            <text:p>11.58</text:p>
          </table:table-cell>
          <table:table-cell table:formula="of:=[.D81]+([.$C$82]-[.$D$82])" office:value-type="float" office:value="11.76" calcext:value-type="float">
            <text:p>11.76</text:p>
          </table:table-cell>
          <table:table-cell table:style-name="ce14" table:formula="of:=([.E81]-[.C81])/[.$C$82]" office:value-type="percentage" office:value="0.000816326530612228" calcext:value-type="percentage">
            <text:p>0.08%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table:formula="of:=[.C81]+0.5" office:value-type="float" office:value="12.25" calcext:value-type="float">
            <text:p>12.25</text:p>
          </table:table-cell>
          <table:table-cell table:style-name="ce12" office:value-type="float" office:value="12.07" calcext:value-type="float">
            <text:p>12.07</text:p>
          </table:table-cell>
          <table:table-cell table:style-name="ce3" table:formula="of:=[.D82]+([.$C$82]-[.$D$82])" office:value-type="float" office:value="12.25" calcext:value-type="float">
            <text:p>12.25</text:p>
          </table:table-cell>
          <table:table-cell table:style-name="ce14" table:formula="of:=([.E82]-[.C82])/[.$C$82]" office:value-type="percentage" office:value="0" calcext:value-type="percentage">
            <text:p>0.00%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12"/>
          <table:table-cell table:number-columns-repeated="14"/>
        </table:table-row>
        <table:table-row table:style-name="ro1">
          <table:table-cell table:number-columns-repeated="3"/>
          <table:table-cell table:style-name="ce12"/>
          <table:table-cell table:number-columns-repeated="14"/>
        </table:table-row>
      </table:table>
      <table:named-expressions/>
      <table:database-ranges>
        <table:database-range table:name="__Anonymous_Sheet_DB__0" table:target-range-address="Stability.B6:Stability.AG72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9">
      <number:number number:decimal-places="1" number:min-decimal-places="1" number:min-integer-digits="1"/>
      <number:text>%</number:text>
    </number:percentage-style>
    <number:number-style style:name="N120">
      <number:number number:decimal-places="1" number:min-decimal-places="1" number:min-integer-digits="1" number:grouping="true"/>
    </number:number-style>
    <number:date-style style:name="N121">
      <number:day number:style="long"/>
      <number:text>-</number:text>
      <number:month number:textual="true"/>
      <number:text>-</number:text>
      <number:year/>
    </number:date-style>
    <number:date-style style:name="N122">
      <number:day number:style="long"/>
      <number:text>-</number:text>
      <number:month number:textual="true"/>
    </number:date-style>
    <number:date-style style:name="N123">
      <number:month number:textual="true"/>
      <number:text>-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2" style:volatile="true">
      <number:text loext:blank-width-char="-"> </number:text>
      <number:fill-character> </number:fill-character>
      <number:text>- _-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7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7P2" style:volatile="true">
      <number:text loext:blank-width-char="-"> £</number:text>
      <number:fill-character> </number:fill-character>
      <number:text>- _-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5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5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0">
      <number:number number:decimal-places="5" number:min-decimal-places="5" number:min-integer-digits="1"/>
    </number:number-style>
    <number:number-style style:name="N151">
      <number:number number:decimal-places="4" number:min-decimal-places="4" number:min-integer-digits="1"/>
    </number:number-style>
    <number:number-style style:name="N152">
      <number:number number:decimal-places="3" number:min-decimal-places="3" number:min-integer-digits="1"/>
    </number:number-style>
    <number:number-style style:name="N153">
      <number:number number:decimal-places="1" number:min-decimal-places="1" number:min-integer-digits="1"/>
    </number:number-style>
    <number:number-style style:name="N154">
      <number:number number:decimal-places="9" number:min-decimal-places="9" number:min-integer-digits="1"/>
    </number:number-style>
    <number:number-style style:name="N155">
      <number:number number:decimal-places="8" number:min-decimal-places="8" number:min-integer-digits="1"/>
    </number:number-style>
    <number:number-style style:name="N156">
      <number:number number:decimal-places="7" number:min-decimal-places="7" number:min-integer-digits="1"/>
    </number:number-style>
    <number:number-style style:name="N157">
      <number:number number:decimal-places="6" number:min-decimal-places="6" number:min-integer-digits="1"/>
    </number:number-style>
    <number:number-style style:name="N158">
      <number:number number:decimal-places="10" number:min-decimal-places="10" number:min-integer-digits="1"/>
    </number:number-style>
    <number:number-style style:name="N159">
      <number:number number:decimal-places="12" number:min-decimal-places="12" number:min-integer-digits="1"/>
    </number:number-style>
    <number:number-style style:name="N160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5">00/00/0000</text:date>, <text:time style:data-style-name="N2" text:time-value="11:18:15.119738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09T12:48:07.654157400</meta:creation-date>
    <dc:date>2026-06-15T10:15:19.083215400</dc:date>
    <meta:editing-duration>PT16H38M31S</meta:editing-duration>
    <meta:editing-cycles>13</meta:editing-cycles>
    <meta:generator>LibreOffice/26.2.1.2$Windows_X86_64 LibreOffice_project/620$Build-2</meta:generator>
    <meta:document-statistic meta:table-count="2" meta:cell-count="2510" meta:object-count="4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5.999cm" svg:height="9.005cm" xlink:href=".." xlink:type="simple" chart:class="chart:scatter" chart:style-name="ch1">
        <chart:legend chart:legend-position="end" svg:x="13.324cm" svg:y="4.203cm" style:legend-expansion="high" chart:style-name="ch2"/>
        <chart:plot-area chart:style-name="ch3" svg:x="1.317cm" svg:y="0.18cm" svg:width="11.688cm" svg:height="7.677cm">
          <chart:coordinate-region svg:x="1.965cm" svg:y="0.38cm" svg:width="10.84cm" svg:height="6.83cm"/>
          <chart:axis chart:dimension="x" chart:name="primary-x" chart:style-name="ch4">
            <chart:title svg:x="6.565cm" svg:y="8.038cm" chart:style-name="ch5">
              <text:p><text:span text:style-name="T1">Volume</text:span></text:p>
            </chart:title>
          </chart:axis>
          <chart:axis chart:dimension="y" chart:name="primary-y" chart:style-name="ch6">
            <chart:title svg:x="0.451cm" svg:y="4.667cm" chart:style-name="ch7">
              <text:p><text:span text:style-name="T1">Reading</text:span></text:p>
            </chart:title>
            <chart:grid chart:style-name="ch8" chart:class="major"/>
          </chart:axis>
          <chart:series chart:style-name="ch9" chart:values-cell-range-address="Sheet1.K27:Sheet1.K38" chart:label-cell-address="Sheet1.K26:Sheet1.K26" chart:class="chart:scatter">
            <chart:domain table:cell-range-address="Sheet1.J27:Sheet1.J38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Reading</text:p>
                <draw:g>
                  <svg:desc>Sheet1.K26:Sheet1.K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J27:Sheet1.J38</svg:desc>
                </draw:g>
              </table:table-cell>
              <table:table-cell office:value-type="float" office:value="NaN">
                <text:p>NaN</text:p>
                <draw:g>
                  <svg:desc>Sheet1.K27:Sheet1.K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19">
                <text:p>5.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.21">
                <text:p>6.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24">
                <text:p>7.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26">
                <text:p>8.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.33">
                <text:p>11.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7">
                <text:p>11.7</text:p>
              </table:table-cell>
              <table:table-cell office:value-type="float" office:value="12.07">
                <text:p>12.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6.2.1.2$Windows_X86_64 LibreOffice_project/620$Build-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number-style style:name="N153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53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fo:font-size="11pt" style:letter-kerning="false" style:font-size-asian="11pt" style:font-size-complex="11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29.45cm" svg:height="16.565cm" xlink:href=".." xlink:type="simple" chart:class="chart:scatter" chart:style-name="ch1">
        <chart:title svg:x="12.557cm" svg:y="0.466cm" chart:style-name="ch2">
          <text:p>ISO 11943 Clause 8</text:p>
        </chart:title>
        <chart:subtitle svg:x="10.379cm" svg:y="1.591cm" chart:style-name="ch2">
          <text:p><text:span text:style-name="T1">Calibration Rig 205 Stability Conformance - 2 hour</text:span></text:p>
        </chart:subtitle>
        <chart:legend chart:legend-position="end" svg:x="26.158cm" svg:y="7.734cm" style:legend-expansion="high" chart:style-name="ch3"/>
        <chart:plot-area chart:style-name="ch4" svg:x="1.587cm" svg:y="2.577cm" svg:width="23.982cm" svg:height="12.689cm">
          <chart:coordinate-region svg:x="2.93cm" svg:y="2.777cm" svg:width="22.439cm" svg:height="11.842cm"/>
          <chart:axis chart:dimension="x" chart:name="primary-x" chart:style-name="ch5">
            <chart:title svg:x="11.854cm" svg:y="15.598cm" chart:style-name="ch2">
              <text:p><text:span text:style-name="T2">Particle Diameter um(c)</text:span></text:p>
            </chart:title>
          </chart:axis>
          <chart:axis chart:dimension="y" chart:name="primary-y" chart:style-name="ch6">
            <chart:title svg:x="0.451cm" svg:y="10.328cm" chart:style-name="ch7">
              <text:p><text:span text:style-name="T2">Standard Deviation</text:span></text:p>
            </chart:title>
            <chart:grid chart:style-name="ch8" chart:class="major"/>
          </chart:axis>
          <chart:series chart:style-name="ch9" chart:values-cell-range-address="Stability.D78:Stability.AG78" chart:label-cell-address="Stability.C78:Stability.C78" chart:class="chart:scatter">
            <chart:domain table:cell-range-address="Stability.D75:Stability.AG75"/>
            <chart:data-point chart:repeated="30"/>
          </chart:series>
          <chart:series chart:style-name="ch10" chart:values-cell-range-address="Stability.D79:Stability.AG79" chart:label-cell-address="Stability.C79:Stability.C79" chart:class="chart:scatter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Row 75</text:p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Stability.D75:Stability.AG75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8">
                <text:p>38</text:p>
              </table:table-cell>
              <table:table-cell office:value-type="float" office:value="50">
                <text:p>5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σ</text:p>
                <draw:g>
                  <svg:desc>Stability.C78:Stability.C78</svg:desc>
                </draw:g>
              </table:table-cell>
              <table:table-cell office:value-type="float" office:value="314.607166436894">
                <text:p>314.607166436894</text:p>
                <draw:g>
                  <svg:desc>Stability.D78:Stability.AG78</svg:desc>
                </draw:g>
              </table:table-cell>
              <table:table-cell office:value-type="float" office:value="183.736678314421">
                <text:p>183.736678314421</text:p>
              </table:table-cell>
              <table:table-cell office:value-type="float" office:value="118.837378501259">
                <text:p>118.837378501259</text:p>
              </table:table-cell>
              <table:table-cell office:value-type="float" office:value="85.926764915686">
                <text:p>85.926764915686</text:p>
              </table:table-cell>
              <table:table-cell office:value-type="float" office:value="59.6013304475735">
                <text:p>59.6013304475735</text:p>
              </table:table-cell>
              <table:table-cell office:value-type="float" office:value="44.0750138616435">
                <text:p>44.0750138616435</text:p>
              </table:table-cell>
              <table:table-cell office:value-type="float" office:value="31.4643895798618">
                <text:p>31.4643895798618</text:p>
              </table:table-cell>
              <table:table-cell office:value-type="float" office:value="25.1943678751625">
                <text:p>25.1943678751625</text:p>
              </table:table-cell>
              <table:table-cell office:value-type="float" office:value="22.2218055092954">
                <text:p>22.2218055092954</text:p>
              </table:table-cell>
              <table:table-cell office:value-type="float" office:value="19.0367840647353">
                <text:p>19.0367840647353</text:p>
              </table:table-cell>
              <table:table-cell office:value-type="float" office:value="16.2901302796109">
                <text:p>16.2901302796109</text:p>
              </table:table-cell>
              <table:table-cell office:value-type="float" office:value="14.557092584509">
                <text:p>14.557092584509</text:p>
              </table:table-cell>
              <table:table-cell office:value-type="float" office:value="12.786234975281">
                <text:p>12.786234975281</text:p>
              </table:table-cell>
              <table:table-cell office:value-type="float" office:value="11.387296881471">
                <text:p>11.387296881471</text:p>
              </table:table-cell>
              <table:table-cell office:value-type="float" office:value="9.74773586282734">
                <text:p>9.74773586282734</text:p>
              </table:table-cell>
              <table:table-cell office:value-type="float" office:value="8.49249491421676">
                <text:p>8.49249491421676</text:p>
              </table:table-cell>
              <table:table-cell office:value-type="float" office:value="7.83770691925205">
                <text:p>7.83770691925205</text:p>
              </table:table-cell>
              <table:table-cell office:value-type="float" office:value="7.25251834159095">
                <text:p>7.25251834159095</text:p>
              </table:table-cell>
              <table:table-cell office:value-type="float" office:value="6.70589036783384">
                <text:p>6.70589036783384</text:p>
              </table:table-cell>
              <table:table-cell office:value-type="float" office:value="6.0230719818694">
                <text:p>6.0230719818694</text:p>
              </table:table-cell>
              <table:table-cell office:value-type="float" office:value="5.13095479491029">
                <text:p>5.13095479491029</text:p>
              </table:table-cell>
              <table:table-cell office:value-type="float" office:value="5.02079127370535">
                <text:p>5.02079127370535</text:p>
              </table:table-cell>
              <table:table-cell office:value-type="float" office:value="4.52419547258146">
                <text:p>4.52419547258146</text:p>
              </table:table-cell>
              <table:table-cell office:value-type="float" office:value="4.10650152409391">
                <text:p>4.10650152409391</text:p>
              </table:table-cell>
              <table:table-cell office:value-type="float" office:value="3.80031330963961">
                <text:p>3.80031330963961</text:p>
              </table:table-cell>
              <table:table-cell office:value-type="float" office:value="3.45475033801533">
                <text:p>3.45475033801533</text:p>
              </table:table-cell>
              <table:table-cell office:value-type="float" office:value="3.07805717088094">
                <text:p>3.07805717088094</text:p>
              </table:table-cell>
              <table:table-cell office:value-type="float" office:value="1.31370955349514">
                <text:p>1.31370955349514</text:p>
              </table:table-cell>
              <table:table-cell office:value-type="float" office:value="0.419221842011148">
                <text:p>0.419221842011148</text:p>
              </table:table-cell>
              <table:table-cell office:value-type="float" office:value="0.0985957090199087">
                <text:p>0.0985957090199087</text:p>
              </table:table-cell>
            </table:table-row>
            <table:table-row>
              <table:table-cell office:value-type="string">
                <text:p>σacceptable</text:p>
                <draw:g>
                  <svg:desc>Stability.C79:Stability.C79</svg:desc>
                </draw:g>
              </table:table-cell>
              <table:table-cell office:value-type="float" office:value="464.146428780608">
                <text:p>464.146428780608</text:p>
                <draw:g>
                  <svg:desc>Stability.D79:Stability.AG79</svg:desc>
                </draw:g>
              </table:table-cell>
              <table:table-cell office:value-type="float" office:value="312.884301672319">
                <text:p>312.884301672319</text:p>
              </table:table-cell>
              <table:table-cell office:value-type="float" office:value="215.554277551906">
                <text:p>215.554277551906</text:p>
              </table:table-cell>
              <table:table-cell office:value-type="float" office:value="158.817288044602">
                <text:p>158.817288044602</text:p>
              </table:table-cell>
              <table:table-cell office:value-type="float" office:value="116.092187248882">
                <text:p>116.092187248882</text:p>
              </table:table-cell>
              <table:table-cell office:value-type="float" office:value="85.9299036174151">
                <text:p>85.9299036174151</text:p>
              </table:table-cell>
              <table:table-cell office:value-type="float" office:value="66.3207228976871">
                <text:p>66.3207228976871</text:p>
              </table:table-cell>
              <table:table-cell office:value-type="float" office:value="52.1960299325138">
                <text:p>52.1960299325138</text:p>
              </table:table-cell>
              <table:table-cell office:value-type="float" office:value="42.3023099053234">
                <text:p>42.3023099053234</text:p>
              </table:table-cell>
              <table:table-cell office:value-type="float" office:value="35.4540744356442">
                <text:p>35.4540744356442</text:p>
              </table:table-cell>
              <table:table-cell office:value-type="float" office:value="30.5465046547978">
                <text:p>30.5465046547978</text:p>
              </table:table-cell>
              <table:table-cell office:value-type="float" office:value="26.7238590658347">
                <text:p>26.7238590658347</text:p>
              </table:table-cell>
              <table:table-cell office:value-type="float" office:value="23.718196514108">
                <text:p>23.718196514108</text:p>
              </table:table-cell>
              <table:table-cell office:value-type="float" office:value="21.2844396803602">
                <text:p>21.2844396803602</text:p>
              </table:table-cell>
              <table:table-cell office:value-type="float" office:value="19.3046377405636">
                <text:p>19.3046377405636</text:p>
              </table:table-cell>
              <table:table-cell office:value-type="float" office:value="17.6483317439897">
                <text:p>17.6483317439897</text:p>
              </table:table-cell>
              <table:table-cell office:value-type="float" office:value="16.1113679329932">
                <text:p>16.1113679329932</text:p>
              </table:table-cell>
              <table:table-cell office:value-type="float" office:value="14.5657846273493">
                <text:p>14.5657846273493</text:p>
              </table:table-cell>
              <table:table-cell office:value-type="float" office:value="13.1483476326053">
                <text:p>13.1483476326053</text:p>
              </table:table-cell>
              <table:table-cell office:value-type="float" office:value="11.7940149101209">
                <text:p>11.7940149101209</text:p>
              </table:table-cell>
              <table:table-cell office:value-type="float" office:value="10.5970851142791">
                <text:p>10.5970851142791</text:p>
              </table:table-cell>
              <table:table-cell office:value-type="float" office:value="9.48990411729087">
                <text:p>9.48990411729087</text:p>
              </table:table-cell>
              <table:table-cell office:value-type="float" office:value="8.4851256716667">
                <text:p>8.4851256716667</text:p>
              </table:table-cell>
              <table:table-cell office:value-type="float" office:value="7.62852322134824">
                <text:p>7.62852322134824</text:p>
              </table:table-cell>
              <table:table-cell office:value-type="float" office:value="6.90762219603393">
                <text:p>6.90762219603393</text:p>
              </table:table-cell>
              <table:table-cell office:value-type="float" office:value="6.30423076807741">
                <text:p>6.30423076807741</text:p>
              </table:table-cell>
              <table:table-cell office:value-type="float" office:value="5.67741703898854">
                <text:p>5.67741703898854</text:p>
              </table:table-cell>
              <table:table-cell office:value-type="float" office:value="2.2279378065587">
                <text:p>2.2279378065587</text:p>
              </table:table-cell>
              <table:table-cell office:value-type="float" office:value="0.945327308367611">
                <text:p>0.945327308367611</text:p>
              </table:table-cell>
              <table:table-cell office:value-type="float" office:value="0.317494021922721">
                <text:p>0.3174940219227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6.2.1.2$Windows_X86_64 LibreOffice_project/620$Build-2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number-style style:name="N153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53">
      <style:chart-properties chart:display-label="true" chart:logarithmic="tru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fo:font-size="11pt" style:letter-kerning="false" style:font-size-asian="11pt" style:font-size-complex="11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29.45cm" svg:height="16.565cm" xlink:href=".." xlink:type="simple" chart:class="chart:scatter" chart:style-name="ch1">
        <chart:title svg:x="12.557cm" svg:y="0.466cm" chart:style-name="ch2">
          <text:p>ISO 11943 Clause 8</text:p>
        </chart:title>
        <chart:subtitle svg:x="10.379cm" svg:y="1.591cm" chart:style-name="ch2">
          <text:p><text:span text:style-name="T1">Calibration Rig 205 Stability Conformance - 1 hour</text:span></text:p>
        </chart:subtitle>
        <chart:legend chart:legend-position="end" svg:x="26.158cm" svg:y="7.734cm" style:legend-expansion="high" chart:style-name="ch3"/>
        <chart:plot-area chart:style-name="ch4" svg:x="1.587cm" svg:y="2.577cm" svg:width="23.982cm" svg:height="12.689cm">
          <chart:coordinate-region svg:x="2.93cm" svg:y="2.777cm" svg:width="22.439cm" svg:height="11.842cm"/>
          <chart:axis chart:dimension="x" chart:name="primary-x" chart:style-name="ch5">
            <chart:title svg:x="11.854cm" svg:y="15.598cm" chart:style-name="ch2">
              <text:p><text:span text:style-name="T2">Particle Diameter um(c)</text:span></text:p>
            </chart:title>
          </chart:axis>
          <chart:axis chart:dimension="y" chart:name="primary-y" chart:style-name="ch6">
            <chart:title svg:x="0.451cm" svg:y="10.328cm" chart:style-name="ch7">
              <text:p><text:span text:style-name="T2">Standard Deviation</text:span></text:p>
            </chart:title>
            <chart:grid chart:style-name="ch8" chart:class="major"/>
          </chart:axis>
          <chart:series chart:style-name="ch9" chart:values-cell-range-address="Stability.D37:Stability.AG37" chart:label-cell-address="Stability.C37:Stability.C37" chart:class="chart:scatter">
            <chart:domain table:cell-range-address="Stability.D75:Stability.AG75"/>
            <chart:data-point chart:repeated="30"/>
          </chart:series>
          <chart:series chart:style-name="ch10" chart:values-cell-range-address="Stability.D38:Stability.AG38" chart:label-cell-address="Stability.C38:Stability.C38" chart:class="chart:scatter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Row 75</text:p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Stability.D75:Stability.AG75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8">
                <text:p>38</text:p>
              </table:table-cell>
              <table:table-cell office:value-type="float" office:value="50">
                <text:p>5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σ</text:p>
                <draw:g>
                  <svg:desc>Stability.C37:Stability.C37</svg:desc>
                </draw:g>
              </table:table-cell>
              <table:table-cell office:value-type="float" office:value="176.29950086783">
                <text:p>176.29950086783</text:p>
                <draw:g>
                  <svg:desc>Stability.D37:Stability.AG37</svg:desc>
                </draw:g>
              </table:table-cell>
              <table:table-cell office:value-type="float" office:value="114.157498825453">
                <text:p>114.157498825453</text:p>
              </table:table-cell>
              <table:table-cell office:value-type="float" office:value="86.0414119747076">
                <text:p>86.0414119747076</text:p>
              </table:table-cell>
              <table:table-cell office:value-type="float" office:value="67.6104340242887">
                <text:p>67.6104340242887</text:p>
              </table:table-cell>
              <table:table-cell office:value-type="float" office:value="52.454763132566">
                <text:p>52.454763132566</text:p>
              </table:table-cell>
              <table:table-cell office:value-type="float" office:value="43.6889412571436">
                <text:p>43.6889412571436</text:p>
              </table:table-cell>
              <table:table-cell office:value-type="float" office:value="35.3033123236461">
                <text:p>35.3033123236461</text:p>
              </table:table-cell>
              <table:table-cell office:value-type="float" office:value="30.9068904329227">
                <text:p>30.9068904329227</text:p>
              </table:table-cell>
              <table:table-cell office:value-type="float" office:value="28.6477917386827">
                <text:p>28.6477917386827</text:p>
              </table:table-cell>
              <table:table-cell office:value-type="float" office:value="25.3100015866268">
                <text:p>25.3100015866268</text:p>
              </table:table-cell>
              <table:table-cell office:value-type="float" office:value="21.4709926457578">
                <text:p>21.4709926457578</text:p>
              </table:table-cell>
              <table:table-cell office:value-type="float" office:value="18.8463158441325">
                <text:p>18.8463158441325</text:p>
              </table:table-cell>
              <table:table-cell office:value-type="float" office:value="16.1861216447682">
                <text:p>16.1861216447682</text:p>
              </table:table-cell>
              <table:table-cell office:value-type="float" office:value="14.5479602195861">
                <text:p>14.5479602195861</text:p>
              </table:table-cell>
              <table:table-cell office:value-type="float" office:value="12.1064237009238">
                <text:p>12.1064237009238</text:p>
              </table:table-cell>
              <table:table-cell office:value-type="float" office:value="10.3882011467197">
                <text:p>10.3882011467197</text:p>
              </table:table-cell>
              <table:table-cell office:value-type="float" office:value="9.01294571967252">
                <text:p>9.01294571967252</text:p>
              </table:table-cell>
              <table:table-cell office:value-type="float" office:value="8.14665184374425">
                <text:p>8.14665184374425</text:p>
              </table:table-cell>
              <table:table-cell office:value-type="float" office:value="7.10051704785884">
                <text:p>7.10051704785884</text:p>
              </table:table-cell>
              <table:table-cell office:value-type="float" office:value="5.83391305358478">
                <text:p>5.83391305358478</text:p>
              </table:table-cell>
              <table:table-cell office:value-type="float" office:value="4.49866495644386">
                <text:p>4.49866495644386</text:p>
              </table:table-cell>
              <table:table-cell office:value-type="float" office:value="4.40713733980121">
                <text:p>4.40713733980121</text:p>
              </table:table-cell>
              <table:table-cell office:value-type="float" office:value="3.59370427016741">
                <text:p>3.59370427016741</text:p>
              </table:table-cell>
              <table:table-cell office:value-type="float" office:value="3.10685367642032">
                <text:p>3.10685367642032</text:p>
              </table:table-cell>
              <table:table-cell office:value-type="float" office:value="2.77813396089033">
                <text:p>2.77813396089033</text:p>
              </table:table-cell>
              <table:table-cell office:value-type="float" office:value="2.32921869070031">
                <text:p>2.32921869070031</text:p>
              </table:table-cell>
              <table:table-cell office:value-type="float" office:value="2.00092457789135">
                <text:p>2.00092457789135</text:p>
              </table:table-cell>
              <table:table-cell office:value-type="float" office:value="0.939741362623704">
                <text:p>0.939741362623704</text:p>
              </table:table-cell>
              <table:table-cell office:value-type="float" office:value="0.307844633275647">
                <text:p>0.307844633275647</text:p>
              </table:table-cell>
              <table:table-cell office:value-type="float" office:value="0.103221522370432">
                <text:p>0.103221522370432</text:p>
              </table:table-cell>
            </table:table-row>
            <table:table-row>
              <table:table-cell office:value-type="string">
                <text:p>σacceptable</text:p>
                <draw:g>
                  <svg:desc>Stability.C38:Stability.C38</svg:desc>
                </draw:g>
              </table:table-cell>
              <table:table-cell office:value-type="float" office:value="467.372922259633">
                <text:p>467.372922259633</text:p>
                <draw:g>
                  <svg:desc>Stability.D38:Stability.AG38</svg:desc>
                </draw:g>
              </table:table-cell>
              <table:table-cell office:value-type="float" office:value="314.88572728115">
                <text:p>314.88572728115</text:p>
              </table:table-cell>
              <table:table-cell office:value-type="float" office:value="217.005501571229">
                <text:p>217.005501571229</text:p>
              </table:table-cell>
              <table:table-cell office:value-type="float" office:value="159.924991043235">
                <text:p>159.924991043235</text:p>
              </table:table-cell>
              <table:table-cell office:value-type="float" office:value="116.786423961957">
                <text:p>116.786423961957</text:p>
              </table:table-cell>
              <table:table-cell office:value-type="float" office:value="86.4124083958942">
                <text:p>86.4124083958942</text:p>
              </table:table-cell>
              <table:table-cell office:value-type="float" office:value="66.5707368317334">
                <text:p>66.5707368317334</text:p>
              </table:table-cell>
              <table:table-cell office:value-type="float" office:value="52.3104806052491">
                <text:p>52.3104806052491</text:p>
              </table:table-cell>
              <table:table-cell office:value-type="float" office:value="42.3717443153555">
                <text:p>42.3717443153555</text:p>
              </table:table-cell>
              <table:table-cell office:value-type="float" office:value="35.4892864481175">
                <text:p>35.4892864481175</text:p>
              </table:table-cell>
              <table:table-cell office:value-type="float" office:value="30.5580726103885">
                <text:p>30.5580726103885</text:p>
              </table:table-cell>
              <table:table-cell office:value-type="float" office:value="26.7310059010664">
                <text:p>26.7310059010664</text:p>
              </table:table-cell>
              <table:table-cell office:value-type="float" office:value="23.7307718200965">
                <text:p>23.7307718200965</text:p>
              </table:table-cell>
              <table:table-cell office:value-type="float" office:value="21.3057911648998">
                <text:p>21.3057911648998</text:p>
              </table:table-cell>
              <table:table-cell office:value-type="float" office:value="19.341262303686">
                <text:p>19.341262303686</text:p>
              </table:table-cell>
              <table:table-cell office:value-type="float" office:value="17.7044590079782">
                <text:p>17.7044590079782</text:p>
              </table:table-cell>
              <table:table-cell office:value-type="float" office:value="16.1994205078276">
                <text:p>16.1994205078276</text:p>
              </table:table-cell>
              <table:table-cell office:value-type="float" office:value="14.6771729178803">
                <text:p>14.6771729178803</text:p>
              </table:table-cell>
              <table:table-cell office:value-type="float" office:value="13.2633988554567">
                <text:p>13.2633988554567</text:p>
              </table:table-cell>
              <table:table-cell office:value-type="float" office:value="11.9107522794669">
                <text:p>11.9107522794669</text:p>
              </table:table-cell>
              <table:table-cell office:value-type="float" office:value="10.7229186943786">
                <text:p>10.7229186943786</text:p>
              </table:table-cell>
              <table:table-cell office:value-type="float" office:value="9.64273113743137">
                <text:p>9.64273113743137</text:p>
              </table:table-cell>
              <table:table-cell office:value-type="float" office:value="8.64659910292737">
                <text:p>8.64659910292737</text:p>
              </table:table-cell>
              <table:table-cell office:value-type="float" office:value="7.80038477798329">
                <text:p>7.80038477798329</text:p>
              </table:table-cell>
              <table:table-cell office:value-type="float" office:value="7.09687510639051">
                <text:p>7.09687510639051</text:p>
              </table:table-cell>
              <table:table-cell office:value-type="float" office:value="6.48861342151335">
                <text:p>6.48861342151335</text:p>
              </table:table-cell>
              <table:table-cell office:value-type="float" office:value="5.86681674835183">
                <text:p>5.86681674835183</text:p>
              </table:table-cell>
              <table:table-cell office:value-type="float" office:value="2.43804754424959">
                <text:p>2.43804754424959</text:p>
              </table:table-cell>
              <table:table-cell office:value-type="float" office:value="1.07433852926755">
                <text:p>1.07433852926755</text:p>
              </table:table-cell>
              <table:table-cell office:value-type="float" office:value="0.394693043940228">
                <text:p>0.39469304394022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6.2.1.2$Windows_X86_64 LibreOffice_project/620$Build-2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