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F000000F683EAFB1A.png" manifest:media-type="image/png"/>
  <manifest:file-entry manifest:full-path="Pictures/1000000100000776000001BF43F1A2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Black" svg:font-family="'Arial Black'" style:font-adornments="Regular"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list-style-name="">
      <style:text-properties officeooo:rsid="009612ab" officeooo:paragraph-rsid="009612ab"/>
    </style:style>
    <style:style style:name="P2" style:family="paragraph" style:parent-style-name="Text_20_body" style:list-style-name="L1">
      <style:text-properties officeooo:rsid="009612ab" officeooo:paragraph-rsid="009612ab"/>
    </style:style>
    <style:style style:name="P3" style:family="paragraph" style:parent-style-name="Text_20_body" style:list-style-name="L1">
      <style:text-properties officeooo:rsid="00975e0d" officeooo:paragraph-rsid="00975e0d"/>
    </style:style>
    <style:style style:name="P4" style:family="paragraph" style:parent-style-name="Text_20_body" style:list-style-name="L1">
      <style:text-properties officeooo:rsid="009612ab" officeooo:paragraph-rsid="00975e0d"/>
    </style:style>
    <style:style style:name="P5" style:family="paragraph" style:parent-style-name="Text_20_body" style:list-style-name="">
      <style:text-properties officeooo:rsid="00975e0d" officeooo:paragraph-rsid="00975e0d"/>
    </style:style>
    <style:style style:name="P6" style:family="paragraph" style:parent-style-name="Heading_20_1">
      <style:paragraph-properties fo:break-before="page"/>
    </style:style>
    <style:style style:name="P7" style:family="paragraph" style:parent-style-name="Text_20_body">
      <style:text-properties officeooo:rsid="0013c0dc" officeooo:paragraph-rsid="0013c0dc"/>
    </style:style>
    <style:style style:name="P8" style:family="paragraph" style:parent-style-name="Text_20_body" style:list-style-name="L2">
      <style:text-properties officeooo:paragraph-rsid="0013c0dc"/>
    </style:style>
    <style:style style:name="P9" style:family="paragraph" style:parent-style-name="Text_20_body" style:list-style-name="L3">
      <style:text-properties officeooo:rsid="008aa65a" officeooo:paragraph-rsid="008aa65a"/>
    </style:style>
    <style:style style:name="P10" style:family="paragraph" style:parent-style-name="Text_20_body">
      <style:text-properties officeooo:rsid="008f8c53" officeooo:paragraph-rsid="008f8c53"/>
    </style:style>
    <style:style style:name="P11" style:family="paragraph" style:parent-style-name="Text_20_body" style:list-style-name="L4">
      <style:text-properties officeooo:paragraph-rsid="000f1213"/>
    </style:style>
    <style:style style:name="P12" style:family="paragraph" style:parent-style-name="Text_20_body" style:list-style-name="L4">
      <style:text-properties officeooo:rsid="000f1213" officeooo:paragraph-rsid="000f1213"/>
    </style:style>
    <style:style style:name="P13" style:family="paragraph" style:parent-style-name="Text_20_body" style:list-style-name="L4">
      <style:text-properties officeooo:rsid="00886899" officeooo:paragraph-rsid="00886899"/>
    </style:style>
    <style:style style:name="P14" style:family="paragraph" style:parent-style-name="Text_20_body">
      <style:text-properties officeooo:rsid="000f51fa" officeooo:paragraph-rsid="003234c5"/>
    </style:style>
    <style:style style:name="P15" style:family="paragraph" style:parent-style-name="Text_20_body">
      <style:text-properties officeooo:rsid="0011b24b" officeooo:paragraph-rsid="0011b24b"/>
    </style:style>
    <style:style style:name="P16" style:family="paragraph" style:parent-style-name="Heading_20_2" style:list-style-name=""/>
    <style:style style:name="P17" style:family="paragraph" style:parent-style-name="Heading_20_2">
      <style:paragraph-properties fo:break-before="page"/>
      <style:text-properties officeooo:rsid="0033c664" officeooo:paragraph-rsid="0033c664"/>
    </style:style>
    <style:style style:name="P18" style:family="paragraph" style:parent-style-name="Text_20_body" style:list-style-name="L5">
      <style:text-properties officeooo:rsid="0039b6c5" officeooo:paragraph-rsid="0039b6c5"/>
    </style:style>
    <style:style style:name="P19" style:family="paragraph" style:parent-style-name="Text_20_body" style:list-style-name="L5">
      <style:text-properties officeooo:rsid="0040a981" officeooo:paragraph-rsid="0040a981"/>
    </style:style>
    <style:style style:name="P20" style:family="paragraph" style:parent-style-name="Text_20_body" style:list-style-name="L5">
      <style:text-properties officeooo:rsid="00327207" officeooo:paragraph-rsid="003a1b52"/>
    </style:style>
    <style:style style:name="P21" style:family="paragraph" style:parent-style-name="Text_20_body" style:list-style-name="L5">
      <style:text-properties officeooo:rsid="003a6e44" officeooo:paragraph-rsid="003a6e44"/>
    </style:style>
    <style:style style:name="P22" style:family="paragraph" style:parent-style-name="Text_20_body" style:list-style-name="L5">
      <style:text-properties officeooo:paragraph-rsid="0040a981"/>
    </style:style>
    <style:style style:name="P23" style:family="paragraph" style:parent-style-name="Text_20_body">
      <style:text-properties officeooo:rsid="00480382" officeooo:paragraph-rsid="00480382"/>
    </style:style>
    <style:style style:name="P24" style:family="paragraph" style:parent-style-name="Text_20_body" style:list-style-name="L5">
      <style:text-properties officeooo:rsid="00327207" officeooo:paragraph-rsid="00327207"/>
    </style:style>
    <style:style style:name="P25" style:family="paragraph" style:parent-style-name="Text_20_body" style:list-style-name="L5">
      <style:text-properties officeooo:paragraph-rsid="003fce11"/>
    </style:style>
    <style:style style:name="P26" style:family="paragraph" style:parent-style-name="Text_20_body" style:list-style-name="L5">
      <style:text-properties officeooo:rsid="000f1213" officeooo:paragraph-rsid="000f1213"/>
    </style:style>
    <style:style style:name="P27" style:family="paragraph" style:parent-style-name="Text_20_body" style:list-style-name="L5">
      <style:text-properties officeooo:rsid="003fce11" officeooo:paragraph-rsid="00a6fcc1"/>
    </style:style>
    <style:style style:name="P28" style:family="paragraph" style:parent-style-name="Text_20_body" style:list-style-name="L5">
      <style:text-properties officeooo:rsid="0013c0dc" officeooo:paragraph-rsid="0013c0dc"/>
    </style:style>
    <style:style style:name="P29" style:family="paragraph" style:parent-style-name="Text_20_body">
      <style:text-properties fo:font-weight="bold" officeooo:rsid="0040a981" officeooo:paragraph-rsid="0040a981" style:font-weight-asian="bold" style:font-weight-complex="bold"/>
    </style:style>
    <style:style style:name="P30" style:family="paragraph" style:parent-style-name="Heading_20_2">
      <style:paragraph-properties fo:break-before="page"/>
    </style:style>
    <style:style style:name="P31" style:family="paragraph" style:parent-style-name="Standard">
      <style:text-properties officeooo:rsid="001b7938" officeooo:paragraph-rsid="001b7938"/>
    </style:style>
    <style:style style:name="P32" style:family="paragraph" style:parent-style-name="Standard">
      <style:text-properties officeooo:rsid="001ca7d3" officeooo:paragraph-rsid="001ca7d3"/>
    </style:style>
    <style:style style:name="P33" style:family="paragraph" style:parent-style-name="Standard">
      <style:text-properties officeooo:rsid="001ea06f" officeooo:paragraph-rsid="001ea06f"/>
    </style:style>
    <style:style style:name="P34" style:family="paragraph" style:parent-style-name="Standard">
      <style:text-properties officeooo:rsid="001f53ee" officeooo:paragraph-rsid="001f53ee"/>
    </style:style>
    <style:style style:name="P35" style:family="paragraph" style:parent-style-name="Standard">
      <style:text-properties officeooo:rsid="001f9f59" officeooo:paragraph-rsid="001f9f59"/>
    </style:style>
    <style:style style:name="P36" style:family="paragraph" style:parent-style-name="Standard">
      <style:text-properties officeooo:rsid="00239e67" officeooo:paragraph-rsid="00239e67"/>
    </style:style>
    <style:style style:name="P37" style:family="paragraph" style:parent-style-name="Standard">
      <style:text-properties officeooo:rsid="00250d8f" officeooo:paragraph-rsid="00250d8f"/>
    </style:style>
    <style:style style:name="P38" style:family="paragraph" style:parent-style-name="Standard">
      <style:text-properties fo:font-weight="bold" officeooo:rsid="0026fab2" officeooo:paragraph-rsid="0026fab2" style:font-weight-asian="bold" style:font-weight-complex="bold"/>
    </style:style>
    <style:style style:name="P39" style:family="paragraph" style:parent-style-name="Standard">
      <style:text-properties officeooo:rsid="002b7e8f" officeooo:paragraph-rsid="002b7e8f"/>
    </style:style>
    <style:style style:name="P40" style:family="paragraph" style:parent-style-name="Standard">
      <style:text-properties officeooo:rsid="002e328d" officeooo:paragraph-rsid="002e328d"/>
    </style:style>
    <style:style style:name="P41" style:family="paragraph" style:parent-style-name="Text_20_body">
      <style:text-properties officeooo:rsid="00502bb4" officeooo:paragraph-rsid="00502bb4"/>
    </style:style>
    <style:style style:name="P42" style:family="paragraph" style:parent-style-name="Standard">
      <style:text-properties officeooo:rsid="00522667" officeooo:paragraph-rsid="00522667"/>
    </style:style>
    <style:style style:name="P43" style:family="paragraph" style:parent-style-name="Standard">
      <style:text-properties officeooo:rsid="0019f1cf" officeooo:paragraph-rsid="0019f1cf"/>
    </style:style>
    <style:style style:name="P44" style:family="paragraph" style:parent-style-name="Standard">
      <style:text-properties officeooo:rsid="0053127d" officeooo:paragraph-rsid="00522667"/>
    </style:style>
    <style:style style:name="P45" style:family="paragraph" style:parent-style-name="Text_20_body">
      <style:text-properties officeooo:paragraph-rsid="006438f8"/>
    </style:style>
    <style:style style:name="P46" style:family="paragraph" style:parent-style-name="Text_20_body">
      <style:text-properties officeooo:rsid="005f3201" officeooo:paragraph-rsid="005f3201"/>
    </style:style>
    <style:style style:name="P47" style:family="paragraph" style:parent-style-name="Text_20_body">
      <style:text-properties fo:font-style="italic" officeooo:rsid="005f9cd0" officeooo:paragraph-rsid="005f9cd0" style:font-style-asian="italic" style:font-style-complex="italic"/>
    </style:style>
    <style:style style:name="P48" style:family="paragraph" style:parent-style-name="Text_20_body">
      <style:text-properties officeooo:rsid="005f9cd0" officeooo:paragraph-rsid="005f9cd0"/>
    </style:style>
    <style:style style:name="P49" style:family="paragraph" style:parent-style-name="Text_20_body">
      <style:text-properties officeooo:rsid="005cf1f3" officeooo:paragraph-rsid="005cf1f3"/>
    </style:style>
    <style:style style:name="P50" style:family="paragraph" style:parent-style-name="Text_20_body">
      <style:text-properties officeooo:paragraph-rsid="0072969b"/>
    </style:style>
    <style:style style:name="P51" style:family="paragraph" style:parent-style-name="Text_20_body" style:list-style-name="L6">
      <style:text-properties officeooo:rsid="0066758d" officeooo:paragraph-rsid="0066758d"/>
    </style:style>
    <style:style style:name="P52" style:family="paragraph" style:parent-style-name="Text_20_body" style:list-style-name="L6">
      <style:text-properties officeooo:rsid="0066758d" officeooo:paragraph-rsid="00707b5b"/>
    </style:style>
    <style:style style:name="P53" style:family="paragraph" style:parent-style-name="Text_20_body" style:list-style-name="L6">
      <style:text-properties officeooo:rsid="006831a2" officeooo:paragraph-rsid="0072969b"/>
    </style:style>
    <style:style style:name="P54" style:family="paragraph" style:parent-style-name="Text_20_body" style:list-style-name="L6">
      <style:text-properties fo:font-weight="bold" officeooo:rsid="006831a2" officeooo:paragraph-rsid="0072969b" style:font-weight-asian="bold" style:font-weight-complex="bold"/>
    </style:style>
    <style:style style:name="P55" style:family="paragraph" style:parent-style-name="Text_20_body" style:list-style-name="L6">
      <style:text-properties officeooo:paragraph-rsid="00707b5b"/>
    </style:style>
    <style:style style:name="P56" style:family="paragraph" style:parent-style-name="Text_20_body" style:list-style-name="L6">
      <style:text-properties officeooo:rsid="0072969b" officeooo:paragraph-rsid="0072969b"/>
    </style:style>
    <style:style style:name="P57" style:family="paragraph" style:parent-style-name="Text_20_body" style:list-style-name="L6">
      <style:text-properties officeooo:rsid="0072969b" officeooo:paragraph-rsid="0074ee9c"/>
    </style:style>
    <style:style style:name="P58" style:family="paragraph" style:parent-style-name="Text_20_body" style:list-style-name="L6">
      <style:text-properties officeooo:rsid="0072969b" officeooo:paragraph-rsid="00788b7a"/>
    </style:style>
    <style:style style:name="P59" style:family="paragraph" style:parent-style-name="Text_20_body" style:list-style-name="L6">
      <style:text-properties officeooo:paragraph-rsid="007a4080"/>
    </style:style>
    <style:style style:name="P60" style:family="paragraph" style:parent-style-name="Text_20_body">
      <style:text-properties officeooo:paragraph-rsid="007a4080"/>
    </style:style>
    <style:style style:name="P61" style:family="paragraph" style:parent-style-name="Text_20_body">
      <style:text-properties style:text-position="0% 100%" fo:font-weight="normal" officeooo:rsid="008aa65a" officeooo:paragraph-rsid="008aa65a" style:font-weight-asian="normal" style:font-weight-complex="normal"/>
    </style:style>
    <style:style style:name="P62" style:family="paragraph" style:parent-style-name="Standard">
      <style:text-properties officeooo:rsid="00196951" officeooo:paragraph-rsid="009d132e"/>
    </style:style>
    <style:style style:name="P63" style:family="paragraph" style:parent-style-name="Standard">
      <style:text-properties officeooo:rsid="0015e59f" officeooo:paragraph-rsid="009d132e"/>
    </style:style>
    <style:style style:name="P64" style:family="paragraph" style:parent-style-name="Heading_20_1">
      <style:text-properties officeooo:paragraph-rsid="009f04ac"/>
    </style:style>
    <style:style style:name="P65" style:family="paragraph" style:parent-style-name="Text_20_body">
      <style:text-properties officeooo:rsid="049f3ae5" officeooo:paragraph-rsid="009f04ac"/>
    </style:style>
    <style:style style:name="P66" style:family="paragraph" style:parent-style-name="Heading_20_3">
      <style:text-properties officeooo:paragraph-rsid="009f04ac"/>
    </style:style>
    <style:style style:name="P67" style:family="paragraph" style:parent-style-name="Text_20_body" style:list-style-name="L7">
      <style:text-properties officeooo:rsid="04a0913b" officeooo:paragraph-rsid="009f04ac"/>
    </style:style>
    <style:style style:name="P68" style:family="paragraph" style:parent-style-name="Text_20_body" style:list-style-name="L7">
      <style:text-properties officeooo:rsid="04b1390a" officeooo:paragraph-rsid="009f04ac"/>
    </style:style>
    <style:style style:name="P69" style:family="paragraph" style:parent-style-name="Text_20_body" style:list-style-name="L7">
      <style:text-properties officeooo:rsid="04a4ea8a" officeooo:paragraph-rsid="009f04ac"/>
    </style:style>
    <style:style style:name="P70" style:family="paragraph" style:parent-style-name="Text_20_body" style:list-style-name="L7">
      <style:text-properties officeooo:rsid="04b45e4d" officeooo:paragraph-rsid="009f04ac"/>
    </style:style>
    <style:style style:name="P71" style:family="paragraph" style:parent-style-name="Text_20_body">
      <style:text-properties officeooo:rsid="04a6d2d9" officeooo:paragraph-rsid="009f04ac"/>
    </style:style>
    <style:style style:name="P72" style:family="paragraph" style:parent-style-name="Text_20_body">
      <style:text-properties officeooo:rsid="04a75507" officeooo:paragraph-rsid="009f04ac"/>
    </style:style>
    <style:style style:name="P73" style:family="paragraph" style:parent-style-name="Heading_20_1">
      <style:text-properties officeooo:paragraph-rsid="00ac47bd"/>
    </style:style>
    <style:style style:name="P74" style:family="paragraph" style:parent-style-name="Text_20_body" style:list-style-name="L8">
      <style:text-properties officeooo:rsid="04a0913b" officeooo:paragraph-rsid="00ac47bd"/>
    </style:style>
    <style:style style:name="P75" style:family="paragraph" style:parent-style-name="Text_20_body" style:list-style-name="L8">
      <style:text-properties officeooo:rsid="04b76578" officeooo:paragraph-rsid="00ac47bd"/>
    </style:style>
    <style:style style:name="P76" style:family="paragraph" style:parent-style-name="Text_20_body" style:list-style-name="L8">
      <style:text-properties officeooo:rsid="04a4481b" officeooo:paragraph-rsid="00ac47bd"/>
    </style:style>
    <style:style style:name="P77" style:family="paragraph" style:parent-style-name="Text_20_body" style:list-style-name="L8">
      <style:text-properties officeooo:rsid="04b45e4d" officeooo:paragraph-rsid="00ac47bd"/>
    </style:style>
    <style:style style:name="P78" style:family="paragraph" style:parent-style-name="Text_20_body">
      <style:text-properties officeooo:rsid="04a93e66" officeooo:paragraph-rsid="00ac47bd"/>
    </style:style>
    <style:style style:name="P79" style:family="paragraph" style:parent-style-name="Text_20_body">
      <style:text-properties officeooo:rsid="04aade85" officeooo:paragraph-rsid="00ac47bd"/>
    </style:style>
    <style:style style:name="P80" style:family="paragraph" style:parent-style-name="Text_20_body">
      <style:text-properties officeooo:rsid="04b8f83d" officeooo:paragraph-rsid="00ac47bd"/>
    </style:style>
    <style:style style:name="P81" style:family="paragraph" style:parent-style-name="Text_20_body">
      <style:text-properties officeooo:rsid="045f3006" officeooo:paragraph-rsid="00ac47bd"/>
    </style:style>
    <style:style style:name="P82" style:family="paragraph" style:parent-style-name="Text_20_body">
      <style:text-properties officeooo:rsid="00ac47bd" officeooo:paragraph-rsid="00ac47bd"/>
    </style:style>
    <style:style style:name="P83" style:family="paragraph" style:parent-style-name="Text_20_body">
      <style:text-properties officeooo:rsid="00a2e44a" officeooo:paragraph-rsid="00a2e44a"/>
    </style:style>
    <style:style style:name="P84" style:family="paragraph" style:parent-style-name="Text_20_body">
      <style:text-properties officeooo:rsid="00ad0584" officeooo:paragraph-rsid="00ad0584"/>
    </style:style>
    <style:style style:name="P85" style:family="paragraph" style:parent-style-name="Text_20_body">
      <style:text-properties officeooo:rsid="00adf336" officeooo:paragraph-rsid="00adf336"/>
    </style:style>
    <style:style style:name="P86" style:family="paragraph" style:parent-style-name="Text_20_body">
      <style:text-properties officeooo:rsid="00b07569" officeooo:paragraph-rsid="00b07569"/>
    </style:style>
    <style:style style:name="P87" style:family="paragraph" style:parent-style-name="Text_20_body">
      <style:text-properties officeooo:rsid="00b4cb5d" officeooo:paragraph-rsid="00b4cb5d"/>
    </style:style>
    <style:style style:name="P88" style:family="paragraph" style:parent-style-name="Text_20_body">
      <style:text-properties officeooo:rsid="00b7c616" officeooo:paragraph-rsid="00b7c616"/>
    </style:style>
    <style:style style:name="T1" style:family="text">
      <style:text-properties officeooo:rsid="00a5f8ee"/>
    </style:style>
    <style:style style:name="T2" style:family="text">
      <style:text-properties officeooo:rsid="00a56980"/>
    </style:style>
    <style:style style:name="T3" style:family="text">
      <style:text-properties officeooo:rsid="00975e0d"/>
    </style:style>
    <style:style style:name="T4" style:family="text">
      <style:text-properties officeooo:rsid="0098f702"/>
    </style:style>
    <style:style style:name="T5" style:family="text">
      <style:text-properties officeooo:rsid="008c1574"/>
    </style:style>
    <style:style style:name="T6" style:family="text">
      <style:text-properties style:text-position="sub 58%"/>
    </style:style>
    <style:style style:name="T7" style:family="text">
      <style:text-properties style:text-position="0% 100%"/>
    </style:style>
    <style:style style:name="T8" style:family="text">
      <style:text-properties officeooo:rsid="000f1213"/>
    </style:style>
    <style:style style:name="T9" style:family="text">
      <style:text-properties officeooo:rsid="003234c5"/>
    </style:style>
    <style:style style:name="T10" style:family="text">
      <style:text-properties officeooo:rsid="00a0f7af"/>
    </style:style>
    <style:style style:name="T11" style:family="text">
      <style:text-properties officeooo:rsid="0015b7f4"/>
    </style:style>
    <style:style style:name="T12" style:family="text">
      <style:text-properties officeooo:rsid="001371bc"/>
    </style:style>
    <style:style style:name="T13" style:family="text">
      <style:text-properties officeooo:rsid="00879a9b"/>
    </style:style>
    <style:style style:name="T14" style:family="text">
      <style:text-properties officeooo:rsid="001040af"/>
    </style:style>
    <style:style style:name="T15" style:family="text">
      <style:text-properties officeooo:rsid="0088c30d"/>
    </style:style>
    <style:style style:name="T16" style:family="text">
      <style:text-properties officeooo:rsid="004b8962"/>
    </style:style>
    <style:style style:name="T17" style:family="text">
      <style:text-properties officeooo:rsid="004d5c52"/>
    </style:style>
    <style:style style:name="T18" style:family="text">
      <style:text-properties officeooo:rsid="003cc3f9"/>
    </style:style>
    <style:style style:name="T19" style:family="text">
      <style:text-properties officeooo:rsid="004393d3"/>
    </style:style>
    <style:style style:name="T20" style:family="text">
      <style:text-properties officeooo:rsid="003a1b52"/>
    </style:style>
    <style:style style:name="T21" style:family="text">
      <style:text-properties officeooo:rsid="003a6e44"/>
    </style:style>
    <style:style style:name="T22" style:family="text">
      <style:text-properties officeooo:rsid="0045a876"/>
    </style:style>
    <style:style style:name="T23" style:family="text">
      <style:text-properties officeooo:rsid="0033c664"/>
    </style:style>
    <style:style style:name="T24" style:family="text">
      <style:text-properties officeooo:rsid="0032a384"/>
    </style:style>
    <style:style style:name="T25" style:family="text">
      <style:text-properties officeooo:rsid="00384ef2"/>
    </style:style>
    <style:style style:name="T26" style:family="text">
      <style:text-properties officeooo:rsid="00365b00"/>
    </style:style>
    <style:style style:name="T27" style:family="text">
      <style:text-properties officeooo:rsid="003b94a8"/>
    </style:style>
    <style:style style:name="T28" style:family="text">
      <style:text-properties officeooo:rsid="00460d9c"/>
    </style:style>
    <style:style style:name="T29" style:family="text">
      <style:text-properties officeooo:rsid="0040a981"/>
    </style:style>
    <style:style style:name="T30" style:family="text">
      <style:text-properties officeooo:rsid="00480382"/>
    </style:style>
    <style:style style:name="T31" style:family="text">
      <style:text-properties officeooo:rsid="0054c776"/>
    </style:style>
    <style:style style:name="T32" style:family="text">
      <style:text-properties officeooo:rsid="0048fbf5"/>
    </style:style>
    <style:style style:name="T33" style:family="text">
      <style:text-properties officeooo:rsid="005569c8"/>
    </style:style>
    <style:style style:name="T34" style:family="text">
      <style:text-properties officeooo:rsid="00481608"/>
    </style:style>
    <style:style style:name="T35" style:family="text">
      <style:text-properties officeooo:rsid="00327207"/>
    </style:style>
    <style:style style:name="T36" style:family="text">
      <style:text-properties officeooo:rsid="003fce11"/>
    </style:style>
    <style:style style:name="T37" style:family="text">
      <style:text-properties officeooo:rsid="0013c0dc"/>
    </style:style>
    <style:style style:name="T38" style:family="text">
      <style:text-properties officeooo:rsid="004b64af"/>
    </style:style>
    <style:style style:name="T39" style:family="text">
      <style:text-properties officeooo:rsid="00a6fcc1"/>
    </style:style>
    <style:style style:name="T40" style:family="text">
      <style:text-properties officeooo:rsid="00a823a1"/>
    </style:style>
    <style:style style:name="T41" style:family="text">
      <style:text-properties officeooo:rsid="004adaf7"/>
    </style:style>
    <style:style style:name="T42" style:family="text">
      <style:text-properties officeooo:rsid="001456a1"/>
    </style:style>
    <style:style style:name="T43" style:family="text">
      <style:text-properties officeooo:rsid="005410e5"/>
    </style:style>
    <style:style style:name="T44" style:family="text">
      <style:text-properties officeooo:rsid="00a9ce6f"/>
    </style:style>
    <style:style style:name="T45" style:family="text">
      <style:text-properties officeooo:rsid="00aa1a66"/>
    </style:style>
    <style:style style:name="T46" style:family="text">
      <style:text-properties fo:font-weight="bold" style:font-weight-asian="bold" style:font-weight-complex="bold"/>
    </style:style>
    <style:style style:name="T47" style:family="text">
      <style:text-properties fo:font-weight="bold" officeooo:rsid="00421e2c" style:font-weight-asian="bold" style:font-weight-complex="bold"/>
    </style:style>
    <style:style style:name="T48" style:family="text">
      <style:text-properties officeooo:rsid="00421e2c"/>
    </style:style>
    <style:style style:name="T49" style:family="text">
      <style:text-properties officeooo:rsid="00ab79e6"/>
    </style:style>
    <style:style style:name="T50" style:family="text">
      <style:text-properties officeooo:rsid="001f53ee"/>
    </style:style>
    <style:style style:name="T51" style:family="text">
      <style:text-properties officeooo:rsid="002c6b07"/>
    </style:style>
    <style:style style:name="T52" style:family="text">
      <style:text-properties officeooo:rsid="0020844f"/>
    </style:style>
    <style:style style:name="T53" style:family="text">
      <style:text-properties officeooo:rsid="00226582"/>
    </style:style>
    <style:style style:name="T54" style:family="text">
      <style:text-properties officeooo:rsid="0026c396"/>
    </style:style>
    <style:style style:name="T55" style:family="text">
      <style:text-properties officeooo:rsid="0026fab2"/>
    </style:style>
    <style:style style:name="T56" style:family="text">
      <style:text-properties officeooo:rsid="00300fdc"/>
    </style:style>
    <style:style style:name="T57" style:family="text">
      <style:text-properties officeooo:rsid="0060e46d"/>
    </style:style>
    <style:style style:name="T58" style:family="text">
      <style:text-properties officeooo:rsid="00584cd3"/>
    </style:style>
    <style:style style:name="T59" style:family="text">
      <style:text-properties officeooo:rsid="0061d7d6"/>
    </style:style>
    <style:style style:name="T60" style:family="text">
      <style:text-properties officeooo:rsid="006438f8"/>
    </style:style>
    <style:style style:name="T61" style:family="text">
      <style:text-properties officeooo:rsid="006e8f7b"/>
    </style:style>
    <style:style style:name="T62" style:family="text">
      <style:text-properties officeooo:rsid="00803ed9"/>
    </style:style>
    <style:style style:name="T63" style:family="text">
      <style:text-properties officeooo:rsid="0072969b"/>
    </style:style>
    <style:style style:name="T64" style:family="text">
      <style:text-properties fo:font-weight="bold" officeooo:rsid="006e8f7b" style:font-weight-asian="bold" style:font-weight-complex="bold"/>
    </style:style>
    <style:style style:name="T65" style:family="text">
      <style:text-properties officeooo:rsid="0068f89d"/>
    </style:style>
    <style:style style:name="T66" style:family="text">
      <style:text-properties officeooo:rsid="00669fc9"/>
    </style:style>
    <style:style style:name="T67" style:family="text">
      <style:text-properties officeooo:rsid="006831a2"/>
    </style:style>
    <style:style style:name="T68" style:family="text">
      <style:text-properties fo:font-weight="bold" officeooo:rsid="00707b5b" style:font-weight-asian="bold" style:font-weight-complex="bold"/>
    </style:style>
    <style:style style:name="T69" style:family="text">
      <style:text-properties fo:font-weight="bold" officeooo:rsid="0072969b" style:font-weight-asian="bold" style:font-weight-complex="bold"/>
    </style:style>
    <style:style style:name="T70" style:family="text">
      <style:text-properties fo:font-weight="normal" officeooo:rsid="0072969b" style:font-weight-asian="normal" style:font-weight-complex="normal"/>
    </style:style>
    <style:style style:name="T71" style:family="text">
      <style:text-properties fo:font-weight="normal" officeooo:rsid="00737ba6" style:font-weight-asian="normal" style:font-weight-complex="normal"/>
    </style:style>
    <style:style style:name="T72" style:family="text">
      <style:text-properties officeooo:rsid="0069bc31"/>
    </style:style>
    <style:style style:name="T73" style:family="text">
      <style:text-properties officeooo:rsid="006831a2" fo:background-color="#eee8aa" loext:char-shading-value="0"/>
    </style:style>
    <style:style style:name="T74" style:family="text">
      <style:text-properties officeooo:rsid="006cb373" fo:background-color="#eee8aa" loext:char-shading-value="0"/>
    </style:style>
    <style:style style:name="T75" style:family="text">
      <style:text-properties officeooo:rsid="0069bc31" fo:background-color="#eee8aa" loext:char-shading-value="0"/>
    </style:style>
    <style:style style:name="T76" style:family="text">
      <style:text-properties fo:font-weight="bold" officeooo:rsid="0071a379" style:font-weight-asian="bold" style:font-weight-complex="bold"/>
    </style:style>
    <style:style style:name="T77" style:family="text">
      <style:text-properties officeooo:rsid="006b5c6d" fo:background-color="#eee8aa" loext:char-shading-value="0"/>
    </style:style>
    <style:style style:name="T78" style:family="text">
      <style:text-properties style:text-position="0% 100%" officeooo:rsid="0069bc31" fo:background-color="#eee8aa" loext:char-shading-value="0"/>
    </style:style>
    <style:style style:name="T79" style:family="text">
      <style:text-properties style:text-position="sub 58%" officeooo:rsid="0069bc31" fo:background-color="#eee8aa" loext:char-shading-value="0"/>
    </style:style>
    <style:style style:name="T80" style:family="text">
      <style:text-properties style:text-position="0% 100%" fo:font-weight="bold" officeooo:rsid="0069bc31" fo:background-color="#eee8aa" loext:char-shading-value="0" style:font-weight-asian="bold" style:font-weight-complex="bold"/>
    </style:style>
    <style:style style:name="T81" style:family="text">
      <style:text-properties style:text-position="0% 100%" fo:font-weight="bold" officeooo:rsid="006b5c6d" fo:background-color="#eee8aa" loext:char-shading-value="0" style:font-weight-asian="bold" style:font-weight-complex="bold"/>
    </style:style>
    <style:style style:name="T82" style:family="text">
      <style:text-properties style:text-position="0% 100%" officeooo:rsid="0069bc31"/>
    </style:style>
    <style:style style:name="T83" style:family="text">
      <style:text-properties style:text-position="0% 100%" fo:font-weight="bold" style:font-weight-asian="bold" style:font-weight-complex="bold"/>
    </style:style>
    <style:style style:name="T84" style:family="text">
      <style:text-properties style:text-position="0% 100%" fo:font-weight="bold" officeooo:rsid="00737ba6" style:font-weight-asian="bold" style:font-weight-complex="bold"/>
    </style:style>
    <style:style style:name="T85" style:family="text">
      <style:text-properties style:text-position="0% 100%" fo:font-weight="normal" officeooo:rsid="00737ba6" style:font-weight-asian="normal" style:font-weight-complex="normal"/>
    </style:style>
    <style:style style:name="T86" style:family="text">
      <style:text-properties style:text-position="0% 100%" fo:font-weight="normal" officeooo:rsid="007e8733" style:font-weight-asian="normal" style:font-weight-complex="normal"/>
    </style:style>
    <style:style style:name="T87" style:family="text">
      <style:text-properties style:text-position="0% 100%" fo:font-weight="normal" officeooo:rsid="00737ba6" fo:background-color="#eee8aa" loext:char-shading-value="0" style:font-weight-asian="normal" style:font-weight-complex="normal"/>
    </style:style>
    <style:style style:name="T88" style:family="text">
      <style:text-properties style:text-position="0% 100%" fo:font-weight="normal" officeooo:rsid="0069bc31" style:font-weight-asian="normal" style:font-weight-complex="normal"/>
    </style:style>
    <style:style style:name="T89" style:family="text">
      <style:text-properties style:text-position="0% 100%" fo:font-weight="bold" officeooo:rsid="0074ee9c" style:font-weight-asian="bold" style:font-weight-complex="bold"/>
    </style:style>
    <style:style style:name="T90" style:family="text">
      <style:text-properties style:text-position="0% 100%" fo:font-weight="normal" officeooo:rsid="00788b7a" fo:background-color="#eee8aa" loext:char-shading-value="0" style:font-weight-asian="normal" style:font-weight-complex="normal"/>
    </style:style>
    <style:style style:name="T91" style:family="text">
      <style:text-properties style:text-position="0% 100%" fo:font-weight="normal" officeooo:rsid="0074ee9c" fo:background-color="#eee8aa" loext:char-shading-value="0" style:font-weight-asian="normal" style:font-weight-complex="normal"/>
    </style:style>
    <style:style style:name="T92" style:family="text">
      <style:text-properties style:text-position="0% 100%" fo:font-weight="bold" officeooo:rsid="00769a37" style:font-weight-asian="bold" style:font-weight-complex="bold"/>
    </style:style>
    <style:style style:name="T93" style:family="text">
      <style:text-properties style:text-position="0% 100%" fo:font-weight="bold" officeooo:rsid="007a4080" style:font-weight-asian="bold" style:font-weight-complex="bold"/>
    </style:style>
    <style:style style:name="T94" style:family="text">
      <style:text-properties style:text-position="0% 100%" fo:font-weight="normal" officeooo:rsid="00769a37" style:font-weight-asian="normal" style:font-weight-complex="normal"/>
    </style:style>
    <style:style style:name="T95" style:family="text">
      <style:text-properties style:text-position="0% 100%" fo:font-weight="normal" officeooo:rsid="00803ed9" style:font-weight-asian="normal" style:font-weight-complex="normal"/>
    </style:style>
    <style:style style:name="T96" style:family="text">
      <style:text-properties style:text-position="0% 100%" fo:font-weight="normal" officeooo:rsid="0074ee9c" style:font-weight-asian="normal" style:font-weight-complex="normal"/>
    </style:style>
    <style:style style:name="T97" style:family="text">
      <style:text-properties style:text-position="0% 100%" fo:font-weight="normal" officeooo:rsid="00788b7a" style:font-weight-asian="normal" style:font-weight-complex="normal"/>
    </style:style>
    <style:style style:name="T98" style:family="text">
      <style:text-properties style:text-position="0% 100%" fo:font-weight="normal" officeooo:rsid="007a4080" style:font-weight-asian="normal" style:font-weight-complex="normal"/>
    </style:style>
    <style:style style:name="T99" style:family="text">
      <style:text-properties style:text-position="0% 100%" fo:font-weight="normal" style:font-weight-asian="normal" style:font-weight-complex="normal"/>
    </style:style>
    <style:style style:name="T100" style:family="text">
      <style:text-properties officeooo:rsid="0017a9d9"/>
    </style:style>
    <style:style style:name="T101" style:family="text">
      <style:text-properties officeooo:rsid="0018acdb"/>
    </style:style>
    <style:style style:name="T102" style:family="text">
      <style:text-properties officeooo:rsid="049ef404"/>
    </style:style>
    <style:style style:name="T103" style:family="text">
      <style:text-properties officeooo:rsid="04b9ecf4"/>
    </style:style>
    <style:style style:name="T104" style:family="text">
      <style:text-properties fo:font-weight="bold" officeooo:rsid="04a29fbb" style:font-weight-asian="bold" style:font-weight-complex="bold"/>
    </style:style>
    <style:style style:name="T105" style:family="text">
      <style:text-properties fo:font-weight="bold" officeooo:rsid="04bb6c7b" style:font-weight-asian="bold" style:font-weight-complex="bold"/>
    </style:style>
    <style:style style:name="T106" style:family="text">
      <style:text-properties officeooo:rsid="04b3fa66"/>
    </style:style>
    <style:style style:name="T107" style:family="text">
      <style:text-properties officeooo:rsid="04b30c47"/>
    </style:style>
    <style:style style:name="T108" style:family="text">
      <style:text-properties officeooo:rsid="04b2b9d9"/>
    </style:style>
    <style:style style:name="T109" style:family="text">
      <style:text-properties fo:font-weight="bold" officeooo:rsid="04b30c47" style:font-weight-asian="bold" style:font-weight-complex="bold"/>
    </style:style>
    <style:style style:name="T110" style:family="text">
      <style:text-properties fo:font-weight="normal" officeooo:rsid="04b30c47" style:font-weight-asian="normal" style:font-weight-complex="normal"/>
    </style:style>
    <style:style style:name="T111" style:family="text">
      <style:text-properties fo:font-weight="normal" style:font-weight-asian="normal" style:font-weight-complex="normal"/>
    </style:style>
    <style:style style:name="T112" style:family="text">
      <style:text-properties officeooo:rsid="04bb6c7b"/>
    </style:style>
    <style:style style:name="T113" style:family="text">
      <style:text-properties officeooo:rsid="04b35fff"/>
    </style:style>
    <style:style style:name="T114" style:family="text">
      <style:text-properties officeooo:rsid="04a5029e"/>
    </style:style>
    <style:style style:name="T115" style:family="text">
      <style:text-properties officeooo:rsid="04bb7e8c"/>
    </style:style>
    <style:style style:name="T116" style:family="text">
      <style:text-properties officeooo:rsid="04b45e4d"/>
    </style:style>
    <style:style style:name="T117" style:family="text">
      <style:text-properties fo:font-weight="bold" officeooo:rsid="04a5029e" style:font-weight-asian="bold" style:font-weight-complex="bold"/>
    </style:style>
    <style:style style:name="T118" style:family="text">
      <style:text-properties officeooo:rsid="04a75507"/>
    </style:style>
    <style:style style:name="T119" style:family="text">
      <style:text-properties officeooo:rsid="04bc1842"/>
    </style:style>
    <style:style style:name="T120" style:family="text">
      <style:text-properties fo:font-weight="bold" officeooo:rsid="04a84f1c" style:font-weight-asian="bold" style:font-weight-complex="bold"/>
    </style:style>
    <style:style style:name="T121" style:family="text">
      <style:text-properties officeooo:rsid="04bd6c02"/>
    </style:style>
    <style:style style:name="T122" style:family="text">
      <style:text-properties officeooo:rsid="04afbfb4"/>
    </style:style>
    <style:style style:name="T123" style:family="text">
      <style:text-properties officeooo:rsid="04b66ae1"/>
    </style:style>
    <style:style style:name="T124" style:family="text">
      <style:text-properties officeooo:rsid="04b8191e"/>
    </style:style>
    <style:style style:name="T125" style:family="text">
      <style:text-properties officeooo:rsid="04bf0b49"/>
    </style:style>
    <style:style style:name="T126" style:family="text">
      <style:text-properties officeooo:rsid="04c073c2"/>
    </style:style>
    <style:style style:name="T127" style:family="text">
      <style:text-properties officeooo:rsid="04c14a68"/>
    </style:style>
    <style:style style:name="T128" style:family="text">
      <style:text-properties officeooo:rsid="04acb643"/>
    </style:style>
    <style:style style:name="T129" style:family="text">
      <style:text-properties officeooo:rsid="04b8df24"/>
    </style:style>
    <style:style style:name="T130" style:family="text">
      <style:text-properties officeooo:rsid="04b8f83d"/>
    </style:style>
    <style:style style:name="T131" style:family="text">
      <style:text-properties officeooo:rsid="00b06c9c"/>
    </style:style>
    <style:style style:name="T132" style:family="text">
      <style:text-properties officeooo:rsid="00b5f561"/>
    </style:style>
    <style:style style:name="T133" style:family="text">
      <style:text-properties officeooo:rsid="00b2e415"/>
    </style:style>
    <style:style style:name="T134" style:family="text">
      <style:text-properties fo:font-weight="bold" officeooo:rsid="00b2e415" style:font-weight-asian="bold" style:font-weight-complex="bold"/>
    </style:style>
    <style:style style:name="T135" style:family="text">
      <style:text-properties officeooo:rsid="00b19c95"/>
    </style:style>
    <style:style style:name="T136" style:family="text">
      <style:text-properties style:text-position="super 58%"/>
    </style:style>
    <style:style style:name="T137" style:family="text">
      <style:text-properties officeooo:rsid="00b8c59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ISO 11171 Calibration Procedure – Notes</text:h>
      <text:h text:style-name="P1" text:outline-level="1">Clause 6</text:h>
      <text:list text:style-name="L1">
        <text:list-item>
          <text:h text:style-name="P2" text:outline-level="1">Configure correct model and defaults</text:h>
        </text:list-item>
        <text:list-item>
          <text:h text:style-name="P2" text:outline-level="1">Ensure coincidence correction is not disabled in system settings</text:h>
        </text:list-item>
        <text:list-item>
          <text:h text:style-name="P2" text:outline-level="1">Bottle sampling, 20ml flush, <text:span text:style-name="T1">6x </text:span>10ml portions</text:h>
        </text:list-item>
      </text:list>
      <text:h text:style-name="P1" text:outline-level="1"/>
      <text:list text:continue-numbering="true" text:style-name="L1">
        <text:list-item>
          <text:h text:style-name="P3" text:outline-level="1">Prepare 4 bottles of reference fluid labelled 0-3</text:h>
          <text:list>
            <text:list-item>
              <text:h text:style-name="P3" text:outline-level="1">Vigorously shake source bottles for 1m before filling 100ml bottle</text:h>
            </text:list-item>
          </text:list>
        </text:list-item>
        <text:list-item>
          <text:h text:style-name="P3" text:outline-level="1">Flush with bottle of clean fluid</text:h>
        </text:list-item>
        <text:list-item>
          <text:h text:style-name="P3" text:outline-level="1">Perform trial test with bottle 0</text:h>
          <text:list>
            <text:list-item>
              <text:h text:style-name="P3" text:outline-level="1">30s manual shake</text:h>
            </text:list-item>
            <text:list-item>
              <text:h text:style-name="P3" text:outline-level="1">30s ultrasonic dispersal</text:h>
            </text:list-item>
            <text:list-item>
              <text:h text:style-name="P3" text:outline-level="1">30s shaker on 750</text:h>
            </text:list-item>
            <text:list-item>
              <text:h text:style-name="P3" text:outline-level="1">30s vacuum (or until bubbles stop if needed)</text:h>
            </text:list-item>
            <text:list-item>
              <text:h text:style-name="P3" text:outline-level="1">Switch BS110 to sample, start</text:h>
            </text:list-item>
            <text:list-item>
              <text:h text:style-name="P3" text:outline-level="1">Start test after 20s</text:h>
            </text:list-item>
          </text:list>
        </text:list-item>
        <text:list-item>
          <text:h text:style-name="P4" text:outline-level="1">20ml flush, <text:span text:style-name="T2">6</text:span><text:span text:style-name="T3">x </text:span>10ml portions</text:h>
        </text:list-item>
        <text:list-item>
          <text:h text:style-name="P3" text:outline-level="1"><text:span text:style-name="T2">Discard / filter out portions 0 and 6. </text:span>Export data to csv</text:h>
        </text:list-item>
        <text:list-item>
          <text:h text:style-name="P3" text:outline-level="1">Sort data by time, load into calibration worksheet overwriting bottle 1 data</text:h>
        </text:list-item>
        <text:list-item>
          <text:h text:style-name="P3" text:outline-level="1">Review data for consistency up to expected 25um threshold</text:h>
        </text:list-item>
        <text:list-item>
          <text:h text:style-name="P3" text:outline-level="1">If <text:span text:style-name="T4">acceptable</text:span>, perform 3x tests as above</text:h>
        </text:list-item>
        <text:list-item>
          <text:h text:style-name="P3" text:outline-level="1"/>
        </text:list-item>
      </text:list>
      <text:h text:style-name="P5" text:outline-level="1"/>
      <text:h text:style-name="P6" text:outline-level="1">ISO11171 Calibration Requirements</text:h>
      <text:p text:style-name="P7">Questions:</text:p>
      <text:list text:style-name="L2">
        <text:list-item>
          <text:p text:style-name="P8"/>
        </text:list-item>
      </text:list>
      <text:h text:style-name="Heading_20_2" text:outline-level="2">Equipment Still Needed</text:h>
      <text:list text:style-name="L3">
        <text:list-item>
          <text:p text:style-name="P9"><text:span text:style-name="T5">10+</text:span>40/50/70um spheres CV<text:span text:style-name="T6">DIAM</text:span><text:span text:style-name="T7">&lt;5%</text:span></text:p>
        </text:list-item>
      </text:list>
      <text:p text:style-name="P10"/>
      <text:h text:style-name="Heading_20_1" text:outline-level="1">Notes</text:h>
      <text:list text:style-name="L4">
        <text:list-item>
          <text:p text:style-name="P11"><text:span text:style-name="T8">Latex spheres </text:span><text:span text:style-name="T9">for &gt; </text:span><text:span text:style-name="T10">30μm </text:span><text:span text:style-name="T8">&amp; SRM2806 not needed for secondary calibrations but then need calibrated APC. </text:span><text:span text:style-name="T11">Except spheres still needed for resolution determination</text:span></text:p>
        </text:list-item>
        <text:list-item>
          <text:p text:style-name="P12">Secondary calibrations can be done using own suspensions of MTD etc that have been verified with a primary calibrated particle counter</text:p>
        </text:list-item>
        <text:list-item>
          <text:p text:style-name="P12">Think can prepare highly concentrated bottles of suspension, and dilute for both verification of suspension and for use in secondary calibrations</text:p>
        </text:list-item>
        <text:list-item>
          <text:p text:style-name="P13">4um channel is supposed to be &gt;1.5x the "threshold noise level". It is left to the manufacturer how to best determine this.</text:p>
        </text:list-item>
      </text:list>
      <text:h text:style-name="Heading_20_2" text:outline-level="2">Requirements</text:h>
      <text:p text:style-name="P14"><text:span text:style-name="T9">Particle count variation at the </text:span><text:span text:style-name="T12">limits </text:span><text:span text:style-name="T9">of flow rate </text:span><text:span text:style-name="T12">variation &lt;5%.</text:span></text:p>
      <text:p text:style-name="P14"><text:span text:style-name="T13">Annex A: </text:span>CV &lt; 3% <text:span text:style-name="T14">as measured by particle counts </text:span><text:span text:style-name="T15">of RM8632</text:span></text:p>
      <text:p text:style-name="P15">Coincidence error &lt; 5% <text:span text:style-name="T12">change in counts</text:span></text:p>
      <text:h text:style-name="P16" text:outline-level="2"/>
      <text:h text:style-name="P17" text:outline-level="2"><text:span text:style-name="T16">Initial Calibration – </text:span><text:span text:style-name="T17">Reference </text:span><text:span text:style-name="T18">Fluid</text:span><text:span text:style-name="T19">s</text:span></text:h>
      <text:list xml:id="list4240277651" text:style-name="L5">
        <text:list-item>
          <text:p text:style-name="P18"><text:span text:style-name="T20">3 </text:span>Bottles of SRM2806x (primary calibrations) or certified <text:span text:style-name="T20">calibration fluid </text:span><text:span text:style-name="T21">(secondary calibrations) for Section 6 threshold calibration.</text:span></text:p>
        </text:list-item>
        <text:list-item>
          <text:p text:style-name="P19">Bottle of cleaned <text:span text:style-name="T22">MIL5606</text:span></text:p>
        </text:list-item>
        <text:list-item>
          <text:p text:style-name="P20"><text:span text:style-name="T23">B</text:span>ottle of RM8632x at <text:span text:style-name="T24">100mg/l for subsequent </text:span><text:span text:style-name="T21">dilution</text:span><text:span text:style-name="T24">.</text:span></text:p>
        </text:list-item>
        <text:list-item>
          <text:p text:style-name="P20"><text:span text:style-name="T25">Bottle of above diluted to 25% coincidence limit used for preliminary </text:span><text:span text:style-name="T21">APC check. F</text:span><text:span text:style-name="T26">or fixed flow rate need COV of 5 samples </text:span><text:span text:style-name="T21">to</text:span><text:span text:style-name="T26"> be &lt; 3%.</text:span></text:p>
        </text:list-item>
        <text:list-item>
          <text:p text:style-name="P21">3 bottles of 100mg/l fluid diluted to 1ml/g for Annex E accuracy check</text:p>
        </text:list-item>
        <text:list-item>
          <text:p text:style-name="P21">15 bottles of 100mg/l fluid diluted to <text:span text:style-name="T27">[</text:span>10,20, …, 150<text:span text:style-name="T27">]</text:span>% of expected coincidence limit.</text:p>
        </text:list-item>
        <text:list-item>
          <text:p text:style-name="P22"><text:span text:style-name="T28">B</text:span><text:span text:style-name="T29">ottle</text:span><text:span text:style-name="T28">s</text:span><text:span text:style-name="T29"> of PSL spheres </text:span><text:span text:style-name="T28">in suspended in clean water + dissolved Aerosol OT, one bottle at 10um, plus bottles for each size above 30um that we wish to certify to ISO11171.</text:span></text:p>
        </text:list-item>
      </text:list>
      <text:h text:style-name="Heading_20_1" text:outline-level="1">Recalibr<text:span text:style-name="T30">a</text:span>tion</text:h>
      <text:p text:style-name="P23"><text:span text:style-name="T31">Perform </text:span>Clause 6 <text:span text:style-name="T32">Sizing Calibration </text:span>only. <text:span text:style-name="T32">Samples from 3 separate </text:span>bottles of reference fluid are required. 5 sub-samples from each bottles are <text:span text:style-name="T33">checked for consistency then </text:span>used to calibrate the thresholds. <text:span text:style-name="T34">No further verification is required by ISO11171.</text:span></text:p>
      <text:h text:style-name="Heading_20_2" text:outline-level="2"><text:span text:style-name="T22">New Device C</text:span>alibration<text:span text:style-name="T22">s</text:span></text:h>
      <text:list text:continue-numbering="true" text:style-name="L5">
        <text:list-item>
          <text:p text:style-name="P24"><text:span text:style-name="T25">Annex A: </text:span>Measure noise threshold using <text:span text:style-name="T29">bottle of </text:span>clean fluid in sensor at zero flow.</text:p>
        </text:list-item>
        <text:list-item>
          <text:p text:style-name="P25"><text:span text:style-name="T25">Annex A: </text:span><text:span text:style-name="T35">RM8632x </text:span><text:span text:style-name="T26">Cv&lt;3% for </text:span><text:span text:style-name="T12">5 </text:span><text:span text:style-name="T35">counts from </text:span><text:span text:style-name="T26">25% coincidence limit </text:span><text:span text:style-name="T36">bottle</text:span><text:span text:style-name="T26">.</text:span></text:p>
        </text:list-item>
        <text:list-item>
          <text:p text:style-name="P26"><text:span text:style-name="T25">Annex B: </text:span>15 bottle samples of test dust for coincidence error determination. <text:span text:style-name="T37">These are all different concentrations so must be made up as separate bottles </text:span><text:span text:style-name="T25">from the concentrate. </text:span><text:span text:style-name="T38">Only uses smallest channel.</text:span></text:p>
        </text:list-item>
        <text:list-item>
          <text:p text:style-name="P27">Annex C flow rate limits do not seem to apply since fixed flow <text:span text:style-name="T22">for bottle sampling</text:span>.</text:p>
        </text:list-item>
        <text:list-item>
          <text:p text:style-name="P27">Annex D determine resolution using bottle of 10um PSL spheres. <text:span text:style-name="T39">Also can </text:span><text:span text:style-name="T40">confirm</text:span><text:span text:style-name="T39"> capture fraction using known sphere concentration.</text:span></text:p>
        </text:list-item>
        <text:list-item>
          <text:p text:style-name="P28"><text:span text:style-name="T36">Clause 6 Sizing Calibration – </text:span><text:span text:style-name="T41">Summary: </text:span><text:span text:style-name="T36">5 particle counts </text:span><text:span text:style-name="T32">acceptable per table C.2 </text:span><text:span text:style-name="T36">over 16 sizes from each of </text:span><text:span text:style-name="T42">3 </text:span><text:span text:style-name="T36">bottles of reference fluid</text:span>. <text:span text:style-name="T36">N&gt;1000 for each channel from each bottle (total over the 5 counts). NB could consider some kind of auto-extension of sample to get 1000 total per bottle. </text:span><text:span text:style-name="T32">In principle reference fluid usage could be as low as 3 x 15ml for up to 21um(c) calibrated size dependent on flushing. </text:span><text:span text:style-name="T43">However 6.5 mandates at least 5x10ml per sample = 3 x 50ml total. </text:span><text:span text:style-name="T44">In reality need extra to flush line and need to leave last 20ml in the bottle since will be depleted of large particles. </text:span><text:span text:style-name="T45">Currently using full 100ml. 20ml flush, 6x10 ml ignoring last 10ml, 20ml remaining.</text:span></text:p>
        </text:list-item>
        <text:list-item>
          <text:p text:style-name="P19">Annex E Verify accuracy using the 3 bottles of 1mg/l RM8632x.</text:p>
        </text:list-item>
      </text:list>
      <text:p text:style-name="Text_20_body"><text:soft-page-break/><text:span text:style-name="T46">This involves a total of </text:span><text:span text:style-name="T47">25 bottles of fluid with an operator taking 25 bottle separate bottle samples.</text:span><text:span text:style-name="T48"> </text:span><text:span text:style-name="T19">Each of these to be split into 5 sub-samples. The 5 combined samples to contain &gt;1000 particles of each size of interest (i.e. the largest size calibrated)</text:span></text:p>
      <text:p text:style-name="P29"/>
      <text:h text:style-name="P30" text:outline-level="2">Feasibility of Primary Calibrations</text:h>
      <text:p text:style-name="P31">Dilution only allowed to 1/1.3 of coincidence limit.</text:p>
      <text:p text:style-name="P32">4um count of SRM2806d is 10898.56 / ml</text:p>
      <text:p text:style-name="P32"/>
      <text:p text:style-name="P33">SRM2806d seems to be <text:span text:style-name="T49">~6.5</text:span>mg/l of MTD. <text:span text:style-name="T50">Corresponding to bottom end of ISO21 at 4um.</text:span></text:p>
      <text:p text:style-name="P33"/>
      <text:p text:style-name="P34">Significant dilution is not going to be available to us since don’t want the coincidence limit to be less than this. Ideally coincidence limit would be high enough to allow direct use of SRM2806d in theory, e.g. by customers wishing to verify calibrations.</text:p>
      <text:p text:style-name="P34"/>
      <text:p text:style-name="P34">Secondary calibrations can use diluted suspensions prepared from much more concentrated suspensions.</text:p>
      <text:p text:style-name="P34"/>
      <text:h text:style-name="Heading_20_1" text:outline-level="1">Coincidence Limits &amp; Sensing Volume Comparisons</text:h>
      <text:p text:style-name="P34"/>
      <text:p text:style-name="P35"><text:span text:style-name="T51">e.g. </text:span><text:span text:style-name="T52">Pamas </text:span>24,000 P/ml at 25 ml/mi<text:span text:style-name="T52">n </text:span><text:span text:style-name="T53">= ISO 22 bottom end i.e. 0-21.</text:span></text:p>
      <text:p text:style-name="P35"/>
      <text:p text:style-name="P36">Po<text:span text:style-name="T51">i</text:span>sson distribution get 5% coincidence at average concentration of ~0.3 particles in beam.</text:p>
      <text:p text:style-name="P36"/>
      <text:p text:style-name="P37">So sensing volume is 0.3 /24,000 ml = 1.25E-5 ml = 12.5e-6ml</text:p>
      <text:p text:style-name="P37"/>
      <text:p text:style-name="P37">200x50x400um = 4E-12m^3 = 4e-6ml. <text:span text:style-name="T54">Our coincidence limit is therefore </text:span><text:span text:style-name="T55">0.3/4e-6ml = 75,000/ml = <text:s/>top of ISO23.</text:span></text:p>
      <text:p text:style-name="P37"/>
      <text:p text:style-name="P38">If have 50um wide slit and 400um deep channel then can get the 12.5e-6ml with 625um slit. <text:span text:style-name="T56">Or 600um wide channel at slit with 1mm drawn line with rounded ends out of light path.</text:span></text:p>
      <text:p text:style-name="P38"/>
      <text:p text:style-name="P39">This sensor would then count ~100% of the fluid if channel could be made to match this.</text:p>
      <text:p text:style-name="P37"/>
      <text:p text:style-name="P40">CML4 flow cell: 40x400 slit, 400x1000 at slit widening to 2000x400? <text:span text:style-name="T56">(→ 4x more efficient fluid usage)</text:span></text:p>
      <text:p text:style-name="P40"/>
      <text:p text:style-name="P40">LPA4 flow cell: same?</text:p>
      <text:h text:style-name="P6" text:outline-level="1">Automated Instrument-Local Calibrations</text:h>
      <text:p text:style-name="P41">Recalibrations require 3 bottles of reference fluid.</text:p>
      <text:p text:style-name="P42">Operator would need to load these successively and perform a 5-portion test on each one.</text:p>
      <text:p text:style-name="P43"/>
      <text:p text:style-name="P42">Counts are then checked for N&gt;1000 and acceptible CV.</text:p>
      <text:p text:style-name="P42"/>
      <text:p text:style-name="P42">Extra portions could be added if needed to achieve these.</text:p>
      <text:p text:style-name="P44"/>
      <text:h text:style-name="P6" text:outline-level="1">Approach to D2 Project</text:h>
      <text:p text:style-name="P45"><text:span text:style-name="T57">A</text:span><text:span text:style-name="T58"> reference counter / </text:span><text:span text:style-name="T57">master counter </text:span><text:span text:style-name="T58">is a unit </text:span><text:span text:style-name="T57">that has been </text:span><text:span text:style-name="T59">ISO 11171 </text:span><text:span text:style-name="T58">primary calibrated, i.e. using </text:span><text:span text:style-name="T57">bottles of </text:span><text:span text:style-name="T58">NIST SRM2806n </text:span><text:span text:style-name="T57">reference fluid. </text:span><text:span text:style-name="T59">A secondary calibration substitutes fluid whose distribution is certified by a reference counter.</text:span></text:p>
      <text:p text:style-name="P46">D2 have agreed that the reference for calibration <text:span text:style-name="T60">of each LPA3 </text:span>will be an ISO 11171 primary calibrated particle counter. This will be used online to certify the <text:span text:style-name="T60">size distribution of the </text:span>reference fluid used during clause 6 threshold setting. <text:span text:style-name="T60">The measured distribution will be the reference (secondary standard) to which each LPA3 is calibrated.</text:span></text:p>
      <text:p text:style-name="P47">Recalibration consists of Clause 6 (sizing calibration).</text:p>
      <text:p text:style-name="P48">Annex E is used to verify the result but is not part of the calibration.</text:p>
      <text:p text:style-name="P48">Annex A "preliminary instrument check" is normally done as a<text:span text:style-name="T59">n initial step</text:span> to avoid wasting <text:span text:style-name="T59">time and </text:span>test fluid. It is a check for sampling consistency using the particle counts as a proxy for this, requiring their COV to be &lt;3%. This is instead <text:span text:style-name="T59">here </text:span>done as a verification step inline with threshold calibration since our fluid supply is effectively unlimited.</text:p>
      <text:h text:style-name="Heading_20_1" text:outline-level="1">Notes re clause 6</text:h>
      <text:h text:style-name="Heading_20_3" text:outline-level="3">"actual sample volume"</text:h>
      <text:p text:style-name="P49"><text:s/>believe this is the amount of fluid that passes through the flow cell rather than the amount scanned by the fluid (and fraction of pulse detected in the case where this is not 100% due to dead time after a pulse).</text:p>
      <text:p text:style-name="P49">i.e., we must accurately measure the amount of fluid transiting the unit and also the COV &lt;3%</text:p>
      <text:p text:style-name="P49"/>
      <text:p text:style-name="P49"/>
      <text:h text:style-name="P30" text:outline-level="2">Outline of Process </text:h>
      <text:p text:style-name="P50"><text:span text:style-name="T61">Please note the details deviate from </text:span><text:span text:style-name="T62">those in </text:span><text:span text:style-name="T61">Clause 6 because </text:span><text:span text:style-name="T63">a) </text:span><text:span text:style-name="T61">we use a histogram technique (MCA) to acquire data and </text:span><text:span text:style-name="T63">b) </text:span><text:span text:style-name="T61">because we use a test rig containing certified reference fluid rather that bottle</text:span><text:span text:style-name="T63">s</text:span><text:span text:style-name="T61">.</text:span></text:p>
      <text:list text:style-name="L6">
        <text:list-item>
          <text:p text:style-name="P51">Clean<text:span text:style-name="T63">up</text:span> test rig</text:p>
          <text:p text:style-name="P52">Dose with MTD to required calibration level (5mg/l)</text:p>
        </text:list-item>
        <text:list-item>
          <text:p text:style-name="P51"><text:span text:style-name="T64">(11171 6.2) </text:span>After stabilization time, use reference counter to measure the <text:span text:style-name="T65">reference </text:span>distribution. 16 sizes <text:span text:style-name="T65">between </text:span><text:span text:style-name="T66">4..</text:span><text:span text:style-name="T65">21 </text:span><text:span text:style-name="T66">um(c)</text:span>. <text:span text:style-name="T65">We use 16 integral sizes skipping 17 and 19. </text:span><text:span text:style-name="T66">Enter </text:span><text:span text:style-name="T61">the recorded </text:span><text:span text:style-name="T66">reference distribution into LPA-View </text:span><text:span text:style-name="T67">reference distribution control panel</text:span><text:span text:style-name="T66">, either manually or </text:span><text:span text:style-name="T65">pressing button to acquire </text:span><text:span text:style-name="T66">using live data link.</text:span></text:p>
        </text:list-item>
        <text:list-item>
          <text:p text:style-name="P53"><text:span text:style-name="T64">(11171 6.</text:span><text:span text:style-name="T68">3, </text:span><text:span text:style-name="T69">6.4)</text:span><text:span text:style-name="T70"> These concern initial setting of thresholds. The LPA3 is a multichannel analyzer (MCA) so effectively there are a very large number of thresholds covering the </text:span><text:span text:style-name="T71">calibrated </text:span><text:span text:style-name="T70">size range. </text:span></text:p>
          <text:p text:style-name="P54">Press "calibrate" button on LPA-View calibration scre<text:span text:style-name="T65">e</text:span>n</text:p>
        </text:list-item>
        <text:list-item>
          <text:p text:style-name="P55"><text:span text:style-name="T64">(11171 6.</text:span><text:span text:style-name="T68">5</text:span><text:span text:style-name="T64">) </text:span><text:span text:style-name="T67">LPA-View will command the LPA3 to </text:span><text:span text:style-name="T72">flush the unit with reference fluid then </text:span><text:span text:style-name="T67">perform </text:span><text:span text:style-name="T63">a </text:span><text:span text:style-name="T67">test </text:span><text:span text:style-name="T73">divided into </text:span><text:span text:style-name="T74">5</text:span><text:span text:style-name="T75"> </text:span><text:span text:style-name="T73">test portions</text:span></text:p>
        </text:list-item>
        <text:list-item>
          <text:p text:style-name="P55"><text:span text:style-name="T64">(11171 6.</text:span><text:span text:style-name="T68">6, </text:span><text:span text:style-name="T76">6.7</text:span><text:span text:style-name="T64">) </text:span><text:span text:style-name="T75">For each test the software </text:span><text:span text:style-name="T77">performs calculations and </text:span><text:span text:style-name="T75">checks the test portions for data quality (</text:span><text:span text:style-name="T78">D</text:span><text:span text:style-name="T79">Q</text:span><text:span text:style-name="T78">) in accordance with </text:span><text:span text:style-name="T80">11171 </text:span><text:span text:style-name="T81">6.6, 6.7</text:span><text:span text:style-name="T80">.</text:span></text:p>
        </text:list-item>
        <text:list-item>
          <text:p text:style-name="P56"><text:span text:style-name="T82">(</text:span><text:span text:style-name="T83">11171 6.8</text:span><text:span text:style-name="T7">) </text:span><text:span text:style-name="T84">6.5, 6.6,.6.7</text:span><text:span text:style-name="T85"> repeat</text:span><text:span text:style-name="T86">ed automatically</text:span><text:span text:style-name="T85"> for a total of 3 tests of </text:span><text:span text:style-name="T87">5 portions each</text:span></text:p>
        </text:list-item>
        <text:list-item>
          <text:p text:style-name="P57"><text:span text:style-name="T88">(</text:span><text:span text:style-name="T84">11171 6.</text:span><text:span text:style-name="T89">9</text:span><text:span text:style-name="T85">) </text:span><text:span text:style-name="T90">Specifies calculation and </text:span><text:span text:style-name="T91">recording </text:span><text:span text:style-name="T90">of </text:span><text:span text:style-name="T91">the uncertainties in the counts.</text:span></text:p>
        </text:list-item>
        <text:list-item>
          <text:p text:style-name="P58"><text:span text:style-name="T88">(</text:span><text:span text:style-name="T84">11171 6.</text:span><text:span text:style-name="T92">10, </text:span><text:span text:style-name="T93">6.15</text:span><text:span text:style-name="T85">) </text:span><text:span text:style-name="T94"><text:s text:c="2"/></text:span><text:span text:style-name="T95">(N/A since LPA3 is an MCA). It d</text:span><text:span text:style-name="T96">iscusses fitting </text:span><text:span text:style-name="T97">a </text:span><text:span text:style-name="T96">calibration curve to the data points using cubic splines. These are then interpolated to obtain the thresholds corresponding to the desired channel sizes <text:s/>(in our case 4, 6, 14, 21 um(c) for the 11171 calibrated sizes). This does not apply to an MCA since we already have data at each possible threshold setting. There is nothing to interpolate we already record the exact values. Cubic splines are for fitting between data points, we have the counts at the actual thresholds that will be used since we have counts at all thresholds. </text:span><text:span text:style-name="T94">The correct thresholds are chosen automatically by the LPA-View software and the LPA3 during the threshold selection process </text:span><text:span text:style-name="T97">after the </text:span><text:span text:style-name="T94">calibration </text:span><text:span text:style-name="T97">data has been acquired</text:span><text:span text:style-name="T94">.</text:span></text:p>
        </text:list-item>
        <text:list-item>
          <text:p text:style-name="P59"><text:span text:style-name="T88">(</text:span><text:span text:style-name="T84">11171 6.</text:span><text:span text:style-name="T92">1</text:span><text:span text:style-name="T93">1, 6.12, 6.13, 6.14</text:span><text:span text:style-name="T85">) </text:span><text:span text:style-name="T95">N/A since only </text:span><text:span text:style-name="T98">for latex sphere calibrations of sizes &gt;30um</text:span></text:p>
        </text:list-item>
      </text:list>
      <text:p text:style-name="P60"><text:span text:style-name="T98"/></text:p>
      <text:h text:style-name="P6" text:outline-level="1"><text:span text:style-name="T98">P</text:span><text:span text:style-name="T99">SL Calibrations</text:span></text:h>
      <text:p text:style-name="P61">Sizes: 38/40um, 50um, 70um</text:p>
      <text:h text:style-name="Heading_20_1" text:outline-level="1">SRM2806</text:h>
      <text:p text:style-name="P62">Used in primary calibrations.</text:p>
      <text:p text:style-name="P62"/>
      <text:p text:style-name="P63">SRM2806a was measured by electron microscopy but had a systematic ~10% error in measured diameters. This was discovered when SRM2806b was re-measured by electron microscope using automated Image analysis.</text:p>
      <text:p text:style-name="P63">Current SRM2806(d) and future batches are now “consensus” standards. The distribution is <text:span text:style-name="T100">now certified </text:span>by conventional particle counters calibrated to SRM2806B and then the sizes “adjusted” by the factor of 0.898 discovered above. This means that particle counters can be calibrated using latest SRM2806x using the published <text:span text:style-name="T101">SRM2806x </text:span>“distribution” which has been pre-corrected so that the counters give counts unchanged from historical calibrations based on SRM2806a.</text:p>
      <text:p text:style-name="P63"/>
      <text:h text:style-name="P64" text:outline-level="1">2025-11-11 Review<text:span text:style-name="T102">ed</text:span> SRM2806x and RM8631x</text:h>
      <text:p text:style-name="P65">Idea was to see if feasible to use published distributions of RM8631x but in face these are ~useless due to NIST using different techniques to certify. Also SRM2806x after the original SRM2806a do not publish dust concentration. The different analysis methods make it impossible to have confidence in any relationship obtained from these documents.</text:p>
      <text:h text:style-name="P66" text:outline-level="3">SRM2806b <text:span text:style-name="T103">Size Shift</text:span></text:h>
      <text:list text:style-name="L7">
        <text:list-item>
          <text:p text:style-name="P67"><text:span text:style-name="T46">Units calibrated to the </text:span><text:span text:style-name="T104">published </text:span><text:span text:style-name="T46">2806b distribution produce counts significantly higher </text:span><text:span text:style-name="T104">than </text:span><text:span text:style-name="T105">those calibrated to </text:span><text:span text:style-name="T104">2806a</text:span><text:span text:style-name="T46">.</text:span></text:p>
        </text:list-item>
        <text:list-item>
          <text:p text:style-name="P68">Sizes <text:span text:style-name="T106">for a given count </text:span>quoted in SRM2806<text:span text:style-name="T107">a</text:span><text:span text:style-name="T108"> </text:span>are <text:span text:style-name="T107">and </text:span><text:span text:style-name="T109">EFFECTIVELY</text:span><text:span text:style-name="T107"> </text:span><text:span text:style-name="T109">ALWAYS WERE</text:span><text:span text:style-name="T110"> </text:span><text:span text:style-name="T111">0.898</text:span> of the "true" <text:span text:style-name="T112">metrological </text:span>values established by the more accurate analysis used in SRM2806b <text:span text:style-name="T112">development</text:span>. <text:span text:style-name="T113">Due to the original manual analysis of SRM2806 undercounting / </text:span><text:span text:style-name="T106">over-sizing </text:span><text:span text:style-name="T113">particles.</text:span></text:p>
        </text:list-item>
        <text:list-item>
          <text:p text:style-name="P69">In order <text:span text:style-name="T114">to make the </text:span>counts match <text:span text:style-name="T115">previous standards </text:span><text:span text:style-name="T116">for a SRM2806b-calibrated unit</text:span>, the <text:span text:style-name="T114">calibration thresholds for a size would need to be </text:span><text:span text:style-name="T117">increased in value</text:span><text:span text:style-name="T114"> so as to reduce the counts obtained. i.e. the </text:span><text:span text:style-name="T115">increased </text:span><text:span text:style-name="T114">"4um" threshold would </text:span><text:span text:style-name="T115">then </text:span><text:span text:style-name="T114">actually be counting larger sizes.</text:span></text:p>
        </text:list-item>
        <text:list-item>
          <text:p text:style-name="P70">Equivalently, a "b" calibration results in lower thresholds than an "a" calibration.</text:p>
        </text:list-item>
        <text:list-item>
          <text:p text:style-name="P70">So a given size particle will be determined to be larger on a "b" calibrated unit.</text:p>
        </text:list-item>
      </text:list>
      <text:h text:style-name="P64" text:outline-level="1"><text:soft-page-break/>SRM2806b Dust Concentration</text:h>
      <text:p text:style-name="P71">While unpublished <text:span text:style-name="T118">by NIST</text:span>, a report of an investigation <text:span text:style-name="T119">report from </text:span>CINRG Systems indicates a <text:span text:style-name="T46">likely concentration of 3.5mg/l was used </text:span><text:span text:style-name="T120">for SRM2806b</text:span>, i.e. 1.25x the 2.8mg/l in SRM2806a.</text:p>
      <text:p text:style-name="P72">This resulted in ~78% overall increase in counts, composed of factors of 1.25 (concentration increase) and 1.43 (due to the redefinition / recertification "errors").</text:p>
      <text:h text:style-name="P73" text:outline-level="1">SRM2806d</text:h>
      <text:list text:style-name="L8">
        <text:list-item>
          <text:p text:style-name="P74">The <text:span text:style-name="T121">eventual consensus </text:span>solution <text:span text:style-name="T119">to the size shift </text:span>was to <text:span text:style-name="T46">redefine</text:span> the μm(c), so that it is now 0.898μ<text:span text:style-name="T122">m </text:span><text:span text:style-name="T123">equivalent projected circular area diameter </text:span><text:span text:style-name="T122">i.e., 0.898</text:span>x the equivalent "μm(b)" (true, <text:span text:style-name="T121">metrological, </text:span>NIST traceable) size.</text:p>
        </text:list-item>
        <text:list-item>
          <text:p text:style-name="P75">This can <text:span text:style-name="T121">then also </text:span>be considered to be retrospective, leaving SRM2806a derived calibrations, results and standards unchanged.</text:p>
        </text:list-item>
        <text:list-item>
          <text:p text:style-name="P76"><text:span text:style-name="T124">In SRM</text:span>2806d the published sizes <text:span text:style-name="T114">have already been </text:span>multiplied by 0.898. <text:span text:style-name="T125">i.e. are expressed in the new μm(c). </text:span>This means that calibrating to the "4μm(c)" count actually calibrates to a larger <text:span text:style-name="T114">true </text:span><text:span text:style-name="T125">physical metrological </text:span>size (by 1/0.898) hence reducing the counts to those that would have been obtained by a 2806a calibrated particle counter. In this way there are no objectionable shifts in results <text:span text:style-name="T125">or thresholds</text:span>.</text:p>
        </text:list-item>
        <text:list-item>
          <text:p text:style-name="P77">The SRM2806d and SRM2806b <text:span text:style-name="T46">certificates</text:span> have very similar <text:span text:style-name="T126">counts for </text:span>4μm and 6μm. In order to make this happen even though a "d" calibration results in larger thresholds than a "b", the concentration must have been <text:span text:style-name="T46">increased</text:span><text:span text:style-name="T111"> by just the right amount to compensate.</text:span></text:p>
        </text:list-item>
      </text:list>
      <text:p text:style-name="P78">For 2806d,</text:p>
      <text:p text:style-name="P78"><draw:frame draw:style-name="fr1" draw:name="Image86 Copy 1" text:anchor-type="char" svg:width="14.063cm" svg:height="3.092cm" draw:z-index="0"><draw:image xlink:href="Pictures/100000010000045F000000F683EAFB1A.png" xlink:type="simple" xlink:show="embed" xlink:actuate="onLoad" draw:mime-type="image/png"/></draw:frame></text:p>
      <text:h text:style-name="P73" text:outline-level="1"><text:span text:style-name="T127">SRM2806d</text:span> Dust Concentration</text:h>
      <text:p text:style-name="P78">The counts reported in 2806d are similar to those in 2806b. However the counts are of sizes <text:span text:style-name="T128">which</text:span> in terms of 2806b are 0.898 the b values. This must mean the concentration used was less than for b.</text:p>
      <text:p text:style-name="P79">Using the 4um counts, the counts on "d" are equivalent to a "b" size of 4 x 0.898 = 3.592 ~ 3.6um.</text:p>
      <text:p text:style-name="P79">The ratio in "b" of <text:span text:style-name="T129">3.6um t</text:span>o <text:span text:style-name="T129">4um</text:span> is <text:span text:style-name="T129">13355/</text:span>10865 = <text:span text:style-name="T129">1.229</text:span></text:p>
      <text:p text:style-name="P80">The ratio in "b" of 4/0.898=4.45um to 4um is 10865/8050 = 1.35.</text:p>
      <text:p text:style-name="P79">So if <text:span text:style-name="T129">we increase the </text:span>3.5mg/l by this we get estimate of dust concentration in "d" of <text:span text:style-name="T129">4.</text:span><text:span text:style-name="T130">72</text:span><text:span text:style-name="T129">mg/l</text:span>.</text:p>
      <text:p text:style-name="P79"><text:soft-page-break/>Original SRM2806a was the distribution of 2.8mg/l so it seems likely that NIST in fact reverted back to this value. At any rate we will use 2.8mg/l as our estimate of the concentration of RM8631b used to prepare SRM2806d.</text:p>
      <text:p text:style-name="P81">Added sheets to model.ods spreadsheet detailing various distributions</text:p>
      <text:p text:style-name="P81"><draw:frame draw:style-name="fr2" draw:name="Image155" text:anchor-type="char" svg:width="18.958cm" svg:height="4.433cm" draw:z-index="1"><draw:image xlink:href="Pictures/1000000100000776000001BF43F1A268.png" xlink:type="simple" xlink:show="embed" xlink:actuate="onLoad" draw:mime-type="image/png"/></draw:frame>Conclusion: The assumed 5mg/l value we have been using as a surrogate SRM seems a good choice.</text:p>
      <text:p text:style-name="P82">Update: measured value using secondary calibrated counter closer to 6.5mg/l (2025-12-15)</text:p>
      <text:p text:style-name="P82"/>
      <text:h text:style-name="P6" text:outline-level="1">Notes for Research</text:h>
      <text:p text:style-name="P83">Small pressure pulsations that come and go when on rig could explain higher variation in counts. There are always more smaller particles so any short-scale variation of baseline would have effect of increasing counts of small particles especially.</text:p>
      <text:h text:style-name="Heading_20_1" text:outline-level="1">Capture Fraction</text:h>
      <text:p text:style-name="P84">"beam flow correction" Modifies capture fraction value assumed from illuminated fraction of channel. 0 = no correction. 100 multiplies assumed sensed volume by 1.100 <text:span text:style-name="T131">hence divides raw counts by this factor to get counts/ml</text:span>.</text:p>
      <text:p text:style-name="P85">Use to align Clause 6 calibrations with Annex E.</text:p>
      <text:p text:style-name="P85">Increasing beam flow correction will increase assumed volume, decreasing reported counts. Calibration will then use decreased thresholds to compensate, counting particles at smaller true sizes. Annex E / RM8632a has distribution skewed more towards small sizes so this will inflate Annex E counts in general.</text:p>
      <text:h text:style-name="Heading_20_2" text:outline-level="2">Expected Sensitivity</text:h>
      <text:p text:style-name="P86">Value of 10 beam flow correction <text:span text:style-name="T46">increase</text:span></text:p>
      <text:p text:style-name="P86">→ 1% increase in assumed sensed volume</text:p>
      <text:p text:style-name="P86">→ counts scaled <text:span text:style-name="T46">down</text:span> by extra 1% factor</text:p>
      <text:p text:style-name="P86">→ calibration thresholds will be <text:span text:style-name="T46">reduced</text:span> to compensate to increase counts by 1%</text:p>
      <text:p text:style-name="P86">→ unit will be registering <text:span text:style-name="T46">smaller</text:span> diameter particles <text:span text:style-name="T132">at a given threshold</text:span></text:p>
      <text:p text:style-name="P86">→ <text:span text:style-name="T133">RM8632a distribution is skewed toward smaller sizes so should </text:span><text:span text:style-name="T134">increase</text:span><text:span text:style-name="T133"> counts relative to SRM2806 calibration</text:span></text:p>
      <text:p text:style-name="P86">→ change in RM8632a counts will be according to differences in distribution slopes</text:p>
      <text:p text:style-name="P86">→ at 4μm(c), RM8631<text:span text:style-name="T135">b</text:span> has power factor <text:s/>-1.91 i.e. count proportional to d<text:span text:style-name="T136">-1.91</text:span><text:span text:style-name="T7">.</text:span></text:p>
      <text:p text:style-name="P86">→ <text:span text:style-name="T135">RM8632a has power law about <text:s/>-4 although not a good fit to data</text:span></text:p>
      <text:p text:style-name="P86">→ <text:span text:style-name="T135">Might be best to establish relationship empirically</text:span></text:p>
      <text:h text:style-name="Heading_20_4" text:outline-level="4">General <text:span text:style-name="T137">Expected </text:span>Behaviour</text:h>
      <text:p text:style-name="P87">Increase beam flow correction <text:span text:style-name="T46">before</text:span> calibration → increased annex E counts.</text:p>
      <text:p text:style-name="P88">(increase after calibration reduces counts and invalidates calibration)</text:p>
      <text:p text:style-name="P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Black" svg:font-family="'Arial Black'" style:font-adornments="Regular"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 fo:font-family="'Calibri Light'" style:font-style-name="Regular" style:font-family-generic="swiss" style:font-pitch="variable" fo:font-weight="25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master-page-name="">
      <loext:graphic-properties draw:fill="solid" draw:fill-color="#cccccc"/>
      <style:paragraph-properties fo:margin-top="0.423cm" fo:margin-bottom="0.212cm" style:contextual-spacing="false" style:page-number="auto" fo:background-color="#cccccc"/>
      <style:text-properties style:font-name="Arial Black" fo:font-family="'Arial Black'" style:font-style-name="Regular" style:font-family-generic="swiss" style:font-pitch="variable" fo:font-size="130%" fo:font-weight="9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text-properties style:font-name="Calibri" fo:font-family="Calibri" style:font-family-generic="swiss" style:font-pitch="variable" officeooo:rsid="01d9d3e8"/>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Defaul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epor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 style:family="paragraph" style:parent-style-name="Text"/>
    <style:style style:name="Text" style:family="paragraph" style:parent-style-name="Caption" style:class="extra"/>
    <style:style style:name="Footnote_20__28_WW_29_" style:display-name="Footnote (WW)" style:family="paragraph" style:parent-style-name="Text"/>
    <style:style style:name="Internet_20_link" style:display-name="Internet link" style:family="paragraph" style:parent-style-name="Text"/>
    <style:style style:name="Status" style:family="paragraph" style:parent-style-name="Default"/>
    <style:style style:name="Good" style:family="paragraph" style:parent-style-name="Status"/>
    <style:style style:name="Neutral" style:family="paragraph" style:parent-style-name="Status"/>
    <style:style style:name="Bad" style:family="paragraph" style:parent-style-name="Status"/>
    <style:style style:name="Warning" style:family="paragraph" style:parent-style-name="Status"/>
    <style:style style:name="Error" style:family="paragraph" style:parent-style-name="Status"/>
    <style:style style:name="Accent" style:family="paragraph" style:parent-style-name="Default"/>
    <style:style style:name="Accent_20_1" style:display-name="Accent 1" style:family="paragraph" style:parent-style-name="Accent"/>
    <style:style style:name="Accent_20_2" style:display-name="Accent 2" style:family="paragraph" style:parent-style-name="Accent"/>
    <style:style style:name="Accent_20_3" style:display-name="Accent 3" style:family="paragraph" style:parent-style-name="Accent"/>
    <style:style style:name="Result" style:family="paragraph" style:parent-style-name="Default"/>
    <style:style style:name="Equation" style:family="paragraph" style:parent-style-name="Text_20_body">
      <style:paragraph-properties fo:margin-left="1.251cm" fo:text-align="start" style:justify-single-word="false" fo:text-indent="0cm" style:auto-text-indent="false"/>
      <style:text-properties fo:font-style="italic" style:font-style-asian="italic" style:font-style-complex="italic"/>
    </style:style>
    <style:style style:name="Figure" style:family="paragraph" style:parent-style-name="Caption" style:class="extra"/>
    <style:style style:name="Drawing" style:family="paragraph" style:parent-style-name="Caption" style:class="extra"/>
    <style:style style:name="Important" style:family="paragraph" style:parent-style-name="Text_20_body">
      <style:paragraph-properties fo:padding="0.049cm" fo:border-left="2.24pt solid #ff0000" fo:border-right="2.24pt solid #ff0000" fo:border-top="none" fo:border-bottom="none"/>
      <style:text-properties officeooo:rsid="054d032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9">
      <number:number number:decimal-places="3" number:min-decimal-places="3"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10-07T12:57:48.213000000</meta:creation-date>
    <dc:date>2025-12-18T14:51:10.352746800</dc:date>
    <meta:editing-duration>P3DT7H48M15S</meta:editing-duration>
    <meta:editing-cycles>110</meta:editing-cycles>
    <meta:generator>LibreOffice/25.8.3.2$Windows_X86_64 LibreOffice_project/8ca8d55c161d602844f5428fa4b58097424e324e</meta:generator>
    <meta:document-statistic meta:table-count="0" meta:image-count="2" meta:object-count="0" meta:page-count="12" meta:paragraph-count="150" meta:word-count="2582" meta:character-count="15634" meta:non-whitespace-character-count="13247"/>
  </office:meta>
</office:document-meta>
</file>