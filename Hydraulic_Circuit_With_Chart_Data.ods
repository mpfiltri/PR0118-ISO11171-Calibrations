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Hydraulic Circuit">
        <table:table-row>
          <table:table-cell>
            <text:p>Flow Rate (ml/min)</text:p>
          </table:table-cell>
          <table:table-cell>
            <text:p>Dynamic Viscosity (cP)</text:p>
          </table:table-cell>
        </table:table-row>
        <table:table-row>
          <table:table-cell>
            <text:p>30</text:p>
          </table:table-cell>
          <table:table-cell>
            <text:p>400</text:p>
          </table:table-cell>
        </table:table-row>
        <table:table-row/>
        <table:table-row>
          <table:table-cell>
            <text:p>Section ID</text:p>
          </table:table-cell>
          <table:table-cell>
            <text:p>Section Name</text:p>
          </table:table-cell>
          <table:table-cell>
            <text:p>Shape</text:p>
          </table:table-cell>
          <table:table-cell>
            <text:p>Length (mm)</text:p>
          </table:table-cell>
          <table:table-cell>
            <text:p>Diameter (mm)</text:p>
          </table:table-cell>
          <table:table-cell>
            <text:p>Width (mm)</text:p>
          </table:table-cell>
          <table:table-cell>
            <text:p>Height (mm)</text:p>
          </table:table-cell>
          <table:table-cell>
            <text:p>ΔP (bar)</text:p>
          </table:table-cell>
          <table:table-cell>
            <text:p>Cumulative ΔP (bar)</text:p>
          </table:table-cell>
        </table:table-row>
        <table:table-row>
          <table:table-cell>
            <text:p>1</text:p>
          </table:table-cell>
          <table:table-cell>
            <text:p>Inlet Tube</text:p>
          </table:table-cell>
          <table:table-cell>
            <text:p>Circular</text:p>
          </table:table-cell>
          <table:table-cell>
            <text:p>100</text:p>
          </table:table-cell>
          <table:table-cell>
            <text:p>2.0</text:p>
          </table:table-cell>
          <table:table-cell>
            <text:p/>
          </table:table-cell>
          <table:table-cell>
            <text:p/>
          </table:table-cell>
          <table:table-cell>
            <text:p>=IF(C5="Circular";(128*B2*B1/1E9*D5)/(PI()*E5^4);IF(C5="Rectangular";(12*B2*B1/1E9*D5)/(1E-6*F5*G5^3*(1-0.63*G5/F5));""))</text:p>
          </table:table-cell>
          <table:table-cell>
            <text:p>=H5</text:p>
          </table:table-cell>
        </table:table-row>
        <table:table-row>
          <table:table-cell>
            <text:p>2</text:p>
          </table:table-cell>
          <table:table-cell>
            <text:p>Control Slot</text:p>
          </table:table-cell>
          <table:table-cell>
            <text:p>Rectangular</text:p>
          </table:table-cell>
          <table:table-cell>
            <text:p>50</text:p>
          </table:table-cell>
          <table:table-cell>
            <text:p/>
          </table:table-cell>
          <table:table-cell>
            <text:p>0.75</text:p>
          </table:table-cell>
          <table:table-cell>
            <text:p>0.5</text:p>
          </table:table-cell>
          <table:table-cell>
            <text:p>=IF(C6="Circular";(128*B2*B1/1E9*D6)/(PI()*E6^4);IF(C6="Rectangular";(12*B2*B1/1E9*D6)/(1E-6*F6*G6^3*(1-0.63*G6/F6));""))</text:p>
          </table:table-cell>
          <table:table-cell>
            <text:p>=H5+H6</text:p>
          </table:table-cell>
        </table:table-row>
        <table:table-row>
          <table:table-cell>
            <text:p>3</text:p>
          </table:table-cell>
          <table:table-cell>
            <text:p>Outlet Nozzle</text:p>
          </table:table-cell>
          <table:table-cell>
            <text:p>Circular</text:p>
          </table:table-cell>
          <table:table-cell>
            <text:p>150</text:p>
          </table:table-cell>
          <table:table-cell>
            <text:p>1.5</text:p>
          </table:table-cell>
          <table:table-cell>
            <text:p/>
          </table:table-cell>
          <table:table-cell>
            <text:p/>
          </table:table-cell>
          <table:table-cell>
            <text:p>=IF(C7="Circular";(128*B2*B1/1E9*D7)/(PI()*E7^4);IF(C7="Rectangular";(12*B2*B1/1E9*D7)/(1E-6*F7*G7^3*(1-0.63*G7/F7));""))</text:p>
          </table:table-cell>
          <table:table-cell>
            <text:p>=H5+H6+H7</text:p>
          </table:table-cell>
        </table:table-row>
        <table:table-row/>
        <table:table-row/>
        <table:table-row>
          <table:table-cell>
            <text:p>Section Name</text:p>
          </table:table-cell>
          <table:table-cell>
            <text:p>ΔP (bar)</text:p>
          </table:table-cell>
        </table:table-row>
        <table:table-row>
          <table:table-cell>
            <text:p>Inlet Tube</text:p>
          </table:table-cell>
          <table:table-cell>
            <text:p>=H5</text:p>
          </table:table-cell>
        </table:table-row>
        <table:table-row>
          <table:table-cell>
            <text:p>Control Slot</text:p>
          </table:table-cell>
          <table:table-cell>
            <text:p>=H6</text:p>
          </table:table-cell>
        </table:table-row>
        <table:table-row>
          <table:table-cell>
            <text:p>Outlet Nozzle</text:p>
          </table:table-cell>
          <table:table-cell>
            <text:p>=H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