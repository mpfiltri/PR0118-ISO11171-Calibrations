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6A70000044F3A7EBBDC.png" manifest:media-type="image/png"/>
  <manifest:file-entry manifest:full-path="Pictures/100000010000049A000001C7240401E7.png" manifest:media-type="image/png"/>
  <manifest:file-entry manifest:full-path="Pictures/100000010000030B00000183C57C38CF.png" manifest:media-type="image/png"/>
  <manifest:file-entry manifest:full-path="Pictures/100000010000030100000146DC0E813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Black" svg:font-family="'Arial Black'" style:font-family-generic="swiss" style:font-pitch="variable"/>
    <style:font-face style:name="Calibri" svg:font-family="Calibri" style:font-family-generic="swiss" style:font-pitch="variable"/>
    <style:font-face style:name="Cascadia Mono" svg:font-family="'Cascadia Mono'" style:font-family-generic="roman" style:font-pitch="variable"/>
    <style:font-face style:name="Cascadia Mono1" svg:font-family="'Cascadia Mono'"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margins" fo:background-color="transparent">
        <style:background-image/>
      </style:table-properties>
    </style:style>
    <style:style style:name="Table1.A" style:family="table-column">
      <style:table-column-properties style:column-width="4.191cm" style:rel-column-width="16155*"/>
    </style:style>
    <style:style style:name="Table1.B" style:family="table-column">
      <style:table-column-properties style:column-width="12.809cm" style:rel-column-width="49380*"/>
    </style:style>
    <style:style style:name="Table1.1" style:family="table-row">
      <style:table-row-properties fo:background-color="transparent">
        <style:background-image/>
      </style:table-row-properties>
    </style:style>
    <style:style style:name="Table1.A1" style:family="table-cell">
      <style:table-cell-properties fo:padding="0.097cm" fo:border="none"/>
    </style:style>
    <style:style style:name="Table2" style:family="table">
      <style:table-properties style:width="17cm" table:align="margins"/>
    </style:style>
    <style:style style:name="Table2.A" style:family="table-column">
      <style:table-column-properties style:column-width="1.889cm" style:rel-column-width="7281*"/>
    </style:style>
    <style:style style:name="Table2.I" style:family="table-column">
      <style:table-column-properties style:column-width="1.891cm" style:rel-column-width="7287*"/>
    </style:style>
    <style:style style:name="Table2.A1" style:family="table-cell">
      <style:table-cell-properties fo:padding="0.097cm" fo:border-left="0.5pt solid #000000" fo:border-right="none" fo:border-top="0.5pt solid #000000" fo:border-bottom="0.5pt solid #000000"/>
    </style:style>
    <style:style style:name="Table2.C1" style:family="table-cell">
      <style:table-cell-properties fo:background-color="#90ee90" fo:padding="0.097cm" fo:border-left="0.5pt solid #000000" fo:border-right="none" fo:border-top="0.5pt solid #000000" fo:border-bottom="0.5pt solid #000000">
        <style:background-image/>
      </style:table-cell-properties>
    </style:style>
    <style:style style:name="Table2.I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none" fo:border-top="none" fo:border-bottom="0.5pt solid #000000"/>
    </style:style>
    <style:style style:name="Table2.C2" style:family="table-cell">
      <style:table-cell-properties fo:background-color="#90ee90" fo:padding="0.097cm" fo:border-left="0.5pt solid #000000" fo:border-right="none" fo:border-top="none" fo:border-bottom="0.5pt solid #000000">
        <style:background-image/>
      </style:table-cell-properties>
    </style:style>
    <style:style style:name="Table2.H2" style:family="table-cell">
      <style:table-cell-properties fo:padding="0.097cm" fo:border-left="0.5pt solid #000000" fo:border-right="none" fo:border-top="none" fo:border-bottom="0.5pt solid #000000"/>
    </style:style>
    <style:style style:name="Table2.I2" style:family="table-cell">
      <style:table-cell-properties fo:padding="0.097cm" fo:border-left="0.5pt solid #000000" fo:border-right="0.5pt solid #000000" fo:border-top="none" fo:border-bottom="0.5pt solid #000000"/>
    </style:style>
    <style:style style:name="Table2.A3" style:family="table-cell">
      <style:table-cell-properties fo:padding="0.097cm" fo:border-left="0.5pt solid #000000" fo:border-right="none" fo:border-top="none" fo:border-bottom="0.5pt solid #000000"/>
    </style:style>
    <style:style style:name="Table2.B3" style:family="table-cell">
      <style:table-cell-properties fo:padding="0.097cm" fo:border-left="0.5pt solid #000000" fo:border-right="none" fo:border-top="none" fo:border-bottom="0.5pt solid #000000"/>
    </style:style>
    <style:style style:name="Table2.H3" style:family="table-cell">
      <style:table-cell-properties fo:padding="0.097cm" fo:border-left="0.5pt solid #000000" fo:border-right="none" fo:border-top="none" fo:border-bottom="0.5pt solid #000000"/>
    </style:style>
    <style:style style:name="Table2.I3" style:family="table-cell">
      <style:table-cell-properties fo:padding="0.097cm" fo:border-left="0.5pt solid #000000" fo:border-right="0.5pt solid #000000" fo:border-top="none" fo:border-bottom="0.5pt solid #000000"/>
    </style:style>
    <style:style style:name="Table2.A4" style:family="table-cell">
      <style:table-cell-properties fo:padding="0.097cm" fo:border-left="0.5pt solid #000000" fo:border-right="none" fo:border-top="none" fo:border-bottom="0.5pt solid #000000"/>
    </style:style>
    <style:style style:name="Table2.B4" style:family="table-cell">
      <style:table-cell-properties fo:padding="0.097cm" fo:border-left="0.5pt solid #000000" fo:border-right="none" fo:border-top="none" fo:border-bottom="0.5pt solid #000000"/>
    </style:style>
    <style:style style:name="Table2.H4" style:family="table-cell">
      <style:table-cell-properties fo:padding="0.097cm" fo:border-left="0.5pt solid #000000" fo:border-right="none" fo:border-top="none" fo:border-bottom="0.5pt solid #000000"/>
    </style:style>
    <style:style style:name="Table2.I4" style:family="table-cell">
      <style:table-cell-properties fo:padding="0.097cm" fo:border-left="0.5pt solid #000000" fo:border-right="0.5pt solid #000000" fo:border-top="none" fo:border-bottom="0.5pt solid #000000"/>
    </style:style>
    <style:style style:name="Table2.A5" style:family="table-cell">
      <style:table-cell-properties fo:padding="0.097cm" fo:border-left="0.5pt solid #000000" fo:border-right="none" fo:border-top="none" fo:border-bottom="0.5pt solid #000000"/>
    </style:style>
    <style:style style:name="Table2.B5" style:family="table-cell">
      <style:table-cell-properties fo:padding="0.097cm" fo:border-left="0.5pt solid #000000" fo:border-right="none" fo:border-top="none" fo:border-bottom="0.5pt solid #000000"/>
    </style:style>
    <style:style style:name="Table2.H5" style:family="table-cell">
      <style:table-cell-properties fo:padding="0.097cm" fo:border-left="0.5pt solid #000000" fo:border-right="none" fo:border-top="none" fo:border-bottom="0.5pt solid #000000"/>
    </style:style>
    <style:style style:name="Table2.I5" style:family="table-cell">
      <style:table-cell-properties fo:padding="0.097cm" fo:border-left="0.5pt solid #000000" fo:border-right="0.5pt solid #000000" fo:border-top="none" fo:border-bottom="0.5pt solid #000000"/>
    </style:style>
    <style:style style:name="P1" style:family="paragraph" style:parent-style-name="Table_20_Contents">
      <style:text-properties officeooo:rsid="00139559" officeooo:paragraph-rsid="00139559"/>
    </style:style>
    <style:style style:name="P2" style:family="paragraph" style:parent-style-name="Table_20_Contents">
      <style:text-properties officeooo:rsid="00163281" officeooo:paragraph-rsid="00163281"/>
    </style:style>
    <style:style style:name="P3" style:family="paragraph" style:parent-style-name="Table_20_Contents">
      <style:text-properties officeooo:rsid="0018ea4e" officeooo:paragraph-rsid="0018ea4e"/>
    </style:style>
    <style:style style:name="P4" style:family="paragraph" style:parent-style-name="Table_20_Contents">
      <style:text-properties officeooo:rsid="0018ea4e" officeooo:paragraph-rsid="00139559"/>
    </style:style>
    <style:style style:name="P5" style:family="paragraph" style:parent-style-name="Text_20_body">
      <style:text-properties officeooo:rsid="001e2f8c" officeooo:paragraph-rsid="001e2f8c"/>
    </style:style>
    <style:style style:name="P6" style:family="paragraph" style:parent-style-name="Text_20_body">
      <style:text-properties officeooo:rsid="001e2f8c" officeooo:paragraph-rsid="00298946"/>
    </style:style>
    <style:style style:name="P7" style:family="paragraph" style:parent-style-name="Text_20_body">
      <style:text-properties officeooo:rsid="0029cb21" officeooo:paragraph-rsid="0029cb21"/>
    </style:style>
    <style:style style:name="P8" style:family="paragraph" style:parent-style-name="Text_20_body">
      <style:text-properties officeooo:rsid="001d48d5" officeooo:paragraph-rsid="001d48d5"/>
    </style:style>
    <style:style style:name="P9" style:family="paragraph" style:parent-style-name="Text_20_body">
      <style:text-properties officeooo:rsid="001ab0c8" officeooo:paragraph-rsid="001ab0c8"/>
    </style:style>
    <style:style style:name="P10" style:family="paragraph" style:parent-style-name="Text_20_body">
      <style:text-properties officeooo:rsid="002e66ac" officeooo:paragraph-rsid="00312b2b"/>
    </style:style>
    <style:style style:name="P11" style:family="paragraph" style:parent-style-name="Text_20_body">
      <style:text-properties officeooo:rsid="0036c34e" officeooo:paragraph-rsid="0036c34e"/>
    </style:style>
    <style:style style:name="P12" style:family="paragraph" style:parent-style-name="Text_20_body">
      <style:paragraph-properties fo:break-before="page"/>
      <style:text-properties officeooo:rsid="0039f991" officeooo:paragraph-rsid="0039f991"/>
    </style:style>
    <style:style style:name="P13" style:family="paragraph" style:parent-style-name="Text_20_body">
      <style:text-properties officeooo:rsid="0039f991" officeooo:paragraph-rsid="0039f991"/>
    </style:style>
    <style:style style:name="P14" style:family="paragraph" style:parent-style-name="Text_20_body">
      <style:text-properties officeooo:rsid="003c752b" officeooo:paragraph-rsid="003c752b"/>
    </style:style>
    <style:style style:name="P15" style:family="paragraph" style:parent-style-name="Text_20_body">
      <style:text-properties officeooo:rsid="003d4b90" officeooo:paragraph-rsid="003d4b90"/>
    </style:style>
    <style:style style:name="P16" style:family="paragraph" style:parent-style-name="Text_20_body">
      <style:text-properties officeooo:rsid="00403e7f" officeooo:paragraph-rsid="00403e7f"/>
    </style:style>
    <style:style style:name="P17" style:family="paragraph" style:parent-style-name="Text_20_body">
      <style:paragraph-properties fo:margin-left="1.251cm" fo:text-indent="0cm" style:auto-text-indent="false"/>
      <style:text-properties fo:font-size="10pt" officeooo:rsid="00403e7f" officeooo:paragraph-rsid="00403e7f" style:font-size-asian="10pt" style:font-size-complex="10pt"/>
    </style:style>
    <style:style style:name="P18" style:family="paragraph" style:parent-style-name="Text_20_body">
      <style:text-properties officeooo:rsid="0026994e" officeooo:paragraph-rsid="0026994e"/>
    </style:style>
    <style:style style:name="P19" style:family="paragraph" style:parent-style-name="Text_20_body">
      <style:text-properties officeooo:rsid="0044aeaf" officeooo:paragraph-rsid="0044aeaf"/>
    </style:style>
    <style:style style:name="P20" style:family="paragraph" style:parent-style-name="Text_20_body">
      <style:text-properties officeooo:rsid="0024bb16" officeooo:paragraph-rsid="0024bb16"/>
    </style:style>
    <style:style style:name="P21" style:family="paragraph" style:parent-style-name="Text_20_body">
      <style:text-properties officeooo:rsid="0047574a" officeooo:paragraph-rsid="0047574a"/>
    </style:style>
    <style:style style:name="P22" style:family="paragraph" style:parent-style-name="Text_20_body">
      <style:text-properties officeooo:rsid="00492c52" officeooo:paragraph-rsid="00492c52"/>
    </style:style>
    <style:style style:name="P23" style:family="paragraph" style:parent-style-name="Standard">
      <style:paragraph-properties fo:margin-left="1.251cm" fo:text-indent="0cm" style:auto-text-indent="false"/>
    </style:style>
    <style:style style:name="P24" style:family="paragraph" style:parent-style-name="Standard">
      <style:text-properties officeooo:rsid="0056bed9" officeooo:paragraph-rsid="0056bed9"/>
    </style:style>
    <style:style style:name="P25" style:family="paragraph" style:parent-style-name="Standard">
      <style:text-properties officeooo:rsid="0059f66e" officeooo:paragraph-rsid="005cab9e"/>
    </style:style>
    <style:style style:name="P26" style:family="paragraph" style:parent-style-name="Standard">
      <style:text-properties officeooo:rsid="005e2f9a" officeooo:paragraph-rsid="005e2f9a"/>
    </style:style>
    <style:style style:name="P27" style:family="paragraph" style:parent-style-name="Standard">
      <style:text-properties officeooo:rsid="00607876" officeooo:paragraph-rsid="00682013"/>
    </style:style>
    <style:style style:name="P28" style:family="paragraph" style:parent-style-name="Table_20_Contents">
      <style:text-properties fo:font-size="9pt" style:font-size-asian="9pt" style:font-size-complex="9pt"/>
    </style:style>
    <style:style style:name="P29" style:family="paragraph" style:parent-style-name="Table_20_Contents">
      <style:text-properties fo:font-size="9pt" officeooo:rsid="007a89a1" officeooo:paragraph-rsid="007a89a1" style:font-size-asian="9pt" style:font-size-complex="9pt"/>
    </style:style>
    <style:style style:name="P30" style:family="paragraph" style:parent-style-name="Table_20_Contents">
      <style:text-properties fo:font-size="9pt" officeooo:rsid="007d61ac" officeooo:paragraph-rsid="007d61ac" style:font-size-asian="9pt" style:font-size-complex="9pt"/>
    </style:style>
    <style:style style:name="P31" style:family="paragraph" style:parent-style-name="Table_20_Contents">
      <style:text-properties fo:font-size="9pt" officeooo:rsid="007da7a9" officeooo:paragraph-rsid="007da7a9" style:font-size-asian="9pt" style:font-size-complex="9pt"/>
    </style:style>
    <style:style style:name="P32" style:family="paragraph" style:parent-style-name="Table_20_Contents">
      <style:text-properties fo:font-size="9pt" officeooo:rsid="008271cb" officeooo:paragraph-rsid="008271cb" style:font-size-asian="9pt" style:font-size-complex="9pt"/>
    </style:style>
    <style:style style:name="P33" style:family="paragraph" style:parent-style-name="Table_20_Contents">
      <style:text-properties fo:font-size="9pt" fo:font-weight="bold" officeooo:rsid="007a89a1" officeooo:paragraph-rsid="007a89a1" style:font-size-asian="9pt" style:font-weight-asian="bold" style:font-size-complex="9pt" style:font-weight-complex="bold"/>
    </style:style>
    <style:style style:name="P34" style:family="paragraph" style:parent-style-name="Table_20_Contents">
      <style:text-properties fo:font-size="9pt" fo:font-weight="bold" officeooo:rsid="007d61ac" officeooo:paragraph-rsid="007d61ac" style:font-size-asian="9pt" style:font-weight-asian="bold" style:font-size-complex="9pt" style:font-weight-complex="bold"/>
    </style:style>
    <style:style style:name="P35" style:family="paragraph" style:parent-style-name="Table_20_Contents">
      <style:text-properties fo:font-size="9pt" fo:font-weight="bold" officeooo:rsid="007da7a9" officeooo:paragraph-rsid="007da7a9" style:font-size-asian="9pt" style:font-weight-asian="bold" style:font-size-complex="9pt" style:font-weight-complex="bold"/>
    </style:style>
    <style:style style:name="P36" style:family="paragraph" style:parent-style-name="Text_20_body">
      <style:text-properties officeooo:rsid="004d21cd" officeooo:paragraph-rsid="0051042d"/>
    </style:style>
    <style:style style:name="P37" style:family="paragraph" style:parent-style-name="Text_20_body">
      <style:text-properties officeooo:paragraph-rsid="0051042d"/>
    </style:style>
    <style:style style:name="P38" style:family="paragraph" style:parent-style-name="Text_20_body">
      <style:paragraph-properties fo:margin-left="0cm" fo:text-indent="0cm" style:auto-text-indent="false"/>
      <style:text-properties officeooo:rsid="00513649" officeooo:paragraph-rsid="00513649"/>
    </style:style>
    <style:style style:name="P39" style:family="paragraph" style:parent-style-name="Text_20_body">
      <style:paragraph-properties fo:margin-left="1.251cm" fo:text-indent="0cm" style:auto-text-indent="false"/>
      <style:text-properties fo:font-size="8pt" officeooo:paragraph-rsid="00513649" style:font-size-asian="8pt" style:font-size-complex="8pt"/>
    </style:style>
    <style:style style:name="P40" style:family="paragraph" style:parent-style-name="Text_20_body">
      <style:paragraph-properties fo:margin-left="1.251cm" fo:text-indent="0cm" style:auto-text-indent="false"/>
      <style:text-properties fo:font-size="8pt" officeooo:rsid="003d4b90" officeooo:paragraph-rsid="003d4b90" style:font-size-asian="8pt" style:font-size-complex="8pt"/>
    </style:style>
    <style:style style:name="P41" style:family="paragraph" style:parent-style-name="Text_20_body">
      <style:paragraph-properties fo:margin-left="1.251cm" fo:text-indent="0cm" style:auto-text-indent="false"/>
      <style:text-properties fo:font-size="8pt" officeooo:rsid="00513649" officeooo:paragraph-rsid="00513649" style:font-size-asian="8pt" style:font-size-complex="8pt"/>
    </style:style>
    <style:style style:name="P42" style:family="paragraph" style:parent-style-name="Text_20_body">
      <style:text-properties officeooo:rsid="00547dc6" officeooo:paragraph-rsid="00547dc6"/>
    </style:style>
    <style:style style:name="P43" style:family="paragraph" style:parent-style-name="Text_20_body">
      <style:text-properties officeooo:rsid="00547dc6" officeooo:paragraph-rsid="005579cf"/>
    </style:style>
    <style:style style:name="P44" style:family="paragraph" style:parent-style-name="Text_20_body">
      <style:text-properties officeooo:paragraph-rsid="005579cf"/>
    </style:style>
    <style:style style:name="P45" style:family="paragraph" style:parent-style-name="Text_20_body">
      <style:text-properties officeooo:paragraph-rsid="0056bed9"/>
    </style:style>
    <style:style style:name="P46" style:family="paragraph" style:parent-style-name="Text_20_body">
      <style:text-properties officeooo:rsid="005c044d" officeooo:paragraph-rsid="005c044d"/>
    </style:style>
    <style:style style:name="P47" style:family="paragraph" style:parent-style-name="Text_20_body">
      <style:text-properties officeooo:rsid="005cab9e" officeooo:paragraph-rsid="005cab9e"/>
    </style:style>
    <style:style style:name="P48" style:family="paragraph" style:parent-style-name="Text_20_body">
      <style:text-properties officeooo:rsid="007189c1" officeooo:paragraph-rsid="007189c1"/>
    </style:style>
    <style:style style:name="P49" style:family="paragraph" style:parent-style-name="Text_20_body">
      <style:text-properties officeooo:rsid="0073a230" officeooo:paragraph-rsid="0073a230"/>
    </style:style>
    <style:style style:name="P50" style:family="paragraph" style:parent-style-name="Text_20_body">
      <style:text-properties officeooo:rsid="00740c59" officeooo:paragraph-rsid="00740c59"/>
    </style:style>
    <style:style style:name="P51" style:family="paragraph" style:parent-style-name="Text_20_body">
      <style:text-properties officeooo:rsid="0075cf43" officeooo:paragraph-rsid="0075cf43"/>
    </style:style>
    <style:style style:name="P52" style:family="paragraph" style:parent-style-name="Text_20_body">
      <style:text-properties officeooo:rsid="0076f1ae" officeooo:paragraph-rsid="0076f1ae"/>
    </style:style>
    <style:style style:name="P53" style:family="paragraph" style:parent-style-name="Text_20_body">
      <style:text-properties officeooo:rsid="0078aa73" officeooo:paragraph-rsid="0078aa73"/>
    </style:style>
    <style:style style:name="P54" style:family="paragraph" style:parent-style-name="Text_20_body">
      <style:text-properties officeooo:rsid="00792ace" officeooo:paragraph-rsid="00792ace"/>
    </style:style>
    <style:style style:name="P55" style:family="paragraph" style:parent-style-name="Text_20_body">
      <style:paragraph-properties fo:margin-left="1.251cm" fo:text-indent="0cm" style:auto-text-indent="false"/>
      <style:text-properties officeooo:rsid="00792ace" officeooo:paragraph-rsid="0080baea"/>
    </style:style>
    <style:style style:name="P56" style:family="paragraph" style:parent-style-name="Text_20_body">
      <style:paragraph-properties fo:margin-left="0cm" fo:text-indent="0cm" style:auto-text-indent="false"/>
      <style:text-properties officeooo:rsid="00792ace" officeooo:paragraph-rsid="0080baea"/>
    </style:style>
    <style:style style:name="P57" style:family="paragraph" style:parent-style-name="Text_20_body">
      <style:text-properties officeooo:rsid="00792ace" officeooo:paragraph-rsid="008533ed"/>
    </style:style>
    <style:style style:name="P58" style:family="paragraph" style:parent-style-name="Text_20_body">
      <style:text-properties officeooo:rsid="007a89a1" officeooo:paragraph-rsid="007a89a1"/>
    </style:style>
    <style:style style:name="P59" style:family="paragraph" style:parent-style-name="Text_20_body">
      <style:text-properties officeooo:rsid="007c1d6f" officeooo:paragraph-rsid="007c1d6f"/>
    </style:style>
    <style:style style:name="P60" style:family="paragraph" style:parent-style-name="Text_20_body">
      <style:text-properties officeooo:rsid="007da7a9" officeooo:paragraph-rsid="007da7a9"/>
    </style:style>
    <style:style style:name="P61" style:family="paragraph" style:parent-style-name="Text_20_body">
      <style:text-properties officeooo:rsid="007da7a9" officeooo:paragraph-rsid="007da7a9" fo:background-color="#ffff00"/>
    </style:style>
    <style:style style:name="P62" style:family="paragraph" style:parent-style-name="Text_20_body">
      <style:text-properties officeooo:rsid="0080baea" officeooo:paragraph-rsid="0080baea"/>
    </style:style>
    <style:style style:name="P63" style:family="paragraph" style:parent-style-name="Text_20_body">
      <style:text-properties officeooo:rsid="008533ed" officeooo:paragraph-rsid="008533ed"/>
    </style:style>
    <style:style style:name="P64" style:family="paragraph" style:parent-style-name="Text_20_body">
      <style:paragraph-properties fo:margin-left="1.251cm" fo:text-indent="0cm" style:auto-text-indent="false"/>
      <style:text-properties fo:font-style="italic" officeooo:rsid="008533ed" officeooo:paragraph-rsid="008533ed" style:font-style-asian="italic" style:font-style-complex="italic"/>
    </style:style>
    <style:style style:name="P65" style:family="paragraph" style:parent-style-name="Standard">
      <style:text-properties style:text-position="0% 100%" officeooo:rsid="0059c2b1" officeooo:paragraph-rsid="0059c2b1"/>
    </style:style>
    <style:style style:name="P66" style:family="paragraph" style:parent-style-name="Text_20_body">
      <style:text-properties officeooo:rsid="0088c7b6" officeooo:paragraph-rsid="0088c7b6"/>
    </style:style>
    <style:style style:name="P67" style:family="paragraph" style:parent-style-name="Text_20_body">
      <style:text-properties officeooo:rsid="0093021e" officeooo:paragraph-rsid="0093021e"/>
    </style:style>
    <style:style style:name="P68" style:family="paragraph" style:parent-style-name="Text_20_body">
      <style:text-properties officeooo:paragraph-rsid="0088c7b6"/>
    </style:style>
    <style:style style:name="P69" style:family="paragraph" style:parent-style-name="Text_20_body">
      <style:text-properties officeooo:rsid="009789cb" officeooo:paragraph-rsid="009789cb"/>
    </style:style>
    <style:style style:name="P70" style:family="paragraph" style:parent-style-name="Text_20_body">
      <style:text-properties officeooo:rsid="009810f8" officeooo:paragraph-rsid="009810f8"/>
    </style:style>
    <style:style style:name="P71" style:family="paragraph" style:parent-style-name="Text_20_body">
      <style:text-properties officeooo:rsid="0098ed8d" officeooo:paragraph-rsid="0098ed8d"/>
    </style:style>
    <style:style style:name="P72" style:family="paragraph" style:parent-style-name="Text_20_body">
      <style:text-properties officeooo:rsid="009979b8" officeooo:paragraph-rsid="009979b8"/>
    </style:style>
    <style:style style:name="P73" style:family="paragraph" style:parent-style-name="Text_20_body">
      <style:text-properties officeooo:rsid="009dfb30" officeooo:paragraph-rsid="009dfb30"/>
    </style:style>
    <style:style style:name="P74" style:family="paragraph" style:parent-style-name="Text_20_body">
      <style:text-properties officeooo:rsid="00a7bd85" officeooo:paragraph-rsid="00a7bd85"/>
    </style:style>
    <style:style style:name="P75" style:family="paragraph" style:parent-style-name="Text_20_body">
      <style:text-properties officeooo:rsid="00a8a8ee" officeooo:paragraph-rsid="00a8a8ee"/>
    </style:style>
    <style:style style:name="P76" style:family="paragraph" style:parent-style-name="Text_20_body">
      <style:text-properties officeooo:rsid="00bc1000" officeooo:paragraph-rsid="00bc1000"/>
    </style:style>
    <style:style style:name="P77" style:family="paragraph" style:parent-style-name="Text_20_body">
      <style:text-properties officeooo:rsid="00bd2c5f" officeooo:paragraph-rsid="00bd2c5f"/>
    </style:style>
    <style:style style:name="P78" style:family="paragraph" style:parent-style-name="Text_20_body">
      <loext:graphic-properties draw:fill="solid" draw:fill-color="#ccf4c6" draw:opacity="100%"/>
      <style:paragraph-properties fo:background-color="#ccf4c6"/>
      <style:text-properties officeooo:rsid="00be5d2f" officeooo:paragraph-rsid="00be5d2f"/>
    </style:style>
    <style:style style:name="P79" style:family="paragraph" style:parent-style-name="Text_20_body">
      <style:text-properties officeooo:rsid="00c33137" officeooo:paragraph-rsid="00c33137"/>
    </style:style>
    <style:style style:name="P80" style:family="paragraph" style:parent-style-name="Text_20_body">
      <loext:graphic-properties draw:fill="solid" draw:fill-color="#f9cfb5" draw:opacity="100%"/>
      <style:paragraph-properties fo:background-color="#f9cfb5"/>
      <style:text-properties officeooo:rsid="00c4a1eb" officeooo:paragraph-rsid="00c4a1eb"/>
    </style:style>
    <style:style style:name="P81" style:family="paragraph" style:parent-style-name="Text_20_body">
      <style:text-properties officeooo:rsid="00c53394" officeooo:paragraph-rsid="00c53394"/>
    </style:style>
    <style:style style:name="P82" style:family="paragraph" style:parent-style-name="Text_20_body">
      <style:text-properties officeooo:rsid="00c789f4" officeooo:paragraph-rsid="00c789f4"/>
    </style:style>
    <style:style style:name="P83" style:family="paragraph" style:parent-style-name="Heading_20_1">
      <style:text-properties officeooo:rsid="0093021e" officeooo:paragraph-rsid="0093021e"/>
    </style:style>
    <style:style style:name="P84" style:family="paragraph" style:parent-style-name="Heading_20_1">
      <style:paragraph-properties fo:break-before="page"/>
    </style:style>
    <style:style style:name="P85" style:family="paragraph" style:parent-style-name="Standard" style:list-style-name="L4">
      <style:text-properties fo:font-size="10pt" style:font-size-asian="10pt" style:font-size-complex="10pt"/>
    </style:style>
    <style:style style:name="P86" style:family="paragraph" style:parent-style-name="Standard" style:list-style-name="L4">
      <style:text-properties fo:font-size="10pt" officeooo:rsid="00682013" officeooo:paragraph-rsid="00682013" style:font-size-asian="10pt" style:font-size-complex="10pt"/>
    </style:style>
    <style:style style:name="P87" style:family="paragraph" style:parent-style-name="Standard" style:list-style-name="L4">
      <style:text-properties fo:font-size="10pt" officeooo:rsid="006f46c0" officeooo:paragraph-rsid="006f46c0" style:font-size-asian="10pt" style:font-size-complex="10pt"/>
    </style:style>
    <style:style style:name="P88" style:family="paragraph" style:parent-style-name="Standard">
      <style:paragraph-properties fo:margin-left="1.251cm" fo:text-indent="0cm" style:auto-text-indent="false"/>
      <style:text-properties fo:font-size="6pt" style:font-size-asian="6pt" style:font-size-complex="6pt"/>
    </style:style>
    <style:style style:name="P89" style:family="paragraph" style:parent-style-name="Text_20_body" style:list-style-name="L1">
      <style:text-properties officeooo:rsid="0093b7c1" officeooo:paragraph-rsid="0093b7c1"/>
    </style:style>
    <style:style style:name="P90" style:family="paragraph" style:parent-style-name="Text_20_body" style:list-style-name="L1">
      <style:text-properties officeooo:rsid="009b123b" officeooo:paragraph-rsid="009b123b"/>
    </style:style>
    <style:style style:name="P91" style:family="paragraph" style:parent-style-name="Text_20_body" style:list-style-name="L1">
      <style:text-properties officeooo:rsid="009a3f6c" officeooo:paragraph-rsid="009a3f6c"/>
    </style:style>
    <style:style style:name="P92" style:family="paragraph" style:parent-style-name="Text_20_body" style:list-style-name="L2">
      <style:text-properties officeooo:rsid="0033cd3e" officeooo:paragraph-rsid="0033cd3e"/>
    </style:style>
    <style:style style:name="P93" style:family="paragraph" style:parent-style-name="Text_20_body" style:list-style-name="L2">
      <style:text-properties officeooo:rsid="00391331" officeooo:paragraph-rsid="00391331"/>
    </style:style>
    <style:style style:name="P94" style:family="paragraph" style:parent-style-name="Text_20_body" style:list-style-name="L2">
      <style:text-properties officeooo:rsid="003678a2" officeooo:paragraph-rsid="0036c34e"/>
    </style:style>
    <style:style style:name="P95" style:family="paragraph" style:parent-style-name="Text_20_body" style:list-style-name="L3">
      <style:text-properties officeooo:rsid="001bc108" officeooo:paragraph-rsid="001bc108"/>
    </style:style>
    <style:style style:name="P96" style:family="paragraph" style:parent-style-name="Text_20_body" style:list-style-name="L3">
      <style:text-properties officeooo:rsid="001d48d5" officeooo:paragraph-rsid="001d48d5"/>
    </style:style>
    <style:style style:name="P97" style:family="paragraph" style:parent-style-name="Text_20_body" style:list-style-name="L3">
      <style:text-properties officeooo:rsid="00915dd2" officeooo:paragraph-rsid="00915dd2"/>
    </style:style>
    <style:style style:name="P98" style:family="paragraph" style:parent-style-name="Text_20_body" style:list-style-name="L5"/>
    <style:style style:name="P99" style:family="paragraph" style:parent-style-name="Text_20_body" style:list-style-name="L5">
      <style:text-properties officeooo:rsid="008a19c5" officeooo:paragraph-rsid="008a19c5"/>
    </style:style>
    <style:style style:name="P100" style:family="paragraph" style:parent-style-name="Text_20_body" style:list-style-name="L5">
      <style:text-properties officeooo:rsid="008ad464" officeooo:paragraph-rsid="008ad464"/>
    </style:style>
    <style:style style:name="P101" style:family="paragraph" style:parent-style-name="Text_20_body" style:list-style-name="L6">
      <style:text-properties officeooo:rsid="009dfb30" officeooo:paragraph-rsid="009dfb30"/>
    </style:style>
    <style:style style:name="P102" style:family="paragraph" style:parent-style-name="Text_20_body" style:list-style-name="L6">
      <style:text-properties officeooo:rsid="009ee426" officeooo:paragraph-rsid="009ee426"/>
    </style:style>
    <style:style style:name="P103" style:family="paragraph" style:parent-style-name="Text_20_body" style:list-style-name="L6">
      <loext:graphic-properties draw:fill="solid" draw:fill-color="#ccf4c6" draw:opacity="100%"/>
      <style:paragraph-properties fo:background-color="#ccf4c6"/>
      <style:text-properties officeooo:rsid="00a036bf" officeooo:paragraph-rsid="00a036bf"/>
    </style:style>
    <style:style style:name="P104" style:family="paragraph" style:parent-style-name="Text_20_body" style:list-style-name="L6">
      <loext:graphic-properties draw:fill="solid" draw:fill-color="#ccf4c6" draw:opacity="100%"/>
      <style:paragraph-properties fo:background-color="#ccf4c6"/>
      <style:text-properties officeooo:rsid="00a222c8" officeooo:paragraph-rsid="00a222c8"/>
    </style:style>
    <style:style style:name="P105" style:family="paragraph" style:parent-style-name="Text_20_body" style:list-style-name="L7">
      <loext:graphic-properties draw:fill="solid" draw:fill-color="#ccf4c6" draw:opacity="100%"/>
      <style:paragraph-properties fo:background-color="#ccf4c6"/>
      <style:text-properties officeooo:rsid="00a995fd" officeooo:paragraph-rsid="00a995fd"/>
    </style:style>
    <style:style style:name="P106" style:family="paragraph" style:parent-style-name="Text_20_body" style:list-style-name="L7">
      <loext:graphic-properties draw:fill="solid" draw:fill-color="#ccf4c6" draw:opacity="100%"/>
      <style:paragraph-properties fo:background-color="#ccf4c6"/>
      <style:text-properties officeooo:rsid="00ab3195" officeooo:paragraph-rsid="00ab3195"/>
    </style:style>
    <style:style style:name="P107" style:family="paragraph" style:parent-style-name="Text_20_body" style:list-style-name="L7">
      <loext:graphic-properties draw:fill="solid" draw:fill-color="#ccf4c6" draw:opacity="100%"/>
      <style:paragraph-properties fo:background-color="#ccf4c6"/>
      <style:text-properties officeooo:rsid="00b04203" officeooo:paragraph-rsid="00b04203"/>
    </style:style>
    <style:style style:name="P108" style:family="paragraph" style:parent-style-name="Text_20_body" style:list-style-name="L7">
      <loext:graphic-properties draw:fill="solid" draw:fill-color="#ccf4c6" draw:opacity="100%"/>
      <style:paragraph-properties fo:background-color="#ccf4c6"/>
      <style:text-properties officeooo:rsid="00b085fa" officeooo:paragraph-rsid="00b085fa"/>
    </style:style>
    <style:style style:name="P109" style:family="paragraph" style:parent-style-name="Text_20_body" style:list-style-name="L8">
      <style:text-properties officeooo:rsid="00a7bd85" officeooo:paragraph-rsid="00a7bd85"/>
    </style:style>
    <style:style style:name="P110" style:family="paragraph" style:parent-style-name="Text_20_body" style:list-style-name="L8">
      <style:text-properties officeooo:rsid="00a8a8ee" officeooo:paragraph-rsid="00a8a8ee"/>
    </style:style>
    <style:style style:name="P111" style:family="paragraph" style:parent-style-name="Text_20_body">
      <style:text-properties officeooo:rsid="00bc1000" officeooo:paragraph-rsid="00bc1000"/>
    </style:style>
    <style:style style:name="P112" style:family="paragraph" style:parent-style-name="Text_20_body" style:list-style-name="L9">
      <style:text-properties officeooo:rsid="00c53394" officeooo:paragraph-rsid="00c53394"/>
    </style:style>
    <style:style style:name="P113" style:family="paragraph" style:parent-style-name="Text_20_body" style:list-style-name="L9">
      <style:text-properties officeooo:rsid="00c8e7bd" officeooo:paragraph-rsid="00c8e7bd"/>
    </style:style>
    <style:style style:name="P114" style:family="paragraph" style:parent-style-name="Text_20_body" style:list-style-name="L9">
      <style:text-properties officeooo:rsid="00ca4883" officeooo:paragraph-rsid="00ca4883"/>
    </style:style>
    <style:style style:name="P115" style:family="paragraph" style:parent-style-name="Text_20_body" style:list-style-name="L1">
      <style:text-properties officeooo:rsid="00cd96ed" officeooo:paragraph-rsid="00cd96ed"/>
    </style:style>
    <style:style style:name="P116" style:family="paragraph" style:parent-style-name="Text_20_body" style:list-style-name="L1">
      <style:text-properties officeooo:rsid="00cdb716" officeooo:paragraph-rsid="00cdb716"/>
    </style:style>
    <style:style style:name="P117" style:family="paragraph" style:parent-style-name="Text_20_body" style:list-style-name="L1">
      <style:text-properties officeooo:rsid="00cfb84f" officeooo:paragraph-rsid="00cfb84f"/>
    </style:style>
    <style:style style:name="T1" style:family="text">
      <style:text-properties officeooo:rsid="0018ea4e"/>
    </style:style>
    <style:style style:name="T2" style:family="text">
      <style:text-properties officeooo:rsid="001c7dfd"/>
    </style:style>
    <style:style style:name="T3" style:family="text">
      <style:text-properties fo:color="#000000" loext:opacity="100%" style:font-name="Cascadia Mono1" fo:font-size="9.5pt" fo:background-color="#ffffff" loext:char-shading-value="0" style:font-size-asian="9.5pt"/>
    </style:style>
    <style:style style:name="T4" style:family="text">
      <style:text-properties fo:color="#000000" loext:opacity="100%" style:font-name="Cascadia Mono1" fo:background-color="#ffffff" loext:char-shading-value="0"/>
    </style:style>
    <style:style style:name="T5" style:family="text">
      <style:text-properties fo:color="#000000" loext:opacity="100%" style:font-name="Cascadia Mono" fo:font-size="9.5pt" fo:background-color="#ffffff" loext:char-shading-value="0" style:font-size-asian="9.5pt"/>
    </style:style>
    <style:style style:name="T6" style:family="text">
      <style:text-properties officeooo:rsid="0024bb16"/>
    </style:style>
    <style:style style:name="T7" style:family="text">
      <style:text-properties officeooo:rsid="00273779"/>
    </style:style>
    <style:style style:name="T8" style:family="text">
      <style:text-properties officeooo:rsid="00298946"/>
    </style:style>
    <style:style style:name="T9" style:family="text">
      <style:text-properties style:text-position="sub 58%"/>
    </style:style>
    <style:style style:name="T10" style:family="text">
      <style:text-properties style:text-position="sub 58%" officeooo:rsid="004a5592"/>
    </style:style>
    <style:style style:name="T11" style:family="text">
      <style:text-properties style:text-position="0% 100%"/>
    </style:style>
    <style:style style:name="T12" style:family="text">
      <style:text-properties style:text-position="0% 100%" officeooo:rsid="004a5592"/>
    </style:style>
    <style:style style:name="T13" style:family="text">
      <style:text-properties style:text-position="0% 100%" officeooo:rsid="004fe9b9"/>
    </style:style>
    <style:style style:name="T14" style:family="text">
      <style:text-properties style:text-position="0% 100%" officeooo:rsid="0050bff9"/>
    </style:style>
    <style:style style:name="T15" style:family="text">
      <style:text-properties style:text-position="0% 100%" officeooo:rsid="0051042d"/>
    </style:style>
    <style:style style:name="T16" style:family="text">
      <style:text-properties style:text-position="0% 100%" officeooo:rsid="0050bff9" fo:background-color="#ffff00" loext:char-shading-value="0"/>
    </style:style>
    <style:style style:name="T17" style:family="text">
      <style:text-properties style:text-position="0% 100%" officeooo:rsid="004f0db5" fo:background-color="#ffff00" loext:char-shading-value="0"/>
    </style:style>
    <style:style style:name="T18" style:family="text">
      <style:text-properties style:text-position="0% 100%" officeooo:rsid="0051042d" fo:background-color="#ffff00" loext:char-shading-value="0"/>
    </style:style>
    <style:style style:name="T19" style:family="text">
      <style:text-properties style:text-position="0% 100%" officeooo:rsid="00572b28"/>
    </style:style>
    <style:style style:name="T20" style:family="text">
      <style:text-properties style:text-position="0% 100%" officeooo:rsid="00586686"/>
    </style:style>
    <style:style style:name="T21" style:family="text">
      <style:text-properties style:text-position="0% 100%" officeooo:rsid="0059c2b1"/>
    </style:style>
    <style:style style:name="T22" style:family="text">
      <style:text-properties style:text-position="0% 100%" officeooo:rsid="00724306"/>
    </style:style>
    <style:style style:name="T23" style:family="text">
      <style:text-properties style:text-position="0% 100%" officeooo:rsid="00740c59"/>
    </style:style>
    <style:style style:name="T24" style:family="text">
      <style:text-properties officeooo:rsid="002b9a02"/>
    </style:style>
    <style:style style:name="T25" style:family="text">
      <style:text-properties officeooo:rsid="00312b2b"/>
    </style:style>
    <style:style style:name="T26" style:family="text">
      <style:text-properties officeooo:rsid="0033cd3e"/>
    </style:style>
    <style:style style:name="T27" style:family="text">
      <style:text-properties officeooo:rsid="001e2f8c"/>
    </style:style>
    <style:style style:name="T28" style:family="text">
      <style:text-properties fo:font-weight="bold" style:font-weight-asian="bold" style:font-weight-complex="bold"/>
    </style:style>
    <style:style style:name="T29" style:family="text">
      <style:text-properties fo:font-weight="bold" officeooo:rsid="001e2f8c" style:font-weight-asian="bold" style:font-weight-complex="bold"/>
    </style:style>
    <style:style style:name="T30" style:family="text">
      <style:text-properties fo:font-weight="bold" officeooo:rsid="00678ed4" style:font-weight-asian="bold" style:font-weight-complex="bold"/>
    </style:style>
    <style:style style:name="T31" style:family="text">
      <style:text-properties officeooo:rsid="00351875"/>
    </style:style>
    <style:style style:name="T32" style:family="text">
      <style:text-properties officeooo:rsid="0035942c"/>
    </style:style>
    <style:style style:name="T33" style:family="text">
      <style:text-properties officeooo:rsid="003678a2"/>
    </style:style>
    <style:style style:name="T34" style:family="text">
      <style:text-properties officeooo:rsid="00383e23"/>
    </style:style>
    <style:style style:name="T35" style:family="text">
      <style:text-properties officeooo:rsid="003b0135"/>
    </style:style>
    <style:style style:name="T36" style:family="text">
      <style:text-properties officeooo:rsid="003d4b90"/>
    </style:style>
    <style:style style:name="T37" style:family="text">
      <style:text-properties fo:color="#008000" loext:opacity="100%" style:font-name="Cascadia Mono1" fo:background-color="#ffffff" loext:char-shading-value="0"/>
    </style:style>
    <style:style style:name="T38" style:family="text">
      <style:text-properties officeooo:rsid="003e8dfe"/>
    </style:style>
    <style:style style:name="T39" style:family="text">
      <style:text-properties officeooo:rsid="00403e7f"/>
    </style:style>
    <style:style style:name="T40" style:family="text">
      <style:text-properties officeooo:rsid="0040f2ff"/>
    </style:style>
    <style:style style:name="T41" style:family="text">
      <style:text-properties officeooo:rsid="00460861"/>
    </style:style>
    <style:style style:name="T42" style:family="text">
      <style:text-properties officeooo:rsid="004b6fc4"/>
    </style:style>
    <style:style style:name="T43" style:family="text">
      <style:text-properties officeooo:rsid="00513649"/>
    </style:style>
    <style:style style:name="T44" style:family="text">
      <style:text-properties fo:color="#808080" loext:opacity="100%" style:font-name="Cascadia Mono1" fo:font-size="9.5pt" fo:background-color="#ffffff" loext:char-shading-value="0" style:font-size-asian="9.5pt"/>
    </style:style>
    <style:style style:name="T45" style:family="text">
      <style:text-properties officeooo:rsid="005579cf"/>
    </style:style>
    <style:style style:name="T46" style:family="text">
      <style:text-properties officeooo:rsid="0056bed9"/>
    </style:style>
    <style:style style:name="T47" style:family="text">
      <style:text-properties officeooo:rsid="005a817c"/>
    </style:style>
    <style:style style:name="T48" style:family="text">
      <style:text-properties officeooo:rsid="00607876"/>
    </style:style>
    <style:style style:name="T49" style:family="text">
      <style:text-properties officeooo:rsid="0060fa04"/>
    </style:style>
    <style:style style:name="T50" style:family="text">
      <style:text-properties officeooo:rsid="00668fbc"/>
    </style:style>
    <style:style style:name="T51" style:family="text">
      <style:text-properties officeooo:rsid="00682013"/>
    </style:style>
    <style:style style:name="T52" style:family="text">
      <style:text-properties officeooo:rsid="0069b2a6"/>
    </style:style>
    <style:style style:name="T53" style:family="text">
      <style:text-properties officeooo:rsid="006bdbf6"/>
    </style:style>
    <style:style style:name="T54" style:family="text">
      <style:text-properties officeooo:rsid="00701b90"/>
    </style:style>
    <style:style style:name="T55" style:family="text">
      <style:text-properties officeooo:rsid="0070f64b"/>
    </style:style>
    <style:style style:name="T56" style:family="text">
      <style:text-properties officeooo:rsid="00792ace"/>
    </style:style>
    <style:style style:name="T57" style:family="text">
      <style:text-properties officeooo:rsid="007d61ac"/>
    </style:style>
    <style:style style:name="T58" style:family="text">
      <style:text-properties officeooo:rsid="007e01c6"/>
    </style:style>
    <style:style style:name="T59" style:family="text">
      <style:text-properties officeooo:rsid="007f7727"/>
    </style:style>
    <style:style style:name="T60" style:family="text">
      <style:text-properties officeooo:rsid="0080a106"/>
    </style:style>
    <style:style style:name="T61" style:family="text">
      <style:text-properties officeooo:rsid="0080baea"/>
    </style:style>
    <style:style style:name="T62" style:family="text">
      <style:text-properties style:text-position="super 58%"/>
    </style:style>
    <style:style style:name="T63" style:family="text">
      <style:text-properties officeooo:rsid="008c160d"/>
    </style:style>
    <style:style style:name="T64" style:family="text">
      <style:text-properties officeooo:rsid="008d9441"/>
    </style:style>
    <style:style style:name="T65" style:family="text">
      <style:text-properties officeooo:rsid="00915dd2"/>
    </style:style>
    <style:style style:name="T66" style:family="text">
      <style:text-properties officeooo:rsid="00919ce8"/>
    </style:style>
    <style:style style:name="T67" style:family="text">
      <style:text-properties officeooo:rsid="009979b8"/>
    </style:style>
    <style:style style:name="T68" style:family="text">
      <style:text-properties officeooo:rsid="009ee426"/>
    </style:style>
    <style:style style:name="T69" style:family="text">
      <style:text-properties officeooo:rsid="00a49811"/>
    </style:style>
    <style:style style:name="T70" style:family="text">
      <style:text-properties officeooo:rsid="00ad1fc0"/>
    </style:style>
    <style:style style:name="T71" style:family="text">
      <style:text-properties style:text-underline-style="solid" style:text-underline-width="auto" style:text-underline-color="font-color" fo:font-weight="normal" style:font-weight-asian="normal" style:font-weight-complex="normal"/>
    </style:style>
    <style:style style:name="T72" style:family="text">
      <style:text-properties officeooo:rsid="00ada32d"/>
    </style:style>
    <style:style style:name="T73" style:family="text">
      <style:text-properties officeooo:rsid="00af6429"/>
    </style:style>
    <style:style style:name="T74" style:family="text">
      <style:text-properties officeooo:rsid="00b2a102"/>
    </style:style>
    <style:style style:name="T75" style:family="text">
      <style:text-properties officeooo:rsid="00b3c8a5"/>
    </style:style>
    <style:style style:name="T76" style:family="text">
      <style:text-properties officeooo:rsid="00b59ead"/>
    </style:style>
    <style:style style:name="T77" style:family="text">
      <style:text-properties officeooo:rsid="00bae0fc"/>
    </style:style>
    <style:style style:name="T78" style:family="text">
      <style:text-properties officeooo:rsid="00bf3fc7"/>
    </style:style>
    <style:style style:name="T79" style:family="text">
      <style:text-properties officeooo:rsid="00bf48d0"/>
    </style:style>
    <style:style style:name="T80" style:family="text">
      <style:text-properties officeooo:rsid="00c8e7bd"/>
    </style:style>
    <style:style style:name="T81" style:family="text">
      <style:text-properties officeooo:rsid="00c934ab"/>
    </style:style>
    <style:style style:name="T82" style:family="text">
      <style:text-properties officeooo:rsid="00ca4883"/>
    </style:style>
    <style:style style:name="T83" style:family="text">
      <style:text-properties officeooo:rsid="00ce0a17"/>
    </style:style>
    <style:style style:name="T84" style:family="text">
      <style:text-properties officeooo:rsid="00d05f6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499cm" fo:margin-bottom="0.499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1">Project</text:p>
          </table:table-cell>
          <table:table-cell table:style-name="Table1.A1" office:value-type="string">
            <text:p text:style-name="P2">PR-<text:span text:style-name="T1">118</text:span></text:p>
          </table:table-cell>
        </table:table-row>
        <table:table-row table:style-name="Table1.1">
          <table:table-cell table:style-name="Table1.A1" office:value-type="string">
            <text:p text:style-name="P1">Date</text:p>
          </table:table-cell>
          <table:table-cell table:style-name="Table1.A1" office:value-type="string">
            <text:p text:style-name="P3">2025-01-18</text:p>
          </table:table-cell>
        </table:table-row>
        <table:table-row table:style-name="Table1.1">
          <table:table-cell table:style-name="Table1.A1" office:value-type="string">
            <text:p text:style-name="P1"/>
          </table:table-cell>
          <table:table-cell table:style-name="Table1.A1" office:value-type="string">
            <text:p text:style-name="P4">MP Filtri UK Ltd</text:p>
          </table:table-cell>
        </table:table-row>
        <table:table-row table:style-name="Table1.1">
          <table:table-cell table:style-name="Table1.A1" office:value-type="string">
            <text:p text:style-name="P1">Author</text:p>
          </table:table-cell>
          <table:table-cell table:style-name="Table1.A1" office:value-type="string">
            <text:p text:style-name="P1">JMD</text:p>
          </table:table-cell>
        </table:table-row>
        <table:table-row table:style-name="Table1.1">
          <table:table-cell table:style-name="Table1.A1" office:value-type="string">
            <text:p text:style-name="P1"/>
          </table:table-cell>
          <table:table-cell table:style-name="Table1.A1" office:value-type="string">
            <text:p text:style-name="P1"/>
          </table:table-cell>
        </table:table-row>
      </table:table>
      <text:p text:style-name="Horizontal_20_Line"/>
      <text:h text:style-name="Heading_20_1" text:outline-level="1">11171 Software Development</text:h>
      <text:p text:style-name="Text_20_body"/>
      <text:h text:style-name="P83" text:outline-level="1">TODO</text:h>
      <text:list text:style-name="L1">
        <text:list-item>
          <text:p text:style-name="P115">Auto-adjust button to calibrate to any given test result(s)</text:p>
        </text:list-item>
        <text:list-item>
          <text:p text:style-name="P116"><text:span text:style-name="T84">Make </text:span>tickbox <text:span text:style-name="T84">work </text:span>for raw/normalised counts</text:p>
        </text:list-item>
        <text:list-item>
          <text:p text:style-name="P89"><text:span text:style-name="T83">check </text:span>NAVAIR standard on LPA3 <text:span text:style-name="T83">re coloring etc</text:span></text:p>
          <text:list>
            <text:list-item>
              <text:p text:style-name="P90">use true 10um count</text:p>
            </text:list-item>
          </text:list>
        </text:list-item>
        <text:list-item>
          <text:p text:style-name="P91">*load*/save settings <text:span text:style-name="T83">from cal view</text:span></text:p>
        </text:list-item>
        <text:list-item>
          <text:p text:style-name="P117">quick export of multi-portion test counts and extended counts</text:p>
        </text:list-item>
      </text:list>
      <text:p text:style-name="P67"/>
      <text:p text:style-name="Text_20_body"/>
      <text:p text:style-name="Text_20_body"/>
      <text:h text:style-name="Heading_20_1" text:outline-level="1"/>
      <text:p text:style-name="P9">Created 11171 branches of LPA3 and LPA-View code.</text:p>
      <text:p text:style-name="P10">Concept: add required features to LPA3 codebase. The various particle counter models [LPA3, CML4, CML3, ref_ctr] are "views" into these facilities. For example, convert particle counting code to always have say <text:span text:style-name="T25">32</text:span> channels.</text:p>
      <text:p text:style-name="P10"><text:s/><text:span text:style-name="T26">Alternative: Minimum change</text:span></text:p>
      <text:list text:style-name="L2">
        <text:list-item>
          <text:p text:style-name="P92">8 sizes as now <text:span text:style-name="T32">{</text:span>4,6,14,21,25,38,50,70<text:span text:style-name="T32">} </text:span>um(c).</text:p>
        </text:list-item>
        <text:list-item>
          <text:p text:style-name="P92"><text:span text:style-name="T32">4</text:span> extended sizes <text:span text:style-name="T32">{</text:span>4.2, 4.6, 6.4, <text:span text:style-name="T32">10.0} um(c).</text:span> </text:p>
        </text:list-item>
        <text:list-item>
          <text:p text:style-name="P92">8 channels temporarily loaded with alternate thresholds during calibration.</text:p>
          <text:list>
            <text:list-item>
              <text:p text:style-name="P92">Annex A<text:span text:style-name="T33">&amp;</text:span>E <text:span text:style-name="T31">from </text:span><text:span text:style-name="T27">table A.1 {</text:span><text:span text:style-name="T29">4</text:span><text:span text:style-name="T27">, 5, </text:span><text:span text:style-name="T29">6</text:span><text:span text:style-name="T27">, 7, 8, </text:span><text:span text:style-name="T29">10</text:span><text:span text:style-name="T27">}</text:span></text:p>
            </text:list-item>
            <text:list-item>
              <text:p text:style-name="P93">Need to be able to keep these around somewhere though</text:p>
            </text:list-item>
          </text:list>
        </text:list-item>
        <text:list-item>
          <text:p text:style-name="P94">Could have {4, 6, 14, 21, 25, 38, 50, 70, <text:s/>4.2, 4.6, 6.4, 10.0, 5, 7, 8, 30}</text:p>
        </text:list-item>
      </text:list>
      <text:p text:style-name="P11"><text:soft-page-break/>Idea: Dynamically interpolate the NAVAIR <text:span text:style-name="T65">10um </text:span>threshold during result calculation.</text:p>
      <text:p text:style-name="P11">Thresholds are the SRM2806 ones plus those required for NAS etc.</text:p>
      <text:p text:style-name="P11">{4,<text:span text:style-name="T34">5,6</text:span>..<text:span text:style-name="T34">29,30</text:span>, 38, 50, 70} um(c) = <text:span text:style-name="T34">27+3 = </text:span>30 channels</text:p>
      <text:h text:style-name="Heading_20_1" text:outline-level="1">Notes</text:h>
      <text:list text:style-name="L3">
        <text:list-item>
          <text:p text:style-name="P95">Need to be able to prove full 11171 on both Reference and LPA4 counters <text:span text:style-name="T2">including annexes. However LPA4 can use certified test rig distribution.</text:span></text:p>
        </text:list-item>
        <text:list-item>
          <text:p text:style-name="P96">Can have button on <text:span text:style-name="T63">LPS-View </text:span>LPA3 Calibration screen to write distribution to reference</text:p>
        </text:list-item>
        <text:list-item>
          <text:p text:style-name="P97">11171 Primary calibration requires 3 separate bottles of SRM2806 be used. This makes it difficult to have automatic threshold setting. Since would need to consistently maintain 3+ histograms, <text:s/>with any error risking loss of data. Also need to be able to remove test portion outliers as required. For this will need capability to export counts to spreadsheet <text:span text:style-name="T66">to generate a calibration curve, then </text:span>manually or automatically enter interpolated thresholds.</text:p>
        </text:list-item>
      </text:list>
      <text:p text:style-name="P8"/>
      <text:h text:style-name="P84" text:outline-level="1">Thresholds</text:h>
      <text:p text:style-name="P42">Conclusion: <text:span text:style-name="T48">float representation useful but not required. </text:span>Need 16 <text:span text:style-name="T48">SRM2806x </text:span>+PSL sizes.</text:p>
      <text:list text:style-name="L4">
        <text:list-item>
          <text:p text:style-name="P85">Annex E: <text:span text:style-name="T50">6 of RM8632x sizes = </text:span>{4, 5, 6, 7, 8, 9, 10}</text:p>
        </text:list-item>
        <text:list-item>
          <text:p text:style-name="P85">Annex F: 16 <text:span text:style-name="T50">of SRM280x sizes =</text:span> { <text:span text:style-name="T49">4, 5, 6, 7, 8, 9, 10, </text:span>12, <text:s text:c="2"/>14, 15, 16, 18, 20, 21, 22, 25 }</text:p>
        </text:list-item>
        <text:list-item>
          <text:p text:style-name="P85">Clause 6.11 <text:span text:style-name="T50">PSL spheres &gt;30, k&lt;1.5 = </text:span>{38, 50, 70} = +3</text:p>
        </text:list-item>
        <text:list-item>
          <text:p text:style-name="P85"><text:span text:style-name="T28">Minimum 19 </text:span><text:span text:style-name="T30">threshold points need to be stored</text:span>.</text:p>
        </text:list-item>
        <text:list-item>
          <text:p text:style-name="P85">4..25 + 30,38,50,70 = 26 sizes.</text:p>
        </text:list-item>
        <text:list-item>
          <text:p text:style-name="P85">Reasonable to have 32x thresholds <text:span text:style-name="T51">(26 as above + </text:span><text:span text:style-name="T52">40, 60 + 4</text:span><text:span text:style-name="T51"> spare)</text:span></text:p>
        </text:list-item>
        <text:list-item>
          <text:p text:style-name="P86">Each threshold {<text:span text:style-name="T53">mb_f2_t size</text:span>, <text:s/><text:span text:style-name="T53">float threshold} = 6 bytes.</text:span></text:p>
        </text:list-item>
        <text:list-item>
          <text:p text:style-name="P87">Implementation: Using plain floats for both {size, threshold}</text:p>
        </text:list-item>
      </text:list>
      <text:p text:style-name="P27"/>
      <text:p text:style-name="P36"><text:span text:style-name="T16">Certified 11171 secondary</text:span><text:span text:style-name="T17"> </text:span><text:span text:style-name="T16">suspensions </text:span><text:span text:style-name="T18">(Annex F) </text:span><text:span text:style-name="T16">need to list at least 16 sizes from the SRM2806x distribution.</text:span><text:span text:style-name="T14"> Our </text:span><text:span text:style-name="T15">primary </text:span><text:span text:style-name="T14">counter should therefore have at least </text:span><text:span text:style-name="T15">16 </text:span><text:span text:style-name="T14">sizes </text:span><text:span text:style-name="T15">in this range as well as some larger ones for use with PSL spheres</text:span><text:span text:style-name="T14">.</text:span></text:p>
      <text:p text:style-name="Text_20_body"><text:span text:style-name="T14">P</text:span><text:span text:style-name="T11">artistan 2806 reports 16 measured sizes with the rest produced via interpolation.</text:span></text:p>
      <text:p text:style-name="P37"><text:span text:style-name="T14">Secondary calibrated particle counters can have less </text:span><text:span text:style-name="T15">but </text:span><text:span text:style-name="T27">Annex </text:span><text:span text:style-name="T6">E </text:span><text:span text:style-name="T27">requires </text:span><text:span text:style-name="T42">testing a RM8632 sample and </text:span><text:span text:style-name="T27">counting at least 6 sizes from table A.1 {2,3,4,5,6,7,8,9,10}. </text:span><text:span text:style-name="T42">We therefore do need to calibrate at these sizes and save/reload the thresholds somewhere.</text:span></text:p>
      <text:p text:style-name="P39"><text:span text:style-name="T43">For GOST support (and possibly reworked standards based on microscope measurement of longest chord length like NAS) we used </text:span><text:span text:style-name="T36">SRM2806:2000 </text:span><text:span text:style-name="T43">to </text:span><text:span text:style-name="T36">define the relationship between largest particle dimension per ISO44</text:span><text:span text:style-name="T38">06:1987 </text:span><text:span text:style-name="T36">and equivalent projected area per ISO4406:</text:span><text:span text:style-name="T38">1999+</text:span></text:p>
      <text:p text:style-name="P88" loext:marker-style-name="T5"><text:span text:style-name="T37"><text:s/>1um = 4.2um(c) (SRM2806:2000)</text:span></text:p>
      <text:p text:style-name="P88" loext:marker-style-name="T5"><text:span text:style-name="T37"><text:s/>2um = 4.6um(c) (SRM2806:2000)</text:span><text:span text:style-name="T4"/></text:p>
      <text:p text:style-name="P88" loext:marker-style-name="T5"><text:span text:style-name="T37"><text:s/>5um = 6.4um(c) (SRM2806:2000)</text:span><text:span text:style-name="T4"/></text:p>
      <text:p text:style-name="P88" loext:marker-style-name="T5"><text:span text:style-name="T37"><text:s/>10um = 9.8um(c) (SRM2806:2000)</text:span><text:span text:style-name="T4"/></text:p>
      <text:p text:style-name="P88" loext:marker-style-name="T5"><text:span text:style-name="T37"><text:s/>15um = 13.6um(c) (SRM2806:2000)</text:span><text:span text:style-name="T4"/></text:p>
      <text:p text:style-name="P23"/>
      <text:p text:style-name="P40">GOST <text:span text:style-name="T39">reports chord sizes equivalent to </text:span>4.2, 4.6, 6.4, 13.6 <text:span text:style-name="T39">um(c)</text:span></text:p>
      <text:p text:style-name="P41">However we can more easily use on-device threshold interpolation to generate these if desired rather than defining dedicated thresholds.</text:p>
      <text:p text:style-name="P38"><text:span text:style-name="T36">For NAVAIR we need </text:span><text:span text:style-name="T39">5,10,25,50,100μm size</text:span><text:span text:style-name="T40">s i.e. it adds the 10μm size </text:span><text:span text:style-name="T64">[= 9.8μm(c) can just use 10μm(c)]</text:span><text:span text:style-name="T40">.</text:span></text:p>
      <text:p text:style-name="P16">Also A<text:span text:style-name="T27">nnex B Coincidence require setting a threshold</text:span></text:p>
      <text:p text:style-name="P17">"corresponding to 1,5 times the threshold noise level of the APC or corresponding to the smallest particle size of interest if it is greater than 1,5 times the threshold noise level."</text:p>
      <text:p text:style-name="P16">(This also implies that the smallest particle threshold does *not* need to be &gt;1.5 times the noise threshold. <text:span text:style-name="T54">However elsewhere 11171 contradicts this e.g. F.4.a</text:span>).</text:p>
      <text:p text:style-name="P20">Annex D Resolution uses 5 channels <text:span text:style-name="T39">that can be adjusted arbitrarily to centre the sphere size but can be done another </text:span>way if available <text:span text:style-name="T39">(e.g. using MCA directly)</text:span>.</text:p>
      <text:p text:style-name="P21">Latex sphere calibrations using interpolation require a logarithmically spaced series however if we can obtain spheres close to the desired sizes then we can just use these.</text:p>
      <text:p text:style-name="P18">Clause 6 does say to use all available certified <text:span text:style-name="T39">SRM2806 </text:span>sizes and a minimum of 16 however this is for use in interpolating a "calibration curve" which we do not do since we instead set thresholds to the exact optimum value to obtain the desired counts i.e. we are a MC<text:span text:style-name="T7">A</text:span>.</text:p>
      <text:h text:style-name="Heading_20_3" text:outline-level="3"><text:soft-page-break/><text:span text:style-name="T13">T</text:span><text:span text:style-name="T11">hreshold resolution</text:span></text:h>
      <text:p text:style-name="P43">Currently 0-65535 where 65535 is a notional "full scale" pulse. <text:span text:style-name="T45">These are divided by 4 to match the ADC range of 16384 ADU.</text:span></text:p>
      <text:p text:style-name="P45"><text:span text:style-name="T45">They are further scaled (multiplied) by a factor to account for the measured LED level </text:span><text:span text:style-name="T46">as a fraction of the circuit maximum</text:span><text:span text:style-name="T45">. </text:span><text:span text:style-name="T46">So any variation in LED output does not affect the particle counts.</text:span></text:p>
      <text:p text:style-name="P44"><text:span text:style-name="T3"><text:s text:c="4"/></text:span><text:span text:style-name="T44">t</text:span><text:span text:style-name="T3">-&gt;threshold_scale_factor = s-&gt;led_level / hw_photocurrent_full_scale_nA();</text:span></text:p>
      <text:p text:style-name="P24"><text:span text:style-name="T14">N</text:span><text:span text:style-name="T11">B the amplitude of an ADC full scale pulse is different from the LED output since it is determined also by the photodiode preamplifier gain which is </text:span><text:span text:style-name="T19">empirically </text:span><text:span text:style-name="T11">chosen to have the 70um threshold in the upper half of the range.</text:span></text:p>
      <text:h text:style-name="Heading_20_4" text:outline-level="4">Small Sizes</text:h>
      <text:p text:style-name="P24"><text:span text:style-name="T20">For the reference counter unit we have a 4um threshold of e.g. </text:span><text:span text:style-name="T21">148/27ADU (at 10ml/min).</text:span></text:p>
      <text:p text:style-name="P65">The fractional threshold setting resolution would then be 1/148 = 0.7%.</text:p>
      <text:h text:style-name="Heading_20_4" text:outline-level="4">Large Sizes</text:h>
      <text:p text:style-name="P46">Here we have relatively fewer particles (although supposed to be &gt;1000).</text:p>
      <text:p text:style-name="P47">These will likely be distributed over 1000's of bins so probably only 0 or 1 particles in a bin.</text:p>
      <text:p text:style-name="P47">Threshold with x4 scale factor will then be able to resolve ¼ of a raw count.</text:p>
      <text:p text:style-name="P47">Issues arise with non-PSL sphere calibration where they may only be 168*0.07 = 11 particles. ¼ particle resolution would then be about 2% in count → OK.</text:p>
      <text:h text:style-name="Heading_20_4" text:outline-level="4">Threshold Resolution – Conclusion</text:h>
      <text:p text:style-name="P25">It does seem like higher resolution would be <text:span text:style-name="T47">useful but not required</text:span>.</text:p>
      <text:p text:style-name="P25"/>
      <text:p text:style-name="P26">If made thresholds floats then could keep <text:span text:style-name="T55">scaling </text:span>similar <text:span text:style-name="T55">i.e. 0-65535.0</text:span>.</text:p>
      <text:h text:style-name="Heading_20_2" text:outline-level="2">How many Channels - Counts</text:h>
      <text:p text:style-name="P19">Need raw particle counts or at least to know if &gt;10000 for the smallest size and &gt;1000 for the largest. <text:span text:style-name="T41">(For reporting ISO4406 codes also supposed to know if &lt;20 particles).</text:span></text:p>
      <text:p text:style-name="P22">If make available the volume actually scanned then we could keep reporting the count per 100ml = count<text:span text:style-name="T9">RAW</text:span><text:span text:style-name="T11"> * 100ml / v</text:span><text:span text:style-name="T9">SCANNED</text:span>. Raw count would then be count<text:span text:style-name="T9">/100ml</text:span> * v<text:span text:style-name="T9">SCANNED</text:span><text:span text:style-name="T11">/100ml, rounded to nearest integer. </text:span><text:span text:style-name="T12">This seems to preserve precision for v</text:span><text:span text:style-name="T10">SCANNED</text:span><text:span text:style-name="T12"> &lt; 100ml.</text:span></text:p>
      <text:p text:style-name="P48"><text:span text:style-name="T14">C</text:span><text:span text:style-name="T11">an just use floats for counts and for volume scanned. </text:span><text:span text:style-name="T22">That way can reconstruct raw counts exactly as long as not doing anything like clipping correction (where the volume varies by count).</text:span></text:p>
      <text:p text:style-name="P49"><text:span text:style-name="T22">C</text:span><text:span text:style-name="T11">onclusion: Will use array of 32 floats </text:span><text:span text:style-name="T23">plus a float for scanned_ml</text:span><text:span text:style-name="T11">.</text:span></text:p>
      <text:p text:style-name="P49"/>
      <text:h text:style-name="P84" text:outline-level="1">Histograms</text:h>
      <text:p text:style-name="P50">The LPA3 calibration performs 3x100ml samples accumulating a histogram. It prints intermediate results but in fact these are from the accumulated histogram rather than individual tests.</text:p>
      <text:p text:style-name="P50">The reference counter has a multi-portion sample within one stroke that we intend to use for the calibration, outputting distinct counts for each portion. Here we do not have an accumulated histogram so the calibration would be based on just one portion.</text:p>
      <text:p text:style-name="P50">We need a separate histogram for intermediate and accumulated counts.</text:p>
      <text:p text:style-name="P50">After a series of tests or test portions, the accumulated version would be used to obtain the thresholds.</text:p>
      <text:p text:style-name="P51">Possibly this could be a "recalculate" command without having altered any thresholds. i.e. the recalculate command would always operate on the accumulated data.</text:p>
      <text:p text:style-name="P52">Need to either make current histogram implementation have dual sets of bins or else encapsulate so that can have two instances.</text:p>
      <text:p text:style-name="P53">We have something already in the icu project.</text:p>
      <text:p text:style-name="P53"/>
      <text:h text:style-name="P84" text:outline-level="1"><text:span text:style-name="T61">Modelling &amp; </text:span><text:span text:style-name="T56">S</text:span>imulation</text:h>
      <text:p text:style-name="P54">Switch to direct population of the pulse height histograms. Model SRM2806d distribution</text:p>
      <text:p text:style-name="P54"><draw:frame draw:style-name="fr4" draw:name="Image3" text:anchor-type="char" svg:x="-0.028cm" svg:y="0.213cm" svg:width="12.33cm" svg:height="7.985cm" draw:z-index="2"><draw:image xlink:href="Pictures/10000000000006A70000044F3A7EBBDC.png" xlink:type="simple" xlink:show="embed" xlink:actuate="onLoad" draw:mime-type="image/png"/></draw:frame></text:p>
      <text:p text:style-name="P63">The cumulative particle distribution can be modelled using a power law for the small sizes with an exponential correction to account for the fall off at larger sizes. This has the form:</text:p>
      <text:p text:style-name="P64">f(x)=A⋅x<text:span text:style-name="T62">−α</text:span>⋅e<text:span text:style-name="T62">−βx</text:span> </text:p>
      <text:p text:style-name="P57"/>
      <text:p text:style-name="P62">Assuming pulse heights proportional to equivalent circular projected area, for a 16384 channel histogram with 14um at bin 231 and 800000 particles &gt;4μm, the equation to model the histogram counts is</text:p>
      <text:p text:style-name="P55">n(B) = 13683.13 * B^(-0.275) * exp(-0.08774 * sqrt(B / 1.1786))</text:p>
      <text:p text:style-name="P56"><text:line-break/></text:p>
      <text:p text:style-name="P54"/>
      <text:h text:style-name="P84" text:outline-level="1">Thresholds, Scaling, Dynamic Range</text:h>
      <text:p text:style-name="P58">4μm particles had thresholds of 148/65536 scaled by 5.4 (x4 for bit shifting and x1.35 for photocurrent scaling). 30μm would then be 148 x (30/4)^2 = 8325.</text:p>
      <text:p text:style-name="P58">If use 14um threshold of 1248 as a base. 4um would be 101. </text:p>
      <table:table table:name="Table2" table:style-name="Table2">
        <table:table-column table:style-name="Table2.A" table:number-columns-repeated="8"/>
        <table:table-column table:style-name="Table2.I"/>
        <table:table-row>
          <table:table-cell table:style-name="Table2.A1" office:value-type="string">
            <text:p text:style-name="P28"/>
          </table:table-cell>
          <table:table-cell table:style-name="Table2.A1" office:value-type="string">
            <text:p text:style-name="P29">4</text:p>
          </table:table-cell>
          <table:table-cell table:style-name="Table2.C1" office:value-type="string">
            <text:p text:style-name="P29">6</text:p>
          </table:table-cell>
          <table:table-cell table:style-name="Table2.C1" office:value-type="string">
            <text:p text:style-name="P29">14</text:p>
          </table:table-cell>
          <table:table-cell table:style-name="Table2.C1" office:value-type="string">
            <text:p text:style-name="P29">21</text:p>
          </table:table-cell>
          <table:table-cell table:style-name="Table2.C1" office:value-type="string">
            <text:p text:style-name="P29">25</text:p>
          </table:table-cell>
          <table:table-cell table:style-name="Table2.C1" office:value-type="string">
            <text:p text:style-name="P29">38</text:p>
          </table:table-cell>
          <table:table-cell table:style-name="Table2.A1" office:value-type="string">
            <text:p text:style-name="P29">50</text:p>
          </table:table-cell>
          <table:table-cell table:style-name="Table2.I1" office:value-type="string">
            <text:p text:style-name="P29">70</text:p>
          </table:table-cell>
        </table:table-row>
        <table:table-row>
          <table:table-cell table:style-name="Table2.A2" office:value-type="string">
            <text:p text:style-name="P30">ADU</text:p>
          </table:table-cell>
          <table:table-cell table:style-name="Table2.A2" office:value-type="string">
            <text:p text:style-name="P30">27</text:p>
          </table:table-cell>
          <table:table-cell table:style-name="Table2.C2" office:value-type="string">
            <text:p text:style-name="P30">51</text:p>
          </table:table-cell>
          <table:table-cell table:style-name="Table2.C2" office:value-type="string">
            <text:p text:style-name="P34">231</text:p>
          </table:table-cell>
          <table:table-cell table:style-name="Table2.C2" office:value-type="string">
            <text:p text:style-name="P30">525</text:p>
          </table:table-cell>
          <table:table-cell table:style-name="Table2.C2" office:value-type="string">
            <text:p text:style-name="P30">752</text:p>
          </table:table-cell>
          <table:table-cell table:style-name="Table2.C2" office:value-type="string">
            <text:p text:style-name="P30">1697</text:p>
          </table:table-cell>
          <table:table-cell table:style-name="Table2.A2" office:value-type="string">
            <text:p text:style-name="P30">2348</text:p>
          </table:table-cell>
          <table:table-cell table:style-name="Table2.I2" office:value-type="string">
            <text:p text:style-name="P30">3645</text:p>
          </table:table-cell>
        </table:table-row>
        <table:table-row>
          <table:table-cell table:style-name="Table2.A3" office:value-type="string">
            <text:p text:style-name="P29">Calibrated</text:p>
          </table:table-cell>
          <table:table-cell table:style-name="Table2.A3" office:value-type="string">
            <text:p text:style-name="P32">148</text:p>
          </table:table-cell>
          <table:table-cell table:style-name="Table2.C2" office:value-type="string">
            <text:p text:style-name="P29">280</text:p>
          </table:table-cell>
          <table:table-cell table:style-name="Table2.C2" office:value-type="string">
            <text:p text:style-name="P33">1248</text:p>
          </table:table-cell>
          <table:table-cell table:style-name="Table2.C2" office:value-type="string">
            <text:p text:style-name="P29">2840</text:p>
          </table:table-cell>
          <table:table-cell table:style-name="Table2.C2" office:value-type="string">
            <text:p text:style-name="P29">4066</text:p>
          </table:table-cell>
          <table:table-cell table:style-name="Table2.C2" office:value-type="string">
            <text:p text:style-name="P29">9166</text:p>
          </table:table-cell>
          <table:table-cell table:style-name="Table2.A3" office:value-type="string">
            <text:p text:style-name="P29">12684</text:p>
          </table:table-cell>
          <table:table-cell table:style-name="Table2.I3" office:value-type="string">
            <text:p text:style-name="P29">19688</text:p>
          </table:table-cell>
        </table:table-row>
        <table:table-row>
          <table:table-cell table:style-name="Table2.A3" office:value-type="string">
            <text:p text:style-name="P30">Predicted</text:p>
          </table:table-cell>
          <table:table-cell table:style-name="Table2.A3" office:value-type="string">
            <text:p text:style-name="P29">102</text:p>
          </table:table-cell>
          <table:table-cell table:style-name="Table2.C2" office:value-type="string">
            <text:p text:style-name="P29">230</text:p>
          </table:table-cell>
          <table:table-cell table:style-name="Table2.C2" office:value-type="string">
            <text:p text:style-name="P33">1248</text:p>
          </table:table-cell>
          <table:table-cell table:style-name="Table2.C2" office:value-type="string">
            <text:p text:style-name="P29">2808</text:p>
          </table:table-cell>
          <table:table-cell table:style-name="Table2.C2" office:value-type="string">
            <text:p text:style-name="P29">3979</text:p>
          </table:table-cell>
          <table:table-cell table:style-name="Table2.C2" office:value-type="string">
            <text:p text:style-name="P29">9194</text:p>
          </table:table-cell>
          <table:table-cell table:style-name="Table2.A3" office:value-type="string">
            <text:p text:style-name="P29">15918</text:p>
          </table:table-cell>
          <table:table-cell table:style-name="Table2.I3" office:value-type="string">
            <text:p text:style-name="P29">31200</text:p>
          </table:table-cell>
        </table:table-row>
        <table:table-row>
          <table:table-cell table:style-name="Table2.A3" office:value-type="string">
            <text:p text:style-name="P31">Spheres ADU</text:p>
          </table:table-cell>
          <table:table-cell table:style-name="Table2.A3" office:value-type="string">
            <text:p text:style-name="P29"/>
          </table:table-cell>
          <table:table-cell table:style-name="Table2.C2" office:value-type="string">
            <text:p text:style-name="P29"/>
          </table:table-cell>
          <table:table-cell table:style-name="Table2.C2" office:value-type="string">
            <text:p text:style-name="P35">10um</text:p>
            <text:p text:style-name="P35">250</text:p>
          </table:table-cell>
          <table:table-cell table:style-name="Table2.C2" office:value-type="string">
            <text:p text:style-name="P29"/>
          </table:table-cell>
          <table:table-cell table:style-name="Table2.C2" office:value-type="string">
            <text:p text:style-name="P29"/>
          </table:table-cell>
          <table:table-cell table:style-name="Table2.C2" office:value-type="string">
            <text:p text:style-name="P29"/>
          </table:table-cell>
          <table:table-cell table:style-name="Table2.A3" office:value-type="string">
            <text:p text:style-name="P29"/>
          </table:table-cell>
          <table:table-cell table:style-name="Table2.I3" office:value-type="string">
            <text:p text:style-name="P31">5248</text:p>
          </table:table-cell>
        </table:table-row>
      </table:table>
      <text:p text:style-name="P59"><draw:frame draw:style-name="fr3" draw:name="Image53" text:anchor-type="char" svg:x="-0.044cm" svg:y="0.515cm" svg:width="9.885cm" svg:height="3.819cm" draw:z-index="3"><draw:image xlink:href="Pictures/100000010000049A000001C7240401E7.png" xlink:type="simple" xlink:show="embed" xlink:actuate="onLoad" draw:mime-type="image/png"/></draw:frame>This gives <text:span text:style-name="T57">very </text:span>good agreement between 6μm and 38μm. 4μm maybe higher due to SRM2806 "correction" or because small particles scatter disproportionally more light. Large sizes may be lower because there are not as many of them as assumed or because they approach the slit width so transition from being proportional to area to being proportional to diameter instead.</text:p>
      <text:p text:style-name="P61">The 70um sphere result indicates should increase gain of circuit <text:span text:style-name="T58">x2</text:span>. <text:span text:style-name="T59">DONE see R2-20 v</text:span><text:span text:style-name="T60">ariant</text:span><text:span text:style-name="T59">.</text:span></text:p>
      <text:p text:style-name="P60"/>
      <text:p text:style-name="P5"/>
      <text:h text:style-name="P84" text:outline-level="1">Annex E</text:h>
      <text:p text:style-name="P6"><text:span text:style-name="T8">R</text:span>equires counting at least <text:span text:style-name="T28">6 sizes</text:span> from table A.1 {2,3,4,5,6,7,8,9,10}</text:p>
      <text:p text:style-name="P7"><draw:frame draw:style-name="fr2" draw:name="Image2" text:anchor-type="char" svg:width="17cm" svg:height="8.444cm" draw:z-index="1"><draw:image xlink:href="Pictures/100000010000030B00000183C57C38CF.png" xlink:type="simple" xlink:show="embed" xlink:actuate="onLoad" draw:mime-type="image/png"/></draw:frame>Specifies 3 bottles of 1.0mg/l RM8632</text:p>
      <text:p text:style-name="P7">5x10ml from each one</text:p>
      <text:p text:style-name="P7">C<text:span text:style-name="T9">V </text:span><text:span text:style-name="T11">within limits of table C.2.</text:span></text:p>
      <text:p text:style-name="P7"><draw:frame draw:style-name="fr1" draw:name="Image1" text:anchor-type="char" svg:width="17cm" svg:height="7.205cm" draw:z-index="0"><draw:image xlink:href="Pictures/100000010000030100000146DC0E8137.png" xlink:type="simple" xlink:show="embed" xlink:actuate="onLoad" draw:mime-type="image/png"/></draw:frame></text:p>
      <text:p text:style-name="P7">→ requires <text:span text:style-name="T24">obtaining </text:span>raw particle counts <text:span text:style-name="T24">(by calculation potentially?)</text:span></text:p>
      <text:p text:style-name="P7"/>
      <text:p text:style-name="P7"/>
      <text:p text:style-name="P12">2025-02-01</text:p>
      <text:p text:style-name="P13">Implemented pulse simulation in hardware using MXO5 arb programmed with random gaussian pulses. <text:span text:style-name="T35">Works but would be better recording a live signal or just filling the histogram with a simulated distribution.</text:span></text:p>
      <text:p text:style-name="P13"/>
      <text:p text:style-name="P14">2025-02-02</text:p>
      <text:p text:style-name="P15">Focus on updating codebase for fuller-featured reference counter.</text:p>
      <text:p text:style-name="P15">Can fix-up other models like CML4, CML3 to use these features in the future.</text:p>
      <text:p text:style-name="P15">For example make particle counting 32 channel, calibration from a known distribution.</text:p>
      <text:p text:style-name="P15">Coding systems and counts display take counts from particular channels.</text:p>
      <text:p text:style-name="P15">The channel boundaries can be integer micron sizes since that is what </text:p>
      <text:p text:style-name="P15">GOST that use the 10um channel​​​​​​​</text:p>
      <text:p text:style-name="P66"/>
      <text:p text:style-name="P66">2025-02-14</text:p>
      <text:list text:style-name="L5">
        <text:list-item>
          <text:p text:style-name="P98">Test cycle to perform N portions and integrate results at the end</text:p>
        </text:list-item>
        <text:list-item>
          <text:p text:style-name="P99">Each portion is individually analysed based on its volume and logged and reported.</text:p>
        </text:list-item>
        <text:list-item>
          <text:p text:style-name="P99">Each portion histogram added to total histogram. Each portion sample volume added to total accumulated</text:p>
        </text:list-item>
        <text:list-item>
          <text:p text:style-name="P100">After last histogram is analysed then need to perform analysis on total.</text:p>
        </text:list-item>
        <text:list-item>
          <text:p text:style-name="P99"/>
        </text:list-item>
      </text:list>
      <text:p text:style-name="P68"/>
      <text:h text:style-name="P84" text:outline-level="1">Migration</text:h>
      <text:h text:style-name="Heading_20_2" text:outline-level="2">Threshold Migration</text:h>
      <text:p text:style-name="P69">Auto-interpolate extended thresholds when install firmware, if these are empty.</text:p>
      <text:p text:style-name="P69">Extended versions of <text:span text:style-name="T67">cardinal sizes </text:span>4,6,14,21,25,38,50,70 will be identical to existing ones. Intermediate values will be reasonably good guesses and only matter for 10um for UI.</text:p>
      <text:p text:style-name="P70">Existing LPA-View will still see old thresholds.</text:p>
      <text:p text:style-name="P71">Could run in parallel?</text:p>
      <text:p text:style-name="P72">New cardinal sizes extended thresholds could also be written to legacy ones by new LPA-View calibrations.</text:p>
      <text:p text:style-name="P72">Allows for gradual migration of UI etc to use new counts</text:p>
      <text:h text:style-name="Heading_20_1" text:outline-level="1">Counts</text:h>
      <text:p text:style-name="P71">Existing CML-View will see old counts</text:p>
      <text:p text:style-name="P71"/>
      <text:p text:style-name="P71">Need to ensure not used with new firmware?</text:p>
      <text:p text:style-name="P71"/>
      <text:h text:style-name="Heading_20_1" text:outline-level="1">Logging</text:h>
      <text:p text:style-name="P70"/>
      <text:h text:style-name="P84" text:outline-level="1"><text:span text:style-name="T71">Minimal</text:span> Implementation for NAVAIR Prototypes</text:h>
      <text:p text:style-name="P73">Have a hard deadline of May 16<text:span text:style-name="T62">th</text:span> 2025 to ship these.</text:p>
      <text:p text:style-name="P73">Need to produce sufficiently accurate results with 3.5mg/l RM8631 and also pass 11171 Annex E (RM8632a) limits.</text:p>
      <text:list text:style-name="L6">
        <text:list-item>
          <text:p text:style-name="P101">Use normal "auto-adjust" method to calibrate to a <text:span text:style-name="T75">manually entered </text:span>distribution <text:span text:style-name="T75">measured by reference counter. </text:span>Distribution can be measured by a counter then manually typed into reference distribution grid. <text:span text:style-name="T68">Just need values for the </text:span><text:span text:style-name="T76">9 </text:span><text:span text:style-name="T68">measured sizes.</text:span></text:p>
        </text:list-item>
        <text:list-item>
          <text:p text:style-name="P102">Don't implement 32-channel calibration / counting for the NAVAIR units</text:p>
        </text:list-item>
        <text:list-item>
          <text:p text:style-name="P102">Add coarse test dust to MTD to produce more large particles to calibrate to <text:span text:style-name="T76">(need to verify method)</text:span>.</text:p>
        </text:list-item>
        <text:list-item>
          <text:p text:style-name="P103">Check printouts for NAVAIR since these will be used extensively</text:p>
        </text:list-item>
        <text:list-item>
          <text:p text:style-name="P104">On-screen history / <text:span text:style-name="T69">recall </text:span>needs to work</text:p>
        </text:list-item>
      </text:list>
      <text:h text:style-name="Heading_20_1" text:outline-level="1">What to do for 10μm threshold</text:h>
      <text:list text:style-name="L7">
        <text:list-item>
          <text:p text:style-name="P105">First attempt at navair standard interpolated the 10μm counts</text:p>
        </text:list-item>
        <text:list-item>
          <text:p text:style-name="P106">Need to at least interpolate the threshold instead and calculate + store. <text:span text:style-name="T72">Can use threshold32[6] </text:span><text:span text:style-name="T73">to store </text:span><text:span text:style-name="T72">this (the new threshold for 10μm)</text:span></text:p>
        </text:list-item>
        <text:list-item>
          <text:p text:style-name="P107">Then need to store the count too. We already are calculating raw count [6].</text:p>
        </text:list-item>
        <text:list-item>
          <text:p text:style-name="P108">detect calibration event and write an interpolated 10μm extended threshold to [6].</text:p>
        </text:list-item>
      </text:list>
      <text:h text:style-name="Heading_20_1" text:outline-level="1">Compatibility</text:h>
      <text:p text:style-name="P74">Make sure test cycle is fit for this model</text:p>
      <text:list text:style-name="L8">
        <text:list-item>
          <text:p text:style-name="P109">30ml/min <text:span text:style-name="T70">for all modes </text:span></text:p>
        </text:list-item>
        <text:list-item>
          <text:p text:style-name="P110">Single portion mode only <text:span text:style-name="T74">except in diagnostic mode</text:span></text:p>
        </text:list-item>
      </text:list>
      <text:p text:style-name="P75"/>
      <text:h text:style-name="P84" text:outline-level="1">2025-05-10 <text:span text:style-name="T77">Calibration Plan 12 Samples</text:span></text:h>
      <text:p text:style-name="P76">D2 now seem to be requiring sphere calibration. Were hoping to use coarse test dust however there are still very few particles of the larger sizes.</text:p>
      <text:p text:style-name="P77">So need to calibrate to a distribution for 4-21, then spheres for 38, 50, 70.</text:p>
      <text:p text:style-name="P78">Want to be able to update the <text:span text:style-name="T78">program-wide </text:span>distribution from a <text:span text:style-name="T79">reference counter </text:span>measurement.</text:p>
      <text:p text:style-name="P79">Can then calibrate attached LPA3 units to the measured distribution for 4,6,14,21,25μm sizes.</text:p>
      <text:p text:style-name="P80">CHECK HAVE CORRECT FLOW CURVE SETTING (0)</text:p>
      <text:h text:style-name="Heading_20_1" text:outline-level="1">Possible Workflow</text:h>
      <text:list text:style-name="L9">
        <text:list-item>
          <text:p text:style-name="P112">Load newest snapshot of software onto a calibration bench computer in own NAVAIR folder</text:p>
        </text:list-item>
        <text:list-item>
          <text:p text:style-name="P112">Also release snapshot of firmware</text:p>
        </text:list-item>
      </text:list>
      <text:p text:style-name="P81">For each unit</text:p>
      <text:list text:continue-numbering="true" text:style-name="L9">
        <text:list-item>
          <text:p text:style-name="P112">Update firmware</text:p>
        </text:list-item>
        <text:list-item>
          <text:p text:style-name="P112">Initialise system settings. Enter serial number.</text:p>
        </text:list-item>
        <text:list-item>
          <text:p text:style-name="P112">Flush unit <text:span text:style-name="T80">with bottle sampler unless done already</text:span></text:p>
        </text:list-item>
        <text:list-item>
          <text:p text:style-name="P112">Perform noise check to set initial LED level</text:p>
        </text:list-item>
        <text:list-item>
          <text:p text:style-name="P113">Calibration run on dosed rig to 6mgl MTD <text:span text:style-name="T81">assumed distribution </text:span><text:span text:style-name="T82">(until reference counter ready)</text:span></text:p>
        </text:list-item>
        <text:list-item>
          <text:p text:style-name="P114">Manually set 38, 50, 70 μm thresholds to fixed values TBD</text:p>
        </text:list-item>
        <text:list-item>
          <text:p text:style-name="P114">Export calibration data to spreadsheet</text:p>
        </text:list-item>
        <text:list-item>
          <text:p text:style-name="P114"/>
        </text:list-item>
      </text:list>
      <text:p text:style-name="P82">*</text:p>
      <text:p text:style-name="P7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Black" svg:font-family="'Arial Black'" style:font-family-generic="swiss" style:font-pitch="variable"/>
    <style:font-face style:name="Calibri" svg:font-family="Calibri" style:font-family-generic="swiss" style:font-pitch="variable"/>
    <style:font-face style:name="Cascadia Mono" svg:font-family="'Cascadia Mono'" style:font-family-generic="roman" style:font-pitch="variable"/>
    <style:font-face style:name="Cascadia Mono1" svg:font-family="'Cascadia Mono'"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Calibri" fo:font-family="Calibri" style:font-family-generic="swiss" style:font-pitch="variable" officeooo:rsid="00536a41"/>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loext:graphic-properties draw:fill="solid" draw:fill-color="#d3d3d3" draw:opacity="100%"/>
      <style:paragraph-properties fo:margin-top="0.423cm" fo:margin-bottom="0.212cm" style:contextual-spacing="false" fo:background-color="#d3d3d3"/>
      <style:text-properties style:font-name="Arial Black" fo:font-family="'Arial Black'" style:font-family-generic="swiss" style:font-pitch="variable" fo:font-size="18pt" fo:font-weight="bold" officeooo:rsid="0018ea4e"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margin-top="0cm" fo:margin-bottom="0cm" style:contextual-spacing="false" fo:text-indent="0cm" style:auto-text-indent="false"/>
    </style:style>
    <style:style style:name="Table_20_Heading" style:display-name="Table Heading" style:family="paragraph" style:parent-style-name="Table_20_Contents" style:class="extra">
      <style:paragraph-properties fo:margin-left="0.076cm" fo:margin-right="0.076cm" fo:margin-top="0cm" fo:margin-bottom="0cm" style:contextual-spacing="false"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19">
      <number:number number:decimal-places="3" number:min-decimal-places="3" number:min-integer-digits="1"/>
    </number:number-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18T09:25:37.616000000</meta:creation-date>
    <meta:editing-duration>P6DT14H2M48S</meta:editing-duration>
    <meta:editing-cycles>133</meta:editing-cycles>
    <meta:generator>LibreOffice/7.6.4.1$Windows_X86_64 LibreOffice_project/e19e193f88cd6c0525a17fb7a176ed8e6a3e2aa1</meta:generator>
    <dc:title>Project</dc:title>
    <dc:date>2025-05-17T10:56:25.213000000</dc:date>
    <meta:document-statistic meta:table-count="2" meta:image-count="4" meta:object-count="0" meta:page-count="12" meta:paragraph-count="208" meta:word-count="2215" meta:character-count="13292" meta:non-whitespace-character-count="11302"/>
    <meta:template xlink:type="simple" xlink:actuate="onRequest" xlink:title="Project" xlink:href="file:///C:/Users/jd/AppData/Roaming/LibreOffice/4/user/template/Project.ott" meta:date="2025-01-18T09:25:37.212000000"/>
  </office:meta>
</office:document-meta>
</file>