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1B0000000A2370564D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52cm"/>
    </style:style>
    <style:style style:name="co2" style:family="table-column">
      <style:table-column-properties fo:break-before="auto" style:column-width="3.551cm"/>
    </style:style>
    <style:style style:name="co3" style:family="table-column">
      <style:table-column-properties fo:break-before="auto" style:column-width="15.16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72cm"/>
    </style:style>
    <style:style style:name="co6" style:family="table-column">
      <style:table-column-properties fo:break-before="auto" style:column-width="3.307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4.494cm"/>
    </style:style>
    <style:style style:name="co9" style:family="table-column">
      <style:table-column-properties fo:break-before="auto" style:column-width="3.362cm"/>
    </style:style>
    <style:style style:name="co10" style:family="table-column">
      <style:table-column-properties fo:break-before="auto" style:column-width="5.413cm"/>
    </style:style>
    <style:style style:name="co11" style:family="table-column">
      <style:table-column-properties fo:break-before="auto" style:column-width="5.932cm"/>
    </style:style>
    <style:style style:name="co12" style:family="table-column">
      <style:table-column-properties fo:break-before="auto" style:column-width="1.277cm"/>
    </style:style>
    <style:style style:name="co13" style:family="table-column">
      <style:table-column-properties fo:break-before="auto" style:column-width="2.886cm"/>
    </style:style>
    <style:style style:name="co14" style:family="table-column">
      <style:table-column-properties fo:break-before="auto" style:column-width="4.517cm"/>
    </style:style>
    <style:style style:name="co15" style:family="table-column">
      <style:table-column-properties fo:break-before="auto" style:column-width="3.08cm"/>
    </style:style>
    <style:style style:name="co16" style:family="table-column">
      <style:table-column-properties fo:break-before="auto" style:column-width="1.062cm"/>
    </style:style>
    <style:style style:name="co17" style:family="table-column">
      <style:table-column-properties fo:break-before="auto" style:column-width="1.924cm"/>
    </style:style>
    <style:style style:name="co18" style:family="table-column">
      <style:table-column-properties fo:break-before="auto" style:column-width="5.017cm"/>
    </style:style>
    <style:style style:name="co19" style:family="table-column">
      <style:table-column-properties fo:break-before="auto" style:column-width="2.11cm"/>
    </style:style>
    <style:style style:name="ro1" style:family="table-row">
      <style:table-row-properties style:row-height="0.78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69cm" fo:break-before="auto" style:use-optimal-row-height="false"/>
    </style:style>
    <style:style style:name="ro4" style:family="table-row">
      <style:table-row-properties style:row-height="0.778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89cm" fo:break-before="auto" style:use-optimal-row-height="false"/>
    </style:style>
    <style:style style:name="ro7" style:family="table-row">
      <style:table-row-properties style:row-height="1.868cm" fo:break-before="auto" style:use-optimal-row-height="false"/>
    </style:style>
    <style:style style:name="ro8" style:family="table-row">
      <style:table-row-properties style:row-height="1.362cm" fo:break-before="auto" style:use-optimal-row-height="true"/>
    </style:style>
    <style:style style:name="ro9" style:family="table-row">
      <style:table-row-properties style:row-height="0.637cm" fo:break-before="auto" style:use-optimal-row-height="false"/>
    </style:style>
    <style:style style:name="ro10" style:family="table-row">
      <style:table-row-properties style:row-height="0.674cm" fo:break-before="auto" style:use-optimal-row-height="false"/>
    </style:style>
    <style:style style:name="ro11" style:family="table-row">
      <style:table-row-properties style:row-height="0.601cm" fo:break-before="auto" style:use-optimal-row-height="false"/>
    </style:style>
    <style:style style:name="ro12" style:family="table-row">
      <style:table-row-properties style:row-height="1.312cm" fo:break-before="auto" style:use-optimal-row-height="true"/>
    </style:style>
    <style:style style:name="ro13" style:family="table-row">
      <style:table-row-properties style:row-height="1.723cm" fo:break-before="auto" style:use-optimal-row-height="true"/>
    </style:style>
    <style:style style:name="ro14" style:family="table-row">
      <style:table-row-properties style:row-height="0.928cm" fo:break-before="auto" style:use-optimal-row-height="true"/>
    </style:style>
    <style:style style:name="ro15" style:family="table-row">
      <style:table-row-properties style:row-height="0.517cm" fo:break-before="auto" style:use-optimal-row-height="true"/>
    </style:style>
    <style:style style:name="ro16" style:family="table-row">
      <style:table-row-properties style:row-height="0.557cm" fo:break-before="auto" style:use-optimal-row-height="true"/>
    </style:style>
    <style:style style:name="ro17" style:family="table-row">
      <style:table-row-properties style:row-height="3.276cm" fo:break-before="auto" style:use-optimal-row-height="true"/>
    </style:style>
    <style:style style:name="ro18" style:family="table-row">
      <style:table-row-properties style:row-height="1.67cm" fo:break-before="auto" style:use-optimal-row-height="true"/>
    </style:style>
    <style:style style:name="ro19" style:family="table-row">
      <style:table-row-properties style:row-height="1.025cm" fo:break-before="auto" style:use-optimal-row-height="true"/>
    </style:style>
    <style:style style:name="ro20" style:family="table-row">
      <style:table-row-properties style:row-height="0.6cm" fo:break-before="auto" style:use-optimal-row-height="true"/>
    </style:style>
    <style:style style:name="ro21" style:family="table-row">
      <style:table-row-properties style:row-height="1.579cm" fo:break-before="auto" style:use-optimal-row-height="false"/>
    </style:style>
    <style:style style:name="ro22" style:family="table-row">
      <style:table-row-properties style:row-height="1.432cm" fo:break-before="auto" style:use-optimal-row-height="true"/>
    </style:style>
    <style:style style:name="ro23" style:family="table-row">
      <style:table-row-properties style:row-height="1.192cm" fo:break-before="auto" style:use-optimal-row-height="false"/>
    </style:style>
    <style:style style:name="ro24" style:family="table-row">
      <style:table-row-properties style:row-height="0.93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number-style style:name="N80">
      <number:scientific-number number:decimal-places="2" number:min-decimal-places="2" number:min-integer-digits="1" number:min-exponent-digits="3" number:exponent-interval="1" number:forced-exponent-sign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/>
    <style:style style:name="ce39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3d3d3" fo:wrap-option="wrap"/>
      <style:text-properties fo:font-weight="bold" style:font-weight-asian="bold" style:font-weight-complex="bold"/>
    </style:style>
    <style:style style:name="ce85" style:family="table-cell" style:parent-style-name="Default">
      <style:table-cell-properties fo:wrap-option="wrap" style:vertical-align="middle"/>
    </style:style>
    <style:style style:name="ce86" style:family="table-cell" style:parent-style-name="Default">
      <style:table-cell-properties fo:wrap-option="wrap"/>
    </style:style>
    <style:style style:name="ce87" style:family="table-cell" style:parent-style-name="Default">
      <style:table-cell-properties fo:background-color="#d3d3d3"/>
      <style:text-properties fo:font-weight="bold" style:font-weight-asian="bold" style:font-weight-complex="bold"/>
    </style:style>
    <style:style style:name="ce88" style:family="table-cell" style:parent-style-name="Default">
      <style:table-cell-properties style:vertical-align="middle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style:font-name="Arial Black" fo:font-size="18pt" style:font-size-asian="18pt" style:font-size-complex="18pt"/>
    </style:style>
    <style:style style:name="ce33" style:family="table-cell" style:parent-style-name="Default">
      <style:text-properties style:font-name="Calibri"/>
    </style:style>
    <style:style style:name="ce34" style:family="table-cell" style:parent-style-name="Default">
      <style:text-properties style:font-name="Calibri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49"/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libri"/>
    </style:style>
    <style:style style:name="ce38" style:family="table-cell" style:parent-style-name="Default">
      <style:table-cell-properties fo:border-bottom="none" fo:background-color="transparent" fo:border-left="0.74pt solid #000000" fo:border-right="0.74pt solid #000000" fo:border-top="0.74pt solid #000000"/>
      <style:text-properties style:font-name="Calibri"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transparent" fo:border-left="0.74pt solid #000000" fo:border-right="0.74pt solid #000000" fo:border-top="none"/>
      <style:text-properties style:font-name="Calibri" fo:font-weight="bold" style:font-weight-asian="bold" style:font-weight-complex="bold"/>
    </style:style>
    <style:style style:name="ce41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style:font-name="Calibri" fo:font-weight="bold" style:font-weight-asian="bold" style:font-weight-complex="bold"/>
    </style:style>
    <style:style style:name="ce42" style:family="table-cell" style:parent-style-name="Default" style:data-style-name="N1">
      <style:text-properties style:font-name="Calibri"/>
    </style:style>
    <style:style style:name="ce44" style:family="table-cell" style:parent-style-name="Default" style:data-style-name="N11">
      <style:text-properties style:font-name="Calibri"/>
    </style:style>
    <style:style style:name="ce45" style:family="table-cell" style:parent-style-name="Default" style:data-style-name="N11">
      <style:text-properties style:font-name="Calibri"/>
      <style:map style:condition="cell-content()&lt;0.03" style:apply-style-name="Good" style:base-cell-address="'Annex A Preliminary Check'.C38"/>
      <style:map style:condition="cell-content()&gt;=0.03" style:apply-style-name="Bad" style:base-cell-address="'Annex A Preliminary Check'.C38"/>
    </style:style>
    <style:style style:name="ce94" style:family="table-cell" style:parent-style-name="Default" style:data-style-name="N49">
      <style:text-properties style:font-name="Calibri" fo:font-weight="bold" style:font-weight-asian="bold" style:font-weight-complex="bold"/>
    </style:style>
    <style:style style:name="ce46" style:family="table-cell" style:parent-style-name="Default" style:data-style-name="N49">
      <style:table-cell-properties style:text-align-source="fix" style:repeat-content="false"/>
      <style:paragraph-properties fo:text-align="end" fo:margin-left="0cm"/>
      <style:text-properties style:font-name="Calibri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libri"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libri" fo:font-weight="normal" style:font-weight-asian="normal" style:font-weight-complex="normal"/>
    </style:style>
    <style:style style:name="ce98" style:family="table-cell" style:parent-style-name="Default" style:data-style-name="N158">
      <style:text-properties style:font-name="Calibri" fo:font-weight="normal" style:font-weight-asian="normal" style:font-weight-complex="normal"/>
    </style:style>
    <style:style style:name="ce99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00" style:family="table-cell" style:parent-style-name="Default" style:data-style-name="N157">
      <style:table-cell-properties fo:border-bottom="0.74pt solid #000000" fo:border-left="none" fo:border-right="none" fo:border-top="0.74pt solid #000000"/>
    </style:style>
    <style:style style:name="ce77" style:family="table-cell" style:parent-style-name="Default">
      <style:text-properties style:font-name="Calibri"/>
      <style:map style:condition="cell-content()=&quot;&lt;3% = PASS&quot;" style:apply-style-name="Good" style:base-cell-address="'Annex A Preliminary Check'.D38"/>
      <style:map style:condition="cell-content()!=&quot;&lt;3% = PASS&quot;" style:apply-style-name="Bad" style:base-cell-address="'Annex A Preliminary Check'.D38"/>
    </style:style>
    <style:style style:name="ce103" style:family="table-cell" style:parent-style-name="Default" style:data-style-name="N49">
      <style:text-properties style:font-name="Calibri"/>
    </style:style>
    <style:style style:name="ce80" style:family="table-cell" style:parent-style-name="Default">
      <style:table-cell-properties fo:border-bottom="0.74pt solid #000000" fo:border-left="none" fo:border-right="none" fo:border-top="0.74pt solid #000000"/>
      <style:text-properties style:font-name="Calibri" fo:font-weight="normal" style:font-weight-asian="normal" style:font-weight-complex="normal"/>
    </style:style>
    <style:style style:name="ce81" style:family="table-cell" style:parent-style-name="Default">
      <style:table-cell-properties fo:border-bottom="0.74pt solid #000000" fo:border-left="none" fo:border-right="none" fo:border-top="0.74pt solid #000000"/>
      <style:text-properties style:font-name="Calibri" fo:font-weight="bold" style:font-weight-asian="bold" style:font-weight-complex="bold"/>
    </style:style>
    <style:style style:name="ce82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Calibri"/>
    </style:style>
    <style:style style:name="ce83" style:family="table-cell" style:parent-style-name="Default" style:data-style-name="N2">
      <style:table-cell-properties fo:border-bottom="0.74pt solid #000000" fo:background-color="#ccf4c6" style:text-align-source="fix" style:repeat-content="false" fo:border-left="none" fo:border-right="none" fo:border-top="0.74pt solid #000000"/>
      <style:paragraph-properties fo:text-align="end" fo:margin-left="0cm"/>
      <style:text-properties style:font-name="Calibri" fo:font-weight="normal" style:font-weight-asian="normal" style:font-weight-complex="normal"/>
    </style:style>
    <style:style style:name="ce84" style:family="table-cell" style:parent-style-name="Default" style:data-style-name="N11">
      <style:table-cell-properties fo:background-color="#ccf4c6" style:text-align-source="fix" style:repeat-content="false"/>
      <style:paragraph-properties fo:text-align="end" fo:margin-left="0cm"/>
      <style:text-properties style:font-name="Calibri"/>
    </style:style>
    <style:style style:name="ce148" style:family="table-cell" style:parent-style-name="Default" style:data-style-name="N0">
      <style:table-cell-properties style:cell-protect="none" style:print-content="true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cell-protect="none" style:print-content="true"/>
    </style:style>
    <style:style style:name="ce14" style:family="table-cell" style:parent-style-name="Default">
      <style:table-cell-properties style:cell-protect="none" style:print-content="true"/>
      <style:text-properties fo:font-weight="bold" style:font-weight-asian="bold" style:font-weight-complex="bold"/>
    </style:style>
    <style:style style:name="ce151" style:family="table-cell" style:parent-style-name="Default" style:data-style-name="N1">
      <style:table-cell-properties style:cell-protect="none" style:print-content="true"/>
      <style:text-properties fo:font-weight="bold" style:font-weight-asian="bold" style:font-weight-complex="bold"/>
    </style:style>
    <style:style style:name="ce11" style:family="table-cell" style:parent-style-name="Default">
      <style:table-cell-properties style:cell-protect="none" style:print-content="true"/>
    </style:style>
    <style:style style:name="ce109" style:family="table-cell" style:parent-style-name="Default">
      <style:table-cell-properties fo:background-color="#e0ffff" fo:wrap-option="wrap" style:vertical-align="middle"/>
    </style:style>
    <style:style style:name="ce127" style:family="table-cell" style:parent-style-name="Default" style:data-style-name="N49">
      <style:text-properties fo:font-weight="bold" style:font-weight-asian="bold" style:font-weight-complex="bold"/>
    </style:style>
    <style:style style:name="ce32" style:family="table-cell" style:parent-style-name="Default" style:data-style-name="N158"/>
    <style:style style:name="ce53" style:family="table-cell" style:parent-style-name="Default" style:data-style-name="N2"/>
    <style:style style:name="ce130" style:family="table-cell" style:parent-style-name="Default" style:data-style-name="N2">
      <style:text-properties fo:font-weight="bold" style:font-weight-asian="bold" style:font-weight-complex="bold"/>
    </style:style>
    <style:style style:name="ce131" style:family="table-cell" style:parent-style-name="Default" style:data-style-name="N81"/>
    <style:style style:name="ce48" style:family="table-cell" style:parent-style-name="Default">
      <style:table-cell-properties fo:border-bottom="none" fo:background-color="#e0ffff" style:text-align-source="fix" style:repeat-content="false" fo:border-left="none" fo:border-right="none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e0ffff"/>
    </style:style>
    <style:style style:name="ce135" style:family="table-cell" style:parent-style-name="Default">
      <style:table-cell-properties fo:background-color="#e0ffff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0.74pt solid #000000" fo:background-color="#e0ffff" fo:border-left="none" fo:border-right="none" fo:border-top="none"/>
    </style:style>
    <style:style style:name="ce133" style:family="table-cell" style:parent-style-name="Default">
      <style:table-cell-properties fo:background-color="#e0ffff" style:vertical-align="middle"/>
    </style:style>
    <style:style style:name="ce58" style:family="table-cell" style:parent-style-name="Default" style:data-style-name="N157">
      <style:table-cell-properties fo:background-color="#e0ffff"/>
    </style:style>
    <style:style style:name="ce139" style:family="table-cell" style:parent-style-name="Default" style:data-style-name="N157">
      <style:table-cell-properties fo:background-color="#e0ffff"/>
      <style:text-properties fo:font-weight="normal" style:font-weight-asian="normal" style:font-weight-complex="normal"/>
    </style:style>
    <style:style style:name="ce60" style:family="table-cell" style:parent-style-name="Default" style:data-style-name="N157">
      <style:table-cell-properties fo:border-bottom="0.74pt solid #000000" fo:background-color="#e0ffff" fo:border-left="none" fo:border-right="none" fo:border-top="none"/>
    </style:style>
    <style:style style:name="ce61" style:family="table-cell" style:parent-style-name="Default" style:data-style-name="N158">
      <style:table-cell-properties fo:background-color="#e0ffff"/>
    </style:style>
    <style:style style:name="ce142" style:family="table-cell" style:parent-style-name="Default" style:data-style-name="N158">
      <style:table-cell-properties fo:background-color="#e0ffff"/>
      <style:text-properties fo:font-weight="normal" style:font-weight-asian="normal" style:font-weight-complex="normal"/>
    </style:style>
    <style:style style:name="ce63" style:family="table-cell" style:parent-style-name="Default" style:data-style-name="N158">
      <style:table-cell-properties fo:border-bottom="0.74pt solid #000000" fo:background-color="#e0ffff" fo:border-left="none" fo:border-right="none" fo:border-top="none"/>
    </style:style>
    <style:style style:name="ce64" style:family="table-cell" style:parent-style-name="Default" style:data-style-name="N1">
      <style:table-cell-properties fo:background-color="#e0ffff"/>
    </style:style>
    <style:style style:name="ce145" style:family="table-cell" style:parent-style-name="Default" style:data-style-name="N1">
      <style:table-cell-properties fo:background-color="#e0ffff"/>
      <style:text-properties fo:font-weight="normal" style:font-weight-asian="normal" style:font-weight-complex="normal"/>
    </style:style>
    <style:style style:name="ce66" style:family="table-cell" style:parent-style-name="Default" style:data-style-name="N1">
      <style:table-cell-properties fo:border-bottom="0.74pt solid #000000" fo:background-color="#e0ffff" fo:border-left="none" fo:border-right="none" fo:border-top="none"/>
    </style:style>
    <style:style style:name="ce20" style:family="table-cell" style:parent-style-name="Default" style:data-style-name="N1"/>
    <style:style style:name="ce51" style:family="table-cell" style:parent-style-name="Default">
      <style:table-cell-properties fo:background-color="#e0ffff"/>
      <style:text-properties fo:font-weight="bold" style:font-weight-asian="bold" style:font-weight-complex="bold"/>
    </style:style>
    <style:style style:name="ce67" style:family="table-cell" style:parent-style-name="Default" style:data-style-name="N2">
      <style:table-cell-properties fo:background-color="#e0ffff"/>
    </style:style>
    <style:style style:name="ce153" style:family="table-cell" style:parent-style-name="Default" style:data-style-name="N2">
      <style:table-cell-properties fo:background-color="#e0ffff"/>
      <style:text-properties fo:font-weight="normal" style:font-weight-asian="normal" style:font-weight-complex="normal"/>
    </style:style>
    <style:style style:name="ce69" style:family="table-cell" style:parent-style-name="Default" style:data-style-name="N2">
      <style:table-cell-properties fo:border-bottom="0.74pt solid #000000" fo:background-color="#e0ffff" fo:border-left="none" fo:border-right="none" fo:border-top="none"/>
    </style:style>
    <style:style style:name="ce70" style:family="table-cell" style:parent-style-name="Default" style:data-style-name="N11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ackground-color="#e0ffff"/>
    </style:style>
    <style:style style:name="ce72" style:family="table-cell" style:parent-style-name="Default">
      <style:table-cell-properties fo:background-color="#e0ffff" style:text-align-source="fix" style:repeat-content="false"/>
      <style:paragraph-properties fo:text-align="start" fo:margin-left="0.706cm"/>
    </style:style>
    <style:style style:name="ce158" style:family="table-cell" style:parent-style-name="Default">
      <style:table-cell-properties fo:background-color="#e0ffff" style:text-align-source="fix" style:repeat-content="false"/>
      <style:paragraph-properties fo:text-align="start" fo:margin-left="0.706cm"/>
      <style:text-properties fo:font-weight="normal" style:font-weight-asian="normal" style:font-weight-complex="normal"/>
    </style:style>
    <style:style style:name="ce73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start" fo:margin-left="0.706cm"/>
    </style:style>
    <style:style style:name="ce74" style:family="table-cell" style:parent-style-name="Default">
      <style:table-cell-properties fo:background-color="#e0ffff" style:text-align-source="fix" style:repeat-content="false"/>
      <style:paragraph-properties fo:text-align="start" fo:margin-left="1.411cm"/>
    </style:style>
    <style:style style:name="ce161" style:family="table-cell" style:parent-style-name="Default">
      <style:table-cell-properties fo:background-color="#e0ffff" style:text-align-source="fix" style:repeat-content="false"/>
      <style:paragraph-properties fo:text-align="start" fo:margin-left="1.411cm"/>
      <style:text-properties fo:font-weight="normal" style:font-weight-asian="normal" style:font-weight-complex="normal"/>
    </style:style>
    <style:style style:name="ce162" style:family="table-cell" style:parent-style-name="Default">
      <style:text-properties fo:color="#c9211e" fo:font-size="32pt" fo:font-weight="bold" style:font-size-asian="32pt" style:font-weight-asian="bold" style:font-size-complex="32pt" style:font-weight-complex="bold"/>
    </style:style>
    <style:style style:name="ce115" style:family="table-cell" style:parent-style-name="Default">
      <style:table-cell-properties fo:border-bottom="none" fo:border-left="0.74pt solid #000000" fo:border-right="none" fo:border-top="0.74pt solid #000000"/>
    </style:style>
    <style:style style:name="ce164" style:family="table-cell" style:parent-style-name="Default">
      <style:table-cell-properties fo:border-bottom="none" fo:border-left="0.74pt solid #000000" fo:border-right="none" fo:border-top="none"/>
    </style:style>
    <style:style style:name="ce165" style:family="table-cell" style:parent-style-name="Default">
      <style:table-cell-properties fo:border-bottom="0.74pt solid #000000" fo:border-left="0.74pt solid #000000" fo:border-right="none" fo:border-top="none"/>
    </style:style>
    <style:style style:name="ce166" style:family="table-cell" style:parent-style-name="Default"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order-bottom="none" fo:border-left="none" fo:border-right="none" fo:border-top="0.74pt solid #000000"/>
    </style:style>
    <style:style style:name="ce91" style:family="table-cell" style:parent-style-name="Default">
      <style:table-cell-properties fo:border-bottom="0.74pt solid #000000" fo:border-left="none" fo:border-right="none" fo:border-top="none"/>
    </style:style>
    <style:style style:name="ce16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1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</style:style>
    <style:style style:name="ce170" style:family="table-cell" style:parent-style-name="Default" style:data-style-name="N49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171" style:family="table-cell" style:parent-style-name="Default" style:data-style-name="N49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</style:style>
    <style:style style:name="ce17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173" style:family="table-cell" style:parent-style-name="Default">
      <style:table-cell-properties fo:border-bottom="none" fo:border-left="none" fo:border-right="0.74pt solid #000000" fo:border-top="none"/>
    </style:style>
    <style:style style:name="ce174" style:family="table-cell" style:parent-style-name="Default">
      <style:table-cell-properties fo:border-bottom="0.74pt solid #000000" fo:background-color="#ccf4c6" fo:border-left="none" fo:border-right="0.74pt solid #000000" fo:border-top="none"/>
    </style:style>
    <style:style style:name="ce175" style:family="table-cell" style:parent-style-name="Default" style:data-style-name="N1">
      <style:text-properties fo:font-weight="normal" style:font-weight-asian="normal" style:font-weight-complex="normal"/>
    </style:style>
    <style:style style:name="ce75" style:family="table-cell" style:parent-style-name="Default" style:data-style-name="N1">
      <style:text-properties fo:font-weight="bold" style:font-weight-asian="bold" style:font-weight-complex="bold"/>
    </style:style>
    <style:style style:name="ce76" style:family="table-cell" style:parent-style-name="Default" style:data-style-name="N157"/>
    <style:style style:name="ce178" style:family="table-cell" style:parent-style-name="Default" style:data-style-name="N157">
      <style:text-properties fo:font-weight="normal" style:font-weight-asian="normal" style:font-weight-complex="normal"/>
    </style:style>
    <style:style style:name="ce179" style:family="table-cell" style:parent-style-name="Default">
      <style:text-properties style:font-name="Calibri" fo:font-weight="bold" style:font-weight-asian="bold" style:font-weight-complex="bold"/>
    </style:style>
    <style:style style:name="ce180" style:family="table-cell" style:parent-style-name="Default" style:data-style-name="N49">
      <style:table-cell-properties style:text-align-source="fix" style:repeat-content="false"/>
      <style:paragraph-properties fo:text-align="start" fo:margin-left="0cm"/>
      <style:text-properties style:font-name="Calibri" fo:font-weight="bold" style:font-weight-asian="bold" style:font-weight-complex="bold"/>
    </style:style>
    <style:style style:name="ce181" style:family="table-cell" style:parent-style-name="Default" style:data-style-name="N49">
      <style:table-cell-properties style:text-align-source="fix" style:repeat-content="false"/>
      <style:paragraph-properties fo:text-align="start" fo:margin-left="0cm"/>
      <style:text-properties style:font-name="Calibri"/>
    </style:style>
    <style:style style:name="ce1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weight="bold" style:font-weight-asian="bold" style:font-weight-complex="bold"/>
    </style:style>
    <style:style style:name="ce18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5" style:family="table-cell" style:parent-style-name="Default" style:data-style-name="N158">
      <style:table-cell-properties style:text-align-source="fix" style:repeat-content="false"/>
      <style:paragraph-properties fo:text-align="start" fo:margin-left="0cm"/>
    </style:style>
    <style:style style:name="ce186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8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30" style:family="table-cell" style:parent-style-name="Default" style:data-style-name="N49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1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32pt" style:font-size-asian="32pt" style:font-size-complex="32pt"/>
    </style:style>
    <style:style style:name="ce19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cm"/>
    </style:style>
    <style:style style:name="ce194" style:family="table-cell" style:parent-style-name="Default" style:data-style-name="N0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195" style:family="table-cell" style:parent-style-name="Default" style:data-style-name="N49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19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197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/>
      <style:paragraph-properties fo:text-align="end" fo:margin-left="0cm"/>
      <style:text-properties style:text-outline="false" style:text-line-through-style="none" style:text-line-through-type="none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 style:data-style-name="N1">
      <style:table-cell-properties fo:border="none"/>
    </style:style>
    <style:style style:name="ce19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20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201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20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 style:text-overline-style="solid" style:text-overline-width="auto" style:text-overline-color="font-color"/>
    </style:style>
    <style:style style:name="ce203" style:family="table-cell" style:parent-style-name="Default" style:data-style-name="N157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4" style:family="table-cell" style:parent-style-name="Default" style:data-style-name="N157">
      <style:text-properties fo:font-weight="bold" style:font-weight-asian="bold" style:font-weight-complex="bold"/>
    </style:style>
    <style:style style:name="ce205" style:family="table-cell" style:parent-style-name="Default">
      <style:text-properties fo:color="#fc5c00" fo:font-weight="bold" style:font-weight-asian="bold" style:font-weight-complex="bold"/>
    </style:style>
    <style:style style:name="ce206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'6 - B1'.H9"/>
    </style:style>
    <style:style style:name="ce208" style:family="table-cell" style:parent-style-name="Default">
      <style:map style:condition="cell-content()&gt;1000" style:apply-style-name="Good" style:base-cell-address="'6 - B1'.H9"/>
    </style:style>
    <style:style style:name="ce118" style:family="table-cell" style:parent-style-name="Default">
      <style:table-cell-properties fo:border-bottom="none" fo:border-left="none" fo:border-right="0.74pt solid #000000" fo:border-top="0.74pt solid #000000"/>
    </style:style>
    <style:style style:name="ce21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cm"/>
    </style:style>
    <style:style style:name="ce211" style:family="table-cell" style:parent-style-name="Default">
      <style:table-cell-properties fo:border-bottom="0.74pt solid #000000" fo:border-left="none" fo:border-right="0.74pt solid #000000" fo:border-top="none"/>
    </style:style>
    <style:style style:name="ce212" style:family="table-cell" style:parent-style-name="Default" style:data-style-name="N212"/>
    <style:style style:name="ce213" style:family="table-cell" style:parent-style-name="Default" style:data-style-name="N212">
      <style:map style:condition="cell-content()&lt;[.J11]" style:apply-style-name="Good" style:base-cell-address="'6 - B1'.K9"/>
    </style:style>
    <style:style style:name="ce214" style:family="table-cell" style:parent-style-name="Default">
      <style:map style:condition="cell-content()&lt;[.J11]" style:apply-style-name="Good" style:base-cell-address="'6 - B1'.K9"/>
    </style:style>
    <style:style style:name="ce215" style:family="table-cell" style:parent-style-name="Default">
      <style:text-properties fo:font-size="32pt" style:font-size-asian="32pt" style:font-size-complex="32pt"/>
    </style:style>
    <style:style style:name="ce21" style:family="table-cell" style:parent-style-name="Default" style:data-style-name="N11"/>
    <style:style style:name="ce217" style:family="table-cell" style:parent-style-name="Default"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ce218" style:family="table-cell" style:parent-style-name="Default" style:data-style-name="N0">
      <style:text-properties fo:color="#808080" fo:font-style="italic" fo:font-weight="bold" style:font-style-asian="italic" style:font-weight-asian="bold" style:font-style-complex="italic" style:font-weight-complex="bold"/>
    </style:style>
    <style:style style:name="ce21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220" style:family="table-cell" style:parent-style-name="Default">
      <style:table-cell-properties style:text-align-source="fix" style:repeat-content="false"/>
      <style:paragraph-properties fo:text-align="end" fo:margin-left="0cm"/>
      <style:text-properties fo:color="#808080" fo:font-style="italic" fo:font-weight="bold" style:font-style-asian="italic" style:font-weight-asian="bold" style:font-style-complex="italic" style:font-weight-complex="bold"/>
    </style:style>
    <style:style style:name="ce221" style:family="table-cell" style:parent-style-name="Default" style:data-style-name="N0"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ce307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'6 - B2'.H9"/>
    </style:style>
    <style:style style:name="ce308" style:family="table-cell" style:parent-style-name="Default">
      <style:map style:condition="cell-content()&gt;1000" style:apply-style-name="Good" style:base-cell-address="'6 - B2'.H9"/>
    </style:style>
    <style:style style:name="ce309" style:family="table-cell" style:parent-style-name="Default" style:data-style-name="N212">
      <style:map style:condition="cell-content()&lt;[.J11]" style:apply-style-name="Good" style:base-cell-address="'6 - B2'.K9"/>
    </style:style>
    <style:style style:name="ce310" style:family="table-cell" style:parent-style-name="Default">
      <style:map style:condition="cell-content()&lt;[.J11]" style:apply-style-name="Good" style:base-cell-address="'6 - B2'.K9"/>
    </style:style>
    <style:style style:name="ce226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ce227" style:family="table-cell" style:parent-style-name="Default" style:data-style-name="N0">
      <style:text-properties fo:font-weight="normal" style:font-weight-asian="normal" style:font-weight-complex="normal"/>
    </style:style>
    <style:style style:name="ce228" style:family="table-cell" style:parent-style-name="Default">
      <style:text-properties fo:color="#808080" fo:font-style="italic" style:font-style-asian="italic" style:font-style-complex="italic"/>
    </style:style>
    <style:style style:name="ce314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'6 - B3'.H9"/>
    </style:style>
    <style:style style:name="ce315" style:family="table-cell" style:parent-style-name="Default">
      <style:map style:condition="cell-content()&gt;1000" style:apply-style-name="Good" style:base-cell-address="'6 - B3'.H9"/>
    </style:style>
    <style:style style:name="ce316" style:family="table-cell" style:parent-style-name="Default" style:data-style-name="N212">
      <style:map style:condition="cell-content()&lt;[.J11]" style:apply-style-name="Good" style:base-cell-address="'6 - B3'.K9"/>
    </style:style>
    <style:style style:name="ce317" style:family="table-cell" style:parent-style-name="Default">
      <style:map style:condition="cell-content()&lt;[.J11]" style:apply-style-name="Good" style:base-cell-address="'6 - B3'.K9"/>
    </style:style>
    <style:style style:name="ce23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35" style:family="table-cell" style:parent-style-name="Default" style:data-style-name="N157">
      <style:table-cell-properties fo:background-color="#ffff99" style:diagonal-bl-tr="none" style:diagonal-tl-br="none" fo:border="0.74pt solid #000000" fo:padding="0.071cm" style:rotation-align="none"/>
    </style:style>
    <style:style style:name="ce32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3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9" style:family="table-cell" style:parent-style-name="Default">
      <style:table-cell-properties fo:background-color="#99ccff" style:diagonal-bl-tr="none" style:diagonal-tl-br="none" fo:border="0.74pt solid #000000" fo:padding="0.071cm" style:rotation-align="none"/>
    </style:style>
    <style:style style:name="ce240" style:family="table-cell" style:parent-style-name="Default" style:data-style-name="N3">
      <style:table-cell-properties fo:padding="0.071cm"/>
    </style:style>
    <style:style style:name="ce241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2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3" style:family="table-cell" style:parent-style-name="Default">
      <style:table-cell-properties fo:border-bottom="none" style:cell-protect="none" style:print-content="true" fo:border-left="0.74pt solid #000000" fo:border-right="none" fo:border-top="0.74pt solid #000000"/>
    </style:style>
    <style:style style:name="ce244" style:family="table-cell" style:parent-style-name="Default" style:data-style-name="N120">
      <style:table-cell-properties fo:border-bottom="none" style:cell-protect="none" style:print-content="true" fo:border-left="0.74pt solid #000000" fo:border-right="none" fo:border-top="none"/>
    </style:style>
    <style:style style:name="ce245" style:family="table-cell" style:parent-style-name="Default" style:data-style-name="N0">
      <style:table-cell-properties fo:border-bottom="none" style:cell-protect="none" style:print-content="true" fo:border-left="0.74pt solid #000000" fo:border-right="none" fo:border-top="none"/>
      <style:text-properties fo:font-weight="bold" style:font-weight-asian="bold" style:font-weight-complex="bold"/>
    </style:style>
    <style:style style:name="ce246" style:family="table-cell" style:parent-style-name="Default" style:data-style-name="N2">
      <style:table-cell-properties fo:border-bottom="none" style:cell-protect="none" style:print-content="true" fo:border-left="0.74pt solid #000000" fo:border-right="none" fo:border-top="none"/>
    </style:style>
    <style:style style:name="ce247" style:family="table-cell" style:parent-style-name="Default">
      <style:table-cell-properties fo:border-bottom="none" style:cell-protect="none" style:print-content="true" fo:border-left="0.74pt solid #000000" fo:border-right="none" fo:border-top="none"/>
      <style:text-properties fo:font-weight="bold" style:font-weight-asian="bold" style:font-weight-complex="bold"/>
    </style:style>
    <style:style style:name="ce248" style:family="table-cell" style:parent-style-name="Default" style:data-style-name="N1">
      <style:table-cell-properties fo:border-bottom="none" style:cell-protect="none" style:print-content="true" fo:border-left="0.74pt solid #000000" fo:border-right="none" fo:border-top="none"/>
      <style:text-properties fo:font-weight="bold" style:font-weight-asian="bold" style:font-weight-complex="bold"/>
    </style:style>
    <style:style style:name="ce249" style:family="table-cell" style:parent-style-name="Default" style:data-style-name="N157">
      <style:table-cell-properties fo:border-bottom="none" fo:border-left="0.74pt solid #000000" fo:border-right="none" fo:border-top="none"/>
    </style:style>
    <style:style style:name="ce250" style:family="table-cell" style:parent-style-name="Default">
      <style:table-cell-properties fo:border-bottom="none" style:cell-protect="none" style:print-content="true" fo:border-left="none" fo:border-right="none" fo:border-top="0.74pt solid #000000"/>
    </style:style>
    <style:style style:name="ce251" style:family="table-cell" style:parent-style-name="Default">
      <style:table-cell-properties fo:border-bottom="none" fo:border-left="0.74pt solid #000000" fo:border-right="none" fo:border-top="0.74pt solid #000000"/>
      <style:text-properties fo:font-style="italic" style:font-style-asian="italic" style:font-style-complex="italic"/>
    </style:style>
    <style:style style:name="ce252" style:family="table-cell" style:parent-style-name="Default">
      <style:text-properties fo:font-style="italic" style:font-style-asian="italic" style:font-style-complex="italic"/>
    </style:style>
    <style:style style:name="ce253" style:family="table-cell" style:parent-style-name="Default" style:data-style-name="N1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4" style:family="table-cell" style:parent-style-name="Default">
      <style:table-cell-properties fo:border-bottom="none" fo:border-left="none" fo:border-right="none" fo:border-top="0.74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5" style:family="table-cell" style:parent-style-name="Default" style:data-style-name="N49">
      <style:table-cell-properties style:text-align-source="fix" style:repeat-content="false"/>
      <style:paragraph-properties fo:text-align="end" fo:margin-left="0cm"/>
      <style:text-properties style:font-name="Calibri" fo:font-weight="bold" style:font-weight-asian="bold" style:font-weight-complex="bold"/>
    </style:style>
    <style:style style:name="ce256" style:family="table-cell" style:parent-style-name="Default">
      <style:table-cell-properties fo:border-bottom="none" style:cell-protect="none" style:print-content="true" fo:border-left="none" fo:border-right="0.74pt solid #000000" fo:border-top="0.74pt solid #000000"/>
    </style:style>
    <style:style style:name="ce257" style:family="table-cell" style:parent-style-name="Default">
      <style:table-cell-properties fo:border-bottom="none" style:cell-protect="none" style:print-content="true" fo:border-left="none" fo:border-right="0.74pt solid #000000" fo:border-top="none"/>
    </style:style>
    <style:style style:name="ce258" style:family="table-cell" style:parent-style-name="Default">
      <style:table-cell-properties fo:border-bottom="none" fo:border-left="none" fo:border-right="0.74pt solid #000000" fo:border-top="0.74pt solid #000000"/>
      <style:text-properties fo:font-style="italic" style:font-style-asian="italic" style:font-style-complex="italic"/>
    </style:style>
    <style:style style:name="ce259" style:family="table-cell" style:parent-style-name="Default">
      <style:table-cell-properties fo:border-bottom="none" style:cell-protect="none" style:print-content="true" fo:border-left="0.74pt solid #000000" fo:border-right="none" fo:border-top="0.74pt solid #000000"/>
      <style:text-properties fo:font-weight="bold" style:font-weight-asian="bold" style:font-weight-complex="bold"/>
    </style:style>
    <style:style style:name="ce260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6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2" style:family="table-cell" style:parent-style-name="Default">
      <style:table-cell-properties style:vertical-align="middle"/>
      <style:text-properties fo:color="#fc5c00" fo:font-size="32pt" fo:font-weight="bold" style:font-size-asian="32pt" style:font-weight-asian="bold" style:font-size-complex="32pt" style:font-weight-complex="bold"/>
    </style:style>
    <style:style style:name="ce263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fo:color="#c9211e" style:text-outline="false" style:text-line-through-style="none" style:text-line-through-type="none" style:font-name="Arial Black" fo:font-size="1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zh" style:country-asian="CN" style:font-style-asian="normal" style:font-weight-asian="normal" style:font-name-complex="Calibri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>
      <style:table-cell-properties style:vertical-align="middle"/>
      <style:text-properties style:font-name="Calibri"/>
    </style:style>
    <style:style style:name="ce354" style:family="table-cell" style:parent-style-name="Default" style:data-style-name="N11">
      <style:text-properties style:font-name="Calibri"/>
      <style:map style:condition="cell-content()&lt;0.03" style:apply-style-name="Good" style:base-cell-address="'Annex D Resolution'.B34"/>
      <style:map style:condition="cell-content()!=&quot;&lt;3% = PASS&quot;" style:apply-style-name="Bad" style:base-cell-address="'Annex D Resolution'.B34"/>
    </style:style>
    <style:style style:name="ce355" style:family="table-cell" style:parent-style-name="Default">
      <style:table-cell-properties fo:wrap-option="wrap" style:vertical-align="middle"/>
      <style:text-properties style:font-name="Calibri"/>
    </style:style>
    <style:style style:name="ce356" style:family="table-cell" style:parent-style-name="Good">
      <style:table-cell-properties fo:wrap-option="wrap" style:vertical-align="middle"/>
    </style:style>
    <style:style style:name="ce52" style:family="table-cell" style:parent-style-name="Default" style:data-style-name="N81">
      <style:table-cell-properties style:cell-protect="none" style:print-content="true"/>
    </style:style>
    <style:style style:name="ce12" style:family="table-cell" style:parent-style-name="Default" style:data-style-name="N80">
      <style:table-cell-properties style:cell-protect="none" style:print-content="true"/>
      <style:text-properties fo:font-weight="bold" style:font-weight-asian="bold" style:font-weight-complex="bold"/>
    </style:style>
    <style:style style:name="ce22" style:family="table-cell" style:parent-style-name="Default" style:data-style-name="N1">
      <style:table-cell-properties style:cell-protect="none" style:print-content="true"/>
    </style:style>
    <style:style style:name="ce360" style:family="table-cell" style:parent-style-name="Default" style:data-style-name="N11">
      <style:map style:condition="cell-content()&lt;0.3" style:apply-style-name="Good" style:base-cell-address="'Annex C - Flow Rate'.A31"/>
    </style:style>
    <style:style style:name="ce361" style:family="table-cell" style:parent-style-name="Default" style:data-style-name="N11">
      <style:map style:condition="cell-content()&lt;0.15" style:apply-style-name="Good" style:base-cell-address="'Annex C - Flow Rate'.A33"/>
    </style:style>
    <style:style style:name="ce362" style:family="table-cell" style:parent-style-name="Good">
      <style:table-cell-properties fo:background-color="transparent"/>
      <style:text-properties style:use-window-font-color="true"/>
    </style:style>
    <style:style style:name="ce363" style:family="table-cell" style:parent-style-name="Default" style:data-style-name="N157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364" style:family="table-cell" style:parent-style-name="Default" style:data-style-name="N157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365" style:family="table-cell" style:parent-style-name="Default" style:data-style-name="N1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map style:condition="cell-content()&gt;1000" style:apply-style-name="Good" style:base-cell-address="'ANNEX E - B1'.H9"/>
    </style:style>
    <style:style style:name="ce366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'ANNEX E - B1'.H9"/>
    </style:style>
    <style:style style:name="ce367" style:family="table-cell" style:parent-style-name="Default" style:data-style-name="N1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map style:condition="cell-content()&gt;1000" style:apply-style-name="Good" style:base-cell-address="'ANNEX E - B1'.H9"/>
    </style:style>
    <style:style style:name="ce368" style:family="table-cell" style:parent-style-name="Default">
      <style:map style:condition="cell-content()&gt;1000" style:apply-style-name="Good" style:base-cell-address="'ANNEX E - B1'.H9"/>
    </style:style>
    <style:style style:name="ce123" style:family="table-cell" style:parent-style-name="Default" style:data-style-name="N11">
      <style:text-properties fo:font-weight="bold" style:font-weight-asian="bold" style:font-weight-complex="bold"/>
    </style:style>
    <style:style style:name="ce370" style:family="table-cell" style:parent-style-name="Default" style:data-style-name="N212">
      <style:table-cell-properties fo:border-bottom="none" fo:border-left="none" fo:border-right="none" fo:border-top="0.74pt solid #000000"/>
    </style:style>
    <style:style style:name="ce371" style:family="table-cell" style:parent-style-name="Default" style:data-style-name="N212">
      <style:table-cell-properties fo:border-bottom="0.74pt solid #000000" fo:border-left="none" fo:border-right="none" fo:border-top="none"/>
    </style:style>
    <style:style style:name="ce372" style:family="table-cell" style:parent-style-name="Default" style:data-style-name="N212">
      <style:table-cell-properties fo:border-bottom="none" fo:border-left="none" fo:border-right="none" fo:border-top="0.74pt solid #000000"/>
      <style:map style:condition="cell-content()&lt;[.J11]" style:apply-style-name="Good" style:base-cell-address="'ANNEX E - B1'.K9"/>
    </style:style>
    <style:style style:name="ce373" style:family="table-cell" style:parent-style-name="Default" style:data-style-name="N212">
      <style:map style:condition="cell-content()&lt;[.J11]" style:apply-style-name="Good" style:base-cell-address="'ANNEX E - B1'.K9"/>
    </style:style>
    <style:style style:name="ce374" style:family="table-cell" style:parent-style-name="Default" style:data-style-name="N212">
      <style:table-cell-properties fo:border-bottom="0.74pt solid #000000" fo:border-left="none" fo:border-right="none" fo:border-top="none"/>
      <style:map style:condition="cell-content()&lt;[.J11]" style:apply-style-name="Good" style:base-cell-address="'ANNEX E - B1'.K9"/>
    </style:style>
    <style:style style:name="ce375" style:family="table-cell" style:parent-style-name="Default" style:data-style-name="N1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map style:condition="cell-content()&gt;1000" style:apply-style-name="Good" style:base-cell-address="'ANNEX E - B2'.H9"/>
    </style:style>
    <style:style style:name="ce376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'ANNEX E - B2'.H9"/>
    </style:style>
    <style:style style:name="ce377" style:family="table-cell" style:parent-style-name="Default" style:data-style-name="N1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map style:condition="cell-content()&gt;1000" style:apply-style-name="Good" style:base-cell-address="'ANNEX E - B2'.H9"/>
    </style:style>
    <style:style style:name="ce378" style:family="table-cell" style:parent-style-name="Default">
      <style:map style:condition="cell-content()&gt;1000" style:apply-style-name="Good" style:base-cell-address="'ANNEX E - B2'.H9"/>
    </style:style>
    <style:style style:name="ce379" style:family="table-cell" style:parent-style-name="Default" style:data-style-name="N212">
      <style:table-cell-properties fo:border-bottom="none" fo:border-left="none" fo:border-right="none" fo:border-top="0.74pt solid #000000"/>
      <style:map style:condition="cell-content()&lt;[.J11]" style:apply-style-name="Good" style:base-cell-address="'ANNEX E - B2'.K9"/>
    </style:style>
    <style:style style:name="ce380" style:family="table-cell" style:parent-style-name="Default" style:data-style-name="N212">
      <style:map style:condition="cell-content()&lt;[.J11]" style:apply-style-name="Good" style:base-cell-address="'ANNEX E - B2'.K9"/>
    </style:style>
    <style:style style:name="ce381" style:family="table-cell" style:parent-style-name="Default" style:data-style-name="N212">
      <style:table-cell-properties fo:border-bottom="0.74pt solid #000000" fo:border-left="none" fo:border-right="none" fo:border-top="none"/>
      <style:map style:condition="cell-content()&lt;[.J11]" style:apply-style-name="Good" style:base-cell-address="'ANNEX E - B2'.K9"/>
    </style:style>
    <style:style style:name="ce382" style:family="table-cell" style:parent-style-name="Default" style:data-style-name="N1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map style:condition="cell-content()&gt;1000" style:apply-style-name="Good" style:base-cell-address="'ANNEX E - B3'.H9"/>
    </style:style>
    <style:style style:name="ce383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'ANNEX E - B3'.H9"/>
    </style:style>
    <style:style style:name="ce384" style:family="table-cell" style:parent-style-name="Default" style:data-style-name="N1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map style:condition="cell-content()&gt;1000" style:apply-style-name="Good" style:base-cell-address="'ANNEX E - B3'.H9"/>
    </style:style>
    <style:style style:name="ce385" style:family="table-cell" style:parent-style-name="Default">
      <style:map style:condition="cell-content()&gt;1000" style:apply-style-name="Good" style:base-cell-address="'ANNEX E - B3'.H9"/>
    </style:style>
    <style:style style:name="ce386" style:family="table-cell" style:parent-style-name="Default" style:data-style-name="N212">
      <style:table-cell-properties fo:border-bottom="none" fo:border-left="none" fo:border-right="none" fo:border-top="0.74pt solid #000000"/>
      <style:map style:condition="cell-content()&lt;[.J11]" style:apply-style-name="Good" style:base-cell-address="'ANNEX E - B3'.K9"/>
    </style:style>
    <style:style style:name="ce387" style:family="table-cell" style:parent-style-name="Default" style:data-style-name="N212">
      <style:map style:condition="cell-content()&lt;[.J11]" style:apply-style-name="Good" style:base-cell-address="'ANNEX E - B3'.K9"/>
    </style:style>
    <style:style style:name="ce388" style:family="table-cell" style:parent-style-name="Default" style:data-style-name="N212">
      <style:table-cell-properties fo:border-bottom="0.74pt solid #000000" fo:border-left="none" fo:border-right="none" fo:border-top="none"/>
      <style:map style:condition="cell-content()&lt;[.J11]" style:apply-style-name="Good" style:base-cell-address="'ANNEX E - B3'.K9"/>
    </style:style>
    <style:style style:name="ce12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</style:style>
    <style:style style:name="ce39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39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9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393" style:family="table-cell" style:parent-style-name="Default">
      <style:text-properties fo:font-weight="bold" style:font-weight-asian="bold" style:font-weight-complex="bold"/>
      <style:map style:condition="cell-content-is-between([.$C$34],[.$D$34])" style:apply-style-name="Good" style:base-cell-address="'Annex E Verify Counting Accuracy'.A29"/>
    </style:style>
    <style:style style:name="ce9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  <style:text-properties style:text-underline-style="none"/>
    </style:style>
    <style:style style:name="ce395" style:family="table-cell" style:parent-style-name="Default">
      <style:table-cell-properties fo:background-color="#e7e7e7"/>
      <style:text-properties fo:font-weight="bold" style:font-weight-asian="bold" style:font-weight-complex="bold"/>
    </style:style>
    <style:style style:name="ce396" style:family="table-cell" style:parent-style-name="Default">
      <style:text-properties fo:color="#c9211e" style:font-name="Arial Black" fo:font-size="20pt" style:font-size-asian="20pt" style:font-size-complex="20pt"/>
    </style:style>
    <style:style style:name="ce397" style:family="table-cell" style:parent-style-name="Default" style:data-style-name="N1">
      <style:text-properties fo:font-style="italic" style:font-style-asian="italic" style:font-style-complex="italic"/>
    </style:style>
    <style:style style:name="ce398" style:family="table-cell" style:parent-style-name="Default" style:data-style-name="N1">
      <style:table-cell-properties fo:border-bottom="0.74pt solid #000000" fo:border-left="none" fo:border-right="none" fo:border-top="none"/>
      <style:text-properties fo:font-style="italic" style:font-style-asian="italic" style:font-style-complex="italic"/>
    </style:style>
    <style:style style:name="ce399" style:family="table-cell" style:parent-style-name="Default">
      <style:text-properties fo:font-weight="bold" style:font-weight-asian="bold" style:font-weight-complex="bold"/>
      <style:map style:condition="cell-content-is-between([.$C$36],[.$D$36])" style:apply-style-name="Good" style:base-cell-address="'Annex E Verify Counting Accuracy'.B29"/>
    </style:style>
    <style:style style:name="ce400" style:family="table-cell" style:parent-style-name="Default" style:data-style-name="N11">
      <style:text-properties fo:font-weight="bold" style:font-weight-asian="bold" style:font-weight-complex="bold"/>
      <style:map style:condition="cell-content()&lt;[.B56]" style:apply-style-name="Good" style:base-cell-address="'Annex E Verify Counting Accuracy'.B55"/>
    </style:style>
    <style:style style:name="ce401" style:family="table-cell" style:parent-style-name="Default" style:data-style-name="N157">
      <style:text-properties fo:font-style="italic" fo:font-weight="normal" style:font-style-asian="italic" style:font-weight-asian="normal" style:font-style-complex="italic" style:font-weight-complex="normal"/>
    </style:style>
    <style:style style:name="ce402" style:family="table-cell" style:parent-style-name="Default" style:data-style-name="N49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0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04" style:family="table-cell" style:parent-style-name="Default" style:data-style-name="N1">
      <style:map style:condition="cell-content-is-between([.G23],[.H23])" style:apply-style-name="Good" style:base-cell-address="'Annex E Verify Counting Accuracy'.E23"/>
    </style:style>
    <style:style style:name="ce405" style:family="table-cell" style:parent-style-name="Default" style:data-style-name="N1">
      <style:table-cell-properties fo:border-bottom="0.74pt solid #000000" fo:border-left="none" fo:border-right="none" fo:border-top="none"/>
      <style:map style:condition="cell-content-is-between([.G23],[.H23])" style:apply-style-name="Good" style:base-cell-address="'Annex E Verify Counting Accuracy'.E23"/>
    </style:style>
    <style:style style:name="ce406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40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gr1" style:family="graphic" style:parent-style-name="Default">
      <style:graphic-properties draw:stroke="none" svg:stroke-color="#000000" draw:fill="none" draw:fill-color="#ffffff" fo:min-height="5.432cm" loext:decorative="false"/>
      <style:paragraph-properties style:writing-mode="lr-tb"/>
      <style:text-properties style:font-name="Calibri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4" style:family="graphic" style:parent-style-name="Default">
      <style:graphic-properties draw:stroke="none" svg:stroke-color="#000000" draw:fill="none" draw:fill-color="#ffffff" fo:min-height="10.409cm" loext:decorative="false"/>
      <style:paragraph-properties style:writing-mode="lr-tb"/>
    </style:style>
    <style:style style:name="gr5" style:family="graphic" style:parent-style-name="Default">
      <style:graphic-properties draw:stroke="none" svg:stroke-color="#000000" draw:fill="none" draw:fill-color="#ffffff" fo:min-height="3.745cm" loext:decorative="false"/>
      <style:paragraph-properties style:writing-mode="lr-tb"/>
    </style:style>
    <style:style style:name="ta_extref" style:family="table">
      <style:table-properties table:display="false"/>
    </style:style>
    <style:style style:name="P1" style:family="paragraph">
      <loext:graphic-properties draw:fill="none" draw:fill-color="#ffffff"/>
      <style:text-properties style:font-name="Calibri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style:font-name="Calibri"/>
    </style:style>
    <style:style style:name="T2" style:family="text">
      <style:text-properties style:text-position="-33%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-8% 58%"/>
    </style:style>
    <style:style style:name="T7" style:family="text">
      <style:text-properties fo:font-weight="bold"/>
    </style:style>
    <style:style style:name="T8" style:family="text">
      <style:text-properties style:text-overline-style="none" style:text-overline-color="font-color"/>
    </style:style>
    <style:style style:name="T9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-8% 58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text-position="0% 100%"/>
    </style:style>
    <style:style style:name="T11" style:family="text">
      <style:text-properties fo:color="#00000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2" style:family="text">
      <style:text-properties fo:color="#000000" style:font-name="Calibri" fo:font-size="11pt" fo:font-weight="normal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 style:text-underline-style="none" style:text-underline-color="font-color"/>
    </style:style>
    <style:style style:name="T13" style:family="text">
      <style:text-properties fo:color="#000000" style:font-name="Calibri" fo:font-size="11pt" fo:font-weight="normal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text-underline-style="none" style:text-underline-color="font-color" style:text-position="-8% 58%"/>
    </style:style>
    <style:style style:name="T14" style:family="text">
      <style:text-properties fo:color="#000000" style:font-name="Calibri" fo:font-size="11pt" fo:font-weight="normal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text-underline-style="none" style:text-underline-color="font-color" style:text-position="0% 100%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ISO 11171_2020 Summary" table:style-name="ta1" table:print-ranges="'ISO 11171_2020 Summary'.A1:'ISO 11171_2020 Summary'.C18">
        <table:table-column table:style-name="co1" table:default-cell-style-name="ce86"/>
        <table:table-column table:style-name="co2" table:default-cell-style-name="Default"/>
        <table:table-column table:style-name="co3" table:default-cell-style-name="ce86"/>
        <table:table-column table:style-name="co4" table:number-columns-repeated="1021" table:default-cell-style-name="Default"/>
        <table:table-row table:style-name="ro1">
          <table:table-cell table:style-name="ce39" office:value-type="string" calcext:value-type="string">
            <text:p>ISO 11171:2020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table:style-name="ce43" office:value-type="string" calcext:value-type="string">
            <text:p>Requirement</text:p>
          </table:table-cell>
          <table:table-cell table:style-name="ce87" office:value-type="string" calcext:value-type="string">
            <text:p>Material</text:p>
          </table:table-cell>
          <table:table-cell table:style-name="ce43" office:value-type="string" calcext:value-type="string">
            <text:p>Reference</text:p>
          </table:table-cell>
          <table:table-cell table:style-name="ce89" table:number-columns-repeated="1021"/>
        </table:table-row>
        <table:table-row table:style-name="ro3">
          <table:table-cell table:style-name="ce85" office:value-type="string" calcext:value-type="string">
            <text:p>&gt;1000 particles per bottle at max certified size</text:p>
            <text:p>Sample Cv per Table C.2</text:p>
          </table:table-cell>
          <table:table-cell table:style-name="ce88" office:value-type="string" calcext:value-type="string">
            <text:p>SRM2806/RM8631x</text:p>
          </table:table-cell>
          <table:table-cell table:style-name="ce85" office:value-type="string" calcext:value-type="string">
            <text:p>Clause 6. Sizing Calibration. 3 separate bottles, 5 sub-samples from each.</text:p>
          </table:table-cell>
          <table:table-cell table:style-name="ce88" table:number-columns-repeated="1021"/>
        </table:table-row>
        <table:table-row table:style-name="ro3">
          <table:table-cell table:style-name="ce85" office:value-type="string" calcext:value-type="string">
            <text:p>Cv<text:span text:style-name="T2">4um</text:span> &lt; 3%</text:p>
          </table:table-cell>
          <table:table-cell table:style-name="ce88" office:value-type="string" calcext:value-type="string">
            <text:p>RM8632x</text:p>
          </table:table-cell>
          <table:table-cell table:style-name="ce85" office:value-type="string" calcext:value-type="string">
            <text:p>Annex A – Preliminary Instrument Check</text:p>
            <text:p/>
            <text:p>Need traceable measurement of volume "actually measured" during a particle counting run. Test-test Cv<text:span text:style-name="T2">COUNTS</text:span> &lt; 3% over 5 sample runs using RM8632 fine dust is required at threshold of 1.5x threshold noise.</text:p>
          </table:table-cell>
          <table:table-cell table:style-name="ce88" table:number-columns-repeated="1021"/>
        </table:table-row>
        <table:table-row table:style-name="ro3">
          <table:table-cell table:style-name="ce85" office:value-type="string" calcext:value-type="string">
            <text:p>Δ<text:span text:style-name="T2">COUNTS_4um</text:span> &lt; 5%</text:p>
          </table:table-cell>
          <table:table-cell table:style-name="ce88" office:value-type="string" calcext:value-type="string">
            <text:p>RM8632x</text:p>
          </table:table-cell>
          <table:table-cell table:style-name="ce85" office:value-type="string" calcext:value-type="string">
            <text:p>Annex B – Coincidence error limit</text:p>
            <text:p>Analyse <text:span text:style-name="T5">15 different concentrations</text:span> 5 times, of 10%...150% of manufacturer recommended coincidence limit. 0-40% regression line of 4um channel used to project results. Error limit when counts cross 95% of this line.</text:p>
          </table:table-cell>
          <table:table-cell table:style-name="ce88" table:number-columns-repeated="1021"/>
        </table:table-row>
        <table:table-row table:style-name="ro3">
          <table:table-cell table:style-name="ce85" office:value-type="string" calcext:value-type="string">
            <text:p>Cv<text:span text:style-name="T2">_4um</text:span> &lt; 3%</text:p>
          </table:table-cell>
          <table:table-cell table:style-name="ce88" office:value-type="string" calcext:value-type="string">
            <text:p>RM8632x</text:p>
          </table:table-cell>
          <table:table-cell table:style-name="ce85" office:value-type="string" calcext:value-type="string">
            <text:p>Annex C – flow rate – <text:span text:style-name="T5">if fixed</text:span> then just need traceable flow measurement and pass annex A. <text:span text:style-name="T5">Otherwise 8 flow rates</text:span> 20..140% are used and the results at each analysed in order to establish a limit.</text:p>
          </table:table-cell>
          <table:table-cell table:style-name="ce88" table:number-columns-repeated="1021"/>
        </table:table-row>
        <table:table-row table:style-name="ro3">
          <table:table-cell table:style-name="ce85" office:value-type="string" calcext:value-type="string">
            <text:p>Cv<text:span text:style-name="T2">DIAM_10</text:span> &lt; +/-15%</text:p>
            <text:p><text:span text:style-name="T3">→ Cv</text:span><text:span text:style-name="T4">SIGNAL_10</text:span><text:span text:style-name="T3"> &lt; +/-32%</text:span></text:p>
            <text:p/>
          </table:table-cell>
          <table:table-cell table:style-name="ce88" office:value-type="string" calcext:value-type="string">
            <text:p>10um spheres</text:p>
          </table:table-cell>
          <table:table-cell table:style-name="ce85" office:value-type="string" calcext:value-type="string">
            <text:p>Annex D – resolution. Establish threshold corresponding to spheres (equal diff counts for 0.72 and 1.0 relative channel thresholds). Set thresholds corresponding to 0.9, 1.0 and 1.1 times diameter so inferred from cal curve. </text:p>
          </table:table-cell>
          <table:table-cell table:style-name="ce88" table:number-columns-repeated="1021"/>
        </table:table-row>
        <table:table-row table:style-name="ro3">
          <table:table-cell table:style-name="ce85" office:value-type="string" calcext:value-type="string">
            <text:p>Counts per Table A.1</text:p>
            <text:p>Cv &lt; Table C.2</text:p>
            <text:p>6 sizes 5-15um</text:p>
          </table:table-cell>
          <table:table-cell table:style-name="ce88" office:value-type="string" calcext:value-type="string">
            <text:p>RM8632x 1mg/l</text:p>
          </table:table-cell>
          <table:table-cell table:style-name="ce85" office:value-type="string" calcext:value-type="string">
            <text:p>Annex E – particle counting accuracy. Ensure RM8632x counts in permitted range.</text:p>
          </table:table-cell>
          <table:table-cell table:style-name="ce88" table:number-columns-repeated="1021"/>
        </table:table-row>
        <table:table-row table:style-name="ro2">
          <table:table-cell table:style-name="ce85"/>
          <table:table-cell table:style-name="ce88"/>
          <table:table-cell table:style-name="ce85"/>
          <table:table-cell table:style-name="ce88" table:number-columns-repeated="1021"/>
        </table:table-row>
        <table:table-row table:style-name="ro2">
          <table:table-cell table:style-name="ce85"/>
          <table:table-cell/>
          <table:table-cell table:style-name="Default"/>
          <table:table-cell table:style-name="ce88" table:number-columns-repeated="1021"/>
        </table:table-row>
        <table:table-row table:style-name="ro2" table:number-rows-repeated="8">
          <table:table-cell table:style-name="ce85"/>
          <table:table-cell table:style-name="ce88"/>
          <table:table-cell table:style-name="ce85"/>
          <table:table-cell table:style-name="ce88"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nex A Preliminary Check" table:style-name="ta1"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6" table:default-cell-style-name="ce33"/>
        <table:table-column table:style-name="co4" table:number-columns-repeated="4" table:default-cell-style-name="ce33"/>
        <table:table-column table:style-name="co4" table:default-cell-style-name="Default"/>
        <table:table-column table:style-name="co4" table:default-cell-style-name="ce33"/>
        <table:table-column table:style-name="co4" table:default-cell-style-name="Default"/>
        <table:table-column table:style-name="co4" table:default-cell-style-name="ce33"/>
        <table:table-column table:style-name="co4" table:default-cell-style-name="Default"/>
        <table:table-column table:style-name="co4" table:default-cell-style-name="ce33"/>
        <table:table-row table:style-name="ro4">
          <table:table-cell table:style-name="ce17" table:formula="of:=RIGHT(CELL(&quot;filename&quot;);25)" office:value-type="string" office:string-value="Annex A Preliminary Check" calcext:value-type="string" table:number-columns-spanned="5" table:number-rows-spanned="1">
            <text:p>Annex A Preliminary Check</text:p>
          </table:table-cell>
          <table:covered-table-cell table:number-columns-repeated="4" table:style-name="Default"/>
          <table:table-cell table:number-columns-repeated="4"/>
          <table:table-cell table:style-name="ce33"/>
          <table:table-cell/>
          <table:table-cell table:style-name="ce33"/>
          <table:table-cell/>
          <table:table-cell table:style-name="ce33"/>
          <table:table-cell/>
        </table:table-row>
        <table:table-row table:style-name="ro2">
          <table:table-cell table:number-columns-repeated="9"/>
          <table:table-cell table:style-name="ce33"/>
          <table:table-cell/>
          <table:table-cell table:style-name="ce33"/>
          <table:table-cell/>
          <table:table-cell table:style-name="ce33"/>
          <table:table-cell/>
        </table:table-row>
        <table:table-row table:style-name="ro5">
          <table:table-cell table:style-name="ce34" office:value-type="string" calcext:value-type="string">
            <text:p>Analysis using Bottle Samples and RM8632a</text:p>
          </table:table-cell>
          <table:table-cell table:number-columns-repeated="4"/>
          <table:table-cell table:style-name="ce34" office:value-type="string" calcext:value-type="string">
            <text:p>Volumetric Sampling Accuracy</text:p>
          </table:table-cell>
          <table:table-cell table:style-name="ce34"/>
          <table:table-cell table:number-columns-repeated="2"/>
          <table:table-cell table:style-name="ce33"/>
          <table:table-cell/>
          <table:table-cell table:style-name="ce34"/>
          <table:table-cell/>
          <table:table-cell table:style-name="ce33"/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>
            <draw:frame draw:z-index="1" draw:name="Text Frame 3" draw:style-name="gr1" draw:text-style-name="P1" svg:width="11.315cm" svg:height="5.432cm" svg:x="0.012cm" svg:y="0.353cm">
              <draw:text-box>
                <text:p><text:span text:style-name="T1">Used microbalance to weigh 10ml sample of fluid, added using precision digital pipette. Added 10x 10ml I total to plastic sample bottle and weighed result (after taring empty bottle weight).</text:span></text:p>
                <text:p><text:span text:style-name="T1"/></text:p>
                <text:p><text:span text:style-name="T1">Used bottle sampler to sample 15ml pumped flush + 40ml pumped sample.</text:span></text:p>
                <text:p><text:span text:style-name="T1"/></text:p>
                <text:p><text:span text:style-name="T1">Measured final weight of bottle+remaining fluid.</text:span></text:p>
                <text:p><text:span text:style-name="T1"/></text:p>
              </draw:text-box>
            </draw:frame>
          </table:table-cell>
          <table:table-cell table:number-columns-repeated="3"/>
          <table:table-cell table:style-name="ce33"/>
          <table:table-cell/>
          <table:table-cell table:style-name="ce33"/>
          <table:table-cell/>
          <table:table-cell table:style-name="ce33"/>
          <table:table-cell/>
        </table:table-row>
        <table:table-row table:style-name="ro2">
          <table:table-cell office:value-type="string" calcext:value-type="string">
            <text:p>APC Model</text:p>
          </table:table-cell>
          <table:table-cell table:number-columns-repeated="2"/>
          <table:table-cell table:style-name="ce37" office:value-type="string" calcext:value-type="string">
            <text:p>LPA3-NAVAIR</text:p>
          </table:table-cell>
          <table:table-cell/>
          <table:table-cell table:style-name="Default"/>
          <table:table-cell table:number-columns-repeated="5"/>
          <table:table-cell table:style-name="ce33"/>
          <table:table-cell/>
          <table:table-cell table:style-name="ce33"/>
          <table:table-cell/>
        </table:table-row>
        <table:table-row table:style-name="ro2">
          <table:table-cell office:value-type="string" calcext:value-type="string">
            <text:p>APC S/N</text:p>
          </table:table-cell>
          <table:table-cell table:number-columns-repeated="2"/>
          <table:table-cell office:value-type="string" calcext:value-type="string">
            <text:p>11171-00009</text:p>
          </table:table-cell>
          <table:table-cell table:number-columns-repeated="7"/>
          <table:table-cell table:style-name="ce33"/>
          <table:table-cell/>
          <table:table-cell table:style-name="ce33"/>
          <table:table-cell/>
        </table:table-row>
        <table:table-row table:style-name="ro2">
          <table:table-cell office:value-type="string" calcext:value-type="string">
            <text:p>Sensor Model</text:p>
          </table:table-cell>
          <table:table-cell table:number-columns-repeated="2"/>
          <table:table-cell table:style-name="ce37" office:value-type="string" calcext:value-type="string">
            <text:p>LPA3-NAVAIR</text:p>
          </table:table-cell>
          <table:table-cell table:number-columns-repeated="7"/>
          <table:table-cell table:style-name="ce33"/>
          <table:table-cell/>
          <table:table-cell table:style-name="ce33"/>
          <table:table-cell/>
        </table:table-row>
        <table:table-row table:style-name="ro2">
          <table:table-cell office:value-type="string" calcext:value-type="string">
            <text:p>Sensor S/N</text:p>
          </table:table-cell>
          <table:table-cell table:number-columns-repeated="2"/>
          <table:table-cell office:value-type="string" calcext:value-type="string">
            <text:p>11171-00009</text:p>
          </table:table-cell>
          <table:table-cell table:number-columns-repeated="7"/>
          <table:table-cell table:style-name="ce33"/>
          <table:table-cell/>
          <table:table-cell table:style-name="ce33"/>
          <table:table-cell/>
        </table:table-row>
        <table:table-row table:style-name="ro2">
          <table:table-cell office:value-type="string" calcext:value-type="string">
            <text:p>Date</text:p>
          </table:table-cell>
          <table:table-cell table:number-columns-repeated="2"/>
          <table:table-cell table:style-name="ce94" office:value-type="date" office:date-value="2025-06-12" calcext:value-type="date">
            <text:p>2025-06-12</text:p>
          </table:table-cell>
          <table:table-cell table:number-columns-repeated="7"/>
          <table:table-cell table:style-name="ce33"/>
          <table:table-cell/>
          <table:table-cell table:style-name="ce33"/>
          <table:table-cell/>
        </table:table-row>
        <table:table-row table:style-name="ro2">
          <table:table-cell office:value-type="string" calcext:value-type="string">
            <text:p>Operator</text:p>
          </table:table-cell>
          <table:table-cell table:number-columns-repeated="2"/>
          <table:table-cell table:style-name="ce46" office:value-type="string" calcext:value-type="string">
            <text:p>JMD</text:p>
          </table:table-cell>
          <table:table-cell table:number-columns-repeated="7"/>
          <table:table-cell table:style-name="ce33"/>
          <table:table-cell/>
          <table:table-cell table:style-name="ce33"/>
          <table:table-cell/>
        </table:table-row>
        <table:table-row table:style-name="ro2">
          <table:table-cell office:value-type="string" calcext:value-type="string">
            <text:p>Threshold Noise</text:p>
          </table:table-cell>
          <table:table-cell table:number-columns-repeated="2"/>
          <table:table-cell table:style-name="ce47" office:value-type="float" office:value="36" calcext:value-type="float">
            <text:p>36</text:p>
          </table:table-cell>
          <table:table-cell table:number-columns-repeated="7"/>
          <table:table-cell table:style-name="ce33"/>
          <table:table-cell/>
          <table:table-cell table:style-name="ce33"/>
          <table:table-cell/>
        </table:table-row>
        <table:table-row table:style-name="ro2">
          <table:table-cell table:number-columns-repeated="3"/>
          <table:table-cell table:style-name="ce37"/>
          <table:table-cell table:number-columns-repeated="7"/>
          <table:table-cell table:style-name="ce33"/>
          <table:table-cell/>
          <table:table-cell table:style-name="ce33"/>
          <table:table-cell/>
        </table:table-row>
        <table:table-row table:style-name="ro2">
          <table:table-cell office:value-type="string" calcext:value-type="string">
            <text:p>4um(c) Coincidence Limit /ml</text:p>
          </table:table-cell>
          <table:table-cell table:number-columns-repeated="2"/>
          <table:table-cell table:style-name="ce97" office:value-type="float" office:value="40000" calcext:value-type="float">
            <text:p>40000</text:p>
          </table:table-cell>
          <table:table-cell table:number-columns-repeated="7"/>
          <table:table-cell table:style-name="ce33"/>
          <table:table-cell/>
          <table:table-cell table:style-name="ce33"/>
          <table:table-cell/>
        </table:table-row>
        <table:table-row table:style-name="ro2">
          <table:table-cell office:value-type="string" calcext:value-type="string">
            <text:p>A.1 RM8632 4um count/mg/l</text:p>
          </table:table-cell>
          <table:table-cell table:number-columns-repeated="2"/>
          <table:table-cell office:value-type="float" office:value="6300" calcext:value-type="float">
            <text:p>6300</text:p>
          </table:table-cell>
          <table:table-cell table:number-columns-repeated="7"/>
          <table:table-cell table:style-name="ce33"/>
          <table:table-cell/>
          <table:table-cell table:style-name="ce33"/>
          <table:table-cell/>
        </table:table-row>
        <table:table-row table:style-name="ro2">
          <table:table-cell office:value-type="string" calcext:value-type="string">
            <text:p>RM8632x mg/l at 25% coincidence limit</text:p>
          </table:table-cell>
          <table:table-cell table:number-columns-repeated="2"/>
          <table:table-cell table:style-name="ce98" table:formula="of:=[.D13]/[.D14]*0.25" office:value-type="float" office:value="1.58730158730159" calcext:value-type="float">
            <text:p>1.587</text:p>
          </table:table-cell>
          <table:table-cell table:number-columns-repeated="7"/>
          <table:table-cell table:style-name="ce33"/>
          <table:table-cell/>
          <table:table-cell table:style-name="ce33"/>
          <table:table-cell/>
        </table:table-row>
        <table:table-row table:style-name="ro2">
          <table:table-cell table:style-name="Default" table:number-columns-repeated="4"/>
          <table:table-cell table:number-columns-repeated="7"/>
          <table:table-cell table:style-name="ce33"/>
          <table:table-cell/>
          <table:table-cell table:style-name="ce33"/>
          <table:table-cell/>
        </table:table-row>
        <table:table-row table:style-name="ro2">
          <table:table-cell table:style-name="Default" office:value-type="string" calcext:value-type="string">
            <text:p>Concentrate mg/l</text:p>
          </table:table-cell>
          <table:table-cell table:number-columns-repeated="2"/>
          <table:table-cell table:style-name="ce89" office:value-type="float" office:value="100" calcext:value-type="float">
            <text:p>100</text:p>
          </table:table-cell>
          <table:table-cell table:number-columns-repeated="7"/>
          <table:table-cell table:style-name="ce33"/>
          <table:table-cell/>
          <table:table-cell table:style-name="ce33"/>
          <table:table-cell/>
        </table:table-row>
        <table:table-row table:style-name="ro2">
          <table:table-cell table:style-name="Default" office:value-type="string" calcext:value-type="string">
            <text:p>Initial fluid volume ml</text:p>
          </table:table-cell>
          <table:table-cell table:style-name="Default" table:number-columns-repeated="2"/>
          <table:table-cell table:style-name="ce89" office:value-type="float" office:value="500" calcext:value-type="float">
            <text:p>500</text:p>
          </table:table-cell>
          <table:table-cell table:number-columns-repeated="7"/>
          <table:table-cell table:style-name="ce33"/>
          <table:table-cell/>
          <table:table-cell table:style-name="ce33"/>
          <table:table-cell/>
        </table:table-row>
        <table:table-row table:style-name="ro2">
          <table:table-cell table:style-name="Default" office:value-type="string" calcext:value-type="string">
            <text:p>Target quantity of dust in dilution</text:p>
          </table:table-cell>
          <table:table-cell table:style-name="Default" table:number-columns-repeated="2"/>
          <table:table-cell table:style-name="ce99" table:formula="of:=[.D18]*[.D15]/1000" office:value-type="float" office:value="0.793650793650794" calcext:value-type="float">
            <text:p>0.79</text:p>
          </table:table-cell>
          <table:table-cell table:number-columns-repeated="7"/>
          <table:table-cell table:style-name="ce33"/>
          <table:table-cell/>
          <table:table-cell table:style-name="ce46"/>
          <table:table-cell/>
        </table:table-row>
        <table:table-row table:style-name="ro2">
          <table:table-cell table:style-name="Default" office:value-type="string" calcext:value-type="string">
            <text:p>Concentrate to add ml</text:p>
          </table:table-cell>
          <table:table-cell table:style-name="Default" table:number-columns-repeated="2"/>
          <table:table-cell table:style-name="ce100" table:formula="of:=[.D19]/[.D17]*1000" office:value-type="float" office:value="7.93650793650794" calcext:value-type="float">
            <text:p>7.9</text:p>
          </table:table-cell>
          <table:table-cell table:number-columns-repeated="7"/>
          <table:table-cell table:style-name="ce33"/>
          <table:table-cell/>
          <table:table-cell table:style-name="ce37"/>
          <table:table-cell/>
        </table:table-row>
        <table:table-row table:style-name="ro2"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  <table:table-cell table:style-name="ce33"/>
          <table:table-cell/>
          <table:table-cell table:style-name="ce37"/>
          <table:table-cell/>
        </table:table-row>
        <table:table-row table:style-name="ro2">
          <table:table-cell table:number-columns-repeated="2"/>
          <table:table-cell table:style-name="ce37" office:value-type="string" calcext:value-type="string">
            <text:p>/ml</text:p>
          </table:table-cell>
          <table:table-cell table:style-name="ce37" office:value-type="string" calcext:value-type="string">
            <text:p>Deviation</text:p>
          </table:table-cell>
          <table:table-cell/>
          <table:table-cell table:style-name="Default" table:number-columns-repeated="4"/>
          <table:table-cell table:number-columns-repeated="2"/>
          <table:table-cell table:style-name="ce33"/>
          <table:table-cell/>
          <table:table-cell table:style-name="ce82"/>
          <table:table-cell/>
        </table:table-row>
        <table:table-row table:style-name="ro2">
          <table:table-cell table:number-columns-repeated="5"/>
          <table:table-cell office:value-type="string" calcext:value-type="string">
            <text:p>Date</text:p>
          </table:table-cell>
          <table:table-cell/>
          <table:table-cell table:style-name="ce46" office:value-type="date" office:date-value="2025-03-10" calcext:value-type="date">
            <text:p>2025-03-10</text:p>
          </table:table-cell>
          <table:table-cell table:number-columns-repeated="3"/>
          <table:table-cell table:style-name="ce33"/>
          <table:table-cell/>
          <table:table-cell table:style-name="ce37"/>
          <table:table-cell/>
        </table:table-row>
        <table:table-row table:style-name="ro2">
          <table:table-cell/>
          <table:table-cell office:value-type="string" calcext:value-type="string">
            <text:p>Portion 1</text:p>
          </table:table-cell>
          <table:table-cell table:style-name="ce38" office:value-type="float" office:value="9223" calcext:value-type="float">
            <text:p>9223</text:p>
          </table:table-cell>
          <table:table-cell table:style-name="ce44" table:formula="of:=([.C24]-[.$C$30])/[.$C$30]" office:value-type="percentage" office:value="0.0143190216434982" calcext:value-type="percentage">
            <text:p>1.43%</text:p>
          </table:table-cell>
          <table:table-cell/>
          <table:table-cell office:value-type="string" calcext:value-type="string">
            <text:p>Operator</text:p>
          </table:table-cell>
          <table:table-cell/>
          <table:table-cell table:style-name="ce37" office:value-type="string" calcext:value-type="string">
            <text:p>JMD</text:p>
          </table:table-cell>
          <table:table-cell table:number-columns-repeated="3"/>
          <table:table-cell table:style-name="ce33"/>
          <table:table-cell/>
          <table:table-cell table:style-name="ce37"/>
          <table:table-cell/>
        </table:table-row>
        <table:table-row table:style-name="ro2">
          <table:table-cell/>
          <table:table-cell office:value-type="string" calcext:value-type="string">
            <text:p>Portion 2</text:p>
          </table:table-cell>
          <table:table-cell table:style-name="ce40" office:value-type="float" office:value="9124" calcext:value-type="float">
            <text:p>9124</text:p>
          </table:table-cell>
          <table:table-cell table:style-name="ce44" table:formula="of:=([.C25]-[.$C$30])/[.$C$30]" office:value-type="percentage" office:value="0.00343128629245125" calcext:value-type="percentage">
            <text:p>0.34%</text:p>
          </table:table-cell>
          <table:table-cell/>
          <table:table-cell office:value-type="string" calcext:value-type="string">
            <text:p>Particle Counter</text:p>
          </table:table-cell>
          <table:table-cell/>
          <table:table-cell table:style-name="ce37" office:value-type="float" office:value="61110029" calcext:value-type="float">
            <text:p>61110029</text:p>
          </table:table-cell>
          <table:table-cell table:number-columns-repeated="3"/>
          <table:table-cell table:style-name="ce33"/>
          <table:table-cell/>
          <table:table-cell table:style-name="ce37"/>
          <table:table-cell/>
        </table:table-row>
        <table:table-row table:style-name="ro6">
          <table:table-cell/>
          <table:table-cell office:value-type="string" calcext:value-type="string">
            <text:p>Portion 3</text:p>
          </table:table-cell>
          <table:table-cell table:style-name="ce40" office:value-type="float" office:value="9086" calcext:value-type="float">
            <text:p>9086</text:p>
          </table:table-cell>
          <table:table-cell table:style-name="ce44" table:formula="of:=([.C26]-[.$C$30])/[.$C$30]" office:value-type="percentage" office:value="-0.000747844448354662" calcext:value-type="percentage">
            <text:p>-0.07%</text:p>
          </table:table-cell>
          <table:table-cell table:number-columns-repeated="3"/>
          <table:table-cell table:style-name="ce37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office:value-type="string" calcext:value-type="string">
            <text:p>Portion 4</text:p>
          </table:table-cell>
          <table:table-cell table:style-name="ce40" office:value-type="float" office:value="9116" calcext:value-type="float">
            <text:p>9116</text:p>
          </table:table-cell>
          <table:table-cell table:style-name="ce44" table:formula="of:=([.C27]-[.$C$30])/[.$C$30]" office:value-type="percentage" office:value="0.00255146929438685" calcext:value-type="percentage">
            <text:p>0.26%</text:p>
          </table:table-cell>
          <table:table-cell/>
          <table:table-cell office:value-type="string" calcext:value-type="string">
            <text:p>MIL5606 Fluid</text:p>
          </table:table-cell>
          <table:table-cell/>
          <table:table-cell table:style-name="ce37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office:value-type="string" calcext:value-type="string">
            <text:p>Portion 5</text:p>
          </table:table-cell>
          <table:table-cell table:style-name="ce41" office:value-type="float" office:value="8915" calcext:value-type="float">
            <text:p>8915</text:p>
          </table:table-cell>
          <table:table-cell table:style-name="ce44" table:formula="of:=([.C28]-[.$C$30])/[.$C$30]" office:value-type="percentage" office:value="-0.0195539327819813" calcext:value-type="percentage">
            <text:p>-1.96%</text:p>
          </table:table-cell>
          <table:table-cell/>
          <table:table-cell office:value-type="string" calcext:value-type="string">
            <text:p>Temperature</text:p>
          </table:table-cell>
          <table:table-cell/>
          <table:table-cell table:style-name="ce37" office:value-type="string" calcext:value-type="string">
            <text:p>40'C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table:number-columns-repeated="5"/>
          <table:table-cell office:value-type="string" calcext:value-type="string">
            <text:p>10ml Weight</text:p>
          </table:table-cell>
          <table:table-cell/>
          <table:table-cell table:style-name="ce82" office:value-type="float" office:value="8.419" calcext:value-type="float">
            <text:p>8.42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style-name="ce42" table:formula="of:=AVERAGE([.C24:.C28])" office:value-type="float" office:value="9092.8" calcext:value-type="float">
            <text:p>9093</text:p>
          </table:table-cell>
          <table:table-cell table:number-columns-repeated="2"/>
          <table:table-cell office:value-type="string" calcext:value-type="string">
            <text:p>After 100ml</text:p>
          </table:table-cell>
          <table:table-cell/>
          <table:table-cell table:style-name="ce82" office:value-type="float" office:value="86.379" calcext:value-type="float">
            <text:p>86.38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office:value-type="string" calcext:value-type="string">
            <text:p>Sample StdDev</text:p>
          </table:table-cell>
          <table:table-cell table:style-name="ce42" table:formula="of:=STDEVP([.C24:.C28])" office:value-type="float" office:value="100.122724693248" calcext:value-type="float">
            <text:p>100</text:p>
          </table:table-cell>
          <table:table-cell table:number-columns-repeated="2"/>
          <table:table-cell office:value-type="string" calcext:value-type="string">
            <text:p>Flush</text:p>
          </table:table-cell>
          <table:table-cell/>
          <table:table-cell table:style-name="ce37" office:value-type="float" office:value="15" calcext:value-type="float">
            <text:p>15</text:p>
          </table:table-cell>
          <table:table-cell office:value-type="string" calcext:value-type="string">
            <text:p>ml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table:number-columns-repeated="2"/>
          <table:table-cell table:style-name="ce42">
            <draw:frame draw:z-index="0" draw:name="Image 3" draw:style-name="gr2" draw:text-style-name="P2" svg:width="4.44cm" svg:height="1.664cm" svg:x="0cm" svg:y="0.447cm">
              <draw:image xlink:href="Pictures/10000001000001B0000000A2370564DF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office:value-type="string" calcext:value-type="string">
            <text:p>Sample</text:p>
          </table:table-cell>
          <table:table-cell/>
          <table:table-cell table:style-name="ce37" office:value-type="float" office:value="40" calcext:value-type="float">
            <text:p>40</text:p>
          </table:table-cell>
          <table:table-cell office:value-type="string" calcext:value-type="string">
            <text:p>ml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table:number-columns-repeated="5"/>
          <table:table-cell office:value-type="string" calcext:value-type="string">
            <text:p>Total Fluid</text:p>
          </table:table-cell>
          <table:table-cell/>
          <table:table-cell table:style-name="ce37" table:formula="of:=[.H31]+[.H32]" office:value-type="float" office:value="55" calcext:value-type="float">
            <text:p>55</text:p>
          </table:table-cell>
          <table:table-cell office:value-type="string" calcext:value-type="string">
            <text:p>ml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table:number-columns-repeated="2"/>
          <table:table-cell table:style-name="ce44"/>
          <table:table-cell table:number-columns-repeated="2"/>
          <table:table-cell office:value-type="string" calcext:value-type="string">
            <text:p>Final Weight</text:p>
          </table:table-cell>
          <table:table-cell/>
          <table:table-cell table:style-name="ce82" office:value-type="float" office:value="39.51" calcext:value-type="float">
            <text:p>39.51</text:p>
          </table:table-cell>
          <table:table-cell office:value-type="string" calcext:value-type="string">
            <text:p>g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 office:value-type="string" calcext:value-type="string">
            <text:p>Fluid Weight Taken</text:p>
          </table:table-cell>
          <table:table-cell/>
          <table:table-cell table:style-name="ce82" table:formula="of:=[.H30]-[.H34]" office:value-type="float" office:value="46.869" calcext:value-type="float">
            <text:p>46.87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 table:style-name="ce80" office:value-type="string" calcext:value-type="string">
            <text:p>ml taken</text:p>
          </table:table-cell>
          <table:table-cell table:style-name="ce81"/>
          <table:table-cell table:style-name="ce83" table:formula="of:=[.H35]/[.H29]*10" office:value-type="float" office:value="55.6705071861266" calcext:value-type="float">
            <text:p>55.67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37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office:value-type="string" calcext:value-type="string">
            <text:p>CV<text:span text:style-name="T6">VOL</text:span></text:p>
          </table:table-cell>
          <table:table-cell table:style-name="ce45" table:formula="of:=[.C31]/[.C30]" office:value-type="percentage" office:value="0.0110112093847053" calcext:value-type="percentage">
            <text:p>1.10%</text:p>
          </table:table-cell>
          <table:table-cell table:style-name="ce77" table:formula="of:=IF([.C38]&lt;0.03;&quot;&lt;3% = PASS&quot;;&quot;&gt;3% = FAIL&quot;)" office:value-type="string" office:string-value="&lt;3% = PASS" calcext:value-type="string">
            <text:p>&lt;3% = PASS</text:p>
          </table:table-cell>
          <table:table-cell table:style-name="Default"/>
          <table:table-cell office:value-type="string" calcext:value-type="string">
            <text:p>Error</text:p>
          </table:table-cell>
          <table:table-cell/>
          <table:table-cell table:style-name="ce84" table:formula="of:=[.H36]/[.H33]-1" office:value-type="percentage" office:value="0.0121910397477569" calcext:value-type="percentage">
            <text:p>1.22%</text:p>
          </table:table-cell>
          <table:table-cell/>
          <table:table-cell table:style-name="ce11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148"/>
          <table:table-cell table:style-name="ce11" table:number-columns-repeated="2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table:style-name="ce89"/>
          <table:table-cell table:style-name="Default" table:number-columns-repeated="4"/>
          <table:table-cell table:number-columns-repeated="2"/>
          <table:table-cell table:style-name="ce13"/>
          <table:table-cell table:style-name="ce11" table:number-columns-repeated="2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table:style-name="Default"/>
          <table:table-cell table:style-name="ce55"/>
          <table:table-cell table:style-name="Default" table:number-columns-repeated="2"/>
          <table:table-cell table:number-columns-repeated="3"/>
          <table:table-cell table:style-name="ce14"/>
          <table:table-cell table:style-name="ce11" table:number-columns-repeated="2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table:style-name="Default" table:number-columns-repeated="4"/>
          <table:table-cell table:number-columns-repeated="3"/>
          <table:table-cell table:style-name="ce13"/>
          <table:table-cell table:style-name="ce11" table:number-columns-repeated="2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table:style-name="Default" table:number-columns-repeated="4"/>
          <table:table-cell table:number-columns-repeated="3"/>
          <table:table-cell table:style-name="ce14"/>
          <table:table-cell table:style-name="ce11" table:number-columns-repeated="2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table:style-name="Default" table:number-columns-repeated="2"/>
          <table:table-cell table:style-name="ce89"/>
          <table:table-cell table:style-name="Default"/>
          <table:table-cell table:style-name="ce103"/>
          <table:table-cell table:number-columns-repeated="2"/>
          <table:table-cell table:style-name="ce151"/>
          <table:table-cell table:style-name="ce11" table:number-columns-repeated="2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table:style-name="Default" table:number-columns-repeated="4"/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table:style-name="Default" table:number-columns-repeated="4"/>
          <table:table-cell table:number-columns-repeated="4"/>
          <table:table-cell table:style-name="ce44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table:style-name="Default" table:number-columns-repeated="4"/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 table:number-rows-repeated="2"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table:number-columns-repeated="8"/>
          <table:table-cell table:style-name="ce44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calcext:conditional-formats>
          <calcext:conditional-format calcext:target-range-address="'Annex A Preliminary Check'.D38:'Annex A Preliminary Check'.D38">
            <calcext:condition calcext:apply-style-name="Good" calcext:value="=&quot;&lt;3% = PASS&quot;" calcext:base-cell-address="'Annex A Preliminary Check'.D38"/>
            <calcext:condition calcext:apply-style-name="Bad" calcext:value="!=&quot;&lt;3% = PASS&quot;" calcext:base-cell-address="'Annex A Preliminary Check'.D38"/>
          </calcext:conditional-format>
          <calcext:conditional-format calcext:target-range-address="'Annex A Preliminary Check'.C38:'Annex A Preliminary Check'.C38">
            <calcext:condition calcext:apply-style-name="Good" calcext:value="&lt;0.03" calcext:base-cell-address="'Annex A Preliminary Check'.C38"/>
            <calcext:condition calcext:apply-style-name="Bad" calcext:value="&gt;=0.03" calcext:base-cell-address="'Annex A Preliminary Check'.C38"/>
          </calcext:conditional-format>
        </calcext:conditional-formats>
      </table:table>
      <table:table table:name="Annex B Coincidence Limit" table:style-name="ta1">
        <table:shapes>
          <draw:frame draw:z-index="0" draw:style-name="gr3" draw:text-style-name="P2" svg:width="23.951cm" svg:height="15.239cm" svg:x="0.186cm" svg:y="18.129cm">
            <draw:object draw:notify-on-update-of-ranges="'Annex A Preliminary Check'.E22:'Annex B Coincidence Limit'.E37 'Annex A Preliminary Check'.G22:'Annex B Coincidence Limit'.G37 'Annex A Preliminary Check'.E22:'Annex B Coincidence Limit'.E37 'Annex A Preliminary Check'.L21:'Annex B Coincidence Limit'.L21 'Annex A Preliminary Check'.L22:'Annex B Coincidence Limit'.L37 'Annex A Preliminary Check'.E22:'Annex B Coincidence Limit'.E37 'Annex A Preliminary Check'.K21:'Annex B Coincidence Limit'.K21 'Annex A Preliminary Check'.K22:'Annex B Coincidence Limit'.K37 'Annex A Preliminary Check'.E22:'Annex B Coincidence Limit'.E37 'Annex A Preliminary Check'.I21:'Annex B Coincidence Limit'.I21 'Annex A Preliminary Check'.I22:'Annex B Coincidence Limit'.I3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3" draw:text-style-name="P2" svg:width="20.348cm" svg:height="15.238cm" svg:x="24.798cm" svg:y="18.113cm">
            <draw:object draw:notify-on-update-of-ranges="'Annex A Preliminary Check'.L22:'Annex B Coincidence Limit'.L37 'Annex A Preliminary Check'.M22:'Annex B Coincidence Limit'.M22 'Annex A Preliminary Check'.L22:'Annex B Coincidence Limit'.L37 'Annex A Preliminary Check'.M22:'Annex B Coincidence Limit'.M3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name="Text Frame 1" draw:style-name="gr4" draw:text-style-name="P3" svg:width="19.604cm" svg:height="10.409cm" svg:x="31.597cm" svg:y="7.34cm">
            <draw:text-box>
              <text:p>Procedure</text:p>
              <text:p/>
              <text:p>Make up concentrated suspension of RM8632a such that about 10ml or concentrate increases the tank contamination level by 10% of the estimated coincidence limit. Use the calculator in this worksheet to establish and record mass of dust and fluid volumes.</text:p>
              <text:p/>
              <text:p>Each time another dose is added, start a single online test with 2m flush and 6x 10ml portions. Discard the first portion of each test.</text:p>
              <text:p/>
              <text:p>The results are then imported into this spreadsheet and the portions averaged for each dose level.</text:p>
              <text:p/>
              <text:p>The averages are entered into the table as well as the added ml of concentrate for each dose.</text:p>
              <text:p/>
              <text:p>The counts are plotted in the figure and the first 4 results (10,20,30,40% nominal coincidence limit) used to generate a linear regression line.</text:p>
              <text:p/>
              <text:p>ENSURE UNIT REMAINS ONLINE SO RESULTS ARE LOGGED</text:p>
              <text:p/>
            </draw:text-box>
          </draw:frame>
        </table:shapes>
        <table:table-column table:style-name="co4" table:number-columns-repeated="13" table:default-cell-style-name="Default"/>
        <table:table-column table:style-name="co7" table:default-cell-style-name="Default"/>
        <table:table-column table:style-name="co4" table:number-columns-repeated="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default-cell-style-name="ce20"/>
        <table:table-column table:style-name="co4" table:default-cell-style-name="ce76"/>
        <table:table-column table:style-name="co4" table:number-columns-repeated="979" table:default-cell-style-name="Default"/>
        <table:table-row table:style-name="ro7">
          <table:table-cell table:style-name="ce109" office:value-type="string" calcext:value-type="string">
            <text:p>Δ<text:span text:style-name="T2">COUNTS_4um</text:span> &lt; 5%</text:p>
          </table:table-cell>
          <table:table-cell table:style-name="ce133" office:value-type="string" calcext:value-type="string">
            <text:p>RM8632x</text:p>
          </table:table-cell>
          <table:table-cell table:style-name="ce109" office:value-type="string" calcext:value-type="string" table:number-columns-spanned="10" table:number-rows-spanned="1">
            <text:p>Annex B – Coincidence error limit</text:p>
            <text:p>Analyse <text:span text:style-name="T5">15 different concentrations</text:span> 5 times, of 10%...150% of manufacturer recommended coincidence limit. 0-40% regression line of 4um channel used to project results. Error limit when counts cross 95% of this line.</text:p>
          </table:table-cell>
          <table:covered-table-cell table:number-columns-repeated="9" table:style-name="ce133"/>
          <table:table-cell table:style-name="ce88"/>
          <table:table-cell table:style-name="ce162" office:value-type="string" calcext:value-type="string">
            <text:p>NAVAIR</text:p>
          </table:table-cell>
          <table:table-cell/>
          <table:table-cell table:style-name="ce88"/>
          <table:table-cell table:number-columns-repeated="12"/>
          <table:table-cell table:style-name="Default" table:number-columns-repeated="2"/>
          <table:table-cell table:number-columns-repeated="114"/>
          <table:table-cell table:style-name="ce88" table:number-columns-repeated="865"/>
        </table:table-row>
        <table:table-row table:style-name="ro2">
          <table:table-cell table:style-name="ce127" office:value-type="date" office:date-value="2025-05-09" calcext:value-type="date">
            <text:p>2025-05-09</text:p>
          </table:table-cell>
          <table:table-cell table:number-columns-repeated="27"/>
          <table:table-cell table:style-name="Default" table:number-columns-repeated="2"/>
          <table:table-cell table:number-columns-repeated="979"/>
        </table:table-row>
        <table:table-row table:style-name="ro2">
          <table:table-cell table:number-columns-repeated="13"/>
          <table:table-cell table:style-name="ce115" office:value-type="string" calcext:value-type="string">
            <text:p>APC Model</text:p>
          </table:table-cell>
          <table:table-cell table:style-name="ce117" table:number-columns-repeated="2"/>
          <table:table-cell table:style-name="ce168" office:value-type="string" calcext:value-type="string">
            <text:p>LPA3-NAVAIR</text:p>
          </table:table-cell>
          <table:table-cell table:number-columns-repeated="10"/>
          <table:table-cell table:style-name="ce89" office:value-type="string" calcext:value-type="string">
            <text:p>portion</text:p>
          </table:table-cell>
          <table:table-cell table:style-name="ce89"/>
          <table:table-cell table:style-name="Default"/>
          <table:table-cell table:number-columns-repeated="979"/>
        </table:table-row>
        <table:table-row table:style-name="ro2">
          <table:table-cell table:number-columns-repeated="13"/>
          <table:table-cell table:style-name="ce164" office:value-type="string" calcext:value-type="string">
            <text:p>APC S/N</text:p>
          </table:table-cell>
          <table:table-cell table:number-columns-repeated="2"/>
          <table:table-cell table:style-name="ce119" office:value-type="string" calcext:value-type="string">
            <text:p>11171-00011</text:p>
          </table:table-cell>
          <table:table-cell table:number-columns-repeated="9"/>
          <table:table-cell office:value-type="string" calcext:value-type="string">
            <text:p>D<text:span text:style-name="T6">Q</text:span></text:p>
          </table:table-cell>
          <table:table-cell table:style-name="ce89" office:value-type="string" calcext:value-type="string">
            <text:p>counts</text:p>
          </table:table-cell>
          <table:table-cell table:style-name="ce89" office:value-type="string" calcext:value-type="string">
            <text:p>Averaged</text:p>
          </table:table-cell>
          <table:table-cell table:style-name="Default" office:value-type="string" calcext:value-type="string">
            <text:p>Dq % (&lt;11%)</text:p>
          </table:table-cell>
          <table:table-cell table:number-columns-repeated="979"/>
        </table:table-row>
        <table:table-row table:style-name="ro2">
          <table:table-cell table:number-columns-repeated="13"/>
          <table:table-cell table:style-name="ce164" office:value-type="string" calcext:value-type="string">
            <text:p>Sensor S/N</text:p>
          </table:table-cell>
          <table:table-cell table:number-columns-repeated="2"/>
          <table:table-cell table:style-name="ce119" office:value-type="string" calcext:value-type="string">
            <text:p>11171-00011</text:p>
          </table:table-cell>
          <table:table-cell table:number-columns-repeated="10"/>
          <table:table-cell office:value-type="float" office:value="167569" calcext:value-type="float">
            <text:p>167569</text:p>
          </table:table-cell>
          <table:table-cell table:style-name="ce88"/>
          <table:table-cell table:style-name="Default"/>
          <table:table-cell table:number-columns-repeated="979"/>
        </table:table-row>
        <table:table-row table:style-name="ro2">
          <table:table-cell office:value-type="float" office:value="6300" calcext:value-type="float">
            <text:p>6300</text:p>
          </table:table-cell>
          <table:table-cell office:value-type="string" calcext:value-type="string">
            <text:p>/ml/mg/l</text:p>
          </table:table-cell>
          <table:table-cell office:value-type="string" calcext:value-type="string">
            <text:p>RM8632a 4μm particles</text:p>
          </table:table-cell>
          <table:table-cell table:number-columns-repeated="5"/>
          <table:table-cell office:value-type="float" office:value="60000" calcext:value-type="float">
            <text:p>60000</text:p>
          </table:table-cell>
          <table:table-cell table:number-columns-repeated="4"/>
          <table:table-cell table:style-name="ce164" office:value-type="string" calcext:value-type="string">
            <text:p>Date</text:p>
          </table:table-cell>
          <table:table-cell table:number-columns-repeated="2"/>
          <table:table-cell table:style-name="ce170" office:value-type="date" office:date-value="2025-05-14" calcext:value-type="date">
            <text:p>2025-05-14</text:p>
          </table:table-cell>
          <table:table-cell table:number-columns-repeated="10"/>
          <table:table-cell office:value-type="float" office:value="169407" calcext:value-type="float">
            <text:p>169407</text:p>
          </table:table-cell>
          <table:table-cell table:style-name="Default" table:number-columns-repeated="2"/>
          <table:table-cell table:number-columns-repeated="979"/>
        </table:table-row>
        <table:table-row table:style-name="ro2">
          <table:table-cell office:value-type="float" office:value="11.68" calcext:value-type="float">
            <text:p>11.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ank fluid volume</text:p>
          </table:table-cell>
          <table:table-cell table:number-columns-repeated="10"/>
          <table:table-cell table:style-name="ce164" office:value-type="string" calcext:value-type="string">
            <text:p>Operator</text:p>
          </table:table-cell>
          <table:table-cell table:number-columns-repeated="2"/>
          <table:table-cell table:style-name="ce171" office:value-type="string" calcext:value-type="string">
            <text:p>JMD</text:p>
          </table:table-cell>
          <table:table-cell table:number-columns-repeated="10"/>
          <table:table-cell office:value-type="float" office:value="169243" calcext:value-type="float">
            <text:p>169243</text:p>
          </table:table-cell>
          <table:table-cell table:formula="of:=SUM([.AB5:.AB7])/3" office:value-type="float" office:value="168739.666666667" calcext:value-type="float">
            <text:p>168740</text:p>
          </table:table-cell>
          <table:table-cell table:formula="of:=(MAX([.AB5:.AB6])-MIN([.AB5:.AB6]))/[.AC7]*100" office:value-type="float" office:value="1.0892518850537" calcext:value-type="float">
            <text:p>1.1</text:p>
          </table:table-cell>
          <table:table-cell table:number-columns-repeated="979"/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Manufacturer recommended coincidence limit</text:p>
          </table:table-cell>
          <table:table-cell table:number-columns-repeated="10"/>
          <table:table-cell table:style-name="ce164" office:value-type="string" calcext:value-type="string">
            <text:p>Threshold Noise</text:p>
          </table:table-cell>
          <table:table-cell table:number-columns-repeated="2"/>
          <table:table-cell table:style-name="ce172" office:value-type="float" office:value="38" calcext:value-type="float">
            <text:p>38</text:p>
          </table:table-cell>
          <table:table-cell table:number-columns-repeated="10"/>
          <table:table-cell office:value-type="float" office:value="292859" calcext:value-type="float">
            <text:p>292859</text:p>
          </table:table-cell>
          <table:table-cell table:number-columns-repeated="981"/>
        </table:table-row>
        <table:table-row table:style-name="ro2">
          <table:table-cell table:formula="of:=[.A8]/10" office:value-type="float" office:value="2000" calcext:value-type="float">
            <text:p>20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10% of coincidence limit</text:p>
          </table:table-cell>
          <table:table-cell table:number-columns-repeated="10"/>
          <table:table-cell table:style-name="ce164"/>
          <table:table-cell table:number-columns-repeated="2"/>
          <table:table-cell table:style-name="ce173"/>
          <table:table-cell table:number-columns-repeated="10"/>
          <table:table-cell office:value-type="float" office:value="301110" calcext:value-type="float">
            <text:p>301110</text:p>
          </table:table-cell>
          <table:table-cell table:number-columns-repeated="981"/>
        </table:table-row>
        <table:table-row table:style-name="ro2">
          <table:table-cell table:style-name="ce32" table:formula="of:=[.A9]/[.A6]*[.A7]" office:value-type="float" office:value="3.70793650793651" calcext:value-type="float">
            <text:p>3.708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mount of RM8632a to add to tank per 10% estimated coincidence limit</text:p>
          </table:table-cell>
          <table:table-cell table:number-columns-repeated="10"/>
          <table:table-cell table:style-name="ce165" office:value-type="string" calcext:value-type="string">
            <text:p>Coincidence Correction</text:p>
          </table:table-cell>
          <table:table-cell table:style-name="ce91" table:number-columns-repeated="2"/>
          <table:table-cell table:style-name="ce174" office:value-type="string" calcext:value-type="string">
            <text:p>ENABLED</text:p>
          </table:table-cell>
          <table:table-cell table:number-columns-repeated="10"/>
          <table:table-cell office:value-type="float" office:value="299624" calcext:value-type="float">
            <text:p>299624</text:p>
          </table:table-cell>
          <table:table-cell table:number-columns-repeated="981"/>
        </table:table-row>
        <table:table-row table:style-name="ro2">
          <table:table-cell table:style-name="ce53" table:formula="of:=[.A10]*100" office:value-type="float" office:value="370.793650793651" calcext:value-type="float">
            <text:p>370.79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Required concentration of concentrate if want this per 10ml of concentrate</text:p>
          </table:table-cell>
          <table:table-cell table:number-columns-repeated="24"/>
          <table:table-cell office:value-type="float" office:value="285382" calcext:value-type="float">
            <text:p>285382</text:p>
          </table:table-cell>
          <table:table-cell table:formula="of:=SUM([.AB8:.AB11])/4" office:value-type="float" office:value="294743.75" calcext:value-type="float">
            <text:p>294744</text:p>
          </table:table-cell>
          <table:table-cell table:formula="of:=(MAX([.AB8:.AB10])-MIN([.AB8:.AB10]))/[.AC11]*100" office:value-type="float" office:value="2.7993808180835" calcext:value-type="float">
            <text:p>2.8</text:p>
          </table:table-cell>
          <table:table-cell table:number-columns-repeated="979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Amount of fluid to use to make up concentrate</text:p>
          </table:table-cell>
          <table:table-cell table:number-columns-repeated="24"/>
          <table:table-cell office:value-type="float" office:value="458207" calcext:value-type="float">
            <text:p>458207</text:p>
          </table:table-cell>
          <table:table-cell table:number-columns-repeated="981"/>
        </table:table-row>
        <table:table-row table:style-name="ro2">
          <table:table-cell table:style-name="ce130" table:formula="of:=[.A11]*[.A12]/1000" office:value-type="float" office:value="74.1587301587302" calcext:value-type="float">
            <text:p>74.16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mount of RM8632a to add to fluid used to make up concentrate.</text:p>
          </table:table-cell>
          <table:table-cell table:number-columns-repeated="24"/>
          <table:table-cell office:value-type="float" office:value="465138" calcext:value-type="float">
            <text:p>465138</text:p>
          </table:table-cell>
          <table:table-cell table:number-columns-repeated="981"/>
        </table:table-row>
        <table:table-row table:style-name="ro2">
          <table:table-cell office:value-type="float" office:value="74.66" calcext:value-type="float">
            <text:p>74.66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dded</text:p>
          </table:table-cell>
          <table:table-cell table:number-columns-repeated="24"/>
          <table:table-cell office:value-type="float" office:value="454200" calcext:value-type="float">
            <text:p>454200</text:p>
          </table:table-cell>
          <table:table-cell table:number-columns-repeated="981"/>
        </table:table-row>
        <table:table-row table:style-name="ro2">
          <table:table-cell table:style-name="ce53" table:formula="of:=[.A11]*[.A14]/[.A13]" office:value-type="float" office:value="373.3" calcext:value-type="float">
            <text:p>373.30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Actual concentration</text:p>
          </table:table-cell>
          <table:table-cell table:number-columns-repeated="24"/>
          <table:table-cell office:value-type="float" office:value="445750" calcext:value-type="float">
            <text:p>445750</text:p>
          </table:table-cell>
          <table:table-cell table:number-columns-repeated="981"/>
        </table:table-row>
        <table:table-row table:style-name="ro2">
          <table:table-cell table:style-name="ce53" table:formula="of:=[.A13]/[.A14]*10" office:value-type="float" office:value="9.93285965158454" calcext:value-type="float">
            <text:p>9.9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corrected volume to add to tank</text:p>
          </table:table-cell>
          <table:table-cell table:number-columns-repeated="24"/>
          <table:table-cell office:value-type="float" office:value="443747" calcext:value-type="float">
            <text:p>443747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453143" calcext:value-type="float">
            <text:p>453143</text:p>
          </table:table-cell>
          <table:table-cell table:number-columns-repeated="981"/>
        </table:table-row>
        <table:table-row table:style-name="ro2">
          <table:table-cell table:style-name="ce131" office:value-type="float" office:value="1000000000" calcext:value-type="float">
            <text:p>1.00E+09</text:p>
          </table:table-cell>
          <table:table-cell/>
          <table:table-cell office:value-type="string" calcext:value-type="string">
            <text:p>correction threshold</text:p>
          </table:table-cell>
          <table:table-cell table:number-columns-repeated="24"/>
          <table:table-cell office:value-type="float" office:value="436276" calcext:value-type="float">
            <text:p>436276</text:p>
          </table:table-cell>
          <table:table-cell table:number-columns-repeated="981"/>
        </table:table-row>
        <table:table-row table:style-name="ro2"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correction factor</text:p>
          </table:table-cell>
          <table:table-cell table:number-columns-repeated="24"/>
          <table:table-cell office:value-type="float" office:value="454474" calcext:value-type="float">
            <text:p>454474</text:p>
          </table:table-cell>
          <table:table-cell table:number-columns-repeated="981"/>
        </table:table-row>
        <table:table-row table:style-name="ro2">
          <table:table-cell table:style-name="ce48" table:number-columns-repeated="2"/>
          <table:table-cell table:style-name="ce48" office:value-type="string" calcext:value-type="string">
            <text:p>Total</text:p>
          </table:table-cell>
          <table:table-cell table:style-name="ce48" office:value-type="string" calcext:value-type="string">
            <text:p>Added</text:p>
          </table:table-cell>
          <table:table-cell table:style-name="ce48" office:value-type="string" calcext:value-type="string">
            <text:p>Tank</text:p>
          </table:table-cell>
          <table:table-cell table:style-name="ce48" office:value-type="string" calcext:value-type="string">
            <text:p>Expected</text:p>
          </table:table-cell>
          <table:table-cell table:style-name="ce48" office:value-type="string" calcext:value-type="string">
            <text:p>4μm</text:p>
          </table:table-cell>
          <table:table-cell table:style-name="ce48" office:value-type="string" calcext:value-type="string">
            <text:p>Ratio</text:p>
          </table:table-cell>
          <table:table-cell table:style-name="ce48" office:value-type="string" calcext:value-type="string">
            <text:p>Regression</text:p>
          </table:table-cell>
          <table:table-cell table:style-name="ce48" office:value-type="string" calcext:value-type="string">
            <text:p>Relative</text:p>
          </table:table-cell>
          <table:table-cell table:style-name="ce48" table:number-columns-repeated="2"/>
          <table:table-cell table:style-name="ce48" office:value-type="string" calcext:value-type="string">
            <text:p>corrected</text:p>
          </table:table-cell>
          <table:table-cell table:number-columns-repeated="14"/>
          <table:table-cell office:value-type="float" office:value="454993" calcext:value-type="float">
            <text:p>454993</text:p>
          </table:table-cell>
          <table:table-cell table:number-columns-repeated="981"/>
        </table:table-row>
        <table:table-row table:style-name="ro2">
          <table:table-cell table:style-name="ce49" office:value-type="string" calcext:value-type="string">
            <text:p>Percent</text:p>
          </table:table-cell>
          <table:table-cell table:style-name="ce49" office:value-type="string" calcext:value-type="string">
            <text:p>Added ml</text:p>
          </table:table-cell>
          <table:table-cell table:style-name="ce49" office:value-type="string" calcext:value-type="string">
            <text:p>added</text:p>
          </table:table-cell>
          <table:table-cell table:style-name="ce49" office:value-type="string" calcext:value-type="string">
            <text:p>Dust mg</text:p>
          </table:table-cell>
          <table:table-cell table:style-name="ce49" office:value-type="string" calcext:value-type="string">
            <text:p>Conc mg/l</text:p>
          </table:table-cell>
          <table:table-cell table:style-name="ce49" office:value-type="string" calcext:value-type="string">
            <text:p>4μm/100ml</text:p>
          </table:table-cell>
          <table:table-cell table:style-name="ce49" office:value-type="string" calcext:value-type="string">
            <text:p>Actual</text:p>
          </table:table-cell>
          <table:table-cell table:style-name="ce49" office:value-type="string" calcext:value-type="string">
            <text:p>RM8632a</text:p>
          </table:table-cell>
          <table:table-cell table:style-name="ce49" office:value-type="string" calcext:value-type="string">
            <text:p>Line 0-40%</text:p>
          </table:table-cell>
          <table:table-cell table:style-name="ce49" office:value-type="string" calcext:value-type="string">
            <text:p>Deviation</text:p>
          </table:table-cell>
          <table:table-cell table:style-name="ce70" table:formula="of:=&quot;95%&quot;" office:value-type="string" office:string-value="95%" calcext:value-type="string">
            <text:p>95%</text:p>
          </table:table-cell>
          <table:table-cell table:style-name="ce49" office:value-type="string" calcext:value-type="string">
            <text:p>corrected</text:p>
          </table:table-cell>
          <table:table-cell table:style-name="ce49" office:value-type="string" calcext:value-type="string">
            <text:p>fraction</text:p>
          </table:table-cell>
          <table:table-cell table:number-columns-repeated="14"/>
          <table:table-cell office:value-type="float" office:value="462615" calcext:value-type="float">
            <text:p>462615</text:p>
          </table:table-cell>
          <table:table-cell table:formula="of:=SUM([.AB12:.AB21])/(17-8+1)" office:value-type="float" office:value="452854.3" calcext:value-type="float">
            <text:p>452854</text:p>
          </table:table-cell>
          <table:table-cell table:formula="of:=(MAX([.AB12:.AB20])-MIN([.AB12:.AB20]))/[.AC21]*100" office:value-type="float" office:value="6.37335231221168" calcext:value-type="float">
            <text:p>6.4</text:p>
          </table:table-cell>
          <table:table-cell table:number-columns-repeated="979"/>
        </table:table-row>
        <table:table-row table:style-name="ro2">
          <table:table-cell table:style-name="ce50" office:value-type="float" office:value="0" calcext:value-type="float">
            <text:p>0</text:p>
          </table:table-cell>
          <table:table-cell table:number-columns-repeated="2" table:style-name="ce58" office:value-type="float" office:value="0" calcext:value-type="float">
            <text:p>0.0</text:p>
          </table:table-cell>
          <table:table-cell table:number-columns-repeated="2" table:style-name="ce61" office:value-type="float" office:value="0" calcext:value-type="float">
            <text:p>0.00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/>
          <table:table-cell table:number-columns-repeated="2" table:style-name="ce50" office:value-type="float" office:value="1" calcext:value-type="float">
            <text:p>1</text:p>
          </table:table-cell>
          <table:table-cell table:style-name="ce71" table:formula="of:=[.I22]*0.95" office:value-type="float" office:value="0.95" calcext:value-type="float">
            <text:p>0.95</text:p>
          </table:table-cell>
          <table:table-cell table:style-name="ce72" table:formula="of:=IF([.G22]&lt;[.$A$18]; [.G22]; [.G22]*(1+[.G22]/[.$A$18]*[.$A$19]))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14"/>
          <table:table-cell office:value-type="float" office:value="578672" calcext:value-type="float">
            <text:p>578672</text:p>
          </table:table-cell>
          <table:table-cell table:number-columns-repeated="981"/>
        </table:table-row>
        <table:table-row table:style-name="ro2"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9.9" calcext:value-type="float">
            <text:p>9.9</text:p>
          </table:table-cell>
          <table:table-cell table:style-name="ce58" table:formula="of:=[.B23]" office:value-type="float" office:value="9.9" calcext:value-type="float">
            <text:p>9.9</text:p>
          </table:table-cell>
          <table:table-cell table:style-name="ce61" table:formula="of:=[.C23]*[.$A$15]/1000" office:value-type="float" office:value="3.69567" calcext:value-type="float">
            <text:p>3.696</text:p>
          </table:table-cell>
          <table:table-cell table:style-name="ce61" table:formula="of:=[.D23]/([.$A$7]+[.C23]/1000)" office:value-type="float" office:value="0.316142139795892" calcext:value-type="float">
            <text:p>0.316</text:p>
          </table:table-cell>
          <table:table-cell table:style-name="ce64" table:formula="of:=[.$A$6]*[.E23]*100" office:value-type="float" office:value="199169.548071412" calcext:value-type="float">
            <text:p>199170</text:p>
          </table:table-cell>
          <table:table-cell table:style-name="ce50" office:value-type="float" office:value="158573" calcext:value-type="float">
            <text:p>158573</text:p>
          </table:table-cell>
          <table:table-cell table:style-name="ce67" table:formula="of:=[.G23]/[.F23]" office:value-type="float" office:value="0.796170908331548" calcext:value-type="float">
            <text:p>0.80</text:p>
          </table:table-cell>
          <table:table-cell table:style-name="ce64" table:formula="of:=[.E23]*[.$C$99]" office:value-type="float" office:value="156479.435527948" calcext:value-type="float">
            <text:p>156479</text:p>
          </table:table-cell>
          <table:table-cell table:style-name="ce67" table:formula="of:=[.G23]/[.I23]" office:value-type="float" office:value="1.01337916682143" calcext:value-type="float">
            <text:p>1.01</text:p>
          </table:table-cell>
          <table:table-cell table:style-name="ce64" table:formula="of:=[.I23]*0.95" office:value-type="float" office:value="148655.463751551" calcext:value-type="float">
            <text:p>148655</text:p>
          </table:table-cell>
          <table:table-cell table:style-name="ce72" table:formula="of:=IF([.G23]&lt;[.$A$18]; [.G23]; [.G23]*(1+[.G23]/[.$A$18]*[.$A$19]))" office:value-type="float" office:value="158573" calcext:value-type="float">
            <text:p>158573</text:p>
          </table:table-cell>
          <table:table-cell table:style-name="ce74" table:formula="of:=[.L23]/[.I23]" office:value-type="float" office:value="1.01337916682143" calcext:value-type="float">
            <text:p>1.01337916682143</text:p>
          </table:table-cell>
          <table:table-cell table:number-columns-repeated="14"/>
          <table:table-cell office:value-type="float" office:value="581090" calcext:value-type="float">
            <text:p>581090</text:p>
          </table:table-cell>
          <table:table-cell table:number-columns-repeated="981"/>
        </table:table-row>
        <table:table-row table:style-name="ro2"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9.9" calcext:value-type="float">
            <text:p>9.9</text:p>
          </table:table-cell>
          <table:table-cell table:style-name="ce58" table:formula="of:=[.C23]+[.B24]" office:value-type="float" office:value="19.8" calcext:value-type="float">
            <text:p>19.8</text:p>
          </table:table-cell>
          <table:table-cell table:style-name="ce61" table:formula="of:=[.C24]*[.$A$15]/1000" office:value-type="float" office:value="7.39134" calcext:value-type="float">
            <text:p>7.391</text:p>
          </table:table-cell>
          <table:table-cell table:style-name="ce61" table:formula="of:=[.D24]/([.$A$7]+[.C24]/1000)" office:value-type="float" office:value="0.631749260671123" calcext:value-type="float">
            <text:p>0.632</text:p>
          </table:table-cell>
          <table:table-cell table:style-name="ce64" table:formula="of:=[.$A$6]*[.E24]*100" office:value-type="float" office:value="398002.034222807" calcext:value-type="float">
            <text:p>398002</text:p>
          </table:table-cell>
          <table:table-cell table:style-name="ce50" office:value-type="float" office:value="315866" calcext:value-type="float">
            <text:p>315866</text:p>
          </table:table-cell>
          <table:table-cell table:style-name="ce67" table:formula="of:=[.G24]/[.F24]" office:value-type="float" office:value="0.793629109501419" calcext:value-type="float">
            <text:p>0.79</text:p>
          </table:table-cell>
          <table:table-cell table:style-name="ce64" table:formula="of:=[.E24]*[.$C$99]" office:value-type="float" office:value="312694.055176697" calcext:value-type="float">
            <text:p>312694</text:p>
          </table:table-cell>
          <table:table-cell table:style-name="ce67" table:formula="of:=[.G24]/[.I24]" office:value-type="float" office:value="1.0101439242953" calcext:value-type="float">
            <text:p>1.01</text:p>
          </table:table-cell>
          <table:table-cell table:style-name="ce64" table:formula="of:=[.I24]*0.95" office:value-type="float" office:value="297059.352417862" calcext:value-type="float">
            <text:p>297059</text:p>
          </table:table-cell>
          <table:table-cell table:style-name="ce72" table:formula="of:=IF([.G24]&lt;[.$A$18]; [.G24]; [.G24]*(1+[.G24]/[.$A$18]*[.$A$19]))" office:value-type="float" office:value="315866" calcext:value-type="float">
            <text:p>315866</text:p>
          </table:table-cell>
          <table:table-cell table:style-name="ce74" table:formula="of:=[.L24]/[.I24]" office:value-type="float" office:value="1.0101439242953" calcext:value-type="float">
            <text:p>1.0101439242953</text:p>
          </table:table-cell>
          <table:table-cell table:number-columns-repeated="14"/>
          <table:table-cell office:value-type="float" office:value="592101" calcext:value-type="float">
            <text:p>592101</text:p>
          </table:table-cell>
          <table:table-cell table:number-columns-repeated="981"/>
        </table:table-row>
        <table:table-row table:style-name="ro2"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9.9" calcext:value-type="float">
            <text:p>9.9</text:p>
          </table:table-cell>
          <table:table-cell table:style-name="ce58" table:formula="of:=[.C24]+[.B25]" office:value-type="float" office:value="29.7" calcext:value-type="float">
            <text:p>29.7</text:p>
          </table:table-cell>
          <table:table-cell table:style-name="ce61" table:formula="of:=[.C25]*[.$A$15]/1000" office:value-type="float" office:value="11.08701" calcext:value-type="float">
            <text:p>11.087</text:p>
          </table:table-cell>
          <table:table-cell table:style-name="ce61" table:formula="of:=[.D25]/([.$A$7]+[.C25]/1000)" office:value-type="float" office:value="0.94682271962561" calcext:value-type="float">
            <text:p>0.947</text:p>
          </table:table-cell>
          <table:table-cell table:style-name="ce64" table:formula="of:=[.$A$6]*[.E25]*100" office:value-type="float" office:value="596498.313364134" calcext:value-type="float">
            <text:p>596498</text:p>
          </table:table-cell>
          <table:table-cell table:style-name="ce50" office:value-type="float" office:value="471092" calcext:value-type="float">
            <text:p>471092</text:p>
          </table:table-cell>
          <table:table-cell table:style-name="ce67" table:formula="of:=[.G25]/[.F25]" office:value-type="float" office:value="0.789762501327344" calcext:value-type="float">
            <text:p>0.79</text:p>
          </table:table-cell>
          <table:table-cell table:style-name="ce64" table:formula="of:=[.E25]*[.$C$99]" office:value-type="float" office:value="468644.530614318" calcext:value-type="float">
            <text:p>468645</text:p>
          </table:table-cell>
          <table:table-cell table:style-name="ce67" table:formula="of:=[.G25]/[.I25]" office:value-type="float" office:value="1.00522244307956" calcext:value-type="float">
            <text:p>1.01</text:p>
          </table:table-cell>
          <table:table-cell table:style-name="ce64" table:formula="of:=[.I25]*0.95" office:value-type="float" office:value="445212.304083602" calcext:value-type="float">
            <text:p>445212</text:p>
          </table:table-cell>
          <table:table-cell table:style-name="ce72" table:formula="of:=IF([.G25]&lt;[.$A$18]; [.G25]; [.G25]*(1+[.G25]/[.$A$18]*[.$A$19]))" office:value-type="float" office:value="471092" calcext:value-type="float">
            <text:p>471092</text:p>
          </table:table-cell>
          <table:table-cell table:style-name="ce74" table:formula="of:=[.L25]/[.I25]" office:value-type="float" office:value="1.00522244307956" calcext:value-type="float">
            <text:p>1.00522244307956</text:p>
          </table:table-cell>
          <table:table-cell table:number-columns-repeated="14"/>
          <table:table-cell office:value-type="float" office:value="600145" calcext:value-type="float">
            <text:p>600145</text:p>
          </table:table-cell>
          <table:table-cell table:number-columns-repeated="981"/>
        </table:table-row>
        <table:table-row table:style-name="ro2"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9.9" calcext:value-type="float">
            <text:p>9.9</text:p>
          </table:table-cell>
          <table:table-cell table:style-name="ce58" table:formula="of:=[.C25]+[.B26]" office:value-type="float" office:value="39.6" calcext:value-type="float">
            <text:p>39.6</text:p>
          </table:table-cell>
          <table:table-cell table:style-name="ce61" table:formula="of:=[.C26]*[.$A$15]/1000" office:value-type="float" office:value="14.78268" calcext:value-type="float">
            <text:p>14.783</text:p>
          </table:table-cell>
          <table:table-cell table:style-name="ce61" table:formula="of:=[.D26]/([.$A$7]+[.C26]/1000)" office:value-type="float" office:value="1.26136386907403" calcext:value-type="float">
            <text:p>1.261</text:p>
          </table:table-cell>
          <table:table-cell table:style-name="ce64" table:formula="of:=[.$A$6]*[.E26]*100" office:value-type="float" office:value="794659.237516639" calcext:value-type="float">
            <text:p>794659</text:p>
          </table:table-cell>
          <table:table-cell table:style-name="ce50" office:value-type="float" office:value="620381" calcext:value-type="float">
            <text:p>620381</text:p>
          </table:table-cell>
          <table:table-cell table:style-name="ce67" table:formula="of:=[.G26]/[.F26]" office:value-type="float" office:value="0.780688087058209" calcext:value-type="float">
            <text:p>0.78</text:p>
          </table:table-cell>
          <table:table-cell table:style-name="ce64" table:formula="of:=[.E26]*[.$C$99]" office:value-type="float" office:value="624331.531239346" calcext:value-type="float">
            <text:p>624332</text:p>
          </table:table-cell>
          <table:table-cell table:style-name="ce67" table:formula="of:=[.G26]/[.I26]" office:value-type="float" office:value="0.993672382313443" calcext:value-type="float">
            <text:p>0.99</text:p>
          </table:table-cell>
          <table:table-cell table:style-name="ce64" table:formula="of:=[.I26]*0.95" office:value-type="float" office:value="593114.954677378" calcext:value-type="float">
            <text:p>593115</text:p>
          </table:table-cell>
          <table:table-cell table:style-name="ce72" table:formula="of:=IF([.G26]&lt;[.$A$18]; [.G26]; [.G26]*(1+[.G26]/[.$A$18]*[.$A$19]))" office:value-type="float" office:value="620381" calcext:value-type="float">
            <text:p>620381</text:p>
          </table:table-cell>
          <table:table-cell table:style-name="ce74" table:formula="of:=[.L26]/[.I26]" office:value-type="float" office:value="0.993672382313443" calcext:value-type="float">
            <text:p>0.993672382313443</text:p>
          </table:table-cell>
          <table:table-cell table:number-columns-repeated="2"/>
          <table:table-cell table:style-name="ce89" table:number-columns-repeated="2"/>
          <table:table-cell table:number-columns-repeated="10"/>
          <table:table-cell office:value-type="float" office:value="599839" calcext:value-type="float">
            <text:p>599839</text:p>
          </table:table-cell>
          <table:table-cell table:number-columns-repeated="2"/>
          <table:table-cell table:style-name="ce89" table:number-columns-repeated="979"/>
        </table:table-row>
        <table:table-row table:style-name="ro2"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9.9" calcext:value-type="float">
            <text:p>9.9</text:p>
          </table:table-cell>
          <table:table-cell table:style-name="ce58" table:formula="of:=[.C26]+[.B27]" office:value-type="float" office:value="49.5" calcext:value-type="float">
            <text:p>49.5</text:p>
          </table:table-cell>
          <table:table-cell table:style-name="ce61" table:formula="of:=[.C27]*[.$A$15]/1000" office:value-type="float" office:value="18.47835" calcext:value-type="float">
            <text:p>18.478</text:p>
          </table:table-cell>
          <table:table-cell table:style-name="ce61" table:formula="of:=[.D27]/([.$A$7]+[.C27]/1000)" office:value-type="float" office:value="1.57537405686517" calcext:value-type="float">
            <text:p>1.575</text:p>
          </table:table-cell>
          <table:table-cell table:style-name="ce64" table:formula="of:=[.$A$6]*[.E27]*100" office:value-type="float" office:value="992485.655825056" calcext:value-type="float">
            <text:p>992486</text:p>
          </table:table-cell>
          <table:table-cell table:style-name="ce50" office:value-type="float" office:value="760309" calcext:value-type="float">
            <text:p>760309</text:p>
          </table:table-cell>
          <table:table-cell table:style-name="ce67" table:formula="of:=[.G27]/[.F27]" office:value-type="float" office:value="0.76606547967482" calcext:value-type="float">
            <text:p>0.77</text:p>
          </table:table-cell>
          <table:table-cell table:style-name="ce64" table:formula="of:=[.E27]*[.$C$99]" office:value-type="float" office:value="779755.724190357" calcext:value-type="float">
            <text:p>779756</text:p>
          </table:table-cell>
          <table:table-cell table:style-name="ce67" table:formula="of:=[.G27]/[.I27]" office:value-type="float" office:value="0.975060491911683" calcext:value-type="float">
            <text:p>0.98</text:p>
          </table:table-cell>
          <table:table-cell table:style-name="ce64" table:formula="of:=[.I27]*0.95" office:value-type="float" office:value="740767.937980839" calcext:value-type="float">
            <text:p>740768</text:p>
          </table:table-cell>
          <table:table-cell table:style-name="ce72" table:formula="of:=IF([.G27]&lt;[.$A$18]; [.G27]; [.G27]*(1+[.G27]/[.$A$18]*[.$A$19]))" office:value-type="float" office:value="760309" calcext:value-type="float">
            <text:p>760309</text:p>
          </table:table-cell>
          <table:table-cell table:style-name="ce74" table:formula="of:=[.L27]/[.I27]" office:value-type="float" office:value="0.975060491911683" calcext:value-type="float">
            <text:p>0.975060491911683</text:p>
          </table:table-cell>
          <table:table-cell table:number-columns-repeated="14"/>
          <table:table-cell office:value-type="float" office:value="606849" calcext:value-type="float">
            <text:p>606849</text:p>
          </table:table-cell>
          <table:table-cell table:number-columns-repeated="981"/>
        </table:table-row>
        <table:table-row table:style-name="ro2">
          <table:table-cell table:style-name="ce135" office:value-type="float" office:value="60" calcext:value-type="float">
            <text:p>60</text:p>
          </table:table-cell>
          <table:table-cell table:style-name="ce50" office:value-type="float" office:value="9.9" calcext:value-type="float">
            <text:p>9.9</text:p>
          </table:table-cell>
          <table:table-cell table:style-name="ce139" table:formula="of:=[.C27]+[.B28]" office:value-type="float" office:value="59.4" calcext:value-type="float">
            <text:p>59.4</text:p>
          </table:table-cell>
          <table:table-cell table:style-name="ce142" table:formula="of:=[.C28]*[.$A$15]/1000" office:value-type="float" office:value="22.17402" calcext:value-type="float">
            <text:p>22.174</text:p>
          </table:table-cell>
          <table:table-cell table:style-name="ce142" table:formula="of:=[.D28]/([.$A$7]+[.C28]/1000)" office:value-type="float" office:value="1.88885462630117" calcext:value-type="float">
            <text:p>1.889</text:p>
          </table:table-cell>
          <table:table-cell table:style-name="ce145" table:formula="of:=[.$A$6]*[.E28]*100" office:value-type="float" office:value="1189978.41456974" calcext:value-type="float">
            <text:p>1189978</text:p>
          </table:table-cell>
          <table:table-cell table:style-name="ce51" office:value-type="float" office:value="922391" calcext:value-type="float">
            <text:p>922391</text:p>
          </table:table-cell>
          <table:table-cell table:style-name="ce153" table:formula="of:=[.G28]/[.F28]" office:value-type="float" office:value="0.775132547537435" calcext:value-type="float">
            <text:p>0.78</text:p>
          </table:table-cell>
          <table:table-cell table:style-name="ce145" table:formula="of:=[.E28]*[.$C$99]" office:value-type="float" office:value="934917.774355499" calcext:value-type="float">
            <text:p>934918</text:p>
          </table:table-cell>
          <table:table-cell table:style-name="ce153" table:formula="of:=[.G28]/[.I28]" office:value-type="float" office:value="0.986601202053159" calcext:value-type="float">
            <text:p>0.99</text:p>
          </table:table-cell>
          <table:table-cell table:style-name="ce145" table:formula="of:=[.I28]*0.95" office:value-type="float" office:value="888171.885637724" calcext:value-type="float">
            <text:p>888172</text:p>
          </table:table-cell>
          <table:table-cell table:style-name="ce158" table:formula="of:=IF([.G28]&lt;[.$A$18]; [.G28]; [.G28]*(1+[.G28]/[.$A$18]*[.$A$19]))" office:value-type="float" office:value="922391" calcext:value-type="float">
            <text:p>922391</text:p>
          </table:table-cell>
          <table:table-cell table:style-name="ce161" table:formula="of:=[.L28]/[.I28]" office:value-type="float" office:value="0.986601202053159" calcext:value-type="float">
            <text:p>0.986601202053159</text:p>
          </table:table-cell>
          <table:table-cell table:style-name="ce166" table:number-columns-repeated="14"/>
          <table:table-cell table:style-name="ce166" office:value-type="float" office:value="607236" calcext:value-type="float">
            <text:p>607236</text:p>
          </table:table-cell>
          <table:table-cell table:style-name="ce175"/>
          <table:table-cell table:style-name="ce178"/>
          <table:table-cell table:style-name="ce166" table:number-columns-repeated="979"/>
        </table:table-row>
        <table:table-row table:style-name="ro2"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9.9" calcext:value-type="float">
            <text:p>9.9</text:p>
          </table:table-cell>
          <table:table-cell table:style-name="ce58" table:formula="of:=[.C28]+[.B29]" office:value-type="float" office:value="69.3" calcext:value-type="float">
            <text:p>69.3</text:p>
          </table:table-cell>
          <table:table-cell table:style-name="ce61" table:formula="of:=[.C29]*[.$A$15]/1000" office:value-type="float" office:value="25.86969" calcext:value-type="float">
            <text:p>25.870</text:p>
          </table:table-cell>
          <table:table-cell table:style-name="ce61" table:formula="of:=[.D29]/([.$A$7]+[.C29]/1000)" office:value-type="float" office:value="2.20180691615671" calcext:value-type="float">
            <text:p>2.202</text:p>
          </table:table-cell>
          <table:table-cell table:style-name="ce64" table:formula="of:=[.$A$6]*[.E29]*100" office:value-type="float" office:value="1387138.35717873" calcext:value-type="float">
            <text:p>1387138</text:p>
          </table:table-cell>
          <table:table-cell table:style-name="ce50" table:formula="of:=1143045-[.$I$6]" office:value-type="float" office:value="1083045" calcext:value-type="float">
            <text:p>1083045</text:p>
          </table:table-cell>
          <table:table-cell table:style-name="ce67" table:formula="of:=[.G29]/[.F29]" office:value-type="float" office:value="0.780776477267044" calcext:value-type="float">
            <text:p>0.78</text:p>
          </table:table-cell>
          <table:table-cell table:style-name="ce64" table:formula="of:=[.E29]*[.$C$99]" office:value-type="float" office:value="1089818.34438197" calcext:value-type="float">
            <text:p>1089818</text:p>
          </table:table-cell>
          <table:table-cell table:style-name="ce67" table:formula="of:=[.G29]/[.I29]" office:value-type="float" office:value="0.993784886796145" calcext:value-type="float">
            <text:p>0.99</text:p>
          </table:table-cell>
          <table:table-cell table:style-name="ce64" table:formula="of:=[.I29]*0.95" office:value-type="float" office:value="1035327.42716287" calcext:value-type="float">
            <text:p>1035327</text:p>
          </table:table-cell>
          <table:table-cell table:style-name="ce72" table:formula="of:=IF([.G29]&lt;[.$A$18]; [.G29]; [.G29]*(1+[.G29]/[.$A$18]*[.$A$19]))" office:value-type="float" office:value="1083045" calcext:value-type="float">
            <text:p>1083045</text:p>
          </table:table-cell>
          <table:table-cell table:style-name="ce74" table:formula="of:=[.L29]/[.I29]" office:value-type="float" office:value="0.993784886796145" calcext:value-type="float">
            <text:p>0.993784886796145</text:p>
          </table:table-cell>
          <table:table-cell table:number-columns-repeated="14"/>
          <table:table-cell office:value-type="float" office:value="615108" calcext:value-type="float">
            <text:p>615108</text:p>
          </table:table-cell>
          <table:table-cell table:formula="of:=SUM([.AB22:.AB29])/8" office:value-type="float" office:value="597630" calcext:value-type="float">
            <text:p>597630</text:p>
          </table:table-cell>
          <table:table-cell table:formula="of:=(MAX([.AB22:.AB28])-MIN([.AB22:.AB28]))/[.AC29]*100" office:value-type="float" office:value="4.77954587286448" calcext:value-type="float">
            <text:p>4.8</text:p>
          </table:table-cell>
          <table:table-cell table:number-columns-repeated="979"/>
        </table:table-row>
        <table:table-row table:style-name="ro2">
          <table:table-cell table:style-name="ce50" office:value-type="float" office:value="80" calcext:value-type="float">
            <text:p>80</text:p>
          </table:table-cell>
          <table:table-cell table:style-name="ce50" office:value-type="float" office:value="9.9" calcext:value-type="float">
            <text:p>9.9</text:p>
          </table:table-cell>
          <table:table-cell table:style-name="ce58" table:formula="of:=[.C29]+[.B30]" office:value-type="float" office:value="79.2" calcext:value-type="float">
            <text:p>79.2</text:p>
          </table:table-cell>
          <table:table-cell table:style-name="ce61" table:formula="of:=[.C30]*[.$A$15]/1000" office:value-type="float" office:value="29.56536" calcext:value-type="float">
            <text:p>29.565</text:p>
          </table:table-cell>
          <table:table-cell table:style-name="ce61" table:formula="of:=[.D30]/([.$A$7]+[.C30]/1000)" office:value-type="float" office:value="2.51423226069801" calcext:value-type="float">
            <text:p>2.514</text:p>
          </table:table-cell>
          <table:table-cell table:style-name="ce64" table:formula="of:=[.$A$6]*[.E30]*100" office:value-type="float" office:value="1583966.32423974" calcext:value-type="float">
            <text:p>1583966</text:p>
          </table:table-cell>
          <table:table-cell table:style-name="ce50" table:formula="of:=1304140 -[.$I$6]" office:value-type="float" office:value="1244140" calcext:value-type="float">
            <text:p>1244140</text:p>
          </table:table-cell>
          <table:table-cell table:style-name="ce67" table:formula="of:=[.G30]/[.F30]" office:value-type="float" office:value="0.785458618002595" calcext:value-type="float">
            <text:p>0.79</text:p>
          </table:table-cell>
          <table:table-cell table:style-name="ce64" table:formula="of:=[.E30]*[.$C$99]" office:value-type="float" office:value="1244458.09468546" calcext:value-type="float">
            <text:p>1244458</text:p>
          </table:table-cell>
          <table:table-cell table:style-name="ce67" table:formula="of:=[.G30]/[.I30]" office:value-type="float" office:value="0.999744391002944" calcext:value-type="float">
            <text:p>1.00</text:p>
          </table:table-cell>
          <table:table-cell table:style-name="ce64" table:formula="of:=[.I30]*0.95" office:value-type="float" office:value="1182235.18995119" calcext:value-type="float">
            <text:p>1182235</text:p>
          </table:table-cell>
          <table:table-cell table:style-name="ce72" table:formula="of:=IF([.G30]&lt;[.$A$18]; [.G30]; [.G30]*(1+[.G30]/[.$A$18]*[.$A$19]))" office:value-type="float" office:value="1244140" calcext:value-type="float">
            <text:p>1244140</text:p>
          </table:table-cell>
          <table:table-cell table:style-name="ce74" table:formula="of:=[.L30]/[.I30]" office:value-type="float" office:value="0.999744391002944" calcext:value-type="float">
            <text:p>0.999744391002944</text:p>
          </table:table-cell>
          <table:table-cell table:number-columns-repeated="14"/>
          <table:table-cell table:style-name="ce89" office:value-type="float" office:value="723681" calcext:value-type="float">
            <text:p>723681</text:p>
          </table:table-cell>
          <table:table-cell table:style-name="ce75"/>
          <table:table-cell table:number-columns-repeated="980"/>
        </table:table-row>
        <table:table-row table:style-name="ro2">
          <table:table-cell table:style-name="ce50" office:value-type="float" office:value="90" calcext:value-type="float">
            <text:p>90</text:p>
          </table:table-cell>
          <table:table-cell table:style-name="ce50" office:value-type="float" office:value="9.9" calcext:value-type="float">
            <text:p>9.9</text:p>
          </table:table-cell>
          <table:table-cell table:style-name="ce58" table:formula="of:=[.C30]+[.B31]" office:value-type="float" office:value="89.1" calcext:value-type="float">
            <text:p>89.1</text:p>
          </table:table-cell>
          <table:table-cell table:style-name="ce61" table:formula="of:=[.C31]*[.$A$15]/1000" office:value-type="float" office:value="33.26103" calcext:value-type="float">
            <text:p>33.261</text:p>
          </table:table-cell>
          <table:table-cell table:style-name="ce61" table:formula="of:=[.D31]/([.$A$7]+[.C31]/1000)" office:value-type="float" office:value="2.82613198970185" calcext:value-type="float">
            <text:p>2.826</text:p>
          </table:table-cell>
          <table:table-cell table:style-name="ce64" table:formula="of:=[.$A$6]*[.E31]*100" office:value-type="float" office:value="1780463.15351216" calcext:value-type="float">
            <text:p>1780463</text:p>
          </table:table-cell>
          <table:table-cell table:style-name="ce50" table:formula="of:=1467530-[.$I$6]" office:value-type="float" office:value="1407530" calcext:value-type="float">
            <text:p>1407530</text:p>
          </table:table-cell>
          <table:table-cell table:style-name="ce67" table:formula="of:=[.G31]/[.F31]" office:value-type="float" office:value="0.790541493219609" calcext:value-type="float">
            <text:p>0.79</text:p>
          </table:table-cell>
          <table:table-cell table:style-name="ce64" table:formula="of:=[.E31]*[.$C$99]" office:value-type="float" office:value="1398837.68345952" calcext:value-type="float">
            <text:p>1398838</text:p>
          </table:table-cell>
          <table:table-cell table:style-name="ce67" table:formula="of:=[.G31]/[.I31]" office:value-type="float" office:value="1.0062139565178" calcext:value-type="float">
            <text:p>1.01</text:p>
          </table:table-cell>
          <table:table-cell table:style-name="ce64" table:formula="of:=[.I31]*0.95" office:value-type="float" office:value="1328895.79928654" calcext:value-type="float">
            <text:p>1328896</text:p>
          </table:table-cell>
          <table:table-cell table:style-name="ce72" table:formula="of:=IF([.G31]&lt;[.$A$18]; [.G31]; [.G31]*(1+[.G31]/[.$A$18]*[.$A$19]))" office:value-type="float" office:value="1407530" calcext:value-type="float">
            <text:p>1407530</text:p>
          </table:table-cell>
          <table:table-cell table:style-name="ce74" table:formula="of:=[.L31]/[.I31]" office:value-type="float" office:value="1.0062139565178" calcext:value-type="float">
            <text:p>1.0062139565178</text:p>
          </table:table-cell>
          <table:table-cell table:number-columns-repeated="14"/>
          <table:table-cell office:value-type="float" office:value="707528" calcext:value-type="float">
            <text:p>707528</text:p>
          </table:table-cell>
          <table:table-cell table:number-columns-repeated="981"/>
        </table:table-row>
        <table:table-row table:style-name="ro2"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9.9" calcext:value-type="float">
            <text:p>9.9</text:p>
          </table:table-cell>
          <table:table-cell table:style-name="ce58" table:formula="of:=[.C31]+[.B32]" office:value-type="float" office:value="99" calcext:value-type="float">
            <text:p>99.0</text:p>
          </table:table-cell>
          <table:table-cell table:style-name="ce61" table:formula="of:=[.C32]*[.$A$15]/1000" office:value-type="float" office:value="36.9567" calcext:value-type="float">
            <text:p>36.957</text:p>
          </table:table-cell>
          <table:table-cell table:style-name="ce61" table:formula="of:=[.D32]/([.$A$7]+[.C32]/1000)" office:value-type="float" office:value="3.1375074284744" calcext:value-type="float">
            <text:p>3.138</text:p>
          </table:table-cell>
          <table:table-cell table:style-name="ce64" table:formula="of:=[.$A$6]*[.E32]*100" office:value-type="float" office:value="1976629.67993887" calcext:value-type="float">
            <text:p>1976630</text:p>
          </table:table-cell>
          <table:table-cell table:style-name="ce50" table:formula="of:=1622624-[.$I$6]" office:value-type="float" office:value="1562624" calcext:value-type="float">
            <text:p>1562624</text:p>
          </table:table-cell>
          <table:table-cell table:style-name="ce67" table:formula="of:=[.G32]/[.F32]" office:value-type="float" office:value="0.790549699753736" calcext:value-type="float">
            <text:p>0.79</text:p>
          </table:table-cell>
          <table:table-cell table:style-name="ce64" table:formula="of:=[.E32]*[.$C$99]" office:value-type="float" office:value="1552957.76668491" calcext:value-type="float">
            <text:p>1552958</text:p>
          </table:table-cell>
          <table:table-cell table:style-name="ce67" table:formula="of:=[.G32]/[.I32]" office:value-type="float" office:value="1.00622440192673" calcext:value-type="float">
            <text:p>1.01</text:p>
          </table:table-cell>
          <table:table-cell table:style-name="ce64" table:formula="of:=[.I32]*0.95" office:value-type="float" office:value="1475309.87835067" calcext:value-type="float">
            <text:p>1475310</text:p>
          </table:table-cell>
          <table:table-cell table:style-name="ce72" table:formula="of:=IF([.G32]&lt;[.$A$18]; [.G32]; [.G32]*(1+[.G32]/[.$A$18]*[.$A$19]))" office:value-type="float" office:value="1562624" calcext:value-type="float">
            <text:p>1562624</text:p>
          </table:table-cell>
          <table:table-cell table:style-name="ce74" table:formula="of:=[.L32]/[.I32]" office:value-type="float" office:value="1.00622440192673" calcext:value-type="float">
            <text:p>1.00622440192673</text:p>
          </table:table-cell>
          <table:table-cell table:number-columns-repeated="14"/>
          <table:table-cell office:value-type="float" office:value="726643" calcext:value-type="float">
            <text:p>726643</text:p>
          </table:table-cell>
          <table:table-cell table:number-columns-repeated="981"/>
        </table:table-row>
        <table:table-row table:style-name="ro2">
          <table:table-cell table:style-name="ce50" office:value-type="float" office:value="110" calcext:value-type="float">
            <text:p>110</text:p>
          </table:table-cell>
          <table:table-cell table:style-name="ce50" office:value-type="float" office:value="9.9" calcext:value-type="float">
            <text:p>9.9</text:p>
          </table:table-cell>
          <table:table-cell table:style-name="ce58" table:formula="of:=[.C32]+[.B33]" office:value-type="float" office:value="108.9" calcext:value-type="float">
            <text:p>108.9</text:p>
          </table:table-cell>
          <table:table-cell table:style-name="ce61" table:formula="of:=[.C33]*[.$A$15]/1000" office:value-type="float" office:value="40.65237" calcext:value-type="float">
            <text:p>40.652</text:p>
          </table:table-cell>
          <table:table-cell table:style-name="ce61" table:formula="of:=[.D33]/([.$A$7]+[.C33]/1000)" office:value-type="float" office:value="3.44835989787003" calcext:value-type="float">
            <text:p>3.448</text:p>
          </table:table-cell>
          <table:table-cell table:style-name="ce64" table:formula="of:=[.$A$6]*[.E33]*100" office:value-type="float" office:value="2172466.73565812" calcext:value-type="float">
            <text:p>2172467</text:p>
          </table:table-cell>
          <table:table-cell table:style-name="ce50" table:formula="of:=1773393-[.$I$6]" office:value-type="float" office:value="1713393" calcext:value-type="float">
            <text:p>1713393</text:p>
          </table:table-cell>
          <table:table-cell table:style-name="ce67" table:formula="of:=[.G33]/[.F33]" office:value-type="float" office:value="0.788685493718711" calcext:value-type="float">
            <text:p>0.79</text:p>
          </table:table-cell>
          <table:table-cell table:style-name="ce64" table:formula="of:=[.E33]*[.$C$99]" office:value-type="float" office:value="1706818.99813891" calcext:value-type="float">
            <text:p>1706819</text:p>
          </table:table-cell>
          <table:table-cell table:style-name="ce67" table:formula="of:=[.G33]/[.I33]" office:value-type="float" office:value="1.00385161043336" calcext:value-type="float">
            <text:p>1.00</text:p>
          </table:table-cell>
          <table:table-cell table:style-name="ce64" table:formula="of:=[.I33]*0.95" office:value-type="float" office:value="1621478.04823196" calcext:value-type="float">
            <text:p>1621478</text:p>
          </table:table-cell>
          <table:table-cell table:style-name="ce72" table:formula="of:=IF([.G33]&lt;[.$A$18]; [.G33]; [.G33]*(1+[.G33]/[.$A$18]*[.$A$19]))" office:value-type="float" office:value="1713393" calcext:value-type="float">
            <text:p>1713393</text:p>
          </table:table-cell>
          <table:table-cell table:style-name="ce74" table:formula="of:=[.L33]/[.I33]" office:value-type="float" office:value="1.00385161043336" calcext:value-type="float">
            <text:p>1.00385161043336</text:p>
          </table:table-cell>
          <table:table-cell table:number-columns-repeated="14"/>
          <table:table-cell office:value-type="float" office:value="726839" calcext:value-type="float">
            <text:p>726839</text:p>
          </table:table-cell>
          <table:table-cell table:number-columns-repeated="981"/>
        </table:table-row>
        <table:table-row table:style-name="ro2">
          <table:table-cell table:style-name="ce50" office:value-type="float" office:value="120" calcext:value-type="float">
            <text:p>120</text:p>
          </table:table-cell>
          <table:table-cell table:style-name="ce50" office:value-type="float" office:value="9.9" calcext:value-type="float">
            <text:p>9.9</text:p>
          </table:table-cell>
          <table:table-cell table:style-name="ce58" table:formula="of:=[.C33]+[.B34]" office:value-type="float" office:value="118.8" calcext:value-type="float">
            <text:p>118.8</text:p>
          </table:table-cell>
          <table:table-cell table:style-name="ce61" table:formula="of:=[.C34]*[.$A$15]/1000" office:value-type="float" office:value="44.34804" calcext:value-type="float">
            <text:p>44.348</text:p>
          </table:table-cell>
          <table:table-cell table:style-name="ce61" table:formula="of:=[.D34]/([.$A$7]+[.C34]/1000)" office:value-type="float" office:value="3.75869071430993" calcext:value-type="float">
            <text:p>3.759</text:p>
          </table:table-cell>
          <table:table-cell table:style-name="ce64" table:formula="of:=[.$A$6]*[.E34]*100" office:value-type="float" office:value="2367975.15001526" calcext:value-type="float">
            <text:p>2367975</text:p>
          </table:table-cell>
          <table:table-cell table:style-name="ce50" table:formula="of:=1933206-[.$I$6]" office:value-type="float" office:value="1873206" calcext:value-type="float">
            <text:p>1873206</text:p>
          </table:table-cell>
          <table:table-cell table:style-name="ce67" table:formula="of:=[.G34]/[.F34]" office:value-type="float" office:value="0.791058132509512" calcext:value-type="float">
            <text:p>0.79</text:p>
          </table:table-cell>
          <table:table-cell table:style-name="ce64" table:formula="of:=[.E34]*[.$C$99]" office:value-type="float" office:value="1860422.02940451" calcext:value-type="float">
            <text:p>1860422</text:p>
          </table:table-cell>
          <table:table-cell table:style-name="ce67" table:formula="of:=[.G34]/[.I34]" office:value-type="float" office:value="1.00687154333449" calcext:value-type="float">
            <text:p>1.01</text:p>
          </table:table-cell>
          <table:table-cell table:style-name="ce64" table:formula="of:=[.I34]*0.95" office:value-type="float" office:value="1767400.92793428" calcext:value-type="float">
            <text:p>1767401</text:p>
          </table:table-cell>
          <table:table-cell table:style-name="ce72" table:formula="of:=IF([.G34]&lt;[.$A$18]; [.G34]; [.G34]*(1+[.G34]/[.$A$18]*[.$A$19]))" office:value-type="float" office:value="1873206" calcext:value-type="float">
            <text:p>1873206</text:p>
          </table:table-cell>
          <table:table-cell table:style-name="ce74" table:formula="of:=[.L34]/[.I34]" office:value-type="float" office:value="1.00687154333449" calcext:value-type="float">
            <text:p>1.00687154333449</text:p>
          </table:table-cell>
          <table:table-cell table:number-columns-repeated="14"/>
          <table:table-cell office:value-type="float" office:value="732858" calcext:value-type="float">
            <text:p>732858</text:p>
          </table:table-cell>
          <table:table-cell table:number-columns-repeated="981"/>
        </table:table-row>
        <table:table-row table:style-name="ro2">
          <table:table-cell table:style-name="ce50" office:value-type="float" office:value="130" calcext:value-type="float">
            <text:p>130</text:p>
          </table:table-cell>
          <table:table-cell table:style-name="ce50" office:value-type="float" office:value="9.9" calcext:value-type="float">
            <text:p>9.9</text:p>
          </table:table-cell>
          <table:table-cell table:style-name="ce58" table:formula="of:=[.C34]+[.B35]" office:value-type="float" office:value="128.7" calcext:value-type="float">
            <text:p>128.7</text:p>
          </table:table-cell>
          <table:table-cell table:style-name="ce61" table:formula="of:=[.C35]*[.$A$15]/1000" office:value-type="float" office:value="48.04371" calcext:value-type="float">
            <text:p>48.044</text:p>
          </table:table-cell>
          <table:table-cell table:style-name="ce61" table:formula="of:=[.D35]/([.$A$7]+[.C35]/1000)" office:value-type="float" office:value="4.06850118980074" calcext:value-type="float">
            <text:p>4.069</text:p>
          </table:table-cell>
          <table:table-cell table:style-name="ce64" table:formula="of:=[.$A$6]*[.E35]*100" office:value-type="float" office:value="2563155.74957447" calcext:value-type="float">
            <text:p>2563156</text:p>
          </table:table-cell>
          <table:table-cell table:style-name="ce50" table:formula="of:=2089887-[.$I$6]" office:value-type="float" office:value="2029887" calcext:value-type="float">
            <text:p>2029887</text:p>
          </table:table-cell>
          <table:table-cell table:style-name="ce67" table:formula="of:=[.G35]/[.F35]" office:value-type="float" office:value="0.791948363004082" calcext:value-type="float">
            <text:p>0.79</text:p>
          </table:table-cell>
          <table:table-cell table:style-name="ce64" table:formula="of:=[.E35]*[.$C$99]" office:value-type="float" office:value="2013767.50987967" calcext:value-type="float">
            <text:p>2013768</text:p>
          </table:table-cell>
          <table:table-cell table:style-name="ce67" table:formula="of:=[.G35]/[.I35]" office:value-type="float" office:value="1.00800464305897" calcext:value-type="float">
            <text:p>1.01</text:p>
          </table:table-cell>
          <table:table-cell table:style-name="ce64" table:formula="of:=[.I35]*0.95" office:value-type="float" office:value="1913079.13438569" calcext:value-type="float">
            <text:p>1913079</text:p>
          </table:table-cell>
          <table:table-cell table:style-name="ce72" table:formula="of:=IF([.G35]&lt;[.$A$18]; [.G35]; [.G35]*(1+[.G35]/[.$A$18]*[.$A$19]))" office:value-type="float" office:value="2029887" calcext:value-type="float">
            <text:p>2029887</text:p>
          </table:table-cell>
          <table:table-cell table:style-name="ce74" table:formula="of:=[.L35]/[.I35]" office:value-type="float" office:value="1.00800464305897" calcext:value-type="float">
            <text:p>1.00800464305897</text:p>
          </table:table-cell>
          <table:table-cell table:number-columns-repeated="14"/>
          <table:table-cell office:value-type="float" office:value="705786" calcext:value-type="float">
            <text:p>705786</text:p>
          </table:table-cell>
          <table:table-cell table:number-columns-repeated="981"/>
        </table:table-row>
        <table:table-row table:style-name="ro2">
          <table:table-cell table:style-name="ce56" office:value-type="float" office:value="140" calcext:value-type="float">
            <text:p>140</text:p>
          </table:table-cell>
          <table:table-cell table:style-name="ce50" office:value-type="float" office:value="9.9" calcext:value-type="float">
            <text:p>9.9</text:p>
          </table:table-cell>
          <table:table-cell table:style-name="ce60" table:formula="of:=[.C35]+[.B36]" office:value-type="float" office:value="138.6" calcext:value-type="float">
            <text:p>138.6</text:p>
          </table:table-cell>
          <table:table-cell table:style-name="ce63" table:formula="of:=[.C36]*[.$A$15]/1000" office:value-type="float" office:value="51.73938" calcext:value-type="float">
            <text:p>51.739</text:p>
          </table:table-cell>
          <table:table-cell table:style-name="ce63" table:formula="of:=[.D36]/([.$A$7]+[.C36]/1000)" office:value-type="float" office:value="4.37779263195302" calcext:value-type="float">
            <text:p>4.378</text:p>
          </table:table-cell>
          <table:table-cell table:style-name="ce66" table:formula="of:=[.$A$6]*[.E36]*100" office:value-type="float" office:value="2758009.3581304" calcext:value-type="float">
            <text:p>2758009</text:p>
          </table:table-cell>
          <table:table-cell table:style-name="ce56" table:formula="of:=2257397-[.$I$6]" office:value-type="float" office:value="2197397" calcext:value-type="float">
            <text:p>2197397</text:p>
          </table:table-cell>
          <table:table-cell table:style-name="ce69" table:formula="of:=[.G36]/[.F36]" office:value-type="float" office:value="0.796732974644281" calcext:value-type="float">
            <text:p>0.80</text:p>
          </table:table-cell>
          <table:table-cell table:style-name="ce66" table:formula="of:=[.E36]*[.$C$99]" office:value-type="float" office:value="2166856.08678644" calcext:value-type="float">
            <text:p>2166856</text:p>
          </table:table-cell>
          <table:table-cell table:style-name="ce69" table:formula="of:=[.G36]/[.I36]" office:value-type="float" office:value="1.01409457388509" calcext:value-type="float">
            <text:p>1.01</text:p>
          </table:table-cell>
          <table:table-cell table:style-name="ce66" table:formula="of:=[.I36]*0.95" office:value-type="float" office:value="2058513.28244712" calcext:value-type="float">
            <text:p>2058513</text:p>
          </table:table-cell>
          <table:table-cell table:style-name="ce73" table:formula="of:=IF([.G36]&lt;[.$A$18]; [.G36]; [.G36]*(1+[.G36]/[.$A$18]*[.$A$19]))" office:value-type="float" office:value="2197397" calcext:value-type="float">
            <text:p>2197397</text:p>
          </table:table-cell>
          <table:table-cell table:style-name="ce74" table:formula="of:=[.L36]/[.I36]" office:value-type="float" office:value="1.01409457388509" calcext:value-type="float">
            <text:p>1.01409457388509</text:p>
          </table:table-cell>
          <table:table-cell table:number-columns-repeated="14"/>
          <table:table-cell office:value-type="float" office:value="700985" calcext:value-type="float">
            <text:p>700985</text:p>
          </table:table-cell>
          <table:table-cell table:number-columns-repeated="981"/>
        </table:table-row>
        <table:table-row table:style-name="ro2">
          <table:table-cell table:style-name="ce56" office:value-type="float" office:value="150" calcext:value-type="float">
            <text:p>150</text:p>
          </table:table-cell>
          <table:table-cell table:style-name="ce50" office:value-type="float" office:value="9.9" calcext:value-type="float">
            <text:p>9.9</text:p>
          </table:table-cell>
          <table:table-cell table:style-name="ce60" table:formula="of:=[.C36]+[.B37]" office:value-type="float" office:value="148.5" calcext:value-type="float">
            <text:p>148.5</text:p>
          </table:table-cell>
          <table:table-cell table:style-name="ce63" table:formula="of:=[.C37]*[.$A$15]/1000" office:value-type="float" office:value="55.43505" calcext:value-type="float">
            <text:p>55.435</text:p>
          </table:table-cell>
          <table:table-cell table:style-name="ce63" table:formula="of:=[.D37]/([.$A$7]+[.C37]/1000)" office:value-type="float" office:value="4.68656634399966" calcext:value-type="float">
            <text:p>4.687</text:p>
          </table:table-cell>
          <table:table-cell table:style-name="ce66" table:formula="of:=[.$A$6]*[.E37]*100" office:value-type="float" office:value="2952536.79671979" calcext:value-type="float">
            <text:p>2952537</text:p>
          </table:table-cell>
          <table:table-cell table:style-name="ce56" table:formula="of:=2386943-[.$I$6]" office:value-type="float" office:value="2326943" calcext:value-type="float">
            <text:p>2326943</text:p>
          </table:table-cell>
          <table:table-cell table:style-name="ce69" table:formula="of:=[.G37]/[.F37]" office:value-type="float" office:value="0.788116511396298" calcext:value-type="float">
            <text:p>0.79</text:p>
          </table:table-cell>
          <table:table-cell table:style-name="ce66" table:formula="of:=[.E37]*[.$C$99]" office:value-type="float" office:value="2319688.40518006" calcext:value-type="float">
            <text:p>2319688</text:p>
          </table:table-cell>
          <table:table-cell table:style-name="ce69" table:formula="of:=[.G37]/[.I37]" office:value-type="float" office:value="1.0031274005611" calcext:value-type="float">
            <text:p>1.00</text:p>
          </table:table-cell>
          <table:table-cell table:style-name="ce66" table:formula="of:=[.I37]*0.95" office:value-type="float" office:value="2203703.98492106" calcext:value-type="float">
            <text:p>2203704</text:p>
          </table:table-cell>
          <table:table-cell table:style-name="ce73" table:formula="of:=IF([.G37]&lt;[.$A$18]; [.G37]; [.G37]*(1+[.G37]/[.$A$18]*[.$A$19]))" office:value-type="float" office:value="2326943" calcext:value-type="float">
            <text:p>2326943</text:p>
          </table:table-cell>
          <table:table-cell table:style-name="ce74" table:formula="of:=[.L37]/[.I37]" office:value-type="float" office:value="1.0031274005611" calcext:value-type="float">
            <text:p>1.0031274005611</text:p>
          </table:table-cell>
          <table:table-cell table:number-columns-repeated="14"/>
          <table:table-cell office:value-type="float" office:value="726528" calcext:value-type="float">
            <text:p>726528</text:p>
          </table:table-cell>
          <table:table-cell table:number-columns-repeated="981"/>
        </table:table-row>
        <table:table-row table:style-name="ro2">
          <table:table-cell table:number-columns-repeated="5"/>
          <table:table-cell table:style-name="ce20"/>
          <table:table-cell table:number-columns-repeated="21"/>
          <table:table-cell office:value-type="float" office:value="735848" calcext:value-type="float">
            <text:p>735848</text:p>
          </table:table-cell>
          <table:table-cell table:formula="of:=SUM([.AB30:.AB38])/9" office:value-type="float" office:value="720744" calcext:value-type="float">
            <text:p>720744</text:p>
          </table:table-cell>
          <table:table-cell table:formula="of:=(MAX([.AB30:.AB37])-MIN([.AB30:.AB37]))/[.AC38]*100" office:value-type="float" office:value="4.42223591178005" calcext:value-type="float">
            <text:p>4.4</text:p>
          </table:table-cell>
          <table:table-cell table:number-columns-repeated="979"/>
        </table:table-row>
        <table:table-row table:style-name="ro2">
          <table:table-cell table:number-columns-repeated="5"/>
          <table:table-cell table:style-name="ce20"/>
          <table:table-cell table:number-columns-repeated="21"/>
          <table:table-cell office:value-type="float" office:value="731747" calcext:value-type="float">
            <text:p>731747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836817" calcext:value-type="float">
            <text:p>836817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827707" calcext:value-type="float">
            <text:p>827707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822322" calcext:value-type="float">
            <text:p>822322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853847" calcext:value-type="float">
            <text:p>853847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848079" calcext:value-type="float">
            <text:p>848079</text:p>
          </table:table-cell>
          <table:table-cell table:formula="of:=SUM([.AB40:.AB44])/5" office:value-type="float" office:value="837754.4" calcext:value-type="float">
            <text:p>837754</text:p>
          </table:table-cell>
          <table:table-cell table:formula="of:=(MAX([.AB40:.AB43])-MIN([.AB40:.AB43]))/[.AC44]*100" office:value-type="float" office:value="3.76303604015688" calcext:value-type="float">
            <text:p>3.8</text:p>
          </table:table-cell>
          <table:table-cell table:number-columns-repeated="979"/>
        </table:table-row>
        <table:table-row table:style-name="ro2">
          <table:table-cell table:number-columns-repeated="27"/>
          <table:table-cell office:value-type="float" office:value="954372" calcext:value-type="float">
            <text:p>954372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944582" calcext:value-type="float">
            <text:p>944582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968293" calcext:value-type="float">
            <text:p>968293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955723" calcext:value-type="float">
            <text:p>955723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964172" calcext:value-type="float">
            <text:p>964172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920144" calcext:value-type="float">
            <text:p>920144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949327" calcext:value-type="float">
            <text:p>949327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956910" calcext:value-type="float">
            <text:p>956910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951584" calcext:value-type="float">
            <text:p>951584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971636" calcext:value-type="float">
            <text:p>971636</text:p>
          </table:table-cell>
          <table:table-cell table:formula="of:=SUM([.AB45:.AB54])/10" office:value-type="float" office:value="953674.3" calcext:value-type="float">
            <text:p>953674</text:p>
          </table:table-cell>
          <table:table-cell table:formula="of:=(MAX([.AB45:.AB53])-MIN([.AB45:.AB53]))/[.AC54]*100" office:value-type="float" office:value="5.04878866925532" calcext:value-type="float">
            <text:p>5.0</text:p>
          </table:table-cell>
          <table:table-cell table:number-columns-repeated="979"/>
        </table:table-row>
        <table:table-row table:style-name="ro2">
          <table:table-cell table:number-columns-repeated="27"/>
          <table:table-cell office:value-type="float" office:value="1084905" calcext:value-type="float">
            <text:p>1084905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1073791" calcext:value-type="float">
            <text:p>1073791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1082662" calcext:value-type="float">
            <text:p>1082662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1095580" calcext:value-type="float">
            <text:p>1095580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1092684" calcext:value-type="float">
            <text:p>1092684</text:p>
          </table:table-cell>
          <table:table-cell table:formula="of:=SUM([.AB55:.AB59])/5" office:value-type="float" office:value="1085924.4" calcext:value-type="float">
            <text:p>1085924</text:p>
          </table:table-cell>
          <table:table-cell table:formula="of:=(MAX([.AB55:.AB58])-MIN([.AB55:.AB58]))/[.AC59]*100" office:value-type="float" office:value="2.00649326969723" calcext:value-type="float">
            <text:p>2.0</text:p>
          </table:table-cell>
          <table:table-cell table:number-columns-repeated="979"/>
        </table:table-row>
        <table:table-row table:style-name="ro2">
          <table:table-cell table:number-columns-repeated="27"/>
          <table:table-cell office:value-type="float" office:value="1205750" calcext:value-type="float">
            <text:p>1205750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1188471" calcext:value-type="float">
            <text:p>1188471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1219844" calcext:value-type="float">
            <text:p>1219844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1175662" calcext:value-type="float">
            <text:p>1175662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1207639" calcext:value-type="float">
            <text:p>1207639</text:p>
          </table:table-cell>
          <table:table-cell table:formula="of:=SUM([.AB60:.AB64])/5" office:value-type="float" office:value="1199473.2" calcext:value-type="float">
            <text:p>1199473</text:p>
          </table:table-cell>
          <table:table-cell table:formula="of:=(MAX([.AB60:.AB63])-MIN([.AB60:.AB63]))/[.AC64]*100" office:value-type="float" office:value="3.68345036804491" calcext:value-type="float">
            <text:p>3.7</text:p>
          </table:table-cell>
          <table:table-cell table:number-columns-repeated="979"/>
        </table:table-row>
        <table:table-row table:style-name="ro2">
          <table:table-cell table:number-columns-repeated="27"/>
          <table:table-cell office:value-type="float" office:value="1404845" calcext:value-type="float">
            <text:p>1404845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1399177" calcext:value-type="float">
            <text:p>1399177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1434430" calcext:value-type="float">
            <text:p>1434430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1417323" calcext:value-type="float">
            <text:p>1417323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1428968" calcext:value-type="float">
            <text:p>1428968</text:p>
          </table:table-cell>
          <table:table-cell table:formula="of:=SUM([.AB65:.AB69])/5" office:value-type="float" office:value="1416948.6" calcext:value-type="float">
            <text:p>1416949</text:p>
          </table:table-cell>
          <table:table-cell table:formula="of:=(MAX([.AB65:.AB68])-MIN([.AB65:.AB68]))/[.AC69]*100" office:value-type="float" office:value="2.48795192712001" calcext:value-type="float">
            <text:p>2.5</text:p>
          </table:table-cell>
          <table:table-cell table:number-columns-repeated="979"/>
        </table:table-row>
        <table:table-row table:style-name="ro2">
          <table:table-cell table:number-columns-repeated="27"/>
          <table:table-cell office:value-type="float" office:value="1502457" calcext:value-type="float">
            <text:p>1502457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1504837" calcext:value-type="float">
            <text:p>1504837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<text:span text:style-name="T7">Regression</text:span></text:p>
          </table:table-cell>
          <table:table-cell table:number-columns-repeated="6"/>
          <table:table-cell office:value-type="string" calcext:value-type="string">
            <text:p><text:span text:style-name="T7">Regression</text:span></text:p>
          </table:table-cell>
          <table:table-cell table:number-columns-repeated="18"/>
          <table:table-cell office:value-type="float" office:value="1524086" calcext:value-type="float">
            <text:p>1524086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  <table:table-cell office:value-type="string" calcext:value-type="string">
            <text:p>Regression Model</text:p>
          </table:table-cell>
          <table:table-cell office:value-type="string" calcext:value-type="string">
            <text:p>Power</text:p>
          </table:table-cell>
          <table:table-cell table:number-columns-repeated="17"/>
          <table:table-cell office:value-type="float" office:value="1554010" calcext:value-type="float">
            <text:p>1554010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1549983" calcext:value-type="float">
            <text:p>1549983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LINEST raw output</text:p>
          </table:table-cell>
          <table:table-cell table:number-columns-repeated="6"/>
          <table:table-cell office:value-type="string" calcext:value-type="string">
            <text:p>LINEST raw output</text:p>
          </table:table-cell>
          <table:table-cell table:number-columns-repeated="18"/>
          <table:table-cell office:value-type="float" office:value="1512338" calcext:value-type="float">
            <text:p>1512338</text:p>
          </table:table-cell>
          <table:table-cell table:number-columns-repeated="981"/>
        </table:table-row>
        <table:table-row table:style-name="ro2">
          <table:table-cell/>
          <table:table-cell table:number-matrix-columns-spanned="2" table:number-matrix-rows-spanned="5" table:formula="of:=LINEST([.$G$22:.$G$26] ; [.$E$22:.$E$26] ; 0 ; 1)" office:value-type="float" office:value="494965.446963111" calcext:value-type="float">
            <text:p>494965.44696311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matrix-columns-spanned="2" table:number-matrix-rows-spanned="5" table:formula="of:=LINEST(LN([.$J$22:.$J$36]) ; LN([.$G$22:.$G$36]) ; 1 ; 1)" office:value-type="float" office:value="0.000108117508460141" calcext:value-type="float">
            <text:p>0.000108117508460141</text:p>
          </table:table-cell>
          <table:table-cell office:value-type="float" office:value="0.0000832157367310143" calcext:value-type="float">
            <text:p>8.32157367310143E-05</text:p>
          </table:table-cell>
          <table:table-cell table:number-columns-repeated="17"/>
          <table:table-cell office:value-type="float" office:value="1494015" calcext:value-type="float">
            <text:p>1494015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736.93167897317" calcext:value-type="float">
            <text:p>1736.93167897317</text:p>
          </table:table-cell>
          <table:table-cell office:value-type="string" office:string-value="" calcext:value-type="error">
            <text:p>#N/A</text:p>
          </table:table-cell>
          <table:table-cell table:number-columns-repeated="5"/>
          <table:table-cell office:value-type="float" office:value="0.000808915241891653" calcext:value-type="float">
            <text:p>0.000808915241891653</text:p>
          </table:table-cell>
          <table:table-cell office:value-type="float" office:value="0.0107658945847722" calcext:value-type="float">
            <text:p>0.0107658945847722</text:p>
          </table:table-cell>
          <table:table-cell table:number-columns-repeated="17"/>
          <table:table-cell office:value-type="float" office:value="1540956" calcext:value-type="float">
            <text:p>1540956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0.999950744548206" calcext:value-type="float">
            <text:p>0.999950744548206</text:p>
          </table:table-cell>
          <table:table-cell office:value-type="float" office:value="3001.70995549271" calcext:value-type="float">
            <text:p>3001.70995549271</text:p>
          </table:table-cell>
          <table:table-cell table:number-columns-repeated="5"/>
          <table:table-cell office:value-type="float" office:value="0.00137229120669122" calcext:value-type="float">
            <text:p>0.00137229120669122</text:p>
          </table:table-cell>
          <table:table-cell office:value-type="float" office:value="0.0109827148939464" calcext:value-type="float">
            <text:p>0.0109827148939464</text:p>
          </table:table-cell>
          <table:table-cell table:number-columns-repeated="17"/>
          <table:table-cell office:value-type="float" office:value="1535685" calcext:value-type="float">
            <text:p>1535685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81205.2845429237" calcext:value-type="float">
            <text:p>81205.2845429237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0.0178643007097635" calcext:value-type="float">
            <text:p>0.0178643007097635</text:p>
          </table:table-cell>
          <table:table-cell office:value-type="float" office:value="13" calcext:value-type="float">
            <text:p>13</text:p>
          </table:table-cell>
          <table:table-cell table:number-columns-repeated="17"/>
          <table:table-cell office:value-type="float" office:value="1543844" calcext:value-type="float">
            <text:p>1543844</text:p>
          </table:table-cell>
          <table:table-cell table:formula="of:=SUM([.AB70:.AB79])/10" office:value-type="float" office:value="1526221.1" calcext:value-type="float">
            <text:p>1526221</text:p>
          </table:table-cell>
          <table:table-cell table:formula="of:=(MAX([.AB70:.AB78])-MIN([.AB70:.AB78]))/[.AC79]*100" office:value-type="float" office:value="3.93095076460416" calcext:value-type="float">
            <text:p>3.9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731680942860.372" calcext:value-type="float">
            <text:p>731680942860.372</text:p>
          </table:table-cell>
          <table:table-cell office:value-type="float" office:value="36041050.6276162" calcext:value-type="float">
            <text:p>36041050.6276162</text:p>
          </table:table-cell>
          <table:table-cell table:number-columns-repeated="5"/>
          <table:table-cell office:value-type="float" office:value="0.00000215479242397438" calcext:value-type="float">
            <text:p>2.15479242397438E-06</text:p>
          </table:table-cell>
          <table:table-cell office:value-type="float" office:value="0.00156806034374227" calcext:value-type="float">
            <text:p>0.00156806034374227</text:p>
          </table:table-cell>
          <table:table-cell table:number-columns-repeated="17"/>
          <table:table-cell office:value-type="float" office:value="1665079" calcext:value-type="float">
            <text:p>1665079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1647703" calcext:value-type="float">
            <text:p>1647703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Regression Statistics</text:p>
          </table:table-cell>
          <table:table-cell table:number-columns-repeated="6"/>
          <table:table-cell office:value-type="string" calcext:value-type="string">
            <text:p>Regression Statistics</text:p>
          </table:table-cell>
          <table:table-cell table:number-columns-repeated="18"/>
          <table:table-cell office:value-type="float" office:value="1659088" calcext:value-type="float">
            <text:p>1659088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R^2</text:p>
          </table:table-cell>
          <table:table-cell table:formula="of:=[.$B$78]" office:value-type="float" office:value="0.999950744548206" calcext:value-type="float">
            <text:p>0.999950744548206</text:p>
          </table:table-cell>
          <table:table-cell table:number-columns-repeated="5"/>
          <table:table-cell office:value-type="string" calcext:value-type="string">
            <text:p>R^2</text:p>
          </table:table-cell>
          <table:table-cell table:formula="of:=[.$I$78]" office:value-type="float" office:value="0.00137229120669122" calcext:value-type="float">
            <text:p>0.00137229120669122</text:p>
          </table:table-cell>
          <table:table-cell table:number-columns-repeated="17"/>
          <table:table-cell office:value-type="float" office:value="1647890" calcext:value-type="float">
            <text:p>1647890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Standard Error</text:p>
          </table:table-cell>
          <table:table-cell table:formula="of:=[.$C$78]" office:value-type="float" office:value="3001.70995549271" calcext:value-type="float">
            <text:p>3001.70995549271</text:p>
          </table:table-cell>
          <table:table-cell table:number-columns-repeated="5"/>
          <table:table-cell office:value-type="string" calcext:value-type="string">
            <text:p>Standard Error</text:p>
          </table:table-cell>
          <table:table-cell table:formula="of:=[.$J$78]" office:value-type="float" office:value="0.0109827148939464" calcext:value-type="float">
            <text:p>0.0109827148939464</text:p>
          </table:table-cell>
          <table:table-cell table:number-columns-repeated="17"/>
          <table:table-cell office:value-type="float" office:value="1649454" calcext:value-type="float">
            <text:p>1649454</text:p>
          </table:table-cell>
          <table:table-cell table:formula="of:=SUM([.AB80:.AB84])/5" office:value-type="float" office:value="1653842.8" calcext:value-type="float">
            <text:p>1653843</text:p>
          </table:table-cell>
          <table:table-cell table:formula="of:=(MAX([.AB80:.AB83])-MIN([.AB80:.AB83]))/[.AC84]*100" office:value-type="float" office:value="1.0506439910734" calcext:value-type="float">
            <text:p>1.1</text:p>
          </table:table-cell>
          <table:table-cell table:number-columns-repeated="979"/>
        </table:table-row>
        <table:table-row table:style-name="ro2">
          <table:table-cell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7"/>
          <table:table-cell office:value-type="float" office:value="1793367" calcext:value-type="float">
            <text:p>1793367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Observations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Observations</text:p>
          </table:table-cell>
          <table:table-cell table:formula="of:=15" office:value-type="float" office:value="15" calcext:value-type="float">
            <text:p>15</text:p>
          </table:table-cell>
          <table:table-cell table:number-columns-repeated="17"/>
          <table:table-cell office:value-type="float" office:value="1751541" calcext:value-type="float">
            <text:p>1751541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Adjusted R^2</text:p>
          </table:table-cell>
          <table:table-cell table:formula="of:=1 - (1 - [.$B$78])*([.$C$86] - 1)/([.$C$86] - [.$C$85])" office:value-type="float" office:value="0.999950744548206" calcext:value-type="float">
            <text:p>0.999950744548206</text:p>
          </table:table-cell>
          <table:table-cell table:number-columns-repeated="5"/>
          <table:table-cell office:value-type="string" calcext:value-type="string">
            <text:p>Adjusted R^2</text:p>
          </table:table-cell>
          <table:table-cell table:formula="of:=1 - (1 - [.$I$78])*([.$J$86] - 1)/([.$J$86] - [.$J$85] - 1)" office:value-type="float" office:value="-0.0754452248543325" calcext:value-type="float">
            <text:p>-0.0754452248543325</text:p>
          </table:table-cell>
          <table:table-cell table:number-columns-repeated="17"/>
          <table:table-cell office:value-type="float" office:value="1770996" calcext:value-type="float">
            <text:p>1770996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1775754" calcext:value-type="float">
            <text:p>1775754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Analysis of Variance (ANOVA)</text:p>
          </table:table-cell>
          <table:table-cell table:number-columns-repeated="6"/>
          <table:table-cell office:value-type="string" calcext:value-type="string">
            <text:p>Analysis of Variance (ANOVA)</text:p>
          </table:table-cell>
          <table:table-cell table:number-columns-repeated="18"/>
          <table:table-cell office:value-type="float" office:value="1762332" calcext:value-type="float">
            <text:p>1762332</text:p>
          </table:table-cell>
          <table:table-cell table:formula="of:=SUM([.AB85:.AB89])/5" office:value-type="float" office:value="1770798" calcext:value-type="float">
            <text:p>1770798</text:p>
          </table:table-cell>
          <table:table-cell table:formula="of:=(MAX([.AB85:.AB88])-MIN([.AB85:.AB88]))/[.AC89]*100" office:value-type="float" office:value="2.36198595209617" calcext:value-type="float">
            <text:p>2.4</text:p>
          </table:table-cell>
          <table:table-cell table:number-columns-repeated="979"/>
        </table:table-row>
        <table:table-row table:style-name="ro2"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13"/>
          <table:table-cell office:value-type="float" office:value="1847092" calcext:value-type="float">
            <text:p>1847092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Regression</text:p>
          </table:table-cell>
          <table:table-cell table:formula="of:=[.$C$85]" office:value-type="float" office:value="1" calcext:value-type="float">
            <text:p>1</text:p>
          </table:table-cell>
          <table:table-cell table:formula="of:=[.$B$80]" office:value-type="float" office:value="731680942860.372" calcext:value-type="float">
            <text:p>731680942860.372</text:p>
          </table:table-cell>
          <table:table-cell table:formula="of:=[.$B$80] / [.$C$91]" office:value-type="float" office:value="731680942860.372" calcext:value-type="float">
            <text:p>731680942860.372</text:p>
          </table:table-cell>
          <table:table-cell table:formula="of:=[.$B$79]" office:value-type="float" office:value="81205.2845429237" calcext:value-type="float">
            <text:p>81205.2845429237</text:p>
          </table:table-cell>
          <table:table-cell table:formula="of:=LEGACY.FDIST([.$B$79] ; [.$C$91] ; [.$C$79])" office:value-type="float" office:value="0.000000000909802262015797" calcext:value-type="float">
            <text:p>9.09802262015797E-10</text:p>
          </table:table-cell>
          <table:table-cell/>
          <table:table-cell office:value-type="string" calcext:value-type="string">
            <text:p>Regression</text:p>
          </table:table-cell>
          <table:table-cell table:formula="of:=[.$J$85]" office:value-type="float" office:value="1" calcext:value-type="float">
            <text:p>1</text:p>
          </table:table-cell>
          <table:table-cell table:formula="of:=[.$I$80]" office:value-type="float" office:value="0.00000215479242397438" calcext:value-type="float">
            <text:p>2.15479242397438E-06</text:p>
          </table:table-cell>
          <table:table-cell table:formula="of:=[.$I$80] / [.$J$91]" office:value-type="float" office:value="0.00000215479242397438" calcext:value-type="float">
            <text:p>2.15479242397438E-06</text:p>
          </table:table-cell>
          <table:table-cell table:formula="of:=[.$I$79]" office:value-type="float" office:value="0.0178643007097635" calcext:value-type="float">
            <text:p>0.0178643007097635</text:p>
          </table:table-cell>
          <table:table-cell table:formula="of:=LEGACY.FDIST([.$I$79] ; [.$J$91] ; [.$J$79])" office:value-type="float" office:value="0.895720422494648" calcext:value-type="float">
            <text:p>0.895720422494648</text:p>
          </table:table-cell>
          <table:table-cell table:number-columns-repeated="13"/>
          <table:table-cell office:value-type="float" office:value="1833359" calcext:value-type="float">
            <text:p>1833359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Residual</text:p>
          </table:table-cell>
          <table:table-cell table:formula="of:=[.$C$79]" office:value-type="float" office:value="4" calcext:value-type="float">
            <text:p>4</text:p>
          </table:table-cell>
          <table:table-cell table:formula="of:=[.$C$80]" office:value-type="float" office:value="36041050.6276162" calcext:value-type="float">
            <text:p>36041050.6276162</text:p>
          </table:table-cell>
          <table:table-cell table:formula="of:=[.$C$80] / [.$C$79]" office:value-type="float" office:value="9010262.65690405" calcext:value-type="float">
            <text:p>9010262.65690405</text:p>
          </table:table-cell>
          <table:table-cell table:number-columns-repeated="3"/>
          <table:table-cell office:value-type="string" calcext:value-type="string">
            <text:p>Residual</text:p>
          </table:table-cell>
          <table:table-cell table:formula="of:=[.$J$79]" office:value-type="float" office:value="13" calcext:value-type="float">
            <text:p>13</text:p>
          </table:table-cell>
          <table:table-cell table:formula="of:=[.$J$80]" office:value-type="float" office:value="0.00156806034374227" calcext:value-type="float">
            <text:p>0.00156806034374227</text:p>
          </table:table-cell>
          <table:table-cell table:formula="of:=[.$J$80] / [.$J$79]" office:value-type="float" office:value="0.000120620026441713" calcext:value-type="float">
            <text:p>0.000120620026441713</text:p>
          </table:table-cell>
          <table:table-cell table:number-columns-repeated="15"/>
          <table:table-cell office:value-type="float" office:value="1903999" calcext:value-type="float">
            <text:p>1903999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formula="of:=[.$C$91] + [.$C$79]" office:value-type="float" office:value="5" calcext:value-type="float">
            <text:p>5</text:p>
          </table:table-cell>
          <table:table-cell table:formula="of:=[.$B$80] + [.$C$80]" office:value-type="float" office:value="731716983911" calcext:value-type="float">
            <text:p>731716983911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formula="of:=[.$J$91] + [.$J$79]" office:value-type="float" office:value="14" calcext:value-type="float">
            <text:p>14</text:p>
          </table:table-cell>
          <table:table-cell table:formula="of:=[.$I$80] + [.$J$80]" office:value-type="float" office:value="0.00157021513616624" calcext:value-type="float">
            <text:p>0.00157021513616624</text:p>
          </table:table-cell>
          <table:table-cell table:number-columns-repeated="16"/>
          <table:table-cell office:value-type="float" office:value="1839722" calcext:value-type="float">
            <text:p>1839722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1879761" calcext:value-type="float">
            <text:p>1879761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17"/>
          <table:table-cell office:value-type="float" office:value="1826056" calcext:value-type="float">
            <text:p>1826056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1813477" calcext:value-type="float">
            <text:p>1813477</text:p>
          </table:table-cell>
          <table:table-cell table:number-columns-repeated="981"/>
        </table:table-row>
        <table:table-row table:style-name="ro2">
          <table:table-cell table:number-columns-repeated="2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C$95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C$95] * 100) ; &quot;%&quot;)" office:value-type="string" office:string-value="Upper 95%" calcext:value-type="string">
            <text:p>Upper 95%</text:p>
          </table:table-cell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J$95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J$95] * 100) ; &quot;%&quot;)" office:value-type="string" office:string-value="Upper 95%" calcext:value-type="string">
            <text:p>Upper 95%</text:p>
          </table:table-cell>
          <table:table-cell table:number-columns-repeated="12"/>
          <table:table-cell office:value-type="float" office:value="1885554" calcext:value-type="float">
            <text:p>1885554</text:p>
          </table:table-cell>
          <table:table-cell table:number-columns-repeated="981"/>
        </table:table-row>
        <table:table-row table:style-name="ro2">
          <table:table-cell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B$76:.$C$76]; 1 ; ROW([.$C$99])+1 - ROW())" office:value-type="float" office:value="0" calcext:value-type="float">
            <text:p>0</text:p>
          </table:table-cell>
          <table:table-cell table:number-matrix-columns-spanned="1" table:number-matrix-rows-spanned="2" table:formula="of:=INDEX([.$B$77:.$C$77]; 1 ; ROW([.$D$99])+1 - ROW())" office:value-type="string" office:string-value="" calcext:value-type="error">
            <text:p>#N/A</text:p>
          </table:table-cell>
          <table:table-cell table:number-matrix-columns-spanned="1" table:number-matrix-rows-spanned="2" table:formula="of:=[.$C$98:.$C$99] / [.$D$98:.$D$99]" office:value-type="string" office:string-value="" calcext:value-type="error">
            <text:p>#N/A</text:p>
          </table:table-cell>
          <table:table-cell table:number-matrix-columns-spanned="1" table:number-matrix-rows-spanned="2" table:formula="of:=LEGACY.TDIST(ABS([.$E$98:.$E$99]) ; [.$C$79] ; 2 )" office:value-type="string" office:string-value="" calcext:value-type="error">
            <text:p>#N/A</text:p>
          </table:table-cell>
          <table:table-cell table:number-matrix-columns-spanned="1" table:number-matrix-rows-spanned="2" table:formula="of:=[.$C$98:.$C$99] - [.$D$98:.$D$99] * TINV(1 - [.$C$95] ; [.$C$79])" office:value-type="string" office:string-value="" calcext:value-type="error">
            <text:p>#N/A</text:p>
          </table:table-cell>
          <table:table-cell table:number-matrix-columns-spanned="1" table:number-matrix-rows-spanned="2" table:formula="of:=[.$C$98:.$C$99] + [.$D$98:.$D$99] * TINV(1 - [.$C$95] ; [.$C$79])" office:value-type="string" office:string-value="" calcext:value-type="error">
            <text:p>#N/A</text:p>
          </table:table-cell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I$76:.$J$76]; 1 ; ROW([.$J$99])+1 - ROW())" office:value-type="float" office:value="0.0000832157367310143" calcext:value-type="float">
            <text:p>8.32157367310143E-05</text:p>
          </table:table-cell>
          <table:table-cell table:number-matrix-columns-spanned="1" table:number-matrix-rows-spanned="2" table:formula="of:=INDEX([.$I$77:.$J$77]; 1 ; ROW([.$K$99])+1 - ROW())" office:value-type="float" office:value="0.0107658945847722" calcext:value-type="float">
            <text:p>0.0107658945847722</text:p>
          </table:table-cell>
          <table:table-cell table:number-matrix-columns-spanned="1" table:number-matrix-rows-spanned="2" table:formula="of:=[.$J$98:.$J$99] / [.$K$98:.$K$99]" office:value-type="float" office:value="0.0077295700859563" calcext:value-type="float">
            <text:p>0.0077295700859563</text:p>
          </table:table-cell>
          <table:table-cell table:number-matrix-columns-spanned="1" table:number-matrix-rows-spanned="2" table:formula="of:=LEGACY.TDIST(ABS([.$L$98:.$L$99]) ; [.$J$79] ; 2 )" office:value-type="float" office:value="0.993950115190101" calcext:value-type="float">
            <text:p>0.993950115190101</text:p>
          </table:table-cell>
          <table:table-cell table:number-matrix-columns-spanned="1" table:number-matrix-rows-spanned="2" table:formula="of:=[.$J$98:.$J$99] - [.$K$98:.$K$99] * TINV(1 - [.$J$95] ; [.$J$79])" office:value-type="float" office:value="-0.0231750854829934" calcext:value-type="float">
            <text:p>-0.0231750854829934</text:p>
          </table:table-cell>
          <table:table-cell table:number-matrix-columns-spanned="1" table:number-matrix-rows-spanned="2" table:formula="of:=[.$J$98:.$J$99] + [.$K$98:.$K$99] * TINV(1 - [.$J$95] ; [.$J$79])" office:value-type="float" office:value="0.0233415169564554" calcext:value-type="float">
            <text:p>0.0233415169564554</text:p>
          </table:table-cell>
          <table:table-cell table:number-columns-repeated="12"/>
          <table:table-cell office:value-type="float" office:value="1836044" calcext:value-type="float">
            <text:p>1836044</text:p>
          </table:table-cell>
          <table:table-cell table:number-columns-repeated="981"/>
        </table:table-row>
        <table:table-row table:style-name="ro2">
          <table:table-cell/>
          <table:table-cell table:formula="of:=&quot;X1&quot;" office:value-type="string" office:string-value="X1" calcext:value-type="string">
            <text:p>X1</text:p>
          </table:table-cell>
          <table:table-cell table:style-name="ce89" office:value-type="float" office:value="494965.446963111" calcext:value-type="float">
            <text:p>494965.446963111</text:p>
          </table:table-cell>
          <table:table-cell office:value-type="float" office:value="1736.93167897317" calcext:value-type="float">
            <text:p>1736.93167897317</text:p>
          </table:table-cell>
          <table:table-cell office:value-type="float" office:value="284.965409379671" calcext:value-type="float">
            <text:p>284.965409379671</text:p>
          </table:table-cell>
          <table:table-cell office:value-type="float" office:value="0.000000000909802262015797" calcext:value-type="float">
            <text:p>9.09802262015797E-10</text:p>
          </table:table-cell>
          <table:table-cell office:value-type="float" office:value="490142.951504962" calcext:value-type="float">
            <text:p>490142.951504962</text:p>
          </table:table-cell>
          <table:table-cell office:value-type="float" office:value="499787.942421259" calcext:value-type="float">
            <text:p>499787.942421259</text:p>
          </table:table-cell>
          <table:table-cell table:formula="of:=&quot;LN(X1)&quot;" office:value-type="string" office:string-value="LN(X1)" calcext:value-type="string">
            <text:p>LN(X1)</text:p>
          </table:table-cell>
          <table:table-cell office:value-type="float" office:value="0.000108117508460141" calcext:value-type="float">
            <text:p>0.000108117508460141</text:p>
          </table:table-cell>
          <table:table-cell office:value-type="float" office:value="0.000808915241891653" calcext:value-type="float">
            <text:p>0.000808915241891653</text:p>
          </table:table-cell>
          <table:table-cell office:value-type="float" office:value="0.133657400505036" calcext:value-type="float">
            <text:p>0.133657400505036</text:p>
          </table:table-cell>
          <table:table-cell office:value-type="float" office:value="0.895720422494648" calcext:value-type="float">
            <text:p>0.895720422494648</text:p>
          </table:table-cell>
          <table:table-cell office:value-type="float" office:value="-0.0016394376258576" calcext:value-type="float">
            <text:p>-0.0016394376258576</text:p>
          </table:table-cell>
          <table:table-cell office:value-type="float" office:value="0.00185567264277789" calcext:value-type="float">
            <text:p>0.00185567264277789</text:p>
          </table:table-cell>
          <table:table-cell table:number-columns-repeated="12"/>
          <table:table-cell office:value-type="float" office:value="1841236" calcext:value-type="float">
            <text:p>1841236</text:p>
          </table:table-cell>
          <table:table-cell table:formula="of:=SUM([.AB90:.AB99])/10" office:value-type="float" office:value="1850630" calcext:value-type="float">
            <text:p>1850630</text:p>
          </table:table-cell>
          <table:table-cell table:formula="of:=(MAX([.AB90:.AB98])-MIN([.AB90:.AB98]))/[.AC99]*100" office:value-type="float" office:value="4.89141535585179" calcext:value-type="float">
            <text:p>4.9</text:p>
          </table:table-cell>
          <table:table-cell table:number-columns-repeated="979"/>
        </table:table-row>
        <table:table-row table:style-name="ro2">
          <table:table-cell table:number-columns-repeated="28"/>
          <table:table-cell table:style-name="Default" table:number-columns-repeated="2"/>
          <table:table-cell table:number-columns-repeated="979"/>
        </table:table-row>
        <table:table-row table:style-name="ro2"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23"/>
          <table:table-cell table:style-name="Default" table:number-columns-repeated="2"/>
          <table:table-cell table:number-columns-repeated="979"/>
        </table:table-row>
        <table:table-row table:style-name="ro2">
          <table:table-cell/>
          <table:table-cell table:number-matrix-columns-spanned="1" table:number-matrix-rows-spanned="5" table:formula="of:=[.$A$22:.$A$26]" office:value-type="float" office:value="0" calcext:value-type="float">
            <text:p>0</text:p>
          </table:table-cell>
          <table:table-cell table:number-matrix-columns-spanned="1" table:number-matrix-rows-spanned="5" table:formula="of:=MMULT([.$B$102:.$B$106] ; [.$C$99]) + [.$C$98]" office:value-type="float" office:value="0" calcext:value-type="float">
            <text:p>0</text:p>
          </table:table-cell>
          <table:table-cell table:number-matrix-columns-spanned="1" table:number-matrix-rows-spanned="5" table:formula="of:=[.$G$22:.$G$26]" office:value-type="float" office:value="1" calcext:value-type="float">
            <text:p>1</text:p>
          </table:table-cell>
          <table:table-cell table:number-matrix-columns-spanned="1" table:number-matrix-rows-spanned="5" table:formula="of:=[.$D$102:.$D$106] - [.$C$102:.$C$106]" office:value-type="float" office:value="1" calcext:value-type="float">
            <text:p>1</text:p>
          </table:table-cell>
          <table:table-cell table:number-columns-repeated="23"/>
          <table:table-cell table:style-name="Default" table:number-columns-repeated="2"/>
          <table:table-cell table:number-columns-repeated="97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4949654.46963111" calcext:value-type="float">
            <text:p>4949654.46963111</text:p>
          </table:table-cell>
          <table:table-cell office:value-type="float" office:value="158573" calcext:value-type="float">
            <text:p>158573</text:p>
          </table:table-cell>
          <table:table-cell office:value-type="float" office:value="-4791081.46963111" calcext:value-type="float">
            <text:p>-4791081.46963111</text:p>
          </table:table-cell>
          <table:table-cell table:number-columns-repeated="23"/>
          <table:table-cell table:style-name="Default" table:number-columns-repeated="2"/>
          <table:table-cell table:number-columns-repeated="97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9899308.93926221" calcext:value-type="float">
            <text:p>9899308.93926221</text:p>
          </table:table-cell>
          <table:table-cell office:value-type="float" office:value="315866" calcext:value-type="float">
            <text:p>315866</text:p>
          </table:table-cell>
          <table:table-cell office:value-type="float" office:value="-9583442.93926221" calcext:value-type="float">
            <text:p>-9583442.93926221</text:p>
          </table:table-cell>
          <table:table-cell table:number-columns-repeated="23"/>
          <table:table-cell table:style-name="Default" table:number-columns-repeated="2"/>
          <table:table-cell table:number-columns-repeated="97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14848963.4088933" calcext:value-type="float">
            <text:p>14848963.4088933</text:p>
          </table:table-cell>
          <table:table-cell office:value-type="float" office:value="471092" calcext:value-type="float">
            <text:p>471092</text:p>
          </table:table-cell>
          <table:table-cell office:value-type="float" office:value="-14377871.4088933" calcext:value-type="float">
            <text:p>-14377871.4088933</text:p>
          </table:table-cell>
          <table:table-cell table:number-columns-repeated="23"/>
          <table:table-cell table:style-name="Default" table:number-columns-repeated="2"/>
          <table:table-cell table:number-columns-repeated="97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19798617.8785244" calcext:value-type="float">
            <text:p>19798617.8785244</text:p>
          </table:table-cell>
          <table:table-cell office:value-type="float" office:value="620381" calcext:value-type="float">
            <text:p>620381</text:p>
          </table:table-cell>
          <table:table-cell office:value-type="float" office:value="-19178236.8785244" calcext:value-type="float">
            <text:p>-19178236.8785244</text:p>
          </table:table-cell>
          <table:table-cell table:number-columns-repeated="23"/>
          <table:table-cell table:style-name="Default" table:number-columns-repeated="2"/>
          <table:table-cell table:number-columns-repeated="979"/>
        </table:table-row>
      </table:table>
      <table:table table:name="Clause 6 Sizing Calibration" table:style-name="ta1">
        <table:table-column table:style-name="co8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4" table:default-cell-style-name="ce20"/>
        <table:table-column table:style-name="co4" table:default-cell-style-name="Default"/>
        <table:table-column table:style-name="co4" table:default-cell-style-name="ce20"/>
        <table:table-column table:style-name="co4" table:number-columns-repeated="1017" table:default-cell-style-name="Default"/>
        <table:table-row table:style-name="ro3">
          <table:table-cell table:style-name="ce85"/>
          <table:table-cell table:style-name="ce88"/>
          <table:table-cell table:style-name="ce85" table:number-columns-spanned="5" table:number-rows-spanned="1"/>
          <table:covered-table-cell table:number-columns-repeated="4" table:style-name="ce88"/>
          <table:table-cell table:style-name="ce88" table:number-columns-repeated="5"/>
          <table:table-cell/>
          <table:table-cell table:style-name="ce88" table:number-columns-repeated="1011"/>
        </table:table-row>
        <table:table-row table:style-name="ro2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5">
          <table:table-cell table:style-name="ce34" office:value-type="string" calcext:value-type="string">
            <text:p>RM</text:p>
          </table:table-cell>
          <table:table-cell table:style-name="ce33" office:value-type="string" calcext:value-type="string">
            <text:p>Partistan 34D Lot 34D</text:p>
          </table:table-cell>
          <table:table-cell table:style-name="ce33"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33" office:value-type="string" calcext:value-type="string">
            <text:p>Date</text:p>
          </table:table-cell>
          <table:table-cell table:style-name="ce180" office:value-type="date" office:date-value="2025-06-12" calcext:value-type="date">
            <text:p>2025-06-12</text:p>
          </table:table-cell>
          <table:table-cell table:style-name="ce33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30"/>
          <table:table-cell table:number-columns-repeated="1012"/>
        </table:table-row>
        <table:table-row table:style-name="ro2">
          <table:table-cell table:style-name="ce33" office:value-type="string" calcext:value-type="string">
            <text:p>Operator</text:p>
          </table:table-cell>
          <table:table-cell table:style-name="ce181" office:value-type="string" calcext:value-type="string">
            <text:p>JMD</text:p>
          </table:table-cell>
          <table:table-cell table:style-name="ce33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31"/>
          <table:table-cell table:number-columns-repeated="1012"/>
        </table:table-row>
        <table:table-row table:style-name="ro2">
          <table:table-cell table:style-name="ce33" office:value-type="string" calcext:value-type="string">
            <text:p>APC Model</text:p>
          </table:table-cell>
          <table:table-cell table:style-name="ce182" office:value-type="string" calcext:value-type="string">
            <text:p>LPA3-NAVAIR</text:p>
          </table:table-cell>
          <table:table-cell table:style-name="ce179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6"/>
          <table:table-cell table:number-columns-repeated="1012"/>
        </table:table-row>
        <table:table-row table:style-name="ro2">
          <table:table-cell table:style-name="ce33" office:value-type="string" calcext:value-type="string">
            <text:p>APC S/N</text:p>
          </table:table-cell>
          <table:table-cell table:style-name="ce183" office:value-type="string" calcext:value-type="string">
            <text:p>11171-00009</text:p>
          </table:table-cell>
          <table:table-cell table:style-name="ce33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6"/>
          <table:table-cell table:number-columns-repeated="1012"/>
        </table:table-row>
        <table:table-row table:style-name="ro2">
          <table:table-cell table:style-name="ce33" office:value-type="string" calcext:value-type="string">
            <text:p>Sensor Model</text:p>
          </table:table-cell>
          <table:table-cell table:style-name="ce182" office:value-type="string" calcext:value-type="string">
            <text:p>LPA3-NAVAIR</text:p>
          </table:table-cell>
          <table:table-cell table:style-name="ce33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6"/>
          <table:table-cell table:number-columns-repeated="1012"/>
        </table:table-row>
        <table:table-row table:style-name="ro2">
          <table:table-cell table:style-name="ce33" office:value-type="string" calcext:value-type="string">
            <text:p>Sensor S/N</text:p>
          </table:table-cell>
          <table:table-cell table:style-name="ce183" office:value-type="string" calcext:value-type="string">
            <text:p>11171-00009</text:p>
          </table:table-cell>
          <table:table-cell table:style-name="ce33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30"/>
          <table:table-cell table:number-columns-repeated="1012"/>
        </table:table-row>
        <table:table-row table:style-name="ro2">
          <table:table-cell table:style-name="ce179" office:value-type="string" calcext:value-type="string">
            <text:p>Bottle Sampler</text:p>
          </table:table-cell>
          <table:table-cell table:style-name="ce183" office:value-type="string" calcext:value-type="string">
            <text:p>BS110-NAVAIR BS2042</text:p>
          </table:table-cell>
          <table:table-cell table:style-name="ce33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6"/>
          <table:table-cell table:number-columns-repeated="1012"/>
        </table:table-row>
        <table:table-row table:style-name="ro2">
          <table:table-cell/>
          <table:table-cell table:style-name="ce114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33" office:value-type="string" calcext:value-type="string">
            <text:p>Threshold Noise</text:p>
          </table:table-cell>
          <table:table-cell table:style-name="ce182" office:value-type="float" office:value="36" calcext:value-type="float">
            <text:p>36</text:p>
          </table:table-cell>
          <table:table-cell table:style-name="ce33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6"/>
          <table:table-cell table:number-columns-repeated="1012"/>
        </table:table-row>
        <table:table-row table:style-name="ro2" table:visibility="collapse">
          <table:table-cell/>
          <table:table-cell table:style-name="ce114"/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ce16"/>
          <table:table-cell table:number-columns-repeated="1012"/>
        </table:table-row>
        <table:table-row table:style-name="ro2">
          <table:table-cell office:value-type="string" calcext:value-type="string">
            <text:p>Lowest threshold J</text:p>
          </table:table-cell>
          <table:table-cell table:style-name="ce114" table:formula="of:=[.B12]*1.5" office:value-type="float" office:value="54" calcext:value-type="float">
            <text:p>54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Highest threshold H</text:p>
          </table:table-cell>
          <table:table-cell table:style-name="ce114" office:value-type="float" office:value="6000" calcext:value-type="float">
            <text:p>6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Threshold Factor K</text:p>
          </table:table-cell>
          <table:table-cell table:style-name="ce185" table:formula="of:=10^((LOG([.B15])-LOG([.B14]))/27)" office:value-type="float" office:value="1.19060799886319" calcext:value-type="float">
            <text:p>1.19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2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string" calcext:value-type="string">
            <text:p>Threshold#</text:p>
          </table:table-cell>
          <table:table-cell table:style-name="ce16" office:value-type="string" calcext:value-type="string">
            <text:p>Initial Value</text:p>
          </table:table-cell>
          <table:table-cell table:style-name="ce16" office:value-type="string" calcext:value-type="string">
            <text:p>INT</text:p>
          </table:table-cell>
          <table:table-cell table:style-name="ce16" office:value-type="string" calcext:value-type="string">
            <text:p>Reverse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resholds</text:p>
          </table:table-cell>
          <table:table-cell/>
          <table:table-cell office:value-type="string" calcext:value-type="string">
            <text:p>1.5x noise</text:p>
          </table:table-cell>
          <table:table-cell office:value-type="float" office:value="0" calcext:value-type="float">
            <text:p>0</text:p>
          </table:table-cell>
          <table:table-cell table:formula="of:=[.B12]*1.5" office:value-type="float" office:value="54" calcext:value-type="float">
            <text:p>54</text:p>
          </table:table-cell>
          <table:table-cell table:formula="of:=INT([.E19])" office:value-type="float" office:value="54" calcext:value-type="float">
            <text:p>54</text:p>
          </table:table-cell>
          <table:table-cell table:formula="of:=[.G20]*[.B$16]" office:value-type="float" office:value="6000.00000000001" calcext:value-type="float">
            <text:p>6000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formula="of:=[.E19]*[.B$16]" office:value-type="float" office:value="64.2928319386125" calcext:value-type="float">
            <text:p>64</text:p>
          </table:table-cell>
          <table:table-cell table:formula="of:=INT([.E20])" office:value-type="float" office:value="64" calcext:value-type="float">
            <text:p>64</text:p>
          </table:table-cell>
          <table:table-cell table:formula="of:=[.G21]*[.B$16]" office:value-type="float" office:value="5039.44203778983" calcext:value-type="float">
            <text:p>5039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formula="of:=[.E20]*[.B$16]" office:value-type="float" office:value="76.5475599756791" calcext:value-type="float">
            <text:p>77</text:p>
          </table:table-cell>
          <table:table-cell table:formula="of:=INT([.E21])" office:value-type="float" office:value="76" calcext:value-type="float">
            <text:p>76</text:p>
          </table:table-cell>
          <table:table-cell table:formula="of:=[.G22]*[.B$16]" office:value-type="float" office:value="4232.66267537388" calcext:value-type="float">
            <text:p>4233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formula="of:=[.E21]*[.B$16]" office:value-type="float" office:value="91.1381372005036" calcext:value-type="float">
            <text:p>91</text:p>
          </table:table-cell>
          <table:table-cell table:formula="of:=INT([.E22])" office:value-type="float" office:value="91" calcext:value-type="float">
            <text:p>91</text:p>
          </table:table-cell>
          <table:table-cell table:formula="of:=[.G23]*[.B$16]" office:value-type="float" office:value="3555.04303634384" calcext:value-type="float">
            <text:p>3555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table:formula="of:=[.E22]*[.B$16]" office:value-type="float" office:value="108.509795152411" calcext:value-type="float">
            <text:p>109</text:p>
          </table:table-cell>
          <table:table-cell table:formula="of:=INT([.E23])" office:value-type="float" office:value="108" calcext:value-type="float">
            <text:p>108</text:p>
          </table:table-cell>
          <table:table-cell table:formula="of:=[.G24]*[.B$16]" office:value-type="float" office:value="2985.90555391719" calcext:value-type="float">
            <text:p>2986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 table:formula="of:=[.E23]*[.B$16]" office:value-type="float" office:value="129.192630063467" calcext:value-type="float">
            <text:p>129</text:p>
          </table:table-cell>
          <table:table-cell table:formula="of:=INT([.E24])" office:value-type="float" office:value="129" calcext:value-type="float">
            <text:p>129</text:p>
          </table:table-cell>
          <table:table-cell table:formula="of:=[.G25]*[.B$16]" office:value-type="float" office:value="2507.88299488007" calcext:value-type="float">
            <text:p>2508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 table:formula="of:=[.E24]*[.B$16]" office:value-type="float" office:value="153.817778747738" calcext:value-type="float">
            <text:p>154</text:p>
          </table:table-cell>
          <table:table-cell table:formula="of:=INT([.E25])" office:value-type="float" office:value="153" calcext:value-type="float">
            <text:p>153</text:p>
          </table:table-cell>
          <table:table-cell table:formula="of:=[.G26]*[.B$16]" office:value-type="float" office:value="2106.38849837614" calcext:value-type="float">
            <text:p>2106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7" calcext:value-type="float">
            <text:p>7</text:p>
          </table:table-cell>
          <table:table-cell table:formula="of:=[.E25]*[.B$16]" office:value-type="float" office:value="183.136677744425" calcext:value-type="float">
            <text:p>183</text:p>
          </table:table-cell>
          <table:table-cell table:formula="of:=INT([.E26])" office:value-type="float" office:value="183" calcext:value-type="float">
            <text:p>183</text:p>
          </table:table-cell>
          <table:table-cell table:formula="of:=[.G27]*[.B$16]" office:value-type="float" office:value="1769.17045777228" calcext:value-type="float">
            <text:p>1769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table:formula="of:=[.E26]*[.B$16]" office:value-type="float" office:value="218.043993407744" calcext:value-type="float">
            <text:p>218</text:p>
          </table:table-cell>
          <table:table-cell table:formula="of:=INT([.E27])" office:value-type="float" office:value="218" calcext:value-type="float">
            <text:p>218</text:p>
          </table:table-cell>
          <table:table-cell table:formula="of:=[.G28]*[.B$16]" office:value-type="float" office:value="1485.93866281892" calcext:value-type="float">
            <text:p>1486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9" calcext:value-type="float">
            <text:p>9</text:p>
          </table:table-cell>
          <table:table-cell table:formula="of:=[.E27]*[.B$16]" office:value-type="float" office:value="259.604922655334" calcext:value-type="float">
            <text:p>260</text:p>
          </table:table-cell>
          <table:table-cell table:formula="of:=INT([.E28])" office:value-type="float" office:value="259" calcext:value-type="float">
            <text:p>259</text:p>
          </table:table-cell>
          <table:table-cell table:formula="of:=[.G29]*[.B$16]" office:value-type="float" office:value="1248.05029383114" calcext:value-type="float">
            <text:p>1248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 table:formula="of:=[.E28]*[.B$16]" office:value-type="float" office:value="309.087697457701" calcext:value-type="float">
            <text:p>309</text:p>
          </table:table-cell>
          <table:table-cell table:formula="of:=INT([.E29])" office:value-type="float" office:value="309" calcext:value-type="float">
            <text:p>309</text:p>
          </table:table-cell>
          <table:table-cell table:formula="of:=[.G30]*[.B$16]" office:value-type="float" office:value="1048.24618600143" calcext:value-type="float">
            <text:p>1048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11" calcext:value-type="float">
            <text:p>11</text:p>
          </table:table-cell>
          <table:table-cell table:formula="of:=[.E29]*[.B$16]" office:value-type="float" office:value="368.002284943346" calcext:value-type="float">
            <text:p>368</text:p>
          </table:table-cell>
          <table:table-cell table:formula="of:=INT([.E30])" office:value-type="float" office:value="368" calcext:value-type="float">
            <text:p>368</text:p>
          </table:table-cell>
          <table:table-cell table:formula="of:=[.G31]*[.B$16]" office:value-type="float" office:value="880.429315948079" calcext:value-type="float">
            <text:p>880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12" calcext:value-type="float">
            <text:p>12</text:p>
          </table:table-cell>
          <table:table-cell table:formula="of:=[.E30]*[.B$16]" office:value-type="float" office:value="438.14646405348" calcext:value-type="float">
            <text:p>438</text:p>
          </table:table-cell>
          <table:table-cell table:formula="of:=INT([.E31])" office:value-type="float" office:value="438" calcext:value-type="float">
            <text:p>438</text:p>
          </table:table-cell>
          <table:table-cell table:formula="of:=[.G32]*[.B$16]" office:value-type="float" office:value="739.478751015215" calcext:value-type="float">
            <text:p>739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13" calcext:value-type="float">
            <text:p>13</text:p>
          </table:table-cell>
          <table:table-cell table:formula="of:=[.E31]*[.B$16]" office:value-type="float" office:value="521.660684775698" calcext:value-type="float">
            <text:p>522</text:p>
          </table:table-cell>
          <table:table-cell table:formula="of:=INT([.E32])" office:value-type="float" office:value="521" calcext:value-type="float">
            <text:p>521</text:p>
          </table:table-cell>
          <table:table-cell table:formula="of:=[.G33]*[.B$16]" office:value-type="float" office:value="621.093383986398" calcext:value-type="float">
            <text:p>621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14" calcext:value-type="float">
            <text:p>14</text:p>
          </table:table-cell>
          <table:table-cell table:formula="of:=[.E32]*[.B$16]" office:value-type="float" office:value="621.093383986398" calcext:value-type="float">
            <text:p>621</text:p>
          </table:table-cell>
          <table:table-cell table:formula="of:=INT([.E33])" office:value-type="float" office:value="621" calcext:value-type="float">
            <text:p>621</text:p>
          </table:table-cell>
          <table:table-cell table:formula="of:=[.G34]*[.B$16]" office:value-type="float" office:value="521.660684775698" calcext:value-type="float">
            <text:p>522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15" calcext:value-type="float">
            <text:p>15</text:p>
          </table:table-cell>
          <table:table-cell table:formula="of:=[.E33]*[.B$16]" office:value-type="float" office:value="739.478751015215" calcext:value-type="float">
            <text:p>739</text:p>
          </table:table-cell>
          <table:table-cell table:formula="of:=INT([.E34])" office:value-type="float" office:value="739" calcext:value-type="float">
            <text:p>739</text:p>
          </table:table-cell>
          <table:table-cell table:formula="of:=[.G35]*[.B$16]" office:value-type="float" office:value="438.14646405348" calcext:value-type="float">
            <text:p>438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table:formula="of:=[.E34]*[.B$16]" office:value-type="float" office:value="880.429315948079" calcext:value-type="float">
            <text:p>880</text:p>
          </table:table-cell>
          <table:table-cell table:formula="of:=INT([.E35])" office:value-type="float" office:value="880" calcext:value-type="float">
            <text:p>880</text:p>
          </table:table-cell>
          <table:table-cell table:formula="of:=[.G36]*[.B$16]" office:value-type="float" office:value="368.002284943346" calcext:value-type="float">
            <text:p>368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17" calcext:value-type="float">
            <text:p>17</text:p>
          </table:table-cell>
          <table:table-cell table:formula="of:=[.E35]*[.B$16]" office:value-type="float" office:value="1048.24618600143" calcext:value-type="float">
            <text:p>1048</text:p>
          </table:table-cell>
          <table:table-cell table:formula="of:=INT([.E36])" office:value-type="float" office:value="1048" calcext:value-type="float">
            <text:p>1048</text:p>
          </table:table-cell>
          <table:table-cell table:formula="of:=[.G37]*[.B$16]" office:value-type="float" office:value="309.087697457701" calcext:value-type="float">
            <text:p>309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18" calcext:value-type="float">
            <text:p>18</text:p>
          </table:table-cell>
          <table:table-cell table:formula="of:=[.E36]*[.B$16]" office:value-type="float" office:value="1248.05029383114" calcext:value-type="float">
            <text:p>1248</text:p>
          </table:table-cell>
          <table:table-cell table:formula="of:=INT([.E37])" office:value-type="float" office:value="1248" calcext:value-type="float">
            <text:p>1248</text:p>
          </table:table-cell>
          <table:table-cell table:formula="of:=[.G38]*[.B$16]" office:value-type="float" office:value="259.604922655334" calcext:value-type="float">
            <text:p>260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19" calcext:value-type="float">
            <text:p>19</text:p>
          </table:table-cell>
          <table:table-cell table:formula="of:=[.E37]*[.B$16]" office:value-type="float" office:value="1485.93866281892" calcext:value-type="float">
            <text:p>1486</text:p>
          </table:table-cell>
          <table:table-cell table:formula="of:=INT([.E38])" office:value-type="float" office:value="1485" calcext:value-type="float">
            <text:p>1485</text:p>
          </table:table-cell>
          <table:table-cell table:formula="of:=[.G39]*[.B$16]" office:value-type="float" office:value="218.043993407744" calcext:value-type="float">
            <text:p>218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20" calcext:value-type="float">
            <text:p>20</text:p>
          </table:table-cell>
          <table:table-cell table:formula="of:=[.E38]*[.B$16]" office:value-type="float" office:value="1769.17045777228" calcext:value-type="float">
            <text:p>1769</text:p>
          </table:table-cell>
          <table:table-cell table:formula="of:=INT([.E39])" office:value-type="float" office:value="1769" calcext:value-type="float">
            <text:p>1769</text:p>
          </table:table-cell>
          <table:table-cell table:formula="of:=[.G40]*[.B$16]" office:value-type="float" office:value="183.136677744425" calcext:value-type="float">
            <text:p>183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21" calcext:value-type="float">
            <text:p>21</text:p>
          </table:table-cell>
          <table:table-cell table:formula="of:=[.E39]*[.B$16]" office:value-type="float" office:value="2106.38849837614" calcext:value-type="float">
            <text:p>2106</text:p>
          </table:table-cell>
          <table:table-cell table:formula="of:=INT([.E40])" office:value-type="float" office:value="2106" calcext:value-type="float">
            <text:p>2106</text:p>
          </table:table-cell>
          <table:table-cell table:formula="of:=[.G41]*[.B$16]" office:value-type="float" office:value="153.817778747738" calcext:value-type="float">
            <text:p>154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22" calcext:value-type="float">
            <text:p>22</text:p>
          </table:table-cell>
          <table:table-cell table:formula="of:=[.E40]*[.B$16]" office:value-type="float" office:value="2507.88299488007" calcext:value-type="float">
            <text:p>2508</text:p>
          </table:table-cell>
          <table:table-cell table:formula="of:=INT([.E41])" office:value-type="float" office:value="2507" calcext:value-type="float">
            <text:p>2507</text:p>
          </table:table-cell>
          <table:table-cell table:formula="of:=[.G42]*[.B$16]" office:value-type="float" office:value="129.192630063467" calcext:value-type="float">
            <text:p>129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23" calcext:value-type="float">
            <text:p>23</text:p>
          </table:table-cell>
          <table:table-cell table:formula="of:=[.E41]*[.B$16]" office:value-type="float" office:value="2985.90555391719" calcext:value-type="float">
            <text:p>2986</text:p>
          </table:table-cell>
          <table:table-cell table:formula="of:=INT([.E42])" office:value-type="float" office:value="2985" calcext:value-type="float">
            <text:p>2985</text:p>
          </table:table-cell>
          <table:table-cell table:formula="of:=[.G43]*[.B$16]" office:value-type="float" office:value="108.509795152411" calcext:value-type="float">
            <text:p>109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24" calcext:value-type="float">
            <text:p>24</text:p>
          </table:table-cell>
          <table:table-cell table:formula="of:=[.E42]*[.B$16]" office:value-type="float" office:value="3555.04303634384" calcext:value-type="float">
            <text:p>3555</text:p>
          </table:table-cell>
          <table:table-cell table:formula="of:=INT([.E43])" office:value-type="float" office:value="3555" calcext:value-type="float">
            <text:p>3555</text:p>
          </table:table-cell>
          <table:table-cell table:formula="of:=[.G44]*[.B$16]" office:value-type="float" office:value="91.1381372005036" calcext:value-type="float">
            <text:p>91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25" calcext:value-type="float">
            <text:p>25</text:p>
          </table:table-cell>
          <table:table-cell table:formula="of:=[.E43]*[.B$16]" office:value-type="float" office:value="4232.66267537388" calcext:value-type="float">
            <text:p>4233</text:p>
          </table:table-cell>
          <table:table-cell table:formula="of:=INT([.E44])" office:value-type="float" office:value="4232" calcext:value-type="float">
            <text:p>4232</text:p>
          </table:table-cell>
          <table:table-cell table:formula="of:=[.G45]*[.B$16]" office:value-type="float" office:value="76.5475599756791" calcext:value-type="float">
            <text:p>77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26" calcext:value-type="float">
            <text:p>26</text:p>
          </table:table-cell>
          <table:table-cell table:formula="of:=[.E44]*[.B$16]" office:value-type="float" office:value="5039.44203778983" calcext:value-type="float">
            <text:p>5039</text:p>
          </table:table-cell>
          <table:table-cell table:formula="of:=INT([.E45])" office:value-type="float" office:value="5039" calcext:value-type="float">
            <text:p>5039</text:p>
          </table:table-cell>
          <table:table-cell table:formula="of:=[.G46]*[.B$16]" office:value-type="float" office:value="64.2928319386125" calcext:value-type="float">
            <text:p>64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~30um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E45]*[.B$16]" office:value-type="float" office:value="6000.00000000001" calcext:value-type="float">
            <text:p>6000</text:p>
          </table:table-cell>
          <table:table-cell table:formula="of:=INT([.E46])" office:value-type="float" office:value="6000" calcext:value-type="float">
            <text:p>6000</text:p>
          </table:table-cell>
          <table:table-cell table:formula="of:=[.B12]*1.5"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Default"/>
          <table:table-cell table:number-columns-repeated="1017"/>
        </table:table-row>
        <table:table-row table:style-name="ro2">
          <table:table-cell table:number-columns-repeated="2"/>
          <table:table-cell table:style-name="ce76" office:value-type="float" office:value="54" calcext:value-type="float">
            <text:p>54.0</text:p>
          </table:table-cell>
          <table:table-cell table:style-name="ce76" office:value-type="float" office:value="63.8601474584642" calcext:value-type="float">
            <text:p>63.9</text:p>
          </table:table-cell>
          <table:table-cell table:style-name="ce76" office:value-type="float" office:value="75.5207117299405" calcext:value-type="float">
            <text:p>75.5</text:p>
          </table:table-cell>
          <table:table-cell table:style-name="ce76" office:value-type="float" office:value="89.3104405044846" calcext:value-type="float">
            <text:p>89.3</text:p>
          </table:table-cell>
          <table:table-cell table:style-name="ce76" office:value-type="float" office:value="105.618109262903" calcext:value-type="float">
            <text:p>105.6</text:p>
          </table:table-cell>
          <table:table-cell table:style-name="ce76" office:value-type="float" office:value="124.903482070615" calcext:value-type="float">
            <text:p>124.9</text:p>
          </table:table-cell>
          <table:table-cell table:style-name="ce76" office:value-type="float" office:value="147.710273761205" calcext:value-type="float">
            <text:p>147.7</text:p>
          </table:table-cell>
          <table:table-cell table:style-name="ce76" office:value-type="float" office:value="174.681478954087" calcext:value-type="float">
            <text:p>174.7</text:p>
          </table:table-cell>
          <table:table-cell table:style-name="ce76" office:value-type="float" office:value="206.577500079085" calcext:value-type="float">
            <text:p>206.6</text:p>
          </table:table-cell>
          <table:table-cell table:style-name="ce76" office:value-type="float" office:value="244.297585493542" calcext:value-type="float">
            <text:p>244.3</text:p>
          </table:table-cell>
          <table:table-cell table:style-name="ce76" office:value-type="float" office:value="288.90518209934" calcext:value-type="float">
            <text:p>288.9</text:p>
          </table:table-cell>
          <table:table-cell table:style-name="ce76" office:value-type="float" office:value="341.657917229227" calcext:value-type="float">
            <text:p>341.7</text:p>
          </table:table-cell>
          <table:table-cell table:style-name="ce76" office:value-type="float" office:value="404.043055085374" calcext:value-type="float">
            <text:p>404.0</text:p>
          </table:table-cell>
          <table:table-cell table:style-name="ce76" office:value-type="float" office:value="477.819427357784" calcext:value-type="float">
            <text:p>477.8</text:p>
          </table:table-cell>
          <table:table-cell table:style-name="ce76" office:value-type="float" office:value="565.067020177538" calcext:value-type="float">
            <text:p>565.1</text:p>
          </table:table-cell>
          <table:table-cell table:style-name="ce76" office:value-type="float" office:value="668.245615415787" calcext:value-type="float">
            <text:p>668.2</text:p>
          </table:table-cell>
          <table:table-cell table:style-name="ce76" office:value-type="float" office:value="790.264139609709" calcext:value-type="float">
            <text:p>790.3</text:p>
          </table:table-cell>
          <table:table-cell table:style-name="ce76" office:value-type="float" office:value="934.562675678007" calcext:value-type="float">
            <text:p>934.6</text:p>
          </table:table-cell>
          <table:table-cell table:style-name="ce76" office:value-type="float" office:value="1105.20944959212" calcext:value-type="float">
            <text:p>1105.2</text:p>
          </table:table-cell>
          <table:table-cell table:style-name="ce76" office:value-type="float" office:value="1307.01552636001" calcext:value-type="float">
            <text:p>1307.0</text:p>
          </table:table-cell>
          <table:table-cell table:style-name="ce76" office:value-type="float" office:value="1545.67044896023" calcext:value-type="float">
            <text:p>1545.7</text:p>
          </table:table-cell>
          <table:table-cell table:style-name="ce76" office:value-type="float" office:value="1827.90264431094" calcext:value-type="float">
            <text:p>1827.9</text:p>
          </table:table-cell>
          <table:table-cell table:style-name="ce76" office:value-type="float" office:value="2161.66911861877" calcext:value-type="float">
            <text:p>2161.7</text:p>
          </table:table-cell>
          <table:table-cell table:style-name="ce76" office:value-type="float" office:value="2556.37979021116" calcext:value-type="float">
            <text:p>2556.4</text:p>
          </table:table-cell>
          <table:table-cell table:style-name="ce76" office:value-type="float" office:value="3023.16278449486" calcext:value-type="float">
            <text:p>3023.2</text:p>
          </table:table-cell>
          <table:table-cell table:style-name="ce76" office:value-type="float" office:value="3575.17817053302" calcext:value-type="float">
            <text:p>3575.2</text:p>
          </table:table-cell>
          <table:table-cell table:style-name="ce76" office:value-type="float" office:value="4227.98898445409" calcext:value-type="float">
            <text:p>4228.0</text:p>
          </table:table-cell>
          <table:table-cell table:style-name="ce76" office:value-type="float" office:value="5000.00000000001" calcext:value-type="float">
            <text:p>5000.0</text:p>
          </table:table-cell>
          <table:table-cell table:number-columns-repeated="994"/>
        </table:table-row>
        <table:table-row table:style-name="ro2">
          <table:table-cell table:style-name="ce89" office:value-type="string" calcext:value-type="string">
            <text:p>Thresholds to Load into Instrument</text:p>
          </table:table-cell>
          <table:table-cell/>
          <table:table-cell table:style-name="ce186" table:formula="of:=INT([.C48]+0.5)" office:value-type="float" office:value="54" calcext:value-type="float">
            <text:p>54</text:p>
          </table:table-cell>
          <table:table-cell table:style-name="ce188" table:formula="of:=INT([.D48]+0.5)" office:value-type="float" office:value="64" calcext:value-type="float">
            <text:p>64</text:p>
          </table:table-cell>
          <table:table-cell table:style-name="ce188" table:formula="of:=INT([.E48]+0.5)" office:value-type="float" office:value="76" calcext:value-type="float">
            <text:p>76</text:p>
          </table:table-cell>
          <table:table-cell table:style-name="ce188" table:formula="of:=INT([.F48]+0.5)" office:value-type="float" office:value="89" calcext:value-type="float">
            <text:p>89</text:p>
          </table:table-cell>
          <table:table-cell table:style-name="ce188" table:formula="of:=INT([.G48]+0.5)" office:value-type="float" office:value="106" calcext:value-type="float">
            <text:p>106</text:p>
          </table:table-cell>
          <table:table-cell table:style-name="ce188" table:formula="of:=INT([.H48]+0.5)" office:value-type="float" office:value="125" calcext:value-type="float">
            <text:p>125</text:p>
          </table:table-cell>
          <table:table-cell table:style-name="ce188" table:formula="of:=INT([.I48]+0.5)" office:value-type="float" office:value="148" calcext:value-type="float">
            <text:p>148</text:p>
          </table:table-cell>
          <table:table-cell table:style-name="ce188" table:formula="of:=INT([.J48]+0.5)" office:value-type="float" office:value="175" calcext:value-type="float">
            <text:p>175</text:p>
          </table:table-cell>
          <table:table-cell table:style-name="ce188" table:formula="of:=INT([.K48]+0.5)" office:value-type="float" office:value="207" calcext:value-type="float">
            <text:p>207</text:p>
          </table:table-cell>
          <table:table-cell table:style-name="ce188" table:formula="of:=INT([.L48]+0.5)" office:value-type="float" office:value="244" calcext:value-type="float">
            <text:p>244</text:p>
          </table:table-cell>
          <table:table-cell table:style-name="ce188" table:formula="of:=INT([.M48]+0.5)" office:value-type="float" office:value="289" calcext:value-type="float">
            <text:p>289</text:p>
          </table:table-cell>
          <table:table-cell table:style-name="ce188" table:formula="of:=INT([.N48]+0.5)" office:value-type="float" office:value="342" calcext:value-type="float">
            <text:p>342</text:p>
          </table:table-cell>
          <table:table-cell table:style-name="ce188" table:formula="of:=INT([.O48]+0.5)" office:value-type="float" office:value="404" calcext:value-type="float">
            <text:p>404</text:p>
          </table:table-cell>
          <table:table-cell table:style-name="ce188" table:formula="of:=INT([.P48]+0.5)" office:value-type="float" office:value="478" calcext:value-type="float">
            <text:p>478</text:p>
          </table:table-cell>
          <table:table-cell table:style-name="ce188" table:formula="of:=INT([.Q48]+0.5)" office:value-type="float" office:value="565" calcext:value-type="float">
            <text:p>565</text:p>
          </table:table-cell>
          <table:table-cell table:style-name="ce188" table:formula="of:=INT([.R48]+0.5)" office:value-type="float" office:value="668" calcext:value-type="float">
            <text:p>668</text:p>
          </table:table-cell>
          <table:table-cell table:style-name="ce188" table:formula="of:=INT([.S48]+0.5)" office:value-type="float" office:value="790" calcext:value-type="float">
            <text:p>790</text:p>
          </table:table-cell>
          <table:table-cell table:style-name="ce188" table:formula="of:=INT([.T48]+0.5)" office:value-type="float" office:value="935" calcext:value-type="float">
            <text:p>935</text:p>
          </table:table-cell>
          <table:table-cell table:style-name="ce188" table:formula="of:=INT([.U48]+0.5)" office:value-type="float" office:value="1105" calcext:value-type="float">
            <text:p>1105</text:p>
          </table:table-cell>
          <table:table-cell table:style-name="ce188" table:formula="of:=INT([.V48]+0.5)" office:value-type="float" office:value="1307" calcext:value-type="float">
            <text:p>1307</text:p>
          </table:table-cell>
          <table:table-cell table:style-name="ce188" table:formula="of:=INT([.W48]+0.5)" office:value-type="float" office:value="1546" calcext:value-type="float">
            <text:p>1546</text:p>
          </table:table-cell>
          <table:table-cell table:style-name="ce188" table:formula="of:=INT([.X48]+0.5)" office:value-type="float" office:value="1828" calcext:value-type="float">
            <text:p>1828</text:p>
          </table:table-cell>
          <table:table-cell table:style-name="ce188" table:formula="of:=INT([.Y48]+0.5)" office:value-type="float" office:value="2162" calcext:value-type="float">
            <text:p>2162</text:p>
          </table:table-cell>
          <table:table-cell table:style-name="ce188" table:formula="of:=INT([.Z48]+0.5)" office:value-type="float" office:value="2556" calcext:value-type="float">
            <text:p>2556</text:p>
          </table:table-cell>
          <table:table-cell table:style-name="ce188" table:formula="of:=INT([.AA48]+0.5)" office:value-type="float" office:value="3023" calcext:value-type="float">
            <text:p>3023</text:p>
          </table:table-cell>
          <table:table-cell table:style-name="ce188" table:formula="of:=INT([.AB48]+0.5)" office:value-type="float" office:value="3575" calcext:value-type="float">
            <text:p>3575</text:p>
          </table:table-cell>
          <table:table-cell table:style-name="ce188" table:formula="of:=INT([.AC48]+0.5)" office:value-type="float" office:value="4228" calcext:value-type="float">
            <text:p>4228</text:p>
          </table:table-cell>
          <table:table-cell table:style-name="ce191" table:formula="of:=INT([.AD48]+0.5)" office:value-type="float" office:value="5000" calcext:value-type="float">
            <text:p>5000</text:p>
          </table:table-cell>
          <table:table-cell table:number-columns-repeated="994"/>
        </table:table-row>
      </table:table>
      <table:table table:name="6 - B1" table:style-name="ta1">
        <table:shapes>
          <draw:frame draw:z-index="0" draw:name="Text Frame 1" draw:style-name="gr5" draw:text-style-name="P3" svg:width="22.542cm" svg:height="3.745cm" svg:x="1.446cm" svg:y="47.187cm">
            <draw:text-box>
              <text:p>Export into temportary CSV file 15 results from LPA-View, consisting of 3x bottles 5 portion samples. Exclude the portion 0 averages.</text:p>
              <text:p/>
              <text:p>Autofilter, sort by ascending date.</text:p>
              <text:p>Copy / special paste the data block into this page below, ensuring appears in correct slots</text:p>
              <text:p>Bottle 2 and 3 pages should be linked to correct regions of pasted data block.</text:p>
              <text:p>Data quality evalution tables should pick up correct regions of pasted data block</text:p>
              <text:p>If needed, on each bottle page can delete one indivual portion result per size line in order tp meet data quality requirements</text:p>
            </draw:text-box>
          </draw:frame>
        </table:shapes>
        <table:table-column table:style-name="co4" table:default-cell-style-name="ce89"/>
        <table:table-column table:style-name="co4" table:number-columns-repeated="48" table:default-cell-style-name="Default"/>
        <table:table-row table:style-name="ro2">
          <table:table-cell table:style-name="Default" office:value-type="string" calcext:value-type="string">
            <text:p>Data Preprocessing and Quality Assessment per ISO 11171 Clause 6.6</text:p>
          </table:table-cell>
          <table:table-cell table:number-columns-repeated="48"/>
        </table:table-row>
        <table:table-row table:style-name="ro8">
          <table:table-cell table:style-name="ce192" table:formula="of:=&quot;BOTTLE &quot;&amp; &quot; &quot;&amp;RIGHT(CELL(&quot;filename&quot;);1)" office:value-type="string" office:string-value="BOTTLE  1" calcext:value-type="string" table:number-columns-spanned="5" table:number-rows-spanned="1">
            <text:p>BOTTLE <text:s/>1</text:p>
          </table:table-cell>
          <table:covered-table-cell table:number-columns-repeated="4"/>
          <table:table-cell table:number-columns-repeated="2"/>
          <table:table-cell table:style-name="ce205" office:value-type="string" calcext:value-type="string">
            <text:p>CHECK CALIBRATION THRESHOLDS ENTERED ON PARTICLE COUNTER</text:p>
          </table:table-cell>
          <table:table-cell table:number-columns-repeated="41"/>
        </table:table-row>
        <table:table-row table:style-name="ro2">
          <table:table-cell table:style-name="Default" office:value-type="string" calcext:value-type="string">
            <text:p>Serial #</text:p>
          </table:table-cell>
          <table:table-cell table:style-name="ce194" office:value-type="string" calcext:value-type="string">
            <text:p>11171-00009</text:p>
          </table:table-cell>
          <table:table-cell/>
          <table:table-cell office:value-type="string" calcext:value-type="string">
            <text:p>Dilution Ratio</text:p>
          </table:table-cell>
          <table:table-cell table:style-name="ce89" office:value-type="float" office:value="1" calcext:value-type="float">
            <text:p>1</text:p>
          </table:table-cell>
          <table:table-cell table:number-columns-repeated="44"/>
        </table:table-row>
        <table:table-row table:style-name="ro9">
          <table:table-cell office:value-type="string" calcext:value-type="string">
            <text:p>Date</text:p>
          </table:table-cell>
          <table:table-cell table:style-name="ce195" office:value-type="date" office:date-value="2025-06-12" calcext:value-type="date">
            <text:p>2025-06-12</text:p>
          </table:table-cell>
          <table:table-cell table:number-columns-repeated="12"/>
          <table:table-cell table:style-name="ce215"/>
          <table:table-cell table:number-columns-repeated="34"/>
        </table:table-row>
        <table:table-row table:style-name="ro2">
          <table:table-cell office:value-type="string" calcext:value-type="string">
            <text:p>RM</text:p>
          </table:table-cell>
          <table:table-cell table:style-name="ce196" office:value-type="string" calcext:value-type="string">
            <text:p>34D</text:p>
          </table:table-cell>
          <table:table-cell table:number-columns-repeated="12"/>
          <table:table-cell table:style-name="ce55"/>
          <table:table-cell table:number-columns-repeated="34"/>
        </table:table-row>
        <table:table-row table:style-name="ro2">
          <table:table-cell table:style-name="Default" office:value-type="string" calcext:value-type="string">
            <text:p>BOTTLE</text:p>
          </table:table-cell>
          <table:table-cell table:style-name="ce197" table:formula="of:= RIGHT(CELL(&quot;filename&quot;);1)" office:value-type="string" office:string-value="1" calcext:value-type="string">
            <text:p>1</text:p>
          </table:table-cell>
          <table:table-cell table:style-name="ce89" table:number-columns-repeated="4"/>
          <table:table-cell table:number-columns-repeated="43"/>
        </table:table-row>
        <table:table-row table:style-name="ro2">
          <table:table-cell table:style-name="Default"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202" office:value-type="string" calcext:value-type="string">
            <text:p>X<text:span text:style-name="T8"> / ml</text:span></text:p>
          </table:table-cell>
          <table:table-cell table:style-name="ce31" office:value-type="string" calcext:value-type="string">
            <text:p>N<text:span text:style-name="T6">TOTAL</text:span></text:p>
          </table:table-cell>
          <table:table-cell table:style-name="ce31" office:value-type="string" calcext:value-type="string">
            <text:p>CV</text:p>
          </table:table-cell>
          <table:table-cell table:style-name="ce31" office:value-type="string" calcext:value-type="string">
            <text:p>D<text:span text:style-name="T6">QMAX</text:span></text:p>
          </table:table-cell>
          <table:table-cell table:style-name="ce31" office:value-type="string" calcext:value-type="string">
            <text:p>D<text:span text:style-name="T6">Q</text:span></text:p>
          </table:table-cell>
          <table:table-cell table:style-name="ce31" office:value-type="string" calcext:value-type="string">
            <text:p>N<text:span text:style-name="T6">C</text:span></text:p>
          </table:table-cell>
          <table:table-cell table:number-columns-repeated="3"/>
          <table:table-cell table:style-name="ce31" office:value-type="string" calcext:value-type="string">
            <text:p>Thresholds</text:p>
          </table:table-cell>
          <table:table-cell table:number-columns-repeated="33"/>
        </table:table-row>
        <table:table-row table:style-name="ro2">
          <table:table-cell table:style-name="ce16" office:value-type="string" calcext:value-type="string">
            <text:p>Scanned ml</text:p>
          </table:table-cell>
          <table:table-cell table:style-name="ce32" table:formula="of:=[.B52]" office:value-type="float" office:value="4.475147" calcext:value-type="float">
            <text:p>4.475</text:p>
          </table:table-cell>
          <table:table-cell table:style-name="ce32" table:formula="of:=[.C52]" office:value-type="float" office:value="4.733991" calcext:value-type="float">
            <text:p>4.734</text:p>
          </table:table-cell>
          <table:table-cell table:style-name="ce32" table:formula="of:=[.D52]" office:value-type="float" office:value="4.720532" calcext:value-type="float">
            <text:p>4.721</text:p>
          </table:table-cell>
          <table:table-cell table:style-name="ce32" table:formula="of:=[.E52]" office:value-type="float" office:value="4.753982" calcext:value-type="float">
            <text:p>4.754</text:p>
          </table:table-cell>
          <table:table-cell table:style-name="ce32" table:formula="of:=[.F52]" office:value-type="float" office:value="4.776061" calcext:value-type="float">
            <text:p>4.776</text:p>
          </table:table-cell>
          <table:table-cell table:style-name="ce203" table:formula="of:=AVERAGE([.B$8:.F$8])*5" office:value-type="float" office:value="23.459713" calcext:value-type="float">
            <text:p>23.5</text:p>
          </table:table-cell>
          <table:table-cell/>
          <table:table-cell table:style-name="ce212"/>
          <table:table-cell/>
          <table:table-cell table:style-name="ce212"/>
          <table:table-cell table:number-columns-repeated="38"/>
        </table:table-row>
        <table:table-row table:style-name="ro2">
          <table:table-cell table:style-name="ce16" office:value-type="string" calcext:value-type="string">
            <text:p>count_4</text:p>
          </table:table-cell>
          <table:table-cell table:style-name="ce198" table:formula="of:=[.B53]/[.B$8]" office:value-type="float" office:value="14502.093450785" calcext:value-type="float">
            <text:p>14502</text:p>
          </table:table-cell>
          <table:table-cell table:style-name="ce198" table:formula="of:=[.C53]/[.C$8]" office:value-type="float" office:value="14559.3855163645" calcext:value-type="float">
            <text:p>14559</text:p>
          </table:table-cell>
          <table:table-cell table:style-name="ce198" table:formula="of:=[.D53]/[.D$8]" office:value-type="float" office:value="14539.8866060012" calcext:value-type="float">
            <text:p>14540</text:p>
          </table:table-cell>
          <table:table-cell table:style-name="ce198" table:formula="of:=[.E53]/[.E$8]" office:value-type="float" office:value="14410.0251115801" calcext:value-type="float">
            <text:p>14410</text:p>
          </table:table-cell>
          <table:table-cell table:style-name="ce198" table:formula="of:=[.F53]/[.F$8]" office:value-type="float" office:value="14278.0839691955" calcext:value-type="float">
            <text:p>14278</text:p>
          </table:table-cell>
          <table:table-cell table:style-name="ce204" table:formula="of:=AVERAGE([.B9:.F9])" office:value-type="float" office:value="14457.8949307853" calcext:value-type="float">
            <text:p>14457.9</text:p>
          </table:table-cell>
          <table:table-cell table:style-name="ce206" table:formula="of:=[.G9]*[.G$8]" office:value-type="float" office:value="339178.065660377" calcext:value-type="float">
            <text:p>339178</text:p>
          </table:table-cell>
          <table:table-cell table:style-name="ce212" table:formula="of:=STDEVP([.B9:.F9])/AVERAGE([.B9:.F9])" office:value-type="percentage" office:value="0.00716130655994382" calcext:value-type="percentage">
            <text:p>0.7%</text:p>
          </table:table-cell>
          <table:table-cell table:style-name="ce212" table:formula="of:=IF([.H9]&gt;[.$A$43]; [.$C$43]; IF([.H9]&gt;[.$A$44]; [.$C$44]; IF([.H9]&gt;[.$A$45];[.$C$45];IF([.H9]&gt;[.$A$46];[.$C$46]; IF([.H9]&gt;[.$A$47];[.$C$47];IF([.H9]&gt;[.$A$48];[.$C$48];[.$C$49]))))))/100" office:value-type="percentage" office:value="0.11" calcext:value-type="percentage">
            <text:p>11.0%</text:p>
          </table:table-cell>
          <table:table-cell table:style-name="ce213" table:formula="of:=(MAX([.B9:.F9])-MIN([.B9:.F9]))/[.G9]" office:value-type="percentage" office:value="0.0194566047488706" calcext:value-type="percentage">
            <text:p>1.9%</text:p>
          </table:table-cell>
          <table:table-cell table:formula="of:=COUNTA([.B9:.F9])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0" table:formula="of:=['file:///D:/mp/projects/PR0118%20-%20ISO%2011171%20Calibrations/results/2025-05-19-LPA3-NAVAIR-11171-00009/11171-00009-LIVE.ods'#$'Clause 6 Sizing Calibration'.$E$19]" office:value-type="float" office:value="54" calcext:value-type="float">
            <text:p>54</text:p>
          </table:table-cell>
          <table:table-cell table:number-columns-repeated="33"/>
        </table:table-row>
        <table:table-row table:style-name="ro2">
          <table:table-cell table:style-name="ce16" office:value-type="string" calcext:value-type="string">
            <text:p>count_5</text:p>
          </table:table-cell>
          <table:table-cell table:style-name="ce198" table:formula="of:=[.B54]/[.B$8]" office:value-type="float" office:value="12570.9837017644" calcext:value-type="float">
            <text:p>12571</text:p>
          </table:table-cell>
          <table:table-cell table:style-name="ce198" table:formula="of:=[.C54]/[.C$8]" office:value-type="float" office:value="12651.2703551823" calcext:value-type="float">
            <text:p>12651</text:p>
          </table:table-cell>
          <table:table-cell table:style-name="ce198" table:formula="of:=[.D54]/[.D$8]" office:value-type="float" office:value="12567.651273204" calcext:value-type="float">
            <text:p>12568</text:p>
          </table:table-cell>
          <table:table-cell table:style-name="ce198" table:formula="of:=[.E54]/[.E$8]" office:value-type="float" office:value="12472.7018318538" calcext:value-type="float">
            <text:p>12473</text:p>
          </table:table-cell>
          <table:table-cell table:style-name="ce198" table:formula="of:=[.F54]/[.F$8]" office:value-type="float" office:value="12367.0949763833" calcext:value-type="float">
            <text:p>12367</text:p>
          </table:table-cell>
          <table:table-cell table:style-name="ce204" table:formula="of:=AVERAGE([.B10:.F10])" office:value-type="float" office:value="12525.9404276776" calcext:value-type="float">
            <text:p>12525.9</text:p>
          </table:table-cell>
          <table:table-cell table:style-name="ce206" table:formula="of:=[.G10]*[.G$8]" office:value-type="float" office:value="293854.967488413" calcext:value-type="float">
            <text:p>293855</text:p>
          </table:table-cell>
          <table:table-cell table:style-name="ce212" table:formula="of:=STDEVP([.B10:.F10])/AVERAGE([.B10:.F10])" office:value-type="percentage" office:value="0.00778476841047432" calcext:value-type="percentage">
            <text:p>0.8%</text:p>
          </table:table-cell>
          <table:table-cell table:style-name="ce212" table:formula="of:=IF([.H10]&gt;[.$A$43]; [.$C$43]; IF([.H10]&gt;[.$A$44]; [.$C$44]; IF([.H10]&gt;[.$A$45];[.$C$45];IF([.H10]&gt;[.$A$46];[.$C$46]; IF([.H10]&gt;[.$A$47];[.$C$47];IF([.H10]&gt;[.$A$48];[.$C$48];[.$C$49]))))))/100" office:value-type="percentage" office:value="0.11" calcext:value-type="percentage">
            <text:p>11.0%</text:p>
          </table:table-cell>
          <table:table-cell table:style-name="ce213" table:formula="of:=(MAX([.B10:.F10])-MIN([.B10:.F10]))/[.G10]" office:value-type="percentage" office:value="0.0226869495699632" calcext:value-type="percentage">
            <text:p>2.3%</text:p>
          </table:table-cell>
          <table:table-cell table:formula="of:=COUNTA([.B10:.F10])"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0" table:formula="of:=['file:///D:/mp/projects/PR0118%20-%20ISO%2011171%20Calibrations/results/2025-05-19-LPA3-NAVAIR-11171-00009/11171-00009-LIVE.ods'#$'Clause 6 Sizing Calibration'.$E$20]" office:value-type="float" office:value="64.2928319386125" calcext:value-type="float">
            <text:p>64</text:p>
          </table:table-cell>
          <table:table-cell table:number-columns-repeated="33"/>
        </table:table-row>
        <table:table-row table:style-name="ro2">
          <table:table-cell table:style-name="ce16" office:value-type="string" calcext:value-type="string">
            <text:p>count_6</text:p>
          </table:table-cell>
          <table:table-cell table:style-name="ce198" table:formula="of:=[.B55]/[.B$8]" office:value-type="float" office:value="10856.1796964435" calcext:value-type="float">
            <text:p>10856</text:p>
          </table:table-cell>
          <table:table-cell table:style-name="ce198" table:formula="of:=[.C55]/[.C$8]" office:value-type="float" office:value="10911.3008453121" calcext:value-type="float">
            <text:p>10911</text:p>
          </table:table-cell>
          <table:table-cell table:style-name="ce198" table:formula="of:=[.D55]/[.D$8]" office:value-type="float" office:value="10867.4191807195" calcext:value-type="float">
            <text:p>10867</text:p>
          </table:table-cell>
          <table:table-cell table:style-name="ce198" table:formula="of:=[.E55]/[.E$8]" office:value-type="float" office:value="10744.6767783303" calcext:value-type="float">
            <text:p>10745</text:p>
          </table:table-cell>
          <table:table-cell table:style-name="ce198" table:formula="of:=[.F55]/[.F$8]" office:value-type="float" office:value="10661.5053702204" calcext:value-type="float">
            <text:p>10662</text:p>
          </table:table-cell>
          <table:table-cell table:style-name="ce204" table:formula="of:=AVERAGE([.B11:.F11])" office:value-type="float" office:value="10808.2163742051" calcext:value-type="float">
            <text:p>10808.2</text:p>
          </table:table-cell>
          <table:table-cell table:style-name="ce206" table:formula="of:=[.G11]*[.G$8]" office:value-type="float" office:value="253557.654180753" calcext:value-type="float">
            <text:p>253558</text:p>
          </table:table-cell>
          <table:table-cell table:style-name="ce212" table:formula="of:=STDEVP([.B11:.F11])/AVERAGE([.B11:.F11])" office:value-type="percentage" office:value="0.0084791196028539" calcext:value-type="percentage">
            <text:p>0.8%</text:p>
          </table:table-cell>
          <table:table-cell table:style-name="ce212" table:formula="of:=IF([.H11]&gt;[.$A$43]; [.$C$43]; IF([.H11]&gt;[.$A$44]; [.$C$44]; IF([.H11]&gt;[.$A$45];[.$C$45];IF([.H11]&gt;[.$A$46];[.$C$46]; IF([.H11]&gt;[.$A$47];[.$C$47];IF([.H11]&gt;[.$A$48];[.$C$48];[.$C$49]))))))/100" office:value-type="percentage" office:value="0.11" calcext:value-type="percentage">
            <text:p>11.0%</text:p>
          </table:table-cell>
          <table:table-cell table:style-name="ce213" table:formula="of:=(MAX([.B11:.F11])-MIN([.B11:.F11]))/[.G11]" office:value-type="percentage" office:value="0.0231116278989319" calcext:value-type="percentage">
            <text:p>2.3%</text:p>
          </table:table-cell>
          <table:table-cell table:formula="of:=COUNTA([.B11:.F11])"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0" table:formula="of:=['file:///D:/mp/projects/PR0118%20-%20ISO%2011171%20Calibrations/results/2025-05-19-LPA3-NAVAIR-11171-00009/11171-00009-LIVE.ods'#$'Clause 6 Sizing Calibration'.$E$21]" office:value-type="float" office:value="76.5475599756791" calcext:value-type="float">
            <text:p>77</text:p>
          </table:table-cell>
          <table:table-cell table:number-columns-repeated="33"/>
        </table:table-row>
        <table:table-row table:style-name="ro2">
          <table:table-cell table:style-name="ce16" office:value-type="string" calcext:value-type="string">
            <text:p>count_7</text:p>
          </table:table-cell>
          <table:table-cell table:style-name="ce198" table:formula="of:=[.B56]/[.B$8]" office:value-type="float" office:value="9464.94048128475" calcext:value-type="float">
            <text:p>9465</text:p>
          </table:table-cell>
          <table:table-cell table:style-name="ce198" table:formula="of:=[.C56]/[.C$8]" office:value-type="float" office:value="9504.4540642346" calcext:value-type="float">
            <text:p>9504</text:p>
          </table:table-cell>
          <table:table-cell table:style-name="ce198" table:formula="of:=[.D56]/[.D$8]" office:value-type="float" office:value="9477.95714550818" calcext:value-type="float">
            <text:p>9478</text:p>
          </table:table-cell>
          <table:table-cell table:style-name="ce198" table:formula="of:=[.E56]/[.E$8]" office:value-type="float" office:value="9379.29508357415" calcext:value-type="float">
            <text:p>9379</text:p>
          </table:table-cell>
          <table:table-cell table:style-name="ce198" table:formula="of:=[.F56]/[.F$8]" office:value-type="float" office:value="9285.89479908234" calcext:value-type="float">
            <text:p>9286</text:p>
          </table:table-cell>
          <table:table-cell table:style-name="ce204" table:formula="of:=AVERAGE([.B12:.F12])" office:value-type="float" office:value="9422.5083147368" calcext:value-type="float">
            <text:p>9422.5</text:p>
          </table:table-cell>
          <table:table-cell table:style-name="ce206" table:formula="of:=[.G12]*[.G$8]" office:value-type="float" office:value="221049.340803839" calcext:value-type="float">
            <text:p>221049</text:p>
          </table:table-cell>
          <table:table-cell table:style-name="ce212" table:formula="of:=STDEVP([.B12:.F12])/AVERAGE([.B12:.F12])" office:value-type="percentage" office:value="0.00850631906082943" calcext:value-type="percentage">
            <text:p>0.9%</text:p>
          </table:table-cell>
          <table:table-cell table:style-name="ce212" table:formula="of:=IF([.H12]&gt;[.$A$43]; [.$C$43]; IF([.H12]&gt;[.$A$44]; [.$C$44]; IF([.H12]&gt;[.$A$45];[.$C$45];IF([.H12]&gt;[.$A$46];[.$C$46]; IF([.H12]&gt;[.$A$47];[.$C$47];IF([.H12]&gt;[.$A$48];[.$C$48];[.$C$49]))))))/100" office:value-type="percentage" office:value="0.11" calcext:value-type="percentage">
            <text:p>11.0%</text:p>
          </table:table-cell>
          <table:table-cell table:style-name="ce213" table:formula="of:=(MAX([.B12:.F12])-MIN([.B12:.F12]))/[.G12]" office:value-type="percentage" office:value="0.0231954441271683" calcext:value-type="percentage">
            <text:p>2.3%</text:p>
          </table:table-cell>
          <table:table-cell table:formula="of:=COUNTA([.B12:.F12])"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0" table:formula="of:=['file:///D:/mp/projects/PR0118%20-%20ISO%2011171%20Calibrations/results/2025-05-19-LPA3-NAVAIR-11171-00009/11171-00009-LIVE.ods'#$'Clause 6 Sizing Calibration'.$E$22]" office:value-type="float" office:value="91.1381372005036" calcext:value-type="float">
            <text:p>91</text:p>
          </table:table-cell>
          <table:table-cell table:number-columns-repeated="33"/>
        </table:table-row>
        <table:table-row table:style-name="ro2">
          <table:table-cell table:style-name="ce16" office:value-type="string" calcext:value-type="string">
            <text:p>count_8</text:p>
          </table:table-cell>
          <table:table-cell table:style-name="ce198" table:formula="of:=[.B57]/[.B$8]" office:value-type="float" office:value="8066.3272066817" calcext:value-type="float">
            <text:p>8066</text:p>
          </table:table-cell>
          <table:table-cell table:style-name="ce198" table:formula="of:=[.C57]/[.C$8]" office:value-type="float" office:value="8095.70613885831" calcext:value-type="float">
            <text:p>8096</text:p>
          </table:table-cell>
          <table:table-cell table:style-name="ce198" table:formula="of:=[.D57]/[.D$8]" office:value-type="float" office:value="8100.35817996785" calcext:value-type="float">
            <text:p>8100</text:p>
          </table:table-cell>
          <table:table-cell table:style-name="ce198" table:formula="of:=[.E57]/[.E$8]" office:value-type="float" office:value="8025.27228752654" calcext:value-type="float">
            <text:p>8025</text:p>
          </table:table-cell>
          <table:table-cell table:style-name="ce198" table:formula="of:=[.F57]/[.F$8]" office:value-type="float" office:value="7902.956013334" calcext:value-type="float">
            <text:p>7903</text:p>
          </table:table-cell>
          <table:table-cell table:style-name="ce204" table:formula="of:=AVERAGE([.B13:.F13])" office:value-type="float" office:value="8038.12396527368" calcext:value-type="float">
            <text:p>8038.1</text:p>
          </table:table-cell>
          <table:table-cell table:style-name="ce206" table:formula="of:=[.G13]*[.G$8]" office:value-type="float" office:value="188572.081283743" calcext:value-type="float">
            <text:p>188572</text:p>
          </table:table-cell>
          <table:table-cell table:style-name="ce212" table:formula="of:=STDEVP([.B13:.F13])/AVERAGE([.B13:.F13])" office:value-type="percentage" office:value="0.00904325541131335" calcext:value-type="percentage">
            <text:p>0.9%</text:p>
          </table:table-cell>
          <table:table-cell table:style-name="ce212" table:formula="of:=IF([.H13]&gt;[.$A$43]; [.$C$43]; IF([.H13]&gt;[.$A$44]; [.$C$44]; IF([.H13]&gt;[.$A$45];[.$C$45];IF([.H13]&gt;[.$A$46];[.$C$46]; IF([.H13]&gt;[.$A$47];[.$C$47];IF([.H13]&gt;[.$A$48];[.$C$48];[.$C$49]))))))/100" office:value-type="percentage" office:value="0.11" calcext:value-type="percentage">
            <text:p>11.0%</text:p>
          </table:table-cell>
          <table:table-cell table:style-name="ce213" table:formula="of:=(MAX([.B13:.F13])-MIN([.B13:.F13]))/[.G13]" office:value-type="percentage" office:value="0.024558238649549" calcext:value-type="percentage">
            <text:p>2.5%</text:p>
          </table:table-cell>
          <table:table-cell table:formula="of:=COUNTA([.B13:.F13])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0" table:formula="of:=['file:///D:/mp/projects/PR0118%20-%20ISO%2011171%20Calibrations/results/2025-05-19-LPA3-NAVAIR-11171-00009/11171-00009-LIVE.ods'#$'Clause 6 Sizing Calibration'.$E$23]" office:value-type="float" office:value="108.509795152411" calcext:value-type="float">
            <text:p>109</text:p>
          </table:table-cell>
          <table:table-cell table:number-columns-repeated="33"/>
        </table:table-row>
        <table:table-row table:style-name="ro2">
          <table:table-cell table:style-name="ce16" office:value-type="string" calcext:value-type="string">
            <text:p>count_9</text:p>
          </table:table-cell>
          <table:table-cell table:style-name="ce198" table:formula="of:=[.B58]/[.B$8]" office:value-type="float" office:value="6870.83575131722" calcext:value-type="float">
            <text:p>6871</text:p>
          </table:table-cell>
          <table:table-cell table:style-name="ce198" table:formula="of:=[.C58]/[.C$8]" office:value-type="float" office:value="6927.98106291288" calcext:value-type="float">
            <text:p>6928</text:p>
          </table:table-cell>
          <table:table-cell table:style-name="ce198" table:formula="of:=[.D58]/[.D$8]" office:value-type="float" office:value="6964.89294003303" calcext:value-type="float">
            <text:p>6965</text:p>
          </table:table-cell>
          <table:table-cell table:style-name="ce198" table:formula="of:=[.E58]/[.E$8]" office:value-type="float" office:value="6884.96506717947" calcext:value-type="float">
            <text:p>6885</text:p>
          </table:table-cell>
          <table:table-cell table:style-name="ce198" table:formula="of:=[.F58]/[.F$8]" office:value-type="float" office:value="6773.15469798229" calcext:value-type="float">
            <text:p>6773</text:p>
          </table:table-cell>
          <table:table-cell table:style-name="ce204" table:formula="of:=AVERAGE([.B14:.F14])" office:value-type="float" office:value="6884.36590388498" calcext:value-type="float">
            <text:p>6884.4</text:p>
          </table:table-cell>
          <table:table-cell table:style-name="ce206" table:formula="of:=[.G14]*[.G$8]" office:value-type="float" office:value="161505.248292127" calcext:value-type="float">
            <text:p>161505</text:p>
          </table:table-cell>
          <table:table-cell table:style-name="ce212" table:formula="of:=STDEVP([.B14:.F14])/AVERAGE([.B14:.F14])" office:value-type="percentage" office:value="0.00939985512769622" calcext:value-type="percentage">
            <text:p>0.9%</text:p>
          </table:table-cell>
          <table:table-cell table:style-name="ce212" table:formula="of:=IF([.H14]&gt;[.$A$43]; [.$C$43]; IF([.H14]&gt;[.$A$44]; [.$C$44]; IF([.H14]&gt;[.$A$45];[.$C$45];IF([.H14]&gt;[.$A$46];[.$C$46]; IF([.H14]&gt;[.$A$47];[.$C$47];IF([.H14]&gt;[.$A$48];[.$C$48];[.$C$49]))))))/100" office:value-type="percentage" office:value="0.11" calcext:value-type="percentage">
            <text:p>11.0%</text:p>
          </table:table-cell>
          <table:table-cell table:style-name="ce213" table:formula="of:=(MAX([.B14:.F14])-MIN([.B14:.F14]))/[.G14]" office:value-type="percentage" office:value="0.0278512567065237" calcext:value-type="percentage">
            <text:p>2.8%</text:p>
          </table:table-cell>
          <table:table-cell table:formula="of:=COUNTA([.B14:.F14])"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0" table:formula="of:=['file:///D:/mp/projects/PR0118%20-%20ISO%2011171%20Calibrations/results/2025-05-19-LPA3-NAVAIR-11171-00009/11171-00009-LIVE.ods'#$'Clause 6 Sizing Calibration'.$E$24]" office:value-type="float" office:value="129.192630063467" calcext:value-type="float">
            <text:p>129</text:p>
          </table:table-cell>
          <table:table-cell table:number-columns-repeated="33"/>
        </table:table-row>
        <table:table-row table:style-name="ro2">
          <table:table-cell table:style-name="ce16" office:value-type="string" calcext:value-type="string">
            <text:p>count_10</text:p>
          </table:table-cell>
          <table:table-cell table:style-name="ce198" table:formula="of:=[.B59]/[.B$8]" office:value-type="float" office:value="5810.75884211178" calcext:value-type="float">
            <text:p>5811</text:p>
          </table:table-cell>
          <table:table-cell table:style-name="ce198" table:formula="of:=[.C59]/[.C$8]" office:value-type="float" office:value="5872.84597710473" calcext:value-type="float">
            <text:p>5873</text:p>
          </table:table-cell>
          <table:table-cell table:style-name="ce198" table:formula="of:=[.D59]/[.D$8]" office:value-type="float" office:value="5891.92065640059" calcext:value-type="float">
            <text:p>5892</text:p>
          </table:table-cell>
          <table:table-cell table:style-name="ce198" table:formula="of:=[.E59]/[.E$8]" office:value-type="float" office:value="5813.02158905945" calcext:value-type="float">
            <text:p>5813</text:p>
          </table:table-cell>
          <table:table-cell table:style-name="ce198" table:formula="of:=[.F59]/[.F$8]" office:value-type="float" office:value="5742.5983462104" calcext:value-type="float">
            <text:p>5743</text:p>
          </table:table-cell>
          <table:table-cell table:style-name="ce204" table:formula="of:=AVERAGE([.B15:.F15])" office:value-type="float" office:value="5826.22908217739" calcext:value-type="float">
            <text:p>5826.2</text:p>
          </table:table-cell>
          <table:table-cell table:style-name="ce206" table:formula="of:=[.G15]*[.G$8]" office:value-type="float" office:value="136681.662140135" calcext:value-type="float">
            <text:p>136682</text:p>
          </table:table-cell>
          <table:table-cell table:style-name="ce212" table:formula="of:=STDEVP([.B15:.F15])/AVERAGE([.B15:.F15])" office:value-type="percentage" office:value="0.00904853654289093" calcext:value-type="percentage">
            <text:p>0.9%</text:p>
          </table:table-cell>
          <table:table-cell table:style-name="ce212" table:formula="of:=IF([.H15]&gt;[.$A$43]; [.$C$43]; IF([.H15]&gt;[.$A$44]; [.$C$44]; IF([.H15]&gt;[.$A$45];[.$C$45];IF([.H15]&gt;[.$A$46];[.$C$46]; IF([.H15]&gt;[.$A$47];[.$C$47];IF([.H15]&gt;[.$A$48];[.$C$48];[.$C$49]))))))/100" office:value-type="percentage" office:value="0.11" calcext:value-type="percentage">
            <text:p>11.0%</text:p>
          </table:table-cell>
          <table:table-cell table:style-name="ce213" table:formula="of:=(MAX([.B15:.F15])-MIN([.B15:.F15]))/[.G15]" office:value-type="percentage" office:value="0.0256293235442751" calcext:value-type="percentage">
            <text:p>2.6%</text:p>
          </table:table-cell>
          <table:table-cell table:formula="of:=COUNTA([.B15:.F15])"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20" table:formula="of:=['file:///D:/mp/projects/PR0118%20-%20ISO%2011171%20Calibrations/results/2025-05-19-LPA3-NAVAIR-11171-00009/11171-00009-LIVE.ods'#$'Clause 6 Sizing Calibration'.$E$25]" office:value-type="float" office:value="153.817778747738" calcext:value-type="float">
            <text:p>154</text:p>
          </table:table-cell>
          <table:table-cell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1</text:p>
          </table:table-cell>
          <table:table-cell table:style-name="ce198" table:formula="of:=[.B60]/[.B$8]" office:value-type="float" office:value="4868.44342766841" calcext:value-type="float">
            <text:p>4868</text:p>
          </table:table-cell>
          <table:table-cell table:style-name="ce198" table:formula="of:=[.C60]/[.C$8]" office:value-type="float" office:value="4937.27174386263" calcext:value-type="float">
            <text:p>4937</text:p>
          </table:table-cell>
          <table:table-cell table:style-name="ce198" table:formula="of:=[.D60]/[.D$8]" office:value-type="float" office:value="4950.92502285759" calcext:value-type="float">
            <text:p>4951</text:p>
          </table:table-cell>
          <table:table-cell table:style-name="ce198" table:formula="of:=[.E60]/[.E$8]" office:value-type="float" office:value="4874.22964580009" calcext:value-type="float">
            <text:p>4874</text:p>
          </table:table-cell>
          <table:table-cell table:style-name="ce198" table:formula="of:=[.F60]/[.F$8]" office:value-type="float" office:value="4801.02745756388" calcext:value-type="float">
            <text:p>4801</text:p>
          </table:table-cell>
          <table:table-cell table:style-name="ce204" table:formula="of:=AVERAGE([.B16:.F16])" office:value-type="float" office:value="4886.37945955052" calcext:value-type="float">
            <text:p>4886.4</text:p>
          </table:table-cell>
          <table:table-cell table:style-name="ce206" table:formula="of:=[.G16]*[.G$8]" office:value-type="float" office:value="114633.05973015" calcext:value-type="float">
            <text:p>114633</text:p>
          </table:table-cell>
          <table:table-cell table:style-name="ce212" table:formula="of:=STDEVP([.B16:.F16])/AVERAGE([.B16:.F16])" office:value-type="percentage" office:value="0.011024732635348" calcext:value-type="percentage">
            <text:p>1.1%</text:p>
          </table:table-cell>
          <table:table-cell table:style-name="ce212" table:formula="of:=IF([.H16]&gt;[.$A$43]; [.$C$43]; IF([.H16]&gt;[.$A$44]; [.$C$44]; IF([.H16]&gt;[.$A$45];[.$C$45];IF([.H16]&gt;[.$A$46];[.$C$46]; IF([.H16]&gt;[.$A$47];[.$C$47];IF([.H16]&gt;[.$A$48];[.$C$48];[.$C$49]))))))/100" office:value-type="percentage" office:value="0.11" calcext:value-type="percentage">
            <text:p>11.0%</text:p>
          </table:table-cell>
          <table:table-cell table:style-name="ce213" table:formula="of:=(MAX([.B16:.F16])-MIN([.B16:.F16]))/[.G16]" office:value-type="percentage" office:value="0.0306766116988184" calcext:value-type="percentage">
            <text:p>3.1%</text:p>
          </table:table-cell>
          <table:table-cell table:formula="of:=COUNTA([.B16:.F16])"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0" table:formula="of:=['file:///D:/mp/projects/PR0118%20-%20ISO%2011171%20Calibrations/results/2025-05-19-LPA3-NAVAIR-11171-00009/11171-00009-LIVE.ods'#$'Clause 6 Sizing Calibration'.$E$26]" office:value-type="float" office:value="183.136677744425" calcext:value-type="float">
            <text:p>183</text:p>
          </table:table-cell>
          <table:table-cell table:style-name="ce89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2</text:p>
          </table:table-cell>
          <table:table-cell table:style-name="ce198" table:formula="of:=[.B61]/[.B$8]" office:value-type="float" office:value="3994.28219899816" calcext:value-type="float">
            <text:p>3994</text:p>
          </table:table-cell>
          <table:table-cell table:style-name="ce198" table:formula="of:=[.C61]/[.C$8]" office:value-type="float" office:value="4088.0939570861" calcext:value-type="float">
            <text:p>4088</text:p>
          </table:table-cell>
          <table:table-cell table:style-name="ce198" table:formula="of:=[.D61]/[.D$8]" office:value-type="float" office:value="4083.01437210891" calcext:value-type="float">
            <text:p>4083</text:p>
          </table:table-cell>
          <table:table-cell table:style-name="ce198" table:formula="of:=[.E61]/[.E$8]" office:value-type="float" office:value="4026.51924218476" calcext:value-type="float">
            <text:p>4027</text:p>
          </table:table-cell>
          <table:table-cell table:style-name="ce198" table:formula="of:=[.F61]/[.F$8]" office:value-type="float" office:value="3979.42991096638" calcext:value-type="float">
            <text:p>3979</text:p>
          </table:table-cell>
          <table:table-cell table:style-name="ce204" table:formula="of:=AVERAGE([.B17:.F17])" office:value-type="float" office:value="4034.26793626886" calcext:value-type="float">
            <text:p>4034.3</text:p>
          </table:table-cell>
          <table:table-cell table:style-name="ce206" table:formula="of:=[.G17]*[.G$8]" office:value-type="float" office:value="94642.7679499698" calcext:value-type="float">
            <text:p>94643</text:p>
          </table:table-cell>
          <table:table-cell table:style-name="ce212" table:formula="of:=STDEVP([.B17:.F17])/AVERAGE([.B17:.F17])" office:value-type="percentage" office:value="0.0110518242488222" calcext:value-type="percentage">
            <text:p>1.1%</text:p>
          </table:table-cell>
          <table:table-cell table:style-name="ce212" table:formula="of:=IF([.H17]&gt;[.$A$43]; [.$C$43]; IF([.H17]&gt;[.$A$44]; [.$C$44]; IF([.H17]&gt;[.$A$45];[.$C$45];IF([.H17]&gt;[.$A$46];[.$C$46]; IF([.H17]&gt;[.$A$47];[.$C$47];IF([.H17]&gt;[.$A$48];[.$C$48];[.$C$49]))))))/100" office:value-type="percentage" office:value="0.11" calcext:value-type="percentage">
            <text:p>11.0%</text:p>
          </table:table-cell>
          <table:table-cell table:style-name="ce213" table:formula="of:=(MAX([.B17:.F17])-MIN([.B17:.F17]))/[.G17]" office:value-type="percentage" office:value="0.0269352576071641" calcext:value-type="percentage">
            <text:p>2.7%</text:p>
          </table:table-cell>
          <table:table-cell table:formula="of:=COUNTA([.B17:.F17])"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20" table:formula="of:=['file:///D:/mp/projects/PR0118%20-%20ISO%2011171%20Calibrations/results/2025-05-19-LPA3-NAVAIR-11171-00009/11171-00009-LIVE.ods'#$'Clause 6 Sizing Calibration'.$E$27]" office:value-type="float" office:value="218.043993407744" calcext:value-type="float">
            <text:p>218</text:p>
          </table:table-cell>
          <table:table-cell table:style-name="ce89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3</text:p>
          </table:table-cell>
          <table:table-cell table:style-name="ce198" table:formula="of:=[.B62]/[.B$8]" office:value-type="float" office:value="3249.50219512342" calcext:value-type="float">
            <text:p>3250</text:p>
          </table:table-cell>
          <table:table-cell table:style-name="ce198" table:formula="of:=[.C62]/[.C$8]" office:value-type="float" office:value="3331.86100269308" calcext:value-type="float">
            <text:p>3332</text:p>
          </table:table-cell>
          <table:table-cell table:style-name="ce198" table:formula="of:=[.D62]/[.D$8]" office:value-type="float" office:value="3341.57251767386" calcext:value-type="float">
            <text:p>3342</text:p>
          </table:table-cell>
          <table:table-cell table:style-name="ce198" table:formula="of:=[.E62]/[.E$8]" office:value-type="float" office:value="3273.46632780688" calcext:value-type="float">
            <text:p>3273</text:p>
          </table:table-cell>
          <table:table-cell table:style-name="ce198" table:formula="of:=[.F62]/[.F$8]" office:value-type="float" office:value="3259.17110355165" calcext:value-type="float">
            <text:p>3259</text:p>
          </table:table-cell>
          <table:table-cell table:style-name="ce204" table:formula="of:=AVERAGE([.B18:.F18])" office:value-type="float" office:value="3291.11462936978" calcext:value-type="float">
            <text:p>3291.1</text:p>
          </table:table-cell>
          <table:table-cell table:style-name="ce206" table:formula="of:=[.G18]*[.G$8]" office:value-type="float" office:value="77208.6046551164" calcext:value-type="float">
            <text:p>77209</text:p>
          </table:table-cell>
          <table:table-cell table:style-name="ce212" table:formula="of:=STDEVP([.B18:.F18])/AVERAGE([.B18:.F18])" office:value-type="percentage" office:value="0.011585921377314" calcext:value-type="percentage">
            <text:p>1.2%</text:p>
          </table:table-cell>
          <table:table-cell table:style-name="ce212" table:formula="of:=IF([.H18]&gt;[.$A$43]; [.$C$43]; IF([.H18]&gt;[.$A$44]; [.$C$44]; IF([.H18]&gt;[.$A$45];[.$C$45];IF([.H18]&gt;[.$A$46];[.$C$46]; IF([.H18]&gt;[.$A$47];[.$C$47];IF([.H18]&gt;[.$A$48];[.$C$48];[.$C$49]))))))/100" office:value-type="percentage" office:value="0.11" calcext:value-type="percentage">
            <text:p>11.0%</text:p>
          </table:table-cell>
          <table:table-cell table:style-name="ce213" table:formula="of:=(MAX([.B18:.F18])-MIN([.B18:.F18]))/[.G18]" office:value-type="percentage" office:value="0.0279754225905109" calcext:value-type="percentage">
            <text:p>2.8%</text:p>
          </table:table-cell>
          <table:table-cell table:formula="of:=COUNTA([.B18:.F18])"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0" table:formula="of:=['file:///D:/mp/projects/PR0118%20-%20ISO%2011171%20Calibrations/results/2025-05-19-LPA3-NAVAIR-11171-00009/11171-00009-LIVE.ods'#$'Clause 6 Sizing Calibration'.$E$28]" office:value-type="float" office:value="259.604922655334" calcext:value-type="float">
            <text:p>260</text:p>
          </table:table-cell>
          <table:table-cell table:style-name="ce89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4</text:p>
          </table:table-cell>
          <table:table-cell table:style-name="ce198" table:formula="of:=[.B63]/[.B$8]" office:value-type="float" office:value="2605.50100365418" calcext:value-type="float">
            <text:p>2606</text:p>
          </table:table-cell>
          <table:table-cell table:style-name="ce198" table:formula="of:=[.C63]/[.C$8]" office:value-type="float" office:value="2669.84031021605" calcext:value-type="float">
            <text:p>2670</text:p>
          </table:table-cell>
          <table:table-cell table:style-name="ce198" table:formula="of:=[.D63]/[.D$8]" office:value-type="float" office:value="2662.19993848151" calcext:value-type="float">
            <text:p>2662</text:p>
          </table:table-cell>
          <table:table-cell table:style-name="ce198" table:formula="of:=[.E63]/[.E$8]" office:value-type="float" office:value="2619.2779021881" calcext:value-type="float">
            <text:p>2619</text:p>
          </table:table-cell>
          <table:table-cell table:style-name="ce198" table:formula="of:=[.F63]/[.F$8]" office:value-type="float" office:value="2596.90988033863" calcext:value-type="float">
            <text:p>2597</text:p>
          </table:table-cell>
          <table:table-cell table:style-name="ce204" table:formula="of:=AVERAGE([.B19:.F19])" office:value-type="float" office:value="2630.7458069757" calcext:value-type="float">
            <text:p>2630.7</text:p>
          </table:table-cell>
          <table:table-cell table:style-name="ce206" table:formula="of:=[.G19]*[.G$8]" office:value-type="float" office:value="61716.5416076032" calcext:value-type="float">
            <text:p>61717</text:p>
          </table:table-cell>
          <table:table-cell table:style-name="ce212" table:formula="of:=STDEVP([.B19:.F19])/AVERAGE([.B19:.F19])" office:value-type="percentage" office:value="0.011316388122062" calcext:value-type="percentage">
            <text:p>1.1%</text:p>
          </table:table-cell>
          <table:table-cell table:style-name="ce212" table:formula="of:=IF([.H19]&gt;[.$A$43]; [.$C$43]; IF([.H19]&gt;[.$A$44]; [.$C$44]; IF([.H19]&gt;[.$A$45];[.$C$45];IF([.H19]&gt;[.$A$46];[.$C$46]; IF([.H19]&gt;[.$A$47];[.$C$47];IF([.H19]&gt;[.$A$48];[.$C$48];[.$C$49]))))))/100" office:value-type="percentage" office:value="0.11" calcext:value-type="percentage">
            <text:p>11.0%</text:p>
          </table:table-cell>
          <table:table-cell table:style-name="ce213" table:formula="of:=(MAX([.B19:.F19])-MIN([.B19:.F19]))/[.G19]" office:value-type="percentage" office:value="0.0277223400619093" calcext:value-type="percentage">
            <text:p>2.8%</text:p>
          </table:table-cell>
          <table:table-cell table:formula="of:=COUNTA([.B19:.F19])"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20" table:formula="of:=['file:///D:/mp/projects/PR0118%20-%20ISO%2011171%20Calibrations/results/2025-05-19-LPA3-NAVAIR-11171-00009/11171-00009-LIVE.ods'#$'Clause 6 Sizing Calibration'.$E$29]" office:value-type="float" office:value="309.087697457701" calcext:value-type="float">
            <text:p>309</text:p>
          </table:table-cell>
          <table:table-cell table:style-name="ce89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5</text:p>
          </table:table-cell>
          <table:table-cell table:style-name="ce198" table:formula="of:=[.B64]/[.B$8]" office:value-type="float" office:value="2036.58114470877" calcext:value-type="float">
            <text:p>2037</text:p>
          </table:table-cell>
          <table:table-cell table:style-name="ce198" table:formula="of:=[.C64]/[.C$8]" office:value-type="float" office:value="2099.91949710086" calcext:value-type="float">
            <text:p>2100</text:p>
          </table:table-cell>
          <table:table-cell table:style-name="ce198" table:formula="of:=[.D64]/[.D$8]" office:value-type="float" office:value="2093.40811586491" calcext:value-type="float">
            <text:p>2093</text:p>
          </table:table-cell>
          <table:table-cell table:style-name="ce198" table:formula="of:=[.E64]/[.E$8]" office:value-type="float" office:value="2042.28791779186" calcext:value-type="float">
            <text:p>2042</text:p>
          </table:table-cell>
          <table:table-cell table:style-name="ce198" table:formula="of:=[.F64]/[.F$8]" office:value-type="float" office:value="2031.1717124216" calcext:value-type="float">
            <text:p>2031</text:p>
          </table:table-cell>
          <table:table-cell table:style-name="ce204" table:formula="of:=AVERAGE([.B20:.F20])" office:value-type="float" office:value="2060.6736775776" calcext:value-type="float">
            <text:p>2060.7</text:p>
          </table:table-cell>
          <table:table-cell table:style-name="ce206" table:formula="of:=[.G20]*[.G$8]" office:value-type="float" office:value="48342.813062625" calcext:value-type="float">
            <text:p>48343</text:p>
          </table:table-cell>
          <table:table-cell table:style-name="ce212" table:formula="of:=STDEVP([.B20:.F20])/AVERAGE([.B20:.F20])" office:value-type="percentage" office:value="0.0143967082691366" calcext:value-type="percentage">
            <text:p>1.4%</text:p>
          </table:table-cell>
          <table:table-cell table:style-name="ce212" table:formula="of:=IF([.H20]&gt;[.$A$43]; [.$C$43]; IF([.H20]&gt;[.$A$44]; [.$C$44]; IF([.H20]&gt;[.$A$45];[.$C$45];IF([.H20]&gt;[.$A$46];[.$C$46]; IF([.H20]&gt;[.$A$47];[.$C$47];IF([.H20]&gt;[.$A$48];[.$C$48];[.$C$49]))))))/100" office:value-type="percentage" office:value="0.11" calcext:value-type="percentage">
            <text:p>11.0%</text:p>
          </table:table-cell>
          <table:table-cell table:style-name="ce213" table:formula="of:=(MAX([.B20:.F20])-MIN([.B20:.F20]))/[.G20]" office:value-type="percentage" office:value="0.0333618007680286" calcext:value-type="percentage">
            <text:p>3.3%</text:p>
          </table:table-cell>
          <table:table-cell table:formula="of:=COUNTA([.B20:.F20])" office:value-type="float" office:value="5" calcext:value-type="float">
            <text:p>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20" table:formula="of:=['file:///D:/mp/projects/PR0118%20-%20ISO%2011171%20Calibrations/results/2025-05-19-LPA3-NAVAIR-11171-00009/11171-00009-LIVE.ods'#$'Clause 6 Sizing Calibration'.$E$30]" office:value-type="float" office:value="368.002284943346" calcext:value-type="float">
            <text:p>368</text:p>
          </table:table-cell>
          <table:table-cell table:style-name="ce89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6</text:p>
          </table:table-cell>
          <table:table-cell table:style-name="ce198" table:formula="of:=[.B65]/[.B$8]" office:value-type="float" office:value="1578.04872108112" calcext:value-type="float">
            <text:p>1578</text:p>
          </table:table-cell>
          <table:table-cell table:style-name="ce198" table:formula="of:=[.C65]/[.C$8]" office:value-type="float" office:value="1625.26713717876" calcext:value-type="float">
            <text:p>1625</text:p>
          </table:table-cell>
          <table:table-cell table:style-name="ce198" table:formula="of:=[.D65]/[.D$8]" office:value-type="float" office:value="1627.35895022002" calcext:value-type="float">
            <text:p>1627</text:p>
          </table:table-cell>
          <table:table-cell table:style-name="ce198" table:formula="of:=[.E65]/[.E$8]" office:value-type="float" office:value="1562.0589223939" calcext:value-type="float">
            <text:p>1562</text:p>
          </table:table-cell>
          <table:table-cell table:style-name="ce198" table:formula="of:=[.F65]/[.F$8]" office:value-type="float" office:value="1567.19103880792" calcext:value-type="float">
            <text:p>1567</text:p>
          </table:table-cell>
          <table:table-cell table:style-name="ce204" table:formula="of:=AVERAGE([.B21:.F21])" office:value-type="float" office:value="1591.98495393634" calcext:value-type="float">
            <text:p>1592.0</text:p>
          </table:table-cell>
          <table:table-cell table:style-name="ce206" table:formula="of:=[.G21]*[.G$8]" office:value-type="float" office:value="37347.5101196648" calcext:value-type="float">
            <text:p>37348</text:p>
          </table:table-cell>
          <table:table-cell table:style-name="ce212" table:formula="of:=STDEVP([.B21:.F21])/AVERAGE([.B21:.F21])" office:value-type="percentage" office:value="0.0179072422984126" calcext:value-type="percentage">
            <text:p>1.8%</text:p>
          </table:table-cell>
          <table:table-cell table:style-name="ce212" table:formula="of:=IF([.H21]&gt;[.$A$43]; [.$C$43]; IF([.H21]&gt;[.$A$44]; [.$C$44]; IF([.H21]&gt;[.$A$45];[.$C$45];IF([.H21]&gt;[.$A$46];[.$C$46]; IF([.H21]&gt;[.$A$47];[.$C$47];IF([.H21]&gt;[.$A$48];[.$C$48];[.$C$49]))))))/100" office:value-type="percentage" office:value="0.11" calcext:value-type="percentage">
            <text:p>11.0%</text:p>
          </table:table-cell>
          <table:table-cell table:style-name="ce213" table:formula="of:=(MAX([.B21:.F21])-MIN([.B21:.F21]))/[.G21]" office:value-type="percentage" office:value="0.0410179930813139" calcext:value-type="percentage">
            <text:p>4.1%</text:p>
          </table:table-cell>
          <table:table-cell table:formula="of:=COUNTA([.B21:.F21])" office:value-type="float" office:value="5" calcext:value-type="float">
            <text:p>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20" table:formula="of:=['file:///D:/mp/projects/PR0118%20-%20ISO%2011171%20Calibrations/results/2025-05-19-LPA3-NAVAIR-11171-00009/11171-00009-LIVE.ods'#$'Clause 6 Sizing Calibration'.$E$31]" office:value-type="float" office:value="438.14646405348" calcext:value-type="float">
            <text:p>438</text:p>
          </table:table-cell>
          <table:table-cell/>
          <table:table-cell table:style-name="ce31" table:number-columns-repeated="2"/>
          <table:table-cell table:style-name="ce16" table:number-columns-repeated="30"/>
        </table:table-row>
        <table:table-row table:style-name="ro2">
          <table:table-cell table:style-name="ce16" office:value-type="string" calcext:value-type="string">
            <text:p>count_17</text:p>
          </table:table-cell>
          <table:table-cell table:style-name="ce198" table:formula="of:=[.B66]/[.B$8]" office:value-type="float" office:value="1203.53588384918" calcext:value-type="float">
            <text:p>1204</text:p>
          </table:table-cell>
          <table:table-cell table:style-name="ce198" table:formula="of:=[.C66]/[.C$8]" office:value-type="float" office:value="1248.41808951475" calcext:value-type="float">
            <text:p>1248</text:p>
          </table:table-cell>
          <table:table-cell table:style-name="ce198" table:formula="of:=[.D66]/[.D$8]" office:value-type="float" office:value="1251.7656908162" calcext:value-type="float">
            <text:p>1252</text:p>
          </table:table-cell>
          <table:table-cell table:style-name="ce198" table:formula="of:=[.E66]/[.E$8]" office:value-type="float" office:value="1186.37386510929" calcext:value-type="float">
            <text:p>1186</text:p>
          </table:table-cell>
          <table:table-cell table:style-name="ce198" table:formula="of:=[.F66]/[.F$8]" office:value-type="float" office:value="1193.03333856079" calcext:value-type="float">
            <text:p>1193</text:p>
          </table:table-cell>
          <table:table-cell table:style-name="ce204" table:formula="of:=AVERAGE([.B22:.F22])" office:value-type="float" office:value="1216.62537357004" calcext:value-type="float">
            <text:p>1216.6</text:p>
          </table:table-cell>
          <table:table-cell table:style-name="ce206" table:formula="of:=[.G22]*[.G$8]" office:value-type="float" office:value="28541.682092471" calcext:value-type="float">
            <text:p>28542</text:p>
          </table:table-cell>
          <table:table-cell table:style-name="ce212" table:formula="of:=STDEVP([.B22:.F22])/AVERAGE([.B22:.F22])" office:value-type="percentage" office:value="0.0229223881667842" calcext:value-type="percentage">
            <text:p>2.3%</text:p>
          </table:table-cell>
          <table:table-cell table:style-name="ce212" table:formula="of:=IF([.H22]&gt;[.$A$43]; [.$C$43]; IF([.H22]&gt;[.$A$44]; [.$C$44]; IF([.H22]&gt;[.$A$45];[.$C$45];IF([.H22]&gt;[.$A$46];[.$C$46]; IF([.H22]&gt;[.$A$47];[.$C$47];IF([.H22]&gt;[.$A$48];[.$C$48];[.$C$49]))))))/100" office:value-type="percentage" office:value="0.11" calcext:value-type="percentage">
            <text:p>11.0%</text:p>
          </table:table-cell>
          <table:table-cell table:style-name="ce213" table:formula="of:=(MAX([.B22:.F22])-MIN([.B22:.F22]))/[.G22]" office:value-type="percentage" office:value="0.0537485302604109" calcext:value-type="percentage">
            <text:p>5.4%</text:p>
          </table:table-cell>
          <table:table-cell table:formula="of:=COUNTA([.B22:.F22])" office:value-type="float" office:value="5" calcext:value-type="float">
            <text:p>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20" table:formula="of:=['file:///D:/mp/projects/PR0118%20-%20ISO%2011171%20Calibrations/results/2025-05-19-LPA3-NAVAIR-11171-00009/11171-00009-LIVE.ods'#$'Clause 6 Sizing Calibration'.$E$32]" office:value-type="float" office:value="521.660684775698" calcext:value-type="float">
            <text:p>522</text:p>
          </table:table-cell>
          <table:table-cell table:number-columns-repeated="3"/>
          <table:table-cell table:style-name="ce76" table:number-columns-repeated="30"/>
        </table:table-row>
        <table:table-row table:style-name="ro2">
          <table:table-cell table:style-name="ce16" office:value-type="string" calcext:value-type="string">
            <text:p>count_18</text:p>
          </table:table-cell>
          <table:table-cell table:style-name="ce198" table:formula="of:=[.B67]/[.B$8]" office:value-type="float" office:value="925.556188433587" calcext:value-type="float">
            <text:p>926</text:p>
          </table:table-cell>
          <table:table-cell table:style-name="ce198" table:formula="of:=[.C67]/[.C$8]" office:value-type="float" office:value="938.742807073355" calcext:value-type="float">
            <text:p>939</text:p>
          </table:table-cell>
          <table:table-cell table:style-name="ce198" table:formula="of:=[.D67]/[.D$8]" office:value-type="float" office:value="961.332324407503" calcext:value-type="float">
            <text:p>961</text:p>
          </table:table-cell>
          <table:table-cell table:style-name="ce198" table:formula="of:=[.E67]/[.E$8]" office:value-type="float" office:value="898.615097827463" calcext:value-type="float">
            <text:p>899</text:p>
          </table:table-cell>
          <table:table-cell table:style-name="ce198" table:formula="of:=[.F67]/[.F$8]" office:value-type="float" office:value="886.504590288943" calcext:value-type="float">
            <text:p>887</text:p>
          </table:table-cell>
          <table:table-cell table:style-name="ce204" table:formula="of:=AVERAGE([.B23:.F23])" office:value-type="float" office:value="922.15020160617" calcext:value-type="float">
            <text:p>922.2</text:p>
          </table:table-cell>
          <table:table-cell table:style-name="ce206" table:formula="of:=[.G23]*[.G$8]" office:value-type="float" office:value="21633.3790725729" calcext:value-type="float">
            <text:p>21633</text:p>
          </table:table-cell>
          <table:table-cell table:style-name="ce212" table:formula="of:=STDEVP([.B23:.F23])/AVERAGE([.B23:.F23])" office:value-type="percentage" office:value="0.0292860805626928" calcext:value-type="percentage">
            <text:p>2.9%</text:p>
          </table:table-cell>
          <table:table-cell table:style-name="ce212" table:formula="of:=IF([.H23]&gt;[.$A$43]; [.$C$43]; IF([.H23]&gt;[.$A$44]; [.$C$44]; IF([.H23]&gt;[.$A$45];[.$C$45];IF([.H23]&gt;[.$A$46];[.$C$46]; IF([.H23]&gt;[.$A$47];[.$C$47];IF([.H23]&gt;[.$A$48];[.$C$48];[.$C$49]))))))/100" office:value-type="percentage" office:value="0.11" calcext:value-type="percentage">
            <text:p>11.0%</text:p>
          </table:table-cell>
          <table:table-cell table:style-name="ce213" table:formula="of:=(MAX([.B23:.F23])-MIN([.B23:.F23]))/[.G23]" office:value-type="percentage" office:value="0.0811448438532331" calcext:value-type="percentage">
            <text:p>8.1%</text:p>
          </table:table-cell>
          <table:table-cell table:formula="of:=COUNTA([.B23:.F23])"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20" table:formula="of:=['file:///D:/mp/projects/PR0118%20-%20ISO%2011171%20Calibrations/results/2025-05-19-LPA3-NAVAIR-11171-00009/11171-00009-LIVE.ods'#$'Clause 6 Sizing Calibration'.$E$33]" office:value-type="float" office:value="621.093383986398" calcext:value-type="float">
            <text:p>621</text:p>
          </table:table-cell>
          <table:table-cell table:number-columns-repeated="3"/>
          <table:table-cell table:style-name="ce21" table:number-columns-repeated="30"/>
        </table:table-row>
        <table:table-row table:style-name="ro2">
          <table:table-cell table:style-name="ce16" office:value-type="string" calcext:value-type="string">
            <text:p>count_19</text:p>
          </table:table-cell>
          <table:table-cell table:style-name="ce198" table:formula="of:=[.B68]/[.B$8]" office:value-type="float" office:value="711.261551855168" calcext:value-type="float">
            <text:p>711</text:p>
          </table:table-cell>
          <table:table-cell table:style-name="ce198" table:formula="of:=[.C68]/[.C$8]" office:value-type="float" office:value="713.140350287949" calcext:value-type="float">
            <text:p>713</text:p>
          </table:table-cell>
          <table:table-cell table:style-name="ce198" table:formula="of:=[.D68]/[.D$8]" office:value-type="float" office:value="727.672219995543" calcext:value-type="float">
            <text:p>728</text:p>
          </table:table-cell>
          <table:table-cell table:style-name="ce198" table:formula="of:=[.E68]/[.E$8]" office:value-type="float" office:value="693.944571098502" calcext:value-type="float">
            <text:p>694</text:p>
          </table:table-cell>
          <table:table-cell table:style-name="ce198" table:formula="of:=[.F68]/[.F$8]" office:value-type="float" office:value="669.798815383639" calcext:value-type="float">
            <text:p>670</text:p>
          </table:table-cell>
          <table:table-cell table:style-name="ce204" table:formula="of:=AVERAGE([.B24:.F24])" office:value-type="float" office:value="703.16350172416" calcext:value-type="float">
            <text:p>703.2</text:p>
          </table:table-cell>
          <table:table-cell table:style-name="ce206" table:formula="of:=[.G24]*[.G$8]" office:value-type="float" office:value="16496.0139425238" calcext:value-type="float">
            <text:p>16496</text:p>
          </table:table-cell>
          <table:table-cell table:style-name="ce212" table:formula="of:=STDEVP([.B24:.F24])/AVERAGE([.B24:.F24])" office:value-type="percentage" office:value="0.0281856249805337" calcext:value-type="percentage">
            <text:p>2.8%</text:p>
          </table:table-cell>
          <table:table-cell table:style-name="ce212" table:formula="of:=IF([.H24]&gt;[.$A$43]; [.$C$43]; IF([.H24]&gt;[.$A$44]; [.$C$44]; IF([.H24]&gt;[.$A$45];[.$C$45];IF([.H24]&gt;[.$A$46];[.$C$46]; IF([.H24]&gt;[.$A$47];[.$C$47];IF([.H24]&gt;[.$A$48];[.$C$48];[.$C$49]))))))/100" office:value-type="percentage" office:value="0.11" calcext:value-type="percentage">
            <text:p>11.0%</text:p>
          </table:table-cell>
          <table:table-cell table:style-name="ce213" table:formula="of:=(MAX([.B24:.F24])-MIN([.B24:.F24]))/[.G24]" office:value-type="percentage" office:value="0.082304335293282" calcext:value-type="percentage">
            <text:p>8.2%</text:p>
          </table:table-cell>
          <table:table-cell table:formula="of:=COUNTA([.B24:.F24])" office:value-type="float" office:value="5" calcext:value-type="float">
            <text:p>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20" table:formula="of:=['file:///D:/mp/projects/PR0118%20-%20ISO%2011171%20Calibrations/results/2025-05-19-LPA3-NAVAIR-11171-00009/11171-00009-LIVE.ods'#$'Clause 6 Sizing Calibration'.$E$34]" office:value-type="float" office:value="739.478751015215" calcext:value-type="float">
            <text:p>739</text:p>
          </table:table-cell>
          <table:table-cell table:number-columns-repeated="3"/>
          <table:table-cell table:style-name="ce212" table:number-columns-repeated="30"/>
        </table:table-row>
        <table:table-row table:style-name="ro2">
          <table:table-cell table:style-name="ce16" office:value-type="string" calcext:value-type="string">
            <text:p>count_20</text:p>
          </table:table-cell>
          <table:table-cell table:style-name="ce198" table:formula="of:=[.B69]/[.B$8]" office:value-type="float" office:value="553.724827363213" calcext:value-type="float">
            <text:p>554</text:p>
          </table:table-cell>
          <table:table-cell table:style-name="ce198" table:formula="of:=[.C69]/[.C$8]" office:value-type="float" office:value="542.88231642181" calcext:value-type="float">
            <text:p>543</text:p>
          </table:table-cell>
          <table:table-cell table:style-name="ce198" table:formula="of:=[.D69]/[.D$8]" office:value-type="float" office:value="558.199796124674" calcext:value-type="float">
            <text:p>558</text:p>
          </table:table-cell>
          <table:table-cell table:style-name="ce198" table:formula="of:=[.E69]/[.E$8]" office:value-type="float" office:value="522.298990614605" calcext:value-type="float">
            <text:p>522</text:p>
          </table:table-cell>
          <table:table-cell table:style-name="ce198" table:formula="of:=[.F69]/[.F$8]" office:value-type="float" office:value="508.7874715168" calcext:value-type="float">
            <text:p>509</text:p>
          </table:table-cell>
          <table:table-cell table:style-name="ce204" table:formula="of:=AVERAGE([.B25:.F25])" office:value-type="float" office:value="537.17868040822" calcext:value-type="float">
            <text:p>537.2</text:p>
          </table:table-cell>
          <table:table-cell table:style-name="ce206" table:formula="of:=[.G25]*[.G$8]" office:value-type="float" office:value="12602.0576720956" calcext:value-type="float">
            <text:p>12602</text:p>
          </table:table-cell>
          <table:table-cell table:style-name="ce212" table:formula="of:=STDEVP([.B25:.F25])/AVERAGE([.B25:.F25])" office:value-type="percentage" office:value="0.0350813335532903" calcext:value-type="percentage">
            <text:p>3.5%</text:p>
          </table:table-cell>
          <table:table-cell table:style-name="ce212" table:formula="of:=IF([.H25]&gt;[.$A$43]; [.$C$43]; IF([.H25]&gt;[.$A$44]; [.$C$44]; IF([.H25]&gt;[.$A$45];[.$C$45];IF([.H25]&gt;[.$A$46];[.$C$46]; IF([.H25]&gt;[.$A$47];[.$C$47];IF([.H25]&gt;[.$A$48];[.$C$48];[.$C$49]))))))/100" office:value-type="percentage" office:value="0.11" calcext:value-type="percentage">
            <text:p>11.0%</text:p>
          </table:table-cell>
          <table:table-cell table:style-name="ce213" table:formula="of:=(MAX([.B25:.F25])-MIN([.B25:.F25]))/[.G25]" office:value-type="percentage" office:value="0.0919848951755192" calcext:value-type="percentage">
            <text:p>9.2%</text:p>
          </table:table-cell>
          <table:table-cell table:formula="of:=COUNTA([.B25:.F25])" office:value-type="float" office:value="5" calcext:value-type="float">
            <text:p>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20" table:formula="of:=['file:///D:/mp/projects/PR0118%20-%20ISO%2011171%20Calibrations/results/2025-05-19-LPA3-NAVAIR-11171-00009/11171-00009-LIVE.ods'#$'Clause 6 Sizing Calibration'.$E$35]" office:value-type="float" office:value="880.429315948079" calcext:value-type="float">
            <text:p>880</text:p>
          </table:table-cell>
          <table:table-cell table:number-columns-repeated="3"/>
          <table:table-cell table:style-name="ce21" table:number-columns-repeated="30"/>
        </table:table-row>
        <table:table-row table:style-name="ro2">
          <table:table-cell table:style-name="ce16" office:value-type="string" calcext:value-type="string">
            <text:p>count_21</text:p>
          </table:table-cell>
          <table:table-cell table:style-name="ce198" table:formula="of:=[.B70]/[.B$8]" office:value-type="float" office:value="428.36581681004" calcext:value-type="float">
            <text:p>428</text:p>
          </table:table-cell>
          <table:table-cell table:style-name="ce198" table:formula="of:=[.C70]/[.C$8]" office:value-type="float" office:value="410.647168530739" calcext:value-type="float">
            <text:p>411</text:p>
          </table:table-cell>
          <table:table-cell table:style-name="ce198" table:formula="of:=[.D70]/[.D$8]" office:value-type="float" office:value="430.248116102168" calcext:value-type="float">
            <text:p>430</text:p>
          </table:table-cell>
          <table:table-cell table:style-name="ce198" table:formula="of:=[.E70]/[.E$8]" office:value-type="float" office:value="403.030554175426" calcext:value-type="float">
            <text:p>403</text:p>
          </table:table-cell>
          <table:table-cell table:style-name="ce198"/>
          <table:table-cell table:style-name="ce204" table:formula="of:=AVERAGE([.B26:.F26])" office:value-type="float" office:value="418.072913904593" calcext:value-type="float">
            <text:p>418.1</text:p>
          </table:table-cell>
          <table:table-cell table:style-name="ce206" table:formula="of:=[.G26]*[.G$8]" office:value-type="float" office:value="9807.87057327547" calcext:value-type="float">
            <text:p>9808</text:p>
          </table:table-cell>
          <table:table-cell table:style-name="ce212" table:formula="of:=STDEVP([.B26:.F26])/AVERAGE([.B26:.F26])" office:value-type="percentage" office:value="0.0276780630635793" calcext:value-type="percentage">
            <text:p>2.8%</text:p>
          </table:table-cell>
          <table:table-cell table:style-name="ce212" table:formula="of:=IF([.H26]&gt;[.$A$43]; [.$C$43]; IF([.H26]&gt;[.$A$44]; [.$C$44]; IF([.H26]&gt;[.$A$45];[.$C$45];IF([.H26]&gt;[.$A$46];[.$C$46]; IF([.H26]&gt;[.$A$47];[.$C$47];IF([.H26]&gt;[.$A$48];[.$C$48];[.$C$49]))))))/100" office:value-type="percentage" office:value="0.113" calcext:value-type="percentage">
            <text:p>11.3%</text:p>
          </table:table-cell>
          <table:table-cell table:style-name="ce213" table:formula="of:=(MAX([.B26:.F26])-MIN([.B26:.F26]))/[.G26]" office:value-type="percentage" office:value="0.0651024283600285" calcext:value-type="percentage">
            <text:p>6.5%</text:p>
          </table:table-cell>
          <table:table-cell table:formula="of:=COUNTA([.B26:.F26])" office:value-type="float" office:value="4" calcext:value-type="float">
            <text:p>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ce20" table:formula="of:=['file:///D:/mp/projects/PR0118%20-%20ISO%2011171%20Calibrations/results/2025-05-19-LPA3-NAVAIR-11171-00009/11171-00009-LIVE.ods'#$'Clause 6 Sizing Calibration'.$E$36]" office:value-type="float" office:value="1048.24618600143" calcext:value-type="float">
            <text:p>1048</text:p>
          </table:table-cell>
          <table:table-cell table:number-columns-repeated="33"/>
        </table:table-row>
        <table:table-row table:style-name="ro2">
          <table:table-cell table:style-name="ce16" office:value-type="string" calcext:value-type="string">
            <text:p>count_22</text:p>
          </table:table-cell>
          <table:table-cell table:style-name="ce198" table:formula="of:=[.B71]/[.B$8]" office:value-type="float" office:value="328.033917098142" calcext:value-type="float">
            <text:p>328</text:p>
          </table:table-cell>
          <table:table-cell table:style-name="ce198" table:formula="of:=[.C71]/[.C$8]" office:value-type="float" office:value="314.322524060565" calcext:value-type="float">
            <text:p>314</text:p>
          </table:table-cell>
          <table:table-cell table:style-name="ce198" table:formula="of:=[.D71]/[.D$8]" office:value-type="float" office:value="332.801472376419" calcext:value-type="float">
            <text:p>333</text:p>
          </table:table-cell>
          <table:table-cell table:style-name="ce198" table:formula="of:=[.E71]/[.E$8]" office:value-type="float" office:value="313.842164316146" calcext:value-type="float">
            <text:p>314</text:p>
          </table:table-cell>
          <table:table-cell table:style-name="ce198"/>
          <table:table-cell table:style-name="ce204" table:formula="of:=AVERAGE([.B27:.F27])" office:value-type="float" office:value="322.250019462818" calcext:value-type="float">
            <text:p>322.3</text:p>
          </table:table-cell>
          <table:table-cell table:style-name="ce206" table:formula="of:=[.G27]*[.G$8]" office:value-type="float" office:value="7559.89297084213" calcext:value-type="float">
            <text:p>7560</text:p>
          </table:table-cell>
          <table:table-cell table:style-name="ce212" table:formula="of:=STDEVP([.B27:.F27])/AVERAGE([.B27:.F27])" office:value-type="percentage" office:value="0.0258852436641316" calcext:value-type="percentage">
            <text:p>2.6%</text:p>
          </table:table-cell>
          <table:table-cell table:style-name="ce212" table:formula="of:=IF([.H27]&gt;[.$A$43]; [.$C$43]; IF([.H27]&gt;[.$A$44]; [.$C$44]; IF([.H27]&gt;[.$A$45];[.$C$45];IF([.H27]&gt;[.$A$46];[.$C$46]; IF([.H27]&gt;[.$A$47];[.$C$47];IF([.H27]&gt;[.$A$48];[.$C$48];[.$C$49]))))))/100" office:value-type="percentage" office:value="0.113" calcext:value-type="percentage">
            <text:p>11.3%</text:p>
          </table:table-cell>
          <table:table-cell table:style-name="ce213" table:formula="of:=(MAX([.B27:.F27])-MIN([.B27:.F27]))/[.G27]" office:value-type="percentage" office:value="0.0588341564474605" calcext:value-type="percentage">
            <text:p>5.9%</text:p>
          </table:table-cell>
          <table:table-cell table:formula="of:=COUNTA([.B27:.F27])" office:value-type="float" office:value="4" calcext:value-type="float">
            <text:p>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20" table:formula="of:=['file:///D:/mp/projects/PR0118%20-%20ISO%2011171%20Calibrations/results/2025-05-19-LPA3-NAVAIR-11171-00009/11171-00009-LIVE.ods'#$'Clause 6 Sizing Calibration'.$E$37]" office:value-type="float" office:value="1248.05029383114" calcext:value-type="float">
            <text:p>1248</text:p>
          </table:table-cell>
          <table:table-cell table:number-columns-repeated="33"/>
        </table:table-row>
        <table:table-row table:style-name="ro2">
          <table:table-cell table:style-name="ce16" office:value-type="string" calcext:value-type="string">
            <text:p>count_23</text:p>
          </table:table-cell>
          <table:table-cell table:style-name="ce198" table:formula="of:=[.B72]/[.B$8]" office:value-type="float" office:value="253.176040921114" calcext:value-type="float">
            <text:p>253</text:p>
          </table:table-cell>
          <table:table-cell table:style-name="ce198" table:formula="of:=[.C72]/[.C$8]" office:value-type="float" office:value="239.755419898348" calcext:value-type="float">
            <text:p>240</text:p>
          </table:table-cell>
          <table:table-cell table:style-name="ce198" table:formula="of:=[.D72]/[.D$8]" office:value-type="float" office:value="251.66654944824" calcext:value-type="float">
            <text:p>252</text:p>
          </table:table-cell>
          <table:table-cell table:style-name="ce198" table:formula="of:=[.E72]/[.E$8]" office:value-type="float" office:value="242.323172447855" calcext:value-type="float">
            <text:p>242</text:p>
          </table:table-cell>
          <table:table-cell table:style-name="ce198"/>
          <table:table-cell table:style-name="ce204" table:formula="of:=AVERAGE([.B28:.F28])" office:value-type="float" office:value="246.730295678889" calcext:value-type="float">
            <text:p>246.7</text:p>
          </table:table-cell>
          <table:table-cell table:style-name="ce206" table:formula="of:=[.G28]*[.G$8]" office:value-type="float" office:value="5788.22192503188" calcext:value-type="float">
            <text:p>5788</text:p>
          </table:table-cell>
          <table:table-cell table:style-name="ce212" table:formula="of:=STDEVP([.B28:.F28])/AVERAGE([.B28:.F28])" office:value-type="percentage" office:value="0.0234572453174647" calcext:value-type="percentage">
            <text:p>2.3%</text:p>
          </table:table-cell>
          <table:table-cell table:style-name="ce212" table:formula="of:=IF([.H28]&gt;[.$A$43]; [.$C$43]; IF([.H28]&gt;[.$A$44]; [.$C$44]; IF([.H28]&gt;[.$A$45];[.$C$45];IF([.H28]&gt;[.$A$46];[.$C$46]; IF([.H28]&gt;[.$A$47];[.$C$47];IF([.H28]&gt;[.$A$48];[.$C$48];[.$C$49]))))))/100" office:value-type="percentage" office:value="0.113" calcext:value-type="percentage">
            <text:p>11.3%</text:p>
          </table:table-cell>
          <table:table-cell table:style-name="ce213" table:formula="of:=(MAX([.B28:.F28])-MIN([.B28:.F28]))/[.G28]" office:value-type="percentage" office:value="0.0543938918641447" calcext:value-type="percentage">
            <text:p>5.4%</text:p>
          </table:table-cell>
          <table:table-cell table:formula="of:=COUNTA([.B28:.F28])" office:value-type="float" office:value="4" calcext:value-type="float">
            <text:p>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20" table:formula="of:=['file:///D:/mp/projects/PR0118%20-%20ISO%2011171%20Calibrations/results/2025-05-19-LPA3-NAVAIR-11171-00009/11171-00009-LIVE.ods'#$'Clause 6 Sizing Calibration'.$E$38]" office:value-type="float" office:value="1485.93866281892" calcext:value-type="float">
            <text:p>1486</text:p>
          </table:table-cell>
          <table:table-cell table:number-columns-repeated="33"/>
        </table:table-row>
        <table:table-row table:style-name="ro2">
          <table:table-cell table:style-name="ce16" office:value-type="string" calcext:value-type="string">
            <text:p>count_24</text:p>
          </table:table-cell>
          <table:table-cell table:style-name="ce198" table:formula="of:=[.B73]/[.B$8]" office:value-type="float" office:value="195.300847100665" calcext:value-type="float">
            <text:p>195</text:p>
          </table:table-cell>
          <table:table-cell table:style-name="ce198" table:formula="of:=[.C73]/[.C$8]" office:value-type="float" office:value="183.354805701997" calcext:value-type="float">
            <text:p>183</text:p>
          </table:table-cell>
          <table:table-cell table:style-name="ce198" table:formula="of:=[.D73]/[.D$8]" office:value-type="float" office:value="188.961752616019" calcext:value-type="float">
            <text:p>189</text:p>
          </table:table-cell>
          <table:table-cell table:style-name="ce198" table:formula="of:=[.E73]/[.E$8]" office:value-type="float" office:value="189.735678427053" calcext:value-type="float">
            <text:p>190</text:p>
          </table:table-cell>
          <table:table-cell table:style-name="ce198"/>
          <table:table-cell table:style-name="ce204" table:formula="of:=AVERAGE([.B29:.F29])" office:value-type="float" office:value="189.338270961433" calcext:value-type="float">
            <text:p>189.3</text:p>
          </table:table-cell>
          <table:table-cell table:style-name="ce206" table:formula="of:=[.G29]*[.G$8]" office:value-type="float" office:value="4441.82149667146" calcext:value-type="float">
            <text:p>4442</text:p>
          </table:table-cell>
          <table:table-cell table:style-name="ce212" table:formula="of:=STDEVP([.B29:.F29])/AVERAGE([.B29:.F29])" office:value-type="percentage" office:value="0.022353803125167" calcext:value-type="percentage">
            <text:p>2.2%</text:p>
          </table:table-cell>
          <table:table-cell table:style-name="ce212" table:formula="of:=IF([.H29]&gt;[.$A$43]; [.$C$43]; IF([.H29]&gt;[.$A$44]; [.$C$44]; IF([.H29]&gt;[.$A$45];[.$C$45];IF([.H29]&gt;[.$A$46];[.$C$46]; IF([.H29]&gt;[.$A$47];[.$C$47];IF([.H29]&gt;[.$A$48];[.$C$48];[.$C$49]))))))/100" office:value-type="percentage" office:value="0.119" calcext:value-type="percentage">
            <text:p>11.9%</text:p>
          </table:table-cell>
          <table:table-cell table:style-name="ce213" table:formula="of:=(MAX([.B29:.F29])-MIN([.B29:.F29]))/[.G29]" office:value-type="percentage" office:value="0.0630936436569757" calcext:value-type="percentage">
            <text:p>6.3%</text:p>
          </table:table-cell>
          <table:table-cell table:formula="of:=COUNTA([.B29:.F29])" office:value-type="float" office:value="4" calcext:value-type="float">
            <text:p>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style-name="ce20" table:formula="of:=['file:///D:/mp/projects/PR0118%20-%20ISO%2011171%20Calibrations/results/2025-05-19-LPA3-NAVAIR-11171-00009/11171-00009-LIVE.ods'#$'Clause 6 Sizing Calibration'.$E$39]" office:value-type="float" office:value="1769.17045777228" calcext:value-type="float">
            <text:p>1769</text:p>
          </table:table-cell>
          <table:table-cell table:number-columns-repeated="33"/>
        </table:table-row>
        <table:table-row table:style-name="ro2">
          <table:table-cell table:style-name="ce16" office:value-type="string" calcext:value-type="string">
            <text:p>count_25</text:p>
          </table:table-cell>
          <table:table-cell table:style-name="ce198" table:formula="of:=[.B74]/[.B$8]" office:value-type="float" office:value="148.375014273274" calcext:value-type="float">
            <text:p>148</text:p>
          </table:table-cell>
          <table:table-cell table:style-name="ce198" table:formula="of:=[.C74]/[.C$8]" office:value-type="float" office:value="138.994772064417" calcext:value-type="float">
            <text:p>139</text:p>
          </table:table-cell>
          <table:table-cell table:style-name="ce198" table:formula="of:=[.D74]/[.D$8]" office:value-type="float" office:value="143.416038700723" calcext:value-type="float">
            <text:p>143</text:p>
          </table:table-cell>
          <table:table-cell table:style-name="ce198" table:formula="of:=[.E74]/[.E$8]" office:value-type="float" office:value="140.934483975749" calcext:value-type="float">
            <text:p>141</text:p>
          </table:table-cell>
          <table:table-cell table:style-name="ce198"/>
          <table:table-cell table:style-name="ce204" table:formula="of:=AVERAGE([.B30:.F30])" office:value-type="float" office:value="142.930077253541" calcext:value-type="float">
            <text:p>142.9</text:p>
          </table:table-cell>
          <table:table-cell table:style-name="ce206" table:formula="of:=[.G30]*[.G$8]" office:value-type="float" office:value="3353.09859143589" calcext:value-type="float">
            <text:p>3353</text:p>
          </table:table-cell>
          <table:table-cell table:style-name="ce212" table:formula="of:=STDEVP([.B30:.F30])/AVERAGE([.B30:.F30])" office:value-type="percentage" office:value="0.0245754245905044" calcext:value-type="percentage">
            <text:p>2.5%</text:p>
          </table:table-cell>
          <table:table-cell table:style-name="ce212" table:formula="of:=IF([.H30]&gt;[.$A$43]; [.$C$43]; IF([.H30]&gt;[.$A$44]; [.$C$44]; IF([.H30]&gt;[.$A$45];[.$C$45];IF([.H30]&gt;[.$A$46];[.$C$46]; IF([.H30]&gt;[.$A$47];[.$C$47];IF([.H30]&gt;[.$A$48];[.$C$48];[.$C$49]))))))/100" office:value-type="percentage" office:value="0.119" calcext:value-type="percentage">
            <text:p>11.9%</text:p>
          </table:table-cell>
          <table:table-cell table:style-name="ce213" table:formula="of:=(MAX([.B30:.F30])-MIN([.B30:.F30]))/[.G30]" office:value-type="percentage" office:value="0.0656281895952385" calcext:value-type="percentage">
            <text:p>6.6%</text:p>
          </table:table-cell>
          <table:table-cell table:formula="of:=COUNTA([.B30:.F30])" office:value-type="float" office:value="4" calcext:value-type="float">
            <text:p>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20" table:formula="of:=['file:///D:/mp/projects/PR0118%20-%20ISO%2011171%20Calibrations/results/2025-05-19-LPA3-NAVAIR-11171-00009/11171-00009-LIVE.ods'#$'Clause 6 Sizing Calibration'.$E$40]" office:value-type="float" office:value="2106.38849837614" calcext:value-type="float">
            <text:p>2106</text:p>
          </table:table-cell>
          <table:table-cell table:number-columns-repeated="33"/>
        </table:table-row>
        <table:table-row table:style-name="ro2">
          <table:table-cell table:style-name="ce16" office:value-type="string" calcext:value-type="string">
            <text:p>count_26</text:p>
          </table:table-cell>
          <table:table-cell table:style-name="ce198" table:formula="of:=[.B75]/[.B$8]" office:value-type="float" office:value="110.834348011361" calcext:value-type="float">
            <text:p>111</text:p>
          </table:table-cell>
          <table:table-cell table:style-name="ce198" table:formula="of:=[.C75]/[.C$8]" office:value-type="float" office:value="107.097795496443" calcext:value-type="float">
            <text:p>107</text:p>
          </table:table-cell>
          <table:table-cell table:style-name="ce198" table:formula="of:=[.D75]/[.D$8]" office:value-type="float" office:value="108.886032337033" calcext:value-type="float">
            <text:p>109</text:p>
          </table:table-cell>
          <table:table-cell table:style-name="ce198" table:formula="of:=[.E75]/[.E$8]" office:value-type="float" office:value="102.861138304689" calcext:value-type="float">
            <text:p>103</text:p>
          </table:table-cell>
          <table:table-cell table:style-name="ce198"/>
          <table:table-cell table:style-name="ce204" table:formula="of:=AVERAGE([.B31:.F31])" office:value-type="float" office:value="107.419828537381" calcext:value-type="float">
            <text:p>107.4</text:p>
          </table:table-cell>
          <table:table-cell table:style-name="ce206" table:formula="of:=[.G31]*[.G$8]" office:value-type="float" office:value="2520.03834799618" calcext:value-type="float">
            <text:p>2520</text:p>
          </table:table-cell>
          <table:table-cell table:style-name="ce212" table:formula="of:=STDEVP([.B31:.F31])/AVERAGE([.B31:.F31])" office:value-type="percentage" office:value="0.0274165689629799" calcext:value-type="percentage">
            <text:p>2.7%</text:p>
          </table:table-cell>
          <table:table-cell table:style-name="ce212" table:formula="of:=IF([.H31]&gt;[.$A$43]; [.$C$43]; IF([.H31]&gt;[.$A$44]; [.$C$44]; IF([.H31]&gt;[.$A$45];[.$C$45];IF([.H31]&gt;[.$A$46];[.$C$46]; IF([.H31]&gt;[.$A$47];[.$C$47];IF([.H31]&gt;[.$A$48];[.$C$48];[.$C$49]))))))/100" office:value-type="percentage" office:value="0.119" calcext:value-type="percentage">
            <text:p>11.9%</text:p>
          </table:table-cell>
          <table:table-cell table:style-name="ce213" table:formula="of:=(MAX([.B31:.F31])-MIN([.B31:.F31]))/[.G31]" office:value-type="percentage" office:value="0.0742247480305575" calcext:value-type="percentage">
            <text:p>7.4%</text:p>
          </table:table-cell>
          <table:table-cell table:formula="of:=COUNTA([.B31:.F31])"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20" table:formula="of:=['file:///D:/mp/projects/PR0118%20-%20ISO%2011171%20Calibrations/results/2025-05-19-LPA3-NAVAIR-11171-00009/11171-00009-LIVE.ods'#$'Clause 6 Sizing Calibration'.$E$41]" office:value-type="float" office:value="2507.88299488007" calcext:value-type="float">
            <text:p>2508</text:p>
          </table:table-cell>
          <table:table-cell table:number-columns-repeated="33"/>
        </table:table-row>
        <table:table-row table:style-name="ro2">
          <table:table-cell table:style-name="ce16" office:value-type="string" calcext:value-type="string">
            <text:p>count_27</text:p>
          </table:table-cell>
          <table:table-cell table:style-name="ce198" table:formula="of:=[.B76]/[.B$8]" office:value-type="float" office:value="84.2430427425066" calcext:value-type="float">
            <text:p>84</text:p>
          </table:table-cell>
          <table:table-cell table:style-name="ce198" table:formula="of:=[.C76]/[.C$8]" office:value-type="float" office:value="77.7356779934732" calcext:value-type="float">
            <text:p>78</text:p>
          </table:table-cell>
          <table:table-cell table:style-name="ce198" table:formula="of:=[.D76]/[.D$8]" office:value-type="float" office:value="78.5928365701154" calcext:value-type="float">
            <text:p>79</text:p>
          </table:table-cell>
          <table:table-cell table:style-name="ce198" table:formula="of:=[.E76]/[.E$8]" office:value-type="float" office:value="77.1984412225372" calcext:value-type="float">
            <text:p>77</text:p>
          </table:table-cell>
          <table:table-cell table:style-name="ce198"/>
          <table:table-cell table:style-name="ce204" table:formula="of:=AVERAGE([.B32:.F32])" office:value-type="float" office:value="79.4424996321581" calcext:value-type="float">
            <text:p>79.4</text:p>
          </table:table-cell>
          <table:table-cell table:style-name="ce206" table:formula="of:=[.G32]*[.G$8]" office:value-type="float" office:value="1863.69824137303" calcext:value-type="float">
            <text:p>1864</text:p>
          </table:table-cell>
          <table:table-cell table:style-name="ce212" table:formula="of:=STDEVP([.B32:.F32])/AVERAGE([.B32:.F32])" office:value-type="percentage" office:value="0.0354452087810213" calcext:value-type="percentage">
            <text:p>3.5%</text:p>
          </table:table-cell>
          <table:table-cell table:style-name="ce212" table:formula="of:=IF([.H32]&gt;[.$A$43]; [.$C$43]; IF([.H32]&gt;[.$A$44]; [.$C$44]; IF([.H32]&gt;[.$A$45];[.$C$45];IF([.H32]&gt;[.$A$46];[.$C$46]; IF([.H32]&gt;[.$A$47];[.$C$47];IF([.H32]&gt;[.$A$48];[.$C$48];[.$C$49]))))))/100" office:value-type="percentage" office:value="0.134" calcext:value-type="percentage">
            <text:p>13.4%</text:p>
          </table:table-cell>
          <table:table-cell table:style-name="ce213" table:formula="of:=(MAX([.B32:.F32])-MIN([.B32:.F32]))/[.G32]" office:value-type="percentage" office:value="0.0886754766351496" calcext:value-type="percentage">
            <text:p>8.9%</text:p>
          </table:table-cell>
          <table:table-cell table:formula="of:=COUNTA([.B32:.F32])" office:value-type="float" office:value="4" calcext:value-type="float">
            <text:p>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20" table:formula="of:=['file:///D:/mp/projects/PR0118%20-%20ISO%2011171%20Calibrations/results/2025-05-19-LPA3-NAVAIR-11171-00009/11171-00009-LIVE.ods'#$'Clause 6 Sizing Calibration'.$E$42]" office:value-type="float" office:value="2985.90555391719" calcext:value-type="float">
            <text:p>2986</text:p>
          </table:table-cell>
          <table:table-cell table:number-columns-repeated="33"/>
        </table:table-row>
        <table:table-row table:style-name="ro2">
          <table:table-cell table:style-name="ce16" office:value-type="string" calcext:value-type="string">
            <text:p>count_28</text:p>
          </table:table-cell>
          <table:table-cell table:style-name="ce198" table:formula="of:=[.B77]/[.B$8]" office:value-type="float" office:value="60.556669982014" calcext:value-type="float">
            <text:p>61</text:p>
          </table:table-cell>
          <table:table-cell table:style-name="ce198" table:formula="of:=[.C77]/[.C$8]" office:value-type="float" office:value="56.1893759409344" calcext:value-type="float">
            <text:p>56</text:p>
          </table:table-cell>
          <table:table-cell table:style-name="ce198" table:formula="of:=[.D77]/[.D$8]" office:value-type="float" office:value="58.4679862354497" calcext:value-type="float">
            <text:p>58</text:p>
          </table:table-cell>
          <table:table-cell table:style-name="ce198" table:formula="of:=[.E77]/[.E$8]" office:value-type="float" office:value="54.690993781634" calcext:value-type="float">
            <text:p>55</text:p>
          </table:table-cell>
          <table:table-cell table:style-name="ce198"/>
          <table:table-cell table:style-name="ce204" table:formula="of:=AVERAGE([.B33:.F33])" office:value-type="float" office:value="57.476256485008" calcext:value-type="float">
            <text:p>57.5</text:p>
          </table:table-cell>
          <table:table-cell table:style-name="ce206" table:formula="of:=[.G33]*[.G$8]" office:value-type="float" office:value="1348.37648145268" calcext:value-type="float">
            <text:p>1348</text:p>
          </table:table-cell>
          <table:table-cell table:style-name="ce212" table:formula="of:=STDEVP([.B33:.F33])/AVERAGE([.B33:.F33])" office:value-type="percentage" office:value="0.03879338757949" calcext:value-type="percentage">
            <text:p>3.9%</text:p>
          </table:table-cell>
          <table:table-cell table:style-name="ce212" table:formula="of:=IF([.H33]&gt;[.$A$43]; [.$C$43]; IF([.H33]&gt;[.$A$44]; [.$C$44]; IF([.H33]&gt;[.$A$45];[.$C$45];IF([.H33]&gt;[.$A$46];[.$C$46]; IF([.H33]&gt;[.$A$47];[.$C$47];IF([.H33]&gt;[.$A$48];[.$C$48];[.$C$49]))))))/100" office:value-type="percentage" office:value="0.134" calcext:value-type="percentage">
            <text:p>13.4%</text:p>
          </table:table-cell>
          <table:table-cell table:style-name="ce213" table:formula="of:=(MAX([.B33:.F33])-MIN([.B33:.F33]))/[.G33]" office:value-type="percentage" office:value="0.102053901195009" calcext:value-type="percentage">
            <text:p>10.2%</text:p>
          </table:table-cell>
          <table:table-cell table:formula="of:=COUNTA([.B33:.F33])"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20" table:formula="of:=['file:///D:/mp/projects/PR0118%20-%20ISO%2011171%20Calibrations/results/2025-05-19-LPA3-NAVAIR-11171-00009/11171-00009-LIVE.ods'#$'Clause 6 Sizing Calibration'.$E$43]" office:value-type="float" office:value="3555.04303634384" calcext:value-type="float">
            <text:p>3555</text:p>
          </table:table-cell>
          <table:table-cell table:number-columns-repeated="33"/>
        </table:table-row>
        <table:table-row table:style-name="ro2">
          <table:table-cell table:style-name="ce16" office:value-type="string" calcext:value-type="string">
            <text:p>count_29</text:p>
          </table:table-cell>
          <table:table-cell table:style-name="ce198" table:formula="of:=[.B78]/[.B$8]" office:value-type="float" office:value="45.8085510934054" calcext:value-type="float">
            <text:p>46</text:p>
          </table:table-cell>
          <table:table-cell table:style-name="ce198" table:formula="of:=[.C78]/[.C$8]" office:value-type="float" office:value="40.1352685292389" calcext:value-type="float">
            <text:p>40</text:p>
          </table:table-cell>
          <table:table-cell table:style-name="ce198" table:formula="of:=[.D78]/[.D$8]" office:value-type="float" office:value="43.2154680870715" calcext:value-type="float">
            <text:p>43</text:p>
          </table:table-cell>
          <table:table-cell table:style-name="ce198" table:formula="of:=[.E78]/[.E$8]" office:value-type="float" office:value="39.3354455275599" calcext:value-type="float">
            <text:p>39</text:p>
          </table:table-cell>
          <table:table-cell table:style-name="ce198"/>
          <table:table-cell table:style-name="ce204" table:formula="of:=AVERAGE([.B34:.F34])" office:value-type="float" office:value="42.1236833093189" calcext:value-type="float">
            <text:p>42.1</text:p>
          </table:table-cell>
          <table:table-cell table:style-name="ce206" table:formula="of:=[.G34]*[.G$8]" office:value-type="float" office:value="988.209520939512" calcext:value-type="float">
            <text:p>988</text:p>
          </table:table-cell>
          <table:table-cell table:style-name="ce212" table:formula="of:=STDEVP([.B34:.F34])/AVERAGE([.B34:.F34])" office:value-type="percentage" office:value="0.061101621552962" calcext:value-type="percentage">
            <text:p>6.1%</text:p>
          </table:table-cell>
          <table:table-cell table:style-name="ce212" table:formula="of:=IF([.H34]&gt;[.$A$43]; [.$C$43]; IF([.H34]&gt;[.$A$44]; [.$C$44]; IF([.H34]&gt;[.$A$45];[.$C$45];IF([.H34]&gt;[.$A$46];[.$C$46]; IF([.H34]&gt;[.$A$47];[.$C$47];IF([.H34]&gt;[.$A$48];[.$C$48];[.$C$49]))))))/100" office:value-type="percentage" office:value="0.156" calcext:value-type="percentage">
            <text:p>15.6%</text:p>
          </table:table-cell>
          <table:table-cell table:style-name="ce213" table:formula="of:=(MAX([.B34:.F34])-MIN([.B34:.F34]))/[.G34]" office:value-type="percentage" office:value="0.153669030277168" calcext:value-type="percentage">
            <text:p>15.4%</text:p>
          </table:table-cell>
          <table:table-cell table:formula="of:=COUNTA([.B34:.F34])" office:value-type="float" office:value="4" calcext:value-type="float">
            <text:p>4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20" table:formula="of:=['file:///D:/mp/projects/PR0118%20-%20ISO%2011171%20Calibrations/results/2025-05-19-LPA3-NAVAIR-11171-00009/11171-00009-LIVE.ods'#$'Clause 6 Sizing Calibration'.$E$44]" office:value-type="float" office:value="4232.66267537388" calcext:value-type="float">
            <text:p>4233</text:p>
          </table:table-cell>
          <table:table-cell table:number-columns-repeated="33"/>
        </table:table-row>
        <table:table-row table:style-name="ro2">
          <table:table-cell table:style-name="ce16" office:value-type="string" calcext:value-type="string">
            <text:p>count_30</text:p>
          </table:table-cell>
          <table:table-cell table:style-name="ce198" table:formula="of:=[.B79]/[.B$8]" office:value-type="float" office:value="34.1888210599563" calcext:value-type="float">
            <text:p>34</text:p>
          </table:table-cell>
          <table:table-cell table:style-name="ce198" table:formula="of:=[.C79]/[.C$8]" office:value-type="float" office:value="27.4609732042161" calcext:value-type="float">
            <text:p>27</text:p>
          </table:table-cell>
          <table:table-cell table:style-name="ce198" table:formula="of:=[.D79]/[.D$8]" office:value-type="float" office:value="28.8103120580477" calcext:value-type="float">
            <text:p>29</text:p>
          </table:table-cell>
          <table:table-cell table:style-name="ce198" table:formula="of:=[.E79]/[.E$8]" office:value-type="float" office:value="25.2419971299849" calcext:value-type="float">
            <text:p>25</text:p>
          </table:table-cell>
          <table:table-cell table:style-name="ce198"/>
          <table:table-cell table:style-name="ce204" table:formula="of:=AVERAGE([.B35:.F35])" office:value-type="float" office:value="28.9255258630512" calcext:value-type="float">
            <text:p>28.9</text:p>
          </table:table-cell>
          <table:table-cell table:style-name="ce206" table:formula="of:=[.G35]*[.G$8]" office:value-type="float" office:value="678.584535121259" calcext:value-type="float">
            <text:p>679</text:p>
          </table:table-cell>
          <table:table-cell table:style-name="ce212" table:formula="of:=STDEVP([.B35:.F35])/AVERAGE([.B35:.F35])" office:value-type="percentage" office:value="0.113914209495971" calcext:value-type="percentage">
            <text:p>11.4%</text:p>
          </table:table-cell>
          <table:table-cell table:style-name="ce212" table:formula="of:=IF([.H35]&gt;[.$A$43]; [.$C$43]; IF([.H35]&gt;[.$A$44]; [.$C$44]; IF([.H35]&gt;[.$A$45];[.$C$45];IF([.H35]&gt;[.$A$46];[.$C$46]; IF([.H35]&gt;[.$A$47];[.$C$47];IF([.H35]&gt;[.$A$48];[.$C$48];[.$C$49]))))))/100" office:value-type="percentage" office:value="0.156" calcext:value-type="percentage">
            <text:p>15.6%</text:p>
          </table:table-cell>
          <table:table-cell table:style-name="ce213" table:formula="of:=(MAX([.B35:.F35])-MIN([.B35:.F35]))/[.G35]" office:value-type="percentage" office:value="0.30930548928757" calcext:value-type="percentage">
            <text:p>30.9%</text:p>
          </table:table-cell>
          <table:table-cell table:formula="of:=COUNTA([.B35:.F35])"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20" table:formula="of:=['file:///D:/mp/projects/PR0118%20-%20ISO%2011171%20Calibrations/results/2025-05-19-LPA3-NAVAIR-11171-00009/11171-00009-LIVE.ods'#$'Clause 6 Sizing Calibration'.$E$45]" office:value-type="float" office:value="5039.44203778983" calcext:value-type="float">
            <text:p>5039</text:p>
          </table:table-cell>
          <table:table-cell table:number-columns-repeated="33"/>
        </table:table-row>
        <table:table-row table:style-name="ro2">
          <table:table-cell table:style-name="ce16" office:value-type="string" calcext:value-type="string">
            <text:p>count_38</text:p>
          </table:table-cell>
          <table:table-cell table:style-name="ce198" table:formula="of:=[.B80]/[.B$8]" office:value-type="float" office:value="22.1221783329129" calcext:value-type="float">
            <text:p>22</text:p>
          </table:table-cell>
          <table:table-cell table:style-name="ce198" table:formula="of:=[.C80]/[.C$8]" office:value-type="float" office:value="19.6451577537853" calcext:value-type="float">
            <text:p>20</text:p>
          </table:table-cell>
          <table:table-cell table:style-name="ce198" table:formula="of:=[.D80]/[.D$8]" office:value-type="float" office:value="20.1248503346657" calcext:value-type="float">
            <text:p>20</text:p>
          </table:table-cell>
          <table:table-cell table:style-name="ce198" table:formula="of:=[.E80]/[.E$8]" office:value-type="float" office:value="16.4072981344902" calcext:value-type="float">
            <text:p>16</text:p>
          </table:table-cell>
          <table:table-cell table:style-name="ce198" table:formula="of:=[.F80]/[.F$8]" office:value-type="float" office:value="12.5626536176988" calcext:value-type="float">
            <text:p>13</text:p>
          </table:table-cell>
          <table:table-cell table:style-name="ce204" table:formula="of:=AVERAGE([.B36:.F36])" office:value-type="float" office:value="18.1724276347106" calcext:value-type="float">
            <text:p>18.2</text:p>
          </table:table-cell>
          <table:table-cell table:style-name="ce206" table:formula="of:=[.G36]*[.G$8]" office:value-type="float" office:value="426.319936823579" calcext:value-type="float">
            <text:p>426</text:p>
          </table:table-cell>
          <table:table-cell table:style-name="ce212" table:formula="of:=STDEVP([.B36:.F36])/AVERAGE([.B36:.F36])" office:value-type="percentage" office:value="0.184434163811146" calcext:value-type="percentage">
            <text:p>18.4%</text:p>
          </table:table-cell>
          <table:table-cell table:style-name="ce212" table:formula="of:=IF([.H36]&gt;[.$A$43]; [.$C$43]; IF([.H36]&gt;[.$A$44]; [.$C$44]; IF([.H36]&gt;[.$A$45];[.$C$45];IF([.H36]&gt;[.$A$46];[.$C$46]; IF([.H36]&gt;[.$A$47];[.$C$47];IF([.H36]&gt;[.$A$48];[.$C$48];[.$C$49]))))))/100" office:value-type="percentage" office:value="0.193" calcext:value-type="percentage">
            <text:p>19.3%</text:p>
          </table:table-cell>
          <table:table-cell table:style-name="ce213" table:formula="of:=(MAX([.B36:.F36])-MIN([.B36:.F36]))/[.G36]" office:value-type="percentage" office:value="0.526045551390985" calcext:value-type="percentage">
            <text:p>52.6%</text:p>
          </table:table-cell>
          <table:table-cell table:formula="of:=COUNTA([.B36:.F36])" office:value-type="float" office:value="5" calcext:value-type="float">
            <text:p>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style-name="ce20" table:formula="of:=['file:///D:/mp/projects/PR0118%20-%20ISO%2011171%20Calibrations/results/2025-05-19-LPA3-NAVAIR-11171-00009/11171-00009-LIVE.ods'#$'Clause 6 Sizing Calibration'.$E$46]" office:value-type="float" office:value="6000.00000000001" calcext:value-type="float">
            <text:p>6000</text:p>
          </table:table-cell>
          <table:table-cell table:number-columns-repeated="33"/>
        </table:table-row>
        <table:table-row table:style-name="ro2">
          <table:table-cell table:style-name="ce16" office:value-type="string" calcext:value-type="string">
            <text:p>count_50</text:p>
          </table:table-cell>
          <table:table-cell table:style-name="ce198" table:formula="of:=[.B81]/[.B$8]" office:value-type="float" office:value="14.3012061950144" calcext:value-type="float">
            <text:p>14</text:p>
          </table:table-cell>
          <table:table-cell table:style-name="ce198" table:formula="of:=[.C81]/[.C$8]" office:value-type="float" office:value="10.3506745154353" calcext:value-type="float">
            <text:p>10</text:p>
          </table:table-cell>
          <table:table-cell table:style-name="ce198" table:formula="of:=[.D81]/[.D$8]" office:value-type="float" office:value="9.95650490241354" calcext:value-type="float">
            <text:p>10</text:p>
          </table:table-cell>
          <table:table-cell table:style-name="ce198" table:formula="of:=[.E81]/[.E$8]" office:value-type="float" office:value="8.2036490672451" calcext:value-type="float">
            <text:p>8</text:p>
          </table:table-cell>
          <table:table-cell table:style-name="ce198" table:formula="of:=[.F81]/[.F$8]" office:value-type="float" office:value="7.1188370500293" calcext:value-type="float">
            <text:p>7</text:p>
          </table:table-cell>
          <table:table-cell table:style-name="ce204" table:formula="of:=AVERAGE([.B37:.F37])" office:value-type="float" office:value="9.98617434602752" calcext:value-type="float">
            <text:p>10.0</text:p>
          </table:table-cell>
          <table:table-cell table:style-name="ce206" table:formula="of:=[.G37]*[.G$8]" office:value-type="float" office:value="234.272784125768" calcext:value-type="float">
            <text:p>234</text:p>
          </table:table-cell>
          <table:table-cell table:style-name="ce212" table:formula="of:=STDEVP([.B37:.F37])/AVERAGE([.B37:.F37])" office:value-type="percentage" office:value="0.245909772944097" calcext:value-type="percentage">
            <text:p>24.6%</text:p>
          </table:table-cell>
          <table:table-cell table:style-name="ce212" table:formula="of:=IF([.H37]&gt;[.$A$43]; [.$C$43]; IF([.H37]&gt;[.$A$44]; [.$C$44]; IF([.H37]&gt;[.$A$45];[.$C$45];IF([.H37]&gt;[.$A$46];[.$C$46]; IF([.H37]&gt;[.$A$47];[.$C$47];IF([.H37]&gt;[.$A$48];[.$C$48];[.$C$49]))))))/100" office:value-type="percentage" office:value="0.193" calcext:value-type="percentage">
            <text:p>19.3%</text:p>
          </table:table-cell>
          <table:table-cell table:style-name="ce213" table:formula="of:=(MAX([.B37:.F37])-MIN([.B37:.F37]))/[.G37]" office:value-type="percentage" office:value="0.719231298804853" calcext:value-type="percentage">
            <text:p>71.9%</text:p>
          </table:table-cell>
          <table:table-cell table:formula="of:=COUNTA([.B37:.F37])" office:value-type="float" office:value="5" calcext:value-type="float">
            <text:p>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34"/>
        </table:table-row>
        <table:table-row table:style-name="ro2">
          <table:table-cell table:style-name="ce16" office:value-type="string" calcext:value-type="string">
            <text:p>count_70</text:p>
          </table:table-cell>
          <table:table-cell table:style-name="ce198" table:formula="of:=[.B82]/[.B$8]" office:value-type="float" office:value="7.37405944430429" calcext:value-type="float">
            <text:p>7</text:p>
          </table:table-cell>
          <table:table-cell table:style-name="ce198" table:formula="of:=[.C82]/[.C$8]" office:value-type="float" office:value="4.43600336375798" calcext:value-type="float">
            <text:p>4</text:p>
          </table:table-cell>
          <table:table-cell table:style-name="ce198" table:formula="of:=[.D82]/[.D$8]" office:value-type="float" office:value="4.44865112661031" calcext:value-type="float">
            <text:p>4</text:p>
          </table:table-cell>
          <table:table-cell table:style-name="ce198" table:formula="of:=[.E82]/[.E$8]" office:value-type="float" office:value="2.10349976083208" calcext:value-type="float">
            <text:p>2</text:p>
          </table:table-cell>
          <table:table-cell table:style-name="ce198" table:formula="of:=[.F82]/[.F$8]" office:value-type="float" office:value="3.35004096471967" calcext:value-type="float">
            <text:p>3</text:p>
          </table:table-cell>
          <table:table-cell table:style-name="ce204" table:formula="of:=AVERAGE([.B38:.F38])" office:value-type="float" office:value="4.34245093204486" calcext:value-type="float">
            <text:p>4.3</text:p>
          </table:table-cell>
          <table:table-cell table:style-name="ce206" table:formula="of:=[.G38]*[.G$8]" office:value-type="float" office:value="101.872652582355" calcext:value-type="float">
            <text:p>102</text:p>
          </table:table-cell>
          <table:table-cell table:style-name="ce212" table:formula="of:=STDEVP([.B38:.F38])/AVERAGE([.B38:.F38])" office:value-type="percentage" office:value="0.401626819953628" calcext:value-type="percentage">
            <text:p>40.2%</text:p>
          </table:table-cell>
          <table:table-cell table:style-name="ce212" table:formula="of:=IF([.H38]&gt;[.$A$43]; [.$C$43]; IF([.H38]&gt;[.$A$44]; [.$C$44]; IF([.H38]&gt;[.$A$45];[.$C$45];IF([.H38]&gt;[.$A$46];[.$C$46]; IF([.H38]&gt;[.$A$47];[.$C$47];IF([.H38]&gt;[.$A$48];[.$C$48];[.$C$49]))))))/100" office:value-type="percentage" office:value="0.275" calcext:value-type="percentage">
            <text:p>27.5%</text:p>
          </table:table-cell>
          <table:table-cell table:style-name="ce213" table:formula="of:=(MAX([.B38:.F38])-MIN([.B38:.F38]))/[.G38]" office:value-type="percentage" office:value="1.21372924322033" calcext:value-type="percentage">
            <text:p>121.4%</text:p>
          </table:table-cell>
          <table:table-cell table:formula="of:=COUNTA([.B38:.F38])"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4"/>
        </table:table-row>
        <table:table-row table:style-name="ro2">
          <table:table-cell table:style-name="Default"/>
          <table:table-cell table:number-columns-repeated="6"/>
          <table:table-cell table:style-name="ce208"/>
          <table:table-cell table:number-columns-repeated="2"/>
          <table:table-cell table:style-name="ce214"/>
          <table:table-cell table:number-columns-repeated="38"/>
        </table:table-row>
        <table:table-row table:style-name="ro2">
          <table:table-cell table:style-name="Default" office:value-type="string" calcext:value-type="string">
            <text:p>Table C.2</text:p>
          </table:table-cell>
          <table:table-cell table:number-columns-repeated="6"/>
          <table:table-cell table:style-name="ce208"/>
          <table:table-cell table:number-columns-repeated="2"/>
          <table:table-cell table:style-name="ce214"/>
          <table:table-cell table:number-columns-repeated="38"/>
        </table:table-row>
        <table:table-row table:style-name="ro2">
          <table:table-cell table:style-name="ce115"/>
          <table:table-cell table:style-name="ce199" office:value-type="string" calcext:value-type="string">
            <text:p>Mean counted X</text:p>
          </table:table-cell>
          <table:table-cell table:style-name="ce115"/>
          <table:table-cell table:style-name="ce201" office:value-type="string" calcext:value-type="string">
            <text:p>C<text:span text:style-name="T6">V_MAX</text:span></text:p>
          </table:table-cell>
          <table:table-cell table:style-name="ce117" table:number-columns-repeated="3"/>
          <table:table-cell table:style-name="ce118"/>
          <table:table-cell table:number-columns-repeated="41"/>
        </table:table-row>
        <table:table-row table:style-name="ro2">
          <table:table-cell table:style-name="ce193" office:value-type="string" calcext:value-type="string">
            <text:p>X &gt;=</text:p>
          </table:table-cell>
          <table:table-cell table:style-name="ce200" office:value-type="string" calcext:value-type="string">
            <text:p>X &lt;</text:p>
          </table:table-cell>
          <table:table-cell table:style-name="ce193" office:value-type="string" calcext:value-type="string">
            <text:p>D<text:span text:style-name="T6">QMAX / SAMPLE</text:span></text:p>
          </table:table-cell>
          <table:table-cell table:style-name="ce193" office:value-type="string" calcext:value-type="string">
            <text:p>N=3</text:p>
          </table:table-cell>
          <table:table-cell table:style-name="ce200" office:value-type="string" calcext:value-type="string">
            <text:p>N=6</text:p>
          </table:table-cell>
          <table:table-cell table:style-name="ce200" office:value-type="string" calcext:value-type="string">
            <text:p>N=10</text:p>
          </table:table-cell>
          <table:table-cell table:style-name="ce200" office:value-type="string" calcext:value-type="string">
            <text:p>N=20</text:p>
          </table:table-cell>
          <table:table-cell table:style-name="ce210" office:value-type="string" calcext:value-type="string">
            <text:p>N=40</text:p>
          </table:table-cell>
          <table:table-cell table:number-columns-repeated="41"/>
        </table:table-row>
        <table:table-row table:style-name="ro2">
          <table:table-cell table:style-name="ce164" office:value-type="float" office:value="10000" calcext:value-type="float">
            <text:p>10000</text:p>
          </table:table-cell>
          <table:table-cell/>
          <table:table-cell table:style-name="ce164" office:value-type="float" office:value="11" calcext:value-type="float">
            <text:p>11</text:p>
          </table:table-cell>
          <table:table-cell table:style-name="ce164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173" office:value-type="float" office:value="1.8" calcext:value-type="float">
            <text:p>1.8</text:p>
          </table:table-cell>
          <table:table-cell table:number-columns-repeated="41"/>
        </table:table-row>
        <table:table-row table:style-name="ro2">
          <table:table-cell table:style-name="ce164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164" office:value-type="float" office:value="11.3" calcext:value-type="float">
            <text:p>11.3</text:p>
          </table:table-cell>
          <table:table-cell table:style-name="ce164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173" office:value-type="float" office:value="1.9" calcext:value-type="float">
            <text:p>1.9</text:p>
          </table:table-cell>
          <table:table-cell table:number-columns-repeated="41"/>
        </table:table-row>
        <table:table-row table:style-name="ro2">
          <table:table-cell table:style-name="ce164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164" office:value-type="float" office:value="11.9" calcext:value-type="float">
            <text:p>11.9</text:p>
          </table:table-cell>
          <table:table-cell table:style-name="ce164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173" office:value-type="float" office:value="2.1" calcext:value-type="float">
            <text:p>2.1</text:p>
          </table:table-cell>
          <table:table-cell table:number-columns-repeated="41"/>
        </table:table-row>
        <table:table-row table:style-name="ro2">
          <table:table-cell table:style-name="ce164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164" office:value-type="float" office:value="13.4" calcext:value-type="float">
            <text:p>13.4</text:p>
          </table:table-cell>
          <table:table-cell table:style-name="ce164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173" office:value-type="float" office:value="2.4" calcext:value-type="float">
            <text:p>2.4</text:p>
          </table:table-cell>
          <table:table-cell table:number-columns-repeated="41"/>
        </table:table-row>
        <table:table-row table:style-name="ro2">
          <table:table-cell table:style-name="ce164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164" office:value-type="float" office:value="15.6" calcext:value-type="float">
            <text:p>15.6</text:p>
          </table:table-cell>
          <table:table-cell table:style-name="ce164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173" office:value-type="float" office:value="2.9" calcext:value-type="float">
            <text:p>2.9</text:p>
          </table:table-cell>
          <table:table-cell table:number-columns-repeated="41"/>
        </table:table-row>
        <table:table-row table:style-name="ro2">
          <table:table-cell table:style-name="ce164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164" office:value-type="float" office:value="19.3" calcext:value-type="float">
            <text:p>19.3</text:p>
          </table:table-cell>
          <table:table-cell table:style-name="ce164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173" office:value-type="float" office:value="4.1" calcext:value-type="float">
            <text:p>4.1</text:p>
          </table:table-cell>
          <table:table-cell table:number-columns-repeated="41"/>
        </table:table-row>
        <table:table-row table:style-name="ro2">
          <table:table-cell table:style-name="ce165" office:value-type="float" office:value="100" calcext:value-type="float">
            <text:p>100</text:p>
          </table:table-cell>
          <table:table-cell table:style-name="ce91" office:value-type="float" office:value="200" calcext:value-type="float">
            <text:p>200</text:p>
          </table:table-cell>
          <table:table-cell table:style-name="ce165" office:value-type="float" office:value="27.5" calcext:value-type="float">
            <text:p>27.5</text:p>
          </table:table-cell>
          <table:table-cell table:style-name="ce165" office:value-type="float" office:value="10" calcext:value-type="float">
            <text:p>10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7" calcext:value-type="float">
            <text:p>7</text:p>
          </table:table-cell>
          <table:table-cell table:style-name="ce91" office:value-type="float" office:value="6.1" calcext:value-type="float">
            <text:p>6.1</text:p>
          </table:table-cell>
          <table:table-cell table:style-name="ce211" office:value-type="float" office:value="5.5" calcext:value-type="float">
            <text:p>5.5</text:p>
          </table:table-cell>
          <table:table-cell table:number-columns-repeated="41"/>
        </table:table-row>
        <table:table-row table:style-name="ro2">
          <table:table-cell table:style-name="Default"/>
          <table:table-cell table:number-columns-repeated="48"/>
        </table:table-row>
        <table:table-row table:style-name="ro2">
          <table:table-cell table:style-name="Default"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number-columns-repeated="33"/>
        </table:table-row>
        <table:table-row table:style-name="ro2">
          <table:table-cell table:style-name="ce31" office:value-type="string" calcext:value-type="string">
            <text:p>NAME\mL</text:p>
          </table:table-cell>
          <table:table-cell office:value-type="float" office:value="4.475147" calcext:value-type="float">
            <text:p>4.475147</text:p>
          </table:table-cell>
          <table:table-cell office:value-type="float" office:value="4.733991" calcext:value-type="float">
            <text:p>4.733991</text:p>
          </table:table-cell>
          <table:table-cell office:value-type="float" office:value="4.720532" calcext:value-type="float">
            <text:p>4.720532</text:p>
          </table:table-cell>
          <table:table-cell office:value-type="float" office:value="4.753982" calcext:value-type="float">
            <text:p>4.753982</text:p>
          </table:table-cell>
          <table:table-cell office:value-type="float" office:value="4.776061" calcext:value-type="float">
            <text:p>4.776061</text:p>
          </table:table-cell>
          <table:table-cell office:value-type="float" office:value="4.756581" calcext:value-type="float">
            <text:p>4.756581</text:p>
          </table:table-cell>
          <table:table-cell office:value-type="float" office:value="5.071365" calcext:value-type="float">
            <text:p>5.071365</text:p>
          </table:table-cell>
          <table:table-cell office:value-type="float" office:value="5.012042" calcext:value-type="float">
            <text:p>5.012042</text:p>
          </table:table-cell>
          <table:table-cell office:value-type="float" office:value="5.064873" calcext:value-type="float">
            <text:p>5.064873</text:p>
          </table:table-cell>
          <table:table-cell office:value-type="float" office:value="5.038718" calcext:value-type="float">
            <text:p>5.038718</text:p>
          </table:table-cell>
          <table:table-cell office:value-type="float" office:value="4.489153" calcext:value-type="float">
            <text:p>4.489153</text:p>
          </table:table-cell>
          <table:table-cell office:value-type="float" office:value="4.796755" calcext:value-type="float">
            <text:p>4.796755</text:p>
          </table:table-cell>
          <table:table-cell office:value-type="float" office:value="4.784308" calcext:value-type="float">
            <text:p>4.784308</text:p>
          </table:table-cell>
          <table:table-cell office:value-type="float" office:value="4.787062" calcext:value-type="float">
            <text:p>4.787062</text:p>
          </table:table-cell>
          <table:table-cell office:value-type="float" office:value="4.805943" calcext:value-type="float">
            <text:p>4.805943</text:p>
          </table:table-cell>
          <table:table-cell table:number-columns-repeated="3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4899" calcext:value-type="float">
            <text:p>64899</text:p>
          </table:table-cell>
          <table:table-cell office:value-type="float" office:value="68924" calcext:value-type="float">
            <text:p>68924</text:p>
          </table:table-cell>
          <table:table-cell office:value-type="float" office:value="68636" calcext:value-type="float">
            <text:p>68636</text:p>
          </table:table-cell>
          <table:table-cell office:value-type="float" office:value="68505" calcext:value-type="float">
            <text:p>68505</text:p>
          </table:table-cell>
          <table:table-cell office:value-type="float" office:value="68193" calcext:value-type="float">
            <text:p>68193</text:p>
          </table:table-cell>
          <table:table-cell office:value-type="float" office:value="51992" calcext:value-type="float">
            <text:p>51992</text:p>
          </table:table-cell>
          <table:table-cell office:value-type="float" office:value="53940" calcext:value-type="float">
            <text:p>53940</text:p>
          </table:table-cell>
          <table:table-cell office:value-type="float" office:value="53282" calcext:value-type="float">
            <text:p>53282</text:p>
          </table:table-cell>
          <table:table-cell office:value-type="float" office:value="53242" calcext:value-type="float">
            <text:p>53242</text:p>
          </table:table-cell>
          <table:table-cell office:value-type="float" office:value="53515" calcext:value-type="float">
            <text:p>53515</text:p>
          </table:table-cell>
          <table:table-cell office:value-type="float" office:value="48799" calcext:value-type="float">
            <text:p>48799</text:p>
          </table:table-cell>
          <table:table-cell office:value-type="float" office:value="51430" calcext:value-type="float">
            <text:p>51430</text:p>
          </table:table-cell>
          <table:table-cell office:value-type="float" office:value="51700" calcext:value-type="float">
            <text:p>51700</text:p>
          </table:table-cell>
          <table:table-cell office:value-type="float" office:value="51740" calcext:value-type="float">
            <text:p>51740</text:p>
          </table:table-cell>
          <table:table-cell office:value-type="float" office:value="51082" calcext:value-type="float">
            <text:p>51082</text:p>
          </table:table-cell>
          <table:table-cell table:number-columns-repeated="3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6257" calcext:value-type="float">
            <text:p>56257</text:p>
          </table:table-cell>
          <table:table-cell office:value-type="float" office:value="59891" calcext:value-type="float">
            <text:p>59891</text:p>
          </table:table-cell>
          <table:table-cell office:value-type="float" office:value="59326" calcext:value-type="float">
            <text:p>59326</text:p>
          </table:table-cell>
          <table:table-cell office:value-type="float" office:value="59295" calcext:value-type="float">
            <text:p>59295</text:p>
          </table:table-cell>
          <table:table-cell office:value-type="float" office:value="59066" calcext:value-type="float">
            <text:p>59066</text:p>
          </table:table-cell>
          <table:table-cell office:value-type="float" office:value="44162" calcext:value-type="float">
            <text:p>44162</text:p>
          </table:table-cell>
          <table:table-cell office:value-type="float" office:value="45794" calcext:value-type="float">
            <text:p>45794</text:p>
          </table:table-cell>
          <table:table-cell office:value-type="float" office:value="45123" calcext:value-type="float">
            <text:p>45123</text:p>
          </table:table-cell>
          <table:table-cell office:value-type="float" office:value="45104" calcext:value-type="float">
            <text:p>45104</text:p>
          </table:table-cell>
          <table:table-cell office:value-type="float" office:value="45370" calcext:value-type="float">
            <text:p>45370</text:p>
          </table:table-cell>
          <table:table-cell office:value-type="float" office:value="41290" calcext:value-type="float">
            <text:p>41290</text:p>
          </table:table-cell>
          <table:table-cell office:value-type="float" office:value="43593" calcext:value-type="float">
            <text:p>43593</text:p>
          </table:table-cell>
          <table:table-cell office:value-type="float" office:value="43713" calcext:value-type="float">
            <text:p>43713</text:p>
          </table:table-cell>
          <table:table-cell office:value-type="float" office:value="43834" calcext:value-type="float">
            <text:p>43834</text:p>
          </table:table-cell>
          <table:table-cell office:value-type="float" office:value="43237" calcext:value-type="float">
            <text:p>43237</text:p>
          </table:table-cell>
          <table:table-cell table:number-columns-repeated="3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8583" calcext:value-type="float">
            <text:p>48583</text:p>
          </table:table-cell>
          <table:table-cell office:value-type="float" office:value="51654" calcext:value-type="float">
            <text:p>51654</text:p>
          </table:table-cell>
          <table:table-cell office:value-type="float" office:value="51300" calcext:value-type="float">
            <text:p>51300</text:p>
          </table:table-cell>
          <table:table-cell office:value-type="float" office:value="51080" calcext:value-type="float">
            <text:p>51080</text:p>
          </table:table-cell>
          <table:table-cell office:value-type="float" office:value="50920" calcext:value-type="float">
            <text:p>50920</text:p>
          </table:table-cell>
          <table:table-cell office:value-type="float" office:value="37475" calcext:value-type="float">
            <text:p>37475</text:p>
          </table:table-cell>
          <table:table-cell office:value-type="float" office:value="38947" calcext:value-type="float">
            <text:p>38947</text:p>
          </table:table-cell>
          <table:table-cell office:value-type="float" office:value="38027" calcext:value-type="float">
            <text:p>38027</text:p>
          </table:table-cell>
          <table:table-cell office:value-type="float" office:value="38178" calcext:value-type="float">
            <text:p>38178</text:p>
          </table:table-cell>
          <table:table-cell office:value-type="float" office:value="38360" calcext:value-type="float">
            <text:p>38360</text:p>
          </table:table-cell>
          <table:table-cell office:value-type="float" office:value="34958" calcext:value-type="float">
            <text:p>34958</text:p>
          </table:table-cell>
          <table:table-cell office:value-type="float" office:value="36844" calcext:value-type="float">
            <text:p>36844</text:p>
          </table:table-cell>
          <table:table-cell office:value-type="float" office:value="36893" calcext:value-type="float">
            <text:p>36893</text:p>
          </table:table-cell>
          <table:table-cell office:value-type="float" office:value="36888" calcext:value-type="float">
            <text:p>36888</text:p>
          </table:table-cell>
          <table:table-cell office:value-type="float" office:value="36437" calcext:value-type="float">
            <text:p>36437</text:p>
          </table:table-cell>
          <table:table-cell table:number-columns-repeated="3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2357" calcext:value-type="float">
            <text:p>42357</text:p>
          </table:table-cell>
          <table:table-cell office:value-type="float" office:value="44994" calcext:value-type="float">
            <text:p>44994</text:p>
          </table:table-cell>
          <table:table-cell office:value-type="float" office:value="44741" calcext:value-type="float">
            <text:p>44741</text:p>
          </table:table-cell>
          <table:table-cell office:value-type="float" office:value="44589" calcext:value-type="float">
            <text:p>44589</text:p>
          </table:table-cell>
          <table:table-cell office:value-type="float" office:value="44350" calcext:value-type="float">
            <text:p>44350</text:p>
          </table:table-cell>
          <table:table-cell office:value-type="float" office:value="31043" calcext:value-type="float">
            <text:p>31043</text:p>
          </table:table-cell>
          <table:table-cell office:value-type="float" office:value="32225" calcext:value-type="float">
            <text:p>32225</text:p>
          </table:table-cell>
          <table:table-cell office:value-type="float" office:value="31585" calcext:value-type="float">
            <text:p>31585</text:p>
          </table:table-cell>
          <table:table-cell office:value-type="float" office:value="31520" calcext:value-type="float">
            <text:p>31520</text:p>
          </table:table-cell>
          <table:table-cell office:value-type="float" office:value="31829" calcext:value-type="float">
            <text:p>31829</text:p>
          </table:table-cell>
          <table:table-cell office:value-type="float" office:value="28935" calcext:value-type="float">
            <text:p>28935</text:p>
          </table:table-cell>
          <table:table-cell office:value-type="float" office:value="30427" calcext:value-type="float">
            <text:p>30427</text:p>
          </table:table-cell>
          <table:table-cell office:value-type="float" office:value="30431" calcext:value-type="float">
            <text:p>30431</text:p>
          </table:table-cell>
          <table:table-cell office:value-type="float" office:value="30572" calcext:value-type="float">
            <text:p>30572</text:p>
          </table:table-cell>
          <table:table-cell office:value-type="float" office:value="30152" calcext:value-type="float">
            <text:p>30152</text:p>
          </table:table-cell>
          <table:table-cell table:number-columns-repeated="3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6098" calcext:value-type="float">
            <text:p>36098</text:p>
          </table:table-cell>
          <table:table-cell office:value-type="float" office:value="38325" calcext:value-type="float">
            <text:p>38325</text:p>
          </table:table-cell>
          <table:table-cell office:value-type="float" office:value="38238" calcext:value-type="float">
            <text:p>38238</text:p>
          </table:table-cell>
          <table:table-cell office:value-type="float" office:value="38152" calcext:value-type="float">
            <text:p>38152</text:p>
          </table:table-cell>
          <table:table-cell office:value-type="float" office:value="37745" calcext:value-type="float">
            <text:p>37745</text:p>
          </table:table-cell>
          <table:table-cell office:value-type="float" office:value="25259" calcext:value-type="float">
            <text:p>25259</text:p>
          </table:table-cell>
          <table:table-cell office:value-type="float" office:value="26108" calcext:value-type="float">
            <text:p>26108</text:p>
          </table:table-cell>
          <table:table-cell office:value-type="float" office:value="25521" calcext:value-type="float">
            <text:p>25521</text:p>
          </table:table-cell>
          <table:table-cell office:value-type="float" office:value="25513" calcext:value-type="float">
            <text:p>25513</text:p>
          </table:table-cell>
          <table:table-cell office:value-type="float" office:value="25681" calcext:value-type="float">
            <text:p>25681</text:p>
          </table:table-cell>
          <table:table-cell office:value-type="float" office:value="23457" calcext:value-type="float">
            <text:p>23457</text:p>
          </table:table-cell>
          <table:table-cell office:value-type="float" office:value="24711" calcext:value-type="float">
            <text:p>24711</text:p>
          </table:table-cell>
          <table:table-cell office:value-type="float" office:value="24555" calcext:value-type="float">
            <text:p>24555</text:p>
          </table:table-cell>
          <table:table-cell office:value-type="float" office:value="24775" calcext:value-type="float">
            <text:p>24775</text:p>
          </table:table-cell>
          <table:table-cell office:value-type="float" office:value="24275" calcext:value-type="float">
            <text:p>24275</text:p>
          </table:table-cell>
          <table:table-cell table:number-columns-repeated="3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0748" calcext:value-type="float">
            <text:p>30748</text:p>
          </table:table-cell>
          <table:table-cell office:value-type="float" office:value="32797" calcext:value-type="float">
            <text:p>32797</text:p>
          </table:table-cell>
          <table:table-cell office:value-type="float" office:value="32878" calcext:value-type="float">
            <text:p>32878</text:p>
          </table:table-cell>
          <table:table-cell office:value-type="float" office:value="32731" calcext:value-type="float">
            <text:p>32731</text:p>
          </table:table-cell>
          <table:table-cell office:value-type="float" office:value="32349" calcext:value-type="float">
            <text:p>32349</text:p>
          </table:table-cell>
          <table:table-cell office:value-type="float" office:value="20297" calcext:value-type="float">
            <text:p>20297</text:p>
          </table:table-cell>
          <table:table-cell office:value-type="float" office:value="20964" calcext:value-type="float">
            <text:p>20964</text:p>
          </table:table-cell>
          <table:table-cell office:value-type="float" office:value="20399" calcext:value-type="float">
            <text:p>20399</text:p>
          </table:table-cell>
          <table:table-cell office:value-type="float" office:value="20516" calcext:value-type="float">
            <text:p>20516</text:p>
          </table:table-cell>
          <table:table-cell office:value-type="float" office:value="20586" calcext:value-type="float">
            <text:p>20586</text:p>
          </table:table-cell>
          <table:table-cell office:value-type="float" office:value="18805" calcext:value-type="float">
            <text:p>18805</text:p>
          </table:table-cell>
          <table:table-cell office:value-type="float" office:value="19755" calcext:value-type="float">
            <text:p>19755</text:p>
          </table:table-cell>
          <table:table-cell office:value-type="float" office:value="19605" calcext:value-type="float">
            <text:p>19605</text:p>
          </table:table-cell>
          <table:table-cell office:value-type="float" office:value="19787" calcext:value-type="float">
            <text:p>19787</text:p>
          </table:table-cell>
          <table:table-cell office:value-type="float" office:value="19480" calcext:value-type="float">
            <text:p>19480</text:p>
          </table:table-cell>
          <table:table-cell table:number-columns-repeated="3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6004" calcext:value-type="float">
            <text:p>26004</text:p>
          </table:table-cell>
          <table:table-cell office:value-type="float" office:value="27802" calcext:value-type="float">
            <text:p>27802</text:p>
          </table:table-cell>
          <table:table-cell office:value-type="float" office:value="27813" calcext:value-type="float">
            <text:p>27813</text:p>
          </table:table-cell>
          <table:table-cell office:value-type="float" office:value="27635" calcext:value-type="float">
            <text:p>27635</text:p>
          </table:table-cell>
          <table:table-cell office:value-type="float" office:value="27427" calcext:value-type="float">
            <text:p>27427</text:p>
          </table:table-cell>
          <table:table-cell office:value-type="float" office:value="16224" calcext:value-type="float">
            <text:p>16224</text:p>
          </table:table-cell>
          <table:table-cell office:value-type="float" office:value="16855" calcext:value-type="float">
            <text:p>16855</text:p>
          </table:table-cell>
          <table:table-cell office:value-type="float" office:value="16422" calcext:value-type="float">
            <text:p>16422</text:p>
          </table:table-cell>
          <table:table-cell office:value-type="float" office:value="16577" calcext:value-type="float">
            <text:p>16577</text:p>
          </table:table-cell>
          <table:table-cell office:value-type="float" office:value="16497" calcext:value-type="float">
            <text:p>16497</text:p>
          </table:table-cell>
          <table:table-cell office:value-type="float" office:value="15210" calcext:value-type="float">
            <text:p>15210</text:p>
          </table:table-cell>
          <table:table-cell office:value-type="float" office:value="15912" calcext:value-type="float">
            <text:p>15912</text:p>
          </table:table-cell>
          <table:table-cell office:value-type="float" office:value="15753" calcext:value-type="float">
            <text:p>15753</text:p>
          </table:table-cell>
          <table:table-cell office:value-type="float" office:value="15881" calcext:value-type="float">
            <text:p>15881</text:p>
          </table:table-cell>
          <table:table-cell office:value-type="float" office:value="15548" calcext:value-type="float">
            <text:p>15548</text:p>
          </table:table-cell>
          <table:table-cell table:number-columns-repeated="3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1787" calcext:value-type="float">
            <text:p>21787</text:p>
          </table:table-cell>
          <table:table-cell office:value-type="float" office:value="23373" calcext:value-type="float">
            <text:p>23373</text:p>
          </table:table-cell>
          <table:table-cell office:value-type="float" office:value="23371" calcext:value-type="float">
            <text:p>23371</text:p>
          </table:table-cell>
          <table:table-cell office:value-type="float" office:value="23172" calcext:value-type="float">
            <text:p>23172</text:p>
          </table:table-cell>
          <table:table-cell office:value-type="float" office:value="22930" calcext:value-type="float">
            <text:p>22930</text:p>
          </table:table-cell>
          <table:table-cell office:value-type="float" office:value="12946" calcext:value-type="float">
            <text:p>12946</text:p>
          </table:table-cell>
          <table:table-cell office:value-type="float" office:value="13488" calcext:value-type="float">
            <text:p>13488</text:p>
          </table:table-cell>
          <table:table-cell office:value-type="float" office:value="13079" calcext:value-type="float">
            <text:p>13079</text:p>
          </table:table-cell>
          <table:table-cell office:value-type="float" office:value="13247" calcext:value-type="float">
            <text:p>13247</text:p>
          </table:table-cell>
          <table:table-cell office:value-type="float" office:value="13212" calcext:value-type="float">
            <text:p>13212</text:p>
          </table:table-cell>
          <table:table-cell office:value-type="float" office:value="12182" calcext:value-type="float">
            <text:p>12182</text:p>
          </table:table-cell>
          <table:table-cell office:value-type="float" office:value="12725" calcext:value-type="float">
            <text:p>12725</text:p>
          </table:table-cell>
          <table:table-cell office:value-type="float" office:value="12592" calcext:value-type="float">
            <text:p>12592</text:p>
          </table:table-cell>
          <table:table-cell office:value-type="float" office:value="12734" calcext:value-type="float">
            <text:p>12734</text:p>
          </table:table-cell>
          <table:table-cell office:value-type="float" office:value="12308" calcext:value-type="float">
            <text:p>12308</text:p>
          </table:table-cell>
          <table:table-cell table:number-columns-repeated="3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7875" calcext:value-type="float">
            <text:p>17875</text:p>
          </table:table-cell>
          <table:table-cell office:value-type="float" office:value="19353" calcext:value-type="float">
            <text:p>19353</text:p>
          </table:table-cell>
          <table:table-cell office:value-type="float" office:value="19274" calcext:value-type="float">
            <text:p>19274</text:p>
          </table:table-cell>
          <table:table-cell office:value-type="float" office:value="19142" calcext:value-type="float">
            <text:p>19142</text:p>
          </table:table-cell>
          <table:table-cell office:value-type="float" office:value="19006" calcext:value-type="float">
            <text:p>19006</text:p>
          </table:table-cell>
          <table:table-cell office:value-type="float" office:value="10520" calcext:value-type="float">
            <text:p>10520</text:p>
          </table:table-cell>
          <table:table-cell office:value-type="float" office:value="10955" calcext:value-type="float">
            <text:p>10955</text:p>
          </table:table-cell>
          <table:table-cell office:value-type="float" office:value="10513" calcext:value-type="float">
            <text:p>10513</text:p>
          </table:table-cell>
          <table:table-cell office:value-type="float" office:value="10759" calcext:value-type="float">
            <text:p>10759</text:p>
          </table:table-cell>
          <table:table-cell office:value-type="float" office:value="10718" calcext:value-type="float">
            <text:p>10718</text:p>
          </table:table-cell>
          <table:table-cell office:value-type="float" office:value="9996" calcext:value-type="float">
            <text:p>9996</text:p>
          </table:table-cell>
          <table:table-cell office:value-type="float" office:value="10304" calcext:value-type="float">
            <text:p>10304</text:p>
          </table:table-cell>
          <table:table-cell office:value-type="float" office:value="10245" calcext:value-type="float">
            <text:p>10245</text:p>
          </table:table-cell>
          <table:table-cell office:value-type="float" office:value="10331" calcext:value-type="float">
            <text:p>10331</text:p>
          </table:table-cell>
          <table:table-cell office:value-type="float" office:value="10024" calcext:value-type="float">
            <text:p>10024</text:p>
          </table:table-cell>
          <table:table-cell table:number-columns-repeated="3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4542" calcext:value-type="float">
            <text:p>14542</text:p>
          </table:table-cell>
          <table:table-cell office:value-type="float" office:value="15773" calcext:value-type="float">
            <text:p>15773</text:p>
          </table:table-cell>
          <table:table-cell office:value-type="float" office:value="15774" calcext:value-type="float">
            <text:p>15774</text:p>
          </table:table-cell>
          <table:table-cell office:value-type="float" office:value="15562" calcext:value-type="float">
            <text:p>15562</text:p>
          </table:table-cell>
          <table:table-cell office:value-type="float" office:value="15566" calcext:value-type="float">
            <text:p>15566</text:p>
          </table:table-cell>
          <table:table-cell office:value-type="float" office:value="8652" calcext:value-type="float">
            <text:p>8652</text:p>
          </table:table-cell>
          <table:table-cell office:value-type="float" office:value="8885" calcext:value-type="float">
            <text:p>8885</text:p>
          </table:table-cell>
          <table:table-cell office:value-type="float" office:value="8628" calcext:value-type="float">
            <text:p>8628</text:p>
          </table:table-cell>
          <table:table-cell office:value-type="float" office:value="8836" calcext:value-type="float">
            <text:p>8836</text:p>
          </table:table-cell>
          <table:table-cell office:value-type="float" office:value="8798" calcext:value-type="float">
            <text:p>8798</text:p>
          </table:table-cell>
          <table:table-cell office:value-type="float" office:value="8154" calcext:value-type="float">
            <text:p>8154</text:p>
          </table:table-cell>
          <table:table-cell office:value-type="float" office:value="8488" calcext:value-type="float">
            <text:p>8488</text:p>
          </table:table-cell>
          <table:table-cell office:value-type="float" office:value="8383" calcext:value-type="float">
            <text:p>8383</text:p>
          </table:table-cell>
          <table:table-cell office:value-type="float" office:value="8478" calcext:value-type="float">
            <text:p>8478</text:p>
          </table:table-cell>
          <table:table-cell office:value-type="float" office:value="8259" calcext:value-type="float">
            <text:p>8259</text:p>
          </table:table-cell>
          <table:table-cell table:number-columns-repeated="3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1660" calcext:value-type="float">
            <text:p>11660</text:p>
          </table:table-cell>
          <table:table-cell office:value-type="float" office:value="12639" calcext:value-type="float">
            <text:p>12639</text:p>
          </table:table-cell>
          <table:table-cell office:value-type="float" office:value="12567" calcext:value-type="float">
            <text:p>12567</text:p>
          </table:table-cell>
          <table:table-cell office:value-type="float" office:value="12452" calcext:value-type="float">
            <text:p>12452</text:p>
          </table:table-cell>
          <table:table-cell office:value-type="float" office:value="12403" calcext:value-type="float">
            <text:p>12403</text:p>
          </table:table-cell>
          <table:table-cell office:value-type="float" office:value="7252" calcext:value-type="float">
            <text:p>7252</text:p>
          </table:table-cell>
          <table:table-cell office:value-type="float" office:value="7357" calcext:value-type="float">
            <text:p>7357</text:p>
          </table:table-cell>
          <table:table-cell office:value-type="float" office:value="7090" calcext:value-type="float">
            <text:p>7090</text:p>
          </table:table-cell>
          <table:table-cell office:value-type="float" office:value="7375" calcext:value-type="float">
            <text:p>7375</text:p>
          </table:table-cell>
          <table:table-cell office:value-type="float" office:value="7357" calcext:value-type="float">
            <text:p>7357</text:p>
          </table:table-cell>
          <table:table-cell office:value-type="float" office:value="6800" calcext:value-type="float">
            <text:p>6800</text:p>
          </table:table-cell>
          <table:table-cell office:value-type="float" office:value="7093" calcext:value-type="float">
            <text:p>7093</text:p>
          </table:table-cell>
          <table:table-cell office:value-type="float" office:value="7006" calcext:value-type="float">
            <text:p>7006</text:p>
          </table:table-cell>
          <table:table-cell office:value-type="float" office:value="7050" calcext:value-type="float">
            <text:p>7050</text:p>
          </table:table-cell>
          <table:table-cell office:value-type="float" office:value="6873" calcext:value-type="float">
            <text:p>6873</text:p>
          </table:table-cell>
          <table:table-cell table:number-columns-repeated="3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114" calcext:value-type="float">
            <text:p>9114</text:p>
          </table:table-cell>
          <table:table-cell office:value-type="float" office:value="9941" calcext:value-type="float">
            <text:p>9941</text:p>
          </table:table-cell>
          <table:table-cell office:value-type="float" office:value="9882" calcext:value-type="float">
            <text:p>9882</text:p>
          </table:table-cell>
          <table:table-cell office:value-type="float" office:value="9709" calcext:value-type="float">
            <text:p>9709</text:p>
          </table:table-cell>
          <table:table-cell office:value-type="float" office:value="9701" calcext:value-type="float">
            <text:p>9701</text:p>
          </table:table-cell>
          <table:table-cell office:value-type="float" office:value="6112" calcext:value-type="float">
            <text:p>6112</text:p>
          </table:table-cell>
          <table:table-cell office:value-type="float" office:value="6162" calcext:value-type="float">
            <text:p>6162</text:p>
          </table:table-cell>
          <table:table-cell office:value-type="float" office:value="6017" calcext:value-type="float">
            <text:p>6017</text:p>
          </table:table-cell>
          <table:table-cell office:value-type="float" office:value="6229" calcext:value-type="float">
            <text:p>6229</text:p>
          </table:table-cell>
          <table:table-cell office:value-type="float" office:value="6203" calcext:value-type="float">
            <text:p>6203</text:p>
          </table:table-cell>
          <table:table-cell office:value-type="float" office:value="5768" calcext:value-type="float">
            <text:p>5768</text:p>
          </table:table-cell>
          <table:table-cell office:value-type="float" office:value="5971" calcext:value-type="float">
            <text:p>5971</text:p>
          </table:table-cell>
          <table:table-cell office:value-type="float" office:value="5927" calcext:value-type="float">
            <text:p>5927</text:p>
          </table:table-cell>
          <table:table-cell office:value-type="float" office:value="5962" calcext:value-type="float">
            <text:p>5962</text:p>
          </table:table-cell>
          <table:table-cell office:value-type="float" office:value="5781" calcext:value-type="float">
            <text:p>5781</text:p>
          </table:table-cell>
          <table:table-cell table:number-columns-repeated="3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062" calcext:value-type="float">
            <text:p>7062</text:p>
          </table:table-cell>
          <table:table-cell office:value-type="float" office:value="7694" calcext:value-type="float">
            <text:p>7694</text:p>
          </table:table-cell>
          <table:table-cell office:value-type="float" office:value="7682" calcext:value-type="float">
            <text:p>7682</text:p>
          </table:table-cell>
          <table:table-cell office:value-type="float" office:value="7426" calcext:value-type="float">
            <text:p>7426</text:p>
          </table:table-cell>
          <table:table-cell office:value-type="float" office:value="7485" calcext:value-type="float">
            <text:p>7485</text:p>
          </table:table-cell>
          <table:table-cell office:value-type="float" office:value="5255" calcext:value-type="float">
            <text:p>5255</text:p>
          </table:table-cell>
          <table:table-cell office:value-type="float" office:value="5297" calcext:value-type="float">
            <text:p>5297</text:p>
          </table:table-cell>
          <table:table-cell office:value-type="float" office:value="5110" calcext:value-type="float">
            <text:p>5110</text:p>
          </table:table-cell>
          <table:table-cell office:value-type="float" office:value="5302" calcext:value-type="float">
            <text:p>5302</text:p>
          </table:table-cell>
          <table:table-cell office:value-type="float" office:value="5289" calcext:value-type="float">
            <text:p>5289</text:p>
          </table:table-cell>
          <table:table-cell office:value-type="float" office:value="4988" calcext:value-type="float">
            <text:p>4988</text:p>
          </table:table-cell>
          <table:table-cell office:value-type="float" office:value="5145" calcext:value-type="float">
            <text:p>5145</text:p>
          </table:table-cell>
          <table:table-cell office:value-type="float" office:value="5042" calcext:value-type="float">
            <text:p>5042</text:p>
          </table:table-cell>
          <table:table-cell office:value-type="float" office:value="5076" calcext:value-type="float">
            <text:p>5076</text:p>
          </table:table-cell>
          <table:table-cell office:value-type="float" office:value="4928" calcext:value-type="float">
            <text:p>4928</text:p>
          </table:table-cell>
          <table:table-cell table:number-columns-repeated="3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386" calcext:value-type="float">
            <text:p>5386</text:p>
          </table:table-cell>
          <table:table-cell office:value-type="float" office:value="5910" calcext:value-type="float">
            <text:p>5910</text:p>
          </table:table-cell>
          <table:table-cell office:value-type="float" office:value="5909" calcext:value-type="float">
            <text:p>5909</text:p>
          </table:table-cell>
          <table:table-cell office:value-type="float" office:value="5640" calcext:value-type="float">
            <text:p>5640</text:p>
          </table:table-cell>
          <table:table-cell office:value-type="float" office:value="5698" calcext:value-type="float">
            <text:p>5698</text:p>
          </table:table-cell>
          <table:table-cell office:value-type="float" office:value="4528" calcext:value-type="float">
            <text:p>4528</text:p>
          </table:table-cell>
          <table:table-cell office:value-type="float" office:value="4590" calcext:value-type="float">
            <text:p>4590</text:p>
          </table:table-cell>
          <table:table-cell office:value-type="float" office:value="4442" calcext:value-type="float">
            <text:p>4442</text:p>
          </table:table-cell>
          <table:table-cell office:value-type="float" office:value="4576" calcext:value-type="float">
            <text:p>4576</text:p>
          </table:table-cell>
          <table:table-cell office:value-type="float" office:value="4562" calcext:value-type="float">
            <text:p>4562</text:p>
          </table:table-cell>
          <table:table-cell office:value-type="float" office:value="4285" calcext:value-type="float">
            <text:p>4285</text:p>
          </table:table-cell>
          <table:table-cell office:value-type="float" office:value="4466" calcext:value-type="float">
            <text:p>4466</text:p>
          </table:table-cell>
          <table:table-cell office:value-type="float" office:value="4373" calcext:value-type="float">
            <text:p>4373</text:p>
          </table:table-cell>
          <table:table-cell office:value-type="float" office:value="4357" calcext:value-type="float">
            <text:p>4357</text:p>
          </table:table-cell>
          <table:table-cell office:value-type="float" office:value="4289" calcext:value-type="float">
            <text:p>4289</text:p>
          </table:table-cell>
          <table:table-cell table:number-columns-repeated="3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142" calcext:value-type="float">
            <text:p>4142</text:p>
          </table:table-cell>
          <table:table-cell office:value-type="float" office:value="4444" calcext:value-type="float">
            <text:p>4444</text:p>
          </table:table-cell>
          <table:table-cell office:value-type="float" office:value="4538" calcext:value-type="float">
            <text:p>4538</text:p>
          </table:table-cell>
          <table:table-cell office:value-type="float" office:value="4272" calcext:value-type="float">
            <text:p>4272</text:p>
          </table:table-cell>
          <table:table-cell office:value-type="float" office:value="4234" calcext:value-type="float">
            <text:p>4234</text:p>
          </table:table-cell>
          <table:table-cell office:value-type="float" office:value="3986" calcext:value-type="float">
            <text:p>3986</text:p>
          </table:table-cell>
          <table:table-cell office:value-type="float" office:value="4022" calcext:value-type="float">
            <text:p>4022</text:p>
          </table:table-cell>
          <table:table-cell office:value-type="float" office:value="3948" calcext:value-type="float">
            <text:p>3948</text:p>
          </table:table-cell>
          <table:table-cell office:value-type="float" office:value="4047" calcext:value-type="float">
            <text:p>4047</text:p>
          </table:table-cell>
          <table:table-cell office:value-type="float" office:value="3972" calcext:value-type="float">
            <text:p>3972</text:p>
          </table:table-cell>
          <table:table-cell office:value-type="float" office:value="3770" calcext:value-type="float">
            <text:p>3770</text:p>
          </table:table-cell>
          <table:table-cell office:value-type="float" office:value="3941" calcext:value-type="float">
            <text:p>3941</text:p>
          </table:table-cell>
          <table:table-cell office:value-type="float" office:value="3897" calcext:value-type="float">
            <text:p>3897</text:p>
          </table:table-cell>
          <table:table-cell office:value-type="float" office:value="3806" calcext:value-type="float">
            <text:p>3806</text:p>
          </table:table-cell>
          <table:table-cell office:value-type="float" office:value="3752" calcext:value-type="float">
            <text:p>3752</text:p>
          </table:table-cell>
          <table:table-cell table:number-columns-repeated="3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183" calcext:value-type="float">
            <text:p>3183</text:p>
          </table:table-cell>
          <table:table-cell office:value-type="float" office:value="3376" calcext:value-type="float">
            <text:p>3376</text:p>
          </table:table-cell>
          <table:table-cell office:value-type="float" office:value="3435" calcext:value-type="float">
            <text:p>3435</text:p>
          </table:table-cell>
          <table:table-cell office:value-type="float" office:value="3299" calcext:value-type="float">
            <text:p>3299</text:p>
          </table:table-cell>
          <table:table-cell office:value-type="float" office:value="3199" calcext:value-type="float">
            <text:p>3199</text:p>
          </table:table-cell>
          <table:table-cell office:value-type="float" office:value="3507" calcext:value-type="float">
            <text:p>3507</text:p>
          </table:table-cell>
          <table:table-cell office:value-type="float" office:value="3560" calcext:value-type="float">
            <text:p>3560</text:p>
          </table:table-cell>
          <table:table-cell office:value-type="float" office:value="3513" calcext:value-type="float">
            <text:p>3513</text:p>
          </table:table-cell>
          <table:table-cell office:value-type="float" office:value="3608" calcext:value-type="float">
            <text:p>3608</text:p>
          </table:table-cell>
          <table:table-cell office:value-type="float" office:value="3481" calcext:value-type="float">
            <text:p>3481</text:p>
          </table:table-cell>
          <table:table-cell office:value-type="float" office:value="3320" calcext:value-type="float">
            <text:p>3320</text:p>
          </table:table-cell>
          <table:table-cell office:value-type="float" office:value="3511" calcext:value-type="float">
            <text:p>3511</text:p>
          </table:table-cell>
          <table:table-cell office:value-type="float" office:value="3460" calcext:value-type="float">
            <text:p>3460</text:p>
          </table:table-cell>
          <table:table-cell office:value-type="float" office:value="3351" calcext:value-type="float">
            <text:p>3351</text:p>
          </table:table-cell>
          <table:table-cell office:value-type="float" office:value="3335" calcext:value-type="float">
            <text:p>3335</text:p>
          </table:table-cell>
          <table:table-cell table:number-columns-repeated="3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478" calcext:value-type="float">
            <text:p>2478</text:p>
          </table:table-cell>
          <table:table-cell office:value-type="float" office:value="2570" calcext:value-type="float">
            <text:p>2570</text:p>
          </table:table-cell>
          <table:table-cell office:value-type="float" office:value="2635" calcext:value-type="float">
            <text:p>2635</text:p>
          </table:table-cell>
          <table:table-cell office:value-type="float" office:value="2483" calcext:value-type="float">
            <text:p>2483</text:p>
          </table:table-cell>
          <table:table-cell office:value-type="float" office:value="2430" calcext:value-type="float">
            <text:p>2430</text:p>
          </table:table-cell>
          <table:table-cell office:value-type="float" office:value="3160" calcext:value-type="float">
            <text:p>3160</text:p>
          </table:table-cell>
          <table:table-cell office:value-type="float" office:value="3179" calcext:value-type="float">
            <text:p>3179</text:p>
          </table:table-cell>
          <table:table-cell office:value-type="float" office:value="3159" calcext:value-type="float">
            <text:p>3159</text:p>
          </table:table-cell>
          <table:table-cell office:value-type="float" office:value="3222" calcext:value-type="float">
            <text:p>3222</text:p>
          </table:table-cell>
          <table:table-cell office:value-type="float" office:value="3112" calcext:value-type="float">
            <text:p>3112</text:p>
          </table:table-cell>
          <table:table-cell office:value-type="float" office:value="2954" calcext:value-type="float">
            <text:p>2954</text:p>
          </table:table-cell>
          <table:table-cell office:value-type="float" office:value="3133" calcext:value-type="float">
            <text:p>3133</text:p>
          </table:table-cell>
          <table:table-cell office:value-type="float" office:value="3113" calcext:value-type="float">
            <text:p>3113</text:p>
          </table:table-cell>
          <table:table-cell office:value-type="float" office:value="3003" calcext:value-type="float">
            <text:p>3003</text:p>
          </table:table-cell>
          <table:table-cell office:value-type="float" office:value="2977" calcext:value-type="float">
            <text:p>2977</text:p>
          </table:table-cell>
          <table:table-cell table:number-columns-repeated="3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917" calcext:value-type="float">
            <text:p>1917</text:p>
          </table:table-cell>
          <table:table-cell office:value-type="float" office:value="1944" calcext:value-type="float">
            <text:p>1944</text:p>
          </table:table-cell>
          <table:table-cell office:value-type="float" office:value="2031" calcext:value-type="float">
            <text:p>2031</text:p>
          </table:table-cell>
          <table:table-cell office:value-type="float" office:value="1916" calcext:value-type="float">
            <text:p>1916</text:p>
          </table:table-cell>
          <table:table-cell office:value-type="float" office:value="1828" calcext:value-type="float">
            <text:p>1828</text:p>
          </table:table-cell>
          <table:table-cell office:value-type="float" office:value="2868" calcext:value-type="float">
            <text:p>2868</text:p>
          </table:table-cell>
          <table:table-cell office:value-type="float" office:value="2904" calcext:value-type="float">
            <text:p>2904</text:p>
          </table:table-cell>
          <table:table-cell office:value-type="float" office:value="2876" calcext:value-type="float">
            <text:p>2876</text:p>
          </table:table-cell>
          <table:table-cell office:value-type="float" office:value="2918" calcext:value-type="float">
            <text:p>2918</text:p>
          </table:table-cell>
          <table:table-cell office:value-type="float" office:value="2825" calcext:value-type="float">
            <text:p>2825</text:p>
          </table:table-cell>
          <table:table-cell office:value-type="float" office:value="2697" calcext:value-type="float">
            <text:p>2697</text:p>
          </table:table-cell>
          <table:table-cell office:value-type="float" office:value="2852" calcext:value-type="float">
            <text:p>2852</text:p>
          </table:table-cell>
          <table:table-cell office:value-type="float" office:value="2841" calcext:value-type="float">
            <text:p>2841</text:p>
          </table:table-cell>
          <table:table-cell office:value-type="float" office:value="2723" calcext:value-type="float">
            <text:p>2723</text:p>
          </table:table-cell>
          <table:table-cell office:value-type="float" office:value="2692" calcext:value-type="float">
            <text:p>2692</text:p>
          </table:table-cell>
          <table:table-cell table:number-columns-repeated="3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468" calcext:value-type="float">
            <text:p>1468</text:p>
          </table:table-cell>
          <table:table-cell office:value-type="float" office:value="1488" calcext:value-type="float">
            <text:p>1488</text:p>
          </table:table-cell>
          <table:table-cell office:value-type="float" office:value="1571" calcext:value-type="float">
            <text:p>1571</text:p>
          </table:table-cell>
          <table:table-cell office:value-type="float" office:value="1492" calcext:value-type="float">
            <text:p>1492</text:p>
          </table:table-cell>
          <table:table-cell office:value-type="float" office:value="1409" calcext:value-type="float">
            <text:p>1409</text:p>
          </table:table-cell>
          <table:table-cell office:value-type="float" office:value="2625" calcext:value-type="float">
            <text:p>2625</text:p>
          </table:table-cell>
          <table:table-cell office:value-type="float" office:value="2641" calcext:value-type="float">
            <text:p>2641</text:p>
          </table:table-cell>
          <table:table-cell office:value-type="float" office:value="2610" calcext:value-type="float">
            <text:p>2610</text:p>
          </table:table-cell>
          <table:table-cell office:value-type="float" office:value="2669" calcext:value-type="float">
            <text:p>2669</text:p>
          </table:table-cell>
          <table:table-cell office:value-type="float" office:value="2549" calcext:value-type="float">
            <text:p>2549</text:p>
          </table:table-cell>
          <table:table-cell office:value-type="float" office:value="2476" calcext:value-type="float">
            <text:p>2476</text:p>
          </table:table-cell>
          <table:table-cell office:value-type="float" office:value="2578" calcext:value-type="float">
            <text:p>2578</text:p>
          </table:table-cell>
          <table:table-cell office:value-type="float" office:value="2610" calcext:value-type="float">
            <text:p>2610</text:p>
          </table:table-cell>
          <table:table-cell office:value-type="float" office:value="2479" calcext:value-type="float">
            <text:p>2479</text:p>
          </table:table-cell>
          <table:table-cell office:value-type="float" office:value="2441" calcext:value-type="float">
            <text:p>2441</text:p>
          </table:table-cell>
          <table:table-cell table:number-columns-repeated="3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133" calcext:value-type="float">
            <text:p>1133</text:p>
          </table:table-cell>
          <table:table-cell office:value-type="float" office:value="1135" calcext:value-type="float">
            <text:p>1135</text:p>
          </table:table-cell>
          <table:table-cell office:value-type="float" office:value="1188" calcext:value-type="float">
            <text:p>1188</text:p>
          </table:table-cell>
          <table:table-cell office:value-type="float" office:value="1152" calcext:value-type="float">
            <text:p>1152</text:p>
          </table:table-cell>
          <table:table-cell office:value-type="float" office:value="1063" calcext:value-type="float">
            <text:p>1063</text:p>
          </table:table-cell>
          <table:table-cell office:value-type="float" office:value="2319" calcext:value-type="float">
            <text:p>2319</text:p>
          </table:table-cell>
          <table:table-cell office:value-type="float" office:value="2356" calcext:value-type="float">
            <text:p>2356</text:p>
          </table:table-cell>
          <table:table-cell office:value-type="float" office:value="2337" calcext:value-type="float">
            <text:p>2337</text:p>
          </table:table-cell>
          <table:table-cell office:value-type="float" office:value="2372" calcext:value-type="float">
            <text:p>2372</text:p>
          </table:table-cell>
          <table:table-cell office:value-type="float" office:value="2277" calcext:value-type="float">
            <text:p>2277</text:p>
          </table:table-cell>
          <table:table-cell office:value-type="float" office:value="2216" calcext:value-type="float">
            <text:p>2216</text:p>
          </table:table-cell>
          <table:table-cell office:value-type="float" office:value="2302" calcext:value-type="float">
            <text:p>2302</text:p>
          </table:table-cell>
          <table:table-cell office:value-type="float" office:value="2326" calcext:value-type="float">
            <text:p>2326</text:p>
          </table:table-cell>
          <table:table-cell office:value-type="float" office:value="2173" calcext:value-type="float">
            <text:p>2173</text:p>
          </table:table-cell>
          <table:table-cell office:value-type="float" office:value="2152" calcext:value-type="float">
            <text:p>2152</text:p>
          </table:table-cell>
          <table:table-cell table:number-columns-repeated="3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874" calcext:value-type="float">
            <text:p>874</text:p>
          </table:table-cell>
          <table:table-cell office:value-type="float" office:value="868" calcext:value-type="float">
            <text:p>868</text:p>
          </table:table-cell>
          <table:table-cell office:value-type="float" office:value="892" calcext:value-type="float">
            <text:p>892</text:p>
          </table:table-cell>
          <table:table-cell office:value-type="float" office:value="902" calcext:value-type="float">
            <text:p>902</text:p>
          </table:table-cell>
          <table:table-cell office:value-type="float" office:value="773" calcext:value-type="float">
            <text:p>773</text:p>
          </table:table-cell>
          <table:table-cell office:value-type="float" office:value="1976" calcext:value-type="float">
            <text:p>1976</text:p>
          </table:table-cell>
          <table:table-cell office:value-type="float" office:value="2002" calcext:value-type="float">
            <text:p>2002</text:p>
          </table:table-cell>
          <table:table-cell office:value-type="float" office:value="1977" calcext:value-type="float">
            <text:p>1977</text:p>
          </table:table-cell>
          <table:table-cell office:value-type="float" office:value="2040" calcext:value-type="float">
            <text:p>2040</text:p>
          </table:table-cell>
          <table:table-cell office:value-type="float" office:value="1938" calcext:value-type="float">
            <text:p>1938</text:p>
          </table:table-cell>
          <table:table-cell office:value-type="float" office:value="1894" calcext:value-type="float">
            <text:p>1894</text:p>
          </table:table-cell>
          <table:table-cell office:value-type="float" office:value="1908" calcext:value-type="float">
            <text:p>1908</text:p>
          </table:table-cell>
          <table:table-cell office:value-type="float" office:value="1970" calcext:value-type="float">
            <text:p>1970</text:p>
          </table:table-cell>
          <table:table-cell office:value-type="float" office:value="1854" calcext:value-type="float">
            <text:p>1854</text:p>
          </table:table-cell>
          <table:table-cell office:value-type="float" office:value="1818" calcext:value-type="float">
            <text:p>1818</text:p>
          </table:table-cell>
          <table:table-cell table:number-columns-repeated="3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64" calcext:value-type="float">
            <text:p>664</text:p>
          </table:table-cell>
          <table:table-cell office:value-type="float" office:value="658" calcext:value-type="float">
            <text:p>658</text:p>
          </table:table-cell>
          <table:table-cell office:value-type="float" office:value="677" calcext:value-type="float">
            <text:p>677</text:p>
          </table:table-cell>
          <table:table-cell office:value-type="float" office:value="670" calcext:value-type="float">
            <text:p>670</text:p>
          </table:table-cell>
          <table:table-cell office:value-type="float" office:value="586" calcext:value-type="float">
            <text:p>586</text:p>
          </table:table-cell>
          <table:table-cell office:value-type="float" office:value="1553" calcext:value-type="float">
            <text:p>1553</text:p>
          </table:table-cell>
          <table:table-cell office:value-type="float" office:value="1563" calcext:value-type="float">
            <text:p>1563</text:p>
          </table:table-cell>
          <table:table-cell office:value-type="float" office:value="1540" calcext:value-type="float">
            <text:p>1540</text:p>
          </table:table-cell>
          <table:table-cell office:value-type="float" office:value="1620" calcext:value-type="float">
            <text:p>1620</text:p>
          </table:table-cell>
          <table:table-cell office:value-type="float" office:value="1480" calcext:value-type="float">
            <text:p>1480</text:p>
          </table:table-cell>
          <table:table-cell office:value-type="float" office:value="1474" calcext:value-type="float">
            <text:p>1474</text:p>
          </table:table-cell>
          <table:table-cell office:value-type="float" office:value="1477" calcext:value-type="float">
            <text:p>1477</text:p>
          </table:table-cell>
          <table:table-cell office:value-type="float" office:value="1550" calcext:value-type="float">
            <text:p>1550</text:p>
          </table:table-cell>
          <table:table-cell office:value-type="float" office:value="1434" calcext:value-type="float">
            <text:p>1434</text:p>
          </table:table-cell>
          <table:table-cell office:value-type="float" office:value="1431" calcext:value-type="float">
            <text:p>1431</text:p>
          </table:table-cell>
          <table:table-cell table:number-columns-repeated="3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96" calcext:value-type="float">
            <text:p>496</text:p>
          </table:table-cell>
          <table:table-cell office:value-type="float" office:value="507" calcext:value-type="float">
            <text:p>507</text:p>
          </table:table-cell>
          <table:table-cell office:value-type="float" office:value="514" calcext:value-type="float">
            <text:p>514</text:p>
          </table:table-cell>
          <table:table-cell office:value-type="float" office:value="489" calcext:value-type="float">
            <text:p>489</text:p>
          </table:table-cell>
          <table:table-cell office:value-type="float" office:value="433" calcext:value-type="float">
            <text:p>433</text:p>
          </table:table-cell>
          <table:table-cell office:value-type="float" office:value="1105" calcext:value-type="float">
            <text:p>1105</text:p>
          </table:table-cell>
          <table:table-cell office:value-type="float" office:value="1165" calcext:value-type="float">
            <text:p>1165</text:p>
          </table:table-cell>
          <table:table-cell office:value-type="float" office:value="1134" calcext:value-type="float">
            <text:p>1134</text:p>
          </table:table-cell>
          <table:table-cell office:value-type="float" office:value="1177" calcext:value-type="float">
            <text:p>1177</text:p>
          </table:table-cell>
          <table:table-cell office:value-type="float" office:value="1034" calcext:value-type="float">
            <text:p>1034</text:p>
          </table:table-cell>
          <table:table-cell office:value-type="float" office:value="1079" calcext:value-type="float">
            <text:p>1079</text:p>
          </table:table-cell>
          <table:table-cell office:value-type="float" office:value="1076" calcext:value-type="float">
            <text:p>1076</text:p>
          </table:table-cell>
          <table:table-cell office:value-type="float" office:value="1130" calcext:value-type="float">
            <text:p>1130</text:p>
          </table:table-cell>
          <table:table-cell office:value-type="float" office:value="1000" calcext:value-type="float">
            <text:p>1000</text:p>
          </table:table-cell>
          <table:table-cell office:value-type="float" office:value="1004" calcext:value-type="float">
            <text:p>1004</text:p>
          </table:table-cell>
          <table:table-cell table:number-columns-repeated="3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77" calcext:value-type="float">
            <text:p>377</text:p>
          </table:table-cell>
          <table:table-cell office:value-type="float" office:value="368" calcext:value-type="float">
            <text:p>368</text:p>
          </table:table-cell>
          <table:table-cell office:value-type="float" office:value="371" calcext:value-type="float">
            <text:p>371</text:p>
          </table:table-cell>
          <table:table-cell office:value-type="float" office:value="367" calcext:value-type="float">
            <text:p>367</text:p>
          </table:table-cell>
          <table:table-cell office:value-type="float" office:value="314" calcext:value-type="float">
            <text:p>314</text:p>
          </table:table-cell>
          <table:table-cell office:value-type="float" office:value="758" calcext:value-type="float">
            <text:p>758</text:p>
          </table:table-cell>
          <table:table-cell office:value-type="float" office:value="805" calcext:value-type="float">
            <text:p>805</text:p>
          </table:table-cell>
          <table:table-cell office:value-type="float" office:value="804" calcext:value-type="float">
            <text:p>804</text:p>
          </table:table-cell>
          <table:table-cell office:value-type="float" office:value="826" calcext:value-type="float">
            <text:p>826</text:p>
          </table:table-cell>
          <table:table-cell office:value-type="float" office:value="700" calcext:value-type="float">
            <text:p>700</text:p>
          </table:table-cell>
          <table:table-cell office:value-type="float" office:value="730" calcext:value-type="float">
            <text:p>730</text:p>
          </table:table-cell>
          <table:table-cell office:value-type="float" office:value="736" calcext:value-type="float">
            <text:p>736</text:p>
          </table:table-cell>
          <table:table-cell office:value-type="float" office:value="809" calcext:value-type="float">
            <text:p>809</text:p>
          </table:table-cell>
          <table:table-cell office:value-type="float" office:value="695" calcext:value-type="float">
            <text:p>695</text:p>
          </table:table-cell>
          <table:table-cell office:value-type="float" office:value="702" calcext:value-type="float">
            <text:p>702</text:p>
          </table:table-cell>
          <table:table-cell table:number-columns-repeated="3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71" calcext:value-type="float">
            <text:p>271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0" calcext:value-type="float">
            <text:p>260</text:p>
          </table:table-cell>
          <table:table-cell office:value-type="float" office:value="204" calcext:value-type="float">
            <text:p>204</text:p>
          </table:table-cell>
          <table:table-cell office:value-type="float" office:value="528" calcext:value-type="float">
            <text:p>528</text:p>
          </table:table-cell>
          <table:table-cell office:value-type="float" office:value="574" calcext:value-type="float">
            <text:p>574</text:p>
          </table:table-cell>
          <table:table-cell office:value-type="float" office:value="561" calcext:value-type="float">
            <text:p>561</text:p>
          </table:table-cell>
          <table:table-cell office:value-type="float" office:value="575" calcext:value-type="float">
            <text:p>575</text:p>
          </table:table-cell>
          <table:table-cell office:value-type="float" office:value="494" calcext:value-type="float">
            <text:p>494</text:p>
          </table:table-cell>
          <table:table-cell office:value-type="float" office:value="530" calcext:value-type="float">
            <text:p>530</text:p>
          </table:table-cell>
          <table:table-cell office:value-type="float" office:value="501" calcext:value-type="float">
            <text:p>501</text:p>
          </table:table-cell>
          <table:table-cell office:value-type="float" office:value="553" calcext:value-type="float">
            <text:p>553</text:p>
          </table:table-cell>
          <table:table-cell office:value-type="float" office:value="512" calcext:value-type="float">
            <text:p>512</text:p>
          </table:table-cell>
          <table:table-cell office:value-type="float" office:value="483" calcext:value-type="float">
            <text:p>483</text:p>
          </table:table-cell>
          <table:table-cell table:number-columns-repeated="3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05" calcext:value-type="float">
            <text:p>205</text:p>
          </table:table-cell>
          <table:table-cell office:value-type="float" office:value="190" calcext:value-type="float">
            <text:p>190</text:p>
          </table:table-cell>
          <table:table-cell office:value-type="float" office:value="204" calcext:value-type="float">
            <text:p>204</text:p>
          </table:table-cell>
          <table:table-cell office:value-type="float" office:value="187" calcext:value-type="float">
            <text:p>187</text:p>
          </table:table-cell>
          <table:table-cell office:value-type="float" office:value="143" calcext:value-type="float">
            <text:p>143</text:p>
          </table:table-cell>
          <table:table-cell office:value-type="float" office:value="379" calcext:value-type="float">
            <text:p>379</text:p>
          </table:table-cell>
          <table:table-cell office:value-type="float" office:value="404" calcext:value-type="float">
            <text:p>404</text:p>
          </table:table-cell>
          <table:table-cell office:value-type="float" office:value="381" calcext:value-type="float">
            <text:p>381</text:p>
          </table:table-cell>
          <table:table-cell office:value-type="float" office:value="411" calcext:value-type="float">
            <text:p>411</text:p>
          </table:table-cell>
          <table:table-cell office:value-type="float" office:value="347" calcext:value-type="float">
            <text:p>347</text:p>
          </table:table-cell>
          <table:table-cell office:value-type="float" office:value="376" calcext:value-type="float">
            <text:p>376</text:p>
          </table:table-cell>
          <table:table-cell office:value-type="float" office:value="348" calcext:value-type="float">
            <text:p>348</text:p>
          </table:table-cell>
          <table:table-cell office:value-type="float" office:value="395" calcext:value-type="float">
            <text:p>395</text:p>
          </table:table-cell>
          <table:table-cell office:value-type="float" office:value="372" calcext:value-type="float">
            <text:p>372</text:p>
          </table:table-cell>
          <table:table-cell office:value-type="float" office:value="327" calcext:value-type="float">
            <text:p>327</text:p>
          </table:table-cell>
          <table:table-cell table:number-columns-repeated="3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office:value-type="float" office:value="257" calcext:value-type="float">
            <text:p>257</text:p>
          </table:table-cell>
          <table:table-cell office:value-type="float" office:value="304" calcext:value-type="float">
            <text:p>304</text:p>
          </table:table-cell>
          <table:table-cell office:value-type="float" office:value="276" calcext:value-type="float">
            <text:p>276</text:p>
          </table:table-cell>
          <table:table-cell office:value-type="float" office:value="307" calcext:value-type="float">
            <text:p>307</text:p>
          </table:table-cell>
          <table:table-cell office:value-type="float" office:value="236" calcext:value-type="float">
            <text:p>236</text:p>
          </table:table-cell>
          <table:table-cell office:value-type="float" office:value="275" calcext:value-type="float">
            <text:p>275</text:p>
          </table:table-cell>
          <table:table-cell office:value-type="float" office:value="260" calcext:value-type="float">
            <text:p>260</text:p>
          </table:table-cell>
          <table:table-cell office:value-type="float" office:value="295" calcext:value-type="float">
            <text:p>295</text:p>
          </table:table-cell>
          <table:table-cell office:value-type="float" office:value="256" calcext:value-type="float">
            <text:p>256</text:p>
          </table:table-cell>
          <table:table-cell office:value-type="float" office:value="236" calcext:value-type="float">
            <text:p>236</text:p>
          </table:table-cell>
          <table:table-cell table:number-columns-repeated="33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3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3"/>
        </table:table-row>
        <calcext:conditional-formats>
          <calcext:conditional-format calcext:target-range-address="'6 - B1'.H9:'6 - B1'.H40">
            <calcext:condition calcext:apply-style-name="Good" calcext:value="&gt;1000" calcext:base-cell-address="'6 - B1'.H9"/>
          </calcext:conditional-format>
          <calcext:conditional-format calcext:target-range-address="'6 - B1'.K9:'6 - B1'.K40">
            <calcext:condition calcext:apply-style-name="Good" calcext:value="&lt;[.J11]" calcext:base-cell-address="'6 - B1'.K9"/>
          </calcext:conditional-format>
        </calcext:conditional-formats>
      </table:table>
      <table:table table:name="6 - B2" table:style-name="ta1">
        <table:table-column table:style-name="co4" table:default-cell-style-name="ce16"/>
        <table:table-column table:style-name="co4" table:number-columns-repeated="7" table:default-cell-style-name="ce221"/>
        <table:table-column table:style-name="co4" table:default-cell-style-name="ce212"/>
        <table:table-column table:style-name="co4" table:default-cell-style-name="ce221"/>
        <table:table-column table:style-name="co4" table:default-cell-style-name="ce309"/>
        <table:table-column table:style-name="co4" table:number-columns-repeated="3" table:default-cell-style-name="Default"/>
        <table:table-column table:style-name="co4" table:default-cell-style-name="ce221"/>
        <table:table-column table:style-name="co4" table:number-columns-repeated="34" table:default-cell-style-name="Default"/>
        <table:table-row table:style-name="ro2">
          <table:table-cell table:style-name="Default" table:formula="of:=[$'6 - B1'.$A$1]" office:value-type="string" office:string-value="Data Preprocessing and Quality Assessment per ISO 11171 Clause 6.6" calcext:value-type="string">
            <text:p>Data Preprocessing and Quality Assessment per ISO 11171 Clause 6.6</text:p>
          </table:table-cell>
          <table:table-cell table:style-name="Default" table:number-columns-repeated="10"/>
          <table:table-cell table:number-columns-repeated="3"/>
          <table:table-cell table:style-name="Default"/>
          <table:table-cell table:number-columns-repeated="34"/>
        </table:table-row>
        <table:table-row table:style-name="ro8">
          <table:table-cell table:style-name="ce215" office:value-type="string" calcext:value-type="string">
            <text:p>BOTTLE 2</text:p>
          </table:table-cell>
          <table:table-cell table:style-name="Default" table:number-columns-repeated="10"/>
          <table:table-cell table:number-columns-repeated="3"/>
          <table:table-cell table:style-name="ce215"/>
          <table:table-cell table:number-columns-repeated="34"/>
        </table:table-row>
        <table:table-row table:style-name="ro2">
          <table:table-cell table:style-name="Default" table:formula="of:=[$'6 - B1'.$A$3]" office:value-type="string" office:string-value="Serial #" calcext:value-type="string">
            <text:p>Serial #</text:p>
          </table:table-cell>
          <table:table-cell table:style-name="ce194" table:formula="of:=[$'6 - B1'.$B$3]" office:value-type="string" office:string-value="11171-00009" calcext:value-type="string">
            <text:p>11171-00009</text:p>
          </table:table-cell>
          <table:table-cell table:style-name="Default" table:number-columns-repeated="9"/>
          <table:table-cell table:number-columns-repeated="3"/>
          <table:table-cell table:style-name="Default"/>
          <table:table-cell table:number-columns-repeated="34"/>
        </table:table-row>
        <table:table-row table:style-name="ro10">
          <table:table-cell table:style-name="ce89" table:formula="of:=[$'6 - B1'.$A$4]" office:value-type="string" office:string-value="Date" calcext:value-type="string">
            <text:p>Date</text:p>
          </table:table-cell>
          <table:table-cell table:style-name="ce195" table:formula="of:=[$'6 - B1'.$B$4]" office:value-type="date" office:date-value="2025-06-12" calcext:value-type="date">
            <text:p>2025-06-12</text:p>
          </table:table-cell>
          <table:table-cell table:style-name="Default" table:number-columns-repeated="9"/>
          <table:table-cell table:number-columns-repeated="3"/>
          <table:table-cell table:style-name="ce215"/>
          <table:table-cell table:number-columns-repeated="34"/>
        </table:table-row>
        <table:table-row table:style-name="ro2">
          <table:table-cell table:style-name="ce89" table:formula="of:=[$'6 - B1'.$A$5]" office:value-type="string" office:string-value="RM" calcext:value-type="string">
            <text:p>RM</text:p>
          </table:table-cell>
          <table:table-cell table:style-name="ce219" table:formula="of:=[$'6 - B1'.$B$5]" office:value-type="string" office:string-value="34D" calcext:value-type="string">
            <text:p>34D</text:p>
          </table:table-cell>
          <table:table-cell table:style-name="Default" table:number-columns-repeated="9"/>
          <table:table-cell table:number-columns-repeated="3"/>
          <table:table-cell table:style-name="ce55"/>
          <table:table-cell table:number-columns-repeated="34"/>
        </table:table-row>
        <table:table-row table:style-name="ro2">
          <table:table-cell table:style-name="Default"/>
          <table:table-cell table:style-name="ce89" table:number-columns-repeated="5"/>
          <table:table-cell table:style-name="Default" table:number-columns-repeated="5"/>
          <table:table-cell table:number-columns-repeated="3"/>
          <table:table-cell table:style-name="Default"/>
          <table:table-cell table:number-columns-repeated="34"/>
        </table:table-row>
        <table:table-row table:style-name="ro2">
          <table:table-cell table:style-name="Default"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202" office:value-type="string" calcext:value-type="string">
            <text:p>X<text:span text:style-name="T8"> / ml</text:span></text:p>
          </table:table-cell>
          <table:table-cell table:style-name="ce31" office:value-type="string" calcext:value-type="string">
            <text:p>N<text:span text:style-name="T6">TOTAL</text:span></text:p>
          </table:table-cell>
          <table:table-cell table:style-name="ce31" office:value-type="string" calcext:value-type="string">
            <text:p>CV</text:p>
          </table:table-cell>
          <table:table-cell table:style-name="ce31" office:value-type="string" calcext:value-type="string">
            <text:p>D<text:span text:style-name="T6">QMAX</text:span></text:p>
          </table:table-cell>
          <table:table-cell table:style-name="ce31" office:value-type="string" calcext:value-type="string">
            <text:p>D<text:span text:style-name="T6">Q</text:span></text:p>
          </table:table-cell>
          <table:table-cell table:style-name="ce31" office:value-type="string" calcext:value-type="string">
            <text:p>N<text:span text:style-name="T6">C</text:span></text:p>
          </table:table-cell>
          <table:table-cell table:number-columns-repeated="2"/>
          <table:table-cell table:style-name="ce31" office:value-type="string" calcext:value-type="string">
            <text:p>Thresholds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Scanned ml</text:p>
          </table:table-cell>
          <table:table-cell table:style-name="ce32" table:formula="of:=[.G52]" office:value-type="float" office:value="4.756581" calcext:value-type="float">
            <text:p>4.757</text:p>
          </table:table-cell>
          <table:table-cell table:style-name="ce32" table:formula="of:=[.H52]" office:value-type="float" office:value="5.071365" calcext:value-type="float">
            <text:p>5.071</text:p>
          </table:table-cell>
          <table:table-cell table:style-name="ce32" table:formula="of:=[.I52]" office:value-type="float" office:value="5.012042" calcext:value-type="float">
            <text:p>5.012</text:p>
          </table:table-cell>
          <table:table-cell table:style-name="ce32" table:formula="of:=[.J52]" office:value-type="float" office:value="5.064873" calcext:value-type="float">
            <text:p>5.065</text:p>
          </table:table-cell>
          <table:table-cell table:style-name="ce32" table:formula="of:=[.K52]" office:value-type="float" office:value="5.038718" calcext:value-type="float">
            <text:p>5.039</text:p>
          </table:table-cell>
          <table:table-cell table:style-name="ce203" table:formula="of:=AVERAGE([.B$8:.F$8])*5" office:value-type="float" office:value="24.943579" calcext:value-type="float">
            <text:p>24.9</text:p>
          </table:table-cell>
          <table:table-cell table:style-name="Default"/>
          <table:table-cell/>
          <table:table-cell table:style-name="Default"/>
          <table:table-cell table:style-name="ce212"/>
          <table:table-cell table:number-columns-repeated="3"/>
          <table:table-cell table:style-name="Default"/>
          <table:table-cell table:number-columns-repeated="34"/>
        </table:table-row>
        <table:table-row table:style-name="ro2">
          <table:table-cell office:value-type="string" calcext:value-type="string">
            <text:p>count_4</text:p>
          </table:table-cell>
          <table:table-cell table:style-name="ce198" table:formula="of:=[.G53]/[.B$8]" office:value-type="float" office:value="10930.540234677" calcext:value-type="float">
            <text:p>10931</text:p>
          </table:table-cell>
          <table:table-cell table:style-name="ce198" table:formula="of:=[.H53]/[.C$8]" office:value-type="float" office:value="10636.1896649127" calcext:value-type="float">
            <text:p>10636</text:p>
          </table:table-cell>
          <table:table-cell table:style-name="ce198" table:formula="of:=[.I53]/[.D$8]" office:value-type="float" office:value="10630.7967890133" calcext:value-type="float">
            <text:p>10631</text:p>
          </table:table-cell>
          <table:table-cell table:style-name="ce198" table:formula="of:=[.J53]/[.E$8]" office:value-type="float" office:value="10512.0108638459" calcext:value-type="float">
            <text:p>10512</text:p>
          </table:table-cell>
          <table:table-cell table:style-name="ce198" table:formula="of:=[.K53]/[.F$8]" office:value-type="float" office:value="10620.7571052796" calcext:value-type="float">
            <text:p>10621</text:p>
          </table:table-cell>
          <table:table-cell table:style-name="ce204" table:formula="of:=AVERAGE([.B9:.F9])" office:value-type="float" office:value="10666.0589315457" calcext:value-type="float">
            <text:p>10666.1</text:p>
          </table:table-cell>
          <table:table-cell table:style-name="ce307" table:formula="of:=[.G9]*[.G$8]" office:value-type="float" office:value="266049.683577666" calcext:value-type="float">
            <text:p>266050</text:p>
          </table:table-cell>
          <table:table-cell table:formula="of:=STDEVP([.B9:.F9])/AVERAGE([.B9:.F9])" office:value-type="percentage" office:value="0.013116973032698" calcext:value-type="percentage">
            <text:p>1.3%</text:p>
          </table:table-cell>
          <table:table-cell table:style-name="ce212" table:formula="of:=IF([.H9]&gt;[.$A$43]; [.$C$43]; IF([.H9]&gt;[.$A$44]; [.$C$44]; IF([.H9]&gt;[.$A$45];[.$C$45];IF([.H9]&gt;[.$A$46];[.$C$46]; IF([.H9]&gt;[.$A$47];[.$C$47];IF([.H9]&gt;[.$A$48];[.$C$48];[.$C$49]))))))/100" office:value-type="percentage" office:value="0.11" calcext:value-type="percentage">
            <text:p>11.0%</text:p>
          </table:table-cell>
          <table:table-cell table:formula="of:=(MAX([.B9:.F9])-MIN([.B9:.F9]))/[.G9]" office:value-type="percentage" office:value="0.039239364184759" calcext:value-type="percentage">
            <text:p>3.9%</text:p>
          </table:table-cell>
          <table:table-cell table:formula="of:=COUNTA([.B9:.F9]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style-name="ce20" office:value-type="float" office:value="137.1" calcext:value-type="float">
            <text:p>137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count_5</text:p>
          </table:table-cell>
          <table:table-cell table:style-name="ce198" table:formula="of:=[.G54]/[.B$8]" office:value-type="float" office:value="9284.39986620642" calcext:value-type="float">
            <text:p>9284</text:p>
          </table:table-cell>
          <table:table-cell table:style-name="ce198" table:formula="of:=[.H54]/[.C$8]" office:value-type="float" office:value="9029.91600880631" calcext:value-type="float">
            <text:p>9030</text:p>
          </table:table-cell>
          <table:table-cell table:style-name="ce198" table:formula="of:=[.I54]/[.D$8]" office:value-type="float" office:value="9002.91737379695" calcext:value-type="float">
            <text:p>9003</text:p>
          </table:table-cell>
          <table:table-cell table:style-name="ce198" table:formula="of:=[.J54]/[.E$8]" office:value-type="float" office:value="8905.25784160827" calcext:value-type="float">
            <text:p>8905</text:p>
          </table:table-cell>
          <table:table-cell table:style-name="ce198" table:formula="of:=[.K54]/[.F$8]" office:value-type="float" office:value="9004.27449998194" calcext:value-type="float">
            <text:p>9004</text:p>
          </table:table-cell>
          <table:table-cell table:style-name="ce204" table:formula="of:=AVERAGE([.B10:.F10])" office:value-type="float" office:value="9045.35311807998" calcext:value-type="float">
            <text:p>9045.4</text:p>
          </table:table-cell>
          <table:table-cell table:style-name="ce307" table:formula="of:=[.G10]*[.G$8]" office:value-type="float" office:value="225623.480083724" calcext:value-type="float">
            <text:p>225623</text:p>
          </table:table-cell>
          <table:table-cell table:formula="of:=STDEVP([.B10:.F10])/AVERAGE([.B10:.F10])" office:value-type="percentage" office:value="0.0140274328088471" calcext:value-type="percentage">
            <text:p>1.4%</text:p>
          </table:table-cell>
          <table:table-cell table:style-name="ce212" table:formula="of:=IF([.H10]&gt;[.$A$43]; [.$C$43]; IF([.H10]&gt;[.$A$44]; [.$C$44]; IF([.H10]&gt;[.$A$45];[.$C$45];IF([.H10]&gt;[.$A$46];[.$C$46]; IF([.H10]&gt;[.$A$47];[.$C$47];IF([.H10]&gt;[.$A$48];[.$C$48];[.$C$49]))))))/100" office:value-type="percentage" office:value="0.11" calcext:value-type="percentage">
            <text:p>11.0%</text:p>
          </table:table-cell>
          <table:table-cell table:formula="of:=(MAX([.B10:.F10])-MIN([.B10:.F10]))/[.G10]" office:value-type="percentage" office:value="0.0419156687028965" calcext:value-type="percentage">
            <text:p>4.2%</text:p>
          </table:table-cell>
          <table:table-cell table:formula="of:=COUNTA([.B10:.F10]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style-name="ce20" office:value-type="float" office:value="162.494327047856" calcext:value-type="float">
            <text:p>162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count_6</text:p>
          </table:table-cell>
          <table:table-cell table:style-name="ce198" table:formula="of:=[.G55]/[.B$8]" office:value-type="float" office:value="7878.55814922525" calcext:value-type="float">
            <text:p>7879</text:p>
          </table:table-cell>
          <table:table-cell table:style-name="ce198" table:formula="of:=[.H55]/[.C$8]" office:value-type="float" office:value="7679.78640859019" calcext:value-type="float">
            <text:p>7680</text:p>
          </table:table-cell>
          <table:table-cell table:style-name="ce198" table:formula="of:=[.I55]/[.D$8]" office:value-type="float" office:value="7587.12716294077" calcext:value-type="float">
            <text:p>7587</text:p>
          </table:table-cell>
          <table:table-cell table:style-name="ce198" table:formula="of:=[.J55]/[.E$8]" office:value-type="float" office:value="7537.80005934996" calcext:value-type="float">
            <text:p>7538</text:p>
          </table:table-cell>
          <table:table-cell table:style-name="ce198" table:formula="of:=[.K55]/[.F$8]" office:value-type="float" office:value="7613.04760456926" calcext:value-type="float">
            <text:p>7613</text:p>
          </table:table-cell>
          <table:table-cell table:style-name="ce204" table:formula="of:=AVERAGE([.B11:.F11])" office:value-type="float" office:value="7659.26387693509" calcext:value-type="float">
            <text:p>7659.3</text:p>
          </table:table-cell>
          <table:table-cell table:style-name="ce307" table:formula="of:=[.G11]*[.G$8]" office:value-type="float" office:value="191049.453596177" calcext:value-type="float">
            <text:p>191049</text:p>
          </table:table-cell>
          <table:table-cell table:formula="of:=STDEVP([.B11:.F11])/AVERAGE([.B11:.F11])" office:value-type="percentage" office:value="0.0155147013483978" calcext:value-type="percentage">
            <text:p>1.6%</text:p>
          </table:table-cell>
          <table:table-cell table:style-name="ce212" table:formula="of:=IF([.H11]&gt;[.$A$43]; [.$C$43]; IF([.H11]&gt;[.$A$44]; [.$C$44]; IF([.H11]&gt;[.$A$45];[.$C$45];IF([.H11]&gt;[.$A$46];[.$C$46]; IF([.H11]&gt;[.$A$47];[.$C$47];IF([.H11]&gt;[.$A$48];[.$C$48];[.$C$49]))))))/100" office:value-type="percentage" office:value="0.11" calcext:value-type="percentage">
            <text:p>11.0%</text:p>
          </table:table-cell>
          <table:table-cell table:formula="of:=(MAX([.B11:.F11])-MIN([.B11:.F11]))/[.G11]" office:value-type="percentage" office:value="0.0444896657629784" calcext:value-type="percentage">
            <text:p>4.4%</text:p>
          </table:table-cell>
          <table:table-cell table:formula="of:=COUNTA([.B11:.F11])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style-name="ce20" office:value-type="float" office:value="192.592314534906" calcext:value-type="float">
            <text:p>193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count_7</text:p>
          </table:table-cell>
          <table:table-cell table:style-name="ce198" table:formula="of:=[.G56]/[.B$8]" office:value-type="float" office:value="6526.32636761573" calcext:value-type="float">
            <text:p>6526</text:p>
          </table:table-cell>
          <table:table-cell table:style-name="ce198" table:formula="of:=[.H56]/[.C$8]" office:value-type="float" office:value="6354.30500466837" calcext:value-type="float">
            <text:p>6354</text:p>
          </table:table-cell>
          <table:table-cell table:style-name="ce198" table:formula="of:=[.I56]/[.D$8]" office:value-type="float" office:value="6301.82269023284" calcext:value-type="float">
            <text:p>6302</text:p>
          </table:table-cell>
          <table:table-cell table:style-name="ce198" table:formula="of:=[.J56]/[.E$8]" office:value-type="float" office:value="6223.25574599797" calcext:value-type="float">
            <text:p>6223</text:p>
          </table:table-cell>
          <table:table-cell table:style-name="ce198" table:formula="of:=[.K56]/[.F$8]" office:value-type="float" office:value="6316.88457262343" calcext:value-type="float">
            <text:p>6317</text:p>
          </table:table-cell>
          <table:table-cell table:style-name="ce204" table:formula="of:=AVERAGE([.B12:.F12])" office:value-type="float" office:value="6344.51887622767" calcext:value-type="float">
            <text:p>6344.5</text:p>
          </table:table-cell>
          <table:table-cell table:style-name="ce307" table:formula="of:=[.G12]*[.G$8]" office:value-type="float" office:value="158255.007806176" calcext:value-type="float">
            <text:p>158255</text:p>
          </table:table-cell>
          <table:table-cell table:formula="of:=STDEVP([.B12:.F12])/AVERAGE([.B12:.F12])" office:value-type="percentage" office:value="0.015831008057781" calcext:value-type="percentage">
            <text:p>1.6%</text:p>
          </table:table-cell>
          <table:table-cell table:style-name="ce212" table:formula="of:=IF([.H12]&gt;[.$A$43]; [.$C$43]; IF([.H12]&gt;[.$A$44]; [.$C$44]; IF([.H12]&gt;[.$A$45];[.$C$45];IF([.H12]&gt;[.$A$46];[.$C$46]; IF([.H12]&gt;[.$A$47];[.$C$47];IF([.H12]&gt;[.$A$48];[.$C$48];[.$C$49]))))))/100" office:value-type="percentage" office:value="0.11" calcext:value-type="percentage">
            <text:p>11.0%</text:p>
          </table:table-cell>
          <table:table-cell table:formula="of:=(MAX([.B12:.F12])-MIN([.B12:.F12]))/[.G12]" office:value-type="percentage" office:value="0.0477688895770071" calcext:value-type="percentage">
            <text:p>4.8%</text:p>
          </table:table-cell>
          <table:table-cell table:formula="of:=COUNTA([.B12:.F12])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style-name="ce20" office:value-type="float" office:value="228.265197264323" calcext:value-type="float">
            <text:p>228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count_8</text:p>
          </table:table-cell>
          <table:table-cell table:style-name="ce198" table:formula="of:=[.G57]/[.B$8]" office:value-type="float" office:value="5310.32689236239" calcext:value-type="float">
            <text:p>5310</text:p>
          </table:table-cell>
          <table:table-cell table:style-name="ce198" table:formula="of:=[.H57]/[.C$8]" office:value-type="float" office:value="5148.12087081092" calcext:value-type="float">
            <text:p>5148</text:p>
          </table:table-cell>
          <table:table-cell table:style-name="ce198" table:formula="of:=[.I57]/[.D$8]" office:value-type="float" office:value="5091.93657994087" calcext:value-type="float">
            <text:p>5092</text:p>
          </table:table-cell>
          <table:table-cell table:style-name="ce198" table:formula="of:=[.J57]/[.E$8]" office:value-type="float" office:value="5037.24377689233" calcext:value-type="float">
            <text:p>5037</text:p>
          </table:table-cell>
          <table:table-cell table:style-name="ce198" table:formula="of:=[.K57]/[.F$8]" office:value-type="float" office:value="5096.73293881499" calcext:value-type="float">
            <text:p>5097</text:p>
          </table:table-cell>
          <table:table-cell table:style-name="ce204" table:formula="of:=AVERAGE([.B13:.F13])" office:value-type="float" office:value="5136.8722117643" calcext:value-type="float">
            <text:p>5136.9</text:p>
          </table:table-cell>
          <table:table-cell table:style-name="ce307" table:formula="of:=[.G13]*[.G$8]" office:value-type="float" office:value="128131.977827048" calcext:value-type="float">
            <text:p>128132</text:p>
          </table:table-cell>
          <table:table-cell table:formula="of:=STDEVP([.B13:.F13])/AVERAGE([.B13:.F13])" office:value-type="percentage" office:value="0.0182138106405483" calcext:value-type="percentage">
            <text:p>1.8%</text:p>
          </table:table-cell>
          <table:table-cell table:style-name="ce212" table:formula="of:=IF([.H13]&gt;[.$A$43]; [.$C$43]; IF([.H13]&gt;[.$A$44]; [.$C$44]; IF([.H13]&gt;[.$A$45];[.$C$45];IF([.H13]&gt;[.$A$46];[.$C$46]; IF([.H13]&gt;[.$A$47];[.$C$47];IF([.H13]&gt;[.$A$48];[.$C$48];[.$C$49]))))))/100" office:value-type="percentage" office:value="0.11" calcext:value-type="percentage">
            <text:p>11.0%</text:p>
          </table:table-cell>
          <table:table-cell table:formula="of:=(MAX([.B13:.F13])-MIN([.B13:.F13]))/[.G13]" office:value-type="percentage" office:value="0.0531613604957222" calcext:value-type="percentage">
            <text:p>5.3%</text:p>
          </table:table-cell>
          <table:table-cell table:formula="of:=COUNTA([.B13:.F13])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ce20" office:value-type="float" office:value="270.545584375728" calcext:value-type="float">
            <text:p>271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count_9</text:p>
          </table:table-cell>
          <table:table-cell table:style-name="ce198" table:formula="of:=[.G58]/[.B$8]" office:value-type="float" office:value="4267.14062054236" calcext:value-type="float">
            <text:p>4267</text:p>
          </table:table-cell>
          <table:table-cell table:style-name="ce198" table:formula="of:=[.H58]/[.C$8]" office:value-type="float" office:value="4133.79829690823" calcext:value-type="float">
            <text:p>4134</text:p>
          </table:table-cell>
          <table:table-cell table:style-name="ce198" table:formula="of:=[.I58]/[.D$8]" office:value-type="float" office:value="4069.99781725692" calcext:value-type="float">
            <text:p>4070</text:p>
          </table:table-cell>
          <table:table-cell table:style-name="ce198" table:formula="of:=[.J58]/[.E$8]" office:value-type="float" office:value="4050.64450776949" calcext:value-type="float">
            <text:p>4051</text:p>
          </table:table-cell>
          <table:table-cell table:style-name="ce198" table:formula="of:=[.K58]/[.F$8]" office:value-type="float" office:value="4085.56303408923" calcext:value-type="float">
            <text:p>4086</text:p>
          </table:table-cell>
          <table:table-cell table:style-name="ce204" table:formula="of:=AVERAGE([.B14:.F14])" office:value-type="float" office:value="4121.42885531325" calcext:value-type="float">
            <text:p>4121.4</text:p>
          </table:table-cell>
          <table:table-cell table:style-name="ce307" table:formula="of:=[.G14]*[.G$8]" office:value-type="float" office:value="102803.186245386" calcext:value-type="float">
            <text:p>102803</text:p>
          </table:table-cell>
          <table:table-cell table:formula="of:=STDEVP([.B14:.F14])/AVERAGE([.B14:.F14])" office:value-type="percentage" office:value="0.0188964782811009" calcext:value-type="percentage">
            <text:p>1.9%</text:p>
          </table:table-cell>
          <table:table-cell table:style-name="ce212" table:formula="of:=IF([.H14]&gt;[.$A$43]; [.$C$43]; IF([.H14]&gt;[.$A$44]; [.$C$44]; IF([.H14]&gt;[.$A$45];[.$C$45];IF([.H14]&gt;[.$A$46];[.$C$46]; IF([.H14]&gt;[.$A$47];[.$C$47];IF([.H14]&gt;[.$A$48];[.$C$48];[.$C$49]))))))/100" office:value-type="percentage" office:value="0.11" calcext:value-type="percentage">
            <text:p>11.0%</text:p>
          </table:table-cell>
          <table:table-cell table:formula="of:=(MAX([.B14:.F14])-MIN([.B14:.F14]))/[.G14]" office:value-type="percentage" office:value="0.0525293824965012" calcext:value-type="percentage">
            <text:p>5.3%</text:p>
          </table:table-cell>
          <table:table-cell table:formula="of:=COUNTA([.B14:.F14])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style-name="ce20" office:value-type="float" office:value="320.657349882588" calcext:value-type="float">
            <text:p>321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count_10</text:p>
          </table:table-cell>
          <table:table-cell table:style-name="ce198" table:formula="of:=[.G59]/[.B$8]" office:value-type="float" office:value="3410.85329988073" calcext:value-type="float">
            <text:p>3411</text:p>
          </table:table-cell>
          <table:table-cell table:style-name="ce198" table:formula="of:=[.H59]/[.C$8]" office:value-type="float" office:value="3323.56278832228" calcext:value-type="float">
            <text:p>3324</text:p>
          </table:table-cell>
          <table:table-cell table:style-name="ce198" table:formula="of:=[.I59]/[.D$8]" office:value-type="float" office:value="3276.50885607104" calcext:value-type="float">
            <text:p>3277</text:p>
          </table:table-cell>
          <table:table-cell table:style-name="ce198" table:formula="of:=[.J59]/[.E$8]" office:value-type="float" office:value="3272.93497783656" calcext:value-type="float">
            <text:p>3273</text:p>
          </table:table-cell>
          <table:table-cell table:style-name="ce198" table:formula="of:=[.K59]/[.F$8]" office:value-type="float" office:value="3274.04708896191" calcext:value-type="float">
            <text:p>3274</text:p>
          </table:table-cell>
          <table:table-cell table:style-name="ce204" table:formula="of:=AVERAGE([.B15:.F15])" office:value-type="float" office:value="3311.5814022145" calcext:value-type="float">
            <text:p>3311.6</text:p>
          </table:table-cell>
          <table:table-cell table:style-name="ce307" table:formula="of:=[.G15]*[.G$8]" office:value-type="float" office:value="82602.6923210683" calcext:value-type="float">
            <text:p>82603</text:p>
          </table:table-cell>
          <table:table-cell table:formula="of:=STDEVP([.B15:.F15])/AVERAGE([.B15:.F15])" office:value-type="percentage" office:value="0.0160533156178031" calcext:value-type="percentage">
            <text:p>1.6%</text:p>
          </table:table-cell>
          <table:table-cell table:style-name="ce212" table:formula="of:=IF([.H15]&gt;[.$A$43]; [.$C$43]; IF([.H15]&gt;[.$A$44]; [.$C$44]; IF([.H15]&gt;[.$A$45];[.$C$45];IF([.H15]&gt;[.$A$46];[.$C$46]; IF([.H15]&gt;[.$A$47];[.$C$47];IF([.H15]&gt;[.$A$48];[.$C$48];[.$C$49]))))))/100" office:value-type="percentage" office:value="0.11" calcext:value-type="percentage">
            <text:p>11.0%</text:p>
          </table:table-cell>
          <table:table-cell table:formula="of:=(MAX([.B15:.F15])-MIN([.B15:.F15]))/[.G15]" office:value-type="percentage" office:value="0.0416472691723491" calcext:value-type="percentage">
            <text:p>4.2%</text:p>
          </table:table-cell>
          <table:table-cell table:formula="of:=COUNTA([.B15:.F15])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style-name="ce20" office:value-type="float" office:value="380.051059679943" calcext:value-type="float">
            <text:p>380</text:p>
          </table:table-cell>
          <table:table-cell table:number-columns-repeated="2"/>
          <table:table-cell table:style-name="ce16" table:number-columns-repeated="32"/>
        </table:table-row>
        <table:table-row table:style-name="ro2">
          <table:table-cell office:value-type="string" calcext:value-type="string">
            <text:p>count_11</text:p>
          </table:table-cell>
          <table:table-cell table:style-name="ce198" table:formula="of:=[.G60]/[.B$8]" office:value-type="float" office:value="2721.70283655424" calcext:value-type="float">
            <text:p>2722</text:p>
          </table:table-cell>
          <table:table-cell table:style-name="ce198" table:formula="of:=[.H60]/[.C$8]" office:value-type="float" office:value="2659.63897293924" calcext:value-type="float">
            <text:p>2660</text:p>
          </table:table-cell>
          <table:table-cell table:style-name="ce198" table:formula="of:=[.I60]/[.D$8]" office:value-type="float" office:value="2609.51524348758" calcext:value-type="float">
            <text:p>2610</text:p>
          </table:table-cell>
          <table:table-cell table:style-name="ce198" table:formula="of:=[.J60]/[.E$8]" office:value-type="float" office:value="2615.46538284376" calcext:value-type="float">
            <text:p>2615</text:p>
          </table:table-cell>
          <table:table-cell table:style-name="ce198" table:formula="of:=[.K60]/[.F$8]" office:value-type="float" office:value="2622.09554096895" calcext:value-type="float">
            <text:p>2622</text:p>
          </table:table-cell>
          <table:table-cell table:style-name="ce204" table:formula="of:=AVERAGE([.B16:.F16])" office:value-type="float" office:value="2645.68359535875" calcext:value-type="float">
            <text:p>2645.7</text:p>
          </table:table-cell>
          <table:table-cell table:style-name="ce307" table:formula="of:=[.G16]*[.G$8]" office:value-type="float" office:value="65992.8177698351" calcext:value-type="float">
            <text:p>65993</text:p>
          </table:table-cell>
          <table:table-cell table:formula="of:=STDEVP([.B16:.F16])/AVERAGE([.B16:.F16])" office:value-type="percentage" office:value="0.0158130253130011" calcext:value-type="percentage">
            <text:p>1.6%</text:p>
          </table:table-cell>
          <table:table-cell table:style-name="ce212" table:formula="of:=IF([.H16]&gt;[.$A$43]; [.$C$43]; IF([.H16]&gt;[.$A$44]; [.$C$44]; IF([.H16]&gt;[.$A$45];[.$C$45];IF([.H16]&gt;[.$A$46];[.$C$46]; IF([.H16]&gt;[.$A$47];[.$C$47];IF([.H16]&gt;[.$A$48];[.$C$48];[.$C$49]))))))/100" office:value-type="percentage" office:value="0.11" calcext:value-type="percentage">
            <text:p>11.0%</text:p>
          </table:table-cell>
          <table:table-cell table:formula="of:=(MAX([.B16:.F16])-MIN([.B16:.F16]))/[.G16]" office:value-type="percentage" office:value="0.0424040097853963" calcext:value-type="percentage">
            <text:p>4.2%</text:p>
          </table:table-cell>
          <table:table-cell table:formula="of:=COUNTA([.B16:.F16])"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style-name="ce20" office:value-type="float" office:value="450.445960514347" calcext:value-type="float">
            <text:p>450</text:p>
          </table:table-cell>
          <table:table-cell table:style-name="ce89" table:number-columns-repeated="2"/>
          <table:table-cell table:style-name="ce16" table:number-columns-repeated="32"/>
        </table:table-row>
        <table:table-row table:style-name="ro2">
          <table:table-cell office:value-type="string" calcext:value-type="string">
            <text:p>count_12</text:p>
          </table:table-cell>
          <table:table-cell table:style-name="ce198" table:formula="of:=[.G61]/[.B$8]" office:value-type="float" office:value="2211.67262788125" calcext:value-type="float">
            <text:p>2212</text:p>
          </table:table-cell>
          <table:table-cell table:style-name="ce198" table:formula="of:=[.H61]/[.C$8]" office:value-type="float" office:value="2160.16792323171" calcext:value-type="float">
            <text:p>2160</text:p>
          </table:table-cell>
          <table:table-cell table:style-name="ce198" table:formula="of:=[.I61]/[.D$8]" office:value-type="float" office:value="2097.54826475915" calcext:value-type="float">
            <text:p>2098</text:p>
          </table:table-cell>
          <table:table-cell table:style-name="ce198" table:formula="of:=[.J61]/[.E$8]" office:value-type="float" office:value="2124.23885060889" calcext:value-type="float">
            <text:p>2124</text:p>
          </table:table-cell>
          <table:table-cell table:style-name="ce198" table:formula="of:=[.K61]/[.F$8]" office:value-type="float" office:value="2127.12836876364" calcext:value-type="float">
            <text:p>2127</text:p>
          </table:table-cell>
          <table:table-cell table:style-name="ce204" table:formula="of:=AVERAGE([.B17:.F17])" office:value-type="float" office:value="2144.15120704893" calcext:value-type="float">
            <text:p>2144.2</text:p>
          </table:table-cell>
          <table:table-cell table:style-name="ce307" table:formula="of:=[.G17]*[.G$8]" office:value-type="float" office:value="53482.8050209703" calcext:value-type="float">
            <text:p>53483</text:p>
          </table:table-cell>
          <table:table-cell table:formula="of:=STDEVP([.B17:.F17])/AVERAGE([.B17:.F17])" office:value-type="percentage" office:value="0.0182710944552102" calcext:value-type="percentage">
            <text:p>1.8%</text:p>
          </table:table-cell>
          <table:table-cell table:style-name="ce212" table:formula="of:=IF([.H17]&gt;[.$A$43]; [.$C$43]; IF([.H17]&gt;[.$A$44]; [.$C$44]; IF([.H17]&gt;[.$A$45];[.$C$45];IF([.H17]&gt;[.$A$46];[.$C$46]; IF([.H17]&gt;[.$A$47];[.$C$47];IF([.H17]&gt;[.$A$48];[.$C$48];[.$C$49]))))))/100" office:value-type="percentage" office:value="0.11" calcext:value-type="percentage">
            <text:p>11.0%</text:p>
          </table:table-cell>
          <table:table-cell table:formula="of:=(MAX([.B17:.F17])-MIN([.B17:.F17]))/[.G17]" office:value-type="percentage" office:value="0.0532258931865" calcext:value-type="percentage">
            <text:p>5.3%</text:p>
          </table:table-cell>
          <table:table-cell table:formula="of:=COUNTA([.B17:.F17])"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style-name="ce20" office:value-type="float" office:value="533.879746354515" calcext:value-type="float">
            <text:p>534</text:p>
          </table:table-cell>
          <table:table-cell table:style-name="ce89" table:number-columns-repeated="2"/>
          <table:table-cell table:style-name="ce16" table:number-columns-repeated="32"/>
        </table:table-row>
        <table:table-row table:style-name="ro2">
          <table:table-cell office:value-type="string" calcext:value-type="string">
            <text:p>count_13</text:p>
          </table:table-cell>
          <table:table-cell table:style-name="ce198" table:formula="of:=[.G62]/[.B$8]" office:value-type="float" office:value="1818.95357190385" calcext:value-type="float">
            <text:p>1819</text:p>
          </table:table-cell>
          <table:table-cell table:style-name="ce198" table:formula="of:=[.H62]/[.C$8]" office:value-type="float" office:value="1751.99379259825" calcext:value-type="float">
            <text:p>1752</text:p>
          </table:table-cell>
          <table:table-cell table:style-name="ce198" table:formula="of:=[.I62]/[.D$8]" office:value-type="float" office:value="1721.45405006582" calcext:value-type="float">
            <text:p>1721</text:p>
          </table:table-cell>
          <table:table-cell table:style-name="ce198" table:formula="of:=[.J62]/[.E$8]" office:value-type="float" office:value="1744.56496737431" calcext:value-type="float">
            <text:p>1745</text:p>
          </table:table-cell>
          <table:table-cell table:style-name="ce198" table:formula="of:=[.K62]/[.F$8]" office:value-type="float" office:value="1746.07906217415" calcext:value-type="float">
            <text:p>1746</text:p>
          </table:table-cell>
          <table:table-cell table:style-name="ce204" table:formula="of:=AVERAGE([.B18:.F18])" office:value-type="float" office:value="1756.60908882327" calcext:value-type="float">
            <text:p>1756.6</text:p>
          </table:table-cell>
          <table:table-cell table:style-name="ce307" table:formula="of:=[.G18]*[.G$8]" office:value-type="float" office:value="43816.1175791814" calcext:value-type="float">
            <text:p>43816</text:p>
          </table:table-cell>
          <table:table-cell table:formula="of:=STDEVP([.B18:.F18])/AVERAGE([.B18:.F18])" office:value-type="percentage" office:value="0.0187083258985484" calcext:value-type="percentage">
            <text:p>1.9%</text:p>
          </table:table-cell>
          <table:table-cell table:style-name="ce212" table:formula="of:=IF([.H18]&gt;[.$A$43]; [.$C$43]; IF([.H18]&gt;[.$A$44]; [.$C$44]; IF([.H18]&gt;[.$A$45];[.$C$45];IF([.H18]&gt;[.$A$46];[.$C$46]; IF([.H18]&gt;[.$A$47];[.$C$47];IF([.H18]&gt;[.$A$48];[.$C$48];[.$C$49]))))))/100" office:value-type="percentage" office:value="0.11" calcext:value-type="percentage">
            <text:p>11.0%</text:p>
          </table:table-cell>
          <table:table-cell table:formula="of:=(MAX([.B18:.F18])-MIN([.B18:.F18]))/[.G18]" office:value-type="percentage" office:value="0.0555043933555785" calcext:value-type="percentage">
            <text:p>5.6%</text:p>
          </table:table-cell>
          <table:table-cell table:formula="of:=COUNTA([.B18:.F18])"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0" office:value-type="float" office:value="632.76754273054" calcext:value-type="float">
            <text:p>633</text:p>
          </table:table-cell>
          <table:table-cell table:style-name="ce89" table:number-columns-repeated="2"/>
          <table:table-cell table:style-name="ce16" table:number-columns-repeated="32"/>
        </table:table-row>
        <table:table-row table:style-name="ro2">
          <table:table-cell office:value-type="string" calcext:value-type="string">
            <text:p>count_14</text:p>
          </table:table-cell>
          <table:table-cell table:style-name="ce198" table:formula="of:=[.G63]/[.B$8]" office:value-type="float" office:value="1524.62451496148" calcext:value-type="float">
            <text:p>1525</text:p>
          </table:table-cell>
          <table:table-cell table:style-name="ce198" table:formula="of:=[.H63]/[.C$8]" office:value-type="float" office:value="1450.69424109683" calcext:value-type="float">
            <text:p>1451</text:p>
          </table:table-cell>
          <table:table-cell table:style-name="ce198" table:formula="of:=[.I63]/[.D$8]" office:value-type="float" office:value="1414.59309399243" calcext:value-type="float">
            <text:p>1415</text:p>
          </table:table-cell>
          <table:table-cell table:style-name="ce198" table:formula="of:=[.J63]/[.E$8]" office:value-type="float" office:value="1456.10758650809" calcext:value-type="float">
            <text:p>1456</text:p>
          </table:table-cell>
          <table:table-cell table:style-name="ce198" table:formula="of:=[.K63]/[.F$8]" office:value-type="float" office:value="1460.09361905151" calcext:value-type="float">
            <text:p>1460</text:p>
          </table:table-cell>
          <table:table-cell table:style-name="ce204" table:formula="of:=AVERAGE([.B19:.F19])" office:value-type="float" office:value="1461.22261112207" calcext:value-type="float">
            <text:p>1461.2</text:p>
          </table:table-cell>
          <table:table-cell table:style-name="ce307" table:formula="of:=[.G19]*[.G$8]" office:value-type="float" office:value="36448.1216371096" calcext:value-type="float">
            <text:p>36448</text:p>
          </table:table-cell>
          <table:table-cell table:formula="of:=STDEVP([.B19:.F19])/AVERAGE([.B19:.F19])" office:value-type="percentage" office:value="0.0243546960481695" calcext:value-type="percentage">
            <text:p>2.4%</text:p>
          </table:table-cell>
          <table:table-cell table:style-name="ce212" table:formula="of:=IF([.H19]&gt;[.$A$43]; [.$C$43]; IF([.H19]&gt;[.$A$44]; [.$C$44]; IF([.H19]&gt;[.$A$45];[.$C$45];IF([.H19]&gt;[.$A$46];[.$C$46]; IF([.H19]&gt;[.$A$47];[.$C$47];IF([.H19]&gt;[.$A$48];[.$C$48];[.$C$49]))))))/100" office:value-type="percentage" office:value="0.11" calcext:value-type="percentage">
            <text:p>11.0%</text:p>
          </table:table-cell>
          <table:table-cell table:formula="of:=(MAX([.B19:.F19])-MIN([.B19:.F19]))/[.G19]" office:value-type="percentage" office:value="0.075300929599331" calcext:value-type="percentage">
            <text:p>7.5%</text:p>
          </table:table-cell>
          <table:table-cell table:formula="of:=COUNTA([.B19:.F19])"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0" office:value-type="float" office:value="749.971816438546" calcext:value-type="float">
            <text:p>750</text:p>
          </table:table-cell>
          <table:table-cell table:style-name="ce89" table:number-columns-repeated="2"/>
          <table:table-cell table:style-name="ce16" table:number-columns-repeated="32"/>
        </table:table-row>
        <table:table-row table:style-name="ro2">
          <table:table-cell office:value-type="string" calcext:value-type="string">
            <text:p>count_15</text:p>
          </table:table-cell>
          <table:table-cell table:style-name="ce198" table:formula="of:=[.G64]/[.B$8]" office:value-type="float" office:value="1284.95656859412" calcext:value-type="float">
            <text:p>1285</text:p>
          </table:table-cell>
          <table:table-cell table:style-name="ce198" table:formula="of:=[.H64]/[.C$8]" office:value-type="float" office:value="1215.0574845234" calcext:value-type="float">
            <text:p>1215</text:p>
          </table:table-cell>
          <table:table-cell table:style-name="ce198" table:formula="of:=[.I64]/[.D$8]" office:value-type="float" office:value="1200.5086948593" calcext:value-type="float">
            <text:p>1201</text:p>
          </table:table-cell>
          <table:table-cell table:style-name="ce198" table:formula="of:=[.J64]/[.E$8]" office:value-type="float" office:value="1229.8432754385" calcext:value-type="float">
            <text:p>1230</text:p>
          </table:table-cell>
          <table:table-cell table:style-name="ce198" table:formula="of:=[.K64]/[.F$8]" office:value-type="float" office:value="1231.06710873679" calcext:value-type="float">
            <text:p>1231</text:p>
          </table:table-cell>
          <table:table-cell table:style-name="ce204" table:formula="of:=AVERAGE([.B20:.F20])" office:value-type="float" office:value="1232.28662643042" calcext:value-type="float">
            <text:p>1232.3</text:p>
          </table:table-cell>
          <table:table-cell table:style-name="ce307" table:formula="of:=[.G20]*[.G$8]" office:value-type="float" office:value="30737.6388170107" calcext:value-type="float">
            <text:p>30738</text:p>
          </table:table-cell>
          <table:table-cell table:formula="of:=STDEVP([.B20:.F20])/AVERAGE([.B20:.F20])" office:value-type="percentage" office:value="0.0232045168521372" calcext:value-type="percentage">
            <text:p>2.3%</text:p>
          </table:table-cell>
          <table:table-cell table:style-name="ce212" table:formula="of:=IF([.H20]&gt;[.$A$43]; [.$C$43]; IF([.H20]&gt;[.$A$44]; [.$C$44]; IF([.H20]&gt;[.$A$45];[.$C$45];IF([.H20]&gt;[.$A$46];[.$C$46]; IF([.H20]&gt;[.$A$47];[.$C$47];IF([.H20]&gt;[.$A$48];[.$C$48];[.$C$49]))))))/100" office:value-type="percentage" office:value="0.11" calcext:value-type="percentage">
            <text:p>11.0%</text:p>
          </table:table-cell>
          <table:table-cell table:formula="of:=(MAX([.B20:.F20])-MIN([.B20:.F20]))/[.G20]" office:value-type="percentage" office:value="0.0685294085998831" calcext:value-type="percentage">
            <text:p>6.9%</text:p>
          </table:table-cell>
          <table:table-cell table:formula="of:=COUNTA([.B20:.F20])"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0" office:value-type="float" office:value="888.885234259955" calcext:value-type="float">
            <text:p>889</text:p>
          </table:table-cell>
          <table:table-cell table:style-name="ce89" table:number-columns-repeated="2"/>
          <table:table-cell table:style-name="ce16" table:number-columns-repeated="32"/>
        </table:table-row>
        <table:table-row table:style-name="ro2">
          <table:table-cell office:value-type="string" calcext:value-type="string">
            <text:p>count_16</text:p>
          </table:table-cell>
          <table:table-cell table:style-name="ce198" table:formula="of:=[.G65]/[.B$8]" office:value-type="float" office:value="1104.78513873726" calcext:value-type="float">
            <text:p>1105</text:p>
          </table:table-cell>
          <table:table-cell table:style-name="ce198" table:formula="of:=[.H65]/[.C$8]" office:value-type="float" office:value="1044.4919661669" calcext:value-type="float">
            <text:p>1044</text:p>
          </table:table-cell>
          <table:table-cell table:style-name="ce198" table:formula="of:=[.I65]/[.D$8]" office:value-type="float" office:value="1019.54452895646" calcext:value-type="float">
            <text:p>1020</text:p>
          </table:table-cell>
          <table:table-cell table:style-name="ce198" table:formula="of:=[.J65]/[.E$8]" office:value-type="float" office:value="1046.81795575131" calcext:value-type="float">
            <text:p>1047</text:p>
          </table:table-cell>
          <table:table-cell table:style-name="ce198" table:formula="of:=[.K65]/[.F$8]" office:value-type="float" office:value="1049.67176174575" calcext:value-type="float">
            <text:p>1050</text:p>
          </table:table-cell>
          <table:table-cell table:style-name="ce204" table:formula="of:=AVERAGE([.B21:.F21])" office:value-type="float" office:value="1053.06227027153" calcext:value-type="float">
            <text:p>1053.1</text:p>
          </table:table-cell>
          <table:table-cell table:style-name="ce307" table:formula="of:=[.G21]*[.G$8]" office:value-type="float" office:value="26267.1419304374" calcext:value-type="float">
            <text:p>26267</text:p>
          </table:table-cell>
          <table:table-cell table:formula="of:=STDEVP([.B21:.F21])/AVERAGE([.B21:.F21])" office:value-type="percentage" office:value="0.0265980431192082" calcext:value-type="percentage">
            <text:p>2.7%</text:p>
          </table:table-cell>
          <table:table-cell table:style-name="ce212" table:formula="of:=IF([.H21]&gt;[.$A$43]; [.$C$43]; IF([.H21]&gt;[.$A$44]; [.$C$44]; IF([.H21]&gt;[.$A$45];[.$C$45];IF([.H21]&gt;[.$A$46];[.$C$46]; IF([.H21]&gt;[.$A$47];[.$C$47];IF([.H21]&gt;[.$A$48];[.$C$48];[.$C$49]))))))/100" office:value-type="percentage" office:value="0.11" calcext:value-type="percentage">
            <text:p>11.0%</text:p>
          </table:table-cell>
          <table:table-cell table:formula="of:=(MAX([.B21:.F21])-MIN([.B21:.F21]))/[.G21]" office:value-type="percentage" office:value="0.0809454599098077" calcext:value-type="percentage">
            <text:p>8.1%</text:p>
          </table:table-cell>
          <table:table-cell table:formula="of:=COUNTA([.B21:.F21])"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0" office:value-type="float" office:value="1053.52886917467" calcext:value-type="float">
            <text:p>1054</text:p>
          </table:table-cell>
          <table:table-cell table:number-columns-repeated="2"/>
          <table:table-cell table:style-name="ce31" table:number-columns-repeated="2"/>
          <table:table-cell table:style-name="ce16" table:number-columns-repeated="30"/>
        </table:table-row>
        <table:table-row table:style-name="ro2">
          <table:table-cell office:value-type="string" calcext:value-type="string">
            <text:p>count_17</text:p>
          </table:table-cell>
          <table:table-cell table:style-name="ce198" table:formula="of:=[.G66]/[.B$8]" office:value-type="float" office:value="951.944264167897" calcext:value-type="float">
            <text:p>952</text:p>
          </table:table-cell>
          <table:table-cell table:style-name="ce198" table:formula="of:=[.H66]/[.C$8]" office:value-type="float" office:value="905.081767926387" calcext:value-type="float">
            <text:p>905</text:p>
          </table:table-cell>
          <table:table-cell table:style-name="ce198" table:formula="of:=[.I66]/[.D$8]" office:value-type="float" office:value="886.265518126145" calcext:value-type="float">
            <text:p>886</text:p>
          </table:table-cell>
          <table:table-cell table:style-name="ce198" table:formula="of:=[.J66]/[.E$8]" office:value-type="float" office:value="903.477737743868" calcext:value-type="float">
            <text:p>903</text:p>
          </table:table-cell>
          <table:table-cell table:style-name="ce198" table:formula="of:=[.K66]/[.F$8]" office:value-type="float" office:value="905.389029511078" calcext:value-type="float">
            <text:p>905</text:p>
          </table:table-cell>
          <table:table-cell table:style-name="ce204" table:formula="of:=AVERAGE([.B22:.F22])" office:value-type="float" office:value="910.431663495075" calcext:value-type="float">
            <text:p>910.4</text:p>
          </table:table-cell>
          <table:table-cell table:style-name="ce307" table:formula="of:=[.G22]*[.G$8]" office:value-type="float" office:value="22709.4241224908" calcext:value-type="float">
            <text:p>22709</text:p>
          </table:table-cell>
          <table:table-cell table:formula="of:=STDEVP([.B22:.F22])/AVERAGE([.B22:.F22])" office:value-type="percentage" office:value="0.0241129088029797" calcext:value-type="percentage">
            <text:p>2.4%</text:p>
          </table:table-cell>
          <table:table-cell table:style-name="ce212" table:formula="of:=IF([.H22]&gt;[.$A$43]; [.$C$43]; IF([.H22]&gt;[.$A$44]; [.$C$44]; IF([.H22]&gt;[.$A$45];[.$C$45];IF([.H22]&gt;[.$A$46];[.$C$46]; IF([.H22]&gt;[.$A$47];[.$C$47];IF([.H22]&gt;[.$A$48];[.$C$48];[.$C$49]))))))/100" office:value-type="percentage" office:value="0.11" calcext:value-type="percentage">
            <text:p>11.0%</text:p>
          </table:table-cell>
          <table:table-cell table:formula="of:=(MAX([.B22:.F22])-MIN([.B22:.F22]))/[.G22]" office:value-type="percentage" office:value="0.0721402260874986" calcext:value-type="percentage">
            <text:p>7.2%</text:p>
          </table:table-cell>
          <table:table-cell table:formula="of:=COUNTA([.B22:.F22])"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20" office:value-type="float" office:value="1248.66859680545" calcext:value-type="float">
            <text:p>1249</text:p>
          </table:table-cell>
          <table:table-cell table:style-name="ce16"/>
          <table:table-cell table:number-columns-repeated="3"/>
          <table:table-cell table:style-name="ce76" table:number-columns-repeated="30"/>
        </table:table-row>
        <table:table-row table:style-name="ro2">
          <table:table-cell office:value-type="string" calcext:value-type="string">
            <text:p>count_18</text:p>
          </table:table-cell>
          <table:table-cell table:style-name="ce198" table:formula="of:=[.G67]/[.B$8]" office:value-type="float" office:value="837.996872123065" calcext:value-type="float">
            <text:p>838</text:p>
          </table:table-cell>
          <table:table-cell table:style-name="ce198" table:formula="of:=[.H67]/[.C$8]" office:value-type="float" office:value="793.080363965126" calcext:value-type="float">
            <text:p>793</text:p>
          </table:table-cell>
          <table:table-cell table:style-name="ce198" table:formula="of:=[.I67]/[.D$8]" office:value-type="float" office:value="787.702896344444" calcext:value-type="float">
            <text:p>788</text:p>
          </table:table-cell>
          <table:table-cell table:style-name="ce198" table:formula="of:=[.J67]/[.E$8]" office:value-type="float" office:value="799.032868148915" calcext:value-type="float">
            <text:p>799</text:p>
          </table:table-cell>
          <table:table-cell table:style-name="ce198" table:formula="of:=[.K67]/[.F$8]" office:value-type="float" office:value="788.295753007015" calcext:value-type="float">
            <text:p>788</text:p>
          </table:table-cell>
          <table:table-cell table:style-name="ce204" table:formula="of:=AVERAGE([.B23:.F23])" office:value-type="float" office:value="801.221750717713" calcext:value-type="float">
            <text:p>801.2</text:p>
          </table:table-cell>
          <table:table-cell table:style-name="ce307" table:formula="of:=[.G23]*[.G$8]" office:value-type="float" office:value="19985.3380355456" calcext:value-type="float">
            <text:p>19985</text:p>
          </table:table-cell>
          <table:table-cell table:formula="of:=STDEVP([.B23:.F23])/AVERAGE([.B23:.F23])" office:value-type="percentage" office:value="0.0235047851743094" calcext:value-type="percentage">
            <text:p>2.4%</text:p>
          </table:table-cell>
          <table:table-cell table:style-name="ce212" table:formula="of:=IF([.H23]&gt;[.$A$43]; [.$C$43]; IF([.H23]&gt;[.$A$44]; [.$C$44]; IF([.H23]&gt;[.$A$45];[.$C$45];IF([.H23]&gt;[.$A$46];[.$C$46]; IF([.H23]&gt;[.$A$47];[.$C$47];IF([.H23]&gt;[.$A$48];[.$C$48];[.$C$49]))))))/100" office:value-type="percentage" office:value="0.11" calcext:value-type="percentage">
            <text:p>11.0%</text:p>
          </table:table-cell>
          <table:table-cell table:formula="of:=(MAX([.B23:.F23])-MIN([.B23:.F23]))/[.G23]" office:value-type="percentage" office:value="0.0627716056554491" calcext:value-type="percentage">
            <text:p>6.3%</text:p>
          </table:table-cell>
          <table:table-cell table:formula="of:=COUNTA([.B23:.F23])"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0" office:value-type="float" office:value="1479.95305137631" calcext:value-type="float">
            <text:p>1480</text:p>
          </table:table-cell>
          <table:table-cell table:number-columns-repeated="4"/>
          <table:table-cell table:style-name="ce21" table:number-columns-repeated="30"/>
        </table:table-row>
        <table:table-row table:style-name="ro2">
          <table:table-cell office:value-type="string" calcext:value-type="string">
            <text:p>count_19</text:p>
          </table:table-cell>
          <table:table-cell table:style-name="ce198" table:formula="of:=[.G68]/[.B$8]" office:value-type="float" office:value="737.294287640639" calcext:value-type="float">
            <text:p>737</text:p>
          </table:table-cell>
          <table:table-cell table:style-name="ce198" table:formula="of:=[.H68]/[.C$8]" office:value-type="float" office:value="701.980630461424" calcext:value-type="float">
            <text:p>702</text:p>
          </table:table-cell>
          <table:table-cell table:style-name="ce198" table:formula="of:=[.I68]/[.D$8]" office:value-type="float" office:value="700.911923722906" calcext:value-type="float">
            <text:p>701</text:p>
          </table:table-cell>
          <table:table-cell table:style-name="ce198" table:formula="of:=[.J68]/[.E$8]" office:value-type="float" office:value="712.357447067281" calcext:value-type="float">
            <text:p>712</text:p>
          </table:table-cell>
          <table:table-cell table:style-name="ce198" table:formula="of:=[.K68]/[.F$8]" office:value-type="float" office:value="690.850331373973" calcext:value-type="float">
            <text:p>691</text:p>
          </table:table-cell>
          <table:table-cell table:style-name="ce204" table:formula="of:=AVERAGE([.B24:.F24])" office:value-type="float" office:value="708.678924053245" calcext:value-type="float">
            <text:p>708.7</text:p>
          </table:table-cell>
          <table:table-cell table:style-name="ce307" table:formula="of:=[.G24]*[.G$8]" office:value-type="float" office:value="17676.9887277571" calcext:value-type="float">
            <text:p>17677</text:p>
          </table:table-cell>
          <table:table-cell table:formula="of:=STDEVP([.B24:.F24])/AVERAGE([.B24:.F24])" office:value-type="percentage" office:value="0.0223594167901341" calcext:value-type="percentage">
            <text:p>2.2%</text:p>
          </table:table-cell>
          <table:table-cell table:style-name="ce212" table:formula="of:=IF([.H24]&gt;[.$A$43]; [.$C$43]; IF([.H24]&gt;[.$A$44]; [.$C$44]; IF([.H24]&gt;[.$A$45];[.$C$45];IF([.H24]&gt;[.$A$46];[.$C$46]; IF([.H24]&gt;[.$A$47];[.$C$47];IF([.H24]&gt;[.$A$48];[.$C$48];[.$C$49]))))))/100" office:value-type="percentage" office:value="0.11" calcext:value-type="percentage">
            <text:p>11.0%</text:p>
          </table:table-cell>
          <table:table-cell table:formula="of:=(MAX([.B24:.F24])-MIN([.B24:.F24]))/[.G24]" office:value-type="percentage" office:value="0.0655359637352182" calcext:value-type="percentage">
            <text:p>6.6%</text:p>
          </table:table-cell>
          <table:table-cell table:formula="of:=COUNTA([.B24:.F24])"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0" office:value-type="float" office:value="1754.07713454278" calcext:value-type="float">
            <text:p>1754</text:p>
          </table:table-cell>
          <table:table-cell table:number-columns-repeated="4"/>
          <table:table-cell table:style-name="ce212" table:number-columns-repeated="30"/>
        </table:table-row>
        <table:table-row table:style-name="ro2">
          <table:table-cell office:value-type="string" calcext:value-type="string">
            <text:p>count_20</text:p>
          </table:table-cell>
          <table:table-cell table:style-name="ce198" table:formula="of:=[.G69]/[.B$8]" office:value-type="float" office:value="664.342728527066" calcext:value-type="float">
            <text:p>664</text:p>
          </table:table-cell>
          <table:table-cell table:style-name="ce198" table:formula="of:=[.H69]/[.C$8]" office:value-type="float" office:value="626.852928156423" calcext:value-type="float">
            <text:p>627</text:p>
          </table:table-cell>
          <table:table-cell table:style-name="ce198" table:formula="of:=[.I69]/[.D$8]" office:value-type="float" office:value="630.28202876193" calcext:value-type="float">
            <text:p>630</text:p>
          </table:table-cell>
          <table:table-cell table:style-name="ce198" table:formula="of:=[.J69]/[.E$8]" office:value-type="float" office:value="636.146256776823" calcext:value-type="float">
            <text:p>636</text:p>
          </table:table-cell>
          <table:table-cell table:style-name="ce198" table:formula="of:=[.K69]/[.F$8]" office:value-type="float" office:value="617.617417763804" calcext:value-type="float">
            <text:p>618</text:p>
          </table:table-cell>
          <table:table-cell table:style-name="ce204" table:formula="of:=AVERAGE([.B25:.F25])" office:value-type="float" office:value="635.048271997209" calcext:value-type="float">
            <text:p>635.0</text:p>
          </table:table-cell>
          <table:table-cell table:style-name="ce307" table:formula="of:=[.G25]*[.G$8]" office:value-type="float" office:value="15840.3767413759" calcext:value-type="float">
            <text:p>15840</text:p>
          </table:table-cell>
          <table:table-cell table:formula="of:=STDEVP([.B25:.F25])/AVERAGE([.B25:.F25])" office:value-type="percentage" office:value="0.0249286481196149" calcext:value-type="percentage">
            <text:p>2.5%</text:p>
          </table:table-cell>
          <table:table-cell table:style-name="ce212" table:formula="of:=IF([.H25]&gt;[.$A$43]; [.$C$43]; IF([.H25]&gt;[.$A$44]; [.$C$44]; IF([.H25]&gt;[.$A$45];[.$C$45];IF([.H25]&gt;[.$A$46];[.$C$46]; IF([.H25]&gt;[.$A$47];[.$C$47];IF([.H25]&gt;[.$A$48];[.$C$48];[.$C$49]))))))/100" office:value-type="percentage" office:value="0.11" calcext:value-type="percentage">
            <text:p>11.0%</text:p>
          </table:table-cell>
          <table:table-cell table:formula="of:=(MAX([.B25:.F25])-MIN([.B25:.F25]))/[.G25]" office:value-type="percentage" office:value="0.0735775732706303" calcext:value-type="percentage">
            <text:p>7.4%</text:p>
          </table:table-cell>
          <table:table-cell table:formula="of:=COUNTA([.B25:.F25])"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0" office:value-type="float" office:value="2078.97581012079" calcext:value-type="float">
            <text:p>2079</text:p>
          </table:table-cell>
          <table:table-cell table:number-columns-repeated="4"/>
          <table:table-cell table:style-name="ce21" table:number-columns-repeated="30"/>
        </table:table-row>
        <table:table-row table:style-name="ro2">
          <table:table-cell office:value-type="string" calcext:value-type="string">
            <text:p>count_21</text:p>
          </table:table-cell>
          <table:table-cell table:style-name="ce198" table:formula="of:=[.G70]/[.B$8]" office:value-type="float" office:value="602.954096650514" calcext:value-type="float">
            <text:p>603</text:p>
          </table:table-cell>
          <table:table-cell table:style-name="ce198" table:formula="of:=[.H70]/[.C$8]" office:value-type="float" office:value="572.626896308982" calcext:value-type="float">
            <text:p>573</text:p>
          </table:table-cell>
          <table:table-cell table:style-name="ce198" table:formula="of:=[.I70]/[.D$8]" office:value-type="float" office:value="573.818016688607" calcext:value-type="float">
            <text:p>574</text:p>
          </table:table-cell>
          <table:table-cell table:style-name="ce198" table:formula="of:=[.J70]/[.E$8]" office:value-type="float" office:value="576.125008465168" calcext:value-type="float">
            <text:p>576</text:p>
          </table:table-cell>
          <table:table-cell table:style-name="ce198" table:formula="of:=[.K70]/[.F$8]" office:value-type="float" office:value="560.658484955896" calcext:value-type="float">
            <text:p>561</text:p>
          </table:table-cell>
          <table:table-cell table:style-name="ce204" table:formula="of:=AVERAGE([.B26:.F26])" office:value-type="float" office:value="577.236500613833" calcext:value-type="float">
            <text:p>577.2</text:p>
          </table:table-cell>
          <table:table-cell table:style-name="ce307" table:formula="of:=[.G26]*[.G$8]" office:value-type="float" office:value="14398.3442547447" calcext:value-type="float">
            <text:p>14398</text:p>
          </table:table-cell>
          <table:table-cell table:formula="of:=STDEVP([.B26:.F26])/AVERAGE([.B26:.F26])" office:value-type="percentage" office:value="0.0241343464749533" calcext:value-type="percentage">
            <text:p>2.4%</text:p>
          </table:table-cell>
          <table:table-cell table:style-name="ce212" table:formula="of:=IF([.H26]&gt;[.$A$43]; [.$C$43]; IF([.H26]&gt;[.$A$44]; [.$C$44]; IF([.H26]&gt;[.$A$45];[.$C$45];IF([.H26]&gt;[.$A$46];[.$C$46]; IF([.H26]&gt;[.$A$47];[.$C$47];IF([.H26]&gt;[.$A$48];[.$C$48];[.$C$49]))))))/100" office:value-type="percentage" office:value="0.11" calcext:value-type="percentage">
            <text:p>11.0%</text:p>
          </table:table-cell>
          <table:table-cell table:formula="of:=(MAX([.B26:.F26])-MIN([.B26:.F26]))/[.G26]" office:value-type="percentage" office:value="0.0732725869719633" calcext:value-type="percentage">
            <text:p>7.3%</text:p>
          </table:table-cell>
          <table:table-cell table:formula="of:=COUNTA([.B26:.F26])"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0" office:value-type="float" office:value="2464.05379441539" calcext:value-type="float">
            <text:p>2464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count_22</text:p>
          </table:table-cell>
          <table:table-cell table:style-name="ce198" table:formula="of:=[.G71]/[.B$8]" office:value-type="float" office:value="551.866981766946" calcext:value-type="float">
            <text:p>552</text:p>
          </table:table-cell>
          <table:table-cell table:style-name="ce198" table:formula="of:=[.H71]/[.C$8]" office:value-type="float" office:value="520.767091305792" calcext:value-type="float">
            <text:p>521</text:p>
          </table:table-cell>
          <table:table-cell table:style-name="ce198" table:formula="of:=[.I71]/[.D$8]" office:value-type="float" office:value="520.74583572923" calcext:value-type="float">
            <text:p>521</text:p>
          </table:table-cell>
          <table:table-cell table:style-name="ce198" table:formula="of:=[.J71]/[.E$8]" office:value-type="float" office:value="526.962867578318" calcext:value-type="float">
            <text:p>527</text:p>
          </table:table-cell>
          <table:table-cell table:style-name="ce198" table:formula="of:=[.K71]/[.F$8]" office:value-type="float" office:value="505.882647133656" calcext:value-type="float">
            <text:p>506</text:p>
          </table:table-cell>
          <table:table-cell table:style-name="ce204" table:formula="of:=AVERAGE([.B27:.F27])" office:value-type="float" office:value="525.245084702788" calcext:value-type="float">
            <text:p>525.2</text:p>
          </table:table-cell>
          <table:table-cell table:style-name="ce307" table:formula="of:=[.G27]*[.G$8]" office:value-type="float" office:value="13101.4922646457" calcext:value-type="float">
            <text:p>13101</text:p>
          </table:table-cell>
          <table:table-cell table:formula="of:=STDEVP([.B27:.F27])/AVERAGE([.B27:.F27])" office:value-type="percentage" office:value="0.0285818959618158" calcext:value-type="percentage">
            <text:p>2.9%</text:p>
          </table:table-cell>
          <table:table-cell table:style-name="ce212" table:formula="of:=IF([.H27]&gt;[.$A$43]; [.$C$43]; IF([.H27]&gt;[.$A$44]; [.$C$44]; IF([.H27]&gt;[.$A$45];[.$C$45];IF([.H27]&gt;[.$A$46];[.$C$46]; IF([.H27]&gt;[.$A$47];[.$C$47];IF([.H27]&gt;[.$A$48];[.$C$48];[.$C$49]))))))/100" office:value-type="percentage" office:value="0.11" calcext:value-type="percentage">
            <text:p>11.0%</text:p>
          </table:table-cell>
          <table:table-cell table:formula="of:=(MAX([.B27:.F27])-MIN([.B27:.F27]))/[.G27]" office:value-type="percentage" office:value="0.0875483388089395" calcext:value-type="percentage">
            <text:p>8.8%</text:p>
          </table:table-cell>
          <table:table-cell table:formula="of:=COUNTA([.B27:.F27])" office:value-type="float" office:value="5" calcext:value-type="float">
            <text:p>5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0" office:value-type="float" office:value="2920.45779090624" calcext:value-type="float">
            <text:p>292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count_23</text:p>
          </table:table-cell>
          <table:table-cell table:style-name="ce198" table:formula="of:=[.G72]/[.B$8]" office:value-type="float" office:value="487.53505932097" calcext:value-type="float">
            <text:p>488</text:p>
          </table:table-cell>
          <table:table-cell table:style-name="ce198" table:formula="of:=[.H72]/[.C$8]" office:value-type="float" office:value="464.569203754808" calcext:value-type="float">
            <text:p>465</text:p>
          </table:table-cell>
          <table:table-cell table:style-name="ce198" table:formula="of:=[.I72]/[.D$8]" office:value-type="float" office:value="466.277018428816" calcext:value-type="float">
            <text:p>466</text:p>
          </table:table-cell>
          <table:table-cell table:style-name="ce198" table:formula="of:=[.J72]/[.E$8]" office:value-type="float" office:value="468.323687484365" calcext:value-type="float">
            <text:p>468</text:p>
          </table:table-cell>
          <table:table-cell table:style-name="ce198" table:formula="of:=[.K72]/[.F$8]" office:value-type="float" office:value="451.900662033478" calcext:value-type="float">
            <text:p>452</text:p>
          </table:table-cell>
          <table:table-cell table:style-name="ce204" table:formula="of:=AVERAGE([.B28:.F28])" office:value-type="float" office:value="467.721126204487" calcext:value-type="float">
            <text:p>467.7</text:p>
          </table:table-cell>
          <table:table-cell table:style-name="ce307" table:formula="of:=[.G28]*[.G$8]" office:value-type="float" office:value="11666.6388614506" calcext:value-type="float">
            <text:p>11667</text:p>
          </table:table-cell>
          <table:table-cell table:formula="of:=STDEVP([.B28:.F28])/AVERAGE([.B28:.F28])" office:value-type="percentage" office:value="0.0244757247471507" calcext:value-type="percentage">
            <text:p>2.4%</text:p>
          </table:table-cell>
          <table:table-cell table:style-name="ce212" table:formula="of:=IF([.H28]&gt;[.$A$43]; [.$C$43]; IF([.H28]&gt;[.$A$44]; [.$C$44]; IF([.H28]&gt;[.$A$45];[.$C$45];IF([.H28]&gt;[.$A$46];[.$C$46]; IF([.H28]&gt;[.$A$47];[.$C$47];IF([.H28]&gt;[.$A$48];[.$C$48];[.$C$49]))))))/100" office:value-type="percentage" office:value="0.11" calcext:value-type="percentage">
            <text:p>11.0%</text:p>
          </table:table-cell>
          <table:table-cell table:formula="of:=(MAX([.B28:.F28])-MIN([.B28:.F28]))/[.G28]" office:value-type="percentage" office:value="0.0761872733367049" calcext:value-type="percentage">
            <text:p>7.6%</text:p>
          </table:table-cell>
          <table:table-cell table:formula="of:=COUNTA([.B28:.F28])"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0" office:value-type="float" office:value="3461.3991495622" calcext:value-type="float">
            <text:p>3461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count_24</text:p>
          </table:table-cell>
          <table:table-cell table:style-name="ce198" table:formula="of:=[.G73]/[.B$8]" office:value-type="float" office:value="415.424440370089" calcext:value-type="float">
            <text:p>415</text:p>
          </table:table-cell>
          <table:table-cell table:style-name="ce198" table:formula="of:=[.H73]/[.C$8]" office:value-type="float" office:value="394.765511849374" calcext:value-type="float">
            <text:p>395</text:p>
          </table:table-cell>
          <table:table-cell table:style-name="ce198" table:formula="of:=[.I73]/[.D$8]" office:value-type="float" office:value="394.450006604095" calcext:value-type="float">
            <text:p>394</text:p>
          </table:table-cell>
          <table:table-cell table:style-name="ce198" table:formula="of:=[.J73]/[.E$8]" office:value-type="float" office:value="402.774166301899" calcext:value-type="float">
            <text:p>403</text:p>
          </table:table-cell>
          <table:table-cell table:style-name="ce198" table:formula="of:=[.K73]/[.F$8]" office:value-type="float" office:value="384.62164383877" calcext:value-type="float">
            <text:p>385</text:p>
          </table:table-cell>
          <table:table-cell table:style-name="ce204" table:formula="of:=AVERAGE([.B29:.F29])" office:value-type="float" office:value="398.407153792845" calcext:value-type="float">
            <text:p>398.4</text:p>
          </table:table-cell>
          <table:table-cell table:style-name="ce307" table:formula="of:=[.G29]*[.G$8]" office:value-type="float" office:value="9937.70031479699" calcext:value-type="float">
            <text:p>9938</text:p>
          </table:table-cell>
          <table:table-cell table:formula="of:=STDEVP([.B29:.F29])/AVERAGE([.B29:.F29])" office:value-type="percentage" office:value="0.0257838858152451" calcext:value-type="percentage">
            <text:p>2.6%</text:p>
          </table:table-cell>
          <table:table-cell table:style-name="ce212" table:formula="of:=IF([.H29]&gt;[.$A$43]; [.$C$43]; IF([.H29]&gt;[.$A$44]; [.$C$44]; IF([.H29]&gt;[.$A$45];[.$C$45];IF([.H29]&gt;[.$A$46];[.$C$46]; IF([.H29]&gt;[.$A$47];[.$C$47];IF([.H29]&gt;[.$A$48];[.$C$48];[.$C$49]))))))/100" office:value-type="percentage" office:value="0.113" calcext:value-type="percentage">
            <text:p>11.3%</text:p>
          </table:table-cell>
          <table:table-cell table:formula="of:=(MAX([.B29:.F29])-MIN([.B29:.F29]))/[.G29]" office:value-type="percentage" office:value="0.07731486806418" calcext:value-type="percentage">
            <text:p>7.7%</text:p>
          </table:table-cell>
          <table:table-cell table:formula="of:=COUNTA([.B29:.F29])"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0" office:value-type="float" office:value="4102.5362906793" calcext:value-type="float">
            <text:p>4103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count_25</text:p>
          </table:table-cell>
          <table:table-cell table:style-name="ce198" table:formula="of:=[.G74]/[.B$8]" office:value-type="float" office:value="326.495018165359" calcext:value-type="float">
            <text:p>326</text:p>
          </table:table-cell>
          <table:table-cell table:style-name="ce198" table:formula="of:=[.H74]/[.C$8]" office:value-type="float" office:value="308.201046463822" calcext:value-type="float">
            <text:p>308</text:p>
          </table:table-cell>
          <table:table-cell table:style-name="ce198" table:formula="of:=[.I74]/[.D$8]" office:value-type="float" office:value="307.259995027975" calcext:value-type="float">
            <text:p>307</text:p>
          </table:table-cell>
          <table:table-cell table:style-name="ce198" table:formula="of:=[.J74]/[.E$8]" office:value-type="float" office:value="319.850073239744" calcext:value-type="float">
            <text:p>320</text:p>
          </table:table-cell>
          <table:table-cell table:style-name="ce198" table:formula="of:=[.K74]/[.F$8]" office:value-type="float" office:value="293.725507162735" calcext:value-type="float">
            <text:p>294</text:p>
          </table:table-cell>
          <table:table-cell table:style-name="ce204" table:formula="of:=AVERAGE([.B30:.F30])" office:value-type="float" office:value="311.106328011927" calcext:value-type="float">
            <text:p>311.1</text:p>
          </table:table-cell>
          <table:table-cell table:style-name="ce307" table:formula="of:=[.G30]*[.G$8]" office:value-type="float" office:value="7760.10527016541" calcext:value-type="float">
            <text:p>7760</text:p>
          </table:table-cell>
          <table:table-cell table:formula="of:=STDEVP([.B30:.F30])/AVERAGE([.B30:.F30])" office:value-type="percentage" office:value="0.0363260469832094" calcext:value-type="percentage">
            <text:p>3.6%</text:p>
          </table:table-cell>
          <table:table-cell table:style-name="ce212" table:formula="of:=IF([.H30]&gt;[.$A$43]; [.$C$43]; IF([.H30]&gt;[.$A$44]; [.$C$44]; IF([.H30]&gt;[.$A$45];[.$C$45];IF([.H30]&gt;[.$A$46];[.$C$46]; IF([.H30]&gt;[.$A$47];[.$C$47];IF([.H30]&gt;[.$A$48];[.$C$48];[.$C$49]))))))/100" office:value-type="percentage" office:value="0.113" calcext:value-type="percentage">
            <text:p>11.3%</text:p>
          </table:table-cell>
          <table:table-cell table:formula="of:=(MAX([.B30:.F30])-MIN([.B30:.F30]))/[.G30]" office:value-type="percentage" office:value="0.105332190483017" calcext:value-type="percentage">
            <text:p>10.5%</text:p>
          </table:table-cell>
          <table:table-cell table:formula="of:=COUNTA([.B30:.F30])"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0" office:value-type="float" office:value="4862.427963117" calcext:value-type="float">
            <text:p>4862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count_26</text:p>
          </table:table-cell>
          <table:table-cell table:style-name="ce198" table:formula="of:=[.G75]/[.B$8]" office:value-type="float" office:value="232.3097199438" calcext:value-type="float">
            <text:p>232</text:p>
          </table:table-cell>
          <table:table-cell table:style-name="ce198" table:formula="of:=[.H75]/[.C$8]" office:value-type="float" office:value="229.721189462798" calcext:value-type="float">
            <text:p>230</text:p>
          </table:table-cell>
          <table:table-cell table:style-name="ce198" table:formula="of:=[.I75]/[.D$8]" office:value-type="float" office:value="226.255087247872" calcext:value-type="float">
            <text:p>226</text:p>
          </table:table-cell>
          <table:table-cell table:style-name="ce198" table:formula="of:=[.J75]/[.E$8]" office:value-type="float" office:value="232.384898890851" calcext:value-type="float">
            <text:p>232</text:p>
          </table:table-cell>
          <table:table-cell table:style-name="ce198" table:formula="of:=[.K75]/[.F$8]" office:value-type="float" office:value="205.210928652884" calcext:value-type="float">
            <text:p>205</text:p>
          </table:table-cell>
          <table:table-cell table:style-name="ce204" table:formula="of:=AVERAGE([.B31:.F31])" office:value-type="float" office:value="225.176364839641" calcext:value-type="float">
            <text:p>225.2</text:p>
          </table:table-cell>
          <table:table-cell table:style-name="ce307" table:formula="of:=[.G31]*[.G$8]" office:value-type="float" office:value="5616.7044453104" calcext:value-type="float">
            <text:p>5617</text:p>
          </table:table-cell>
          <table:table-cell table:formula="of:=STDEVP([.B31:.F31])/AVERAGE([.B31:.F31])" office:value-type="percentage" office:value="0.0454319645452415" calcext:value-type="percentage">
            <text:p>4.5%</text:p>
          </table:table-cell>
          <table:table-cell table:style-name="ce212" table:formula="of:=IF([.H31]&gt;[.$A$43]; [.$C$43]; IF([.H31]&gt;[.$A$44]; [.$C$44]; IF([.H31]&gt;[.$A$45];[.$C$45];IF([.H31]&gt;[.$A$46];[.$C$46]; IF([.H31]&gt;[.$A$47];[.$C$47];IF([.H31]&gt;[.$A$48];[.$C$48];[.$C$49]))))))/100" office:value-type="percentage" office:value="0.113" calcext:value-type="percentage">
            <text:p>11.3%</text:p>
          </table:table-cell>
          <table:table-cell table:formula="of:=(MAX([.B31:.F31])-MIN([.B31:.F31]))/[.G31]" office:value-type="percentage" office:value="0.120678607887285" calcext:value-type="percentage">
            <text:p>12.1%</text:p>
          </table:table-cell>
          <table:table-cell table:formula="of:=COUNTA([.B31:.F31])"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20" office:value-type="float" office:value="5763.07045722374" calcext:value-type="float">
            <text:p>5763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count_27</text:p>
          </table:table-cell>
          <table:table-cell table:style-name="ce198" table:formula="of:=[.G76]/[.B$8]" office:value-type="float" office:value="159.358160830227" calcext:value-type="float">
            <text:p>159</text:p>
          </table:table-cell>
          <table:table-cell table:style-name="ce198" table:formula="of:=[.H76]/[.C$8]" office:value-type="float" office:value="158.734384135238" calcext:value-type="float">
            <text:p>159</text:p>
          </table:table-cell>
          <table:table-cell table:style-name="ce198" table:formula="of:=[.I76]/[.D$8]" office:value-type="float" office:value="160.413659741878" calcext:value-type="float">
            <text:p>160</text:p>
          </table:table-cell>
          <table:table-cell table:style-name="ce198" table:formula="of:=[.J76]/[.E$8]" office:value-type="float" office:value="163.084049688906" calcext:value-type="float">
            <text:p>163</text:p>
          </table:table-cell>
          <table:table-cell table:style-name="ce198" table:formula="of:=[.K76]/[.F$8]" office:value-type="float" office:value="138.924226360753" calcext:value-type="float">
            <text:p>139</text:p>
          </table:table-cell>
          <table:table-cell table:style-name="ce204" table:formula="of:=AVERAGE([.B32:.F32])" office:value-type="float" office:value="156.1028961514" calcext:value-type="float">
            <text:p>156.1</text:p>
          </table:table-cell>
          <table:table-cell table:style-name="ce307" table:formula="of:=[.G32]*[.G$8]" office:value-type="float" office:value="3893.76492228125" calcext:value-type="float">
            <text:p>3894</text:p>
          </table:table-cell>
          <table:table-cell table:formula="of:=STDEVP([.B32:.F32])/AVERAGE([.B32:.F32])" office:value-type="percentage" office:value="0.0558426157555126" calcext:value-type="percentage">
            <text:p>5.6%</text:p>
          </table:table-cell>
          <table:table-cell table:style-name="ce212" table:formula="of:=IF([.H32]&gt;[.$A$43]; [.$C$43]; IF([.H32]&gt;[.$A$44]; [.$C$44]; IF([.H32]&gt;[.$A$45];[.$C$45];IF([.H32]&gt;[.$A$46];[.$C$46]; IF([.H32]&gt;[.$A$47];[.$C$47];IF([.H32]&gt;[.$A$48];[.$C$48];[.$C$49]))))))/100" office:value-type="percentage" office:value="0.119" calcext:value-type="percentage">
            <text:p>11.9%</text:p>
          </table:table-cell>
          <table:table-cell table:formula="of:=(MAX([.B32:.F32])-MIN([.B32:.F32]))/[.G32]" office:value-type="percentage" office:value="0.154768578442782" calcext:value-type="percentage">
            <text:p>15.5%</text:p>
          </table:table-cell>
          <table:table-cell table:formula="of:=COUNTA([.B32:.F32])" office:value-type="float" office:value="5" calcext:value-type="float">
            <text:p>5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0" office:value-type="float" office:value="6830.53432294641" calcext:value-type="float">
            <text:p>6831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count_28</text:p>
          </table:table-cell>
          <table:table-cell table:style-name="ce198" table:formula="of:=[.G77]/[.B$8]" office:value-type="float" office:value="111.004101475409" calcext:value-type="float">
            <text:p>111</text:p>
          </table:table-cell>
          <table:table-cell table:style-name="ce198" table:formula="of:=[.H77]/[.C$8]" office:value-type="float" office:value="113.184517383387" calcext:value-type="float">
            <text:p>113</text:p>
          </table:table-cell>
          <table:table-cell table:style-name="ce198" table:formula="of:=[.I77]/[.D$8]" office:value-type="float" office:value="111.930426760191" calcext:value-type="float">
            <text:p>112</text:p>
          </table:table-cell>
          <table:table-cell table:style-name="ce198" table:formula="of:=[.J77]/[.E$8]" office:value-type="float" office:value="113.527032168428" calcext:value-type="float">
            <text:p>114</text:p>
          </table:table-cell>
          <table:table-cell table:style-name="ce198" table:formula="of:=[.K77]/[.F$8]" office:value-type="float" office:value="98.0408111745885" calcext:value-type="float">
            <text:p>98</text:p>
          </table:table-cell>
          <table:table-cell table:style-name="ce204" table:formula="of:=AVERAGE([.B33:.F33])" office:value-type="float" office:value="109.5373777924" calcext:value-type="float">
            <text:p>109.5</text:p>
          </table:table-cell>
          <table:table-cell table:style-name="ce307" table:formula="of:=[.G33]*[.G$8]" office:value-type="float" office:value="2732.25423641759" calcext:value-type="float">
            <text:p>2732</text:p>
          </table:table-cell>
          <table:table-cell table:formula="of:=STDEVP([.B33:.F33])/AVERAGE([.B33:.F33])" office:value-type="percentage" office:value="0.0531177972527213" calcext:value-type="percentage">
            <text:p>5.3%</text:p>
          </table:table-cell>
          <table:table-cell table:style-name="ce212" table:formula="of:=IF([.H33]&gt;[.$A$43]; [.$C$43]; IF([.H33]&gt;[.$A$44]; [.$C$44]; IF([.H33]&gt;[.$A$45];[.$C$45];IF([.H33]&gt;[.$A$46];[.$C$46]; IF([.H33]&gt;[.$A$47];[.$C$47];IF([.H33]&gt;[.$A$48];[.$C$48];[.$C$49]))))))/100" office:value-type="percentage" office:value="0.119" calcext:value-type="percentage">
            <text:p>11.9%</text:p>
          </table:table-cell>
          <table:table-cell table:formula="of:=(MAX([.B33:.F33])-MIN([.B33:.F33]))/[.G33]" office:value-type="percentage" office:value="0.141378416262521" calcext:value-type="percentage">
            <text:p>14.1%</text:p>
          </table:table-cell>
          <table:table-cell table:formula="of:=COUNTA([.B33:.F33])" office:value-type="float" office:value="5" calcext:value-type="float">
            <text:p>5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0" office:value-type="float" office:value="8095.71902395668" calcext:value-type="float">
            <text:p>8096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count_29</text:p>
          </table:table-cell>
          <table:table-cell table:style-name="ce198" table:formula="of:=[.G78]/[.B$8]" office:value-type="float" office:value="79.6790804151133" calcext:value-type="float">
            <text:p>80</text:p>
          </table:table-cell>
          <table:table-cell table:style-name="ce198" table:formula="of:=[.H78]/[.C$8]" office:value-type="float" office:value="79.6629704231504" calcext:value-type="float">
            <text:p>80</text:p>
          </table:table-cell>
          <table:table-cell table:style-name="ce198" table:formula="of:=[.I78]/[.D$8]" office:value-type="float" office:value="76.0169208478301" calcext:value-type="float">
            <text:p>76</text:p>
          </table:table-cell>
          <table:table-cell table:style-name="ce198" table:formula="of:=[.J78]/[.E$8]" office:value-type="float" office:value="81.1471482108238" calcext:value-type="float">
            <text:p>81</text:p>
          </table:table-cell>
          <table:table-cell table:style-name="ce198" table:formula="of:=[.K78]/[.F$8]" office:value-type="float" office:value="68.8667236388304" calcext:value-type="float">
            <text:p>69</text:p>
          </table:table-cell>
          <table:table-cell table:style-name="ce204" table:formula="of:=AVERAGE([.B34:.F34])" office:value-type="float" office:value="77.0745687071496" calcext:value-type="float">
            <text:p>77.1</text:p>
          </table:table-cell>
          <table:table-cell table:style-name="ce307" table:formula="of:=[.G34]*[.G$8]" office:value-type="float" office:value="1922.51559343771" calcext:value-type="float">
            <text:p>1923</text:p>
          </table:table-cell>
          <table:table-cell table:formula="of:=STDEVP([.B34:.F34])/AVERAGE([.B34:.F34])" office:value-type="percentage" office:value="0.0576032035276882" calcext:value-type="percentage">
            <text:p>5.8%</text:p>
          </table:table-cell>
          <table:table-cell table:style-name="ce212" table:formula="of:=IF([.H34]&gt;[.$A$43]; [.$C$43]; IF([.H34]&gt;[.$A$44]; [.$C$44]; IF([.H34]&gt;[.$A$45];[.$C$45];IF([.H34]&gt;[.$A$46];[.$C$46]; IF([.H34]&gt;[.$A$47];[.$C$47];IF([.H34]&gt;[.$A$48];[.$C$48];[.$C$49]))))))/100" office:value-type="percentage" office:value="0.134" calcext:value-type="percentage">
            <text:p>13.4%</text:p>
          </table:table-cell>
          <table:table-cell table:formula="of:=(MAX([.B34:.F34])-MIN([.B34:.F34]))/[.G34]" office:value-type="percentage" office:value="0.1593317326063" calcext:value-type="percentage">
            <text:p>15.9%</text:p>
          </table:table-cell>
          <table:table-cell table:formula="of:=COUNTA([.B34:.F34])" office:value-type="float" office:value="5" calcext:value-type="float">
            <text:p>5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0" office:value-type="float" office:value="9595.24737247533" calcext:value-type="float">
            <text:p>9595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count_30</text:p>
          </table:table-cell>
          <table:table-cell table:style-name="ce198" table:formula="of:=[.G79]/[.B$8]" office:value-type="float" office:value="54.0304054529924" calcext:value-type="float">
            <text:p>54</text:p>
          </table:table-cell>
          <table:table-cell table:style-name="ce198" table:formula="of:=[.H79]/[.C$8]" office:value-type="float" office:value="59.9444133877171" calcext:value-type="float">
            <text:p>60</text:p>
          </table:table-cell>
          <table:table-cell table:style-name="ce198" table:formula="of:=[.I79]/[.D$8]" office:value-type="float" office:value="55.0673757322864" calcext:value-type="float">
            <text:p>55</text:p>
          </table:table-cell>
          <table:table-cell table:style-name="ce198" table:formula="of:=[.J79]/[.E$8]" office:value-type="float" office:value="60.6135632620996" calcext:value-type="float">
            <text:p>61</text:p>
          </table:table-cell>
          <table:table-cell table:style-name="ce198" table:formula="of:=[.K79]/[.F$8]" office:value-type="float" office:value="46.8373106016253" calcext:value-type="float">
            <text:p>47</text:p>
          </table:table-cell>
          <table:table-cell table:style-name="ce204" table:formula="of:=AVERAGE([.B35:.F35])" office:value-type="float" office:value="55.2986136873441" calcext:value-type="float">
            <text:p>55.3</text:p>
          </table:table-cell>
          <table:table-cell table:style-name="ce307" table:formula="of:=[.G35]*[.G$8]" office:value-type="float" office:value="1379.34533910075" calcext:value-type="float">
            <text:p>1379</text:p>
          </table:table-cell>
          <table:table-cell table:formula="of:=STDEVP([.B35:.F35])/AVERAGE([.B35:.F35])" office:value-type="percentage" office:value="0.0897238572220067" calcext:value-type="percentage">
            <text:p>9.0%</text:p>
          </table:table-cell>
          <table:table-cell table:style-name="ce212" table:formula="of:=IF([.H35]&gt;[.$A$43]; [.$C$43]; IF([.H35]&gt;[.$A$44]; [.$C$44]; IF([.H35]&gt;[.$A$45];[.$C$45];IF([.H35]&gt;[.$A$46];[.$C$46]; IF([.H35]&gt;[.$A$47];[.$C$47];IF([.H35]&gt;[.$A$48];[.$C$48];[.$C$49]))))))/100" office:value-type="percentage" office:value="0.134" calcext:value-type="percentage">
            <text:p>13.4%</text:p>
          </table:table-cell>
          <table:table-cell table:formula="of:=(MAX([.B35:.F35])-MIN([.B35:.F35]))/[.G35]" office:value-type="percentage" office:value="0.249124738250485" calcext:value-type="percentage">
            <text:p>24.9%</text:p>
          </table:table-cell>
          <table:table-cell table:formula="of:=COUNTA([.B35:.F35])"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0" office:value-type="float" office:value="11372.5256356535" calcext:value-type="float">
            <text:p>11373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count_38</text:p>
          </table:table-cell>
          <table:table-cell table:style-name="ce198" table:formula="of:=[.G80]/[.B$8]" office:value-type="float" office:value="10.0912819523099" calcext:value-type="float">
            <text:p>10</text:p>
          </table:table-cell>
          <table:table-cell table:style-name="ce198" table:formula="of:=[.H80]/[.C$8]" office:value-type="float" office:value="10.2536496584253" calcext:value-type="float">
            <text:p>10</text:p>
          </table:table-cell>
          <table:table-cell table:style-name="ce198" table:formula="of:=[.I80]/[.D$8]" office:value-type="float" office:value="10.1754933418355" calcext:value-type="float">
            <text:p>10</text:p>
          </table:table-cell>
          <table:table-cell table:style-name="ce198" table:formula="of:=[.J80]/[.E$8]" office:value-type="float" office:value="11.6488606920647" calcext:value-type="float">
            <text:p>12</text:p>
          </table:table-cell>
          <table:table-cell table:style-name="ce198" table:formula="of:=[.K80]/[.F$8]" office:value-type="float" office:value="7.34313767906837" calcext:value-type="float">
            <text:p>7</text:p>
          </table:table-cell>
          <table:table-cell table:style-name="ce204" table:formula="of:=AVERAGE([.B36:.F36])" office:value-type="float" office:value="9.90248466474076" calcext:value-type="float">
            <text:p>9.9</text:p>
          </table:table-cell>
          <table:table-cell table:style-name="ce307" table:formula="of:=[.G36]*[.G$8]" office:value-type="float" office:value="247.00340853125" calcext:value-type="float">
            <text:p>247</text:p>
          </table:table-cell>
          <table:table-cell table:formula="of:=STDEVP([.B36:.F36])/AVERAGE([.B36:.F36])" office:value-type="percentage" office:value="0.141620679587741" calcext:value-type="percentage">
            <text:p>14.2%</text:p>
          </table:table-cell>
          <table:table-cell table:style-name="ce212" table:formula="of:=IF([.H36]&gt;[.$A$43]; [.$C$43]; IF([.H36]&gt;[.$A$44]; [.$C$44]; IF([.H36]&gt;[.$A$45];[.$C$45];IF([.H36]&gt;[.$A$46];[.$C$46]; IF([.H36]&gt;[.$A$47];[.$C$47];IF([.H36]&gt;[.$A$48];[.$C$48];[.$C$49]))))))/100" office:value-type="percentage" office:value="0.193" calcext:value-type="percentage">
            <text:p>19.3%</text:p>
          </table:table-cell>
          <table:table-cell table:formula="of:=(MAX([.B36:.F36])-MIN([.B36:.F36]))/[.G36]" office:value-type="percentage" office:value="0.434812388887359" calcext:value-type="percentage">
            <text:p>43.5%</text:p>
          </table:table-cell>
          <table:table-cell table:formula="of:=COUNTA([.B36:.F36])"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20" office:value-type="float" office:value="13479" calcext:value-type="float">
            <text:p>13479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count_50</text:p>
          </table:table-cell>
          <table:table-cell table:style-name="ce198" table:formula="of:=[.G81]/[.B$8]" office:value-type="float" office:value="7.35822642355928" calcext:value-type="float">
            <text:p>7</text:p>
          </table:table-cell>
          <table:table-cell table:style-name="ce198" table:formula="of:=[.H81]/[.C$8]" office:value-type="float" office:value="6.70430939204731" calcext:value-type="float">
            <text:p>7</text:p>
          </table:table-cell>
          <table:table-cell table:style-name="ce198" table:formula="of:=[.I81]/[.D$8]" office:value-type="float" office:value="6.78366222789035" calcext:value-type="float">
            <text:p>7</text:p>
          </table:table-cell>
          <table:table-cell table:style-name="ce198" table:formula="of:=[.J81]/[.E$8]" office:value-type="float" office:value="6.51546445488367" calcext:value-type="float">
            <text:p>7</text:p>
          </table:table-cell>
          <table:table-cell table:style-name="ce198" table:formula="of:=[.K81]/[.F$8]" office:value-type="float" office:value="3.77080042979186" calcext:value-type="float">
            <text:p>4</text:p>
          </table:table-cell>
          <table:table-cell table:style-name="ce204" table:formula="of:=AVERAGE([.B37:.F37])" office:value-type="float" office:value="6.22649258563449" calcext:value-type="float">
            <text:p>6.2</text:p>
          </table:table-cell>
          <table:table-cell table:style-name="ce307" table:formula="of:=[.G37]*[.G$8]" office:value-type="float" office:value="155.311009702688" calcext:value-type="float">
            <text:p>155</text:p>
          </table:table-cell>
          <table:table-cell table:formula="of:=STDEVP([.B37:.F37])/AVERAGE([.B37:.F37])" office:value-type="percentage" office:value="0.202303714114749" calcext:value-type="percentage">
            <text:p>20.2%</text:p>
          </table:table-cell>
          <table:table-cell table:style-name="ce212" table:formula="of:=IF([.H37]&gt;[.$A$43]; [.$C$43]; IF([.H37]&gt;[.$A$44]; [.$C$44]; IF([.H37]&gt;[.$A$45];[.$C$45];IF([.H37]&gt;[.$A$46];[.$C$46]; IF([.H37]&gt;[.$A$47];[.$C$47];IF([.H37]&gt;[.$A$48];[.$C$48];[.$C$49]))))))/100" office:value-type="percentage" office:value="0.275" calcext:value-type="percentage">
            <text:p>27.5%</text:p>
          </table:table-cell>
          <table:table-cell table:formula="of:=(MAX([.B37:.F37])-MIN([.B37:.F37]))/[.G37]" office:value-type="percentage" office:value="0.576155185994146" calcext:value-type="percentage">
            <text:p>57.6%</text:p>
          </table:table-cell>
          <table:table-cell table:formula="of:=COUNTA([.B37:.F37])" office:value-type="float" office:value="5" calcext:value-type="float">
            <text:p>5</text:p>
          </table:table-cell>
          <table:table-cell/>
          <table:table-cell office:value-type="float" office:value="29" calcext:value-type="float">
            <text:p>29</text:p>
          </table:table-cell>
          <table:table-cell table:style-name="Default"/>
          <table:table-cell table:number-columns-repeated="34"/>
        </table:table-row>
        <table:table-row table:style-name="ro2">
          <table:table-cell office:value-type="string" calcext:value-type="string">
            <text:p>count_70</text:p>
          </table:table-cell>
          <table:table-cell table:style-name="ce198" table:formula="of:=[.G82]/[.B$8]" office:value-type="float" office:value="2.52282048807747" calcext:value-type="float">
            <text:p>3</text:p>
          </table:table-cell>
          <table:table-cell table:style-name="ce198" table:formula="of:=[.H82]/[.C$8]" office:value-type="float" office:value="1.77467013318899" calcext:value-type="float">
            <text:p>2</text:p>
          </table:table-cell>
          <table:table-cell table:style-name="ce198" table:formula="of:=[.I82]/[.D$8]" office:value-type="float" office:value="3.19231163665428" calcext:value-type="float">
            <text:p>3</text:p>
          </table:table-cell>
          <table:table-cell table:style-name="ce198" table:formula="of:=[.J82]/[.E$8]" office:value-type="float" office:value="1.57950653451725" calcext:value-type="float">
            <text:p>2</text:p>
          </table:table-cell>
          <table:table-cell table:style-name="ce198" table:formula="of:=[.K82]/[.F$8]" office:value-type="float" office:value="0.992315902576806" calcext:value-type="float">
            <text:p>1</text:p>
          </table:table-cell>
          <table:table-cell table:style-name="ce204" table:formula="of:=AVERAGE([.B38:.F38])" office:value-type="float" office:value="2.01232493900296" calcext:value-type="float">
            <text:p>2.0</text:p>
          </table:table-cell>
          <table:table-cell table:style-name="ce307" table:formula="of:=[.G38]*[.G$8]" office:value-type="float" office:value="50.1945860896905" calcext:value-type="float">
            <text:p>50</text:p>
          </table:table-cell>
          <table:table-cell table:formula="of:=STDEVP([.B38:.F38])/AVERAGE([.B38:.F38])" office:value-type="percentage" office:value="0.380876316018305" calcext:value-type="percentage">
            <text:p>38.1%</text:p>
          </table:table-cell>
          <table:table-cell table:style-name="ce212" table:formula="of:=IF([.H38]&gt;[.$A$43]; [.$C$43]; IF([.H38]&gt;[.$A$44]; [.$C$44]; IF([.H38]&gt;[.$A$45];[.$C$45];IF([.H38]&gt;[.$A$46];[.$C$46]; IF([.H38]&gt;[.$A$47];[.$C$47];IF([.H38]&gt;[.$A$48];[.$C$48];[.$C$49]))))))/100" office:value-type="percentage" office:value="0.275" calcext:value-type="percentage">
            <text:p>27.5%</text:p>
          </table:table-cell>
          <table:table-cell table:formula="of:=(MAX([.B38:.F38])-MIN([.B38:.F38]))/[.G38]" office:value-type="percentage" office:value="1.09326068143224" calcext:value-type="percentage">
            <text:p>109.3%</text:p>
          </table:table-cell>
          <table:table-cell table:formula="of:=COUNTA([.B38:.F38])"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table:style-name="Default"/>
          <table:table-cell table:number-columns-repeated="34"/>
        </table:table-row>
        <table:table-row table:style-name="ro2">
          <table:table-cell table:style-name="Default" table:number-columns-repeated="7"/>
          <table:table-cell table:style-name="ce308"/>
          <table:table-cell table:style-name="Default" table:number-columns-repeated="2"/>
          <table:table-cell table:style-name="ce310"/>
          <table:table-cell table:number-columns-repeated="3"/>
          <table:table-cell table:style-name="Default"/>
          <table:table-cell table:number-columns-repeated="34"/>
        </table:table-row>
        <table:table-row table:style-name="ro2">
          <table:table-cell table:style-name="Default" office:value-type="string" calcext:value-type="string">
            <text:p>Table C.2</text:p>
          </table:table-cell>
          <table:table-cell table:style-name="Default" table:number-columns-repeated="6"/>
          <table:table-cell table:style-name="ce308"/>
          <table:table-cell table:style-name="Default" table:number-columns-repeated="2"/>
          <table:table-cell table:style-name="ce310"/>
          <table:table-cell table:number-columns-repeated="3"/>
          <table:table-cell table:style-name="Default"/>
          <table:table-cell table:number-columns-repeated="34"/>
        </table:table-row>
        <table:table-row table:style-name="ro2">
          <table:table-cell table:style-name="ce115"/>
          <table:table-cell table:style-name="ce199" office:value-type="string" calcext:value-type="string">
            <text:p>Mean counted X</text:p>
          </table:table-cell>
          <table:table-cell table:style-name="ce115"/>
          <table:table-cell table:style-name="ce201" office:value-type="string" calcext:value-type="string">
            <text:p>C<text:span text:style-name="T6">V_MAX</text:span></text:p>
          </table:table-cell>
          <table:table-cell table:style-name="ce117" table:number-columns-repeated="3"/>
          <table:table-cell table:style-name="ce118"/>
          <table:table-cell table:style-name="Default" table:number-columns-repeated="3"/>
          <table:table-cell table:number-columns-repeated="3"/>
          <table:table-cell table:style-name="Default"/>
          <table:table-cell table:number-columns-repeated="34"/>
        </table:table-row>
        <table:table-row table:style-name="ro2">
          <table:table-cell table:style-name="ce193" office:value-type="string" calcext:value-type="string">
            <text:p>X &gt;=</text:p>
          </table:table-cell>
          <table:table-cell table:style-name="ce200" office:value-type="string" calcext:value-type="string">
            <text:p>X &lt;</text:p>
          </table:table-cell>
          <table:table-cell table:style-name="ce193" office:value-type="string" calcext:value-type="string">
            <text:p>D<text:span text:style-name="T6">QMAX / SAMPLE</text:span></text:p>
          </table:table-cell>
          <table:table-cell table:style-name="ce193" office:value-type="string" calcext:value-type="string">
            <text:p>N=3</text:p>
          </table:table-cell>
          <table:table-cell table:style-name="ce200" office:value-type="string" calcext:value-type="string">
            <text:p>N=6</text:p>
          </table:table-cell>
          <table:table-cell table:style-name="ce200" office:value-type="string" calcext:value-type="string">
            <text:p>N=10</text:p>
          </table:table-cell>
          <table:table-cell table:style-name="ce200" office:value-type="string" calcext:value-type="string">
            <text:p>N=20</text:p>
          </table:table-cell>
          <table:table-cell table:style-name="ce210" office:value-type="string" calcext:value-type="string">
            <text:p>N=40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34"/>
        </table:table-row>
        <table:table-row table:style-name="ro2">
          <table:table-cell table:style-name="ce164" office:value-type="float" office:value="10000" calcext:value-type="float">
            <text:p>10000</text:p>
          </table:table-cell>
          <table:table-cell table:style-name="Default"/>
          <table:table-cell table:style-name="ce164" office:value-type="float" office:value="11" calcext:value-type="float">
            <text:p>11</text:p>
          </table:table-cell>
          <table:table-cell table:style-name="ce164" office:value-type="float" office:value="7.8" calcext:value-type="float">
            <text:p>7.8</text:p>
          </table:table-cell>
          <table:table-cell table:style-name="Default" office:value-type="float" office:value="5.3" calcext:value-type="float">
            <text:p>5.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7" calcext:value-type="float">
            <text:p>2.7</text:p>
          </table:table-cell>
          <table:table-cell table:style-name="ce173" office:value-type="float" office:value="1.8" calcext:value-type="float">
            <text:p>1.8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34"/>
        </table:table-row>
        <table:table-row table:style-name="ro2">
          <table:table-cell table:style-name="ce164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ce164" office:value-type="float" office:value="11.3" calcext:value-type="float">
            <text:p>11.3</text:p>
          </table:table-cell>
          <table:table-cell table:style-name="ce164" office:value-type="float" office:value="7.8" calcext:value-type="float">
            <text:p>7.8</text:p>
          </table:table-cell>
          <table:table-cell table:style-name="Default" office:value-type="float" office:value="5.3" calcext:value-type="float">
            <text:p>5.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7" calcext:value-type="float">
            <text:p>2.7</text:p>
          </table:table-cell>
          <table:table-cell table:style-name="ce173" office:value-type="float" office:value="1.9" calcext:value-type="float">
            <text:p>1.9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34"/>
        </table:table-row>
        <table:table-row table:style-name="ro2">
          <table:table-cell table:style-name="ce164" office:value-type="float" office:value="2000" calcext:value-type="float">
            <text:p>2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4" office:value-type="float" office:value="11.9" calcext:value-type="float">
            <text:p>11.9</text:p>
          </table:table-cell>
          <table:table-cell table:style-name="ce164" office:value-type="float" office:value="7.9" calcext:value-type="float">
            <text:p>7.9</text:p>
          </table:table-cell>
          <table:table-cell table:style-name="Default" office:value-type="float" office:value="5.4" calcext:value-type="float">
            <text:p>5.4</text:p>
          </table:table-cell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2.9" calcext:value-type="float">
            <text:p>2.9</text:p>
          </table:table-cell>
          <table:table-cell table:style-name="ce173" office:value-type="float" office:value="2.1" calcext:value-type="float">
            <text:p>2.1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34"/>
        </table:table-row>
        <table:table-row table:style-name="ro2">
          <table:table-cell table:style-name="ce164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ce164" office:value-type="float" office:value="13.4" calcext:value-type="float">
            <text:p>13.4</text:p>
          </table:table-cell>
          <table:table-cell table:style-name="ce164" office:value-type="float" office:value="8" calcext:value-type="float">
            <text:p>8</text:p>
          </table:table-cell>
          <table:table-cell table:style-name="Default" office:value-type="float" office:value="5.6" calcext:value-type="float">
            <text:p>5.6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3.1" calcext:value-type="float">
            <text:p>3.1</text:p>
          </table:table-cell>
          <table:table-cell table:style-name="ce173" office:value-type="float" office:value="2.4" calcext:value-type="float">
            <text:p>2.4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34"/>
        </table:table-row>
        <table:table-row table:style-name="ro2">
          <table:table-cell table:style-name="ce164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ce164" office:value-type="float" office:value="15.6" calcext:value-type="float">
            <text:p>15.6</text:p>
          </table:table-cell>
          <table:table-cell table:style-name="ce164" office:value-type="float" office:value="8.2" calcext:value-type="float">
            <text:p>8.2</text:p>
          </table:table-cell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4.7" calcext:value-type="float">
            <text:p>4.7</text:p>
          </table:table-cell>
          <table:table-cell table:style-name="Default" office:value-type="float" office:value="3.6" calcext:value-type="float">
            <text:p>3.6</text:p>
          </table:table-cell>
          <table:table-cell table:style-name="ce173" office:value-type="float" office:value="2.9" calcext:value-type="float">
            <text:p>2.9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34"/>
        </table:table-row>
        <table:table-row table:style-name="ro2">
          <table:table-cell table:style-name="ce164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ce164" office:value-type="float" office:value="19.3" calcext:value-type="float">
            <text:p>19.3</text:p>
          </table:table-cell>
          <table:table-cell table:style-name="ce164" office:value-type="float" office:value="8.9" calcext:value-type="float">
            <text:p>8.9</text:p>
          </table:table-cell>
          <table:table-cell table:style-name="Default" office:value-type="float" office:value="6.8" calcext:value-type="float">
            <text:p>6.8</text:p>
          </table:table-cell>
          <table:table-cell table:style-name="Default" office:value-type="float" office:value="5.7" calcext:value-type="float">
            <text:p>5.7</text:p>
          </table:table-cell>
          <table:table-cell table:style-name="Default" office:value-type="float" office:value="4.7" calcext:value-type="float">
            <text:p>4.7</text:p>
          </table:table-cell>
          <table:table-cell table:style-name="ce173" office:value-type="float" office:value="4.1" calcext:value-type="float">
            <text:p>4.1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34"/>
        </table:table-row>
        <table:table-row table:style-name="ro2">
          <table:table-cell table:style-name="ce165" office:value-type="float" office:value="100" calcext:value-type="float">
            <text:p>100</text:p>
          </table:table-cell>
          <table:table-cell table:style-name="ce91" office:value-type="float" office:value="200" calcext:value-type="float">
            <text:p>200</text:p>
          </table:table-cell>
          <table:table-cell table:style-name="ce165" office:value-type="float" office:value="27.5" calcext:value-type="float">
            <text:p>27.5</text:p>
          </table:table-cell>
          <table:table-cell table:style-name="ce165" office:value-type="float" office:value="10" calcext:value-type="float">
            <text:p>10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7" calcext:value-type="float">
            <text:p>7</text:p>
          </table:table-cell>
          <table:table-cell table:style-name="ce91" office:value-type="float" office:value="6.1" calcext:value-type="float">
            <text:p>6.1</text:p>
          </table:table-cell>
          <table:table-cell table:style-name="ce211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34"/>
        </table:table-row>
        <table:table-row table:style-name="ro2">
          <table:table-cell table:style-name="Default" table:number-columns-repeated="11"/>
          <table:table-cell table:number-columns-repeated="3"/>
          <table:table-cell table:style-name="Default"/>
          <table:table-cell table:number-columns-repeated="34"/>
        </table:table-row>
        <table:table-row table:style-name="ro2">
          <table:table-cell table:style-name="ce217"/>
          <table:table-cell table:style-name="ce220" office:value-type="string" calcext:value-type="string">
            <text:p>Portion 1</text:p>
          </table:table-cell>
          <table:table-cell table:style-name="ce220" office:value-type="string" calcext:value-type="string">
            <text:p>Portion 2</text:p>
          </table:table-cell>
          <table:table-cell table:style-name="ce220" office:value-type="string" calcext:value-type="string">
            <text:p>Portion 3</text:p>
          </table:table-cell>
          <table:table-cell table:style-name="ce220" office:value-type="string" calcext:value-type="string">
            <text:p>Portion 4</text:p>
          </table:table-cell>
          <table:table-cell table:style-name="ce220" office:value-type="string" calcext:value-type="string">
            <text:p>Portion 5</text:p>
          </table:table-cell>
          <table:table-cell table:style-name="ce220" office:value-type="string" calcext:value-type="string">
            <text:p>Portion 1</text:p>
          </table:table-cell>
          <table:table-cell table:style-name="ce220" office:value-type="string" calcext:value-type="string">
            <text:p>Portion 2</text:p>
          </table:table-cell>
          <table:table-cell table:style-name="ce220" office:value-type="string" calcext:value-type="string">
            <text:p>Portion 3</text:p>
          </table:table-cell>
          <table:table-cell table:style-name="ce220" office:value-type="string" calcext:value-type="string">
            <text:p>Portion 4</text:p>
          </table:table-cell>
          <table:table-cell table:style-name="ce220" office:value-type="string" calcext:value-type="string">
            <text:p>Portion 5</text:p>
          </table:table-cell>
          <table:table-cell table:style-name="ce220" office:value-type="string" calcext:value-type="string">
            <text:p>Portion 1</text:p>
          </table:table-cell>
          <table:table-cell table:style-name="ce220" office:value-type="string" calcext:value-type="string">
            <text:p>Portion 2</text:p>
          </table:table-cell>
          <table:table-cell table:style-name="ce220" office:value-type="string" calcext:value-type="string">
            <text:p>Portion 3</text:p>
          </table:table-cell>
          <table:table-cell table:style-name="ce220" office:value-type="string" calcext:value-type="string">
            <text:p>Portion 4</text:p>
          </table:table-cell>
          <table:table-cell table:style-name="ce220" office:value-type="string" calcext:value-type="string">
            <text:p>Portion 5</text:p>
          </table:table-cell>
          <table:table-cell table:style-name="ce166" table:number-columns-repeated="33"/>
        </table:table-row>
        <table:table-row table:style-name="ro2">
          <table:table-cell table:style-name="ce218" office:value-type="string" calcext:value-type="string">
            <text:p>NAME</text:p>
          </table:table-cell>
          <table:table-cell table:formula="of:=['file:///D:/mp/projects/PR0118%20-%20ISO%2011171%20Calibrations/results/2025-05-19-LPA3-NAVAIR-11171-00009/11171-00009-LIVE.ods'#$'6 - B1'.$B$52]" office:value-type="float" office:value="4.475147" calcext:value-type="float">
            <text:p>4.475147</text:p>
          </table:table-cell>
          <table:table-cell table:formula="of:=['file:///D:/mp/projects/PR0118%20-%20ISO%2011171%20Calibrations/results/2025-05-19-LPA3-NAVAIR-11171-00009/11171-00009-LIVE.ods'#$'6 - B1'.$C$52]" office:value-type="float" office:value="4.733991" calcext:value-type="float">
            <text:p>4.733991</text:p>
          </table:table-cell>
          <table:table-cell table:formula="of:=['file:///D:/mp/projects/PR0118%20-%20ISO%2011171%20Calibrations/results/2025-05-19-LPA3-NAVAIR-11171-00009/11171-00009-LIVE.ods'#$'6 - B1'.$D$52]" office:value-type="float" office:value="4.720532" calcext:value-type="float">
            <text:p>4.720532</text:p>
          </table:table-cell>
          <table:table-cell table:formula="of:=['file:///D:/mp/projects/PR0118%20-%20ISO%2011171%20Calibrations/results/2025-05-19-LPA3-NAVAIR-11171-00009/11171-00009-LIVE.ods'#$'6 - B1'.$E$52]" office:value-type="float" office:value="4.753982" calcext:value-type="float">
            <text:p>4.753982</text:p>
          </table:table-cell>
          <table:table-cell table:formula="of:=['file:///D:/mp/projects/PR0118%20-%20ISO%2011171%20Calibrations/results/2025-05-19-LPA3-NAVAIR-11171-00009/11171-00009-LIVE.ods'#$'6 - B1'.$F$52]" office:value-type="float" office:value="4.776061" calcext:value-type="float">
            <text:p>4.776061</text:p>
          </table:table-cell>
          <table:table-cell table:formula="of:=['file:///D:/mp/projects/PR0118%20-%20ISO%2011171%20Calibrations/results/2025-05-19-LPA3-NAVAIR-11171-00009/11171-00009-LIVE.ods'#$'6 - B1'.$G$52]" office:value-type="float" office:value="4.756581" calcext:value-type="float">
            <text:p>4.756581</text:p>
          </table:table-cell>
          <table:table-cell table:formula="of:=['file:///D:/mp/projects/PR0118%20-%20ISO%2011171%20Calibrations/results/2025-05-19-LPA3-NAVAIR-11171-00009/11171-00009-LIVE.ods'#$'6 - B1'.$H$52]" office:value-type="float" office:value="5.071365" calcext:value-type="float">
            <text:p>5.071365</text:p>
          </table:table-cell>
          <table:table-cell table:style-name="ce221" table:formula="of:=['file:///D:/mp/projects/PR0118%20-%20ISO%2011171%20Calibrations/results/2025-05-19-LPA3-NAVAIR-11171-00009/11171-00009-LIVE.ods'#$'6 - B1'.$I$52]" office:value-type="float" office:value="5.012042" calcext:value-type="float">
            <text:p>5.012042</text:p>
          </table:table-cell>
          <table:table-cell table:formula="of:=['file:///D:/mp/projects/PR0118%20-%20ISO%2011171%20Calibrations/results/2025-05-19-LPA3-NAVAIR-11171-00009/11171-00009-LIVE.ods'#$'6 - B1'.$J$52]" office:value-type="float" office:value="5.064873" calcext:value-type="float">
            <text:p>5.064873</text:p>
          </table:table-cell>
          <table:table-cell table:style-name="ce221" table:formula="of:=['file:///D:/mp/projects/PR0118%20-%20ISO%2011171%20Calibrations/results/2025-05-19-LPA3-NAVAIR-11171-00009/11171-00009-LIVE.ods'#$'6 - B1'.$K$52]" office:value-type="float" office:value="5.038718" calcext:value-type="float">
            <text:p>5.038718</text:p>
          </table:table-cell>
          <table:table-cell table:style-name="ce221" table:formula="of:=['file:///D:/mp/projects/PR0118%20-%20ISO%2011171%20Calibrations/results/2025-05-19-LPA3-NAVAIR-11171-00009/11171-00009-LIVE.ods'#$'6 - B1'.$L$52]" office:value-type="float" office:value="4.489153" calcext:value-type="float">
            <text:p>4.489153</text:p>
          </table:table-cell>
          <table:table-cell table:style-name="ce221" table:formula="of:=['file:///D:/mp/projects/PR0118%20-%20ISO%2011171%20Calibrations/results/2025-05-19-LPA3-NAVAIR-11171-00009/11171-00009-LIVE.ods'#$'6 - B1'.$M$52]" office:value-type="float" office:value="4.796755" calcext:value-type="float">
            <text:p>4.796755</text:p>
          </table:table-cell>
          <table:table-cell table:style-name="ce221" table:formula="of:=['file:///D:/mp/projects/PR0118%20-%20ISO%2011171%20Calibrations/results/2025-05-19-LPA3-NAVAIR-11171-00009/11171-00009-LIVE.ods'#$'6 - B1'.$N$52]" office:value-type="float" office:value="4.784308" calcext:value-type="float">
            <text:p>4.784308</text:p>
          </table:table-cell>
          <table:table-cell table:formula="of:=['file:///D:/mp/projects/PR0118%20-%20ISO%2011171%20Calibrations/results/2025-05-19-LPA3-NAVAIR-11171-00009/11171-00009-LIVE.ods'#$'6 - B1'.$O$52]" office:value-type="float" office:value="4.787062" calcext:value-type="float">
            <text:p>4.787062</text:p>
          </table:table-cell>
          <table:table-cell table:style-name="ce221" table:formula="of:=['file:///D:/mp/projects/PR0118%20-%20ISO%2011171%20Calibrations/results/2025-05-19-LPA3-NAVAIR-11171-00009/11171-00009-LIVE.ods'#$'6 - B1'.$P$52]" office:value-type="float" office:value="4.805943" calcext:value-type="float">
            <text:p>4.805943</text:p>
          </table:table-cell>
          <table:table-cell table:style-name="ce227" table:number-columns-repeated="33"/>
        </table:table-row>
        <table:table-row table:style-name="ro2">
          <table:table-cell table:style-name="ce218" table:formula="of:=['file:///D:/mp/projects/PR0118%20-%20ISO%2011171%20Calibrations/results/2025-05-19-LPA3-NAVAIR-11171-00009/11171-00009-LIVE.ods'#$'6 - B1'.$A$53]" office:value-type="float" office:value="4" calcext:value-type="float">
            <text:p>4</text:p>
          </table:table-cell>
          <table:table-cell table:formula="of:=['file:///D:/mp/projects/PR0118%20-%20ISO%2011171%20Calibrations/results/2025-05-19-LPA3-NAVAIR-11171-00009/11171-00009-LIVE.ods'#$'6 - B1'.$B$53]" office:value-type="float" office:value="64899" calcext:value-type="float">
            <text:p>64899</text:p>
          </table:table-cell>
          <table:table-cell table:formula="of:=['file:///D:/mp/projects/PR0118%20-%20ISO%2011171%20Calibrations/results/2025-05-19-LPA3-NAVAIR-11171-00009/11171-00009-LIVE.ods'#$'6 - B1'.$C$53]" office:value-type="float" office:value="68924" calcext:value-type="float">
            <text:p>68924</text:p>
          </table:table-cell>
          <table:table-cell table:formula="of:=['file:///D:/mp/projects/PR0118%20-%20ISO%2011171%20Calibrations/results/2025-05-19-LPA3-NAVAIR-11171-00009/11171-00009-LIVE.ods'#$'6 - B1'.$D$53]" office:value-type="float" office:value="68636" calcext:value-type="float">
            <text:p>68636</text:p>
          </table:table-cell>
          <table:table-cell table:formula="of:=['file:///D:/mp/projects/PR0118%20-%20ISO%2011171%20Calibrations/results/2025-05-19-LPA3-NAVAIR-11171-00009/11171-00009-LIVE.ods'#$'6 - B1'.$E$53]" office:value-type="float" office:value="68505" calcext:value-type="float">
            <text:p>68505</text:p>
          </table:table-cell>
          <table:table-cell table:formula="of:=['file:///D:/mp/projects/PR0118%20-%20ISO%2011171%20Calibrations/results/2025-05-19-LPA3-NAVAIR-11171-00009/11171-00009-LIVE.ods'#$'6 - B1'.$F$53]" office:value-type="float" office:value="68193" calcext:value-type="float">
            <text:p>68193</text:p>
          </table:table-cell>
          <table:table-cell table:formula="of:=['file:///D:/mp/projects/PR0118%20-%20ISO%2011171%20Calibrations/results/2025-05-19-LPA3-NAVAIR-11171-00009/11171-00009-LIVE.ods'#$'6 - B1'.$G$53]" office:value-type="float" office:value="51992" calcext:value-type="float">
            <text:p>51992</text:p>
          </table:table-cell>
          <table:table-cell table:formula="of:=['file:///D:/mp/projects/PR0118%20-%20ISO%2011171%20Calibrations/results/2025-05-19-LPA3-NAVAIR-11171-00009/11171-00009-LIVE.ods'#$'6 - B1'.$H$53]" office:value-type="float" office:value="53940" calcext:value-type="float">
            <text:p>53940</text:p>
          </table:table-cell>
          <table:table-cell table:style-name="ce221" table:formula="of:=['file:///D:/mp/projects/PR0118%20-%20ISO%2011171%20Calibrations/results/2025-05-19-LPA3-NAVAIR-11171-00009/11171-00009-LIVE.ods'#$'6 - B1'.$I$53]" office:value-type="float" office:value="53282" calcext:value-type="float">
            <text:p>53282</text:p>
          </table:table-cell>
          <table:table-cell table:formula="of:=['file:///D:/mp/projects/PR0118%20-%20ISO%2011171%20Calibrations/results/2025-05-19-LPA3-NAVAIR-11171-00009/11171-00009-LIVE.ods'#$'6 - B1'.$J$53]" office:value-type="float" office:value="53242" calcext:value-type="float">
            <text:p>53242</text:p>
          </table:table-cell>
          <table:table-cell table:style-name="ce221" table:formula="of:=['file:///D:/mp/projects/PR0118%20-%20ISO%2011171%20Calibrations/results/2025-05-19-LPA3-NAVAIR-11171-00009/11171-00009-LIVE.ods'#$'6 - B1'.$K$53]" office:value-type="float" office:value="53515" calcext:value-type="float">
            <text:p>53515</text:p>
          </table:table-cell>
          <table:table-cell table:style-name="ce221" table:formula="of:=['file:///D:/mp/projects/PR0118%20-%20ISO%2011171%20Calibrations/results/2025-05-19-LPA3-NAVAIR-11171-00009/11171-00009-LIVE.ods'#$'6 - B1'.$L$53]" office:value-type="float" office:value="48799" calcext:value-type="float">
            <text:p>48799</text:p>
          </table:table-cell>
          <table:table-cell table:style-name="ce221" table:formula="of:=['file:///D:/mp/projects/PR0118%20-%20ISO%2011171%20Calibrations/results/2025-05-19-LPA3-NAVAIR-11171-00009/11171-00009-LIVE.ods'#$'6 - B1'.$M$53]" office:value-type="float" office:value="51430" calcext:value-type="float">
            <text:p>51430</text:p>
          </table:table-cell>
          <table:table-cell table:style-name="ce221" table:formula="of:=['file:///D:/mp/projects/PR0118%20-%20ISO%2011171%20Calibrations/results/2025-05-19-LPA3-NAVAIR-11171-00009/11171-00009-LIVE.ods'#$'6 - B1'.$N$53]" office:value-type="float" office:value="51700" calcext:value-type="float">
            <text:p>51700</text:p>
          </table:table-cell>
          <table:table-cell table:formula="of:=['file:///D:/mp/projects/PR0118%20-%20ISO%2011171%20Calibrations/results/2025-05-19-LPA3-NAVAIR-11171-00009/11171-00009-LIVE.ods'#$'6 - B1'.$O$53]" office:value-type="float" office:value="51740" calcext:value-type="float">
            <text:p>51740</text:p>
          </table:table-cell>
          <table:table-cell table:style-name="ce221" table:formula="of:=['file:///D:/mp/projects/PR0118%20-%20ISO%2011171%20Calibrations/results/2025-05-19-LPA3-NAVAIR-11171-00009/11171-00009-LIVE.ods'#$'6 - B1'.$P$53]" office:value-type="float" office:value="51082" calcext:value-type="float">
            <text:p>51082</text:p>
          </table:table-cell>
          <table:table-cell table:style-name="ce227" table:number-columns-repeated="33"/>
        </table:table-row>
        <table:table-row table:style-name="ro2">
          <table:table-cell table:style-name="ce218" table:formula="of:=['file:///D:/mp/projects/PR0118%20-%20ISO%2011171%20Calibrations/results/2025-05-19-LPA3-NAVAIR-11171-00009/11171-00009-LIVE.ods'#$'6 - B1'.$A$54]" office:value-type="float" office:value="5" calcext:value-type="float">
            <text:p>5</text:p>
          </table:table-cell>
          <table:table-cell table:formula="of:=['file:///D:/mp/projects/PR0118%20-%20ISO%2011171%20Calibrations/results/2025-05-19-LPA3-NAVAIR-11171-00009/11171-00009-LIVE.ods'#$'6 - B1'.$B$54]" office:value-type="float" office:value="56257" calcext:value-type="float">
            <text:p>56257</text:p>
          </table:table-cell>
          <table:table-cell table:formula="of:=['file:///D:/mp/projects/PR0118%20-%20ISO%2011171%20Calibrations/results/2025-05-19-LPA3-NAVAIR-11171-00009/11171-00009-LIVE.ods'#$'6 - B1'.$C$54]" office:value-type="float" office:value="59891" calcext:value-type="float">
            <text:p>59891</text:p>
          </table:table-cell>
          <table:table-cell table:formula="of:=['file:///D:/mp/projects/PR0118%20-%20ISO%2011171%20Calibrations/results/2025-05-19-LPA3-NAVAIR-11171-00009/11171-00009-LIVE.ods'#$'6 - B1'.$D$54]" office:value-type="float" office:value="59326" calcext:value-type="float">
            <text:p>59326</text:p>
          </table:table-cell>
          <table:table-cell table:formula="of:=['file:///D:/mp/projects/PR0118%20-%20ISO%2011171%20Calibrations/results/2025-05-19-LPA3-NAVAIR-11171-00009/11171-00009-LIVE.ods'#$'6 - B1'.$E$54]" office:value-type="float" office:value="59295" calcext:value-type="float">
            <text:p>59295</text:p>
          </table:table-cell>
          <table:table-cell table:formula="of:=['file:///D:/mp/projects/PR0118%20-%20ISO%2011171%20Calibrations/results/2025-05-19-LPA3-NAVAIR-11171-00009/11171-00009-LIVE.ods'#$'6 - B1'.$F$54]" office:value-type="float" office:value="59066" calcext:value-type="float">
            <text:p>59066</text:p>
          </table:table-cell>
          <table:table-cell table:formula="of:=['file:///D:/mp/projects/PR0118%20-%20ISO%2011171%20Calibrations/results/2025-05-19-LPA3-NAVAIR-11171-00009/11171-00009-LIVE.ods'#$'6 - B1'.$G$54]" office:value-type="float" office:value="44162" calcext:value-type="float">
            <text:p>44162</text:p>
          </table:table-cell>
          <table:table-cell table:formula="of:=['file:///D:/mp/projects/PR0118%20-%20ISO%2011171%20Calibrations/results/2025-05-19-LPA3-NAVAIR-11171-00009/11171-00009-LIVE.ods'#$'6 - B1'.$H$54]" office:value-type="float" office:value="45794" calcext:value-type="float">
            <text:p>45794</text:p>
          </table:table-cell>
          <table:table-cell table:style-name="ce221" table:formula="of:=['file:///D:/mp/projects/PR0118%20-%20ISO%2011171%20Calibrations/results/2025-05-19-LPA3-NAVAIR-11171-00009/11171-00009-LIVE.ods'#$'6 - B1'.$I$54]" office:value-type="float" office:value="45123" calcext:value-type="float">
            <text:p>45123</text:p>
          </table:table-cell>
          <table:table-cell table:formula="of:=['file:///D:/mp/projects/PR0118%20-%20ISO%2011171%20Calibrations/results/2025-05-19-LPA3-NAVAIR-11171-00009/11171-00009-LIVE.ods'#$'6 - B1'.$J$54]" office:value-type="float" office:value="45104" calcext:value-type="float">
            <text:p>45104</text:p>
          </table:table-cell>
          <table:table-cell table:style-name="ce221" table:formula="of:=['file:///D:/mp/projects/PR0118%20-%20ISO%2011171%20Calibrations/results/2025-05-19-LPA3-NAVAIR-11171-00009/11171-00009-LIVE.ods'#$'6 - B1'.$K$54]" office:value-type="float" office:value="45370" calcext:value-type="float">
            <text:p>45370</text:p>
          </table:table-cell>
          <table:table-cell table:style-name="ce221" table:formula="of:=['file:///D:/mp/projects/PR0118%20-%20ISO%2011171%20Calibrations/results/2025-05-19-LPA3-NAVAIR-11171-00009/11171-00009-LIVE.ods'#$'6 - B1'.$L$54]" office:value-type="float" office:value="41290" calcext:value-type="float">
            <text:p>41290</text:p>
          </table:table-cell>
          <table:table-cell table:style-name="ce221" table:formula="of:=['file:///D:/mp/projects/PR0118%20-%20ISO%2011171%20Calibrations/results/2025-05-19-LPA3-NAVAIR-11171-00009/11171-00009-LIVE.ods'#$'6 - B1'.$M$54]" office:value-type="float" office:value="43593" calcext:value-type="float">
            <text:p>43593</text:p>
          </table:table-cell>
          <table:table-cell table:style-name="ce221" table:formula="of:=['file:///D:/mp/projects/PR0118%20-%20ISO%2011171%20Calibrations/results/2025-05-19-LPA3-NAVAIR-11171-00009/11171-00009-LIVE.ods'#$'6 - B1'.$N$54]" office:value-type="float" office:value="43713" calcext:value-type="float">
            <text:p>43713</text:p>
          </table:table-cell>
          <table:table-cell table:formula="of:=['file:///D:/mp/projects/PR0118%20-%20ISO%2011171%20Calibrations/results/2025-05-19-LPA3-NAVAIR-11171-00009/11171-00009-LIVE.ods'#$'6 - B1'.$O$54]" office:value-type="float" office:value="43834" calcext:value-type="float">
            <text:p>43834</text:p>
          </table:table-cell>
          <table:table-cell table:style-name="ce221" table:formula="of:=['file:///D:/mp/projects/PR0118%20-%20ISO%2011171%20Calibrations/results/2025-05-19-LPA3-NAVAIR-11171-00009/11171-00009-LIVE.ods'#$'6 - B1'.$P$54]" office:value-type="float" office:value="43237" calcext:value-type="float">
            <text:p>43237</text:p>
          </table:table-cell>
          <table:table-cell table:style-name="ce227" table:number-columns-repeated="33"/>
        </table:table-row>
        <table:table-row table:style-name="ro2">
          <table:table-cell table:style-name="ce218" table:formula="of:=['file:///D:/mp/projects/PR0118%20-%20ISO%2011171%20Calibrations/results/2025-05-19-LPA3-NAVAIR-11171-00009/11171-00009-LIVE.ods'#$'6 - B1'.$A$55]" office:value-type="float" office:value="6" calcext:value-type="float">
            <text:p>6</text:p>
          </table:table-cell>
          <table:table-cell table:formula="of:=['file:///D:/mp/projects/PR0118%20-%20ISO%2011171%20Calibrations/results/2025-05-19-LPA3-NAVAIR-11171-00009/11171-00009-LIVE.ods'#$'6 - B1'.$B$55]" office:value-type="float" office:value="48583" calcext:value-type="float">
            <text:p>48583</text:p>
          </table:table-cell>
          <table:table-cell table:formula="of:=['file:///D:/mp/projects/PR0118%20-%20ISO%2011171%20Calibrations/results/2025-05-19-LPA3-NAVAIR-11171-00009/11171-00009-LIVE.ods'#$'6 - B1'.$C$55]" office:value-type="float" office:value="51654" calcext:value-type="float">
            <text:p>51654</text:p>
          </table:table-cell>
          <table:table-cell table:formula="of:=['file:///D:/mp/projects/PR0118%20-%20ISO%2011171%20Calibrations/results/2025-05-19-LPA3-NAVAIR-11171-00009/11171-00009-LIVE.ods'#$'6 - B1'.$D$55]" office:value-type="float" office:value="51300" calcext:value-type="float">
            <text:p>51300</text:p>
          </table:table-cell>
          <table:table-cell table:formula="of:=['file:///D:/mp/projects/PR0118%20-%20ISO%2011171%20Calibrations/results/2025-05-19-LPA3-NAVAIR-11171-00009/11171-00009-LIVE.ods'#$'6 - B1'.$E$55]" office:value-type="float" office:value="51080" calcext:value-type="float">
            <text:p>51080</text:p>
          </table:table-cell>
          <table:table-cell table:formula="of:=['file:///D:/mp/projects/PR0118%20-%20ISO%2011171%20Calibrations/results/2025-05-19-LPA3-NAVAIR-11171-00009/11171-00009-LIVE.ods'#$'6 - B1'.$F$55]" office:value-type="float" office:value="50920" calcext:value-type="float">
            <text:p>50920</text:p>
          </table:table-cell>
          <table:table-cell table:formula="of:=['file:///D:/mp/projects/PR0118%20-%20ISO%2011171%20Calibrations/results/2025-05-19-LPA3-NAVAIR-11171-00009/11171-00009-LIVE.ods'#$'6 - B1'.$G$55]" office:value-type="float" office:value="37475" calcext:value-type="float">
            <text:p>37475</text:p>
          </table:table-cell>
          <table:table-cell table:formula="of:=['file:///D:/mp/projects/PR0118%20-%20ISO%2011171%20Calibrations/results/2025-05-19-LPA3-NAVAIR-11171-00009/11171-00009-LIVE.ods'#$'6 - B1'.$H$55]" office:value-type="float" office:value="38947" calcext:value-type="float">
            <text:p>38947</text:p>
          </table:table-cell>
          <table:table-cell table:style-name="ce221" table:formula="of:=['file:///D:/mp/projects/PR0118%20-%20ISO%2011171%20Calibrations/results/2025-05-19-LPA3-NAVAIR-11171-00009/11171-00009-LIVE.ods'#$'6 - B1'.$I$55]" office:value-type="float" office:value="38027" calcext:value-type="float">
            <text:p>38027</text:p>
          </table:table-cell>
          <table:table-cell table:formula="of:=['file:///D:/mp/projects/PR0118%20-%20ISO%2011171%20Calibrations/results/2025-05-19-LPA3-NAVAIR-11171-00009/11171-00009-LIVE.ods'#$'6 - B1'.$J$55]" office:value-type="float" office:value="38178" calcext:value-type="float">
            <text:p>38178</text:p>
          </table:table-cell>
          <table:table-cell table:style-name="ce221" table:formula="of:=['file:///D:/mp/projects/PR0118%20-%20ISO%2011171%20Calibrations/results/2025-05-19-LPA3-NAVAIR-11171-00009/11171-00009-LIVE.ods'#$'6 - B1'.$K$55]" office:value-type="float" office:value="38360" calcext:value-type="float">
            <text:p>38360</text:p>
          </table:table-cell>
          <table:table-cell table:style-name="ce221" table:formula="of:=['file:///D:/mp/projects/PR0118%20-%20ISO%2011171%20Calibrations/results/2025-05-19-LPA3-NAVAIR-11171-00009/11171-00009-LIVE.ods'#$'6 - B1'.$L$55]" office:value-type="float" office:value="34958" calcext:value-type="float">
            <text:p>34958</text:p>
          </table:table-cell>
          <table:table-cell table:style-name="ce221" table:formula="of:=['file:///D:/mp/projects/PR0118%20-%20ISO%2011171%20Calibrations/results/2025-05-19-LPA3-NAVAIR-11171-00009/11171-00009-LIVE.ods'#$'6 - B1'.$M$55]" office:value-type="float" office:value="36844" calcext:value-type="float">
            <text:p>36844</text:p>
          </table:table-cell>
          <table:table-cell table:style-name="ce221" table:formula="of:=['file:///D:/mp/projects/PR0118%20-%20ISO%2011171%20Calibrations/results/2025-05-19-LPA3-NAVAIR-11171-00009/11171-00009-LIVE.ods'#$'6 - B1'.$N$55]" office:value-type="float" office:value="36893" calcext:value-type="float">
            <text:p>36893</text:p>
          </table:table-cell>
          <table:table-cell table:formula="of:=['file:///D:/mp/projects/PR0118%20-%20ISO%2011171%20Calibrations/results/2025-05-19-LPA3-NAVAIR-11171-00009/11171-00009-LIVE.ods'#$'6 - B1'.$O$55]" office:value-type="float" office:value="36888" calcext:value-type="float">
            <text:p>36888</text:p>
          </table:table-cell>
          <table:table-cell table:style-name="ce221" table:formula="of:=['file:///D:/mp/projects/PR0118%20-%20ISO%2011171%20Calibrations/results/2025-05-19-LPA3-NAVAIR-11171-00009/11171-00009-LIVE.ods'#$'6 - B1'.$P$55]" office:value-type="float" office:value="36437" calcext:value-type="float">
            <text:p>36437</text:p>
          </table:table-cell>
          <table:table-cell table:style-name="ce227" table:number-columns-repeated="33"/>
        </table:table-row>
        <table:table-row table:style-name="ro2">
          <table:table-cell table:style-name="ce218" table:formula="of:=['file:///D:/mp/projects/PR0118%20-%20ISO%2011171%20Calibrations/results/2025-05-19-LPA3-NAVAIR-11171-00009/11171-00009-LIVE.ods'#$'6 - B1'.$A$56]" office:value-type="float" office:value="7" calcext:value-type="float">
            <text:p>7</text:p>
          </table:table-cell>
          <table:table-cell table:formula="of:=['file:///D:/mp/projects/PR0118%20-%20ISO%2011171%20Calibrations/results/2025-05-19-LPA3-NAVAIR-11171-00009/11171-00009-LIVE.ods'#$'6 - B1'.$B$56]" office:value-type="float" office:value="42357" calcext:value-type="float">
            <text:p>42357</text:p>
          </table:table-cell>
          <table:table-cell table:formula="of:=['file:///D:/mp/projects/PR0118%20-%20ISO%2011171%20Calibrations/results/2025-05-19-LPA3-NAVAIR-11171-00009/11171-00009-LIVE.ods'#$'6 - B1'.$C$56]" office:value-type="float" office:value="44994" calcext:value-type="float">
            <text:p>44994</text:p>
          </table:table-cell>
          <table:table-cell table:formula="of:=['file:///D:/mp/projects/PR0118%20-%20ISO%2011171%20Calibrations/results/2025-05-19-LPA3-NAVAIR-11171-00009/11171-00009-LIVE.ods'#$'6 - B1'.$D$56]" office:value-type="float" office:value="44741" calcext:value-type="float">
            <text:p>44741</text:p>
          </table:table-cell>
          <table:table-cell table:formula="of:=['file:///D:/mp/projects/PR0118%20-%20ISO%2011171%20Calibrations/results/2025-05-19-LPA3-NAVAIR-11171-00009/11171-00009-LIVE.ods'#$'6 - B1'.$E$56]" office:value-type="float" office:value="44589" calcext:value-type="float">
            <text:p>44589</text:p>
          </table:table-cell>
          <table:table-cell table:formula="of:=['file:///D:/mp/projects/PR0118%20-%20ISO%2011171%20Calibrations/results/2025-05-19-LPA3-NAVAIR-11171-00009/11171-00009-LIVE.ods'#$'6 - B1'.$F$56]" office:value-type="float" office:value="44350" calcext:value-type="float">
            <text:p>44350</text:p>
          </table:table-cell>
          <table:table-cell table:formula="of:=['file:///D:/mp/projects/PR0118%20-%20ISO%2011171%20Calibrations/results/2025-05-19-LPA3-NAVAIR-11171-00009/11171-00009-LIVE.ods'#$'6 - B1'.$G$56]" office:value-type="float" office:value="31043" calcext:value-type="float">
            <text:p>31043</text:p>
          </table:table-cell>
          <table:table-cell table:formula="of:=['file:///D:/mp/projects/PR0118%20-%20ISO%2011171%20Calibrations/results/2025-05-19-LPA3-NAVAIR-11171-00009/11171-00009-LIVE.ods'#$'6 - B1'.$H$56]" office:value-type="float" office:value="32225" calcext:value-type="float">
            <text:p>32225</text:p>
          </table:table-cell>
          <table:table-cell table:style-name="ce221" table:formula="of:=['file:///D:/mp/projects/PR0118%20-%20ISO%2011171%20Calibrations/results/2025-05-19-LPA3-NAVAIR-11171-00009/11171-00009-LIVE.ods'#$'6 - B1'.$I$56]" office:value-type="float" office:value="31585" calcext:value-type="float">
            <text:p>31585</text:p>
          </table:table-cell>
          <table:table-cell table:formula="of:=['file:///D:/mp/projects/PR0118%20-%20ISO%2011171%20Calibrations/results/2025-05-19-LPA3-NAVAIR-11171-00009/11171-00009-LIVE.ods'#$'6 - B1'.$J$56]" office:value-type="float" office:value="31520" calcext:value-type="float">
            <text:p>31520</text:p>
          </table:table-cell>
          <table:table-cell table:style-name="ce221" table:formula="of:=['file:///D:/mp/projects/PR0118%20-%20ISO%2011171%20Calibrations/results/2025-05-19-LPA3-NAVAIR-11171-00009/11171-00009-LIVE.ods'#$'6 - B1'.$K$56]" office:value-type="float" office:value="31829" calcext:value-type="float">
            <text:p>31829</text:p>
          </table:table-cell>
          <table:table-cell table:style-name="ce221" table:formula="of:=['file:///D:/mp/projects/PR0118%20-%20ISO%2011171%20Calibrations/results/2025-05-19-LPA3-NAVAIR-11171-00009/11171-00009-LIVE.ods'#$'6 - B1'.$L$56]" office:value-type="float" office:value="28935" calcext:value-type="float">
            <text:p>28935</text:p>
          </table:table-cell>
          <table:table-cell table:style-name="ce221" table:formula="of:=['file:///D:/mp/projects/PR0118%20-%20ISO%2011171%20Calibrations/results/2025-05-19-LPA3-NAVAIR-11171-00009/11171-00009-LIVE.ods'#$'6 - B1'.$M$56]" office:value-type="float" office:value="30427" calcext:value-type="float">
            <text:p>30427</text:p>
          </table:table-cell>
          <table:table-cell table:style-name="ce221" table:formula="of:=['file:///D:/mp/projects/PR0118%20-%20ISO%2011171%20Calibrations/results/2025-05-19-LPA3-NAVAIR-11171-00009/11171-00009-LIVE.ods'#$'6 - B1'.$N$56]" office:value-type="float" office:value="30431" calcext:value-type="float">
            <text:p>30431</text:p>
          </table:table-cell>
          <table:table-cell table:formula="of:=['file:///D:/mp/projects/PR0118%20-%20ISO%2011171%20Calibrations/results/2025-05-19-LPA3-NAVAIR-11171-00009/11171-00009-LIVE.ods'#$'6 - B1'.$O$56]" office:value-type="float" office:value="30572" calcext:value-type="float">
            <text:p>30572</text:p>
          </table:table-cell>
          <table:table-cell table:style-name="ce221" table:formula="of:=['file:///D:/mp/projects/PR0118%20-%20ISO%2011171%20Calibrations/results/2025-05-19-LPA3-NAVAIR-11171-00009/11171-00009-LIVE.ods'#$'6 - B1'.$P$56]" office:value-type="float" office:value="30152" calcext:value-type="float">
            <text:p>30152</text:p>
          </table:table-cell>
          <table:table-cell table:style-name="ce227" table:number-columns-repeated="33"/>
        </table:table-row>
        <table:table-row table:style-name="ro2">
          <table:table-cell table:style-name="ce218" table:formula="of:=['file:///D:/mp/projects/PR0118%20-%20ISO%2011171%20Calibrations/results/2025-05-19-LPA3-NAVAIR-11171-00009/11171-00009-LIVE.ods'#$'6 - B1'.$A$57]" office:value-type="float" office:value="8" calcext:value-type="float">
            <text:p>8</text:p>
          </table:table-cell>
          <table:table-cell table:formula="of:=['file:///D:/mp/projects/PR0118%20-%20ISO%2011171%20Calibrations/results/2025-05-19-LPA3-NAVAIR-11171-00009/11171-00009-LIVE.ods'#$'6 - B1'.$B$57]" office:value-type="float" office:value="36098" calcext:value-type="float">
            <text:p>36098</text:p>
          </table:table-cell>
          <table:table-cell table:formula="of:=['file:///D:/mp/projects/PR0118%20-%20ISO%2011171%20Calibrations/results/2025-05-19-LPA3-NAVAIR-11171-00009/11171-00009-LIVE.ods'#$'6 - B1'.$C$57]" office:value-type="float" office:value="38325" calcext:value-type="float">
            <text:p>38325</text:p>
          </table:table-cell>
          <table:table-cell table:formula="of:=['file:///D:/mp/projects/PR0118%20-%20ISO%2011171%20Calibrations/results/2025-05-19-LPA3-NAVAIR-11171-00009/11171-00009-LIVE.ods'#$'6 - B1'.$D$57]" office:value-type="float" office:value="38238" calcext:value-type="float">
            <text:p>38238</text:p>
          </table:table-cell>
          <table:table-cell table:formula="of:=['file:///D:/mp/projects/PR0118%20-%20ISO%2011171%20Calibrations/results/2025-05-19-LPA3-NAVAIR-11171-00009/11171-00009-LIVE.ods'#$'6 - B1'.$E$57]" office:value-type="float" office:value="38152" calcext:value-type="float">
            <text:p>38152</text:p>
          </table:table-cell>
          <table:table-cell table:formula="of:=['file:///D:/mp/projects/PR0118%20-%20ISO%2011171%20Calibrations/results/2025-05-19-LPA3-NAVAIR-11171-00009/11171-00009-LIVE.ods'#$'6 - B1'.$F$57]" office:value-type="float" office:value="37745" calcext:value-type="float">
            <text:p>37745</text:p>
          </table:table-cell>
          <table:table-cell table:formula="of:=['file:///D:/mp/projects/PR0118%20-%20ISO%2011171%20Calibrations/results/2025-05-19-LPA3-NAVAIR-11171-00009/11171-00009-LIVE.ods'#$'6 - B1'.$G$57]" office:value-type="float" office:value="25259" calcext:value-type="float">
            <text:p>25259</text:p>
          </table:table-cell>
          <table:table-cell table:formula="of:=['file:///D:/mp/projects/PR0118%20-%20ISO%2011171%20Calibrations/results/2025-05-19-LPA3-NAVAIR-11171-00009/11171-00009-LIVE.ods'#$'6 - B1'.$H$57]" office:value-type="float" office:value="26108" calcext:value-type="float">
            <text:p>26108</text:p>
          </table:table-cell>
          <table:table-cell table:style-name="ce221" table:formula="of:=['file:///D:/mp/projects/PR0118%20-%20ISO%2011171%20Calibrations/results/2025-05-19-LPA3-NAVAIR-11171-00009/11171-00009-LIVE.ods'#$'6 - B1'.$I$57]" office:value-type="float" office:value="25521" calcext:value-type="float">
            <text:p>25521</text:p>
          </table:table-cell>
          <table:table-cell table:formula="of:=['file:///D:/mp/projects/PR0118%20-%20ISO%2011171%20Calibrations/results/2025-05-19-LPA3-NAVAIR-11171-00009/11171-00009-LIVE.ods'#$'6 - B1'.$J$57]" office:value-type="float" office:value="25513" calcext:value-type="float">
            <text:p>25513</text:p>
          </table:table-cell>
          <table:table-cell table:style-name="ce221" table:formula="of:=['file:///D:/mp/projects/PR0118%20-%20ISO%2011171%20Calibrations/results/2025-05-19-LPA3-NAVAIR-11171-00009/11171-00009-LIVE.ods'#$'6 - B1'.$K$57]" office:value-type="float" office:value="25681" calcext:value-type="float">
            <text:p>25681</text:p>
          </table:table-cell>
          <table:table-cell table:style-name="ce221" table:formula="of:=['file:///D:/mp/projects/PR0118%20-%20ISO%2011171%20Calibrations/results/2025-05-19-LPA3-NAVAIR-11171-00009/11171-00009-LIVE.ods'#$'6 - B1'.$L$57]" office:value-type="float" office:value="23457" calcext:value-type="float">
            <text:p>23457</text:p>
          </table:table-cell>
          <table:table-cell table:style-name="ce221" table:formula="of:=['file:///D:/mp/projects/PR0118%20-%20ISO%2011171%20Calibrations/results/2025-05-19-LPA3-NAVAIR-11171-00009/11171-00009-LIVE.ods'#$'6 - B1'.$M$57]" office:value-type="float" office:value="24711" calcext:value-type="float">
            <text:p>24711</text:p>
          </table:table-cell>
          <table:table-cell table:style-name="ce221" table:formula="of:=['file:///D:/mp/projects/PR0118%20-%20ISO%2011171%20Calibrations/results/2025-05-19-LPA3-NAVAIR-11171-00009/11171-00009-LIVE.ods'#$'6 - B1'.$N$57]" office:value-type="float" office:value="24555" calcext:value-type="float">
            <text:p>24555</text:p>
          </table:table-cell>
          <table:table-cell table:formula="of:=['file:///D:/mp/projects/PR0118%20-%20ISO%2011171%20Calibrations/results/2025-05-19-LPA3-NAVAIR-11171-00009/11171-00009-LIVE.ods'#$'6 - B1'.$O$57]" office:value-type="float" office:value="24775" calcext:value-type="float">
            <text:p>24775</text:p>
          </table:table-cell>
          <table:table-cell table:style-name="ce221" table:formula="of:=['file:///D:/mp/projects/PR0118%20-%20ISO%2011171%20Calibrations/results/2025-05-19-LPA3-NAVAIR-11171-00009/11171-00009-LIVE.ods'#$'6 - B1'.$P$57]" office:value-type="float" office:value="24275" calcext:value-type="float">
            <text:p>24275</text:p>
          </table:table-cell>
          <table:table-cell table:style-name="ce227" table:number-columns-repeated="33"/>
        </table:table-row>
        <table:table-row table:style-name="ro2">
          <table:table-cell table:style-name="ce218" table:formula="of:=['file:///D:/mp/projects/PR0118%20-%20ISO%2011171%20Calibrations/results/2025-05-19-LPA3-NAVAIR-11171-00009/11171-00009-LIVE.ods'#$'6 - B1'.$A$58]" office:value-type="float" office:value="9" calcext:value-type="float">
            <text:p>9</text:p>
          </table:table-cell>
          <table:table-cell table:formula="of:=['file:///D:/mp/projects/PR0118%20-%20ISO%2011171%20Calibrations/results/2025-05-19-LPA3-NAVAIR-11171-00009/11171-00009-LIVE.ods'#$'6 - B1'.$B$58]" office:value-type="float" office:value="30748" calcext:value-type="float">
            <text:p>30748</text:p>
          </table:table-cell>
          <table:table-cell table:formula="of:=['file:///D:/mp/projects/PR0118%20-%20ISO%2011171%20Calibrations/results/2025-05-19-LPA3-NAVAIR-11171-00009/11171-00009-LIVE.ods'#$'6 - B1'.$C$58]" office:value-type="float" office:value="32797" calcext:value-type="float">
            <text:p>32797</text:p>
          </table:table-cell>
          <table:table-cell table:formula="of:=['file:///D:/mp/projects/PR0118%20-%20ISO%2011171%20Calibrations/results/2025-05-19-LPA3-NAVAIR-11171-00009/11171-00009-LIVE.ods'#$'6 - B1'.$D$58]" office:value-type="float" office:value="32878" calcext:value-type="float">
            <text:p>32878</text:p>
          </table:table-cell>
          <table:table-cell table:formula="of:=['file:///D:/mp/projects/PR0118%20-%20ISO%2011171%20Calibrations/results/2025-05-19-LPA3-NAVAIR-11171-00009/11171-00009-LIVE.ods'#$'6 - B1'.$E$58]" office:value-type="float" office:value="32731" calcext:value-type="float">
            <text:p>32731</text:p>
          </table:table-cell>
          <table:table-cell table:formula="of:=['file:///D:/mp/projects/PR0118%20-%20ISO%2011171%20Calibrations/results/2025-05-19-LPA3-NAVAIR-11171-00009/11171-00009-LIVE.ods'#$'6 - B1'.$F$58]" office:value-type="float" office:value="32349" calcext:value-type="float">
            <text:p>32349</text:p>
          </table:table-cell>
          <table:table-cell table:formula="of:=['file:///D:/mp/projects/PR0118%20-%20ISO%2011171%20Calibrations/results/2025-05-19-LPA3-NAVAIR-11171-00009/11171-00009-LIVE.ods'#$'6 - B1'.$G$58]" office:value-type="float" office:value="20297" calcext:value-type="float">
            <text:p>20297</text:p>
          </table:table-cell>
          <table:table-cell table:formula="of:=['file:///D:/mp/projects/PR0118%20-%20ISO%2011171%20Calibrations/results/2025-05-19-LPA3-NAVAIR-11171-00009/11171-00009-LIVE.ods'#$'6 - B1'.$H$58]" office:value-type="float" office:value="20964" calcext:value-type="float">
            <text:p>20964</text:p>
          </table:table-cell>
          <table:table-cell table:style-name="ce221" table:formula="of:=['file:///D:/mp/projects/PR0118%20-%20ISO%2011171%20Calibrations/results/2025-05-19-LPA3-NAVAIR-11171-00009/11171-00009-LIVE.ods'#$'6 - B1'.$I$58]" office:value-type="float" office:value="20399" calcext:value-type="float">
            <text:p>20399</text:p>
          </table:table-cell>
          <table:table-cell table:formula="of:=['file:///D:/mp/projects/PR0118%20-%20ISO%2011171%20Calibrations/results/2025-05-19-LPA3-NAVAIR-11171-00009/11171-00009-LIVE.ods'#$'6 - B1'.$J$58]" office:value-type="float" office:value="20516" calcext:value-type="float">
            <text:p>20516</text:p>
          </table:table-cell>
          <table:table-cell table:style-name="ce221" table:formula="of:=['file:///D:/mp/projects/PR0118%20-%20ISO%2011171%20Calibrations/results/2025-05-19-LPA3-NAVAIR-11171-00009/11171-00009-LIVE.ods'#$'6 - B1'.$K$58]" office:value-type="float" office:value="20586" calcext:value-type="float">
            <text:p>20586</text:p>
          </table:table-cell>
          <table:table-cell table:style-name="ce221" table:formula="of:=['file:///D:/mp/projects/PR0118%20-%20ISO%2011171%20Calibrations/results/2025-05-19-LPA3-NAVAIR-11171-00009/11171-00009-LIVE.ods'#$'6 - B1'.$L$58]" office:value-type="float" office:value="18805" calcext:value-type="float">
            <text:p>18805</text:p>
          </table:table-cell>
          <table:table-cell table:style-name="ce221" table:formula="of:=['file:///D:/mp/projects/PR0118%20-%20ISO%2011171%20Calibrations/results/2025-05-19-LPA3-NAVAIR-11171-00009/11171-00009-LIVE.ods'#$'6 - B1'.$M$58]" office:value-type="float" office:value="19755" calcext:value-type="float">
            <text:p>19755</text:p>
          </table:table-cell>
          <table:table-cell table:style-name="ce221" table:formula="of:=['file:///D:/mp/projects/PR0118%20-%20ISO%2011171%20Calibrations/results/2025-05-19-LPA3-NAVAIR-11171-00009/11171-00009-LIVE.ods'#$'6 - B1'.$N$58]" office:value-type="float" office:value="19605" calcext:value-type="float">
            <text:p>19605</text:p>
          </table:table-cell>
          <table:table-cell table:formula="of:=['file:///D:/mp/projects/PR0118%20-%20ISO%2011171%20Calibrations/results/2025-05-19-LPA3-NAVAIR-11171-00009/11171-00009-LIVE.ods'#$'6 - B1'.$O$58]" office:value-type="float" office:value="19787" calcext:value-type="float">
            <text:p>19787</text:p>
          </table:table-cell>
          <table:table-cell table:style-name="ce221" table:formula="of:=['file:///D:/mp/projects/PR0118%20-%20ISO%2011171%20Calibrations/results/2025-05-19-LPA3-NAVAIR-11171-00009/11171-00009-LIVE.ods'#$'6 - B1'.$P$58]" office:value-type="float" office:value="19480" calcext:value-type="float">
            <text:p>19480</text:p>
          </table:table-cell>
          <table:table-cell table:style-name="ce227" table:number-columns-repeated="33"/>
        </table:table-row>
        <table:table-row table:style-name="ro2">
          <table:table-cell table:style-name="ce218" table:formula="of:=['file:///D:/mp/projects/PR0118%20-%20ISO%2011171%20Calibrations/results/2025-05-19-LPA3-NAVAIR-11171-00009/11171-00009-LIVE.ods'#$'6 - B1'.$A$59]" office:value-type="float" office:value="10" calcext:value-type="float">
            <text:p>10</text:p>
          </table:table-cell>
          <table:table-cell table:formula="of:=['file:///D:/mp/projects/PR0118%20-%20ISO%2011171%20Calibrations/results/2025-05-19-LPA3-NAVAIR-11171-00009/11171-00009-LIVE.ods'#$'6 - B1'.$B$59]" office:value-type="float" office:value="26004" calcext:value-type="float">
            <text:p>26004</text:p>
          </table:table-cell>
          <table:table-cell table:formula="of:=['file:///D:/mp/projects/PR0118%20-%20ISO%2011171%20Calibrations/results/2025-05-19-LPA3-NAVAIR-11171-00009/11171-00009-LIVE.ods'#$'6 - B1'.$C$59]" office:value-type="float" office:value="27802" calcext:value-type="float">
            <text:p>27802</text:p>
          </table:table-cell>
          <table:table-cell table:formula="of:=['file:///D:/mp/projects/PR0118%20-%20ISO%2011171%20Calibrations/results/2025-05-19-LPA3-NAVAIR-11171-00009/11171-00009-LIVE.ods'#$'6 - B1'.$D$59]" office:value-type="float" office:value="27813" calcext:value-type="float">
            <text:p>27813</text:p>
          </table:table-cell>
          <table:table-cell table:formula="of:=['file:///D:/mp/projects/PR0118%20-%20ISO%2011171%20Calibrations/results/2025-05-19-LPA3-NAVAIR-11171-00009/11171-00009-LIVE.ods'#$'6 - B1'.$E$59]" office:value-type="float" office:value="27635" calcext:value-type="float">
            <text:p>27635</text:p>
          </table:table-cell>
          <table:table-cell table:formula="of:=['file:///D:/mp/projects/PR0118%20-%20ISO%2011171%20Calibrations/results/2025-05-19-LPA3-NAVAIR-11171-00009/11171-00009-LIVE.ods'#$'6 - B1'.$F$59]" office:value-type="float" office:value="27427" calcext:value-type="float">
            <text:p>27427</text:p>
          </table:table-cell>
          <table:table-cell table:formula="of:=['file:///D:/mp/projects/PR0118%20-%20ISO%2011171%20Calibrations/results/2025-05-19-LPA3-NAVAIR-11171-00009/11171-00009-LIVE.ods'#$'6 - B1'.$G$59]" office:value-type="float" office:value="16224" calcext:value-type="float">
            <text:p>16224</text:p>
          </table:table-cell>
          <table:table-cell table:formula="of:=['file:///D:/mp/projects/PR0118%20-%20ISO%2011171%20Calibrations/results/2025-05-19-LPA3-NAVAIR-11171-00009/11171-00009-LIVE.ods'#$'6 - B1'.$H$59]" office:value-type="float" office:value="16855" calcext:value-type="float">
            <text:p>16855</text:p>
          </table:table-cell>
          <table:table-cell table:style-name="ce221" table:formula="of:=['file:///D:/mp/projects/PR0118%20-%20ISO%2011171%20Calibrations/results/2025-05-19-LPA3-NAVAIR-11171-00009/11171-00009-LIVE.ods'#$'6 - B1'.$I$59]" office:value-type="float" office:value="16422" calcext:value-type="float">
            <text:p>16422</text:p>
          </table:table-cell>
          <table:table-cell table:formula="of:=['file:///D:/mp/projects/PR0118%20-%20ISO%2011171%20Calibrations/results/2025-05-19-LPA3-NAVAIR-11171-00009/11171-00009-LIVE.ods'#$'6 - B1'.$J$59]" office:value-type="float" office:value="16577" calcext:value-type="float">
            <text:p>16577</text:p>
          </table:table-cell>
          <table:table-cell table:style-name="ce221" table:formula="of:=['file:///D:/mp/projects/PR0118%20-%20ISO%2011171%20Calibrations/results/2025-05-19-LPA3-NAVAIR-11171-00009/11171-00009-LIVE.ods'#$'6 - B1'.$K$59]" office:value-type="float" office:value="16497" calcext:value-type="float">
            <text:p>16497</text:p>
          </table:table-cell>
          <table:table-cell table:style-name="ce221" table:formula="of:=['file:///D:/mp/projects/PR0118%20-%20ISO%2011171%20Calibrations/results/2025-05-19-LPA3-NAVAIR-11171-00009/11171-00009-LIVE.ods'#$'6 - B1'.$L$59]" office:value-type="float" office:value="15210" calcext:value-type="float">
            <text:p>15210</text:p>
          </table:table-cell>
          <table:table-cell table:style-name="ce221" table:formula="of:=['file:///D:/mp/projects/PR0118%20-%20ISO%2011171%20Calibrations/results/2025-05-19-LPA3-NAVAIR-11171-00009/11171-00009-LIVE.ods'#$'6 - B1'.$M$59]" office:value-type="float" office:value="15912" calcext:value-type="float">
            <text:p>15912</text:p>
          </table:table-cell>
          <table:table-cell table:style-name="ce221" table:formula="of:=['file:///D:/mp/projects/PR0118%20-%20ISO%2011171%20Calibrations/results/2025-05-19-LPA3-NAVAIR-11171-00009/11171-00009-LIVE.ods'#$'6 - B1'.$N$59]" office:value-type="float" office:value="15753" calcext:value-type="float">
            <text:p>15753</text:p>
          </table:table-cell>
          <table:table-cell table:formula="of:=['file:///D:/mp/projects/PR0118%20-%20ISO%2011171%20Calibrations/results/2025-05-19-LPA3-NAVAIR-11171-00009/11171-00009-LIVE.ods'#$'6 - B1'.$O$59]" office:value-type="float" office:value="15881" calcext:value-type="float">
            <text:p>15881</text:p>
          </table:table-cell>
          <table:table-cell table:style-name="ce221" table:formula="of:=['file:///D:/mp/projects/PR0118%20-%20ISO%2011171%20Calibrations/results/2025-05-19-LPA3-NAVAIR-11171-00009/11171-00009-LIVE.ods'#$'6 - B1'.$P$59]" office:value-type="float" office:value="15548" calcext:value-type="float">
            <text:p>15548</text:p>
          </table:table-cell>
          <table:table-cell table:style-name="ce227" table:number-columns-repeated="33"/>
        </table:table-row>
        <table:table-row table:style-name="ro2">
          <table:table-cell table:style-name="ce218" table:formula="of:=['file:///D:/mp/projects/PR0118%20-%20ISO%2011171%20Calibrations/results/2025-05-19-LPA3-NAVAIR-11171-00009/11171-00009-LIVE.ods'#$'6 - B1'.$A$60]" office:value-type="float" office:value="11" calcext:value-type="float">
            <text:p>11</text:p>
          </table:table-cell>
          <table:table-cell table:formula="of:=['file:///D:/mp/projects/PR0118%20-%20ISO%2011171%20Calibrations/results/2025-05-19-LPA3-NAVAIR-11171-00009/11171-00009-LIVE.ods'#$'6 - B1'.$B$60]" office:value-type="float" office:value="21787" calcext:value-type="float">
            <text:p>21787</text:p>
          </table:table-cell>
          <table:table-cell table:formula="of:=['file:///D:/mp/projects/PR0118%20-%20ISO%2011171%20Calibrations/results/2025-05-19-LPA3-NAVAIR-11171-00009/11171-00009-LIVE.ods'#$'6 - B1'.$C$60]" office:value-type="float" office:value="23373" calcext:value-type="float">
            <text:p>23373</text:p>
          </table:table-cell>
          <table:table-cell table:formula="of:=['file:///D:/mp/projects/PR0118%20-%20ISO%2011171%20Calibrations/results/2025-05-19-LPA3-NAVAIR-11171-00009/11171-00009-LIVE.ods'#$'6 - B1'.$D$60]" office:value-type="float" office:value="23371" calcext:value-type="float">
            <text:p>23371</text:p>
          </table:table-cell>
          <table:table-cell table:formula="of:=['file:///D:/mp/projects/PR0118%20-%20ISO%2011171%20Calibrations/results/2025-05-19-LPA3-NAVAIR-11171-00009/11171-00009-LIVE.ods'#$'6 - B1'.$E$60]" office:value-type="float" office:value="23172" calcext:value-type="float">
            <text:p>23172</text:p>
          </table:table-cell>
          <table:table-cell table:formula="of:=['file:///D:/mp/projects/PR0118%20-%20ISO%2011171%20Calibrations/results/2025-05-19-LPA3-NAVAIR-11171-00009/11171-00009-LIVE.ods'#$'6 - B1'.$F$60]" office:value-type="float" office:value="22930" calcext:value-type="float">
            <text:p>22930</text:p>
          </table:table-cell>
          <table:table-cell table:formula="of:=['file:///D:/mp/projects/PR0118%20-%20ISO%2011171%20Calibrations/results/2025-05-19-LPA3-NAVAIR-11171-00009/11171-00009-LIVE.ods'#$'6 - B1'.$G$60]" office:value-type="float" office:value="12946" calcext:value-type="float">
            <text:p>12946</text:p>
          </table:table-cell>
          <table:table-cell table:formula="of:=['file:///D:/mp/projects/PR0118%20-%20ISO%2011171%20Calibrations/results/2025-05-19-LPA3-NAVAIR-11171-00009/11171-00009-LIVE.ods'#$'6 - B1'.$H$60]" office:value-type="float" office:value="13488" calcext:value-type="float">
            <text:p>13488</text:p>
          </table:table-cell>
          <table:table-cell table:style-name="ce221" table:formula="of:=['file:///D:/mp/projects/PR0118%20-%20ISO%2011171%20Calibrations/results/2025-05-19-LPA3-NAVAIR-11171-00009/11171-00009-LIVE.ods'#$'6 - B1'.$I$60]" office:value-type="float" office:value="13079" calcext:value-type="float">
            <text:p>13079</text:p>
          </table:table-cell>
          <table:table-cell table:formula="of:=['file:///D:/mp/projects/PR0118%20-%20ISO%2011171%20Calibrations/results/2025-05-19-LPA3-NAVAIR-11171-00009/11171-00009-LIVE.ods'#$'6 - B1'.$J$60]" office:value-type="float" office:value="13247" calcext:value-type="float">
            <text:p>13247</text:p>
          </table:table-cell>
          <table:table-cell table:style-name="ce221" table:formula="of:=['file:///D:/mp/projects/PR0118%20-%20ISO%2011171%20Calibrations/results/2025-05-19-LPA3-NAVAIR-11171-00009/11171-00009-LIVE.ods'#$'6 - B1'.$K$60]" office:value-type="float" office:value="13212" calcext:value-type="float">
            <text:p>13212</text:p>
          </table:table-cell>
          <table:table-cell table:style-name="ce221" table:formula="of:=['file:///D:/mp/projects/PR0118%20-%20ISO%2011171%20Calibrations/results/2025-05-19-LPA3-NAVAIR-11171-00009/11171-00009-LIVE.ods'#$'6 - B1'.$L$60]" office:value-type="float" office:value="12182" calcext:value-type="float">
            <text:p>12182</text:p>
          </table:table-cell>
          <table:table-cell table:style-name="ce221" table:formula="of:=['file:///D:/mp/projects/PR0118%20-%20ISO%2011171%20Calibrations/results/2025-05-19-LPA3-NAVAIR-11171-00009/11171-00009-LIVE.ods'#$'6 - B1'.$M$60]" office:value-type="float" office:value="12725" calcext:value-type="float">
            <text:p>12725</text:p>
          </table:table-cell>
          <table:table-cell table:style-name="ce221" table:formula="of:=['file:///D:/mp/projects/PR0118%20-%20ISO%2011171%20Calibrations/results/2025-05-19-LPA3-NAVAIR-11171-00009/11171-00009-LIVE.ods'#$'6 - B1'.$N$60]" office:value-type="float" office:value="12592" calcext:value-type="float">
            <text:p>12592</text:p>
          </table:table-cell>
          <table:table-cell table:formula="of:=['file:///D:/mp/projects/PR0118%20-%20ISO%2011171%20Calibrations/results/2025-05-19-LPA3-NAVAIR-11171-00009/11171-00009-LIVE.ods'#$'6 - B1'.$O$60]" office:value-type="float" office:value="12734" calcext:value-type="float">
            <text:p>12734</text:p>
          </table:table-cell>
          <table:table-cell table:style-name="ce221" table:formula="of:=['file:///D:/mp/projects/PR0118%20-%20ISO%2011171%20Calibrations/results/2025-05-19-LPA3-NAVAIR-11171-00009/11171-00009-LIVE.ods'#$'6 - B1'.$P$60]" office:value-type="float" office:value="12308" calcext:value-type="float">
            <text:p>12308</text:p>
          </table:table-cell>
          <table:table-cell table:style-name="ce227" table:number-columns-repeated="33"/>
        </table:table-row>
        <table:table-row table:style-name="ro2">
          <table:table-cell table:style-name="ce218" table:formula="of:=['file:///D:/mp/projects/PR0118%20-%20ISO%2011171%20Calibrations/results/2025-05-19-LPA3-NAVAIR-11171-00009/11171-00009-LIVE.ods'#$'6 - B1'.$A$61]" office:value-type="float" office:value="12" calcext:value-type="float">
            <text:p>12</text:p>
          </table:table-cell>
          <table:table-cell table:formula="of:=['file:///D:/mp/projects/PR0118%20-%20ISO%2011171%20Calibrations/results/2025-05-19-LPA3-NAVAIR-11171-00009/11171-00009-LIVE.ods'#$'6 - B1'.$B$61]" office:value-type="float" office:value="17875" calcext:value-type="float">
            <text:p>17875</text:p>
          </table:table-cell>
          <table:table-cell table:formula="of:=['file:///D:/mp/projects/PR0118%20-%20ISO%2011171%20Calibrations/results/2025-05-19-LPA3-NAVAIR-11171-00009/11171-00009-LIVE.ods'#$'6 - B1'.$C$61]" office:value-type="float" office:value="19353" calcext:value-type="float">
            <text:p>19353</text:p>
          </table:table-cell>
          <table:table-cell table:formula="of:=['file:///D:/mp/projects/PR0118%20-%20ISO%2011171%20Calibrations/results/2025-05-19-LPA3-NAVAIR-11171-00009/11171-00009-LIVE.ods'#$'6 - B1'.$D$61]" office:value-type="float" office:value="19274" calcext:value-type="float">
            <text:p>19274</text:p>
          </table:table-cell>
          <table:table-cell table:formula="of:=['file:///D:/mp/projects/PR0118%20-%20ISO%2011171%20Calibrations/results/2025-05-19-LPA3-NAVAIR-11171-00009/11171-00009-LIVE.ods'#$'6 - B1'.$E$61]" office:value-type="float" office:value="19142" calcext:value-type="float">
            <text:p>19142</text:p>
          </table:table-cell>
          <table:table-cell table:formula="of:=['file:///D:/mp/projects/PR0118%20-%20ISO%2011171%20Calibrations/results/2025-05-19-LPA3-NAVAIR-11171-00009/11171-00009-LIVE.ods'#$'6 - B1'.$F$61]" office:value-type="float" office:value="19006" calcext:value-type="float">
            <text:p>19006</text:p>
          </table:table-cell>
          <table:table-cell table:formula="of:=['file:///D:/mp/projects/PR0118%20-%20ISO%2011171%20Calibrations/results/2025-05-19-LPA3-NAVAIR-11171-00009/11171-00009-LIVE.ods'#$'6 - B1'.$G$61]" office:value-type="float" office:value="10520" calcext:value-type="float">
            <text:p>10520</text:p>
          </table:table-cell>
          <table:table-cell table:formula="of:=['file:///D:/mp/projects/PR0118%20-%20ISO%2011171%20Calibrations/results/2025-05-19-LPA3-NAVAIR-11171-00009/11171-00009-LIVE.ods'#$'6 - B1'.$H$61]" office:value-type="float" office:value="10955" calcext:value-type="float">
            <text:p>10955</text:p>
          </table:table-cell>
          <table:table-cell table:style-name="ce221" table:formula="of:=['file:///D:/mp/projects/PR0118%20-%20ISO%2011171%20Calibrations/results/2025-05-19-LPA3-NAVAIR-11171-00009/11171-00009-LIVE.ods'#$'6 - B1'.$I$61]" office:value-type="float" office:value="10513" calcext:value-type="float">
            <text:p>10513</text:p>
          </table:table-cell>
          <table:table-cell table:formula="of:=['file:///D:/mp/projects/PR0118%20-%20ISO%2011171%20Calibrations/results/2025-05-19-LPA3-NAVAIR-11171-00009/11171-00009-LIVE.ods'#$'6 - B1'.$J$61]" office:value-type="float" office:value="10759" calcext:value-type="float">
            <text:p>10759</text:p>
          </table:table-cell>
          <table:table-cell table:style-name="ce221" table:formula="of:=['file:///D:/mp/projects/PR0118%20-%20ISO%2011171%20Calibrations/results/2025-05-19-LPA3-NAVAIR-11171-00009/11171-00009-LIVE.ods'#$'6 - B1'.$K$61]" office:value-type="float" office:value="10718" calcext:value-type="float">
            <text:p>10718</text:p>
          </table:table-cell>
          <table:table-cell table:style-name="ce221" table:formula="of:=['file:///D:/mp/projects/PR0118%20-%20ISO%2011171%20Calibrations/results/2025-05-19-LPA3-NAVAIR-11171-00009/11171-00009-LIVE.ods'#$'6 - B1'.$L$61]" office:value-type="float" office:value="9996" calcext:value-type="float">
            <text:p>9996</text:p>
          </table:table-cell>
          <table:table-cell table:style-name="ce221" table:formula="of:=['file:///D:/mp/projects/PR0118%20-%20ISO%2011171%20Calibrations/results/2025-05-19-LPA3-NAVAIR-11171-00009/11171-00009-LIVE.ods'#$'6 - B1'.$M$61]" office:value-type="float" office:value="10304" calcext:value-type="float">
            <text:p>10304</text:p>
          </table:table-cell>
          <table:table-cell table:style-name="ce221" table:formula="of:=['file:///D:/mp/projects/PR0118%20-%20ISO%2011171%20Calibrations/results/2025-05-19-LPA3-NAVAIR-11171-00009/11171-00009-LIVE.ods'#$'6 - B1'.$N$61]" office:value-type="float" office:value="10245" calcext:value-type="float">
            <text:p>10245</text:p>
          </table:table-cell>
          <table:table-cell table:formula="of:=['file:///D:/mp/projects/PR0118%20-%20ISO%2011171%20Calibrations/results/2025-05-19-LPA3-NAVAIR-11171-00009/11171-00009-LIVE.ods'#$'6 - B1'.$O$61]" office:value-type="float" office:value="10331" calcext:value-type="float">
            <text:p>10331</text:p>
          </table:table-cell>
          <table:table-cell table:style-name="ce221" table:formula="of:=['file:///D:/mp/projects/PR0118%20-%20ISO%2011171%20Calibrations/results/2025-05-19-LPA3-NAVAIR-11171-00009/11171-00009-LIVE.ods'#$'6 - B1'.$P$61]" office:value-type="float" office:value="10024" calcext:value-type="float">
            <text:p>10024</text:p>
          </table:table-cell>
          <table:table-cell table:style-name="ce227" table:number-columns-repeated="33"/>
        </table:table-row>
        <table:table-row table:style-name="ro2">
          <table:table-cell table:style-name="ce218" table:formula="of:=['file:///D:/mp/projects/PR0118%20-%20ISO%2011171%20Calibrations/results/2025-05-19-LPA3-NAVAIR-11171-00009/11171-00009-LIVE.ods'#$'6 - B1'.$A$62]" office:value-type="float" office:value="13" calcext:value-type="float">
            <text:p>13</text:p>
          </table:table-cell>
          <table:table-cell table:formula="of:=['file:///D:/mp/projects/PR0118%20-%20ISO%2011171%20Calibrations/results/2025-05-19-LPA3-NAVAIR-11171-00009/11171-00009-LIVE.ods'#$'6 - B1'.$B$62]" office:value-type="float" office:value="14542" calcext:value-type="float">
            <text:p>14542</text:p>
          </table:table-cell>
          <table:table-cell table:formula="of:=['file:///D:/mp/projects/PR0118%20-%20ISO%2011171%20Calibrations/results/2025-05-19-LPA3-NAVAIR-11171-00009/11171-00009-LIVE.ods'#$'6 - B1'.$C$62]" office:value-type="float" office:value="15773" calcext:value-type="float">
            <text:p>15773</text:p>
          </table:table-cell>
          <table:table-cell table:formula="of:=['file:///D:/mp/projects/PR0118%20-%20ISO%2011171%20Calibrations/results/2025-05-19-LPA3-NAVAIR-11171-00009/11171-00009-LIVE.ods'#$'6 - B1'.$D$62]" office:value-type="float" office:value="15774" calcext:value-type="float">
            <text:p>15774</text:p>
          </table:table-cell>
          <table:table-cell table:formula="of:=['file:///D:/mp/projects/PR0118%20-%20ISO%2011171%20Calibrations/results/2025-05-19-LPA3-NAVAIR-11171-00009/11171-00009-LIVE.ods'#$'6 - B1'.$E$62]" office:value-type="float" office:value="15562" calcext:value-type="float">
            <text:p>15562</text:p>
          </table:table-cell>
          <table:table-cell table:formula="of:=['file:///D:/mp/projects/PR0118%20-%20ISO%2011171%20Calibrations/results/2025-05-19-LPA3-NAVAIR-11171-00009/11171-00009-LIVE.ods'#$'6 - B1'.$F$62]" office:value-type="float" office:value="15566" calcext:value-type="float">
            <text:p>15566</text:p>
          </table:table-cell>
          <table:table-cell table:formula="of:=['file:///D:/mp/projects/PR0118%20-%20ISO%2011171%20Calibrations/results/2025-05-19-LPA3-NAVAIR-11171-00009/11171-00009-LIVE.ods'#$'6 - B1'.$G$62]" office:value-type="float" office:value="8652" calcext:value-type="float">
            <text:p>8652</text:p>
          </table:table-cell>
          <table:table-cell table:formula="of:=['file:///D:/mp/projects/PR0118%20-%20ISO%2011171%20Calibrations/results/2025-05-19-LPA3-NAVAIR-11171-00009/11171-00009-LIVE.ods'#$'6 - B1'.$H$62]" office:value-type="float" office:value="8885" calcext:value-type="float">
            <text:p>8885</text:p>
          </table:table-cell>
          <table:table-cell table:style-name="ce221" table:formula="of:=['file:///D:/mp/projects/PR0118%20-%20ISO%2011171%20Calibrations/results/2025-05-19-LPA3-NAVAIR-11171-00009/11171-00009-LIVE.ods'#$'6 - B1'.$I$62]" office:value-type="float" office:value="8628" calcext:value-type="float">
            <text:p>8628</text:p>
          </table:table-cell>
          <table:table-cell table:formula="of:=['file:///D:/mp/projects/PR0118%20-%20ISO%2011171%20Calibrations/results/2025-05-19-LPA3-NAVAIR-11171-00009/11171-00009-LIVE.ods'#$'6 - B1'.$J$62]" office:value-type="float" office:value="8836" calcext:value-type="float">
            <text:p>8836</text:p>
          </table:table-cell>
          <table:table-cell table:style-name="ce221" table:formula="of:=['file:///D:/mp/projects/PR0118%20-%20ISO%2011171%20Calibrations/results/2025-05-19-LPA3-NAVAIR-11171-00009/11171-00009-LIVE.ods'#$'6 - B1'.$K$62]" office:value-type="float" office:value="8798" calcext:value-type="float">
            <text:p>8798</text:p>
          </table:table-cell>
          <table:table-cell table:style-name="ce221" table:formula="of:=['file:///D:/mp/projects/PR0118%20-%20ISO%2011171%20Calibrations/results/2025-05-19-LPA3-NAVAIR-11171-00009/11171-00009-LIVE.ods'#$'6 - B1'.$L$62]" office:value-type="float" office:value="8154" calcext:value-type="float">
            <text:p>8154</text:p>
          </table:table-cell>
          <table:table-cell table:style-name="ce221" table:formula="of:=['file:///D:/mp/projects/PR0118%20-%20ISO%2011171%20Calibrations/results/2025-05-19-LPA3-NAVAIR-11171-00009/11171-00009-LIVE.ods'#$'6 - B1'.$M$62]" office:value-type="float" office:value="8488" calcext:value-type="float">
            <text:p>8488</text:p>
          </table:table-cell>
          <table:table-cell table:style-name="ce221" table:formula="of:=['file:///D:/mp/projects/PR0118%20-%20ISO%2011171%20Calibrations/results/2025-05-19-LPA3-NAVAIR-11171-00009/11171-00009-LIVE.ods'#$'6 - B1'.$N$62]" office:value-type="float" office:value="8383" calcext:value-type="float">
            <text:p>8383</text:p>
          </table:table-cell>
          <table:table-cell table:formula="of:=['file:///D:/mp/projects/PR0118%20-%20ISO%2011171%20Calibrations/results/2025-05-19-LPA3-NAVAIR-11171-00009/11171-00009-LIVE.ods'#$'6 - B1'.$O$62]" office:value-type="float" office:value="8478" calcext:value-type="float">
            <text:p>8478</text:p>
          </table:table-cell>
          <table:table-cell table:style-name="ce221" table:formula="of:=['file:///D:/mp/projects/PR0118%20-%20ISO%2011171%20Calibrations/results/2025-05-19-LPA3-NAVAIR-11171-00009/11171-00009-LIVE.ods'#$'6 - B1'.$P$62]" office:value-type="float" office:value="8259" calcext:value-type="float">
            <text:p>8259</text:p>
          </table:table-cell>
          <table:table-cell table:style-name="ce227" table:number-columns-repeated="33"/>
        </table:table-row>
        <table:table-row table:style-name="ro2">
          <table:table-cell table:style-name="ce218" table:formula="of:=['file:///D:/mp/projects/PR0118%20-%20ISO%2011171%20Calibrations/results/2025-05-19-LPA3-NAVAIR-11171-00009/11171-00009-LIVE.ods'#$'6 - B1'.$A$63]" office:value-type="float" office:value="14" calcext:value-type="float">
            <text:p>14</text:p>
          </table:table-cell>
          <table:table-cell table:formula="of:=['file:///D:/mp/projects/PR0118%20-%20ISO%2011171%20Calibrations/results/2025-05-19-LPA3-NAVAIR-11171-00009/11171-00009-LIVE.ods'#$'6 - B1'.$B$63]" office:value-type="float" office:value="11660" calcext:value-type="float">
            <text:p>11660</text:p>
          </table:table-cell>
          <table:table-cell table:formula="of:=['file:///D:/mp/projects/PR0118%20-%20ISO%2011171%20Calibrations/results/2025-05-19-LPA3-NAVAIR-11171-00009/11171-00009-LIVE.ods'#$'6 - B1'.$C$63]" office:value-type="float" office:value="12639" calcext:value-type="float">
            <text:p>12639</text:p>
          </table:table-cell>
          <table:table-cell table:formula="of:=['file:///D:/mp/projects/PR0118%20-%20ISO%2011171%20Calibrations/results/2025-05-19-LPA3-NAVAIR-11171-00009/11171-00009-LIVE.ods'#$'6 - B1'.$D$63]" office:value-type="float" office:value="12567" calcext:value-type="float">
            <text:p>12567</text:p>
          </table:table-cell>
          <table:table-cell table:formula="of:=['file:///D:/mp/projects/PR0118%20-%20ISO%2011171%20Calibrations/results/2025-05-19-LPA3-NAVAIR-11171-00009/11171-00009-LIVE.ods'#$'6 - B1'.$E$63]" office:value-type="float" office:value="12452" calcext:value-type="float">
            <text:p>12452</text:p>
          </table:table-cell>
          <table:table-cell table:formula="of:=['file:///D:/mp/projects/PR0118%20-%20ISO%2011171%20Calibrations/results/2025-05-19-LPA3-NAVAIR-11171-00009/11171-00009-LIVE.ods'#$'6 - B1'.$F$63]" office:value-type="float" office:value="12403" calcext:value-type="float">
            <text:p>12403</text:p>
          </table:table-cell>
          <table:table-cell table:formula="of:=['file:///D:/mp/projects/PR0118%20-%20ISO%2011171%20Calibrations/results/2025-05-19-LPA3-NAVAIR-11171-00009/11171-00009-LIVE.ods'#$'6 - B1'.$G$63]" office:value-type="float" office:value="7252" calcext:value-type="float">
            <text:p>7252</text:p>
          </table:table-cell>
          <table:table-cell table:formula="of:=['file:///D:/mp/projects/PR0118%20-%20ISO%2011171%20Calibrations/results/2025-05-19-LPA3-NAVAIR-11171-00009/11171-00009-LIVE.ods'#$'6 - B1'.$H$63]" office:value-type="float" office:value="7357" calcext:value-type="float">
            <text:p>7357</text:p>
          </table:table-cell>
          <table:table-cell table:style-name="ce221" table:formula="of:=['file:///D:/mp/projects/PR0118%20-%20ISO%2011171%20Calibrations/results/2025-05-19-LPA3-NAVAIR-11171-00009/11171-00009-LIVE.ods'#$'6 - B1'.$I$63]" office:value-type="float" office:value="7090" calcext:value-type="float">
            <text:p>7090</text:p>
          </table:table-cell>
          <table:table-cell table:formula="of:=['file:///D:/mp/projects/PR0118%20-%20ISO%2011171%20Calibrations/results/2025-05-19-LPA3-NAVAIR-11171-00009/11171-00009-LIVE.ods'#$'6 - B1'.$J$63]" office:value-type="float" office:value="7375" calcext:value-type="float">
            <text:p>7375</text:p>
          </table:table-cell>
          <table:table-cell table:style-name="ce221" table:formula="of:=['file:///D:/mp/projects/PR0118%20-%20ISO%2011171%20Calibrations/results/2025-05-19-LPA3-NAVAIR-11171-00009/11171-00009-LIVE.ods'#$'6 - B1'.$K$63]" office:value-type="float" office:value="7357" calcext:value-type="float">
            <text:p>7357</text:p>
          </table:table-cell>
          <table:table-cell table:style-name="ce221" table:formula="of:=['file:///D:/mp/projects/PR0118%20-%20ISO%2011171%20Calibrations/results/2025-05-19-LPA3-NAVAIR-11171-00009/11171-00009-LIVE.ods'#$'6 - B1'.$L$63]" office:value-type="float" office:value="6800" calcext:value-type="float">
            <text:p>6800</text:p>
          </table:table-cell>
          <table:table-cell table:style-name="ce221" table:formula="of:=['file:///D:/mp/projects/PR0118%20-%20ISO%2011171%20Calibrations/results/2025-05-19-LPA3-NAVAIR-11171-00009/11171-00009-LIVE.ods'#$'6 - B1'.$M$63]" office:value-type="float" office:value="7093" calcext:value-type="float">
            <text:p>7093</text:p>
          </table:table-cell>
          <table:table-cell table:style-name="ce221" table:formula="of:=['file:///D:/mp/projects/PR0118%20-%20ISO%2011171%20Calibrations/results/2025-05-19-LPA3-NAVAIR-11171-00009/11171-00009-LIVE.ods'#$'6 - B1'.$N$63]" office:value-type="float" office:value="7006" calcext:value-type="float">
            <text:p>7006</text:p>
          </table:table-cell>
          <table:table-cell table:formula="of:=['file:///D:/mp/projects/PR0118%20-%20ISO%2011171%20Calibrations/results/2025-05-19-LPA3-NAVAIR-11171-00009/11171-00009-LIVE.ods'#$'6 - B1'.$O$63]" office:value-type="float" office:value="7050" calcext:value-type="float">
            <text:p>7050</text:p>
          </table:table-cell>
          <table:table-cell table:style-name="ce221" table:formula="of:=['file:///D:/mp/projects/PR0118%20-%20ISO%2011171%20Calibrations/results/2025-05-19-LPA3-NAVAIR-11171-00009/11171-00009-LIVE.ods'#$'6 - B1'.$P$63]" office:value-type="float" office:value="6873" calcext:value-type="float">
            <text:p>6873</text:p>
          </table:table-cell>
          <table:table-cell table:style-name="ce227" table:number-columns-repeated="33"/>
        </table:table-row>
        <table:table-row table:style-name="ro2">
          <table:table-cell table:style-name="ce218" table:formula="of:=['file:///D:/mp/projects/PR0118%20-%20ISO%2011171%20Calibrations/results/2025-05-19-LPA3-NAVAIR-11171-00009/11171-00009-LIVE.ods'#$'6 - B1'.$A$64]" office:value-type="float" office:value="15" calcext:value-type="float">
            <text:p>15</text:p>
          </table:table-cell>
          <table:table-cell table:formula="of:=['file:///D:/mp/projects/PR0118%20-%20ISO%2011171%20Calibrations/results/2025-05-19-LPA3-NAVAIR-11171-00009/11171-00009-LIVE.ods'#$'6 - B1'.$B$64]" office:value-type="float" office:value="9114" calcext:value-type="float">
            <text:p>9114</text:p>
          </table:table-cell>
          <table:table-cell table:formula="of:=['file:///D:/mp/projects/PR0118%20-%20ISO%2011171%20Calibrations/results/2025-05-19-LPA3-NAVAIR-11171-00009/11171-00009-LIVE.ods'#$'6 - B1'.$C$64]" office:value-type="float" office:value="9941" calcext:value-type="float">
            <text:p>9941</text:p>
          </table:table-cell>
          <table:table-cell table:formula="of:=['file:///D:/mp/projects/PR0118%20-%20ISO%2011171%20Calibrations/results/2025-05-19-LPA3-NAVAIR-11171-00009/11171-00009-LIVE.ods'#$'6 - B1'.$D$64]" office:value-type="float" office:value="9882" calcext:value-type="float">
            <text:p>9882</text:p>
          </table:table-cell>
          <table:table-cell table:formula="of:=['file:///D:/mp/projects/PR0118%20-%20ISO%2011171%20Calibrations/results/2025-05-19-LPA3-NAVAIR-11171-00009/11171-00009-LIVE.ods'#$'6 - B1'.$E$64]" office:value-type="float" office:value="9709" calcext:value-type="float">
            <text:p>9709</text:p>
          </table:table-cell>
          <table:table-cell table:formula="of:=['file:///D:/mp/projects/PR0118%20-%20ISO%2011171%20Calibrations/results/2025-05-19-LPA3-NAVAIR-11171-00009/11171-00009-LIVE.ods'#$'6 - B1'.$F$64]" office:value-type="float" office:value="9701" calcext:value-type="float">
            <text:p>9701</text:p>
          </table:table-cell>
          <table:table-cell table:formula="of:=['file:///D:/mp/projects/PR0118%20-%20ISO%2011171%20Calibrations/results/2025-05-19-LPA3-NAVAIR-11171-00009/11171-00009-LIVE.ods'#$'6 - B1'.$G$64]" office:value-type="float" office:value="6112" calcext:value-type="float">
            <text:p>6112</text:p>
          </table:table-cell>
          <table:table-cell table:formula="of:=['file:///D:/mp/projects/PR0118%20-%20ISO%2011171%20Calibrations/results/2025-05-19-LPA3-NAVAIR-11171-00009/11171-00009-LIVE.ods'#$'6 - B1'.$H$64]" office:value-type="float" office:value="6162" calcext:value-type="float">
            <text:p>6162</text:p>
          </table:table-cell>
          <table:table-cell table:style-name="ce221" table:formula="of:=['file:///D:/mp/projects/PR0118%20-%20ISO%2011171%20Calibrations/results/2025-05-19-LPA3-NAVAIR-11171-00009/11171-00009-LIVE.ods'#$'6 - B1'.$I$64]" office:value-type="float" office:value="6017" calcext:value-type="float">
            <text:p>6017</text:p>
          </table:table-cell>
          <table:table-cell table:formula="of:=['file:///D:/mp/projects/PR0118%20-%20ISO%2011171%20Calibrations/results/2025-05-19-LPA3-NAVAIR-11171-00009/11171-00009-LIVE.ods'#$'6 - B1'.$J$64]" office:value-type="float" office:value="6229" calcext:value-type="float">
            <text:p>6229</text:p>
          </table:table-cell>
          <table:table-cell table:style-name="ce221" table:formula="of:=['file:///D:/mp/projects/PR0118%20-%20ISO%2011171%20Calibrations/results/2025-05-19-LPA3-NAVAIR-11171-00009/11171-00009-LIVE.ods'#$'6 - B1'.$K$64]" office:value-type="float" office:value="6203" calcext:value-type="float">
            <text:p>6203</text:p>
          </table:table-cell>
          <table:table-cell table:style-name="ce221" table:formula="of:=['file:///D:/mp/projects/PR0118%20-%20ISO%2011171%20Calibrations/results/2025-05-19-LPA3-NAVAIR-11171-00009/11171-00009-LIVE.ods'#$'6 - B1'.$L$64]" office:value-type="float" office:value="5768" calcext:value-type="float">
            <text:p>5768</text:p>
          </table:table-cell>
          <table:table-cell table:style-name="ce221" table:formula="of:=['file:///D:/mp/projects/PR0118%20-%20ISO%2011171%20Calibrations/results/2025-05-19-LPA3-NAVAIR-11171-00009/11171-00009-LIVE.ods'#$'6 - B1'.$M$64]" office:value-type="float" office:value="5971" calcext:value-type="float">
            <text:p>5971</text:p>
          </table:table-cell>
          <table:table-cell table:style-name="ce221" table:formula="of:=['file:///D:/mp/projects/PR0118%20-%20ISO%2011171%20Calibrations/results/2025-05-19-LPA3-NAVAIR-11171-00009/11171-00009-LIVE.ods'#$'6 - B1'.$N$64]" office:value-type="float" office:value="5927" calcext:value-type="float">
            <text:p>5927</text:p>
          </table:table-cell>
          <table:table-cell table:formula="of:=['file:///D:/mp/projects/PR0118%20-%20ISO%2011171%20Calibrations/results/2025-05-19-LPA3-NAVAIR-11171-00009/11171-00009-LIVE.ods'#$'6 - B1'.$O$64]" office:value-type="float" office:value="5962" calcext:value-type="float">
            <text:p>5962</text:p>
          </table:table-cell>
          <table:table-cell table:style-name="ce221" table:formula="of:=['file:///D:/mp/projects/PR0118%20-%20ISO%2011171%20Calibrations/results/2025-05-19-LPA3-NAVAIR-11171-00009/11171-00009-LIVE.ods'#$'6 - B1'.$P$64]" office:value-type="float" office:value="5781" calcext:value-type="float">
            <text:p>5781</text:p>
          </table:table-cell>
          <table:table-cell table:style-name="ce227" table:number-columns-repeated="33"/>
        </table:table-row>
        <table:table-row table:style-name="ro2">
          <table:table-cell table:style-name="ce218" table:formula="of:=['file:///D:/mp/projects/PR0118%20-%20ISO%2011171%20Calibrations/results/2025-05-19-LPA3-NAVAIR-11171-00009/11171-00009-LIVE.ods'#$'6 - B1'.$A$65]" office:value-type="float" office:value="16" calcext:value-type="float">
            <text:p>16</text:p>
          </table:table-cell>
          <table:table-cell table:formula="of:=['file:///D:/mp/projects/PR0118%20-%20ISO%2011171%20Calibrations/results/2025-05-19-LPA3-NAVAIR-11171-00009/11171-00009-LIVE.ods'#$'6 - B1'.$B$65]" office:value-type="float" office:value="7062" calcext:value-type="float">
            <text:p>7062</text:p>
          </table:table-cell>
          <table:table-cell table:formula="of:=['file:///D:/mp/projects/PR0118%20-%20ISO%2011171%20Calibrations/results/2025-05-19-LPA3-NAVAIR-11171-00009/11171-00009-LIVE.ods'#$'6 - B1'.$C$65]" office:value-type="float" office:value="7694" calcext:value-type="float">
            <text:p>7694</text:p>
          </table:table-cell>
          <table:table-cell table:formula="of:=['file:///D:/mp/projects/PR0118%20-%20ISO%2011171%20Calibrations/results/2025-05-19-LPA3-NAVAIR-11171-00009/11171-00009-LIVE.ods'#$'6 - B1'.$D$65]" office:value-type="float" office:value="7682" calcext:value-type="float">
            <text:p>7682</text:p>
          </table:table-cell>
          <table:table-cell table:formula="of:=['file:///D:/mp/projects/PR0118%20-%20ISO%2011171%20Calibrations/results/2025-05-19-LPA3-NAVAIR-11171-00009/11171-00009-LIVE.ods'#$'6 - B1'.$E$65]" office:value-type="float" office:value="7426" calcext:value-type="float">
            <text:p>7426</text:p>
          </table:table-cell>
          <table:table-cell table:formula="of:=['file:///D:/mp/projects/PR0118%20-%20ISO%2011171%20Calibrations/results/2025-05-19-LPA3-NAVAIR-11171-00009/11171-00009-LIVE.ods'#$'6 - B1'.$F$65]" office:value-type="float" office:value="7485" calcext:value-type="float">
            <text:p>7485</text:p>
          </table:table-cell>
          <table:table-cell table:formula="of:=['file:///D:/mp/projects/PR0118%20-%20ISO%2011171%20Calibrations/results/2025-05-19-LPA3-NAVAIR-11171-00009/11171-00009-LIVE.ods'#$'6 - B1'.$G$65]" office:value-type="float" office:value="5255" calcext:value-type="float">
            <text:p>5255</text:p>
          </table:table-cell>
          <table:table-cell table:formula="of:=['file:///D:/mp/projects/PR0118%20-%20ISO%2011171%20Calibrations/results/2025-05-19-LPA3-NAVAIR-11171-00009/11171-00009-LIVE.ods'#$'6 - B1'.$H$65]" office:value-type="float" office:value="5297" calcext:value-type="float">
            <text:p>5297</text:p>
          </table:table-cell>
          <table:table-cell table:style-name="ce221" table:formula="of:=['file:///D:/mp/projects/PR0118%20-%20ISO%2011171%20Calibrations/results/2025-05-19-LPA3-NAVAIR-11171-00009/11171-00009-LIVE.ods'#$'6 - B1'.$I$65]" office:value-type="float" office:value="5110" calcext:value-type="float">
            <text:p>5110</text:p>
          </table:table-cell>
          <table:table-cell table:formula="of:=['file:///D:/mp/projects/PR0118%20-%20ISO%2011171%20Calibrations/results/2025-05-19-LPA3-NAVAIR-11171-00009/11171-00009-LIVE.ods'#$'6 - B1'.$J$65]" office:value-type="float" office:value="5302" calcext:value-type="float">
            <text:p>5302</text:p>
          </table:table-cell>
          <table:table-cell table:style-name="ce221" table:formula="of:=['file:///D:/mp/projects/PR0118%20-%20ISO%2011171%20Calibrations/results/2025-05-19-LPA3-NAVAIR-11171-00009/11171-00009-LIVE.ods'#$'6 - B1'.$K$65]" office:value-type="float" office:value="5289" calcext:value-type="float">
            <text:p>5289</text:p>
          </table:table-cell>
          <table:table-cell table:style-name="ce221" table:formula="of:=['file:///D:/mp/projects/PR0118%20-%20ISO%2011171%20Calibrations/results/2025-05-19-LPA3-NAVAIR-11171-00009/11171-00009-LIVE.ods'#$'6 - B1'.$L$65]" office:value-type="float" office:value="4988" calcext:value-type="float">
            <text:p>4988</text:p>
          </table:table-cell>
          <table:table-cell table:style-name="ce221" table:formula="of:=['file:///D:/mp/projects/PR0118%20-%20ISO%2011171%20Calibrations/results/2025-05-19-LPA3-NAVAIR-11171-00009/11171-00009-LIVE.ods'#$'6 - B1'.$M$65]" office:value-type="float" office:value="5145" calcext:value-type="float">
            <text:p>5145</text:p>
          </table:table-cell>
          <table:table-cell table:style-name="ce221" table:formula="of:=['file:///D:/mp/projects/PR0118%20-%20ISO%2011171%20Calibrations/results/2025-05-19-LPA3-NAVAIR-11171-00009/11171-00009-LIVE.ods'#$'6 - B1'.$N$65]" office:value-type="float" office:value="5042" calcext:value-type="float">
            <text:p>5042</text:p>
          </table:table-cell>
          <table:table-cell table:formula="of:=['file:///D:/mp/projects/PR0118%20-%20ISO%2011171%20Calibrations/results/2025-05-19-LPA3-NAVAIR-11171-00009/11171-00009-LIVE.ods'#$'6 - B1'.$O$65]" office:value-type="float" office:value="5076" calcext:value-type="float">
            <text:p>5076</text:p>
          </table:table-cell>
          <table:table-cell table:style-name="ce221" table:formula="of:=['file:///D:/mp/projects/PR0118%20-%20ISO%2011171%20Calibrations/results/2025-05-19-LPA3-NAVAIR-11171-00009/11171-00009-LIVE.ods'#$'6 - B1'.$P$65]" office:value-type="float" office:value="4928" calcext:value-type="float">
            <text:p>4928</text:p>
          </table:table-cell>
          <table:table-cell table:style-name="ce227" table:number-columns-repeated="33"/>
        </table:table-row>
        <table:table-row table:style-name="ro2">
          <table:table-cell table:style-name="ce218" table:formula="of:=['file:///D:/mp/projects/PR0118%20-%20ISO%2011171%20Calibrations/results/2025-05-19-LPA3-NAVAIR-11171-00009/11171-00009-LIVE.ods'#$'6 - B1'.$A$66]" office:value-type="float" office:value="17" calcext:value-type="float">
            <text:p>17</text:p>
          </table:table-cell>
          <table:table-cell table:formula="of:=['file:///D:/mp/projects/PR0118%20-%20ISO%2011171%20Calibrations/results/2025-05-19-LPA3-NAVAIR-11171-00009/11171-00009-LIVE.ods'#$'6 - B1'.$B$66]" office:value-type="float" office:value="5386" calcext:value-type="float">
            <text:p>5386</text:p>
          </table:table-cell>
          <table:table-cell table:formula="of:=['file:///D:/mp/projects/PR0118%20-%20ISO%2011171%20Calibrations/results/2025-05-19-LPA3-NAVAIR-11171-00009/11171-00009-LIVE.ods'#$'6 - B1'.$C$66]" office:value-type="float" office:value="5910" calcext:value-type="float">
            <text:p>5910</text:p>
          </table:table-cell>
          <table:table-cell table:formula="of:=['file:///D:/mp/projects/PR0118%20-%20ISO%2011171%20Calibrations/results/2025-05-19-LPA3-NAVAIR-11171-00009/11171-00009-LIVE.ods'#$'6 - B1'.$D$66]" office:value-type="float" office:value="5909" calcext:value-type="float">
            <text:p>5909</text:p>
          </table:table-cell>
          <table:table-cell table:formula="of:=['file:///D:/mp/projects/PR0118%20-%20ISO%2011171%20Calibrations/results/2025-05-19-LPA3-NAVAIR-11171-00009/11171-00009-LIVE.ods'#$'6 - B1'.$E$66]" office:value-type="float" office:value="5640" calcext:value-type="float">
            <text:p>5640</text:p>
          </table:table-cell>
          <table:table-cell table:formula="of:=['file:///D:/mp/projects/PR0118%20-%20ISO%2011171%20Calibrations/results/2025-05-19-LPA3-NAVAIR-11171-00009/11171-00009-LIVE.ods'#$'6 - B1'.$F$66]" office:value-type="float" office:value="5698" calcext:value-type="float">
            <text:p>5698</text:p>
          </table:table-cell>
          <table:table-cell table:formula="of:=['file:///D:/mp/projects/PR0118%20-%20ISO%2011171%20Calibrations/results/2025-05-19-LPA3-NAVAIR-11171-00009/11171-00009-LIVE.ods'#$'6 - B1'.$G$66]" office:value-type="float" office:value="4528" calcext:value-type="float">
            <text:p>4528</text:p>
          </table:table-cell>
          <table:table-cell table:formula="of:=['file:///D:/mp/projects/PR0118%20-%20ISO%2011171%20Calibrations/results/2025-05-19-LPA3-NAVAIR-11171-00009/11171-00009-LIVE.ods'#$'6 - B1'.$H$66]" office:value-type="float" office:value="4590" calcext:value-type="float">
            <text:p>4590</text:p>
          </table:table-cell>
          <table:table-cell table:style-name="ce221" table:formula="of:=['file:///D:/mp/projects/PR0118%20-%20ISO%2011171%20Calibrations/results/2025-05-19-LPA3-NAVAIR-11171-00009/11171-00009-LIVE.ods'#$'6 - B1'.$I$66]" office:value-type="float" office:value="4442" calcext:value-type="float">
            <text:p>4442</text:p>
          </table:table-cell>
          <table:table-cell table:formula="of:=['file:///D:/mp/projects/PR0118%20-%20ISO%2011171%20Calibrations/results/2025-05-19-LPA3-NAVAIR-11171-00009/11171-00009-LIVE.ods'#$'6 - B1'.$J$66]" office:value-type="float" office:value="4576" calcext:value-type="float">
            <text:p>4576</text:p>
          </table:table-cell>
          <table:table-cell table:style-name="ce221" table:formula="of:=['file:///D:/mp/projects/PR0118%20-%20ISO%2011171%20Calibrations/results/2025-05-19-LPA3-NAVAIR-11171-00009/11171-00009-LIVE.ods'#$'6 - B1'.$K$66]" office:value-type="float" office:value="4562" calcext:value-type="float">
            <text:p>4562</text:p>
          </table:table-cell>
          <table:table-cell table:style-name="ce221" table:formula="of:=['file:///D:/mp/projects/PR0118%20-%20ISO%2011171%20Calibrations/results/2025-05-19-LPA3-NAVAIR-11171-00009/11171-00009-LIVE.ods'#$'6 - B1'.$L$66]" office:value-type="float" office:value="4285" calcext:value-type="float">
            <text:p>4285</text:p>
          </table:table-cell>
          <table:table-cell table:style-name="ce221" table:formula="of:=['file:///D:/mp/projects/PR0118%20-%20ISO%2011171%20Calibrations/results/2025-05-19-LPA3-NAVAIR-11171-00009/11171-00009-LIVE.ods'#$'6 - B1'.$M$66]" office:value-type="float" office:value="4466" calcext:value-type="float">
            <text:p>4466</text:p>
          </table:table-cell>
          <table:table-cell table:style-name="ce221" table:formula="of:=['file:///D:/mp/projects/PR0118%20-%20ISO%2011171%20Calibrations/results/2025-05-19-LPA3-NAVAIR-11171-00009/11171-00009-LIVE.ods'#$'6 - B1'.$N$66]" office:value-type="float" office:value="4373" calcext:value-type="float">
            <text:p>4373</text:p>
          </table:table-cell>
          <table:table-cell table:formula="of:=['file:///D:/mp/projects/PR0118%20-%20ISO%2011171%20Calibrations/results/2025-05-19-LPA3-NAVAIR-11171-00009/11171-00009-LIVE.ods'#$'6 - B1'.$O$66]" office:value-type="float" office:value="4357" calcext:value-type="float">
            <text:p>4357</text:p>
          </table:table-cell>
          <table:table-cell table:style-name="ce221" table:formula="of:=['file:///D:/mp/projects/PR0118%20-%20ISO%2011171%20Calibrations/results/2025-05-19-LPA3-NAVAIR-11171-00009/11171-00009-LIVE.ods'#$'6 - B1'.$P$66]" office:value-type="float" office:value="4289" calcext:value-type="float">
            <text:p>4289</text:p>
          </table:table-cell>
          <table:table-cell table:style-name="ce227" table:number-columns-repeated="33"/>
        </table:table-row>
        <table:table-row table:style-name="ro2">
          <table:table-cell table:style-name="ce218" table:formula="of:=['file:///D:/mp/projects/PR0118%20-%20ISO%2011171%20Calibrations/results/2025-05-19-LPA3-NAVAIR-11171-00009/11171-00009-LIVE.ods'#$'6 - B1'.$A$67]" office:value-type="float" office:value="18" calcext:value-type="float">
            <text:p>18</text:p>
          </table:table-cell>
          <table:table-cell table:formula="of:=['file:///D:/mp/projects/PR0118%20-%20ISO%2011171%20Calibrations/results/2025-05-19-LPA3-NAVAIR-11171-00009/11171-00009-LIVE.ods'#$'6 - B1'.$B$67]" office:value-type="float" office:value="4142" calcext:value-type="float">
            <text:p>4142</text:p>
          </table:table-cell>
          <table:table-cell table:formula="of:=['file:///D:/mp/projects/PR0118%20-%20ISO%2011171%20Calibrations/results/2025-05-19-LPA3-NAVAIR-11171-00009/11171-00009-LIVE.ods'#$'6 - B1'.$C$67]" office:value-type="float" office:value="4444" calcext:value-type="float">
            <text:p>4444</text:p>
          </table:table-cell>
          <table:table-cell table:formula="of:=['file:///D:/mp/projects/PR0118%20-%20ISO%2011171%20Calibrations/results/2025-05-19-LPA3-NAVAIR-11171-00009/11171-00009-LIVE.ods'#$'6 - B1'.$D$67]" office:value-type="float" office:value="4538" calcext:value-type="float">
            <text:p>4538</text:p>
          </table:table-cell>
          <table:table-cell table:formula="of:=['file:///D:/mp/projects/PR0118%20-%20ISO%2011171%20Calibrations/results/2025-05-19-LPA3-NAVAIR-11171-00009/11171-00009-LIVE.ods'#$'6 - B1'.$E$67]" office:value-type="float" office:value="4272" calcext:value-type="float">
            <text:p>4272</text:p>
          </table:table-cell>
          <table:table-cell table:formula="of:=['file:///D:/mp/projects/PR0118%20-%20ISO%2011171%20Calibrations/results/2025-05-19-LPA3-NAVAIR-11171-00009/11171-00009-LIVE.ods'#$'6 - B1'.$F$67]" office:value-type="float" office:value="4234" calcext:value-type="float">
            <text:p>4234</text:p>
          </table:table-cell>
          <table:table-cell table:formula="of:=['file:///D:/mp/projects/PR0118%20-%20ISO%2011171%20Calibrations/results/2025-05-19-LPA3-NAVAIR-11171-00009/11171-00009-LIVE.ods'#$'6 - B1'.$G$67]" office:value-type="float" office:value="3986" calcext:value-type="float">
            <text:p>3986</text:p>
          </table:table-cell>
          <table:table-cell table:formula="of:=['file:///D:/mp/projects/PR0118%20-%20ISO%2011171%20Calibrations/results/2025-05-19-LPA3-NAVAIR-11171-00009/11171-00009-LIVE.ods'#$'6 - B1'.$H$67]" office:value-type="float" office:value="4022" calcext:value-type="float">
            <text:p>4022</text:p>
          </table:table-cell>
          <table:table-cell table:style-name="ce221" table:formula="of:=['file:///D:/mp/projects/PR0118%20-%20ISO%2011171%20Calibrations/results/2025-05-19-LPA3-NAVAIR-11171-00009/11171-00009-LIVE.ods'#$'6 - B1'.$I$67]" office:value-type="float" office:value="3948" calcext:value-type="float">
            <text:p>3948</text:p>
          </table:table-cell>
          <table:table-cell table:formula="of:=['file:///D:/mp/projects/PR0118%20-%20ISO%2011171%20Calibrations/results/2025-05-19-LPA3-NAVAIR-11171-00009/11171-00009-LIVE.ods'#$'6 - B1'.$J$67]" office:value-type="float" office:value="4047" calcext:value-type="float">
            <text:p>4047</text:p>
          </table:table-cell>
          <table:table-cell table:style-name="ce221" table:formula="of:=['file:///D:/mp/projects/PR0118%20-%20ISO%2011171%20Calibrations/results/2025-05-19-LPA3-NAVAIR-11171-00009/11171-00009-LIVE.ods'#$'6 - B1'.$K$67]" office:value-type="float" office:value="3972" calcext:value-type="float">
            <text:p>3972</text:p>
          </table:table-cell>
          <table:table-cell table:style-name="ce221" table:formula="of:=['file:///D:/mp/projects/PR0118%20-%20ISO%2011171%20Calibrations/results/2025-05-19-LPA3-NAVAIR-11171-00009/11171-00009-LIVE.ods'#$'6 - B1'.$L$67]" office:value-type="float" office:value="3770" calcext:value-type="float">
            <text:p>3770</text:p>
          </table:table-cell>
          <table:table-cell table:style-name="ce221" table:formula="of:=['file:///D:/mp/projects/PR0118%20-%20ISO%2011171%20Calibrations/results/2025-05-19-LPA3-NAVAIR-11171-00009/11171-00009-LIVE.ods'#$'6 - B1'.$M$67]" office:value-type="float" office:value="3941" calcext:value-type="float">
            <text:p>3941</text:p>
          </table:table-cell>
          <table:table-cell table:style-name="ce221" table:formula="of:=['file:///D:/mp/projects/PR0118%20-%20ISO%2011171%20Calibrations/results/2025-05-19-LPA3-NAVAIR-11171-00009/11171-00009-LIVE.ods'#$'6 - B1'.$N$67]" office:value-type="float" office:value="3897" calcext:value-type="float">
            <text:p>3897</text:p>
          </table:table-cell>
          <table:table-cell table:formula="of:=['file:///D:/mp/projects/PR0118%20-%20ISO%2011171%20Calibrations/results/2025-05-19-LPA3-NAVAIR-11171-00009/11171-00009-LIVE.ods'#$'6 - B1'.$O$67]" office:value-type="float" office:value="3806" calcext:value-type="float">
            <text:p>3806</text:p>
          </table:table-cell>
          <table:table-cell table:style-name="ce221" table:formula="of:=['file:///D:/mp/projects/PR0118%20-%20ISO%2011171%20Calibrations/results/2025-05-19-LPA3-NAVAIR-11171-00009/11171-00009-LIVE.ods'#$'6 - B1'.$P$67]" office:value-type="float" office:value="3752" calcext:value-type="float">
            <text:p>3752</text:p>
          </table:table-cell>
          <table:table-cell table:style-name="ce227" table:number-columns-repeated="33"/>
        </table:table-row>
        <table:table-row table:style-name="ro2">
          <table:table-cell table:style-name="ce218" table:formula="of:=['file:///D:/mp/projects/PR0118%20-%20ISO%2011171%20Calibrations/results/2025-05-19-LPA3-NAVAIR-11171-00009/11171-00009-LIVE.ods'#$'6 - B1'.$A$68]" office:value-type="float" office:value="19" calcext:value-type="float">
            <text:p>19</text:p>
          </table:table-cell>
          <table:table-cell table:formula="of:=['file:///D:/mp/projects/PR0118%20-%20ISO%2011171%20Calibrations/results/2025-05-19-LPA3-NAVAIR-11171-00009/11171-00009-LIVE.ods'#$'6 - B1'.$B$68]" office:value-type="float" office:value="3183" calcext:value-type="float">
            <text:p>3183</text:p>
          </table:table-cell>
          <table:table-cell table:formula="of:=['file:///D:/mp/projects/PR0118%20-%20ISO%2011171%20Calibrations/results/2025-05-19-LPA3-NAVAIR-11171-00009/11171-00009-LIVE.ods'#$'6 - B1'.$C$68]" office:value-type="float" office:value="3376" calcext:value-type="float">
            <text:p>3376</text:p>
          </table:table-cell>
          <table:table-cell table:formula="of:=['file:///D:/mp/projects/PR0118%20-%20ISO%2011171%20Calibrations/results/2025-05-19-LPA3-NAVAIR-11171-00009/11171-00009-LIVE.ods'#$'6 - B1'.$D$68]" office:value-type="float" office:value="3435" calcext:value-type="float">
            <text:p>3435</text:p>
          </table:table-cell>
          <table:table-cell table:formula="of:=['file:///D:/mp/projects/PR0118%20-%20ISO%2011171%20Calibrations/results/2025-05-19-LPA3-NAVAIR-11171-00009/11171-00009-LIVE.ods'#$'6 - B1'.$E$68]" office:value-type="float" office:value="3299" calcext:value-type="float">
            <text:p>3299</text:p>
          </table:table-cell>
          <table:table-cell table:formula="of:=['file:///D:/mp/projects/PR0118%20-%20ISO%2011171%20Calibrations/results/2025-05-19-LPA3-NAVAIR-11171-00009/11171-00009-LIVE.ods'#$'6 - B1'.$F$68]" office:value-type="float" office:value="3199" calcext:value-type="float">
            <text:p>3199</text:p>
          </table:table-cell>
          <table:table-cell table:formula="of:=['file:///D:/mp/projects/PR0118%20-%20ISO%2011171%20Calibrations/results/2025-05-19-LPA3-NAVAIR-11171-00009/11171-00009-LIVE.ods'#$'6 - B1'.$G$68]" office:value-type="float" office:value="3507" calcext:value-type="float">
            <text:p>3507</text:p>
          </table:table-cell>
          <table:table-cell table:formula="of:=['file:///D:/mp/projects/PR0118%20-%20ISO%2011171%20Calibrations/results/2025-05-19-LPA3-NAVAIR-11171-00009/11171-00009-LIVE.ods'#$'6 - B1'.$H$68]" office:value-type="float" office:value="3560" calcext:value-type="float">
            <text:p>3560</text:p>
          </table:table-cell>
          <table:table-cell table:style-name="ce221" table:formula="of:=['file:///D:/mp/projects/PR0118%20-%20ISO%2011171%20Calibrations/results/2025-05-19-LPA3-NAVAIR-11171-00009/11171-00009-LIVE.ods'#$'6 - B1'.$I$68]" office:value-type="float" office:value="3513" calcext:value-type="float">
            <text:p>3513</text:p>
          </table:table-cell>
          <table:table-cell table:formula="of:=['file:///D:/mp/projects/PR0118%20-%20ISO%2011171%20Calibrations/results/2025-05-19-LPA3-NAVAIR-11171-00009/11171-00009-LIVE.ods'#$'6 - B1'.$J$68]" office:value-type="float" office:value="3608" calcext:value-type="float">
            <text:p>3608</text:p>
          </table:table-cell>
          <table:table-cell table:style-name="ce221" table:formula="of:=['file:///D:/mp/projects/PR0118%20-%20ISO%2011171%20Calibrations/results/2025-05-19-LPA3-NAVAIR-11171-00009/11171-00009-LIVE.ods'#$'6 - B1'.$K$68]" office:value-type="float" office:value="3481" calcext:value-type="float">
            <text:p>3481</text:p>
          </table:table-cell>
          <table:table-cell table:style-name="ce221" table:formula="of:=['file:///D:/mp/projects/PR0118%20-%20ISO%2011171%20Calibrations/results/2025-05-19-LPA3-NAVAIR-11171-00009/11171-00009-LIVE.ods'#$'6 - B1'.$L$68]" office:value-type="float" office:value="3320" calcext:value-type="float">
            <text:p>3320</text:p>
          </table:table-cell>
          <table:table-cell table:style-name="ce221" table:formula="of:=['file:///D:/mp/projects/PR0118%20-%20ISO%2011171%20Calibrations/results/2025-05-19-LPA3-NAVAIR-11171-00009/11171-00009-LIVE.ods'#$'6 - B1'.$M$68]" office:value-type="float" office:value="3511" calcext:value-type="float">
            <text:p>3511</text:p>
          </table:table-cell>
          <table:table-cell table:style-name="ce221" table:formula="of:=['file:///D:/mp/projects/PR0118%20-%20ISO%2011171%20Calibrations/results/2025-05-19-LPA3-NAVAIR-11171-00009/11171-00009-LIVE.ods'#$'6 - B1'.$N$68]" office:value-type="float" office:value="3460" calcext:value-type="float">
            <text:p>3460</text:p>
          </table:table-cell>
          <table:table-cell table:formula="of:=['file:///D:/mp/projects/PR0118%20-%20ISO%2011171%20Calibrations/results/2025-05-19-LPA3-NAVAIR-11171-00009/11171-00009-LIVE.ods'#$'6 - B1'.$O$68]" office:value-type="float" office:value="3351" calcext:value-type="float">
            <text:p>3351</text:p>
          </table:table-cell>
          <table:table-cell table:style-name="ce221" table:formula="of:=['file:///D:/mp/projects/PR0118%20-%20ISO%2011171%20Calibrations/results/2025-05-19-LPA3-NAVAIR-11171-00009/11171-00009-LIVE.ods'#$'6 - B1'.$P$68]" office:value-type="float" office:value="3335" calcext:value-type="float">
            <text:p>3335</text:p>
          </table:table-cell>
          <table:table-cell table:number-columns-repeated="33"/>
        </table:table-row>
        <table:table-row table:style-name="ro2">
          <table:table-cell table:style-name="ce218" table:formula="of:=['file:///D:/mp/projects/PR0118%20-%20ISO%2011171%20Calibrations/results/2025-05-19-LPA3-NAVAIR-11171-00009/11171-00009-LIVE.ods'#$'6 - B1'.$A$69]" office:value-type="float" office:value="20" calcext:value-type="float">
            <text:p>20</text:p>
          </table:table-cell>
          <table:table-cell table:formula="of:=['file:///D:/mp/projects/PR0118%20-%20ISO%2011171%20Calibrations/results/2025-05-19-LPA3-NAVAIR-11171-00009/11171-00009-LIVE.ods'#$'6 - B1'.$B$69]" office:value-type="float" office:value="2478" calcext:value-type="float">
            <text:p>2478</text:p>
          </table:table-cell>
          <table:table-cell table:formula="of:=['file:///D:/mp/projects/PR0118%20-%20ISO%2011171%20Calibrations/results/2025-05-19-LPA3-NAVAIR-11171-00009/11171-00009-LIVE.ods'#$'6 - B1'.$C$69]" office:value-type="float" office:value="2570" calcext:value-type="float">
            <text:p>2570</text:p>
          </table:table-cell>
          <table:table-cell table:formula="of:=['file:///D:/mp/projects/PR0118%20-%20ISO%2011171%20Calibrations/results/2025-05-19-LPA3-NAVAIR-11171-00009/11171-00009-LIVE.ods'#$'6 - B1'.$D$69]" office:value-type="float" office:value="2635" calcext:value-type="float">
            <text:p>2635</text:p>
          </table:table-cell>
          <table:table-cell table:formula="of:=['file:///D:/mp/projects/PR0118%20-%20ISO%2011171%20Calibrations/results/2025-05-19-LPA3-NAVAIR-11171-00009/11171-00009-LIVE.ods'#$'6 - B1'.$E$69]" office:value-type="float" office:value="2483" calcext:value-type="float">
            <text:p>2483</text:p>
          </table:table-cell>
          <table:table-cell table:formula="of:=['file:///D:/mp/projects/PR0118%20-%20ISO%2011171%20Calibrations/results/2025-05-19-LPA3-NAVAIR-11171-00009/11171-00009-LIVE.ods'#$'6 - B1'.$F$69]" office:value-type="float" office:value="2430" calcext:value-type="float">
            <text:p>2430</text:p>
          </table:table-cell>
          <table:table-cell table:formula="of:=['file:///D:/mp/projects/PR0118%20-%20ISO%2011171%20Calibrations/results/2025-05-19-LPA3-NAVAIR-11171-00009/11171-00009-LIVE.ods'#$'6 - B1'.$G$69]" office:value-type="float" office:value="3160" calcext:value-type="float">
            <text:p>3160</text:p>
          </table:table-cell>
          <table:table-cell table:formula="of:=['file:///D:/mp/projects/PR0118%20-%20ISO%2011171%20Calibrations/results/2025-05-19-LPA3-NAVAIR-11171-00009/11171-00009-LIVE.ods'#$'6 - B1'.$H$69]" office:value-type="float" office:value="3179" calcext:value-type="float">
            <text:p>3179</text:p>
          </table:table-cell>
          <table:table-cell table:style-name="ce221" table:formula="of:=['file:///D:/mp/projects/PR0118%20-%20ISO%2011171%20Calibrations/results/2025-05-19-LPA3-NAVAIR-11171-00009/11171-00009-LIVE.ods'#$'6 - B1'.$I$69]" office:value-type="float" office:value="3159" calcext:value-type="float">
            <text:p>3159</text:p>
          </table:table-cell>
          <table:table-cell table:formula="of:=['file:///D:/mp/projects/PR0118%20-%20ISO%2011171%20Calibrations/results/2025-05-19-LPA3-NAVAIR-11171-00009/11171-00009-LIVE.ods'#$'6 - B1'.$J$69]" office:value-type="float" office:value="3222" calcext:value-type="float">
            <text:p>3222</text:p>
          </table:table-cell>
          <table:table-cell table:style-name="ce221" table:formula="of:=['file:///D:/mp/projects/PR0118%20-%20ISO%2011171%20Calibrations/results/2025-05-19-LPA3-NAVAIR-11171-00009/11171-00009-LIVE.ods'#$'6 - B1'.$K$69]" office:value-type="float" office:value="3112" calcext:value-type="float">
            <text:p>3112</text:p>
          </table:table-cell>
          <table:table-cell table:style-name="ce221" table:formula="of:=['file:///D:/mp/projects/PR0118%20-%20ISO%2011171%20Calibrations/results/2025-05-19-LPA3-NAVAIR-11171-00009/11171-00009-LIVE.ods'#$'6 - B1'.$L$69]" office:value-type="float" office:value="2954" calcext:value-type="float">
            <text:p>2954</text:p>
          </table:table-cell>
          <table:table-cell table:style-name="ce221" table:formula="of:=['file:///D:/mp/projects/PR0118%20-%20ISO%2011171%20Calibrations/results/2025-05-19-LPA3-NAVAIR-11171-00009/11171-00009-LIVE.ods'#$'6 - B1'.$M$69]" office:value-type="float" office:value="3133" calcext:value-type="float">
            <text:p>3133</text:p>
          </table:table-cell>
          <table:table-cell table:style-name="ce221" table:formula="of:=['file:///D:/mp/projects/PR0118%20-%20ISO%2011171%20Calibrations/results/2025-05-19-LPA3-NAVAIR-11171-00009/11171-00009-LIVE.ods'#$'6 - B1'.$N$69]" office:value-type="float" office:value="3113" calcext:value-type="float">
            <text:p>3113</text:p>
          </table:table-cell>
          <table:table-cell table:formula="of:=['file:///D:/mp/projects/PR0118%20-%20ISO%2011171%20Calibrations/results/2025-05-19-LPA3-NAVAIR-11171-00009/11171-00009-LIVE.ods'#$'6 - B1'.$O$69]" office:value-type="float" office:value="3003" calcext:value-type="float">
            <text:p>3003</text:p>
          </table:table-cell>
          <table:table-cell table:style-name="ce221" table:formula="of:=['file:///D:/mp/projects/PR0118%20-%20ISO%2011171%20Calibrations/results/2025-05-19-LPA3-NAVAIR-11171-00009/11171-00009-LIVE.ods'#$'6 - B1'.$P$69]" office:value-type="float" office:value="2977" calcext:value-type="float">
            <text:p>2977</text:p>
          </table:table-cell>
          <table:table-cell table:number-columns-repeated="33"/>
        </table:table-row>
        <table:table-row table:style-name="ro2">
          <table:table-cell table:style-name="ce218" table:formula="of:=['file:///D:/mp/projects/PR0118%20-%20ISO%2011171%20Calibrations/results/2025-05-19-LPA3-NAVAIR-11171-00009/11171-00009-LIVE.ods'#$'6 - B1'.$A$70]" office:value-type="float" office:value="21" calcext:value-type="float">
            <text:p>21</text:p>
          </table:table-cell>
          <table:table-cell table:formula="of:=['file:///D:/mp/projects/PR0118%20-%20ISO%2011171%20Calibrations/results/2025-05-19-LPA3-NAVAIR-11171-00009/11171-00009-LIVE.ods'#$'6 - B1'.$B$70]" office:value-type="float" office:value="1917" calcext:value-type="float">
            <text:p>1917</text:p>
          </table:table-cell>
          <table:table-cell table:formula="of:=['file:///D:/mp/projects/PR0118%20-%20ISO%2011171%20Calibrations/results/2025-05-19-LPA3-NAVAIR-11171-00009/11171-00009-LIVE.ods'#$'6 - B1'.$C$70]" office:value-type="float" office:value="1944" calcext:value-type="float">
            <text:p>1944</text:p>
          </table:table-cell>
          <table:table-cell table:formula="of:=['file:///D:/mp/projects/PR0118%20-%20ISO%2011171%20Calibrations/results/2025-05-19-LPA3-NAVAIR-11171-00009/11171-00009-LIVE.ods'#$'6 - B1'.$D$70]" office:value-type="float" office:value="2031" calcext:value-type="float">
            <text:p>2031</text:p>
          </table:table-cell>
          <table:table-cell table:formula="of:=['file:///D:/mp/projects/PR0118%20-%20ISO%2011171%20Calibrations/results/2025-05-19-LPA3-NAVAIR-11171-00009/11171-00009-LIVE.ods'#$'6 - B1'.$E$70]" office:value-type="float" office:value="1916" calcext:value-type="float">
            <text:p>1916</text:p>
          </table:table-cell>
          <table:table-cell table:formula="of:=['file:///D:/mp/projects/PR0118%20-%20ISO%2011171%20Calibrations/results/2025-05-19-LPA3-NAVAIR-11171-00009/11171-00009-LIVE.ods'#$'6 - B1'.$F$70]" office:value-type="float" office:value="1828" calcext:value-type="float">
            <text:p>1828</text:p>
          </table:table-cell>
          <table:table-cell table:formula="of:=['file:///D:/mp/projects/PR0118%20-%20ISO%2011171%20Calibrations/results/2025-05-19-LPA3-NAVAIR-11171-00009/11171-00009-LIVE.ods'#$'6 - B1'.$G$70]" office:value-type="float" office:value="2868" calcext:value-type="float">
            <text:p>2868</text:p>
          </table:table-cell>
          <table:table-cell table:formula="of:=['file:///D:/mp/projects/PR0118%20-%20ISO%2011171%20Calibrations/results/2025-05-19-LPA3-NAVAIR-11171-00009/11171-00009-LIVE.ods'#$'6 - B1'.$H$70]" office:value-type="float" office:value="2904" calcext:value-type="float">
            <text:p>2904</text:p>
          </table:table-cell>
          <table:table-cell table:style-name="ce221" table:formula="of:=['file:///D:/mp/projects/PR0118%20-%20ISO%2011171%20Calibrations/results/2025-05-19-LPA3-NAVAIR-11171-00009/11171-00009-LIVE.ods'#$'6 - B1'.$I$70]" office:value-type="float" office:value="2876" calcext:value-type="float">
            <text:p>2876</text:p>
          </table:table-cell>
          <table:table-cell table:formula="of:=['file:///D:/mp/projects/PR0118%20-%20ISO%2011171%20Calibrations/results/2025-05-19-LPA3-NAVAIR-11171-00009/11171-00009-LIVE.ods'#$'6 - B1'.$J$70]" office:value-type="float" office:value="2918" calcext:value-type="float">
            <text:p>2918</text:p>
          </table:table-cell>
          <table:table-cell table:style-name="ce221" table:formula="of:=['file:///D:/mp/projects/PR0118%20-%20ISO%2011171%20Calibrations/results/2025-05-19-LPA3-NAVAIR-11171-00009/11171-00009-LIVE.ods'#$'6 - B1'.$K$70]" office:value-type="float" office:value="2825" calcext:value-type="float">
            <text:p>2825</text:p>
          </table:table-cell>
          <table:table-cell table:style-name="ce221" table:formula="of:=['file:///D:/mp/projects/PR0118%20-%20ISO%2011171%20Calibrations/results/2025-05-19-LPA3-NAVAIR-11171-00009/11171-00009-LIVE.ods'#$'6 - B1'.$L$70]" office:value-type="float" office:value="2697" calcext:value-type="float">
            <text:p>2697</text:p>
          </table:table-cell>
          <table:table-cell table:style-name="ce221" table:formula="of:=['file:///D:/mp/projects/PR0118%20-%20ISO%2011171%20Calibrations/results/2025-05-19-LPA3-NAVAIR-11171-00009/11171-00009-LIVE.ods'#$'6 - B1'.$M$70]" office:value-type="float" office:value="2852" calcext:value-type="float">
            <text:p>2852</text:p>
          </table:table-cell>
          <table:table-cell table:style-name="ce221" table:formula="of:=['file:///D:/mp/projects/PR0118%20-%20ISO%2011171%20Calibrations/results/2025-05-19-LPA3-NAVAIR-11171-00009/11171-00009-LIVE.ods'#$'6 - B1'.$N$70]" office:value-type="float" office:value="2841" calcext:value-type="float">
            <text:p>2841</text:p>
          </table:table-cell>
          <table:table-cell table:formula="of:=['file:///D:/mp/projects/PR0118%20-%20ISO%2011171%20Calibrations/results/2025-05-19-LPA3-NAVAIR-11171-00009/11171-00009-LIVE.ods'#$'6 - B1'.$O$70]" office:value-type="float" office:value="2723" calcext:value-type="float">
            <text:p>2723</text:p>
          </table:table-cell>
          <table:table-cell table:style-name="ce221" table:formula="of:=['file:///D:/mp/projects/PR0118%20-%20ISO%2011171%20Calibrations/results/2025-05-19-LPA3-NAVAIR-11171-00009/11171-00009-LIVE.ods'#$'6 - B1'.$P$70]" office:value-type="float" office:value="2692" calcext:value-type="float">
            <text:p>2692</text:p>
          </table:table-cell>
          <table:table-cell table:number-columns-repeated="33"/>
        </table:table-row>
        <table:table-row table:style-name="ro2">
          <table:table-cell table:style-name="ce218" table:formula="of:=['file:///D:/mp/projects/PR0118%20-%20ISO%2011171%20Calibrations/results/2025-05-19-LPA3-NAVAIR-11171-00009/11171-00009-LIVE.ods'#$'6 - B1'.$A$71]" office:value-type="float" office:value="22" calcext:value-type="float">
            <text:p>22</text:p>
          </table:table-cell>
          <table:table-cell table:formula="of:=['file:///D:/mp/projects/PR0118%20-%20ISO%2011171%20Calibrations/results/2025-05-19-LPA3-NAVAIR-11171-00009/11171-00009-LIVE.ods'#$'6 - B1'.$B$71]" office:value-type="float" office:value="1468" calcext:value-type="float">
            <text:p>1468</text:p>
          </table:table-cell>
          <table:table-cell table:formula="of:=['file:///D:/mp/projects/PR0118%20-%20ISO%2011171%20Calibrations/results/2025-05-19-LPA3-NAVAIR-11171-00009/11171-00009-LIVE.ods'#$'6 - B1'.$C$71]" office:value-type="float" office:value="1488" calcext:value-type="float">
            <text:p>1488</text:p>
          </table:table-cell>
          <table:table-cell table:formula="of:=['file:///D:/mp/projects/PR0118%20-%20ISO%2011171%20Calibrations/results/2025-05-19-LPA3-NAVAIR-11171-00009/11171-00009-LIVE.ods'#$'6 - B1'.$D$71]" office:value-type="float" office:value="1571" calcext:value-type="float">
            <text:p>1571</text:p>
          </table:table-cell>
          <table:table-cell table:formula="of:=['file:///D:/mp/projects/PR0118%20-%20ISO%2011171%20Calibrations/results/2025-05-19-LPA3-NAVAIR-11171-00009/11171-00009-LIVE.ods'#$'6 - B1'.$E$71]" office:value-type="float" office:value="1492" calcext:value-type="float">
            <text:p>1492</text:p>
          </table:table-cell>
          <table:table-cell table:formula="of:=['file:///D:/mp/projects/PR0118%20-%20ISO%2011171%20Calibrations/results/2025-05-19-LPA3-NAVAIR-11171-00009/11171-00009-LIVE.ods'#$'6 - B1'.$F$71]" office:value-type="float" office:value="1409" calcext:value-type="float">
            <text:p>1409</text:p>
          </table:table-cell>
          <table:table-cell table:formula="of:=['file:///D:/mp/projects/PR0118%20-%20ISO%2011171%20Calibrations/results/2025-05-19-LPA3-NAVAIR-11171-00009/11171-00009-LIVE.ods'#$'6 - B1'.$G$71]" office:value-type="float" office:value="2625" calcext:value-type="float">
            <text:p>2625</text:p>
          </table:table-cell>
          <table:table-cell table:formula="of:=['file:///D:/mp/projects/PR0118%20-%20ISO%2011171%20Calibrations/results/2025-05-19-LPA3-NAVAIR-11171-00009/11171-00009-LIVE.ods'#$'6 - B1'.$H$71]" office:value-type="float" office:value="2641" calcext:value-type="float">
            <text:p>2641</text:p>
          </table:table-cell>
          <table:table-cell table:style-name="ce221" table:formula="of:=['file:///D:/mp/projects/PR0118%20-%20ISO%2011171%20Calibrations/results/2025-05-19-LPA3-NAVAIR-11171-00009/11171-00009-LIVE.ods'#$'6 - B1'.$I$71]" office:value-type="float" office:value="2610" calcext:value-type="float">
            <text:p>2610</text:p>
          </table:table-cell>
          <table:table-cell table:formula="of:=['file:///D:/mp/projects/PR0118%20-%20ISO%2011171%20Calibrations/results/2025-05-19-LPA3-NAVAIR-11171-00009/11171-00009-LIVE.ods'#$'6 - B1'.$J$71]" office:value-type="float" office:value="2669" calcext:value-type="float">
            <text:p>2669</text:p>
          </table:table-cell>
          <table:table-cell table:style-name="ce221" table:formula="of:=['file:///D:/mp/projects/PR0118%20-%20ISO%2011171%20Calibrations/results/2025-05-19-LPA3-NAVAIR-11171-00009/11171-00009-LIVE.ods'#$'6 - B1'.$K$71]" office:value-type="float" office:value="2549" calcext:value-type="float">
            <text:p>2549</text:p>
          </table:table-cell>
          <table:table-cell table:style-name="ce221" table:formula="of:=['file:///D:/mp/projects/PR0118%20-%20ISO%2011171%20Calibrations/results/2025-05-19-LPA3-NAVAIR-11171-00009/11171-00009-LIVE.ods'#$'6 - B1'.$L$71]" office:value-type="float" office:value="2476" calcext:value-type="float">
            <text:p>2476</text:p>
          </table:table-cell>
          <table:table-cell table:style-name="ce221" table:formula="of:=['file:///D:/mp/projects/PR0118%20-%20ISO%2011171%20Calibrations/results/2025-05-19-LPA3-NAVAIR-11171-00009/11171-00009-LIVE.ods'#$'6 - B1'.$M$71]" office:value-type="float" office:value="2578" calcext:value-type="float">
            <text:p>2578</text:p>
          </table:table-cell>
          <table:table-cell table:style-name="ce221" table:formula="of:=['file:///D:/mp/projects/PR0118%20-%20ISO%2011171%20Calibrations/results/2025-05-19-LPA3-NAVAIR-11171-00009/11171-00009-LIVE.ods'#$'6 - B1'.$N$71]" office:value-type="float" office:value="2610" calcext:value-type="float">
            <text:p>2610</text:p>
          </table:table-cell>
          <table:table-cell table:formula="of:=['file:///D:/mp/projects/PR0118%20-%20ISO%2011171%20Calibrations/results/2025-05-19-LPA3-NAVAIR-11171-00009/11171-00009-LIVE.ods'#$'6 - B1'.$O$71]" office:value-type="float" office:value="2479" calcext:value-type="float">
            <text:p>2479</text:p>
          </table:table-cell>
          <table:table-cell table:style-name="ce221" table:formula="of:=['file:///D:/mp/projects/PR0118%20-%20ISO%2011171%20Calibrations/results/2025-05-19-LPA3-NAVAIR-11171-00009/11171-00009-LIVE.ods'#$'6 - B1'.$P$71]" office:value-type="float" office:value="2441" calcext:value-type="float">
            <text:p>2441</text:p>
          </table:table-cell>
          <table:table-cell table:number-columns-repeated="33"/>
        </table:table-row>
        <table:table-row table:style-name="ro2">
          <table:table-cell table:style-name="ce218" table:formula="of:=['file:///D:/mp/projects/PR0118%20-%20ISO%2011171%20Calibrations/results/2025-05-19-LPA3-NAVAIR-11171-00009/11171-00009-LIVE.ods'#$'6 - B1'.$A$72]" office:value-type="float" office:value="23" calcext:value-type="float">
            <text:p>23</text:p>
          </table:table-cell>
          <table:table-cell table:formula="of:=['file:///D:/mp/projects/PR0118%20-%20ISO%2011171%20Calibrations/results/2025-05-19-LPA3-NAVAIR-11171-00009/11171-00009-LIVE.ods'#$'6 - B1'.$B$72]" office:value-type="float" office:value="1133" calcext:value-type="float">
            <text:p>1133</text:p>
          </table:table-cell>
          <table:table-cell table:formula="of:=['file:///D:/mp/projects/PR0118%20-%20ISO%2011171%20Calibrations/results/2025-05-19-LPA3-NAVAIR-11171-00009/11171-00009-LIVE.ods'#$'6 - B1'.$C$72]" office:value-type="float" office:value="1135" calcext:value-type="float">
            <text:p>1135</text:p>
          </table:table-cell>
          <table:table-cell table:formula="of:=['file:///D:/mp/projects/PR0118%20-%20ISO%2011171%20Calibrations/results/2025-05-19-LPA3-NAVAIR-11171-00009/11171-00009-LIVE.ods'#$'6 - B1'.$D$72]" office:value-type="float" office:value="1188" calcext:value-type="float">
            <text:p>1188</text:p>
          </table:table-cell>
          <table:table-cell table:formula="of:=['file:///D:/mp/projects/PR0118%20-%20ISO%2011171%20Calibrations/results/2025-05-19-LPA3-NAVAIR-11171-00009/11171-00009-LIVE.ods'#$'6 - B1'.$E$72]" office:value-type="float" office:value="1152" calcext:value-type="float">
            <text:p>1152</text:p>
          </table:table-cell>
          <table:table-cell table:formula="of:=['file:///D:/mp/projects/PR0118%20-%20ISO%2011171%20Calibrations/results/2025-05-19-LPA3-NAVAIR-11171-00009/11171-00009-LIVE.ods'#$'6 - B1'.$F$72]" office:value-type="float" office:value="1063" calcext:value-type="float">
            <text:p>1063</text:p>
          </table:table-cell>
          <table:table-cell table:formula="of:=['file:///D:/mp/projects/PR0118%20-%20ISO%2011171%20Calibrations/results/2025-05-19-LPA3-NAVAIR-11171-00009/11171-00009-LIVE.ods'#$'6 - B1'.$G$72]" office:value-type="float" office:value="2319" calcext:value-type="float">
            <text:p>2319</text:p>
          </table:table-cell>
          <table:table-cell table:formula="of:=['file:///D:/mp/projects/PR0118%20-%20ISO%2011171%20Calibrations/results/2025-05-19-LPA3-NAVAIR-11171-00009/11171-00009-LIVE.ods'#$'6 - B1'.$H$72]" office:value-type="float" office:value="2356" calcext:value-type="float">
            <text:p>2356</text:p>
          </table:table-cell>
          <table:table-cell table:style-name="ce221" table:formula="of:=['file:///D:/mp/projects/PR0118%20-%20ISO%2011171%20Calibrations/results/2025-05-19-LPA3-NAVAIR-11171-00009/11171-00009-LIVE.ods'#$'6 - B1'.$I$72]" office:value-type="float" office:value="2337" calcext:value-type="float">
            <text:p>2337</text:p>
          </table:table-cell>
          <table:table-cell table:formula="of:=['file:///D:/mp/projects/PR0118%20-%20ISO%2011171%20Calibrations/results/2025-05-19-LPA3-NAVAIR-11171-00009/11171-00009-LIVE.ods'#$'6 - B1'.$J$72]" office:value-type="float" office:value="2372" calcext:value-type="float">
            <text:p>2372</text:p>
          </table:table-cell>
          <table:table-cell table:style-name="ce221" table:formula="of:=['file:///D:/mp/projects/PR0118%20-%20ISO%2011171%20Calibrations/results/2025-05-19-LPA3-NAVAIR-11171-00009/11171-00009-LIVE.ods'#$'6 - B1'.$K$72]" office:value-type="float" office:value="2277" calcext:value-type="float">
            <text:p>2277</text:p>
          </table:table-cell>
          <table:table-cell table:style-name="ce221" table:formula="of:=['file:///D:/mp/projects/PR0118%20-%20ISO%2011171%20Calibrations/results/2025-05-19-LPA3-NAVAIR-11171-00009/11171-00009-LIVE.ods'#$'6 - B1'.$L$72]" office:value-type="float" office:value="2216" calcext:value-type="float">
            <text:p>2216</text:p>
          </table:table-cell>
          <table:table-cell table:style-name="ce221" table:formula="of:=['file:///D:/mp/projects/PR0118%20-%20ISO%2011171%20Calibrations/results/2025-05-19-LPA3-NAVAIR-11171-00009/11171-00009-LIVE.ods'#$'6 - B1'.$M$72]" office:value-type="float" office:value="2302" calcext:value-type="float">
            <text:p>2302</text:p>
          </table:table-cell>
          <table:table-cell table:style-name="ce221" table:formula="of:=['file:///D:/mp/projects/PR0118%20-%20ISO%2011171%20Calibrations/results/2025-05-19-LPA3-NAVAIR-11171-00009/11171-00009-LIVE.ods'#$'6 - B1'.$N$72]" office:value-type="float" office:value="2326" calcext:value-type="float">
            <text:p>2326</text:p>
          </table:table-cell>
          <table:table-cell table:formula="of:=['file:///D:/mp/projects/PR0118%20-%20ISO%2011171%20Calibrations/results/2025-05-19-LPA3-NAVAIR-11171-00009/11171-00009-LIVE.ods'#$'6 - B1'.$O$72]" office:value-type="float" office:value="2173" calcext:value-type="float">
            <text:p>2173</text:p>
          </table:table-cell>
          <table:table-cell table:style-name="ce221" table:formula="of:=['file:///D:/mp/projects/PR0118%20-%20ISO%2011171%20Calibrations/results/2025-05-19-LPA3-NAVAIR-11171-00009/11171-00009-LIVE.ods'#$'6 - B1'.$P$72]" office:value-type="float" office:value="2152" calcext:value-type="float">
            <text:p>2152</text:p>
          </table:table-cell>
          <table:table-cell table:number-columns-repeated="33"/>
        </table:table-row>
        <table:table-row table:style-name="ro2">
          <table:table-cell table:style-name="ce218" table:formula="of:=['file:///D:/mp/projects/PR0118%20-%20ISO%2011171%20Calibrations/results/2025-05-19-LPA3-NAVAIR-11171-00009/11171-00009-LIVE.ods'#$'6 - B1'.$A$73]" office:value-type="float" office:value="24" calcext:value-type="float">
            <text:p>24</text:p>
          </table:table-cell>
          <table:table-cell table:formula="of:=['file:///D:/mp/projects/PR0118%20-%20ISO%2011171%20Calibrations/results/2025-05-19-LPA3-NAVAIR-11171-00009/11171-00009-LIVE.ods'#$'6 - B1'.$B$73]" office:value-type="float" office:value="874" calcext:value-type="float">
            <text:p>874</text:p>
          </table:table-cell>
          <table:table-cell table:formula="of:=['file:///D:/mp/projects/PR0118%20-%20ISO%2011171%20Calibrations/results/2025-05-19-LPA3-NAVAIR-11171-00009/11171-00009-LIVE.ods'#$'6 - B1'.$C$73]" office:value-type="float" office:value="868" calcext:value-type="float">
            <text:p>868</text:p>
          </table:table-cell>
          <table:table-cell table:formula="of:=['file:///D:/mp/projects/PR0118%20-%20ISO%2011171%20Calibrations/results/2025-05-19-LPA3-NAVAIR-11171-00009/11171-00009-LIVE.ods'#$'6 - B1'.$D$73]" office:value-type="float" office:value="892" calcext:value-type="float">
            <text:p>892</text:p>
          </table:table-cell>
          <table:table-cell table:formula="of:=['file:///D:/mp/projects/PR0118%20-%20ISO%2011171%20Calibrations/results/2025-05-19-LPA3-NAVAIR-11171-00009/11171-00009-LIVE.ods'#$'6 - B1'.$E$73]" office:value-type="float" office:value="902" calcext:value-type="float">
            <text:p>902</text:p>
          </table:table-cell>
          <table:table-cell table:formula="of:=['file:///D:/mp/projects/PR0118%20-%20ISO%2011171%20Calibrations/results/2025-05-19-LPA3-NAVAIR-11171-00009/11171-00009-LIVE.ods'#$'6 - B1'.$F$73]" office:value-type="float" office:value="773" calcext:value-type="float">
            <text:p>773</text:p>
          </table:table-cell>
          <table:table-cell table:formula="of:=['file:///D:/mp/projects/PR0118%20-%20ISO%2011171%20Calibrations/results/2025-05-19-LPA3-NAVAIR-11171-00009/11171-00009-LIVE.ods'#$'6 - B1'.$G$73]" office:value-type="float" office:value="1976" calcext:value-type="float">
            <text:p>1976</text:p>
          </table:table-cell>
          <table:table-cell table:formula="of:=['file:///D:/mp/projects/PR0118%20-%20ISO%2011171%20Calibrations/results/2025-05-19-LPA3-NAVAIR-11171-00009/11171-00009-LIVE.ods'#$'6 - B1'.$H$73]" office:value-type="float" office:value="2002" calcext:value-type="float">
            <text:p>2002</text:p>
          </table:table-cell>
          <table:table-cell table:style-name="ce221" table:formula="of:=['file:///D:/mp/projects/PR0118%20-%20ISO%2011171%20Calibrations/results/2025-05-19-LPA3-NAVAIR-11171-00009/11171-00009-LIVE.ods'#$'6 - B1'.$I$73]" office:value-type="float" office:value="1977" calcext:value-type="float">
            <text:p>1977</text:p>
          </table:table-cell>
          <table:table-cell table:formula="of:=['file:///D:/mp/projects/PR0118%20-%20ISO%2011171%20Calibrations/results/2025-05-19-LPA3-NAVAIR-11171-00009/11171-00009-LIVE.ods'#$'6 - B1'.$J$73]" office:value-type="float" office:value="2040" calcext:value-type="float">
            <text:p>2040</text:p>
          </table:table-cell>
          <table:table-cell table:style-name="ce221" table:formula="of:=['file:///D:/mp/projects/PR0118%20-%20ISO%2011171%20Calibrations/results/2025-05-19-LPA3-NAVAIR-11171-00009/11171-00009-LIVE.ods'#$'6 - B1'.$K$73]" office:value-type="float" office:value="1938" calcext:value-type="float">
            <text:p>1938</text:p>
          </table:table-cell>
          <table:table-cell table:style-name="ce221" table:formula="of:=['file:///D:/mp/projects/PR0118%20-%20ISO%2011171%20Calibrations/results/2025-05-19-LPA3-NAVAIR-11171-00009/11171-00009-LIVE.ods'#$'6 - B1'.$L$73]" office:value-type="float" office:value="1894" calcext:value-type="float">
            <text:p>1894</text:p>
          </table:table-cell>
          <table:table-cell table:style-name="ce221" table:formula="of:=['file:///D:/mp/projects/PR0118%20-%20ISO%2011171%20Calibrations/results/2025-05-19-LPA3-NAVAIR-11171-00009/11171-00009-LIVE.ods'#$'6 - B1'.$M$73]" office:value-type="float" office:value="1908" calcext:value-type="float">
            <text:p>1908</text:p>
          </table:table-cell>
          <table:table-cell table:style-name="ce221" table:formula="of:=['file:///D:/mp/projects/PR0118%20-%20ISO%2011171%20Calibrations/results/2025-05-19-LPA3-NAVAIR-11171-00009/11171-00009-LIVE.ods'#$'6 - B1'.$N$73]" office:value-type="float" office:value="1970" calcext:value-type="float">
            <text:p>1970</text:p>
          </table:table-cell>
          <table:table-cell table:formula="of:=['file:///D:/mp/projects/PR0118%20-%20ISO%2011171%20Calibrations/results/2025-05-19-LPA3-NAVAIR-11171-00009/11171-00009-LIVE.ods'#$'6 - B1'.$O$73]" office:value-type="float" office:value="1854" calcext:value-type="float">
            <text:p>1854</text:p>
          </table:table-cell>
          <table:table-cell table:style-name="ce221" table:formula="of:=['file:///D:/mp/projects/PR0118%20-%20ISO%2011171%20Calibrations/results/2025-05-19-LPA3-NAVAIR-11171-00009/11171-00009-LIVE.ods'#$'6 - B1'.$P$73]" office:value-type="float" office:value="1818" calcext:value-type="float">
            <text:p>1818</text:p>
          </table:table-cell>
          <table:table-cell table:number-columns-repeated="33"/>
        </table:table-row>
        <table:table-row table:style-name="ro2">
          <table:table-cell table:style-name="ce218" table:formula="of:=['file:///D:/mp/projects/PR0118%20-%20ISO%2011171%20Calibrations/results/2025-05-19-LPA3-NAVAIR-11171-00009/11171-00009-LIVE.ods'#$'6 - B1'.$A$74]" office:value-type="float" office:value="25" calcext:value-type="float">
            <text:p>25</text:p>
          </table:table-cell>
          <table:table-cell table:formula="of:=['file:///D:/mp/projects/PR0118%20-%20ISO%2011171%20Calibrations/results/2025-05-19-LPA3-NAVAIR-11171-00009/11171-00009-LIVE.ods'#$'6 - B1'.$B$74]" office:value-type="float" office:value="664" calcext:value-type="float">
            <text:p>664</text:p>
          </table:table-cell>
          <table:table-cell table:formula="of:=['file:///D:/mp/projects/PR0118%20-%20ISO%2011171%20Calibrations/results/2025-05-19-LPA3-NAVAIR-11171-00009/11171-00009-LIVE.ods'#$'6 - B1'.$C$74]" office:value-type="float" office:value="658" calcext:value-type="float">
            <text:p>658</text:p>
          </table:table-cell>
          <table:table-cell table:formula="of:=['file:///D:/mp/projects/PR0118%20-%20ISO%2011171%20Calibrations/results/2025-05-19-LPA3-NAVAIR-11171-00009/11171-00009-LIVE.ods'#$'6 - B1'.$D$74]" office:value-type="float" office:value="677" calcext:value-type="float">
            <text:p>677</text:p>
          </table:table-cell>
          <table:table-cell table:formula="of:=['file:///D:/mp/projects/PR0118%20-%20ISO%2011171%20Calibrations/results/2025-05-19-LPA3-NAVAIR-11171-00009/11171-00009-LIVE.ods'#$'6 - B1'.$E$74]" office:value-type="float" office:value="670" calcext:value-type="float">
            <text:p>670</text:p>
          </table:table-cell>
          <table:table-cell table:formula="of:=['file:///D:/mp/projects/PR0118%20-%20ISO%2011171%20Calibrations/results/2025-05-19-LPA3-NAVAIR-11171-00009/11171-00009-LIVE.ods'#$'6 - B1'.$F$74]" office:value-type="float" office:value="586" calcext:value-type="float">
            <text:p>586</text:p>
          </table:table-cell>
          <table:table-cell table:formula="of:=['file:///D:/mp/projects/PR0118%20-%20ISO%2011171%20Calibrations/results/2025-05-19-LPA3-NAVAIR-11171-00009/11171-00009-LIVE.ods'#$'6 - B1'.$G$74]" office:value-type="float" office:value="1553" calcext:value-type="float">
            <text:p>1553</text:p>
          </table:table-cell>
          <table:table-cell table:formula="of:=['file:///D:/mp/projects/PR0118%20-%20ISO%2011171%20Calibrations/results/2025-05-19-LPA3-NAVAIR-11171-00009/11171-00009-LIVE.ods'#$'6 - B1'.$H$74]" office:value-type="float" office:value="1563" calcext:value-type="float">
            <text:p>1563</text:p>
          </table:table-cell>
          <table:table-cell table:style-name="ce221" table:formula="of:=['file:///D:/mp/projects/PR0118%20-%20ISO%2011171%20Calibrations/results/2025-05-19-LPA3-NAVAIR-11171-00009/11171-00009-LIVE.ods'#$'6 - B1'.$I$74]" office:value-type="float" office:value="1540" calcext:value-type="float">
            <text:p>1540</text:p>
          </table:table-cell>
          <table:table-cell table:formula="of:=['file:///D:/mp/projects/PR0118%20-%20ISO%2011171%20Calibrations/results/2025-05-19-LPA3-NAVAIR-11171-00009/11171-00009-LIVE.ods'#$'6 - B1'.$J$74]" office:value-type="float" office:value="1620" calcext:value-type="float">
            <text:p>1620</text:p>
          </table:table-cell>
          <table:table-cell table:style-name="ce221" table:formula="of:=['file:///D:/mp/projects/PR0118%20-%20ISO%2011171%20Calibrations/results/2025-05-19-LPA3-NAVAIR-11171-00009/11171-00009-LIVE.ods'#$'6 - B1'.$K$74]" office:value-type="float" office:value="1480" calcext:value-type="float">
            <text:p>1480</text:p>
          </table:table-cell>
          <table:table-cell table:style-name="ce221" table:formula="of:=['file:///D:/mp/projects/PR0118%20-%20ISO%2011171%20Calibrations/results/2025-05-19-LPA3-NAVAIR-11171-00009/11171-00009-LIVE.ods'#$'6 - B1'.$L$74]" office:value-type="float" office:value="1474" calcext:value-type="float">
            <text:p>1474</text:p>
          </table:table-cell>
          <table:table-cell table:style-name="ce221" table:formula="of:=['file:///D:/mp/projects/PR0118%20-%20ISO%2011171%20Calibrations/results/2025-05-19-LPA3-NAVAIR-11171-00009/11171-00009-LIVE.ods'#$'6 - B1'.$M$74]" office:value-type="float" office:value="1477" calcext:value-type="float">
            <text:p>1477</text:p>
          </table:table-cell>
          <table:table-cell table:style-name="ce221" table:formula="of:=['file:///D:/mp/projects/PR0118%20-%20ISO%2011171%20Calibrations/results/2025-05-19-LPA3-NAVAIR-11171-00009/11171-00009-LIVE.ods'#$'6 - B1'.$N$74]" office:value-type="float" office:value="1550" calcext:value-type="float">
            <text:p>1550</text:p>
          </table:table-cell>
          <table:table-cell table:formula="of:=['file:///D:/mp/projects/PR0118%20-%20ISO%2011171%20Calibrations/results/2025-05-19-LPA3-NAVAIR-11171-00009/11171-00009-LIVE.ods'#$'6 - B1'.$O$74]" office:value-type="float" office:value="1434" calcext:value-type="float">
            <text:p>1434</text:p>
          </table:table-cell>
          <table:table-cell table:style-name="ce221" table:formula="of:=['file:///D:/mp/projects/PR0118%20-%20ISO%2011171%20Calibrations/results/2025-05-19-LPA3-NAVAIR-11171-00009/11171-00009-LIVE.ods'#$'6 - B1'.$P$74]" office:value-type="float" office:value="1431" calcext:value-type="float">
            <text:p>1431</text:p>
          </table:table-cell>
          <table:table-cell table:number-columns-repeated="33"/>
        </table:table-row>
        <table:table-row table:style-name="ro2">
          <table:table-cell table:style-name="ce218" table:formula="of:=['file:///D:/mp/projects/PR0118%20-%20ISO%2011171%20Calibrations/results/2025-05-19-LPA3-NAVAIR-11171-00009/11171-00009-LIVE.ods'#$'6 - B1'.$A$75]" office:value-type="float" office:value="26" calcext:value-type="float">
            <text:p>26</text:p>
          </table:table-cell>
          <table:table-cell table:formula="of:=['file:///D:/mp/projects/PR0118%20-%20ISO%2011171%20Calibrations/results/2025-05-19-LPA3-NAVAIR-11171-00009/11171-00009-LIVE.ods'#$'6 - B1'.$B$75]" office:value-type="float" office:value="496" calcext:value-type="float">
            <text:p>496</text:p>
          </table:table-cell>
          <table:table-cell table:formula="of:=['file:///D:/mp/projects/PR0118%20-%20ISO%2011171%20Calibrations/results/2025-05-19-LPA3-NAVAIR-11171-00009/11171-00009-LIVE.ods'#$'6 - B1'.$C$75]" office:value-type="float" office:value="507" calcext:value-type="float">
            <text:p>507</text:p>
          </table:table-cell>
          <table:table-cell table:formula="of:=['file:///D:/mp/projects/PR0118%20-%20ISO%2011171%20Calibrations/results/2025-05-19-LPA3-NAVAIR-11171-00009/11171-00009-LIVE.ods'#$'6 - B1'.$D$75]" office:value-type="float" office:value="514" calcext:value-type="float">
            <text:p>514</text:p>
          </table:table-cell>
          <table:table-cell table:formula="of:=['file:///D:/mp/projects/PR0118%20-%20ISO%2011171%20Calibrations/results/2025-05-19-LPA3-NAVAIR-11171-00009/11171-00009-LIVE.ods'#$'6 - B1'.$E$75]" office:value-type="float" office:value="489" calcext:value-type="float">
            <text:p>489</text:p>
          </table:table-cell>
          <table:table-cell table:formula="of:=['file:///D:/mp/projects/PR0118%20-%20ISO%2011171%20Calibrations/results/2025-05-19-LPA3-NAVAIR-11171-00009/11171-00009-LIVE.ods'#$'6 - B1'.$F$75]" office:value-type="float" office:value="433" calcext:value-type="float">
            <text:p>433</text:p>
          </table:table-cell>
          <table:table-cell table:formula="of:=['file:///D:/mp/projects/PR0118%20-%20ISO%2011171%20Calibrations/results/2025-05-19-LPA3-NAVAIR-11171-00009/11171-00009-LIVE.ods'#$'6 - B1'.$G$75]" office:value-type="float" office:value="1105" calcext:value-type="float">
            <text:p>1105</text:p>
          </table:table-cell>
          <table:table-cell table:formula="of:=['file:///D:/mp/projects/PR0118%20-%20ISO%2011171%20Calibrations/results/2025-05-19-LPA3-NAVAIR-11171-00009/11171-00009-LIVE.ods'#$'6 - B1'.$H$75]" office:value-type="float" office:value="1165" calcext:value-type="float">
            <text:p>1165</text:p>
          </table:table-cell>
          <table:table-cell table:style-name="ce221" table:formula="of:=['file:///D:/mp/projects/PR0118%20-%20ISO%2011171%20Calibrations/results/2025-05-19-LPA3-NAVAIR-11171-00009/11171-00009-LIVE.ods'#$'6 - B1'.$I$75]" office:value-type="float" office:value="1134" calcext:value-type="float">
            <text:p>1134</text:p>
          </table:table-cell>
          <table:table-cell table:formula="of:=['file:///D:/mp/projects/PR0118%20-%20ISO%2011171%20Calibrations/results/2025-05-19-LPA3-NAVAIR-11171-00009/11171-00009-LIVE.ods'#$'6 - B1'.$J$75]" office:value-type="float" office:value="1177" calcext:value-type="float">
            <text:p>1177</text:p>
          </table:table-cell>
          <table:table-cell table:style-name="ce221" table:formula="of:=['file:///D:/mp/projects/PR0118%20-%20ISO%2011171%20Calibrations/results/2025-05-19-LPA3-NAVAIR-11171-00009/11171-00009-LIVE.ods'#$'6 - B1'.$K$75]" office:value-type="float" office:value="1034" calcext:value-type="float">
            <text:p>1034</text:p>
          </table:table-cell>
          <table:table-cell table:style-name="ce221" table:formula="of:=['file:///D:/mp/projects/PR0118%20-%20ISO%2011171%20Calibrations/results/2025-05-19-LPA3-NAVAIR-11171-00009/11171-00009-LIVE.ods'#$'6 - B1'.$L$75]" office:value-type="float" office:value="1079" calcext:value-type="float">
            <text:p>1079</text:p>
          </table:table-cell>
          <table:table-cell table:style-name="ce221" table:formula="of:=['file:///D:/mp/projects/PR0118%20-%20ISO%2011171%20Calibrations/results/2025-05-19-LPA3-NAVAIR-11171-00009/11171-00009-LIVE.ods'#$'6 - B1'.$M$75]" office:value-type="float" office:value="1076" calcext:value-type="float">
            <text:p>1076</text:p>
          </table:table-cell>
          <table:table-cell table:style-name="ce221" table:formula="of:=['file:///D:/mp/projects/PR0118%20-%20ISO%2011171%20Calibrations/results/2025-05-19-LPA3-NAVAIR-11171-00009/11171-00009-LIVE.ods'#$'6 - B1'.$N$75]" office:value-type="float" office:value="1130" calcext:value-type="float">
            <text:p>1130</text:p>
          </table:table-cell>
          <table:table-cell table:formula="of:=['file:///D:/mp/projects/PR0118%20-%20ISO%2011171%20Calibrations/results/2025-05-19-LPA3-NAVAIR-11171-00009/11171-00009-LIVE.ods'#$'6 - B1'.$O$75]" office:value-type="float" office:value="1000" calcext:value-type="float">
            <text:p>1000</text:p>
          </table:table-cell>
          <table:table-cell table:style-name="ce221" table:formula="of:=['file:///D:/mp/projects/PR0118%20-%20ISO%2011171%20Calibrations/results/2025-05-19-LPA3-NAVAIR-11171-00009/11171-00009-LIVE.ods'#$'6 - B1'.$P$75]" office:value-type="float" office:value="1004" calcext:value-type="float">
            <text:p>1004</text:p>
          </table:table-cell>
          <table:table-cell table:number-columns-repeated="33"/>
        </table:table-row>
        <table:table-row table:style-name="ro2">
          <table:table-cell table:style-name="ce218" table:formula="of:=['file:///D:/mp/projects/PR0118%20-%20ISO%2011171%20Calibrations/results/2025-05-19-LPA3-NAVAIR-11171-00009/11171-00009-LIVE.ods'#$'6 - B1'.$A$76]" office:value-type="float" office:value="27" calcext:value-type="float">
            <text:p>27</text:p>
          </table:table-cell>
          <table:table-cell table:formula="of:=['file:///D:/mp/projects/PR0118%20-%20ISO%2011171%20Calibrations/results/2025-05-19-LPA3-NAVAIR-11171-00009/11171-00009-LIVE.ods'#$'6 - B1'.$B$76]" office:value-type="float" office:value="377" calcext:value-type="float">
            <text:p>377</text:p>
          </table:table-cell>
          <table:table-cell table:formula="of:=['file:///D:/mp/projects/PR0118%20-%20ISO%2011171%20Calibrations/results/2025-05-19-LPA3-NAVAIR-11171-00009/11171-00009-LIVE.ods'#$'6 - B1'.$C$76]" office:value-type="float" office:value="368" calcext:value-type="float">
            <text:p>368</text:p>
          </table:table-cell>
          <table:table-cell table:formula="of:=['file:///D:/mp/projects/PR0118%20-%20ISO%2011171%20Calibrations/results/2025-05-19-LPA3-NAVAIR-11171-00009/11171-00009-LIVE.ods'#$'6 - B1'.$D$76]" office:value-type="float" office:value="371" calcext:value-type="float">
            <text:p>371</text:p>
          </table:table-cell>
          <table:table-cell table:formula="of:=['file:///D:/mp/projects/PR0118%20-%20ISO%2011171%20Calibrations/results/2025-05-19-LPA3-NAVAIR-11171-00009/11171-00009-LIVE.ods'#$'6 - B1'.$E$76]" office:value-type="float" office:value="367" calcext:value-type="float">
            <text:p>367</text:p>
          </table:table-cell>
          <table:table-cell table:formula="of:=['file:///D:/mp/projects/PR0118%20-%20ISO%2011171%20Calibrations/results/2025-05-19-LPA3-NAVAIR-11171-00009/11171-00009-LIVE.ods'#$'6 - B1'.$F$76]" office:value-type="float" office:value="314" calcext:value-type="float">
            <text:p>314</text:p>
          </table:table-cell>
          <table:table-cell table:formula="of:=['file:///D:/mp/projects/PR0118%20-%20ISO%2011171%20Calibrations/results/2025-05-19-LPA3-NAVAIR-11171-00009/11171-00009-LIVE.ods'#$'6 - B1'.$G$76]" office:value-type="float" office:value="758" calcext:value-type="float">
            <text:p>758</text:p>
          </table:table-cell>
          <table:table-cell table:formula="of:=['file:///D:/mp/projects/PR0118%20-%20ISO%2011171%20Calibrations/results/2025-05-19-LPA3-NAVAIR-11171-00009/11171-00009-LIVE.ods'#$'6 - B1'.$H$76]" office:value-type="float" office:value="805" calcext:value-type="float">
            <text:p>805</text:p>
          </table:table-cell>
          <table:table-cell table:style-name="ce221" table:formula="of:=['file:///D:/mp/projects/PR0118%20-%20ISO%2011171%20Calibrations/results/2025-05-19-LPA3-NAVAIR-11171-00009/11171-00009-LIVE.ods'#$'6 - B1'.$I$76]" office:value-type="float" office:value="804" calcext:value-type="float">
            <text:p>804</text:p>
          </table:table-cell>
          <table:table-cell table:formula="of:=['file:///D:/mp/projects/PR0118%20-%20ISO%2011171%20Calibrations/results/2025-05-19-LPA3-NAVAIR-11171-00009/11171-00009-LIVE.ods'#$'6 - B1'.$J$76]" office:value-type="float" office:value="826" calcext:value-type="float">
            <text:p>826</text:p>
          </table:table-cell>
          <table:table-cell table:style-name="ce221" table:formula="of:=['file:///D:/mp/projects/PR0118%20-%20ISO%2011171%20Calibrations/results/2025-05-19-LPA3-NAVAIR-11171-00009/11171-00009-LIVE.ods'#$'6 - B1'.$K$76]" office:value-type="float" office:value="700" calcext:value-type="float">
            <text:p>700</text:p>
          </table:table-cell>
          <table:table-cell table:style-name="ce221" table:formula="of:=['file:///D:/mp/projects/PR0118%20-%20ISO%2011171%20Calibrations/results/2025-05-19-LPA3-NAVAIR-11171-00009/11171-00009-LIVE.ods'#$'6 - B1'.$L$76]" office:value-type="float" office:value="730" calcext:value-type="float">
            <text:p>730</text:p>
          </table:table-cell>
          <table:table-cell table:style-name="ce221" table:formula="of:=['file:///D:/mp/projects/PR0118%20-%20ISO%2011171%20Calibrations/results/2025-05-19-LPA3-NAVAIR-11171-00009/11171-00009-LIVE.ods'#$'6 - B1'.$M$76]" office:value-type="float" office:value="736" calcext:value-type="float">
            <text:p>736</text:p>
          </table:table-cell>
          <table:table-cell table:style-name="ce221" table:formula="of:=['file:///D:/mp/projects/PR0118%20-%20ISO%2011171%20Calibrations/results/2025-05-19-LPA3-NAVAIR-11171-00009/11171-00009-LIVE.ods'#$'6 - B1'.$N$76]" office:value-type="float" office:value="809" calcext:value-type="float">
            <text:p>809</text:p>
          </table:table-cell>
          <table:table-cell table:formula="of:=['file:///D:/mp/projects/PR0118%20-%20ISO%2011171%20Calibrations/results/2025-05-19-LPA3-NAVAIR-11171-00009/11171-00009-LIVE.ods'#$'6 - B1'.$O$76]" office:value-type="float" office:value="695" calcext:value-type="float">
            <text:p>695</text:p>
          </table:table-cell>
          <table:table-cell table:style-name="ce221" table:formula="of:=['file:///D:/mp/projects/PR0118%20-%20ISO%2011171%20Calibrations/results/2025-05-19-LPA3-NAVAIR-11171-00009/11171-00009-LIVE.ods'#$'6 - B1'.$P$76]" office:value-type="float" office:value="702" calcext:value-type="float">
            <text:p>702</text:p>
          </table:table-cell>
          <table:table-cell table:number-columns-repeated="33"/>
        </table:table-row>
        <table:table-row table:style-name="ro2">
          <table:table-cell table:style-name="ce218" table:formula="of:=['file:///D:/mp/projects/PR0118%20-%20ISO%2011171%20Calibrations/results/2025-05-19-LPA3-NAVAIR-11171-00009/11171-00009-LIVE.ods'#$'6 - B1'.$A$77]" office:value-type="float" office:value="28" calcext:value-type="float">
            <text:p>28</text:p>
          </table:table-cell>
          <table:table-cell table:formula="of:=['file:///D:/mp/projects/PR0118%20-%20ISO%2011171%20Calibrations/results/2025-05-19-LPA3-NAVAIR-11171-00009/11171-00009-LIVE.ods'#$'6 - B1'.$B$77]" office:value-type="float" office:value="271" calcext:value-type="float">
            <text:p>271</text:p>
          </table:table-cell>
          <table:table-cell table:formula="of:=['file:///D:/mp/projects/PR0118%20-%20ISO%2011171%20Calibrations/results/2025-05-19-LPA3-NAVAIR-11171-00009/11171-00009-LIVE.ods'#$'6 - B1'.$C$77]" office:value-type="float" office:value="266" calcext:value-type="float">
            <text:p>266</text:p>
          </table:table-cell>
          <table:table-cell table:formula="of:=['file:///D:/mp/projects/PR0118%20-%20ISO%2011171%20Calibrations/results/2025-05-19-LPA3-NAVAIR-11171-00009/11171-00009-LIVE.ods'#$'6 - B1'.$D$77]" office:value-type="float" office:value="276" calcext:value-type="float">
            <text:p>276</text:p>
          </table:table-cell>
          <table:table-cell table:formula="of:=['file:///D:/mp/projects/PR0118%20-%20ISO%2011171%20Calibrations/results/2025-05-19-LPA3-NAVAIR-11171-00009/11171-00009-LIVE.ods'#$'6 - B1'.$E$77]" office:value-type="float" office:value="260" calcext:value-type="float">
            <text:p>260</text:p>
          </table:table-cell>
          <table:table-cell table:formula="of:=['file:///D:/mp/projects/PR0118%20-%20ISO%2011171%20Calibrations/results/2025-05-19-LPA3-NAVAIR-11171-00009/11171-00009-LIVE.ods'#$'6 - B1'.$F$77]" office:value-type="float" office:value="204" calcext:value-type="float">
            <text:p>204</text:p>
          </table:table-cell>
          <table:table-cell table:formula="of:=['file:///D:/mp/projects/PR0118%20-%20ISO%2011171%20Calibrations/results/2025-05-19-LPA3-NAVAIR-11171-00009/11171-00009-LIVE.ods'#$'6 - B1'.$G$77]" office:value-type="float" office:value="528" calcext:value-type="float">
            <text:p>528</text:p>
          </table:table-cell>
          <table:table-cell table:formula="of:=['file:///D:/mp/projects/PR0118%20-%20ISO%2011171%20Calibrations/results/2025-05-19-LPA3-NAVAIR-11171-00009/11171-00009-LIVE.ods'#$'6 - B1'.$H$77]" office:value-type="float" office:value="574" calcext:value-type="float">
            <text:p>574</text:p>
          </table:table-cell>
          <table:table-cell table:style-name="ce221" table:formula="of:=['file:///D:/mp/projects/PR0118%20-%20ISO%2011171%20Calibrations/results/2025-05-19-LPA3-NAVAIR-11171-00009/11171-00009-LIVE.ods'#$'6 - B1'.$I$77]" office:value-type="float" office:value="561" calcext:value-type="float">
            <text:p>561</text:p>
          </table:table-cell>
          <table:table-cell table:formula="of:=['file:///D:/mp/projects/PR0118%20-%20ISO%2011171%20Calibrations/results/2025-05-19-LPA3-NAVAIR-11171-00009/11171-00009-LIVE.ods'#$'6 - B1'.$J$77]" office:value-type="float" office:value="575" calcext:value-type="float">
            <text:p>575</text:p>
          </table:table-cell>
          <table:table-cell table:style-name="ce221" table:formula="of:=['file:///D:/mp/projects/PR0118%20-%20ISO%2011171%20Calibrations/results/2025-05-19-LPA3-NAVAIR-11171-00009/11171-00009-LIVE.ods'#$'6 - B1'.$K$77]" office:value-type="float" office:value="494" calcext:value-type="float">
            <text:p>494</text:p>
          </table:table-cell>
          <table:table-cell table:style-name="ce221" table:formula="of:=['file:///D:/mp/projects/PR0118%20-%20ISO%2011171%20Calibrations/results/2025-05-19-LPA3-NAVAIR-11171-00009/11171-00009-LIVE.ods'#$'6 - B1'.$L$77]" office:value-type="float" office:value="530" calcext:value-type="float">
            <text:p>530</text:p>
          </table:table-cell>
          <table:table-cell table:style-name="ce221" table:formula="of:=['file:///D:/mp/projects/PR0118%20-%20ISO%2011171%20Calibrations/results/2025-05-19-LPA3-NAVAIR-11171-00009/11171-00009-LIVE.ods'#$'6 - B1'.$M$77]" office:value-type="float" office:value="501" calcext:value-type="float">
            <text:p>501</text:p>
          </table:table-cell>
          <table:table-cell table:style-name="ce221" table:formula="of:=['file:///D:/mp/projects/PR0118%20-%20ISO%2011171%20Calibrations/results/2025-05-19-LPA3-NAVAIR-11171-00009/11171-00009-LIVE.ods'#$'6 - B1'.$N$77]" office:value-type="float" office:value="553" calcext:value-type="float">
            <text:p>553</text:p>
          </table:table-cell>
          <table:table-cell table:formula="of:=['file:///D:/mp/projects/PR0118%20-%20ISO%2011171%20Calibrations/results/2025-05-19-LPA3-NAVAIR-11171-00009/11171-00009-LIVE.ods'#$'6 - B1'.$O$77]" office:value-type="float" office:value="512" calcext:value-type="float">
            <text:p>512</text:p>
          </table:table-cell>
          <table:table-cell table:style-name="ce221" table:formula="of:=['file:///D:/mp/projects/PR0118%20-%20ISO%2011171%20Calibrations/results/2025-05-19-LPA3-NAVAIR-11171-00009/11171-00009-LIVE.ods'#$'6 - B1'.$P$77]" office:value-type="float" office:value="483" calcext:value-type="float">
            <text:p>483</text:p>
          </table:table-cell>
          <table:table-cell table:number-columns-repeated="33"/>
        </table:table-row>
        <table:table-row table:style-name="ro2">
          <table:table-cell table:style-name="ce218" table:formula="of:=['file:///D:/mp/projects/PR0118%20-%20ISO%2011171%20Calibrations/results/2025-05-19-LPA3-NAVAIR-11171-00009/11171-00009-LIVE.ods'#$'6 - B1'.$A$78]" office:value-type="float" office:value="29" calcext:value-type="float">
            <text:p>29</text:p>
          </table:table-cell>
          <table:table-cell table:formula="of:=['file:///D:/mp/projects/PR0118%20-%20ISO%2011171%20Calibrations/results/2025-05-19-LPA3-NAVAIR-11171-00009/11171-00009-LIVE.ods'#$'6 - B1'.$B$78]" office:value-type="float" office:value="205" calcext:value-type="float">
            <text:p>205</text:p>
          </table:table-cell>
          <table:table-cell table:formula="of:=['file:///D:/mp/projects/PR0118%20-%20ISO%2011171%20Calibrations/results/2025-05-19-LPA3-NAVAIR-11171-00009/11171-00009-LIVE.ods'#$'6 - B1'.$C$78]" office:value-type="float" office:value="190" calcext:value-type="float">
            <text:p>190</text:p>
          </table:table-cell>
          <table:table-cell table:formula="of:=['file:///D:/mp/projects/PR0118%20-%20ISO%2011171%20Calibrations/results/2025-05-19-LPA3-NAVAIR-11171-00009/11171-00009-LIVE.ods'#$'6 - B1'.$D$78]" office:value-type="float" office:value="204" calcext:value-type="float">
            <text:p>204</text:p>
          </table:table-cell>
          <table:table-cell table:formula="of:=['file:///D:/mp/projects/PR0118%20-%20ISO%2011171%20Calibrations/results/2025-05-19-LPA3-NAVAIR-11171-00009/11171-00009-LIVE.ods'#$'6 - B1'.$E$78]" office:value-type="float" office:value="187" calcext:value-type="float">
            <text:p>187</text:p>
          </table:table-cell>
          <table:table-cell table:formula="of:=['file:///D:/mp/projects/PR0118%20-%20ISO%2011171%20Calibrations/results/2025-05-19-LPA3-NAVAIR-11171-00009/11171-00009-LIVE.ods'#$'6 - B1'.$F$78]" office:value-type="float" office:value="143" calcext:value-type="float">
            <text:p>143</text:p>
          </table:table-cell>
          <table:table-cell table:formula="of:=['file:///D:/mp/projects/PR0118%20-%20ISO%2011171%20Calibrations/results/2025-05-19-LPA3-NAVAIR-11171-00009/11171-00009-LIVE.ods'#$'6 - B1'.$G$78]" office:value-type="float" office:value="379" calcext:value-type="float">
            <text:p>379</text:p>
          </table:table-cell>
          <table:table-cell table:formula="of:=['file:///D:/mp/projects/PR0118%20-%20ISO%2011171%20Calibrations/results/2025-05-19-LPA3-NAVAIR-11171-00009/11171-00009-LIVE.ods'#$'6 - B1'.$H$78]" office:value-type="float" office:value="404" calcext:value-type="float">
            <text:p>404</text:p>
          </table:table-cell>
          <table:table-cell table:style-name="ce221" table:formula="of:=['file:///D:/mp/projects/PR0118%20-%20ISO%2011171%20Calibrations/results/2025-05-19-LPA3-NAVAIR-11171-00009/11171-00009-LIVE.ods'#$'6 - B1'.$I$78]" office:value-type="float" office:value="381" calcext:value-type="float">
            <text:p>381</text:p>
          </table:table-cell>
          <table:table-cell table:formula="of:=['file:///D:/mp/projects/PR0118%20-%20ISO%2011171%20Calibrations/results/2025-05-19-LPA3-NAVAIR-11171-00009/11171-00009-LIVE.ods'#$'6 - B1'.$J$78]" office:value-type="float" office:value="411" calcext:value-type="float">
            <text:p>411</text:p>
          </table:table-cell>
          <table:table-cell table:style-name="ce221" table:formula="of:=['file:///D:/mp/projects/PR0118%20-%20ISO%2011171%20Calibrations/results/2025-05-19-LPA3-NAVAIR-11171-00009/11171-00009-LIVE.ods'#$'6 - B1'.$K$78]" office:value-type="float" office:value="347" calcext:value-type="float">
            <text:p>347</text:p>
          </table:table-cell>
          <table:table-cell table:style-name="ce221" table:formula="of:=['file:///D:/mp/projects/PR0118%20-%20ISO%2011171%20Calibrations/results/2025-05-19-LPA3-NAVAIR-11171-00009/11171-00009-LIVE.ods'#$'6 - B1'.$L$78]" office:value-type="float" office:value="376" calcext:value-type="float">
            <text:p>376</text:p>
          </table:table-cell>
          <table:table-cell table:style-name="ce221" table:formula="of:=['file:///D:/mp/projects/PR0118%20-%20ISO%2011171%20Calibrations/results/2025-05-19-LPA3-NAVAIR-11171-00009/11171-00009-LIVE.ods'#$'6 - B1'.$M$78]" office:value-type="float" office:value="348" calcext:value-type="float">
            <text:p>348</text:p>
          </table:table-cell>
          <table:table-cell table:style-name="ce221" table:formula="of:=['file:///D:/mp/projects/PR0118%20-%20ISO%2011171%20Calibrations/results/2025-05-19-LPA3-NAVAIR-11171-00009/11171-00009-LIVE.ods'#$'6 - B1'.$N$78]" office:value-type="float" office:value="395" calcext:value-type="float">
            <text:p>395</text:p>
          </table:table-cell>
          <table:table-cell table:formula="of:=['file:///D:/mp/projects/PR0118%20-%20ISO%2011171%20Calibrations/results/2025-05-19-LPA3-NAVAIR-11171-00009/11171-00009-LIVE.ods'#$'6 - B1'.$O$78]" office:value-type="float" office:value="372" calcext:value-type="float">
            <text:p>372</text:p>
          </table:table-cell>
          <table:table-cell table:style-name="ce221" table:formula="of:=['file:///D:/mp/projects/PR0118%20-%20ISO%2011171%20Calibrations/results/2025-05-19-LPA3-NAVAIR-11171-00009/11171-00009-LIVE.ods'#$'6 - B1'.$P$78]" office:value-type="float" office:value="327" calcext:value-type="float">
            <text:p>327</text:p>
          </table:table-cell>
          <table:table-cell table:number-columns-repeated="33"/>
        </table:table-row>
        <table:table-row table:style-name="ro2">
          <table:table-cell table:style-name="ce218" table:formula="of:=['file:///D:/mp/projects/PR0118%20-%20ISO%2011171%20Calibrations/results/2025-05-19-LPA3-NAVAIR-11171-00009/11171-00009-LIVE.ods'#$'6 - B1'.$A$79]" office:value-type="float" office:value="30" calcext:value-type="float">
            <text:p>30</text:p>
          </table:table-cell>
          <table:table-cell table:formula="of:=['file:///D:/mp/projects/PR0118%20-%20ISO%2011171%20Calibrations/results/2025-05-19-LPA3-NAVAIR-11171-00009/11171-00009-LIVE.ods'#$'6 - B1'.$B$79]" office:value-type="float" office:value="153" calcext:value-type="float">
            <text:p>153</text:p>
          </table:table-cell>
          <table:table-cell table:formula="of:=['file:///D:/mp/projects/PR0118%20-%20ISO%2011171%20Calibrations/results/2025-05-19-LPA3-NAVAIR-11171-00009/11171-00009-LIVE.ods'#$'6 - B1'.$C$79]" office:value-type="float" office:value="130" calcext:value-type="float">
            <text:p>130</text:p>
          </table:table-cell>
          <table:table-cell table:formula="of:=['file:///D:/mp/projects/PR0118%20-%20ISO%2011171%20Calibrations/results/2025-05-19-LPA3-NAVAIR-11171-00009/11171-00009-LIVE.ods'#$'6 - B1'.$D$79]" office:value-type="float" office:value="136" calcext:value-type="float">
            <text:p>136</text:p>
          </table:table-cell>
          <table:table-cell table:formula="of:=['file:///D:/mp/projects/PR0118%20-%20ISO%2011171%20Calibrations/results/2025-05-19-LPA3-NAVAIR-11171-00009/11171-00009-LIVE.ods'#$'6 - B1'.$E$79]" office:value-type="float" office:value="120" calcext:value-type="float">
            <text:p>120</text:p>
          </table:table-cell>
          <table:table-cell table:formula="of:=['file:///D:/mp/projects/PR0118%20-%20ISO%2011171%20Calibrations/results/2025-05-19-LPA3-NAVAIR-11171-00009/11171-00009-LIVE.ods'#$'6 - B1'.$F$79]" office:value-type="float" office:value="91" calcext:value-type="float">
            <text:p>91</text:p>
          </table:table-cell>
          <table:table-cell table:formula="of:=['file:///D:/mp/projects/PR0118%20-%20ISO%2011171%20Calibrations/results/2025-05-19-LPA3-NAVAIR-11171-00009/11171-00009-LIVE.ods'#$'6 - B1'.$G$79]" office:value-type="float" office:value="257" calcext:value-type="float">
            <text:p>257</text:p>
          </table:table-cell>
          <table:table-cell table:formula="of:=['file:///D:/mp/projects/PR0118%20-%20ISO%2011171%20Calibrations/results/2025-05-19-LPA3-NAVAIR-11171-00009/11171-00009-LIVE.ods'#$'6 - B1'.$H$79]" office:value-type="float" office:value="304" calcext:value-type="float">
            <text:p>304</text:p>
          </table:table-cell>
          <table:table-cell table:style-name="ce221" table:formula="of:=['file:///D:/mp/projects/PR0118%20-%20ISO%2011171%20Calibrations/results/2025-05-19-LPA3-NAVAIR-11171-00009/11171-00009-LIVE.ods'#$'6 - B1'.$I$79]" office:value-type="float" office:value="276" calcext:value-type="float">
            <text:p>276</text:p>
          </table:table-cell>
          <table:table-cell table:formula="of:=['file:///D:/mp/projects/PR0118%20-%20ISO%2011171%20Calibrations/results/2025-05-19-LPA3-NAVAIR-11171-00009/11171-00009-LIVE.ods'#$'6 - B1'.$J$79]" office:value-type="float" office:value="307" calcext:value-type="float">
            <text:p>307</text:p>
          </table:table-cell>
          <table:table-cell table:style-name="ce226" table:formula="of:=['file:///D:/mp/projects/PR0118%20-%20ISO%2011171%20Calibrations/results/2025-05-19-LPA3-NAVAIR-11171-00009/11171-00009-LIVE.ods'#$'6 - B1'.$K$79]" office:value-type="float" office:value="236" calcext:value-type="float">
            <text:p>236</text:p>
          </table:table-cell>
          <table:table-cell table:style-name="ce221" table:formula="of:=['file:///D:/mp/projects/PR0118%20-%20ISO%2011171%20Calibrations/results/2025-05-19-LPA3-NAVAIR-11171-00009/11171-00009-LIVE.ods'#$'6 - B1'.$L$79]" office:value-type="float" office:value="275" calcext:value-type="float">
            <text:p>275</text:p>
          </table:table-cell>
          <table:table-cell table:style-name="ce221" table:formula="of:=['file:///D:/mp/projects/PR0118%20-%20ISO%2011171%20Calibrations/results/2025-05-19-LPA3-NAVAIR-11171-00009/11171-00009-LIVE.ods'#$'6 - B1'.$M$79]" office:value-type="float" office:value="260" calcext:value-type="float">
            <text:p>260</text:p>
          </table:table-cell>
          <table:table-cell table:style-name="ce221" table:formula="of:=['file:///D:/mp/projects/PR0118%20-%20ISO%2011171%20Calibrations/results/2025-05-19-LPA3-NAVAIR-11171-00009/11171-00009-LIVE.ods'#$'6 - B1'.$N$79]" office:value-type="float" office:value="295" calcext:value-type="float">
            <text:p>295</text:p>
          </table:table-cell>
          <table:table-cell table:formula="of:=['file:///D:/mp/projects/PR0118%20-%20ISO%2011171%20Calibrations/results/2025-05-19-LPA3-NAVAIR-11171-00009/11171-00009-LIVE.ods'#$'6 - B1'.$O$79]" office:value-type="float" office:value="256" calcext:value-type="float">
            <text:p>256</text:p>
          </table:table-cell>
          <table:table-cell table:style-name="ce221" table:formula="of:=['file:///D:/mp/projects/PR0118%20-%20ISO%2011171%20Calibrations/results/2025-05-19-LPA3-NAVAIR-11171-00009/11171-00009-LIVE.ods'#$'6 - B1'.$P$79]" office:value-type="float" office:value="236" calcext:value-type="float">
            <text:p>236</text:p>
          </table:table-cell>
          <table:table-cell table:number-columns-repeated="33"/>
        </table:table-row>
        <table:table-row table:style-name="ro2">
          <table:table-cell table:style-name="ce218" table:formula="of:=['file:///D:/mp/projects/PR0118%20-%20ISO%2011171%20Calibrations/results/2025-05-19-LPA3-NAVAIR-11171-00009/11171-00009-LIVE.ods'#$'6 - B1'.$A$80]" office:value-type="float" office:value="38" calcext:value-type="float">
            <text:p>38</text:p>
          </table:table-cell>
          <table:table-cell table:formula="of:=['file:///D:/mp/projects/PR0118%20-%20ISO%2011171%20Calibrations/results/2025-05-19-LPA3-NAVAIR-11171-00009/11171-00009-LIVE.ods'#$'6 - B1'.$B$80]" office:value-type="float" office:value="99" calcext:value-type="float">
            <text:p>99</text:p>
          </table:table-cell>
          <table:table-cell table:formula="of:=['file:///D:/mp/projects/PR0118%20-%20ISO%2011171%20Calibrations/results/2025-05-19-LPA3-NAVAIR-11171-00009/11171-00009-LIVE.ods'#$'6 - B1'.$C$80]" office:value-type="float" office:value="93" calcext:value-type="float">
            <text:p>93</text:p>
          </table:table-cell>
          <table:table-cell table:formula="of:=['file:///D:/mp/projects/PR0118%20-%20ISO%2011171%20Calibrations/results/2025-05-19-LPA3-NAVAIR-11171-00009/11171-00009-LIVE.ods'#$'6 - B1'.$D$80]" office:value-type="float" office:value="95" calcext:value-type="float">
            <text:p>95</text:p>
          </table:table-cell>
          <table:table-cell table:formula="of:=['file:///D:/mp/projects/PR0118%20-%20ISO%2011171%20Calibrations/results/2025-05-19-LPA3-NAVAIR-11171-00009/11171-00009-LIVE.ods'#$'6 - B1'.$E$80]" office:value-type="float" office:value="78" calcext:value-type="float">
            <text:p>78</text:p>
          </table:table-cell>
          <table:table-cell table:formula="of:=['file:///D:/mp/projects/PR0118%20-%20ISO%2011171%20Calibrations/results/2025-05-19-LPA3-NAVAIR-11171-00009/11171-00009-LIVE.ods'#$'6 - B1'.$F$80]" office:value-type="float" office:value="60" calcext:value-type="float">
            <text:p>60</text:p>
          </table:table-cell>
          <table:table-cell table:formula="of:=['file:///D:/mp/projects/PR0118%20-%20ISO%2011171%20Calibrations/results/2025-05-19-LPA3-NAVAIR-11171-00009/11171-00009-LIVE.ods'#$'6 - B1'.$G$80]" office:value-type="float" office:value="48" calcext:value-type="float">
            <text:p>48</text:p>
          </table:table-cell>
          <table:table-cell table:formula="of:=['file:///D:/mp/projects/PR0118%20-%20ISO%2011171%20Calibrations/results/2025-05-19-LPA3-NAVAIR-11171-00009/11171-00009-LIVE.ods'#$'6 - B1'.$H$80]" office:value-type="float" office:value="52" calcext:value-type="float">
            <text:p>52</text:p>
          </table:table-cell>
          <table:table-cell table:style-name="ce221" table:formula="of:=['file:///D:/mp/projects/PR0118%20-%20ISO%2011171%20Calibrations/results/2025-05-19-LPA3-NAVAIR-11171-00009/11171-00009-LIVE.ods'#$'6 - B1'.$I$80]" office:value-type="float" office:value="51" calcext:value-type="float">
            <text:p>51</text:p>
          </table:table-cell>
          <table:table-cell table:formula="of:=['file:///D:/mp/projects/PR0118%20-%20ISO%2011171%20Calibrations/results/2025-05-19-LPA3-NAVAIR-11171-00009/11171-00009-LIVE.ods'#$'6 - B1'.$J$80]" office:value-type="float" office:value="59" calcext:value-type="float">
            <text:p>59</text:p>
          </table:table-cell>
          <table:table-cell table:style-name="ce221" table:formula="of:=['file:///D:/mp/projects/PR0118%20-%20ISO%2011171%20Calibrations/results/2025-05-19-LPA3-NAVAIR-11171-00009/11171-00009-LIVE.ods'#$'6 - B1'.$K$80]" office:value-type="float" office:value="37" calcext:value-type="float">
            <text:p>37</text:p>
          </table:table-cell>
          <table:table-cell table:style-name="ce221" table:formula="of:=['file:///D:/mp/projects/PR0118%20-%20ISO%2011171%20Calibrations/results/2025-05-19-LPA3-NAVAIR-11171-00009/11171-00009-LIVE.ods'#$'6 - B1'.$L$80]" office:value-type="float" office:value="58" calcext:value-type="float">
            <text:p>58</text:p>
          </table:table-cell>
          <table:table-cell table:style-name="ce221" table:formula="of:=['file:///D:/mp/projects/PR0118%20-%20ISO%2011171%20Calibrations/results/2025-05-19-LPA3-NAVAIR-11171-00009/11171-00009-LIVE.ods'#$'6 - B1'.$M$80]" office:value-type="float" office:value="50" calcext:value-type="float">
            <text:p>50</text:p>
          </table:table-cell>
          <table:table-cell table:style-name="ce221" table:formula="of:=['file:///D:/mp/projects/PR0118%20-%20ISO%2011171%20Calibrations/results/2025-05-19-LPA3-NAVAIR-11171-00009/11171-00009-LIVE.ods'#$'6 - B1'.$N$80]" office:value-type="float" office:value="52" calcext:value-type="float">
            <text:p>52</text:p>
          </table:table-cell>
          <table:table-cell table:formula="of:=['file:///D:/mp/projects/PR0118%20-%20ISO%2011171%20Calibrations/results/2025-05-19-LPA3-NAVAIR-11171-00009/11171-00009-LIVE.ods'#$'6 - B1'.$O$80]" office:value-type="float" office:value="40" calcext:value-type="float">
            <text:p>40</text:p>
          </table:table-cell>
          <table:table-cell table:style-name="ce221" table:formula="of:=['file:///D:/mp/projects/PR0118%20-%20ISO%2011171%20Calibrations/results/2025-05-19-LPA3-NAVAIR-11171-00009/11171-00009-LIVE.ods'#$'6 - B1'.$P$80]" office:value-type="float" office:value="37" calcext:value-type="float">
            <text:p>37</text:p>
          </table:table-cell>
          <table:table-cell table:number-columns-repeated="33"/>
        </table:table-row>
        <table:table-row table:style-name="ro2">
          <table:table-cell table:style-name="ce218" table:formula="of:=['file:///D:/mp/projects/PR0118%20-%20ISO%2011171%20Calibrations/results/2025-05-19-LPA3-NAVAIR-11171-00009/11171-00009-LIVE.ods'#$'6 - B1'.$A$81]" office:value-type="float" office:value="50" calcext:value-type="float">
            <text:p>50</text:p>
          </table:table-cell>
          <table:table-cell table:formula="of:=['file:///D:/mp/projects/PR0118%20-%20ISO%2011171%20Calibrations/results/2025-05-19-LPA3-NAVAIR-11171-00009/11171-00009-LIVE.ods'#$'6 - B1'.$B$81]" office:value-type="float" office:value="64" calcext:value-type="float">
            <text:p>64</text:p>
          </table:table-cell>
          <table:table-cell table:formula="of:=['file:///D:/mp/projects/PR0118%20-%20ISO%2011171%20Calibrations/results/2025-05-19-LPA3-NAVAIR-11171-00009/11171-00009-LIVE.ods'#$'6 - B1'.$C$81]" office:value-type="float" office:value="49" calcext:value-type="float">
            <text:p>49</text:p>
          </table:table-cell>
          <table:table-cell table:formula="of:=['file:///D:/mp/projects/PR0118%20-%20ISO%2011171%20Calibrations/results/2025-05-19-LPA3-NAVAIR-11171-00009/11171-00009-LIVE.ods'#$'6 - B1'.$D$81]" office:value-type="float" office:value="47" calcext:value-type="float">
            <text:p>47</text:p>
          </table:table-cell>
          <table:table-cell table:formula="of:=['file:///D:/mp/projects/PR0118%20-%20ISO%2011171%20Calibrations/results/2025-05-19-LPA3-NAVAIR-11171-00009/11171-00009-LIVE.ods'#$'6 - B1'.$E$81]" office:value-type="float" office:value="39" calcext:value-type="float">
            <text:p>39</text:p>
          </table:table-cell>
          <table:table-cell table:formula="of:=['file:///D:/mp/projects/PR0118%20-%20ISO%2011171%20Calibrations/results/2025-05-19-LPA3-NAVAIR-11171-00009/11171-00009-LIVE.ods'#$'6 - B1'.$F$81]" office:value-type="float" office:value="34" calcext:value-type="float">
            <text:p>34</text:p>
          </table:table-cell>
          <table:table-cell table:formula="of:=['file:///D:/mp/projects/PR0118%20-%20ISO%2011171%20Calibrations/results/2025-05-19-LPA3-NAVAIR-11171-00009/11171-00009-LIVE.ods'#$'6 - B1'.$G$81]" office:value-type="float" office:value="35" calcext:value-type="float">
            <text:p>35</text:p>
          </table:table-cell>
          <table:table-cell table:formula="of:=['file:///D:/mp/projects/PR0118%20-%20ISO%2011171%20Calibrations/results/2025-05-19-LPA3-NAVAIR-11171-00009/11171-00009-LIVE.ods'#$'6 - B1'.$H$81]" office:value-type="float" office:value="34" calcext:value-type="float">
            <text:p>34</text:p>
          </table:table-cell>
          <table:table-cell table:style-name="ce221" table:formula="of:=['file:///D:/mp/projects/PR0118%20-%20ISO%2011171%20Calibrations/results/2025-05-19-LPA3-NAVAIR-11171-00009/11171-00009-LIVE.ods'#$'6 - B1'.$I$81]" office:value-type="float" office:value="34" calcext:value-type="float">
            <text:p>34</text:p>
          </table:table-cell>
          <table:table-cell table:formula="of:=['file:///D:/mp/projects/PR0118%20-%20ISO%2011171%20Calibrations/results/2025-05-19-LPA3-NAVAIR-11171-00009/11171-00009-LIVE.ods'#$'6 - B1'.$J$81]" office:value-type="float" office:value="33" calcext:value-type="float">
            <text:p>33</text:p>
          </table:table-cell>
          <table:table-cell table:style-name="ce221" table:formula="of:=['file:///D:/mp/projects/PR0118%20-%20ISO%2011171%20Calibrations/results/2025-05-19-LPA3-NAVAIR-11171-00009/11171-00009-LIVE.ods'#$'6 - B1'.$K$81]" office:value-type="float" office:value="19" calcext:value-type="float">
            <text:p>19</text:p>
          </table:table-cell>
          <table:table-cell table:style-name="ce221" table:formula="of:=['file:///D:/mp/projects/PR0118%20-%20ISO%2011171%20Calibrations/results/2025-05-19-LPA3-NAVAIR-11171-00009/11171-00009-LIVE.ods'#$'6 - B1'.$L$81]" office:value-type="float" office:value="36" calcext:value-type="float">
            <text:p>36</text:p>
          </table:table-cell>
          <table:table-cell table:style-name="ce221" table:formula="of:=['file:///D:/mp/projects/PR0118%20-%20ISO%2011171%20Calibrations/results/2025-05-19-LPA3-NAVAIR-11171-00009/11171-00009-LIVE.ods'#$'6 - B1'.$M$81]" office:value-type="float" office:value="23" calcext:value-type="float">
            <text:p>23</text:p>
          </table:table-cell>
          <table:table-cell table:style-name="ce221" table:formula="of:=['file:///D:/mp/projects/PR0118%20-%20ISO%2011171%20Calibrations/results/2025-05-19-LPA3-NAVAIR-11171-00009/11171-00009-LIVE.ods'#$'6 - B1'.$N$81]" office:value-type="float" office:value="30" calcext:value-type="float">
            <text:p>30</text:p>
          </table:table-cell>
          <table:table-cell table:formula="of:=['file:///D:/mp/projects/PR0118%20-%20ISO%2011171%20Calibrations/results/2025-05-19-LPA3-NAVAIR-11171-00009/11171-00009-LIVE.ods'#$'6 - B1'.$O$81]" office:value-type="float" office:value="25" calcext:value-type="float">
            <text:p>25</text:p>
          </table:table-cell>
          <table:table-cell table:style-name="ce221" table:formula="of:=['file:///D:/mp/projects/PR0118%20-%20ISO%2011171%20Calibrations/results/2025-05-19-LPA3-NAVAIR-11171-00009/11171-00009-LIVE.ods'#$'6 - B1'.$P$81]" office:value-type="float" office:value="20" calcext:value-type="float">
            <text:p>20</text:p>
          </table:table-cell>
          <table:table-cell table:number-columns-repeated="33"/>
        </table:table-row>
        <table:table-row table:style-name="ro2">
          <table:table-cell table:style-name="ce218" table:formula="of:=['file:///D:/mp/projects/PR0118%20-%20ISO%2011171%20Calibrations/results/2025-05-19-LPA3-NAVAIR-11171-00009/11171-00009-LIVE.ods'#$'6 - B1'.$A$82]" office:value-type="float" office:value="70" calcext:value-type="float">
            <text:p>70</text:p>
          </table:table-cell>
          <table:table-cell table:formula="of:=['file:///D:/mp/projects/PR0118%20-%20ISO%2011171%20Calibrations/results/2025-05-19-LPA3-NAVAIR-11171-00009/11171-00009-LIVE.ods'#$'6 - B1'.$B$82]" office:value-type="float" office:value="33" calcext:value-type="float">
            <text:p>33</text:p>
          </table:table-cell>
          <table:table-cell table:formula="of:=['file:///D:/mp/projects/PR0118%20-%20ISO%2011171%20Calibrations/results/2025-05-19-LPA3-NAVAIR-11171-00009/11171-00009-LIVE.ods'#$'6 - B1'.$C$82]" office:value-type="float" office:value="21" calcext:value-type="float">
            <text:p>21</text:p>
          </table:table-cell>
          <table:table-cell table:formula="of:=['file:///D:/mp/projects/PR0118%20-%20ISO%2011171%20Calibrations/results/2025-05-19-LPA3-NAVAIR-11171-00009/11171-00009-LIVE.ods'#$'6 - B1'.$D$82]" office:value-type="float" office:value="21" calcext:value-type="float">
            <text:p>21</text:p>
          </table:table-cell>
          <table:table-cell table:formula="of:=['file:///D:/mp/projects/PR0118%20-%20ISO%2011171%20Calibrations/results/2025-05-19-LPA3-NAVAIR-11171-00009/11171-00009-LIVE.ods'#$'6 - B1'.$E$82]" office:value-type="float" office:value="10" calcext:value-type="float">
            <text:p>10</text:p>
          </table:table-cell>
          <table:table-cell table:formula="of:=['file:///D:/mp/projects/PR0118%20-%20ISO%2011171%20Calibrations/results/2025-05-19-LPA3-NAVAIR-11171-00009/11171-00009-LIVE.ods'#$'6 - B1'.$F$82]" office:value-type="float" office:value="16" calcext:value-type="float">
            <text:p>16</text:p>
          </table:table-cell>
          <table:table-cell table:formula="of:=['file:///D:/mp/projects/PR0118%20-%20ISO%2011171%20Calibrations/results/2025-05-19-LPA3-NAVAIR-11171-00009/11171-00009-LIVE.ods'#$'6 - B1'.$G$82]" office:value-type="float" office:value="12" calcext:value-type="float">
            <text:p>12</text:p>
          </table:table-cell>
          <table:table-cell table:formula="of:=['file:///D:/mp/projects/PR0118%20-%20ISO%2011171%20Calibrations/results/2025-05-19-LPA3-NAVAIR-11171-00009/11171-00009-LIVE.ods'#$'6 - B1'.$H$82]" office:value-type="float" office:value="9" calcext:value-type="float">
            <text:p>9</text:p>
          </table:table-cell>
          <table:table-cell table:style-name="ce221" table:formula="of:=['file:///D:/mp/projects/PR0118%20-%20ISO%2011171%20Calibrations/results/2025-05-19-LPA3-NAVAIR-11171-00009/11171-00009-LIVE.ods'#$'6 - B1'.$I$82]" office:value-type="float" office:value="16" calcext:value-type="float">
            <text:p>16</text:p>
          </table:table-cell>
          <table:table-cell table:formula="of:=['file:///D:/mp/projects/PR0118%20-%20ISO%2011171%20Calibrations/results/2025-05-19-LPA3-NAVAIR-11171-00009/11171-00009-LIVE.ods'#$'6 - B1'.$J$82]" office:value-type="float" office:value="8" calcext:value-type="float">
            <text:p>8</text:p>
          </table:table-cell>
          <table:table-cell table:style-name="ce221" table:formula="of:=['file:///D:/mp/projects/PR0118%20-%20ISO%2011171%20Calibrations/results/2025-05-19-LPA3-NAVAIR-11171-00009/11171-00009-LIVE.ods'#$'6 - B1'.$K$82]" office:value-type="float" office:value="5" calcext:value-type="float">
            <text:p>5</text:p>
          </table:table-cell>
          <table:table-cell table:style-name="ce221" table:formula="of:=['file:///D:/mp/projects/PR0118%20-%20ISO%2011171%20Calibrations/results/2025-05-19-LPA3-NAVAIR-11171-00009/11171-00009-LIVE.ods'#$'6 - B1'.$L$82]" office:value-type="float" office:value="15" calcext:value-type="float">
            <text:p>15</text:p>
          </table:table-cell>
          <table:table-cell table:style-name="ce221" table:formula="of:=['file:///D:/mp/projects/PR0118%20-%20ISO%2011171%20Calibrations/results/2025-05-19-LPA3-NAVAIR-11171-00009/11171-00009-LIVE.ods'#$'6 - B1'.$M$82]" office:value-type="float" office:value="9" calcext:value-type="float">
            <text:p>9</text:p>
          </table:table-cell>
          <table:table-cell table:style-name="ce221" table:formula="of:=['file:///D:/mp/projects/PR0118%20-%20ISO%2011171%20Calibrations/results/2025-05-19-LPA3-NAVAIR-11171-00009/11171-00009-LIVE.ods'#$'6 - B1'.$N$82]" office:value-type="float" office:value="9" calcext:value-type="float">
            <text:p>9</text:p>
          </table:table-cell>
          <table:table-cell table:formula="of:=['file:///D:/mp/projects/PR0118%20-%20ISO%2011171%20Calibrations/results/2025-05-19-LPA3-NAVAIR-11171-00009/11171-00009-LIVE.ods'#$'6 - B1'.$O$82]" office:value-type="float" office:value="10" calcext:value-type="float">
            <text:p>10</text:p>
          </table:table-cell>
          <table:table-cell table:style-name="ce221" table:formula="of:=['file:///D:/mp/projects/PR0118%20-%20ISO%2011171%20Calibrations/results/2025-05-19-LPA3-NAVAIR-11171-00009/11171-00009-LIVE.ods'#$'6 - B1'.$P$82]" office:value-type="float" office:value="2" calcext:value-type="float">
            <text:p>2</text:p>
          </table:table-cell>
          <table:table-cell table:number-columns-repeated="33"/>
        </table:table-row>
        <calcext:conditional-formats>
          <calcext:conditional-format calcext:target-range-address="'6 - B2'.H9:'6 - B2'.H40">
            <calcext:condition calcext:apply-style-name="Good" calcext:value="&gt;1000" calcext:base-cell-address="'6 - B2'.H9"/>
          </calcext:conditional-format>
          <calcext:conditional-format calcext:target-range-address="'6 - B2'.K9:'6 - B2'.K40">
            <calcext:condition calcext:apply-style-name="Good" calcext:value="&lt;[.J11]" calcext:base-cell-address="'6 - B2'.K9"/>
          </calcext:conditional-format>
        </calcext:conditional-formats>
      </table:table>
      <table:table table:name="6 - B3" table:style-name="ta1">
        <table:table-column table:style-name="co4" table:default-cell-style-name="ce16"/>
        <table:table-column table:style-name="co4" table:number-columns-repeated="7" table:default-cell-style-name="ce221"/>
        <table:table-column table:style-name="co4" table:default-cell-style-name="ce212"/>
        <table:table-column table:style-name="co4" table:default-cell-style-name="ce221"/>
        <table:table-column table:style-name="co4" table:default-cell-style-name="ce316"/>
        <table:table-column table:style-name="co4" table:number-columns-repeated="3" table:default-cell-style-name="Default"/>
        <table:table-column table:style-name="co4" table:default-cell-style-name="ce221"/>
        <table:table-column table:style-name="co4" table:number-columns-repeated="34" table:default-cell-style-name="Default"/>
        <table:table-row table:style-name="ro2">
          <table:table-cell table:style-name="Default" table:formula="of:=[$'6 - B1'.$A$1]" office:value-type="string" office:string-value="Data Preprocessing and Quality Assessment per ISO 11171 Clause 6.6" calcext:value-type="string">
            <text:p>Data Preprocessing and Quality Assessment per ISO 11171 Clause 6.6</text:p>
          </table:table-cell>
          <table:table-cell table:style-name="Default" table:number-columns-repeated="10"/>
          <table:table-cell table:number-columns-repeated="3"/>
          <table:table-cell table:style-name="Default"/>
          <table:table-cell table:number-columns-repeated="34"/>
        </table:table-row>
        <table:table-row table:style-name="ro8">
          <table:table-cell table:style-name="ce215" office:value-type="string" calcext:value-type="string">
            <text:p>BOTTLE 3</text:p>
          </table:table-cell>
          <table:table-cell table:style-name="Default" table:number-columns-repeated="10"/>
          <table:table-cell table:number-columns-repeated="3"/>
          <table:table-cell table:style-name="ce215"/>
          <table:table-cell table:number-columns-repeated="34"/>
        </table:table-row>
        <table:table-row table:style-name="ro2">
          <table:table-cell table:style-name="Default" table:formula="of:=[$'6 - B1'.$A$3]" office:value-type="string" office:string-value="Serial #" calcext:value-type="string">
            <text:p>Serial #</text:p>
          </table:table-cell>
          <table:table-cell table:style-name="ce194" table:formula="of:=[$'6 - B1'.$B$3]" office:value-type="string" office:string-value="11171-00009" calcext:value-type="string">
            <text:p>11171-00009</text:p>
          </table:table-cell>
          <table:table-cell table:style-name="Default" table:number-columns-repeated="9"/>
          <table:table-cell table:number-columns-repeated="3"/>
          <table:table-cell table:style-name="Default"/>
          <table:table-cell table:number-columns-repeated="34"/>
        </table:table-row>
        <table:table-row table:style-name="ro11">
          <table:table-cell table:style-name="ce89" table:formula="of:=[$'6 - B1'.$A$4]" office:value-type="string" office:string-value="Date" calcext:value-type="string">
            <text:p>Date</text:p>
          </table:table-cell>
          <table:table-cell table:style-name="ce195" table:formula="of:=[$'6 - B1'.$B$4]" office:value-type="date" office:date-value="2025-06-12" calcext:value-type="date">
            <text:p>2025-06-12</text:p>
          </table:table-cell>
          <table:table-cell table:style-name="Default" table:number-columns-repeated="9"/>
          <table:table-cell table:number-columns-repeated="3"/>
          <table:table-cell table:style-name="ce215"/>
          <table:table-cell table:number-columns-repeated="34"/>
        </table:table-row>
        <table:table-row table:style-name="ro2">
          <table:table-cell table:style-name="ce89" table:formula="of:=[$'6 - B1'.$A$5]" office:value-type="string" office:string-value="RM" calcext:value-type="string">
            <text:p>RM</text:p>
          </table:table-cell>
          <table:table-cell table:style-name="ce219" table:formula="of:=[$'6 - B1'.$B$5]" office:value-type="string" office:string-value="34D" calcext:value-type="string">
            <text:p>34D</text:p>
          </table:table-cell>
          <table:table-cell table:style-name="Default" table:number-columns-repeated="9"/>
          <table:table-cell table:number-columns-repeated="3"/>
          <table:table-cell table:style-name="Default"/>
          <table:table-cell table:number-columns-repeated="34"/>
        </table:table-row>
        <table:table-row table:style-name="ro2">
          <table:table-cell table:style-name="Default"/>
          <table:table-cell table:style-name="ce89" table:number-columns-repeated="5"/>
          <table:table-cell table:style-name="Default" table:number-columns-repeated="5"/>
          <table:table-cell table:number-columns-repeated="3"/>
          <table:table-cell table:style-name="Default"/>
          <table:table-cell table:number-columns-repeated="34"/>
        </table:table-row>
        <table:table-row table:style-name="ro2">
          <table:table-cell table:style-name="Default"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202" office:value-type="string" calcext:value-type="string">
            <text:p>X<text:span text:style-name="T8"> / ml</text:span></text:p>
          </table:table-cell>
          <table:table-cell table:style-name="ce31" office:value-type="string" calcext:value-type="string">
            <text:p>N<text:span text:style-name="T6">TOTAL</text:span></text:p>
          </table:table-cell>
          <table:table-cell table:style-name="ce31" office:value-type="string" calcext:value-type="string">
            <text:p>CV</text:p>
          </table:table-cell>
          <table:table-cell table:style-name="ce31" office:value-type="string" calcext:value-type="string">
            <text:p>D<text:span text:style-name="T6">QMAX</text:span></text:p>
          </table:table-cell>
          <table:table-cell table:style-name="ce31" office:value-type="string" calcext:value-type="string">
            <text:p>D<text:span text:style-name="T6">Q</text:span></text:p>
          </table:table-cell>
          <table:table-cell table:style-name="ce31" office:value-type="string" calcext:value-type="string">
            <text:p>N<text:span text:style-name="T6">C</text:span></text:p>
          </table:table-cell>
          <table:table-cell table:number-columns-repeated="2"/>
          <table:table-cell table:style-name="ce31" office:value-type="string" calcext:value-type="string">
            <text:p>Thresholds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Scanned ml</text:p>
          </table:table-cell>
          <table:table-cell table:style-name="ce32" table:formula="of:=[.L52]" office:value-type="float" office:value="4.489153" calcext:value-type="float">
            <text:p>4.489</text:p>
          </table:table-cell>
          <table:table-cell table:style-name="ce32" table:formula="of:=[.M52]" office:value-type="float" office:value="4.796755" calcext:value-type="float">
            <text:p>4.797</text:p>
          </table:table-cell>
          <table:table-cell table:style-name="ce32" table:formula="of:=[.N52]" office:value-type="float" office:value="4.784308" calcext:value-type="float">
            <text:p>4.784</text:p>
          </table:table-cell>
          <table:table-cell table:style-name="ce32" table:formula="of:=[.O52]" office:value-type="float" office:value="4.787062" calcext:value-type="float">
            <text:p>4.787</text:p>
          </table:table-cell>
          <table:table-cell table:style-name="ce32" table:formula="of:=[.P52]" office:value-type="float" office:value="4.805943" calcext:value-type="float">
            <text:p>4.806</text:p>
          </table:table-cell>
          <table:table-cell table:style-name="ce203" table:formula="of:=AVERAGE([.B$8:.F$8])*5" office:value-type="float" office:value="23.663221" calcext:value-type="float">
            <text:p>23.7</text:p>
          </table:table-cell>
          <table:table-cell table:style-name="Default"/>
          <table:table-cell/>
          <table:table-cell table:style-name="Default"/>
          <table:table-cell table:style-name="ce212"/>
          <table:table-cell table:number-columns-repeated="3"/>
          <table:table-cell table:style-name="Default"/>
          <table:table-cell table:number-columns-repeated="34"/>
        </table:table-row>
        <table:table-row table:style-name="ro2">
          <table:table-cell office:value-type="string" calcext:value-type="string">
            <text:p>count_4</text:p>
          </table:table-cell>
          <table:table-cell table:style-name="ce198" table:formula="of:=[.L53]/[.B$8]" office:value-type="float" office:value="10870.4247772353" calcext:value-type="float">
            <text:p>10870</text:p>
          </table:table-cell>
          <table:table-cell table:style-name="ce198" table:formula="of:=[.M53]/[.C$8]" office:value-type="float" office:value="10721.8317383314" calcext:value-type="float">
            <text:p>10722</text:p>
          </table:table-cell>
          <table:table-cell table:style-name="ce198" table:formula="of:=[.N53]/[.D$8]" office:value-type="float" office:value="10806.1604729461" calcext:value-type="float">
            <text:p>10806</text:p>
          </table:table-cell>
          <table:table-cell table:style-name="ce198" table:formula="of:=[.O53]/[.E$8]" office:value-type="float" office:value="10808.299537378" calcext:value-type="float">
            <text:p>10808</text:p>
          </table:table-cell>
          <table:table-cell table:style-name="ce198" table:formula="of:=[.P53]/[.F$8]" office:value-type="float" office:value="10628.9233975517" calcext:value-type="float">
            <text:p>10629</text:p>
          </table:table-cell>
          <table:table-cell table:style-name="ce76" table:formula="of:=AVERAGE([.B9:.F9])" office:value-type="float" office:value="10767.1279846885" calcext:value-type="float">
            <text:p>10767.1</text:p>
          </table:table-cell>
          <table:table-cell table:style-name="ce314" table:formula="of:=[.G9]*[.G$8]" office:value-type="float" office:value="254784.929036969" calcext:value-type="float">
            <text:p>254785</text:p>
          </table:table-cell>
          <table:table-cell table:formula="of:=STDEVP([.B9:.F9])/[.G9]" office:value-type="percentage" office:value="0.00777506616979094" calcext:value-type="percentage">
            <text:p>0.8%</text:p>
          </table:table-cell>
          <table:table-cell table:style-name="ce212" table:formula="of:=IF([.H9]&gt;[.$A$43]; [.$C$43]; IF([.H9]&gt;[.$A$44]; [.$C$44]; IF([.H9]&gt;[.$A$45];[.$C$45];IF([.H9]&gt;[.$A$46];[.$C$46]; IF([.H9]&gt;[.$A$47];[.$C$47];IF([.H9]&gt;[.$A$48];[.$C$48];[.$C$49]))))))/100" office:value-type="percentage" office:value="0.11" calcext:value-type="percentage">
            <text:p>11.0%</text:p>
          </table:table-cell>
          <table:table-cell table:formula="of:=(MAX([.B9:.F9])-MIN([.B9:.F9]))/[.G9]" office:value-type="percentage" office:value="0.0224295076669424" calcext:value-type="percentage">
            <text:p>2.2%</text:p>
          </table:table-cell>
          <table:table-cell table:formula="of:=COUNTA([.B9:.F9]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style-name="ce20" office:value-type="float" office:value="137.1" calcext:value-type="float">
            <text:p>137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count_5</text:p>
          </table:table-cell>
          <table:table-cell table:style-name="ce198" table:formula="of:=[.L54]/[.B$8]" office:value-type="float" office:value="9197.72616348786" calcext:value-type="float">
            <text:p>9198</text:p>
          </table:table-cell>
          <table:table-cell table:style-name="ce198" table:formula="of:=[.M54]/[.C$8]" office:value-type="float" office:value="9088.01887942995" calcext:value-type="float">
            <text:p>9088</text:p>
          </table:table-cell>
          <table:table-cell table:style-name="ce198" table:formula="of:=[.N54]/[.D$8]" office:value-type="float" office:value="9136.74454069429" calcext:value-type="float">
            <text:p>9137</text:p>
          </table:table-cell>
          <table:table-cell table:style-name="ce198" table:formula="of:=[.O54]/[.E$8]" office:value-type="float" office:value="9156.76462932797" calcext:value-type="float">
            <text:p>9157</text:p>
          </table:table-cell>
          <table:table-cell table:style-name="ce198" table:formula="of:=[.P54]/[.F$8]" office:value-type="float" office:value="8996.5694557759" calcext:value-type="float">
            <text:p>8997</text:p>
          </table:table-cell>
          <table:table-cell table:style-name="ce76" table:formula="of:=AVERAGE([.B10:.F10])" office:value-type="float" office:value="9115.16473374319" calcext:value-type="float">
            <text:p>9115.2</text:p>
          </table:table-cell>
          <table:table-cell table:style-name="ce314" table:formula="of:=[.G10]*[.G$8]" office:value-type="float" office:value="215694.157545971" calcext:value-type="float">
            <text:p>215694</text:p>
          </table:table-cell>
          <table:table-cell table:formula="of:=STDEVP([.B10:.F10])/[.G10]" office:value-type="percentage" office:value="0.00757129193047952" calcext:value-type="percentage">
            <text:p>0.8%</text:p>
          </table:table-cell>
          <table:table-cell table:style-name="ce212" table:formula="of:=IF([.H10]&gt;[.$A$43]; [.$C$43]; IF([.H10]&gt;[.$A$44]; [.$C$44]; IF([.H10]&gt;[.$A$45];[.$C$45];IF([.H10]&gt;[.$A$46];[.$C$46]; IF([.H10]&gt;[.$A$47];[.$C$47];IF([.H10]&gt;[.$A$48];[.$C$48];[.$C$49]))))))/100" office:value-type="percentage" office:value="0.11" calcext:value-type="percentage">
            <text:p>11.0%</text:p>
          </table:table-cell>
          <table:table-cell table:formula="of:=(MAX([.B10:.F10])-MIN([.B10:.F10]))/[.G10]" office:value-type="percentage" office:value="0.0220683568084403" calcext:value-type="percentage">
            <text:p>2.2%</text:p>
          </table:table-cell>
          <table:table-cell table:formula="of:=COUNTA([.B10:.F10]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style-name="ce20" office:value-type="float" office:value="162.494327047856" calcext:value-type="float">
            <text:p>162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count_6</text:p>
          </table:table-cell>
          <table:table-cell table:style-name="ce198" table:formula="of:=[.L55]/[.B$8]" office:value-type="float" office:value="7787.215093805" calcext:value-type="float">
            <text:p>7787</text:p>
          </table:table-cell>
          <table:table-cell table:style-name="ce198" table:formula="of:=[.M55]/[.C$8]" office:value-type="float" office:value="7681.02602697032" calcext:value-type="float">
            <text:p>7681</text:p>
          </table:table-cell>
          <table:table-cell table:style-name="ce198" table:formula="of:=[.N55]/[.D$8]" office:value-type="float" office:value="7711.25103149714" calcext:value-type="float">
            <text:p>7711</text:p>
          </table:table-cell>
          <table:table-cell table:style-name="ce198" table:formula="of:=[.O55]/[.E$8]" office:value-type="float" office:value="7705.7702615926" calcext:value-type="float">
            <text:p>7706</text:p>
          </table:table-cell>
          <table:table-cell table:style-name="ce198" table:formula="of:=[.P55]/[.F$8]" office:value-type="float" office:value="7581.65463052725" calcext:value-type="float">
            <text:p>7582</text:p>
          </table:table-cell>
          <table:table-cell table:style-name="ce76" table:formula="of:=AVERAGE([.B11:.F11])" office:value-type="float" office:value="7693.38340887846" calcext:value-type="float">
            <text:p>7693.4</text:p>
          </table:table-cell>
          <table:table-cell table:style-name="ce314" table:formula="of:=[.G11]*[.G$8]" office:value-type="float" office:value="182050.231842024" calcext:value-type="float">
            <text:p>182050</text:p>
          </table:table-cell>
          <table:table-cell table:formula="of:=STDEVP([.B11:.F11])/[.G11]" office:value-type="percentage" office:value="0.00860497259428865" calcext:value-type="percentage">
            <text:p>0.9%</text:p>
          </table:table-cell>
          <table:table-cell table:style-name="ce212" table:formula="of:=IF([.H11]&gt;[.$A$43]; [.$C$43]; IF([.H11]&gt;[.$A$44]; [.$C$44]; IF([.H11]&gt;[.$A$45];[.$C$45];IF([.H11]&gt;[.$A$46];[.$C$46]; IF([.H11]&gt;[.$A$47];[.$C$47];IF([.H11]&gt;[.$A$48];[.$C$48];[.$C$49]))))))/100" office:value-type="percentage" office:value="0.11" calcext:value-type="percentage">
            <text:p>11.0%</text:p>
          </table:table-cell>
          <table:table-cell table:formula="of:=(MAX([.B11:.F11])-MIN([.B11:.F11]))/[.G11]" office:value-type="percentage" office:value="0.0267191237395671" calcext:value-type="percentage">
            <text:p>2.7%</text:p>
          </table:table-cell>
          <table:table-cell table:formula="of:=COUNTA([.B11:.F11])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style-name="ce20" office:value-type="float" office:value="192.592314534906" calcext:value-type="float">
            <text:p>193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count_7</text:p>
          </table:table-cell>
          <table:table-cell table:style-name="ce198" table:formula="of:=[.L56]/[.B$8]" office:value-type="float" office:value="6445.536607908" calcext:value-type="float">
            <text:p>6446</text:p>
          </table:table-cell>
          <table:table-cell table:style-name="ce198" table:formula="of:=[.M56]/[.C$8]" office:value-type="float" office:value="6343.24663235875" calcext:value-type="float">
            <text:p>6343</text:p>
          </table:table-cell>
          <table:table-cell table:style-name="ce198" table:formula="of:=[.N56]/[.D$8]" office:value-type="float" office:value="6360.58548070066" calcext:value-type="float">
            <text:p>6361</text:p>
          </table:table-cell>
          <table:table-cell table:style-name="ce198" table:formula="of:=[.O56]/[.E$8]" office:value-type="float" office:value="6386.38062343876" calcext:value-type="float">
            <text:p>6386</text:p>
          </table:table-cell>
          <table:table-cell table:style-name="ce198" table:formula="of:=[.P56]/[.F$8]" office:value-type="float" office:value="6273.89879572022" calcext:value-type="float">
            <text:p>6274</text:p>
          </table:table-cell>
          <table:table-cell table:style-name="ce76" table:formula="of:=AVERAGE([.B12:.F12])" office:value-type="float" office:value="6361.92962802528" calcext:value-type="float">
            <text:p>6361.9</text:p>
          </table:table-cell>
          <table:table-cell table:style-name="ce314" table:formula="of:=[.G12]*[.G$8]" office:value-type="float" office:value="150543.74677441" calcext:value-type="float">
            <text:p>150544</text:p>
          </table:table-cell>
          <table:table-cell table:formula="of:=STDEVP([.B12:.F12])/[.G12]" office:value-type="percentage" office:value="0.00880468087458401" calcext:value-type="percentage">
            <text:p>0.9%</text:p>
          </table:table-cell>
          <table:table-cell table:style-name="ce212" table:formula="of:=IF([.H12]&gt;[.$A$43]; [.$C$43]; IF([.H12]&gt;[.$A$44]; [.$C$44]; IF([.H12]&gt;[.$A$45];[.$C$45];IF([.H12]&gt;[.$A$46];[.$C$46]; IF([.H12]&gt;[.$A$47];[.$C$47];IF([.H12]&gt;[.$A$48];[.$C$48];[.$C$49]))))))/100" office:value-type="percentage" office:value="0.11" calcext:value-type="percentage">
            <text:p>11.0%</text:p>
          </table:table-cell>
          <table:table-cell table:formula="of:=(MAX([.B12:.F12])-MIN([.B12:.F12]))/[.G12]" office:value-type="percentage" office:value="0.0269788919751153" calcext:value-type="percentage">
            <text:p>2.7%</text:p>
          </table:table-cell>
          <table:table-cell table:formula="of:=COUNTA([.B12:.F12])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style-name="ce20" office:value-type="float" office:value="228.265197264323" calcext:value-type="float">
            <text:p>228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count_8</text:p>
          </table:table-cell>
          <table:table-cell table:style-name="ce198" table:formula="of:=[.L57]/[.B$8]" office:value-type="float" office:value="5225.26187011225" calcext:value-type="float">
            <text:p>5225</text:p>
          </table:table-cell>
          <table:table-cell table:style-name="ce198" table:formula="of:=[.M57]/[.C$8]" office:value-type="float" office:value="5151.60770145651" calcext:value-type="float">
            <text:p>5152</text:p>
          </table:table-cell>
          <table:table-cell table:style-name="ce198" table:formula="of:=[.N57]/[.D$8]" office:value-type="float" office:value="5132.40368304047" calcext:value-type="float">
            <text:p>5132</text:p>
          </table:table-cell>
          <table:table-cell table:style-name="ce198" table:formula="of:=[.O57]/[.E$8]" office:value-type="float" office:value="5175.40821489256" calcext:value-type="float">
            <text:p>5175</text:p>
          </table:table-cell>
          <table:table-cell table:style-name="ce198" table:formula="of:=[.P57]/[.F$8]" office:value-type="float" office:value="5051.03785042811" calcext:value-type="float">
            <text:p>5051</text:p>
          </table:table-cell>
          <table:table-cell table:style-name="ce76" table:formula="of:=AVERAGE([.B13:.F13])" office:value-type="float" office:value="5147.14386398598" calcext:value-type="float">
            <text:p>5147.1</text:p>
          </table:table-cell>
          <table:table-cell table:style-name="ce314" table:formula="of:=[.G13]*[.G$8]" office:value-type="float" office:value="121798.002772294" calcext:value-type="float">
            <text:p>121798</text:p>
          </table:table-cell>
          <table:table-cell table:formula="of:=STDEVP([.B13:.F13])/[.G13]" office:value-type="percentage" office:value="0.0111182773191704" calcext:value-type="percentage">
            <text:p>1.1%</text:p>
          </table:table-cell>
          <table:table-cell table:style-name="ce212" table:formula="of:=IF([.H13]&gt;[.$A$43]; [.$C$43]; IF([.H13]&gt;[.$A$44]; [.$C$44]; IF([.H13]&gt;[.$A$45];[.$C$45];IF([.H13]&gt;[.$A$46];[.$C$46]; IF([.H13]&gt;[.$A$47];[.$C$47];IF([.H13]&gt;[.$A$48];[.$C$48];[.$C$49]))))))/100" office:value-type="percentage" office:value="0.11" calcext:value-type="percentage">
            <text:p>11.0%</text:p>
          </table:table-cell>
          <table:table-cell table:formula="of:=(MAX([.B13:.F13])-MIN([.B13:.F13]))/[.G13]" office:value-type="percentage" office:value="0.0338486788572529" calcext:value-type="percentage">
            <text:p>3.4%</text:p>
          </table:table-cell>
          <table:table-cell table:formula="of:=COUNTA([.B13:.F13])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ce20" office:value-type="float" office:value="270.545584375728" calcext:value-type="float">
            <text:p>271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count_9</text:p>
          </table:table-cell>
          <table:table-cell table:style-name="ce198" table:formula="of:=[.L58]/[.B$8]" office:value-type="float" office:value="4188.98620742042" calcext:value-type="float">
            <text:p>4189</text:p>
          </table:table-cell>
          <table:table-cell table:style-name="ce198" table:formula="of:=[.M58]/[.C$8]" office:value-type="float" office:value="4118.40921623056" calcext:value-type="float">
            <text:p>4118</text:p>
          </table:table-cell>
          <table:table-cell table:style-name="ce198" table:formula="of:=[.N58]/[.D$8]" office:value-type="float" office:value="4097.77129733286" calcext:value-type="float">
            <text:p>4098</text:p>
          </table:table-cell>
          <table:table-cell table:style-name="ce198" table:formula="of:=[.O58]/[.E$8]" office:value-type="float" office:value="4133.43299084073" calcext:value-type="float">
            <text:p>4133</text:p>
          </table:table-cell>
          <table:table-cell table:style-name="ce198" table:formula="of:=[.P58]/[.F$8]" office:value-type="float" office:value="4053.31482291821" calcext:value-type="float">
            <text:p>4053</text:p>
          </table:table-cell>
          <table:table-cell table:style-name="ce76" table:formula="of:=AVERAGE([.B14:.F14])" office:value-type="float" office:value="4118.38290694856" calcext:value-type="float">
            <text:p>4118.4</text:p>
          </table:table-cell>
          <table:table-cell table:style-name="ce314" table:formula="of:=[.G14]*[.G$8]" office:value-type="float" office:value="97454.2048897461" calcext:value-type="float">
            <text:p>97454</text:p>
          </table:table-cell>
          <table:table-cell table:formula="of:=STDEVP([.B14:.F14])/[.G14]" office:value-type="percentage" office:value="0.0107881609791399" calcext:value-type="percentage">
            <text:p>1.1%</text:p>
          </table:table-cell>
          <table:table-cell table:style-name="ce212" table:formula="of:=IF([.H14]&gt;[.$A$43]; [.$C$43]; IF([.H14]&gt;[.$A$44]; [.$C$44]; IF([.H14]&gt;[.$A$45];[.$C$45];IF([.H14]&gt;[.$A$46];[.$C$46]; IF([.H14]&gt;[.$A$47];[.$C$47];IF([.H14]&gt;[.$A$48];[.$C$48];[.$C$49]))))))/100" office:value-type="percentage" office:value="0.11" calcext:value-type="percentage">
            <text:p>11.0%</text:p>
          </table:table-cell>
          <table:table-cell table:formula="of:=(MAX([.B14:.F14])-MIN([.B14:.F14]))/[.G14]" office:value-type="percentage" office:value="0.0329428777186568" calcext:value-type="percentage">
            <text:p>3.3%</text:p>
          </table:table-cell>
          <table:table-cell table:formula="of:=COUNTA([.B14:.F14])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style-name="ce20" office:value-type="float" office:value="320.657349882588" calcext:value-type="float">
            <text:p>321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count_10</text:p>
          </table:table-cell>
          <table:table-cell table:style-name="ce198" table:formula="of:=[.L59]/[.B$8]" office:value-type="float" office:value="3388.16698829378" calcext:value-type="float">
            <text:p>3388</text:p>
          </table:table-cell>
          <table:table-cell table:style-name="ce198" table:formula="of:=[.M59]/[.C$8]" office:value-type="float" office:value="3317.24259421213" calcext:value-type="float">
            <text:p>3317</text:p>
          </table:table-cell>
          <table:table-cell table:style-name="ce198" table:formula="of:=[.N59]/[.D$8]" office:value-type="float" office:value="3292.63918627312" calcext:value-type="float">
            <text:p>3293</text:p>
          </table:table-cell>
          <table:table-cell table:style-name="ce198" table:formula="of:=[.O59]/[.E$8]" office:value-type="float" office:value="3317.48366743527" calcext:value-type="float">
            <text:p>3317</text:p>
          </table:table-cell>
          <table:table-cell table:style-name="ce198" table:formula="of:=[.P59]/[.F$8]" office:value-type="float" office:value="3235.16113278913" calcext:value-type="float">
            <text:p>3235</text:p>
          </table:table-cell>
          <table:table-cell table:style-name="ce76" table:formula="of:=AVERAGE([.B15:.F15])" office:value-type="float" office:value="3310.13871380069" calcext:value-type="float">
            <text:p>3310.1</text:p>
          </table:table-cell>
          <table:table-cell table:style-name="ce314" table:formula="of:=[.G15]*[.G$8]" office:value-type="float" office:value="78328.5439253214" calcext:value-type="float">
            <text:p>78329</text:p>
          </table:table-cell>
          <table:table-cell table:formula="of:=STDEVP([.B15:.F15])/[.G15]" office:value-type="percentage" office:value="0.0148741647390007" calcext:value-type="percentage">
            <text:p>1.5%</text:p>
          </table:table-cell>
          <table:table-cell table:style-name="ce212" table:formula="of:=IF([.H15]&gt;[.$A$43]; [.$C$43]; IF([.H15]&gt;[.$A$44]; [.$C$44]; IF([.H15]&gt;[.$A$45];[.$C$45];IF([.H15]&gt;[.$A$46];[.$C$46]; IF([.H15]&gt;[.$A$47];[.$C$47];IF([.H15]&gt;[.$A$48];[.$C$48];[.$C$49]))))))/100" office:value-type="percentage" office:value="0.11" calcext:value-type="percentage">
            <text:p>11.0%</text:p>
          </table:table-cell>
          <table:table-cell table:formula="of:=(MAX([.B15:.F15])-MIN([.B15:.F15]))/[.G15]" office:value-type="percentage" office:value="0.0462233968826551" calcext:value-type="percentage">
            <text:p>4.6%</text:p>
          </table:table-cell>
          <table:table-cell table:formula="of:=COUNTA([.B15:.F15])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style-name="ce20" office:value-type="float" office:value="380.051059679943" calcext:value-type="float">
            <text:p>380</text:p>
          </table:table-cell>
          <table:table-cell table:number-columns-repeated="2"/>
          <table:table-cell table:style-name="ce16" table:number-columns-repeated="32"/>
        </table:table-row>
        <table:table-row table:style-name="ro2">
          <table:table-cell office:value-type="string" calcext:value-type="string">
            <text:p>count_11</text:p>
          </table:table-cell>
          <table:table-cell table:style-name="ce198" table:formula="of:=[.L60]/[.B$8]" office:value-type="float" office:value="2713.65221902662" calcext:value-type="float">
            <text:p>2714</text:p>
          </table:table-cell>
          <table:table-cell table:style-name="ce198" table:formula="of:=[.M60]/[.C$8]" office:value-type="float" office:value="2652.83509372482" calcext:value-type="float">
            <text:p>2653</text:p>
          </table:table-cell>
          <table:table-cell table:style-name="ce198" table:formula="of:=[.N60]/[.D$8]" office:value-type="float" office:value="2631.9375759253" calcext:value-type="float">
            <text:p>2632</text:p>
          </table:table-cell>
          <table:table-cell table:style-name="ce198" table:formula="of:=[.O60]/[.E$8]" office:value-type="float" office:value="2660.08670871612" calcext:value-type="float">
            <text:p>2660</text:p>
          </table:table-cell>
          <table:table-cell table:style-name="ce198" table:formula="of:=[.P60]/[.F$8]" office:value-type="float" office:value="2560.99583370007" calcext:value-type="float">
            <text:p>2561</text:p>
          </table:table-cell>
          <table:table-cell table:style-name="ce76" table:formula="of:=AVERAGE([.B16:.F16])" office:value-type="float" office:value="2643.90148621858" calcext:value-type="float">
            <text:p>2643.9</text:p>
          </table:table-cell>
          <table:table-cell table:style-name="ce314" table:formula="of:=[.G16]*[.G$8]" office:value-type="float" office:value="62563.2251706188" calcext:value-type="float">
            <text:p>62563</text:p>
          </table:table-cell>
          <table:table-cell table:formula="of:=STDEVP([.B16:.F16])/[.G16]" office:value-type="percentage" office:value="0.0187010528780393" calcext:value-type="percentage">
            <text:p>1.9%</text:p>
          </table:table-cell>
          <table:table-cell table:style-name="ce212" table:formula="of:=IF([.H16]&gt;[.$A$43]; [.$C$43]; IF([.H16]&gt;[.$A$44]; [.$C$44]; IF([.H16]&gt;[.$A$45];[.$C$45];IF([.H16]&gt;[.$A$46];[.$C$46]; IF([.H16]&gt;[.$A$47];[.$C$47];IF([.H16]&gt;[.$A$48];[.$C$48];[.$C$49]))))))/100" office:value-type="percentage" office:value="0.11" calcext:value-type="percentage">
            <text:p>11.0%</text:p>
          </table:table-cell>
          <table:table-cell table:formula="of:=(MAX([.B16:.F16])-MIN([.B16:.F16]))/[.G16]" office:value-type="percentage" office:value="0.0577390595384426" calcext:value-type="percentage">
            <text:p>5.8%</text:p>
          </table:table-cell>
          <table:table-cell table:formula="of:=COUNTA([.B16:.F16])"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style-name="ce20" office:value-type="float" office:value="450.445960514347" calcext:value-type="float">
            <text:p>450</text:p>
          </table:table-cell>
          <table:table-cell table:style-name="ce89" table:number-columns-repeated="2"/>
          <table:table-cell table:style-name="ce16" table:number-columns-repeated="32"/>
        </table:table-row>
        <table:table-row table:style-name="ro2">
          <table:table-cell office:value-type="string" calcext:value-type="string">
            <text:p>count_12</text:p>
          </table:table-cell>
          <table:table-cell table:style-name="ce198" table:formula="of:=[.L61]/[.B$8]" office:value-type="float" office:value="2226.70067159662" calcext:value-type="float">
            <text:p>2227</text:p>
          </table:table-cell>
          <table:table-cell table:style-name="ce198" table:formula="of:=[.M61]/[.C$8]" office:value-type="float" office:value="2148.11888453757" calcext:value-type="float">
            <text:p>2148</text:p>
          </table:table-cell>
          <table:table-cell table:style-name="ce198" table:formula="of:=[.N61]/[.D$8]" office:value-type="float" office:value="2141.37551344939" calcext:value-type="float">
            <text:p>2141</text:p>
          </table:table-cell>
          <table:table-cell table:style-name="ce198" table:formula="of:=[.O61]/[.E$8]" office:value-type="float" office:value="2158.10866874087" calcext:value-type="float">
            <text:p>2158</text:p>
          </table:table-cell>
          <table:table-cell table:style-name="ce198" table:formula="of:=[.P61]/[.F$8]" office:value-type="float" office:value="2085.75091298419" calcext:value-type="float">
            <text:p>2086</text:p>
          </table:table-cell>
          <table:table-cell table:style-name="ce76" table:formula="of:=AVERAGE([.B17:.F17])" office:value-type="float" office:value="2152.01093026173" calcext:value-type="float">
            <text:p>2152.0</text:p>
          </table:table-cell>
          <table:table-cell table:style-name="ce314" table:formula="of:=[.G17]*[.G$8]" office:value-type="float" office:value="50923.5102371989" calcext:value-type="float">
            <text:p>50924</text:p>
          </table:table-cell>
          <table:table-cell table:formula="of:=STDEVP([.B17:.F17])/[.G17]" office:value-type="percentage" office:value="0.0209203684430251" calcext:value-type="percentage">
            <text:p>2.1%</text:p>
          </table:table-cell>
          <table:table-cell table:style-name="ce212" table:formula="of:=IF([.H17]&gt;[.$A$43]; [.$C$43]; IF([.H17]&gt;[.$A$44]; [.$C$44]; IF([.H17]&gt;[.$A$45];[.$C$45];IF([.H17]&gt;[.$A$46];[.$C$46]; IF([.H17]&gt;[.$A$47];[.$C$47];IF([.H17]&gt;[.$A$48];[.$C$48];[.$C$49]))))))/100" office:value-type="percentage" office:value="0.11" calcext:value-type="percentage">
            <text:p>11.0%</text:p>
          </table:table-cell>
          <table:table-cell table:formula="of:=(MAX([.B17:.F17])-MIN([.B17:.F17]))/[.G17]" office:value-type="percentage" office:value="0.0654967670611631" calcext:value-type="percentage">
            <text:p>6.5%</text:p>
          </table:table-cell>
          <table:table-cell table:formula="of:=COUNTA([.B17:.F17])"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style-name="ce20" office:value-type="float" office:value="533.879746354515" calcext:value-type="float">
            <text:p>534</text:p>
          </table:table-cell>
          <table:table-cell table:style-name="ce89" table:number-columns-repeated="2"/>
          <table:table-cell table:style-name="ce16" table:number-columns-repeated="32"/>
        </table:table-row>
        <table:table-row table:style-name="ro2">
          <table:table-cell office:value-type="string" calcext:value-type="string">
            <text:p>count_13</text:p>
          </table:table-cell>
          <table:table-cell table:style-name="ce198" table:formula="of:=[.L62]/[.B$8]" office:value-type="float" office:value="1816.37827893146" calcext:value-type="float">
            <text:p>1816</text:p>
          </table:table-cell>
          <table:table-cell table:style-name="ce198" table:formula="of:=[.M62]/[.C$8]" office:value-type="float" office:value="1769.52960907947" calcext:value-type="float">
            <text:p>1770</text:p>
          </table:table-cell>
          <table:table-cell table:style-name="ce198" table:formula="of:=[.N62]/[.D$8]" office:value-type="float" office:value="1752.18652310846" calcext:value-type="float">
            <text:p>1752</text:p>
          </table:table-cell>
          <table:table-cell table:style-name="ce198" table:formula="of:=[.O62]/[.E$8]" office:value-type="float" office:value="1771.02364665425" calcext:value-type="float">
            <text:p>1771</text:p>
          </table:table-cell>
          <table:table-cell table:style-name="ce198" table:formula="of:=[.P62]/[.F$8]" office:value-type="float" office:value="1718.49728554833" calcext:value-type="float">
            <text:p>1718</text:p>
          </table:table-cell>
          <table:table-cell table:style-name="ce76" table:formula="of:=AVERAGE([.B18:.F18])" office:value-type="float" office:value="1765.5230686644" calcext:value-type="float">
            <text:p>1765.5</text:p>
          </table:table-cell>
          <table:table-cell table:style-name="ce314" table:formula="of:=[.G18]*[.G$8]" office:value-type="float" office:value="41777.9625544038" calcext:value-type="float">
            <text:p>41778</text:p>
          </table:table-cell>
          <table:table-cell table:formula="of:=STDEVP([.B18:.F18])/[.G18]" office:value-type="percentage" office:value="0.0179503706371129" calcext:value-type="percentage">
            <text:p>1.8%</text:p>
          </table:table-cell>
          <table:table-cell table:style-name="ce212" table:formula="of:=IF([.H18]&gt;[.$A$43]; [.$C$43]; IF([.H18]&gt;[.$A$44]; [.$C$44]; IF([.H18]&gt;[.$A$45];[.$C$45];IF([.H18]&gt;[.$A$46];[.$C$46]; IF([.H18]&gt;[.$A$47];[.$C$47];IF([.H18]&gt;[.$A$48];[.$C$48];[.$C$49]))))))/100" office:value-type="percentage" office:value="0.11" calcext:value-type="percentage">
            <text:p>11.0%</text:p>
          </table:table-cell>
          <table:table-cell table:formula="of:=(MAX([.B18:.F18])-MIN([.B18:.F18]))/[.G18]" office:value-type="percentage" office:value="0.0554402234218189" calcext:value-type="percentage">
            <text:p>5.5%</text:p>
          </table:table-cell>
          <table:table-cell table:formula="of:=COUNTA([.B18:.F18])"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0" office:value-type="float" office:value="632.76754273054" calcext:value-type="float">
            <text:p>633</text:p>
          </table:table-cell>
          <table:table-cell table:style-name="ce89" table:number-columns-repeated="2"/>
          <table:table-cell table:style-name="ce16" table:number-columns-repeated="32"/>
        </table:table-row>
        <table:table-row table:style-name="ro2">
          <table:table-cell office:value-type="string" calcext:value-type="string">
            <text:p>count_14</text:p>
          </table:table-cell>
          <table:table-cell table:style-name="ce198" table:formula="of:=[.L63]/[.B$8]" office:value-type="float" office:value="1514.76236163036" calcext:value-type="float">
            <text:p>1515</text:p>
          </table:table-cell>
          <table:table-cell table:style-name="ce198" table:formula="of:=[.M63]/[.C$8]" office:value-type="float" office:value="1478.70800155522" calcext:value-type="float">
            <text:p>1479</text:p>
          </table:table-cell>
          <table:table-cell table:style-name="ce198" table:formula="of:=[.N63]/[.D$8]" office:value-type="float" office:value="1464.37060490253" calcext:value-type="float">
            <text:p>1464</text:p>
          </table:table-cell>
          <table:table-cell table:style-name="ce198" table:formula="of:=[.O63]/[.E$8]" office:value-type="float" office:value="1472.71959293613" calcext:value-type="float">
            <text:p>1473</text:p>
          </table:table-cell>
          <table:table-cell table:style-name="ce198" table:formula="of:=[.P63]/[.F$8]" office:value-type="float" office:value="1430.10435204912" calcext:value-type="float">
            <text:p>1430</text:p>
          </table:table-cell>
          <table:table-cell table:style-name="ce76" table:formula="of:=AVERAGE([.B19:.F19])" office:value-type="float" office:value="1472.13298261467" calcext:value-type="float">
            <text:p>1472.1</text:p>
          </table:table-cell>
          <table:table-cell table:style-name="ce314" table:formula="of:=[.G19]*[.G$8]" office:value-type="float" office:value="34835.4081090001" calcext:value-type="float">
            <text:p>34835</text:p>
          </table:table-cell>
          <table:table-cell table:formula="of:=STDEVP([.B19:.F19])/[.G19]" office:value-type="percentage" office:value="0.0184473473084966" calcext:value-type="percentage">
            <text:p>1.8%</text:p>
          </table:table-cell>
          <table:table-cell table:style-name="ce212" table:formula="of:=IF([.H19]&gt;[.$A$43]; [.$C$43]; IF([.H19]&gt;[.$A$44]; [.$C$44]; IF([.H19]&gt;[.$A$45];[.$C$45];IF([.H19]&gt;[.$A$46];[.$C$46]; IF([.H19]&gt;[.$A$47];[.$C$47];IF([.H19]&gt;[.$A$48];[.$C$48];[.$C$49]))))))/100" office:value-type="percentage" office:value="0.11" calcext:value-type="percentage">
            <text:p>11.0%</text:p>
          </table:table-cell>
          <table:table-cell table:formula="of:=(MAX([.B19:.F19])-MIN([.B19:.F19]))/[.G19]" office:value-type="percentage" office:value="0.0575070395005181" calcext:value-type="percentage">
            <text:p>5.8%</text:p>
          </table:table-cell>
          <table:table-cell table:formula="of:=COUNTA([.B19:.F19])"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0" office:value-type="float" office:value="749.971816438546" calcext:value-type="float">
            <text:p>750</text:p>
          </table:table-cell>
          <table:table-cell table:style-name="ce89" table:number-columns-repeated="2"/>
          <table:table-cell table:style-name="ce16" table:number-columns-repeated="32"/>
        </table:table-row>
        <table:table-row table:style-name="ro2">
          <table:table-cell office:value-type="string" calcext:value-type="string">
            <text:p>count_15</text:p>
          </table:table-cell>
          <table:table-cell table:style-name="ce198" table:formula="of:=[.L64]/[.B$8]" office:value-type="float" office:value="1284.87489733587" calcext:value-type="float">
            <text:p>1285</text:p>
          </table:table-cell>
          <table:table-cell table:style-name="ce198" table:formula="of:=[.M64]/[.C$8]" office:value-type="float" office:value="1244.79986991206" calcext:value-type="float">
            <text:p>1245</text:p>
          </table:table-cell>
          <table:table-cell table:style-name="ce198" table:formula="of:=[.N64]/[.D$8]" office:value-type="float" office:value="1238.84164648263" calcext:value-type="float">
            <text:p>1239</text:p>
          </table:table-cell>
          <table:table-cell table:style-name="ce198" table:formula="of:=[.O64]/[.E$8]" office:value-type="float" office:value="1245.44031391279" calcext:value-type="float">
            <text:p>1245</text:p>
          </table:table-cell>
          <table:table-cell table:style-name="ce198" table:formula="of:=[.P64]/[.F$8]" office:value-type="float" office:value="1202.88567717095" calcext:value-type="float">
            <text:p>1203</text:p>
          </table:table-cell>
          <table:table-cell table:style-name="ce76" table:formula="of:=AVERAGE([.B20:.F20])" office:value-type="float" office:value="1243.36848096286" calcext:value-type="float">
            <text:p>1243.4</text:p>
          </table:table-cell>
          <table:table-cell table:style-name="ce314" table:formula="of:=[.G20]*[.G$8]" office:value-type="float" office:value="29422.1031494584" calcext:value-type="float">
            <text:p>29422</text:p>
          </table:table-cell>
          <table:table-cell table:formula="of:=STDEVP([.B20:.F20])/[.G20]" office:value-type="percentage" office:value="0.0209371322864489" calcext:value-type="percentage">
            <text:p>2.1%</text:p>
          </table:table-cell>
          <table:table-cell table:style-name="ce212" table:formula="of:=IF([.H20]&gt;[.$A$43]; [.$C$43]; IF([.H20]&gt;[.$A$44]; [.$C$44]; IF([.H20]&gt;[.$A$45];[.$C$45];IF([.H20]&gt;[.$A$46];[.$C$46]; IF([.H20]&gt;[.$A$47];[.$C$47];IF([.H20]&gt;[.$A$48];[.$C$48];[.$C$49]))))))/100" office:value-type="percentage" office:value="0.11" calcext:value-type="percentage">
            <text:p>11.0%</text:p>
          </table:table-cell>
          <table:table-cell table:formula="of:=(MAX([.B20:.F20])-MIN([.B20:.F20]))/[.G20]" office:value-type="percentage" office:value="0.0659412084351877" calcext:value-type="percentage">
            <text:p>6.6%</text:p>
          </table:table-cell>
          <table:table-cell table:formula="of:=COUNTA([.B20:.F20])"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0" office:value-type="float" office:value="888.885234259955" calcext:value-type="float">
            <text:p>889</text:p>
          </table:table-cell>
          <table:table-cell table:style-name="ce89" table:number-columns-repeated="2"/>
          <table:table-cell table:style-name="ce16" table:number-columns-repeated="32"/>
        </table:table-row>
        <table:table-row table:style-name="ro2">
          <table:table-cell office:value-type="string" calcext:value-type="string">
            <text:p>count_16</text:p>
          </table:table-cell>
          <table:table-cell table:style-name="ce198" table:formula="of:=[.L65]/[.B$8]" office:value-type="float" office:value="1111.12274409003" calcext:value-type="float">
            <text:p>1111</text:p>
          </table:table-cell>
          <table:table-cell table:style-name="ce198" table:formula="of:=[.M65]/[.C$8]" office:value-type="float" office:value="1072.6001223744" calcext:value-type="float">
            <text:p>1073</text:p>
          </table:table-cell>
          <table:table-cell table:style-name="ce198" table:formula="of:=[.N65]/[.D$8]" office:value-type="float" office:value="1053.86191691672" calcext:value-type="float">
            <text:p>1054</text:p>
          </table:table-cell>
          <table:table-cell table:style-name="ce198" table:formula="of:=[.O65]/[.E$8]" office:value-type="float" office:value="1060.35810691401" calcext:value-type="float">
            <text:p>1060</text:p>
          </table:table-cell>
          <table:table-cell table:style-name="ce198" table:formula="of:=[.P65]/[.F$8]" office:value-type="float" office:value="1025.39709688608" calcext:value-type="float">
            <text:p>1025</text:p>
          </table:table-cell>
          <table:table-cell table:style-name="ce76" table:formula="of:=AVERAGE([.B21:.F21])" office:value-type="float" office:value="1064.66799743625" calcext:value-type="float">
            <text:p>1064.7</text:p>
          </table:table-cell>
          <table:table-cell table:style-name="ce314" table:formula="of:=[.G21]*[.G$8]" office:value-type="float" office:value="25193.4741149614" calcext:value-type="float">
            <text:p>25193</text:p>
          </table:table-cell>
          <table:table-cell table:formula="of:=STDEVP([.B21:.F21])/[.G21]" office:value-type="percentage" office:value="0.0262270986503449" calcext:value-type="percentage">
            <text:p>2.6%</text:p>
          </table:table-cell>
          <table:table-cell table:style-name="ce212" table:formula="of:=IF([.H21]&gt;[.$A$43]; [.$C$43]; IF([.H21]&gt;[.$A$44]; [.$C$44]; IF([.H21]&gt;[.$A$45];[.$C$45];IF([.H21]&gt;[.$A$46];[.$C$46]; IF([.H21]&gt;[.$A$47];[.$C$47];IF([.H21]&gt;[.$A$48];[.$C$48];[.$C$49]))))))/100" office:value-type="percentage" office:value="0.11" calcext:value-type="percentage">
            <text:p>11.0%</text:p>
          </table:table-cell>
          <table:table-cell table:formula="of:=(MAX([.B21:.F21])-MIN([.B21:.F21]))/[.G21]" office:value-type="percentage" office:value="0.0805186662982051" calcext:value-type="percentage">
            <text:p>8.1%</text:p>
          </table:table-cell>
          <table:table-cell table:formula="of:=COUNTA([.B21:.F21])"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0" office:value-type="float" office:value="1053.52886917467" calcext:value-type="float">
            <text:p>1054</text:p>
          </table:table-cell>
          <table:table-cell table:number-columns-repeated="2"/>
          <table:table-cell table:style-name="ce31" table:number-columns-repeated="2"/>
          <table:table-cell table:style-name="ce16" table:number-columns-repeated="30"/>
        </table:table-row>
        <table:table-row table:style-name="ro2">
          <table:table-cell office:value-type="string" calcext:value-type="string">
            <text:p>count_17</text:p>
          </table:table-cell>
          <table:table-cell table:style-name="ce198" table:formula="of:=[.L66]/[.B$8]" office:value-type="float" office:value="954.523046997953" calcext:value-type="float">
            <text:p>955</text:p>
          </table:table-cell>
          <table:table-cell table:style-name="ce198" table:formula="of:=[.M66]/[.C$8]" office:value-type="float" office:value="931.046092618864" calcext:value-type="float">
            <text:p>931</text:p>
          </table:table-cell>
          <table:table-cell table:style-name="ce198" table:formula="of:=[.N66]/[.D$8]" office:value-type="float" office:value="914.02978236351" calcext:value-type="float">
            <text:p>914</text:p>
          </table:table-cell>
          <table:table-cell table:style-name="ce198" table:formula="of:=[.O66]/[.E$8]" office:value-type="float" office:value="910.161598074142" calcext:value-type="float">
            <text:p>910</text:p>
          </table:table-cell>
          <table:table-cell table:style-name="ce198" table:formula="of:=[.P66]/[.F$8]" office:value-type="float" office:value="892.43671845463" calcext:value-type="float">
            <text:p>892</text:p>
          </table:table-cell>
          <table:table-cell table:style-name="ce76" table:formula="of:=AVERAGE([.B22:.F22])" office:value-type="float" office:value="920.43944770182" calcext:value-type="float">
            <text:p>920.4</text:p>
          </table:table-cell>
          <table:table-cell table:style-name="ce314" table:formula="of:=[.G22]*[.G$8]" office:value-type="float" office:value="21780.5620680861" calcext:value-type="float">
            <text:p>21781</text:p>
          </table:table-cell>
          <table:table-cell table:formula="of:=STDEVP([.B22:.F22])/[.G22]" office:value-type="percentage" office:value="0.0228155175844033" calcext:value-type="percentage">
            <text:p>2.3%</text:p>
          </table:table-cell>
          <table:table-cell table:style-name="ce212" table:formula="of:=IF([.H22]&gt;[.$A$43]; [.$C$43]; IF([.H22]&gt;[.$A$44]; [.$C$44]; IF([.H22]&gt;[.$A$45];[.$C$45];IF([.H22]&gt;[.$A$46];[.$C$46]; IF([.H22]&gt;[.$A$47];[.$C$47];IF([.H22]&gt;[.$A$48];[.$C$48];[.$C$49]))))))/100" office:value-type="percentage" office:value="0.11" calcext:value-type="percentage">
            <text:p>11.0%</text:p>
          </table:table-cell>
          <table:table-cell table:formula="of:=(MAX([.B22:.F22])-MIN([.B22:.F22]))/[.G22]" office:value-type="percentage" office:value="0.0674529201223845" calcext:value-type="percentage">
            <text:p>6.7%</text:p>
          </table:table-cell>
          <table:table-cell table:formula="of:=COUNTA([.B22:.F22])"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20" office:value-type="float" office:value="1248.66859680545" calcext:value-type="float">
            <text:p>1249</text:p>
          </table:table-cell>
          <table:table-cell table:style-name="ce16"/>
          <table:table-cell table:number-columns-repeated="3"/>
          <table:table-cell table:style-name="ce76" table:number-columns-repeated="30"/>
        </table:table-row>
        <table:table-row table:style-name="ro2">
          <table:table-cell office:value-type="string" calcext:value-type="string">
            <text:p>count_18</text:p>
          </table:table-cell>
          <table:table-cell table:style-name="ce198" table:formula="of:=[.L67]/[.B$8]" office:value-type="float" office:value="839.802074021536" calcext:value-type="float">
            <text:p>840</text:p>
          </table:table-cell>
          <table:table-cell table:style-name="ce198" table:formula="of:=[.M67]/[.C$8]" office:value-type="float" office:value="821.597100539844" calcext:value-type="float">
            <text:p>822</text:p>
          </table:table-cell>
          <table:table-cell table:style-name="ce198" table:formula="of:=[.N67]/[.D$8]" office:value-type="float" office:value="814.537860020718" calcext:value-type="float">
            <text:p>815</text:p>
          </table:table-cell>
          <table:table-cell table:style-name="ce198" table:formula="of:=[.O67]/[.E$8]" office:value-type="float" office:value="795.059683789347" calcext:value-type="float">
            <text:p>795</text:p>
          </table:table-cell>
          <table:table-cell table:style-name="ce198" table:formula="of:=[.P67]/[.F$8]" office:value-type="float" office:value="780.700062401905" calcext:value-type="float">
            <text:p>781</text:p>
          </table:table-cell>
          <table:table-cell table:style-name="ce76" table:formula="of:=AVERAGE([.B23:.F23])" office:value-type="float" office:value="810.33935615467" calcext:value-type="float">
            <text:p>810.3</text:p>
          </table:table-cell>
          <table:table-cell table:style-name="ce314" table:formula="of:=[.G23]*[.G$8]" office:value-type="float" office:value="19175.2392696857" calcext:value-type="float">
            <text:p>19175</text:p>
          </table:table-cell>
          <table:table-cell table:formula="of:=STDEVP([.B23:.F23])/[.G23]" office:value-type="percentage" office:value="0.0254368518927525" calcext:value-type="percentage">
            <text:p>2.5%</text:p>
          </table:table-cell>
          <table:table-cell table:style-name="ce212" table:formula="of:=IF([.H23]&gt;[.$A$43]; [.$C$43]; IF([.H23]&gt;[.$A$44]; [.$C$44]; IF([.H23]&gt;[.$A$45];[.$C$45];IF([.H23]&gt;[.$A$46];[.$C$46]; IF([.H23]&gt;[.$A$47];[.$C$47];IF([.H23]&gt;[.$A$48];[.$C$48];[.$C$49]))))))/100" office:value-type="percentage" office:value="0.11" calcext:value-type="percentage">
            <text:p>11.0%</text:p>
          </table:table-cell>
          <table:table-cell table:formula="of:=(MAX([.B23:.F23])-MIN([.B23:.F23]))/[.G23]" office:value-type="percentage" office:value="0.0729348897727112" calcext:value-type="percentage">
            <text:p>7.3%</text:p>
          </table:table-cell>
          <table:table-cell table:formula="of:=COUNTA([.B23:.F23])"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0" office:value-type="float" office:value="1479.95305137631" calcext:value-type="float">
            <text:p>1480</text:p>
          </table:table-cell>
          <table:table-cell table:number-columns-repeated="4"/>
          <table:table-cell table:style-name="ce21" table:number-columns-repeated="30"/>
        </table:table-row>
        <table:table-row table:style-name="ro2">
          <table:table-cell office:value-type="string" calcext:value-type="string">
            <text:p>count_19</text:p>
          </table:table-cell>
          <table:table-cell table:style-name="ce198" table:formula="of:=[.L68]/[.B$8]" office:value-type="float" office:value="739.560447148939" calcext:value-type="float">
            <text:p>740</text:p>
          </table:table-cell>
          <table:table-cell table:style-name="ce198" table:formula="of:=[.M68]/[.C$8]" office:value-type="float" office:value="731.953164170361" calcext:value-type="float">
            <text:p>732</text:p>
          </table:table-cell>
          <table:table-cell table:style-name="ce198" table:formula="of:=[.N68]/[.D$8]" office:value-type="float" office:value="723.19758677744" calcext:value-type="float">
            <text:p>723</text:p>
          </table:table-cell>
          <table:table-cell table:style-name="ce198" table:formula="of:=[.O68]/[.E$8]" office:value-type="float" office:value="700.011823536023" calcext:value-type="float">
            <text:p>700</text:p>
          </table:table-cell>
          <table:table-cell table:style-name="ce198" table:formula="of:=[.P68]/[.F$8]" office:value-type="float" office:value="693.932491500627" calcext:value-type="float">
            <text:p>694</text:p>
          </table:table-cell>
          <table:table-cell table:style-name="ce76" table:formula="of:=AVERAGE([.B24:.F24])" office:value-type="float" office:value="717.731102626678" calcext:value-type="float">
            <text:p>717.7</text:p>
          </table:table-cell>
          <table:table-cell table:style-name="ce314" table:formula="of:=[.G24]*[.G$8]" office:value-type="float" office:value="16983.8297000288" calcext:value-type="float">
            <text:p>16984</text:p>
          </table:table-cell>
          <table:table-cell table:formula="of:=STDEVP([.B24:.F24])/[.G24]" office:value-type="percentage" office:value="0.0248380465010892" calcext:value-type="percentage">
            <text:p>2.5%</text:p>
          </table:table-cell>
          <table:table-cell table:style-name="ce212" table:formula="of:=IF([.H24]&gt;[.$A$43]; [.$C$43]; IF([.H24]&gt;[.$A$44]; [.$C$44]; IF([.H24]&gt;[.$A$45];[.$C$45];IF([.H24]&gt;[.$A$46];[.$C$46]; IF([.H24]&gt;[.$A$47];[.$C$47];IF([.H24]&gt;[.$A$48];[.$C$48];[.$C$49]))))))/100" office:value-type="percentage" office:value="0.11" calcext:value-type="percentage">
            <text:p>11.0%</text:p>
          </table:table-cell>
          <table:table-cell table:formula="of:=(MAX([.B24:.F24])-MIN([.B24:.F24]))/[.G24]" office:value-type="percentage" office:value="0.0635724932099597" calcext:value-type="percentage">
            <text:p>6.4%</text:p>
          </table:table-cell>
          <table:table-cell table:formula="of:=COUNTA([.B24:.F24])"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0" office:value-type="float" office:value="1754.07713454278" calcext:value-type="float">
            <text:p>1754</text:p>
          </table:table-cell>
          <table:table-cell table:number-columns-repeated="4"/>
          <table:table-cell table:style-name="ce212" table:number-columns-repeated="30"/>
        </table:table-row>
        <table:table-row table:style-name="ro2">
          <table:table-cell office:value-type="string" calcext:value-type="string">
            <text:p>count_20</text:p>
          </table:table-cell>
          <table:table-cell table:style-name="ce198" table:formula="of:=[.L69]/[.B$8]" office:value-type="float" office:value="658.030590625893" calcext:value-type="float">
            <text:p>658</text:p>
          </table:table-cell>
          <table:table-cell table:style-name="ce198" table:formula="of:=[.M69]/[.C$8]" office:value-type="float" office:value="653.149889873467" calcext:value-type="float">
            <text:p>653</text:p>
          </table:table-cell>
          <table:table-cell table:style-name="ce198" table:formula="of:=[.N69]/[.D$8]" office:value-type="float" office:value="650.668811456119" calcext:value-type="float">
            <text:p>651</text:p>
          </table:table-cell>
          <table:table-cell table:style-name="ce198" table:formula="of:=[.O69]/[.E$8]" office:value-type="float" office:value="627.315877671942" calcext:value-type="float">
            <text:p>627</text:p>
          </table:table-cell>
          <table:table-cell table:style-name="ce198" table:formula="of:=[.P69]/[.F$8]" office:value-type="float" office:value="619.441387465478" calcext:value-type="float">
            <text:p>619</text:p>
          </table:table-cell>
          <table:table-cell table:style-name="ce76" table:formula="of:=AVERAGE([.B25:.F25])" office:value-type="float" office:value="641.72131141858" calcext:value-type="float">
            <text:p>641.7</text:p>
          </table:table-cell>
          <table:table-cell table:style-name="ce314" table:formula="of:=[.G25]*[.G$8]" office:value-type="float" office:value="15185.1932125077" calcext:value-type="float">
            <text:p>15185</text:p>
          </table:table-cell>
          <table:table-cell table:formula="of:=STDEVP([.B25:.F25])/[.G25]" office:value-type="percentage" office:value="0.0239450194883038" calcext:value-type="percentage">
            <text:p>2.4%</text:p>
          </table:table-cell>
          <table:table-cell table:style-name="ce212" table:formula="of:=IF([.H25]&gt;[.$A$43]; [.$C$43]; IF([.H25]&gt;[.$A$44]; [.$C$44]; IF([.H25]&gt;[.$A$45];[.$C$45];IF([.H25]&gt;[.$A$46];[.$C$46]; IF([.H25]&gt;[.$A$47];[.$C$47];IF([.H25]&gt;[.$A$48];[.$C$48];[.$C$49]))))))/100" office:value-type="percentage" office:value="0.11" calcext:value-type="percentage">
            <text:p>11.0%</text:p>
          </table:table-cell>
          <table:table-cell table:formula="of:=(MAX([.B25:.F25])-MIN([.B25:.F25]))/[.G25]" office:value-type="percentage" office:value="0.0601338968704512" calcext:value-type="percentage">
            <text:p>6.0%</text:p>
          </table:table-cell>
          <table:table-cell table:formula="of:=COUNTA([.B25:.F25])"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0" office:value-type="float" office:value="2078.97581012079" calcext:value-type="float">
            <text:p>2079</text:p>
          </table:table-cell>
          <table:table-cell table:number-columns-repeated="4"/>
          <table:table-cell table:style-name="ce21" table:number-columns-repeated="30"/>
        </table:table-row>
        <table:table-row table:style-name="ro2">
          <table:table-cell office:value-type="string" calcext:value-type="string">
            <text:p>count_21</text:p>
          </table:table-cell>
          <table:table-cell table:style-name="ce198" table:formula="of:=[.L70]/[.B$8]" office:value-type="float" office:value="600.781483723099" calcext:value-type="float">
            <text:p>601</text:p>
          </table:table-cell>
          <table:table-cell table:style-name="ce198" table:formula="of:=[.M70]/[.C$8]" office:value-type="float" office:value="594.568619827363" calcext:value-type="float">
            <text:p>595</text:p>
          </table:table-cell>
          <table:table-cell table:style-name="ce198" table:formula="of:=[.N70]/[.D$8]" office:value-type="float" office:value="593.816284403094" calcext:value-type="float">
            <text:p>594</text:p>
          </table:table-cell>
          <table:table-cell table:style-name="ce198" table:formula="of:=[.O70]/[.E$8]" office:value-type="float" office:value="568.824886746819" calcext:value-type="float">
            <text:p>569</text:p>
          </table:table-cell>
          <table:table-cell table:style-name="ce198" table:formula="of:=[.P70]/[.F$8]" office:value-type="float" office:value="560.139810230791" calcext:value-type="float">
            <text:p>560</text:p>
          </table:table-cell>
          <table:table-cell table:style-name="ce76" table:formula="of:=AVERAGE([.B26:.F26])" office:value-type="float" office:value="583.626216986233" calcext:value-type="float">
            <text:p>583.6</text:p>
          </table:table-cell>
          <table:table-cell table:style-name="ce314" table:formula="of:=[.G26]*[.G$8]" office:value-type="float" office:value="13810.4761539392" calcext:value-type="float">
            <text:p>13810</text:p>
          </table:table-cell>
          <table:table-cell table:formula="of:=STDEVP([.B26:.F26])/[.G26]" office:value-type="percentage" office:value="0.0275064024980761" calcext:value-type="percentage">
            <text:p>2.8%</text:p>
          </table:table-cell>
          <table:table-cell table:style-name="ce212" table:formula="of:=IF([.H26]&gt;[.$A$43]; [.$C$43]; IF([.H26]&gt;[.$A$44]; [.$C$44]; IF([.H26]&gt;[.$A$45];[.$C$45];IF([.H26]&gt;[.$A$46];[.$C$46]; IF([.H26]&gt;[.$A$47];[.$C$47];IF([.H26]&gt;[.$A$48];[.$C$48];[.$C$49]))))))/100" office:value-type="percentage" office:value="0.11" calcext:value-type="percentage">
            <text:p>11.0%</text:p>
          </table:table-cell>
          <table:table-cell table:formula="of:=(MAX([.B26:.F26])-MIN([.B26:.F26]))/[.G26]" office:value-type="percentage" office:value="0.0696364767542067" calcext:value-type="percentage">
            <text:p>7.0%</text:p>
          </table:table-cell>
          <table:table-cell table:formula="of:=COUNTA([.B26:.F26])"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0" office:value-type="float" office:value="2464.05379441539" calcext:value-type="float">
            <text:p>2464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count_22</text:p>
          </table:table-cell>
          <table:table-cell table:style-name="ce198" table:formula="of:=[.L71]/[.B$8]" office:value-type="float" office:value="551.551706970112" calcext:value-type="float">
            <text:p>552</text:p>
          </table:table-cell>
          <table:table-cell table:style-name="ce198" table:formula="of:=[.M71]/[.C$8]" office:value-type="float" office:value="537.446669675645" calcext:value-type="float">
            <text:p>537</text:p>
          </table:table-cell>
          <table:table-cell table:style-name="ce198" table:formula="of:=[.N71]/[.D$8]" office:value-type="float" office:value="545.533439736739" calcext:value-type="float">
            <text:p>546</text:p>
          </table:table-cell>
          <table:table-cell table:style-name="ce198" table:formula="of:=[.O71]/[.E$8]" office:value-type="float" office:value="517.854166083498" calcext:value-type="float">
            <text:p>518</text:p>
          </table:table-cell>
          <table:table-cell table:style-name="ce198" table:formula="of:=[.P71]/[.F$8]" office:value-type="float" office:value="507.912807122348" calcext:value-type="float">
            <text:p>508</text:p>
          </table:table-cell>
          <table:table-cell table:style-name="ce76" table:formula="of:=AVERAGE([.B27:.F27])" office:value-type="float" office:value="532.059757917669" calcext:value-type="float">
            <text:p>532.1</text:p>
          </table:table-cell>
          <table:table-cell table:style-name="ce314" table:formula="of:=[.G27]*[.G$8]" office:value-type="float" office:value="12590.2476368123" calcext:value-type="float">
            <text:p>12590</text:p>
          </table:table-cell>
          <table:table-cell table:formula="of:=STDEVP([.B27:.F27])/[.G27]" office:value-type="percentage" office:value="0.0311719673051439" calcext:value-type="percentage">
            <text:p>3.1%</text:p>
          </table:table-cell>
          <table:table-cell table:style-name="ce212" table:formula="of:=IF([.H27]&gt;[.$A$43]; [.$C$43]; IF([.H27]&gt;[.$A$44]; [.$C$44]; IF([.H27]&gt;[.$A$45];[.$C$45];IF([.H27]&gt;[.$A$46];[.$C$46]; IF([.H27]&gt;[.$A$47];[.$C$47];IF([.H27]&gt;[.$A$48];[.$C$48];[.$C$49]))))))/100" office:value-type="percentage" office:value="0.11" calcext:value-type="percentage">
            <text:p>11.0%</text:p>
          </table:table-cell>
          <table:table-cell table:formula="of:=(MAX([.B27:.F27])-MIN([.B27:.F27]))/[.G27]" office:value-type="percentage" office:value="0.0820187943146728" calcext:value-type="percentage">
            <text:p>8.2%</text:p>
          </table:table-cell>
          <table:table-cell table:formula="of:=COUNTA([.B27:.F27])" office:value-type="float" office:value="5" calcext:value-type="float">
            <text:p>5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0" office:value-type="float" office:value="2920.45779090624" calcext:value-type="float">
            <text:p>292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count_23</text:p>
          </table:table-cell>
          <table:table-cell table:style-name="ce198" table:formula="of:=[.L72]/[.B$8]" office:value-type="float" office:value="493.634322554834" calcext:value-type="float">
            <text:p>494</text:p>
          </table:table-cell>
          <table:table-cell table:style-name="ce198" table:formula="of:=[.M72]/[.C$8]" office:value-type="float" office:value="479.907770982675" calcext:value-type="float">
            <text:p>480</text:p>
          </table:table-cell>
          <table:table-cell table:style-name="ce198" table:formula="of:=[.N72]/[.D$8]" office:value-type="float" office:value="486.172712960788" calcext:value-type="float">
            <text:p>486</text:p>
          </table:table-cell>
          <table:table-cell table:style-name="ce198" table:formula="of:=[.O72]/[.E$8]" office:value-type="float" office:value="453.931868858185" calcext:value-type="float">
            <text:p>454</text:p>
          </table:table-cell>
          <table:table-cell table:style-name="ce198" table:formula="of:=[.P72]/[.F$8]" office:value-type="float" office:value="447.77892704928" calcext:value-type="float">
            <text:p>448</text:p>
          </table:table-cell>
          <table:table-cell table:style-name="ce76" table:formula="of:=AVERAGE([.B28:.F28])" office:value-type="float" office:value="472.285120481152" calcext:value-type="float">
            <text:p>472.3</text:p>
          </table:table-cell>
          <table:table-cell table:style-name="ce314" table:formula="of:=[.G28]*[.G$8]" office:value-type="float" office:value="11175.7871809571" calcext:value-type="float">
            <text:p>11176</text:p>
          </table:table-cell>
          <table:table-cell table:formula="of:=STDEVP([.B28:.F28])/[.G28]" office:value-type="percentage" office:value="0.0383956440706521" calcext:value-type="percentage">
            <text:p>3.8%</text:p>
          </table:table-cell>
          <table:table-cell table:style-name="ce212" table:formula="of:=IF([.H28]&gt;[.$A$43]; [.$C$43]; IF([.H28]&gt;[.$A$44]; [.$C$44]; IF([.H28]&gt;[.$A$45];[.$C$45];IF([.H28]&gt;[.$A$46];[.$C$46]; IF([.H28]&gt;[.$A$47];[.$C$47];IF([.H28]&gt;[.$A$48];[.$C$48];[.$C$49]))))))/100" office:value-type="percentage" office:value="0.11" calcext:value-type="percentage">
            <text:p>11.0%</text:p>
          </table:table-cell>
          <table:table-cell table:formula="of:=(MAX([.B28:.F28])-MIN([.B28:.F28]))/[.G28]" office:value-type="percentage" office:value="0.0970926110457113" calcext:value-type="percentage">
            <text:p>9.7%</text:p>
          </table:table-cell>
          <table:table-cell table:formula="of:=COUNTA([.B28:.F28])"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0" office:value-type="float" office:value="3461.3991495622" calcext:value-type="float">
            <text:p>3461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count_24</text:p>
          </table:table-cell>
          <table:table-cell table:style-name="ce198" table:formula="of:=[.L73]/[.B$8]" office:value-type="float" office:value="421.90586954822" calcext:value-type="float">
            <text:p>422</text:p>
          </table:table-cell>
          <table:table-cell table:style-name="ce198" table:formula="of:=[.M73]/[.C$8]" office:value-type="float" office:value="397.768908355753" calcext:value-type="float">
            <text:p>398</text:p>
          </table:table-cell>
          <table:table-cell table:style-name="ce198" table:formula="of:=[.N73]/[.D$8]" office:value-type="float" office:value="411.762787847271" calcext:value-type="float">
            <text:p>412</text:p>
          </table:table-cell>
          <table:table-cell table:style-name="ce198" table:formula="of:=[.O73]/[.E$8]" office:value-type="float" office:value="387.293918482777" calcext:value-type="float">
            <text:p>387</text:p>
          </table:table-cell>
          <table:table-cell table:style-name="ce198" table:formula="of:=[.P73]/[.F$8]" office:value-type="float" office:value="378.28164004442" calcext:value-type="float">
            <text:p>378</text:p>
          </table:table-cell>
          <table:table-cell table:style-name="ce76" table:formula="of:=AVERAGE([.B29:.F29])" office:value-type="float" office:value="399.402624855688" calcext:value-type="float">
            <text:p>399.4</text:p>
          </table:table-cell>
          <table:table-cell table:style-name="ce314" table:formula="of:=[.G29]*[.G$8]" office:value-type="float" office:value="9451.15257994024" calcext:value-type="float">
            <text:p>9451</text:p>
          </table:table-cell>
          <table:table-cell table:formula="of:=STDEVP([.B29:.F29])/[.G29]" office:value-type="percentage" office:value="0.0396596624761095" calcext:value-type="percentage">
            <text:p>4.0%</text:p>
          </table:table-cell>
          <table:table-cell table:style-name="ce212" table:formula="of:=IF([.H29]&gt;[.$A$43]; [.$C$43]; IF([.H29]&gt;[.$A$44]; [.$C$44]; IF([.H29]&gt;[.$A$45];[.$C$45];IF([.H29]&gt;[.$A$46];[.$C$46]; IF([.H29]&gt;[.$A$47];[.$C$47];IF([.H29]&gt;[.$A$48];[.$C$48];[.$C$49]))))))/100" office:value-type="percentage" office:value="0.113" calcext:value-type="percentage">
            <text:p>11.3%</text:p>
          </table:table-cell>
          <table:table-cell table:formula="of:=(MAX([.B29:.F29])-MIN([.B29:.F29]))/[.G29]" office:value-type="percentage" office:value="0.109223692557259" calcext:value-type="percentage">
            <text:p>10.9%</text:p>
          </table:table-cell>
          <table:table-cell table:formula="of:=COUNTA([.B29:.F29])"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0" office:value-type="float" office:value="4102.5362906793" calcext:value-type="float">
            <text:p>4103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count_25</text:p>
          </table:table-cell>
          <table:table-cell table:style-name="ce198" table:formula="of:=[.L74]/[.B$8]" office:value-type="float" office:value="328.347017800463" calcext:value-type="float">
            <text:p>328</text:p>
          </table:table-cell>
          <table:table-cell table:style-name="ce198" table:formula="of:=[.M74]/[.C$8]" office:value-type="float" office:value="307.916497715643" calcext:value-type="float">
            <text:p>308</text:p>
          </table:table-cell>
          <table:table-cell table:style-name="ce198" table:formula="of:=[.N74]/[.D$8]" office:value-type="float" office:value="323.975797544807" calcext:value-type="float">
            <text:p>324</text:p>
          </table:table-cell>
          <table:table-cell table:style-name="ce198" table:formula="of:=[.O74]/[.E$8]" office:value-type="float" office:value="299.557432095093" calcext:value-type="float">
            <text:p>300</text:p>
          </table:table-cell>
          <table:table-cell table:style-name="ce198" table:formula="of:=[.P74]/[.F$8]" office:value-type="float" office:value="297.756340431004" calcext:value-type="float">
            <text:p>298</text:p>
          </table:table-cell>
          <table:table-cell table:style-name="ce76" table:formula="of:=AVERAGE([.B30:.F30])" office:value-type="float" office:value="311.510617117402" calcext:value-type="float">
            <text:p>311.5</text:p>
          </table:table-cell>
          <table:table-cell table:style-name="ce314" table:formula="of:=[.G30]*[.G$8]" office:value-type="float" office:value="7371.34457669547" calcext:value-type="float">
            <text:p>7371</text:p>
          </table:table-cell>
          <table:table-cell table:formula="of:=STDEVP([.B30:.F30])/[.G30]" office:value-type="percentage" office:value="0.0401930301183765" calcext:value-type="percentage">
            <text:p>4.0%</text:p>
          </table:table-cell>
          <table:table-cell table:style-name="ce212" table:formula="of:=IF([.H30]&gt;[.$A$43]; [.$C$43]; IF([.H30]&gt;[.$A$44]; [.$C$44]; IF([.H30]&gt;[.$A$45];[.$C$45];IF([.H30]&gt;[.$A$46];[.$C$46]; IF([.H30]&gt;[.$A$47];[.$C$47];IF([.H30]&gt;[.$A$48];[.$C$48];[.$C$49]))))))/100" office:value-type="percentage" office:value="0.113" calcext:value-type="percentage">
            <text:p>11.3%</text:p>
          </table:table-cell>
          <table:table-cell table:formula="of:=(MAX([.B30:.F30])-MIN([.B30:.F30]))/[.G30]" office:value-type="percentage" office:value="0.0982010746617016" calcext:value-type="percentage">
            <text:p>9.8%</text:p>
          </table:table-cell>
          <table:table-cell table:formula="of:=COUNTA([.B30:.F30])"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0" office:value-type="float" office:value="4862.427963117" calcext:value-type="float">
            <text:p>4862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count_26</text:p>
          </table:table-cell>
          <table:table-cell table:style-name="ce198" table:formula="of:=[.L75]/[.B$8]" office:value-type="float" office:value="240.357145323405" calcext:value-type="float">
            <text:p>240</text:p>
          </table:table-cell>
          <table:table-cell table:style-name="ce198" table:formula="of:=[.M75]/[.C$8]" office:value-type="float" office:value="224.318315194335" calcext:value-type="float">
            <text:p>224</text:p>
          </table:table-cell>
          <table:table-cell table:style-name="ce198" table:formula="of:=[.N75]/[.D$8]" office:value-type="float" office:value="236.188807242343" calcext:value-type="float">
            <text:p>236</text:p>
          </table:table-cell>
          <table:table-cell table:style-name="ce198" table:formula="of:=[.O75]/[.E$8]" office:value-type="float" office:value="208.896396161153" calcext:value-type="float">
            <text:p>209</text:p>
          </table:table-cell>
          <table:table-cell table:style-name="ce198" table:formula="of:=[.P75]/[.F$8]" office:value-type="float" office:value="208.908012433772" calcext:value-type="float">
            <text:p>209</text:p>
          </table:table-cell>
          <table:table-cell table:style-name="ce76" table:formula="of:=AVERAGE([.B31:.F31])" office:value-type="float" office:value="223.733735271001" calcext:value-type="float">
            <text:p>223.7</text:p>
          </table:table-cell>
          <table:table-cell table:style-name="ce314" table:formula="of:=[.G31]*[.G$8]" office:value-type="float" office:value="5294.2608228732" calcext:value-type="float">
            <text:p>5294</text:p>
          </table:table-cell>
          <table:table-cell table:formula="of:=STDEVP([.B31:.F31])/[.G31]" office:value-type="percentage" office:value="0.0590175595457107" calcext:value-type="percentage">
            <text:p>5.9%</text:p>
          </table:table-cell>
          <table:table-cell table:style-name="ce212" table:formula="of:=IF([.H31]&gt;[.$A$43]; [.$C$43]; IF([.H31]&gt;[.$A$44]; [.$C$44]; IF([.H31]&gt;[.$A$45];[.$C$45];IF([.H31]&gt;[.$A$46];[.$C$46]; IF([.H31]&gt;[.$A$47];[.$C$47];IF([.H31]&gt;[.$A$48];[.$C$48];[.$C$49]))))))/100" office:value-type="percentage" office:value="0.113" calcext:value-type="percentage">
            <text:p>11.3%</text:p>
          </table:table-cell>
          <table:table-cell table:formula="of:=(MAX([.B31:.F31])-MIN([.B31:.F31]))/[.G31]" office:value-type="percentage" office:value="0.140616921825155" calcext:value-type="percentage">
            <text:p>14.1%</text:p>
          </table:table-cell>
          <table:table-cell table:formula="of:=COUNTA([.B31:.F31])"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20" office:value-type="float" office:value="5763.07045722374" calcext:value-type="float">
            <text:p>5763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count_27</text:p>
          </table:table-cell>
          <table:table-cell table:style-name="ce198" table:formula="of:=[.L76]/[.B$8]" office:value-type="float" office:value="162.614194704435" calcext:value-type="float">
            <text:p>163</text:p>
          </table:table-cell>
          <table:table-cell table:style-name="ce198" table:formula="of:=[.M76]/[.C$8]" office:value-type="float" office:value="153.437063181255" calcext:value-type="float">
            <text:p>153</text:p>
          </table:table-cell>
          <table:table-cell table:style-name="ce198" table:formula="of:=[.N76]/[.D$8]" office:value-type="float" office:value="169.094464654031" calcext:value-type="float">
            <text:p>169</text:p>
          </table:table-cell>
          <table:table-cell table:style-name="ce198" table:formula="of:=[.O76]/[.E$8]" office:value-type="float" office:value="145.182995332001" calcext:value-type="float">
            <text:p>145</text:p>
          </table:table-cell>
          <table:table-cell table:style-name="ce198" table:formula="of:=[.P76]/[.F$8]" office:value-type="float" office:value="146.069148135964" calcext:value-type="float">
            <text:p>146</text:p>
          </table:table-cell>
          <table:table-cell table:style-name="ce76" table:formula="of:=AVERAGE([.B32:.F32])" office:value-type="float" office:value="155.279573201537" calcext:value-type="float">
            <text:p>155.3</text:p>
          </table:table-cell>
          <table:table-cell table:style-name="ce314" table:formula="of:=[.G32]*[.G$8]" office:value-type="float" office:value="3674.41485745366" calcext:value-type="float">
            <text:p>3674</text:p>
          </table:table-cell>
          <table:table-cell table:formula="of:=STDEVP([.B32:.F32])/[.G32]" office:value-type="percentage" office:value="0.0600555578933015" calcext:value-type="percentage">
            <text:p>6.0%</text:p>
          </table:table-cell>
          <table:table-cell table:style-name="ce212" table:formula="of:=IF([.H32]&gt;[.$A$43]; [.$C$43]; IF([.H32]&gt;[.$A$44]; [.$C$44]; IF([.H32]&gt;[.$A$45];[.$C$45];IF([.H32]&gt;[.$A$46];[.$C$46]; IF([.H32]&gt;[.$A$47];[.$C$47];IF([.H32]&gt;[.$A$48];[.$C$48];[.$C$49]))))))/100" office:value-type="percentage" office:value="0.119" calcext:value-type="percentage">
            <text:p>11.9%</text:p>
          </table:table-cell>
          <table:table-cell table:formula="of:=(MAX([.B32:.F32])-MIN([.B32:.F32]))/[.G32]" office:value-type="percentage" office:value="0.153989792920126" calcext:value-type="percentage">
            <text:p>15.4%</text:p>
          </table:table-cell>
          <table:table-cell table:formula="of:=COUNTA([.B32:.F32])" office:value-type="float" office:value="5" calcext:value-type="float">
            <text:p>5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0" office:value-type="float" office:value="6830.53432294641" calcext:value-type="float">
            <text:p>6831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count_28</text:p>
          </table:table-cell>
          <table:table-cell table:style-name="ce198" table:formula="of:=[.L77]/[.B$8]" office:value-type="float" office:value="118.062360538837" calcext:value-type="float">
            <text:p>118</text:p>
          </table:table-cell>
          <table:table-cell table:style-name="ce198" table:formula="of:=[.M77]/[.C$8]" office:value-type="float" office:value="104.445609583979" calcext:value-type="float">
            <text:p>104</text:p>
          </table:table-cell>
          <table:table-cell table:style-name="ce198" table:formula="of:=[.N77]/[.D$8]" office:value-type="float" office:value="115.586203898244" calcext:value-type="float">
            <text:p>116</text:p>
          </table:table-cell>
          <table:table-cell table:style-name="ce198" table:formula="of:=[.O77]/[.E$8]" office:value-type="float" office:value="106.95495483451" calcext:value-type="float">
            <text:p>107</text:p>
          </table:table-cell>
          <table:table-cell table:style-name="ce198" table:formula="of:=[.P77]/[.F$8]" office:value-type="float" office:value="100.500567734574" calcext:value-type="float">
            <text:p>101</text:p>
          </table:table-cell>
          <table:table-cell table:style-name="ce76" table:formula="of:=AVERAGE([.B33:.F33])" office:value-type="float" office:value="109.109939318029" calcext:value-type="float">
            <text:p>109.1</text:p>
          </table:table-cell>
          <table:table-cell table:style-name="ce314" table:formula="of:=[.G33]*[.G$8]" office:value-type="float" office:value="2581.8926073791" calcext:value-type="float">
            <text:p>2582</text:p>
          </table:table-cell>
          <table:table-cell table:formula="of:=STDEVP([.B33:.F33])/[.G33]" office:value-type="percentage" office:value="0.0611536099942743" calcext:value-type="percentage">
            <text:p>6.1%</text:p>
          </table:table-cell>
          <table:table-cell table:style-name="ce212" table:formula="of:=IF([.H33]&gt;[.$A$43]; [.$C$43]; IF([.H33]&gt;[.$A$44]; [.$C$44]; IF([.H33]&gt;[.$A$45];[.$C$45];IF([.H33]&gt;[.$A$46];[.$C$46]; IF([.H33]&gt;[.$A$47];[.$C$47];IF([.H33]&gt;[.$A$48];[.$C$48];[.$C$49]))))))/100" office:value-type="percentage" office:value="0.119" calcext:value-type="percentage">
            <text:p>11.9%</text:p>
          </table:table-cell>
          <table:table-cell table:formula="of:=(MAX([.B33:.F33])-MIN([.B33:.F33]))/[.G33]" office:value-type="percentage" office:value="0.160955023108158" calcext:value-type="percentage">
            <text:p>16.1%</text:p>
          </table:table-cell>
          <table:table-cell table:formula="of:=COUNTA([.B33:.F33])" office:value-type="float" office:value="5" calcext:value-type="float">
            <text:p>5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0" office:value-type="float" office:value="8095.71902395668" calcext:value-type="float">
            <text:p>8096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count_29</text:p>
          </table:table-cell>
          <table:table-cell table:style-name="ce198" table:formula="of:=[.L78]/[.B$8]" office:value-type="float" office:value="83.7574482313256" calcext:value-type="float">
            <text:p>84</text:p>
          </table:table-cell>
          <table:table-cell table:style-name="ce198" table:formula="of:=[.M78]/[.C$8]" office:value-type="float" office:value="72.5490461780933" calcext:value-type="float">
            <text:p>73</text:p>
          </table:table-cell>
          <table:table-cell table:style-name="ce198" table:formula="of:=[.N78]/[.D$8]" office:value-type="float" office:value="82.5615742130314" calcext:value-type="float">
            <text:p>83</text:p>
          </table:table-cell>
          <table:table-cell table:style-name="ce198" table:formula="of:=[.O78]/[.E$8]" office:value-type="float" office:value="77.7094593719488" calcext:value-type="float">
            <text:p>78</text:p>
          </table:table-cell>
          <table:table-cell table:style-name="ce198" table:formula="of:=[.P78]/[.F$8]" office:value-type="float" office:value="68.0407570376927" calcext:value-type="float">
            <text:p>68</text:p>
          </table:table-cell>
          <table:table-cell table:style-name="ce76" table:formula="of:=AVERAGE([.B34:.F34])" office:value-type="float" office:value="76.9236570064184" calcext:value-type="float">
            <text:p>76.9</text:p>
          </table:table-cell>
          <table:table-cell table:style-name="ce314" table:formula="of:=[.G34]*[.G$8]" office:value-type="float" office:value="1820.26149587108" calcext:value-type="float">
            <text:p>1820</text:p>
          </table:table-cell>
          <table:table-cell table:formula="of:=STDEVP([.B34:.F34])/[.G34]" office:value-type="percentage" office:value="0.0773788913776539" calcext:value-type="percentage">
            <text:p>7.7%</text:p>
          </table:table-cell>
          <table:table-cell table:style-name="ce212" table:formula="of:=IF([.H34]&gt;[.$A$43]; [.$C$43]; IF([.H34]&gt;[.$A$44]; [.$C$44]; IF([.H34]&gt;[.$A$45];[.$C$45];IF([.H34]&gt;[.$A$46];[.$C$46]; IF([.H34]&gt;[.$A$47];[.$C$47];IF([.H34]&gt;[.$A$48];[.$C$48];[.$C$49]))))))/100" office:value-type="percentage" office:value="0.134" calcext:value-type="percentage">
            <text:p>13.4%</text:p>
          </table:table-cell>
          <table:table-cell table:formula="of:=(MAX([.B34:.F34])-MIN([.B34:.F34]))/[.G34]" office:value-type="percentage" office:value="0.204315444757411" calcext:value-type="percentage">
            <text:p>20.4%</text:p>
          </table:table-cell>
          <table:table-cell table:formula="of:=COUNTA([.B34:.F34])" office:value-type="float" office:value="5" calcext:value-type="float">
            <text:p>5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0" office:value-type="float" office:value="9595.24737247533" calcext:value-type="float">
            <text:p>9595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count_30</text:p>
          </table:table-cell>
          <table:table-cell table:style-name="ce198" table:formula="of:=[.L79]/[.B$8]" office:value-type="float" office:value="61.2587719776982" calcext:value-type="float">
            <text:p>61</text:p>
          </table:table-cell>
          <table:table-cell table:style-name="ce198" table:formula="of:=[.M79]/[.C$8]" office:value-type="float" office:value="54.2033103629433" calcext:value-type="float">
            <text:p>54</text:p>
          </table:table-cell>
          <table:table-cell table:style-name="ce198" table:formula="of:=[.N79]/[.D$8]" office:value-type="float" office:value="61.659909855302" calcext:value-type="float">
            <text:p>62</text:p>
          </table:table-cell>
          <table:table-cell table:style-name="ce198" table:formula="of:=[.O79]/[.E$8]" office:value-type="float" office:value="53.4774774172551" calcext:value-type="float">
            <text:p>53</text:p>
          </table:table-cell>
          <table:table-cell table:style-name="ce198" table:formula="of:=[.P79]/[.F$8]" office:value-type="float" office:value="49.1058674645122" calcext:value-type="float">
            <text:p>49</text:p>
          </table:table-cell>
          <table:table-cell table:style-name="ce76" table:formula="of:=AVERAGE([.B35:.F35])" office:value-type="float" office:value="55.9410674155422" calcext:value-type="float">
            <text:p>55.9</text:p>
          </table:table-cell>
          <table:table-cell table:style-name="ce314" table:formula="of:=[.G35]*[.G$8]" office:value-type="float" office:value="1323.74584122987" calcext:value-type="float">
            <text:p>1324</text:p>
          </table:table-cell>
          <table:table-cell table:formula="of:=STDEVP([.B35:.F35])/[.G35]" office:value-type="percentage" office:value="0.0863954996717247" calcext:value-type="percentage">
            <text:p>8.6%</text:p>
          </table:table-cell>
          <table:table-cell table:style-name="ce212" table:formula="of:=IF([.H35]&gt;[.$A$43]; [.$C$43]; IF([.H35]&gt;[.$A$44]; [.$C$44]; IF([.H35]&gt;[.$A$45];[.$C$45];IF([.H35]&gt;[.$A$46];[.$C$46]; IF([.H35]&gt;[.$A$47];[.$C$47];IF([.H35]&gt;[.$A$48];[.$C$48];[.$C$49]))))))/100" office:value-type="percentage" office:value="0.134" calcext:value-type="percentage">
            <text:p>13.4%</text:p>
          </table:table-cell>
          <table:table-cell table:formula="of:=(MAX([.B35:.F35])-MIN([.B35:.F35]))/[.G35]" office:value-type="percentage" office:value="0.224415495999311" calcext:value-type="percentage">
            <text:p>22.4%</text:p>
          </table:table-cell>
          <table:table-cell table:formula="of:=COUNTA([.B35:.F35])"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0" office:value-type="float" office:value="11372.5256356535" calcext:value-type="float">
            <text:p>11373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count_38</text:p>
          </table:table-cell>
          <table:table-cell table:style-name="ce198" table:formula="of:=[.L80]/[.B$8]" office:value-type="float" office:value="12.9200319080236" calcext:value-type="float">
            <text:p>13</text:p>
          </table:table-cell>
          <table:table-cell table:style-name="ce198" table:formula="of:=[.M80]/[.C$8]" office:value-type="float" office:value="10.4237135313352" calcext:value-type="float">
            <text:p>10</text:p>
          </table:table-cell>
          <table:table-cell table:style-name="ce198" table:formula="of:=[.N80]/[.D$8]" office:value-type="float" office:value="10.8688654660193" calcext:value-type="float">
            <text:p>11</text:p>
          </table:table-cell>
          <table:table-cell table:style-name="ce198" table:formula="of:=[.O80]/[.E$8]" office:value-type="float" office:value="8.35585584644611" calcext:value-type="float">
            <text:p>8</text:p>
          </table:table-cell>
          <table:table-cell table:style-name="ce198" table:formula="of:=[.P80]/[.F$8]" office:value-type="float" office:value="7.69880125502945" calcext:value-type="float">
            <text:p>8</text:p>
          </table:table-cell>
          <table:table-cell table:style-name="ce76" table:formula="of:=AVERAGE([.B36:.F36])" office:value-type="float" office:value="10.0534536013708" calcext:value-type="float">
            <text:p>10.1</text:p>
          </table:table-cell>
          <table:table-cell table:style-name="ce314" table:formula="of:=[.G36]*[.G$8]" office:value-type="float" office:value="237.897094382482" calcext:value-type="float">
            <text:p>238</text:p>
          </table:table-cell>
          <table:table-cell table:formula="of:=STDEVP([.B36:.F36])/[.G36]" office:value-type="percentage" office:value="0.185798094330369" calcext:value-type="percentage">
            <text:p>18.6%</text:p>
          </table:table-cell>
          <table:table-cell table:style-name="ce212" table:formula="of:=IF([.H36]&gt;[.$A$43]; [.$C$43]; IF([.H36]&gt;[.$A$44]; [.$C$44]; IF([.H36]&gt;[.$A$45];[.$C$45];IF([.H36]&gt;[.$A$46];[.$C$46]; IF([.H36]&gt;[.$A$47];[.$C$47];IF([.H36]&gt;[.$A$48];[.$C$48];[.$C$49]))))))/100" office:value-type="percentage" office:value="0.193" calcext:value-type="percentage">
            <text:p>19.3%</text:p>
          </table:table-cell>
          <table:table-cell table:formula="of:=(MAX([.B36:.F36])-MIN([.B36:.F36]))/[.G36]" office:value-type="percentage" office:value="0.519346968715535" calcext:value-type="percentage">
            <text:p>51.9%</text:p>
          </table:table-cell>
          <table:table-cell table:formula="of:=COUNTA([.B36:.F36])"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20" office:value-type="float" office:value="13479" calcext:value-type="float">
            <text:p>13479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count_50</text:p>
          </table:table-cell>
          <table:table-cell table:style-name="ce198" table:formula="of:=[.L81]/[.B$8]" office:value-type="float" office:value="8.01933014980777" calcext:value-type="float">
            <text:p>8</text:p>
          </table:table-cell>
          <table:table-cell table:style-name="ce198" table:formula="of:=[.M81]/[.C$8]" office:value-type="float" office:value="4.79490822441421" calcext:value-type="float">
            <text:p>5</text:p>
          </table:table-cell>
          <table:table-cell table:style-name="ce198" table:formula="of:=[.N81]/[.D$8]" office:value-type="float" office:value="6.27049930731884" calcext:value-type="float">
            <text:p>6</text:p>
          </table:table-cell>
          <table:table-cell table:style-name="ce198" table:formula="of:=[.O81]/[.E$8]" office:value-type="float" office:value="5.22240990402882" calcext:value-type="float">
            <text:p>5</text:p>
          </table:table-cell>
          <table:table-cell table:style-name="ce198" table:formula="of:=[.P81]/[.F$8]" office:value-type="float" office:value="4.16151419190781" calcext:value-type="float">
            <text:p>4</text:p>
          </table:table-cell>
          <table:table-cell table:style-name="ce76" table:formula="of:=AVERAGE([.B37:.F37])" office:value-type="float" office:value="5.69373235549549" calcext:value-type="float">
            <text:p>5.7</text:p>
          </table:table-cell>
          <table:table-cell table:style-name="ce314" table:formula="of:=[.G37]*[.G$8]" office:value-type="float" office:value="134.73204704294" calcext:value-type="float">
            <text:p>135</text:p>
          </table:table-cell>
          <table:table-cell table:formula="of:=STDEVP([.B37:.F37])/[.G37]" office:value-type="percentage" office:value="0.237184603699363" calcext:value-type="percentage">
            <text:p>23.7%</text:p>
          </table:table-cell>
          <table:table-cell table:style-name="ce212" table:formula="of:=IF([.H37]&gt;[.$A$43]; [.$C$43]; IF([.H37]&gt;[.$A$44]; [.$C$44]; IF([.H37]&gt;[.$A$45];[.$C$45];IF([.H37]&gt;[.$A$46];[.$C$46]; IF([.H37]&gt;[.$A$47];[.$C$47];IF([.H37]&gt;[.$A$48];[.$C$48];[.$C$49]))))))/100" office:value-type="percentage" office:value="0.275" calcext:value-type="percentage">
            <text:p>27.5%</text:p>
          </table:table-cell>
          <table:table-cell table:formula="of:=(MAX([.B37:.F37])-MIN([.B37:.F37]))/[.G37]" office:value-type="percentage" office:value="0.677554847511661" calcext:value-type="percentage">
            <text:p>67.8%</text:p>
          </table:table-cell>
          <table:table-cell table:formula="of:=COUNTA([.B37:.F37])" office:value-type="float" office:value="5" calcext:value-type="float">
            <text:p>5</text:p>
          </table:table-cell>
          <table:table-cell/>
          <table:table-cell office:value-type="float" office:value="29" calcext:value-type="float">
            <text:p>29</text:p>
          </table:table-cell>
          <table:table-cell table:style-name="Default"/>
          <table:table-cell table:number-columns-repeated="34"/>
        </table:table-row>
        <table:table-row table:style-name="ro2">
          <table:table-cell office:value-type="string" calcext:value-type="string">
            <text:p>count_70</text:p>
          </table:table-cell>
          <table:table-cell table:style-name="ce198" table:formula="of:=[.L82]/[.B$8]" office:value-type="float" office:value="3.3413875624199" calcext:value-type="float">
            <text:p>3</text:p>
          </table:table-cell>
          <table:table-cell table:style-name="ce198" table:formula="of:=[.M82]/[.C$8]" office:value-type="float" office:value="1.87626843564034" calcext:value-type="float">
            <text:p>2</text:p>
          </table:table-cell>
          <table:table-cell table:style-name="ce198" table:formula="of:=[.N82]/[.D$8]" office:value-type="float" office:value="1.88114979219565" calcext:value-type="float">
            <text:p>2</text:p>
          </table:table-cell>
          <table:table-cell table:style-name="ce198" table:formula="of:=[.O82]/[.E$8]" office:value-type="float" office:value="2.08896396161153" calcext:value-type="float">
            <text:p>2</text:p>
          </table:table-cell>
          <table:table-cell table:style-name="ce198" table:formula="of:=[.P82]/[.F$8]" office:value-type="float" office:value="0.416151419190781" calcext:value-type="float">
            <text:p>0</text:p>
          </table:table-cell>
          <table:table-cell table:style-name="ce76" table:formula="of:=AVERAGE([.B38:.F38])" office:value-type="float" office:value="1.92078423421164" calcext:value-type="float">
            <text:p>1.9</text:p>
          </table:table-cell>
          <table:table-cell table:style-name="ce314" table:formula="of:=[.G38]*[.G$8]" office:value-type="float" office:value="45.4519418274658" calcext:value-type="float">
            <text:p>45</text:p>
          </table:table-cell>
          <table:table-cell table:formula="of:=STDEVP([.B38:.F38])/[.G38]" office:value-type="percentage" office:value="0.483581832741831" calcext:value-type="percentage">
            <text:p>48.4%</text:p>
          </table:table-cell>
          <table:table-cell table:style-name="ce212" table:formula="of:=IF([.H38]&gt;[.$A$43]; [.$C$43]; IF([.H38]&gt;[.$A$44]; [.$C$44]; IF([.H38]&gt;[.$A$45];[.$C$45];IF([.H38]&gt;[.$A$46];[.$C$46]; IF([.H38]&gt;[.$A$47];[.$C$47];IF([.H38]&gt;[.$A$48];[.$C$48];[.$C$49]))))))/100" office:value-type="percentage" office:value="0.275" calcext:value-type="percentage">
            <text:p>27.5%</text:p>
          </table:table-cell>
          <table:table-cell table:formula="of:=(MAX([.B38:.F38])-MIN([.B38:.F38]))/[.G38]" office:value-type="percentage" office:value="1.52293843895993" calcext:value-type="percentage">
            <text:p>152.3%</text:p>
          </table:table-cell>
          <table:table-cell table:formula="of:=COUNTA([.B38:.F38])"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table:style-name="Default"/>
          <table:table-cell table:number-columns-repeated="34"/>
        </table:table-row>
        <table:table-row table:style-name="ro2">
          <table:table-cell table:style-name="Default" table:number-columns-repeated="7"/>
          <table:table-cell table:style-name="ce315"/>
          <table:table-cell table:style-name="Default" table:number-columns-repeated="2"/>
          <table:table-cell table:style-name="ce317"/>
          <table:table-cell table:number-columns-repeated="3"/>
          <table:table-cell table:style-name="Default"/>
          <table:table-cell table:number-columns-repeated="34"/>
        </table:table-row>
        <table:table-row table:style-name="ro2">
          <table:table-cell table:style-name="Default" office:value-type="string" calcext:value-type="string">
            <text:p>Table C.2</text:p>
          </table:table-cell>
          <table:table-cell table:style-name="Default" table:number-columns-repeated="6"/>
          <table:table-cell table:style-name="ce315"/>
          <table:table-cell table:style-name="Default" table:number-columns-repeated="2"/>
          <table:table-cell table:style-name="ce317"/>
          <table:table-cell table:number-columns-repeated="3"/>
          <table:table-cell table:style-name="Default"/>
          <table:table-cell table:number-columns-repeated="34"/>
        </table:table-row>
        <table:table-row table:style-name="ro2">
          <table:table-cell table:style-name="ce115"/>
          <table:table-cell table:style-name="ce199" office:value-type="string" calcext:value-type="string">
            <text:p>Mean counted X</text:p>
          </table:table-cell>
          <table:table-cell table:style-name="ce115"/>
          <table:table-cell table:style-name="ce201" office:value-type="string" calcext:value-type="string">
            <text:p>C<text:span text:style-name="T6">V_MAX</text:span></text:p>
          </table:table-cell>
          <table:table-cell table:style-name="ce117" table:number-columns-repeated="3"/>
          <table:table-cell table:style-name="ce118"/>
          <table:table-cell table:style-name="Default" table:number-columns-repeated="3"/>
          <table:table-cell table:number-columns-repeated="3"/>
          <table:table-cell table:style-name="Default"/>
          <table:table-cell table:number-columns-repeated="34"/>
        </table:table-row>
        <table:table-row table:style-name="ro2">
          <table:table-cell table:style-name="ce193" office:value-type="string" calcext:value-type="string">
            <text:p>X &gt;=</text:p>
          </table:table-cell>
          <table:table-cell table:style-name="ce200" office:value-type="string" calcext:value-type="string">
            <text:p>X &lt;</text:p>
          </table:table-cell>
          <table:table-cell table:style-name="ce193" office:value-type="string" calcext:value-type="string">
            <text:p>D<text:span text:style-name="T6">QMAX / SAMPLE</text:span></text:p>
          </table:table-cell>
          <table:table-cell table:style-name="ce193" office:value-type="string" calcext:value-type="string">
            <text:p>N=3</text:p>
          </table:table-cell>
          <table:table-cell table:style-name="ce200" office:value-type="string" calcext:value-type="string">
            <text:p>N=6</text:p>
          </table:table-cell>
          <table:table-cell table:style-name="ce200" office:value-type="string" calcext:value-type="string">
            <text:p>N=10</text:p>
          </table:table-cell>
          <table:table-cell table:style-name="ce200" office:value-type="string" calcext:value-type="string">
            <text:p>N=20</text:p>
          </table:table-cell>
          <table:table-cell table:style-name="ce210" office:value-type="string" calcext:value-type="string">
            <text:p>N=40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34"/>
        </table:table-row>
        <table:table-row table:style-name="ro2">
          <table:table-cell table:style-name="ce164" office:value-type="float" office:value="10000" calcext:value-type="float">
            <text:p>10000</text:p>
          </table:table-cell>
          <table:table-cell table:style-name="Default"/>
          <table:table-cell table:style-name="ce164" office:value-type="float" office:value="11" calcext:value-type="float">
            <text:p>11</text:p>
          </table:table-cell>
          <table:table-cell table:style-name="ce164" office:value-type="float" office:value="7.8" calcext:value-type="float">
            <text:p>7.8</text:p>
          </table:table-cell>
          <table:table-cell table:style-name="Default" office:value-type="float" office:value="5.3" calcext:value-type="float">
            <text:p>5.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7" calcext:value-type="float">
            <text:p>2.7</text:p>
          </table:table-cell>
          <table:table-cell table:style-name="ce173" office:value-type="float" office:value="1.8" calcext:value-type="float">
            <text:p>1.8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34"/>
        </table:table-row>
        <table:table-row table:style-name="ro2">
          <table:table-cell table:style-name="ce164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ce164" office:value-type="float" office:value="11.3" calcext:value-type="float">
            <text:p>11.3</text:p>
          </table:table-cell>
          <table:table-cell table:style-name="ce164" office:value-type="float" office:value="7.8" calcext:value-type="float">
            <text:p>7.8</text:p>
          </table:table-cell>
          <table:table-cell table:style-name="Default" office:value-type="float" office:value="5.3" calcext:value-type="float">
            <text:p>5.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7" calcext:value-type="float">
            <text:p>2.7</text:p>
          </table:table-cell>
          <table:table-cell table:style-name="ce173" office:value-type="float" office:value="1.9" calcext:value-type="float">
            <text:p>1.9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34"/>
        </table:table-row>
        <table:table-row table:style-name="ro2">
          <table:table-cell table:style-name="ce164" office:value-type="float" office:value="2000" calcext:value-type="float">
            <text:p>2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4" office:value-type="float" office:value="11.9" calcext:value-type="float">
            <text:p>11.9</text:p>
          </table:table-cell>
          <table:table-cell table:style-name="ce164" office:value-type="float" office:value="7.9" calcext:value-type="float">
            <text:p>7.9</text:p>
          </table:table-cell>
          <table:table-cell table:style-name="Default" office:value-type="float" office:value="5.4" calcext:value-type="float">
            <text:p>5.4</text:p>
          </table:table-cell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2.9" calcext:value-type="float">
            <text:p>2.9</text:p>
          </table:table-cell>
          <table:table-cell table:style-name="ce173" office:value-type="float" office:value="2.1" calcext:value-type="float">
            <text:p>2.1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34"/>
        </table:table-row>
        <table:table-row table:style-name="ro2">
          <table:table-cell table:style-name="ce164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ce164" office:value-type="float" office:value="13.4" calcext:value-type="float">
            <text:p>13.4</text:p>
          </table:table-cell>
          <table:table-cell table:style-name="ce164" office:value-type="float" office:value="8" calcext:value-type="float">
            <text:p>8</text:p>
          </table:table-cell>
          <table:table-cell table:style-name="Default" office:value-type="float" office:value="5.6" calcext:value-type="float">
            <text:p>5.6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3.1" calcext:value-type="float">
            <text:p>3.1</text:p>
          </table:table-cell>
          <table:table-cell table:style-name="ce173" office:value-type="float" office:value="2.4" calcext:value-type="float">
            <text:p>2.4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34"/>
        </table:table-row>
        <table:table-row table:style-name="ro2">
          <table:table-cell table:style-name="ce164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ce164" office:value-type="float" office:value="15.6" calcext:value-type="float">
            <text:p>15.6</text:p>
          </table:table-cell>
          <table:table-cell table:style-name="ce164" office:value-type="float" office:value="8.2" calcext:value-type="float">
            <text:p>8.2</text:p>
          </table:table-cell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4.7" calcext:value-type="float">
            <text:p>4.7</text:p>
          </table:table-cell>
          <table:table-cell table:style-name="Default" office:value-type="float" office:value="3.6" calcext:value-type="float">
            <text:p>3.6</text:p>
          </table:table-cell>
          <table:table-cell table:style-name="ce173" office:value-type="float" office:value="2.9" calcext:value-type="float">
            <text:p>2.9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34"/>
        </table:table-row>
        <table:table-row table:style-name="ro2">
          <table:table-cell table:style-name="ce164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ce164" office:value-type="float" office:value="19.3" calcext:value-type="float">
            <text:p>19.3</text:p>
          </table:table-cell>
          <table:table-cell table:style-name="ce164" office:value-type="float" office:value="8.9" calcext:value-type="float">
            <text:p>8.9</text:p>
          </table:table-cell>
          <table:table-cell table:style-name="Default" office:value-type="float" office:value="6.8" calcext:value-type="float">
            <text:p>6.8</text:p>
          </table:table-cell>
          <table:table-cell table:style-name="Default" office:value-type="float" office:value="5.7" calcext:value-type="float">
            <text:p>5.7</text:p>
          </table:table-cell>
          <table:table-cell table:style-name="Default" office:value-type="float" office:value="4.7" calcext:value-type="float">
            <text:p>4.7</text:p>
          </table:table-cell>
          <table:table-cell table:style-name="ce173" office:value-type="float" office:value="4.1" calcext:value-type="float">
            <text:p>4.1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34"/>
        </table:table-row>
        <table:table-row table:style-name="ro2">
          <table:table-cell table:style-name="ce165" office:value-type="float" office:value="100" calcext:value-type="float">
            <text:p>100</text:p>
          </table:table-cell>
          <table:table-cell table:style-name="ce91" office:value-type="float" office:value="200" calcext:value-type="float">
            <text:p>200</text:p>
          </table:table-cell>
          <table:table-cell table:style-name="ce165" office:value-type="float" office:value="27.5" calcext:value-type="float">
            <text:p>27.5</text:p>
          </table:table-cell>
          <table:table-cell table:style-name="ce165" office:value-type="float" office:value="10" calcext:value-type="float">
            <text:p>10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7" calcext:value-type="float">
            <text:p>7</text:p>
          </table:table-cell>
          <table:table-cell table:style-name="ce91" office:value-type="float" office:value="6.1" calcext:value-type="float">
            <text:p>6.1</text:p>
          </table:table-cell>
          <table:table-cell table:style-name="ce211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34"/>
        </table:table-row>
        <table:table-row table:style-name="ro2">
          <table:table-cell table:style-name="Default" table:number-columns-repeated="11"/>
          <table:table-cell table:number-columns-repeated="3"/>
          <table:table-cell table:style-name="Default"/>
          <table:table-cell table:number-columns-repeated="34"/>
        </table:table-row>
        <table:table-row table:style-name="ro2">
          <table:table-cell table:style-name="ce228"/>
          <table:table-cell table:style-name="ce220" office:value-type="string" calcext:value-type="string">
            <text:p>Portion 1</text:p>
          </table:table-cell>
          <table:table-cell table:style-name="ce220" office:value-type="string" calcext:value-type="string">
            <text:p>Portion 2</text:p>
          </table:table-cell>
          <table:table-cell table:style-name="ce220" office:value-type="string" calcext:value-type="string">
            <text:p>Portion 3</text:p>
          </table:table-cell>
          <table:table-cell table:style-name="ce220" office:value-type="string" calcext:value-type="string">
            <text:p>Portion 4</text:p>
          </table:table-cell>
          <table:table-cell table:style-name="ce220" office:value-type="string" calcext:value-type="string">
            <text:p>Portion 5</text:p>
          </table:table-cell>
          <table:table-cell table:style-name="ce220" office:value-type="string" calcext:value-type="string">
            <text:p>Portion 1</text:p>
          </table:table-cell>
          <table:table-cell table:style-name="ce220" office:value-type="string" calcext:value-type="string">
            <text:p>Portion 2</text:p>
          </table:table-cell>
          <table:table-cell table:style-name="ce220" office:value-type="string" calcext:value-type="string">
            <text:p>Portion 3</text:p>
          </table:table-cell>
          <table:table-cell table:style-name="ce220" office:value-type="string" calcext:value-type="string">
            <text:p>Portion 4</text:p>
          </table:table-cell>
          <table:table-cell table:style-name="ce220" office:value-type="string" calcext:value-type="string">
            <text:p>Portion 5</text:p>
          </table:table-cell>
          <table:table-cell table:style-name="ce220" office:value-type="string" calcext:value-type="string">
            <text:p>Portion 1</text:p>
          </table:table-cell>
          <table:table-cell table:style-name="ce220" office:value-type="string" calcext:value-type="string">
            <text:p>Portion 2</text:p>
          </table:table-cell>
          <table:table-cell table:style-name="ce220" office:value-type="string" calcext:value-type="string">
            <text:p>Portion 3</text:p>
          </table:table-cell>
          <table:table-cell table:style-name="ce220" office:value-type="string" calcext:value-type="string">
            <text:p>Portion 4</text:p>
          </table:table-cell>
          <table:table-cell table:style-name="ce220" office:value-type="string" calcext:value-type="string">
            <text:p>Portion 5</text:p>
          </table:table-cell>
          <table:table-cell table:number-columns-repeated="33"/>
        </table:table-row>
        <table:table-row table:style-name="ro2">
          <table:table-cell table:style-name="ce221" office:value-type="string" calcext:value-type="string">
            <text:p>NAME</text:p>
          </table:table-cell>
          <table:table-cell table:formula="of:=['file:///D:/mp/projects/PR0118%20-%20ISO%2011171%20Calibrations/results/2025-05-19-LPA3-NAVAIR-11171-00009/11171-00009-LIVE.ods'#$'6 - B1'.$B$52]" office:value-type="float" office:value="4.475147" calcext:value-type="float">
            <text:p>4.475147</text:p>
          </table:table-cell>
          <table:table-cell table:formula="of:=['file:///D:/mp/projects/PR0118%20-%20ISO%2011171%20Calibrations/results/2025-05-19-LPA3-NAVAIR-11171-00009/11171-00009-LIVE.ods'#$'6 - B1'.$C$52]" office:value-type="float" office:value="4.733991" calcext:value-type="float">
            <text:p>4.733991</text:p>
          </table:table-cell>
          <table:table-cell table:formula="of:=['file:///D:/mp/projects/PR0118%20-%20ISO%2011171%20Calibrations/results/2025-05-19-LPA3-NAVAIR-11171-00009/11171-00009-LIVE.ods'#$'6 - B1'.$D$52]" office:value-type="float" office:value="4.720532" calcext:value-type="float">
            <text:p>4.720532</text:p>
          </table:table-cell>
          <table:table-cell table:formula="of:=['file:///D:/mp/projects/PR0118%20-%20ISO%2011171%20Calibrations/results/2025-05-19-LPA3-NAVAIR-11171-00009/11171-00009-LIVE.ods'#$'6 - B1'.$E$52]" office:value-type="float" office:value="4.753982" calcext:value-type="float">
            <text:p>4.753982</text:p>
          </table:table-cell>
          <table:table-cell table:formula="of:=['file:///D:/mp/projects/PR0118%20-%20ISO%2011171%20Calibrations/results/2025-05-19-LPA3-NAVAIR-11171-00009/11171-00009-LIVE.ods'#$'6 - B1'.$F$52]" office:value-type="float" office:value="4.776061" calcext:value-type="float">
            <text:p>4.776061</text:p>
          </table:table-cell>
          <table:table-cell table:formula="of:=['file:///D:/mp/projects/PR0118%20-%20ISO%2011171%20Calibrations/results/2025-05-19-LPA3-NAVAIR-11171-00009/11171-00009-LIVE.ods'#$'6 - B1'.$G$52]" office:value-type="float" office:value="4.756581" calcext:value-type="float">
            <text:p>4.756581</text:p>
          </table:table-cell>
          <table:table-cell table:formula="of:=['file:///D:/mp/projects/PR0118%20-%20ISO%2011171%20Calibrations/results/2025-05-19-LPA3-NAVAIR-11171-00009/11171-00009-LIVE.ods'#$'6 - B1'.$H$52]" office:value-type="float" office:value="5.071365" calcext:value-type="float">
            <text:p>5.071365</text:p>
          </table:table-cell>
          <table:table-cell table:style-name="ce221" table:formula="of:=['file:///D:/mp/projects/PR0118%20-%20ISO%2011171%20Calibrations/results/2025-05-19-LPA3-NAVAIR-11171-00009/11171-00009-LIVE.ods'#$'6 - B1'.$I$52]" office:value-type="float" office:value="5.012042" calcext:value-type="float">
            <text:p>5.012042</text:p>
          </table:table-cell>
          <table:table-cell table:formula="of:=['file:///D:/mp/projects/PR0118%20-%20ISO%2011171%20Calibrations/results/2025-05-19-LPA3-NAVAIR-11171-00009/11171-00009-LIVE.ods'#$'6 - B1'.$J$52]" office:value-type="float" office:value="5.064873" calcext:value-type="float">
            <text:p>5.064873</text:p>
          </table:table-cell>
          <table:table-cell table:style-name="ce221" table:formula="of:=['file:///D:/mp/projects/PR0118%20-%20ISO%2011171%20Calibrations/results/2025-05-19-LPA3-NAVAIR-11171-00009/11171-00009-LIVE.ods'#$'6 - B1'.$K$52]" office:value-type="float" office:value="5.038718" calcext:value-type="float">
            <text:p>5.038718</text:p>
          </table:table-cell>
          <table:table-cell table:style-name="ce221" table:formula="of:=['file:///D:/mp/projects/PR0118%20-%20ISO%2011171%20Calibrations/results/2025-05-19-LPA3-NAVAIR-11171-00009/11171-00009-LIVE.ods'#$'6 - B1'.$L$52]" office:value-type="float" office:value="4.489153" calcext:value-type="float">
            <text:p>4.489153</text:p>
          </table:table-cell>
          <table:table-cell table:style-name="ce221" table:formula="of:=['file:///D:/mp/projects/PR0118%20-%20ISO%2011171%20Calibrations/results/2025-05-19-LPA3-NAVAIR-11171-00009/11171-00009-LIVE.ods'#$'6 - B1'.$M$52]" office:value-type="float" office:value="4.796755" calcext:value-type="float">
            <text:p>4.796755</text:p>
          </table:table-cell>
          <table:table-cell table:style-name="ce221" table:formula="of:=['file:///D:/mp/projects/PR0118%20-%20ISO%2011171%20Calibrations/results/2025-05-19-LPA3-NAVAIR-11171-00009/11171-00009-LIVE.ods'#$'6 - B1'.$N$52]" office:value-type="float" office:value="4.784308" calcext:value-type="float">
            <text:p>4.784308</text:p>
          </table:table-cell>
          <table:table-cell table:formula="of:=['file:///D:/mp/projects/PR0118%20-%20ISO%2011171%20Calibrations/results/2025-05-19-LPA3-NAVAIR-11171-00009/11171-00009-LIVE.ods'#$'6 - B1'.$O$52]" office:value-type="float" office:value="4.787062" calcext:value-type="float">
            <text:p>4.787062</text:p>
          </table:table-cell>
          <table:table-cell table:style-name="ce221" table:formula="of:=['file:///D:/mp/projects/PR0118%20-%20ISO%2011171%20Calibrations/results/2025-05-19-LPA3-NAVAIR-11171-00009/11171-00009-LIVE.ods'#$'6 - B1'.$P$52]" office:value-type="float" office:value="4.805943" calcext:value-type="float">
            <text:p>4.805943</text:p>
          </table:table-cell>
          <table:table-cell table:number-columns-repeated="33"/>
        </table:table-row>
        <table:table-row table:style-name="ro2">
          <table:table-cell table:style-name="ce221" table:formula="of:=['file:///D:/mp/projects/PR0118%20-%20ISO%2011171%20Calibrations/results/2025-05-19-LPA3-NAVAIR-11171-00009/11171-00009-LIVE.ods'#$'6 - B1'.$A$53]" office:value-type="float" office:value="4" calcext:value-type="float">
            <text:p>4</text:p>
          </table:table-cell>
          <table:table-cell table:formula="of:=['file:///D:/mp/projects/PR0118%20-%20ISO%2011171%20Calibrations/results/2025-05-19-LPA3-NAVAIR-11171-00009/11171-00009-LIVE.ods'#$'6 - B1'.$B$53]" office:value-type="float" office:value="64899" calcext:value-type="float">
            <text:p>64899</text:p>
          </table:table-cell>
          <table:table-cell table:formula="of:=['file:///D:/mp/projects/PR0118%20-%20ISO%2011171%20Calibrations/results/2025-05-19-LPA3-NAVAIR-11171-00009/11171-00009-LIVE.ods'#$'6 - B1'.$C$53]" office:value-type="float" office:value="68924" calcext:value-type="float">
            <text:p>68924</text:p>
          </table:table-cell>
          <table:table-cell table:formula="of:=['file:///D:/mp/projects/PR0118%20-%20ISO%2011171%20Calibrations/results/2025-05-19-LPA3-NAVAIR-11171-00009/11171-00009-LIVE.ods'#$'6 - B1'.$D$53]" office:value-type="float" office:value="68636" calcext:value-type="float">
            <text:p>68636</text:p>
          </table:table-cell>
          <table:table-cell table:formula="of:=['file:///D:/mp/projects/PR0118%20-%20ISO%2011171%20Calibrations/results/2025-05-19-LPA3-NAVAIR-11171-00009/11171-00009-LIVE.ods'#$'6 - B1'.$E$53]" office:value-type="float" office:value="68505" calcext:value-type="float">
            <text:p>68505</text:p>
          </table:table-cell>
          <table:table-cell table:formula="of:=['file:///D:/mp/projects/PR0118%20-%20ISO%2011171%20Calibrations/results/2025-05-19-LPA3-NAVAIR-11171-00009/11171-00009-LIVE.ods'#$'6 - B1'.$F$53]" office:value-type="float" office:value="68193" calcext:value-type="float">
            <text:p>68193</text:p>
          </table:table-cell>
          <table:table-cell table:formula="of:=['file:///D:/mp/projects/PR0118%20-%20ISO%2011171%20Calibrations/results/2025-05-19-LPA3-NAVAIR-11171-00009/11171-00009-LIVE.ods'#$'6 - B1'.$G$53]" office:value-type="float" office:value="51992" calcext:value-type="float">
            <text:p>51992</text:p>
          </table:table-cell>
          <table:table-cell table:formula="of:=['file:///D:/mp/projects/PR0118%20-%20ISO%2011171%20Calibrations/results/2025-05-19-LPA3-NAVAIR-11171-00009/11171-00009-LIVE.ods'#$'6 - B1'.$H$53]" office:value-type="float" office:value="53940" calcext:value-type="float">
            <text:p>53940</text:p>
          </table:table-cell>
          <table:table-cell table:style-name="ce221" table:formula="of:=['file:///D:/mp/projects/PR0118%20-%20ISO%2011171%20Calibrations/results/2025-05-19-LPA3-NAVAIR-11171-00009/11171-00009-LIVE.ods'#$'6 - B1'.$I$53]" office:value-type="float" office:value="53282" calcext:value-type="float">
            <text:p>53282</text:p>
          </table:table-cell>
          <table:table-cell table:formula="of:=['file:///D:/mp/projects/PR0118%20-%20ISO%2011171%20Calibrations/results/2025-05-19-LPA3-NAVAIR-11171-00009/11171-00009-LIVE.ods'#$'6 - B1'.$J$53]" office:value-type="float" office:value="53242" calcext:value-type="float">
            <text:p>53242</text:p>
          </table:table-cell>
          <table:table-cell table:style-name="ce221" table:formula="of:=['file:///D:/mp/projects/PR0118%20-%20ISO%2011171%20Calibrations/results/2025-05-19-LPA3-NAVAIR-11171-00009/11171-00009-LIVE.ods'#$'6 - B1'.$K$53]" office:value-type="float" office:value="53515" calcext:value-type="float">
            <text:p>53515</text:p>
          </table:table-cell>
          <table:table-cell table:style-name="ce221" table:formula="of:=['file:///D:/mp/projects/PR0118%20-%20ISO%2011171%20Calibrations/results/2025-05-19-LPA3-NAVAIR-11171-00009/11171-00009-LIVE.ods'#$'6 - B1'.$L$53]" office:value-type="float" office:value="48799" calcext:value-type="float">
            <text:p>48799</text:p>
          </table:table-cell>
          <table:table-cell table:style-name="ce221" table:formula="of:=['file:///D:/mp/projects/PR0118%20-%20ISO%2011171%20Calibrations/results/2025-05-19-LPA3-NAVAIR-11171-00009/11171-00009-LIVE.ods'#$'6 - B1'.$M$53]" office:value-type="float" office:value="51430" calcext:value-type="float">
            <text:p>51430</text:p>
          </table:table-cell>
          <table:table-cell table:style-name="ce221" table:formula="of:=['file:///D:/mp/projects/PR0118%20-%20ISO%2011171%20Calibrations/results/2025-05-19-LPA3-NAVAIR-11171-00009/11171-00009-LIVE.ods'#$'6 - B1'.$N$53]" office:value-type="float" office:value="51700" calcext:value-type="float">
            <text:p>51700</text:p>
          </table:table-cell>
          <table:table-cell table:formula="of:=['file:///D:/mp/projects/PR0118%20-%20ISO%2011171%20Calibrations/results/2025-05-19-LPA3-NAVAIR-11171-00009/11171-00009-LIVE.ods'#$'6 - B1'.$O$53]" office:value-type="float" office:value="51740" calcext:value-type="float">
            <text:p>51740</text:p>
          </table:table-cell>
          <table:table-cell table:style-name="ce221" table:formula="of:=['file:///D:/mp/projects/PR0118%20-%20ISO%2011171%20Calibrations/results/2025-05-19-LPA3-NAVAIR-11171-00009/11171-00009-LIVE.ods'#$'6 - B1'.$P$53]" office:value-type="float" office:value="51082" calcext:value-type="float">
            <text:p>51082</text:p>
          </table:table-cell>
          <table:table-cell table:number-columns-repeated="33"/>
        </table:table-row>
        <table:table-row table:style-name="ro2">
          <table:table-cell table:style-name="ce221" table:formula="of:=['file:///D:/mp/projects/PR0118%20-%20ISO%2011171%20Calibrations/results/2025-05-19-LPA3-NAVAIR-11171-00009/11171-00009-LIVE.ods'#$'6 - B1'.$A$54]" office:value-type="float" office:value="5" calcext:value-type="float">
            <text:p>5</text:p>
          </table:table-cell>
          <table:table-cell table:formula="of:=['file:///D:/mp/projects/PR0118%20-%20ISO%2011171%20Calibrations/results/2025-05-19-LPA3-NAVAIR-11171-00009/11171-00009-LIVE.ods'#$'6 - B1'.$B$54]" office:value-type="float" office:value="56257" calcext:value-type="float">
            <text:p>56257</text:p>
          </table:table-cell>
          <table:table-cell table:formula="of:=['file:///D:/mp/projects/PR0118%20-%20ISO%2011171%20Calibrations/results/2025-05-19-LPA3-NAVAIR-11171-00009/11171-00009-LIVE.ods'#$'6 - B1'.$C$54]" office:value-type="float" office:value="59891" calcext:value-type="float">
            <text:p>59891</text:p>
          </table:table-cell>
          <table:table-cell table:formula="of:=['file:///D:/mp/projects/PR0118%20-%20ISO%2011171%20Calibrations/results/2025-05-19-LPA3-NAVAIR-11171-00009/11171-00009-LIVE.ods'#$'6 - B1'.$D$54]" office:value-type="float" office:value="59326" calcext:value-type="float">
            <text:p>59326</text:p>
          </table:table-cell>
          <table:table-cell table:formula="of:=['file:///D:/mp/projects/PR0118%20-%20ISO%2011171%20Calibrations/results/2025-05-19-LPA3-NAVAIR-11171-00009/11171-00009-LIVE.ods'#$'6 - B1'.$E$54]" office:value-type="float" office:value="59295" calcext:value-type="float">
            <text:p>59295</text:p>
          </table:table-cell>
          <table:table-cell table:formula="of:=['file:///D:/mp/projects/PR0118%20-%20ISO%2011171%20Calibrations/results/2025-05-19-LPA3-NAVAIR-11171-00009/11171-00009-LIVE.ods'#$'6 - B1'.$F$54]" office:value-type="float" office:value="59066" calcext:value-type="float">
            <text:p>59066</text:p>
          </table:table-cell>
          <table:table-cell table:formula="of:=['file:///D:/mp/projects/PR0118%20-%20ISO%2011171%20Calibrations/results/2025-05-19-LPA3-NAVAIR-11171-00009/11171-00009-LIVE.ods'#$'6 - B1'.$G$54]" office:value-type="float" office:value="44162" calcext:value-type="float">
            <text:p>44162</text:p>
          </table:table-cell>
          <table:table-cell table:formula="of:=['file:///D:/mp/projects/PR0118%20-%20ISO%2011171%20Calibrations/results/2025-05-19-LPA3-NAVAIR-11171-00009/11171-00009-LIVE.ods'#$'6 - B1'.$H$54]" office:value-type="float" office:value="45794" calcext:value-type="float">
            <text:p>45794</text:p>
          </table:table-cell>
          <table:table-cell table:style-name="ce221" table:formula="of:=['file:///D:/mp/projects/PR0118%20-%20ISO%2011171%20Calibrations/results/2025-05-19-LPA3-NAVAIR-11171-00009/11171-00009-LIVE.ods'#$'6 - B1'.$I$54]" office:value-type="float" office:value="45123" calcext:value-type="float">
            <text:p>45123</text:p>
          </table:table-cell>
          <table:table-cell table:formula="of:=['file:///D:/mp/projects/PR0118%20-%20ISO%2011171%20Calibrations/results/2025-05-19-LPA3-NAVAIR-11171-00009/11171-00009-LIVE.ods'#$'6 - B1'.$J$54]" office:value-type="float" office:value="45104" calcext:value-type="float">
            <text:p>45104</text:p>
          </table:table-cell>
          <table:table-cell table:style-name="ce221" table:formula="of:=['file:///D:/mp/projects/PR0118%20-%20ISO%2011171%20Calibrations/results/2025-05-19-LPA3-NAVAIR-11171-00009/11171-00009-LIVE.ods'#$'6 - B1'.$K$54]" office:value-type="float" office:value="45370" calcext:value-type="float">
            <text:p>45370</text:p>
          </table:table-cell>
          <table:table-cell table:style-name="ce221" table:formula="of:=['file:///D:/mp/projects/PR0118%20-%20ISO%2011171%20Calibrations/results/2025-05-19-LPA3-NAVAIR-11171-00009/11171-00009-LIVE.ods'#$'6 - B1'.$L$54]" office:value-type="float" office:value="41290" calcext:value-type="float">
            <text:p>41290</text:p>
          </table:table-cell>
          <table:table-cell table:style-name="ce221" table:formula="of:=['file:///D:/mp/projects/PR0118%20-%20ISO%2011171%20Calibrations/results/2025-05-19-LPA3-NAVAIR-11171-00009/11171-00009-LIVE.ods'#$'6 - B1'.$M$54]" office:value-type="float" office:value="43593" calcext:value-type="float">
            <text:p>43593</text:p>
          </table:table-cell>
          <table:table-cell table:style-name="ce221" table:formula="of:=['file:///D:/mp/projects/PR0118%20-%20ISO%2011171%20Calibrations/results/2025-05-19-LPA3-NAVAIR-11171-00009/11171-00009-LIVE.ods'#$'6 - B1'.$N$54]" office:value-type="float" office:value="43713" calcext:value-type="float">
            <text:p>43713</text:p>
          </table:table-cell>
          <table:table-cell table:formula="of:=['file:///D:/mp/projects/PR0118%20-%20ISO%2011171%20Calibrations/results/2025-05-19-LPA3-NAVAIR-11171-00009/11171-00009-LIVE.ods'#$'6 - B1'.$O$54]" office:value-type="float" office:value="43834" calcext:value-type="float">
            <text:p>43834</text:p>
          </table:table-cell>
          <table:table-cell table:style-name="ce221" table:formula="of:=['file:///D:/mp/projects/PR0118%20-%20ISO%2011171%20Calibrations/results/2025-05-19-LPA3-NAVAIR-11171-00009/11171-00009-LIVE.ods'#$'6 - B1'.$P$54]" office:value-type="float" office:value="43237" calcext:value-type="float">
            <text:p>43237</text:p>
          </table:table-cell>
          <table:table-cell table:number-columns-repeated="33"/>
        </table:table-row>
        <table:table-row table:style-name="ro2">
          <table:table-cell table:style-name="ce221" table:formula="of:=['file:///D:/mp/projects/PR0118%20-%20ISO%2011171%20Calibrations/results/2025-05-19-LPA3-NAVAIR-11171-00009/11171-00009-LIVE.ods'#$'6 - B1'.$A$55]" office:value-type="float" office:value="6" calcext:value-type="float">
            <text:p>6</text:p>
          </table:table-cell>
          <table:table-cell table:formula="of:=['file:///D:/mp/projects/PR0118%20-%20ISO%2011171%20Calibrations/results/2025-05-19-LPA3-NAVAIR-11171-00009/11171-00009-LIVE.ods'#$'6 - B1'.$B$55]" office:value-type="float" office:value="48583" calcext:value-type="float">
            <text:p>48583</text:p>
          </table:table-cell>
          <table:table-cell table:formula="of:=['file:///D:/mp/projects/PR0118%20-%20ISO%2011171%20Calibrations/results/2025-05-19-LPA3-NAVAIR-11171-00009/11171-00009-LIVE.ods'#$'6 - B1'.$C$55]" office:value-type="float" office:value="51654" calcext:value-type="float">
            <text:p>51654</text:p>
          </table:table-cell>
          <table:table-cell table:formula="of:=['file:///D:/mp/projects/PR0118%20-%20ISO%2011171%20Calibrations/results/2025-05-19-LPA3-NAVAIR-11171-00009/11171-00009-LIVE.ods'#$'6 - B1'.$D$55]" office:value-type="float" office:value="51300" calcext:value-type="float">
            <text:p>51300</text:p>
          </table:table-cell>
          <table:table-cell table:formula="of:=['file:///D:/mp/projects/PR0118%20-%20ISO%2011171%20Calibrations/results/2025-05-19-LPA3-NAVAIR-11171-00009/11171-00009-LIVE.ods'#$'6 - B1'.$E$55]" office:value-type="float" office:value="51080" calcext:value-type="float">
            <text:p>51080</text:p>
          </table:table-cell>
          <table:table-cell table:formula="of:=['file:///D:/mp/projects/PR0118%20-%20ISO%2011171%20Calibrations/results/2025-05-19-LPA3-NAVAIR-11171-00009/11171-00009-LIVE.ods'#$'6 - B1'.$F$55]" office:value-type="float" office:value="50920" calcext:value-type="float">
            <text:p>50920</text:p>
          </table:table-cell>
          <table:table-cell table:formula="of:=['file:///D:/mp/projects/PR0118%20-%20ISO%2011171%20Calibrations/results/2025-05-19-LPA3-NAVAIR-11171-00009/11171-00009-LIVE.ods'#$'6 - B1'.$G$55]" office:value-type="float" office:value="37475" calcext:value-type="float">
            <text:p>37475</text:p>
          </table:table-cell>
          <table:table-cell table:formula="of:=['file:///D:/mp/projects/PR0118%20-%20ISO%2011171%20Calibrations/results/2025-05-19-LPA3-NAVAIR-11171-00009/11171-00009-LIVE.ods'#$'6 - B1'.$H$55]" office:value-type="float" office:value="38947" calcext:value-type="float">
            <text:p>38947</text:p>
          </table:table-cell>
          <table:table-cell table:style-name="ce221" table:formula="of:=['file:///D:/mp/projects/PR0118%20-%20ISO%2011171%20Calibrations/results/2025-05-19-LPA3-NAVAIR-11171-00009/11171-00009-LIVE.ods'#$'6 - B1'.$I$55]" office:value-type="float" office:value="38027" calcext:value-type="float">
            <text:p>38027</text:p>
          </table:table-cell>
          <table:table-cell table:formula="of:=['file:///D:/mp/projects/PR0118%20-%20ISO%2011171%20Calibrations/results/2025-05-19-LPA3-NAVAIR-11171-00009/11171-00009-LIVE.ods'#$'6 - B1'.$J$55]" office:value-type="float" office:value="38178" calcext:value-type="float">
            <text:p>38178</text:p>
          </table:table-cell>
          <table:table-cell table:style-name="ce221" table:formula="of:=['file:///D:/mp/projects/PR0118%20-%20ISO%2011171%20Calibrations/results/2025-05-19-LPA3-NAVAIR-11171-00009/11171-00009-LIVE.ods'#$'6 - B1'.$K$55]" office:value-type="float" office:value="38360" calcext:value-type="float">
            <text:p>38360</text:p>
          </table:table-cell>
          <table:table-cell table:style-name="ce221" table:formula="of:=['file:///D:/mp/projects/PR0118%20-%20ISO%2011171%20Calibrations/results/2025-05-19-LPA3-NAVAIR-11171-00009/11171-00009-LIVE.ods'#$'6 - B1'.$L$55]" office:value-type="float" office:value="34958" calcext:value-type="float">
            <text:p>34958</text:p>
          </table:table-cell>
          <table:table-cell table:style-name="ce221" table:formula="of:=['file:///D:/mp/projects/PR0118%20-%20ISO%2011171%20Calibrations/results/2025-05-19-LPA3-NAVAIR-11171-00009/11171-00009-LIVE.ods'#$'6 - B1'.$M$55]" office:value-type="float" office:value="36844" calcext:value-type="float">
            <text:p>36844</text:p>
          </table:table-cell>
          <table:table-cell table:style-name="ce221" table:formula="of:=['file:///D:/mp/projects/PR0118%20-%20ISO%2011171%20Calibrations/results/2025-05-19-LPA3-NAVAIR-11171-00009/11171-00009-LIVE.ods'#$'6 - B1'.$N$55]" office:value-type="float" office:value="36893" calcext:value-type="float">
            <text:p>36893</text:p>
          </table:table-cell>
          <table:table-cell table:formula="of:=['file:///D:/mp/projects/PR0118%20-%20ISO%2011171%20Calibrations/results/2025-05-19-LPA3-NAVAIR-11171-00009/11171-00009-LIVE.ods'#$'6 - B1'.$O$55]" office:value-type="float" office:value="36888" calcext:value-type="float">
            <text:p>36888</text:p>
          </table:table-cell>
          <table:table-cell table:style-name="ce221" table:formula="of:=['file:///D:/mp/projects/PR0118%20-%20ISO%2011171%20Calibrations/results/2025-05-19-LPA3-NAVAIR-11171-00009/11171-00009-LIVE.ods'#$'6 - B1'.$P$55]" office:value-type="float" office:value="36437" calcext:value-type="float">
            <text:p>36437</text:p>
          </table:table-cell>
          <table:table-cell table:number-columns-repeated="33"/>
        </table:table-row>
        <table:table-row table:style-name="ro2">
          <table:table-cell table:style-name="ce221" table:formula="of:=['file:///D:/mp/projects/PR0118%20-%20ISO%2011171%20Calibrations/results/2025-05-19-LPA3-NAVAIR-11171-00009/11171-00009-LIVE.ods'#$'6 - B1'.$A$56]" office:value-type="float" office:value="7" calcext:value-type="float">
            <text:p>7</text:p>
          </table:table-cell>
          <table:table-cell table:formula="of:=['file:///D:/mp/projects/PR0118%20-%20ISO%2011171%20Calibrations/results/2025-05-19-LPA3-NAVAIR-11171-00009/11171-00009-LIVE.ods'#$'6 - B1'.$B$56]" office:value-type="float" office:value="42357" calcext:value-type="float">
            <text:p>42357</text:p>
          </table:table-cell>
          <table:table-cell table:formula="of:=['file:///D:/mp/projects/PR0118%20-%20ISO%2011171%20Calibrations/results/2025-05-19-LPA3-NAVAIR-11171-00009/11171-00009-LIVE.ods'#$'6 - B1'.$C$56]" office:value-type="float" office:value="44994" calcext:value-type="float">
            <text:p>44994</text:p>
          </table:table-cell>
          <table:table-cell table:formula="of:=['file:///D:/mp/projects/PR0118%20-%20ISO%2011171%20Calibrations/results/2025-05-19-LPA3-NAVAIR-11171-00009/11171-00009-LIVE.ods'#$'6 - B1'.$D$56]" office:value-type="float" office:value="44741" calcext:value-type="float">
            <text:p>44741</text:p>
          </table:table-cell>
          <table:table-cell table:formula="of:=['file:///D:/mp/projects/PR0118%20-%20ISO%2011171%20Calibrations/results/2025-05-19-LPA3-NAVAIR-11171-00009/11171-00009-LIVE.ods'#$'6 - B1'.$E$56]" office:value-type="float" office:value="44589" calcext:value-type="float">
            <text:p>44589</text:p>
          </table:table-cell>
          <table:table-cell table:formula="of:=['file:///D:/mp/projects/PR0118%20-%20ISO%2011171%20Calibrations/results/2025-05-19-LPA3-NAVAIR-11171-00009/11171-00009-LIVE.ods'#$'6 - B1'.$F$56]" office:value-type="float" office:value="44350" calcext:value-type="float">
            <text:p>44350</text:p>
          </table:table-cell>
          <table:table-cell table:formula="of:=['file:///D:/mp/projects/PR0118%20-%20ISO%2011171%20Calibrations/results/2025-05-19-LPA3-NAVAIR-11171-00009/11171-00009-LIVE.ods'#$'6 - B1'.$G$56]" office:value-type="float" office:value="31043" calcext:value-type="float">
            <text:p>31043</text:p>
          </table:table-cell>
          <table:table-cell table:formula="of:=['file:///D:/mp/projects/PR0118%20-%20ISO%2011171%20Calibrations/results/2025-05-19-LPA3-NAVAIR-11171-00009/11171-00009-LIVE.ods'#$'6 - B1'.$H$56]" office:value-type="float" office:value="32225" calcext:value-type="float">
            <text:p>32225</text:p>
          </table:table-cell>
          <table:table-cell table:style-name="ce221" table:formula="of:=['file:///D:/mp/projects/PR0118%20-%20ISO%2011171%20Calibrations/results/2025-05-19-LPA3-NAVAIR-11171-00009/11171-00009-LIVE.ods'#$'6 - B1'.$I$56]" office:value-type="float" office:value="31585" calcext:value-type="float">
            <text:p>31585</text:p>
          </table:table-cell>
          <table:table-cell table:formula="of:=['file:///D:/mp/projects/PR0118%20-%20ISO%2011171%20Calibrations/results/2025-05-19-LPA3-NAVAIR-11171-00009/11171-00009-LIVE.ods'#$'6 - B1'.$J$56]" office:value-type="float" office:value="31520" calcext:value-type="float">
            <text:p>31520</text:p>
          </table:table-cell>
          <table:table-cell table:style-name="ce221" table:formula="of:=['file:///D:/mp/projects/PR0118%20-%20ISO%2011171%20Calibrations/results/2025-05-19-LPA3-NAVAIR-11171-00009/11171-00009-LIVE.ods'#$'6 - B1'.$K$56]" office:value-type="float" office:value="31829" calcext:value-type="float">
            <text:p>31829</text:p>
          </table:table-cell>
          <table:table-cell table:style-name="ce221" table:formula="of:=['file:///D:/mp/projects/PR0118%20-%20ISO%2011171%20Calibrations/results/2025-05-19-LPA3-NAVAIR-11171-00009/11171-00009-LIVE.ods'#$'6 - B1'.$L$56]" office:value-type="float" office:value="28935" calcext:value-type="float">
            <text:p>28935</text:p>
          </table:table-cell>
          <table:table-cell table:style-name="ce221" table:formula="of:=['file:///D:/mp/projects/PR0118%20-%20ISO%2011171%20Calibrations/results/2025-05-19-LPA3-NAVAIR-11171-00009/11171-00009-LIVE.ods'#$'6 - B1'.$M$56]" office:value-type="float" office:value="30427" calcext:value-type="float">
            <text:p>30427</text:p>
          </table:table-cell>
          <table:table-cell table:style-name="ce221" table:formula="of:=['file:///D:/mp/projects/PR0118%20-%20ISO%2011171%20Calibrations/results/2025-05-19-LPA3-NAVAIR-11171-00009/11171-00009-LIVE.ods'#$'6 - B1'.$N$56]" office:value-type="float" office:value="30431" calcext:value-type="float">
            <text:p>30431</text:p>
          </table:table-cell>
          <table:table-cell table:formula="of:=['file:///D:/mp/projects/PR0118%20-%20ISO%2011171%20Calibrations/results/2025-05-19-LPA3-NAVAIR-11171-00009/11171-00009-LIVE.ods'#$'6 - B1'.$O$56]" office:value-type="float" office:value="30572" calcext:value-type="float">
            <text:p>30572</text:p>
          </table:table-cell>
          <table:table-cell table:style-name="ce221" table:formula="of:=['file:///D:/mp/projects/PR0118%20-%20ISO%2011171%20Calibrations/results/2025-05-19-LPA3-NAVAIR-11171-00009/11171-00009-LIVE.ods'#$'6 - B1'.$P$56]" office:value-type="float" office:value="30152" calcext:value-type="float">
            <text:p>30152</text:p>
          </table:table-cell>
          <table:table-cell table:number-columns-repeated="33"/>
        </table:table-row>
        <table:table-row table:style-name="ro2">
          <table:table-cell table:style-name="ce221" table:formula="of:=['file:///D:/mp/projects/PR0118%20-%20ISO%2011171%20Calibrations/results/2025-05-19-LPA3-NAVAIR-11171-00009/11171-00009-LIVE.ods'#$'6 - B1'.$A$57]" office:value-type="float" office:value="8" calcext:value-type="float">
            <text:p>8</text:p>
          </table:table-cell>
          <table:table-cell table:formula="of:=['file:///D:/mp/projects/PR0118%20-%20ISO%2011171%20Calibrations/results/2025-05-19-LPA3-NAVAIR-11171-00009/11171-00009-LIVE.ods'#$'6 - B1'.$B$57]" office:value-type="float" office:value="36098" calcext:value-type="float">
            <text:p>36098</text:p>
          </table:table-cell>
          <table:table-cell table:formula="of:=['file:///D:/mp/projects/PR0118%20-%20ISO%2011171%20Calibrations/results/2025-05-19-LPA3-NAVAIR-11171-00009/11171-00009-LIVE.ods'#$'6 - B1'.$C$57]" office:value-type="float" office:value="38325" calcext:value-type="float">
            <text:p>38325</text:p>
          </table:table-cell>
          <table:table-cell table:formula="of:=['file:///D:/mp/projects/PR0118%20-%20ISO%2011171%20Calibrations/results/2025-05-19-LPA3-NAVAIR-11171-00009/11171-00009-LIVE.ods'#$'6 - B1'.$D$57]" office:value-type="float" office:value="38238" calcext:value-type="float">
            <text:p>38238</text:p>
          </table:table-cell>
          <table:table-cell table:formula="of:=['file:///D:/mp/projects/PR0118%20-%20ISO%2011171%20Calibrations/results/2025-05-19-LPA3-NAVAIR-11171-00009/11171-00009-LIVE.ods'#$'6 - B1'.$E$57]" office:value-type="float" office:value="38152" calcext:value-type="float">
            <text:p>38152</text:p>
          </table:table-cell>
          <table:table-cell table:formula="of:=['file:///D:/mp/projects/PR0118%20-%20ISO%2011171%20Calibrations/results/2025-05-19-LPA3-NAVAIR-11171-00009/11171-00009-LIVE.ods'#$'6 - B1'.$F$57]" office:value-type="float" office:value="37745" calcext:value-type="float">
            <text:p>37745</text:p>
          </table:table-cell>
          <table:table-cell table:formula="of:=['file:///D:/mp/projects/PR0118%20-%20ISO%2011171%20Calibrations/results/2025-05-19-LPA3-NAVAIR-11171-00009/11171-00009-LIVE.ods'#$'6 - B1'.$G$57]" office:value-type="float" office:value="25259" calcext:value-type="float">
            <text:p>25259</text:p>
          </table:table-cell>
          <table:table-cell table:formula="of:=['file:///D:/mp/projects/PR0118%20-%20ISO%2011171%20Calibrations/results/2025-05-19-LPA3-NAVAIR-11171-00009/11171-00009-LIVE.ods'#$'6 - B1'.$H$57]" office:value-type="float" office:value="26108" calcext:value-type="float">
            <text:p>26108</text:p>
          </table:table-cell>
          <table:table-cell table:style-name="ce221" table:formula="of:=['file:///D:/mp/projects/PR0118%20-%20ISO%2011171%20Calibrations/results/2025-05-19-LPA3-NAVAIR-11171-00009/11171-00009-LIVE.ods'#$'6 - B1'.$I$57]" office:value-type="float" office:value="25521" calcext:value-type="float">
            <text:p>25521</text:p>
          </table:table-cell>
          <table:table-cell table:formula="of:=['file:///D:/mp/projects/PR0118%20-%20ISO%2011171%20Calibrations/results/2025-05-19-LPA3-NAVAIR-11171-00009/11171-00009-LIVE.ods'#$'6 - B1'.$J$57]" office:value-type="float" office:value="25513" calcext:value-type="float">
            <text:p>25513</text:p>
          </table:table-cell>
          <table:table-cell table:style-name="ce221" table:formula="of:=['file:///D:/mp/projects/PR0118%20-%20ISO%2011171%20Calibrations/results/2025-05-19-LPA3-NAVAIR-11171-00009/11171-00009-LIVE.ods'#$'6 - B1'.$K$57]" office:value-type="float" office:value="25681" calcext:value-type="float">
            <text:p>25681</text:p>
          </table:table-cell>
          <table:table-cell table:style-name="ce221" table:formula="of:=['file:///D:/mp/projects/PR0118%20-%20ISO%2011171%20Calibrations/results/2025-05-19-LPA3-NAVAIR-11171-00009/11171-00009-LIVE.ods'#$'6 - B1'.$L$57]" office:value-type="float" office:value="23457" calcext:value-type="float">
            <text:p>23457</text:p>
          </table:table-cell>
          <table:table-cell table:style-name="ce221" table:formula="of:=['file:///D:/mp/projects/PR0118%20-%20ISO%2011171%20Calibrations/results/2025-05-19-LPA3-NAVAIR-11171-00009/11171-00009-LIVE.ods'#$'6 - B1'.$M$57]" office:value-type="float" office:value="24711" calcext:value-type="float">
            <text:p>24711</text:p>
          </table:table-cell>
          <table:table-cell table:style-name="ce221" table:formula="of:=['file:///D:/mp/projects/PR0118%20-%20ISO%2011171%20Calibrations/results/2025-05-19-LPA3-NAVAIR-11171-00009/11171-00009-LIVE.ods'#$'6 - B1'.$N$57]" office:value-type="float" office:value="24555" calcext:value-type="float">
            <text:p>24555</text:p>
          </table:table-cell>
          <table:table-cell table:formula="of:=['file:///D:/mp/projects/PR0118%20-%20ISO%2011171%20Calibrations/results/2025-05-19-LPA3-NAVAIR-11171-00009/11171-00009-LIVE.ods'#$'6 - B1'.$O$57]" office:value-type="float" office:value="24775" calcext:value-type="float">
            <text:p>24775</text:p>
          </table:table-cell>
          <table:table-cell table:style-name="ce221" table:formula="of:=['file:///D:/mp/projects/PR0118%20-%20ISO%2011171%20Calibrations/results/2025-05-19-LPA3-NAVAIR-11171-00009/11171-00009-LIVE.ods'#$'6 - B1'.$P$57]" office:value-type="float" office:value="24275" calcext:value-type="float">
            <text:p>24275</text:p>
          </table:table-cell>
          <table:table-cell table:number-columns-repeated="33"/>
        </table:table-row>
        <table:table-row table:style-name="ro2">
          <table:table-cell table:style-name="ce221" table:formula="of:=['file:///D:/mp/projects/PR0118%20-%20ISO%2011171%20Calibrations/results/2025-05-19-LPA3-NAVAIR-11171-00009/11171-00009-LIVE.ods'#$'6 - B1'.$A$58]" office:value-type="float" office:value="9" calcext:value-type="float">
            <text:p>9</text:p>
          </table:table-cell>
          <table:table-cell table:formula="of:=['file:///D:/mp/projects/PR0118%20-%20ISO%2011171%20Calibrations/results/2025-05-19-LPA3-NAVAIR-11171-00009/11171-00009-LIVE.ods'#$'6 - B1'.$B$58]" office:value-type="float" office:value="30748" calcext:value-type="float">
            <text:p>30748</text:p>
          </table:table-cell>
          <table:table-cell table:formula="of:=['file:///D:/mp/projects/PR0118%20-%20ISO%2011171%20Calibrations/results/2025-05-19-LPA3-NAVAIR-11171-00009/11171-00009-LIVE.ods'#$'6 - B1'.$C$58]" office:value-type="float" office:value="32797" calcext:value-type="float">
            <text:p>32797</text:p>
          </table:table-cell>
          <table:table-cell table:formula="of:=['file:///D:/mp/projects/PR0118%20-%20ISO%2011171%20Calibrations/results/2025-05-19-LPA3-NAVAIR-11171-00009/11171-00009-LIVE.ods'#$'6 - B1'.$D$58]" office:value-type="float" office:value="32878" calcext:value-type="float">
            <text:p>32878</text:p>
          </table:table-cell>
          <table:table-cell table:formula="of:=['file:///D:/mp/projects/PR0118%20-%20ISO%2011171%20Calibrations/results/2025-05-19-LPA3-NAVAIR-11171-00009/11171-00009-LIVE.ods'#$'6 - B1'.$E$58]" office:value-type="float" office:value="32731" calcext:value-type="float">
            <text:p>32731</text:p>
          </table:table-cell>
          <table:table-cell table:formula="of:=['file:///D:/mp/projects/PR0118%20-%20ISO%2011171%20Calibrations/results/2025-05-19-LPA3-NAVAIR-11171-00009/11171-00009-LIVE.ods'#$'6 - B1'.$F$58]" office:value-type="float" office:value="32349" calcext:value-type="float">
            <text:p>32349</text:p>
          </table:table-cell>
          <table:table-cell table:formula="of:=['file:///D:/mp/projects/PR0118%20-%20ISO%2011171%20Calibrations/results/2025-05-19-LPA3-NAVAIR-11171-00009/11171-00009-LIVE.ods'#$'6 - B1'.$G$58]" office:value-type="float" office:value="20297" calcext:value-type="float">
            <text:p>20297</text:p>
          </table:table-cell>
          <table:table-cell table:formula="of:=['file:///D:/mp/projects/PR0118%20-%20ISO%2011171%20Calibrations/results/2025-05-19-LPA3-NAVAIR-11171-00009/11171-00009-LIVE.ods'#$'6 - B1'.$H$58]" office:value-type="float" office:value="20964" calcext:value-type="float">
            <text:p>20964</text:p>
          </table:table-cell>
          <table:table-cell table:style-name="ce221" table:formula="of:=['file:///D:/mp/projects/PR0118%20-%20ISO%2011171%20Calibrations/results/2025-05-19-LPA3-NAVAIR-11171-00009/11171-00009-LIVE.ods'#$'6 - B1'.$I$58]" office:value-type="float" office:value="20399" calcext:value-type="float">
            <text:p>20399</text:p>
          </table:table-cell>
          <table:table-cell table:formula="of:=['file:///D:/mp/projects/PR0118%20-%20ISO%2011171%20Calibrations/results/2025-05-19-LPA3-NAVAIR-11171-00009/11171-00009-LIVE.ods'#$'6 - B1'.$J$58]" office:value-type="float" office:value="20516" calcext:value-type="float">
            <text:p>20516</text:p>
          </table:table-cell>
          <table:table-cell table:style-name="ce221" table:formula="of:=['file:///D:/mp/projects/PR0118%20-%20ISO%2011171%20Calibrations/results/2025-05-19-LPA3-NAVAIR-11171-00009/11171-00009-LIVE.ods'#$'6 - B1'.$K$58]" office:value-type="float" office:value="20586" calcext:value-type="float">
            <text:p>20586</text:p>
          </table:table-cell>
          <table:table-cell table:style-name="ce221" table:formula="of:=['file:///D:/mp/projects/PR0118%20-%20ISO%2011171%20Calibrations/results/2025-05-19-LPA3-NAVAIR-11171-00009/11171-00009-LIVE.ods'#$'6 - B1'.$L$58]" office:value-type="float" office:value="18805" calcext:value-type="float">
            <text:p>18805</text:p>
          </table:table-cell>
          <table:table-cell table:style-name="ce221" table:formula="of:=['file:///D:/mp/projects/PR0118%20-%20ISO%2011171%20Calibrations/results/2025-05-19-LPA3-NAVAIR-11171-00009/11171-00009-LIVE.ods'#$'6 - B1'.$M$58]" office:value-type="float" office:value="19755" calcext:value-type="float">
            <text:p>19755</text:p>
          </table:table-cell>
          <table:table-cell table:style-name="ce221" table:formula="of:=['file:///D:/mp/projects/PR0118%20-%20ISO%2011171%20Calibrations/results/2025-05-19-LPA3-NAVAIR-11171-00009/11171-00009-LIVE.ods'#$'6 - B1'.$N$58]" office:value-type="float" office:value="19605" calcext:value-type="float">
            <text:p>19605</text:p>
          </table:table-cell>
          <table:table-cell table:formula="of:=['file:///D:/mp/projects/PR0118%20-%20ISO%2011171%20Calibrations/results/2025-05-19-LPA3-NAVAIR-11171-00009/11171-00009-LIVE.ods'#$'6 - B1'.$O$58]" office:value-type="float" office:value="19787" calcext:value-type="float">
            <text:p>19787</text:p>
          </table:table-cell>
          <table:table-cell table:style-name="ce221" table:formula="of:=['file:///D:/mp/projects/PR0118%20-%20ISO%2011171%20Calibrations/results/2025-05-19-LPA3-NAVAIR-11171-00009/11171-00009-LIVE.ods'#$'6 - B1'.$P$58]" office:value-type="float" office:value="19480" calcext:value-type="float">
            <text:p>19480</text:p>
          </table:table-cell>
          <table:table-cell table:number-columns-repeated="33"/>
        </table:table-row>
        <table:table-row table:style-name="ro2">
          <table:table-cell table:style-name="ce221" table:formula="of:=['file:///D:/mp/projects/PR0118%20-%20ISO%2011171%20Calibrations/results/2025-05-19-LPA3-NAVAIR-11171-00009/11171-00009-LIVE.ods'#$'6 - B1'.$A$59]" office:value-type="float" office:value="10" calcext:value-type="float">
            <text:p>10</text:p>
          </table:table-cell>
          <table:table-cell table:formula="of:=['file:///D:/mp/projects/PR0118%20-%20ISO%2011171%20Calibrations/results/2025-05-19-LPA3-NAVAIR-11171-00009/11171-00009-LIVE.ods'#$'6 - B1'.$B$59]" office:value-type="float" office:value="26004" calcext:value-type="float">
            <text:p>26004</text:p>
          </table:table-cell>
          <table:table-cell table:formula="of:=['file:///D:/mp/projects/PR0118%20-%20ISO%2011171%20Calibrations/results/2025-05-19-LPA3-NAVAIR-11171-00009/11171-00009-LIVE.ods'#$'6 - B1'.$C$59]" office:value-type="float" office:value="27802" calcext:value-type="float">
            <text:p>27802</text:p>
          </table:table-cell>
          <table:table-cell table:formula="of:=['file:///D:/mp/projects/PR0118%20-%20ISO%2011171%20Calibrations/results/2025-05-19-LPA3-NAVAIR-11171-00009/11171-00009-LIVE.ods'#$'6 - B1'.$D$59]" office:value-type="float" office:value="27813" calcext:value-type="float">
            <text:p>27813</text:p>
          </table:table-cell>
          <table:table-cell table:formula="of:=['file:///D:/mp/projects/PR0118%20-%20ISO%2011171%20Calibrations/results/2025-05-19-LPA3-NAVAIR-11171-00009/11171-00009-LIVE.ods'#$'6 - B1'.$E$59]" office:value-type="float" office:value="27635" calcext:value-type="float">
            <text:p>27635</text:p>
          </table:table-cell>
          <table:table-cell table:formula="of:=['file:///D:/mp/projects/PR0118%20-%20ISO%2011171%20Calibrations/results/2025-05-19-LPA3-NAVAIR-11171-00009/11171-00009-LIVE.ods'#$'6 - B1'.$F$59]" office:value-type="float" office:value="27427" calcext:value-type="float">
            <text:p>27427</text:p>
          </table:table-cell>
          <table:table-cell table:formula="of:=['file:///D:/mp/projects/PR0118%20-%20ISO%2011171%20Calibrations/results/2025-05-19-LPA3-NAVAIR-11171-00009/11171-00009-LIVE.ods'#$'6 - B1'.$G$59]" office:value-type="float" office:value="16224" calcext:value-type="float">
            <text:p>16224</text:p>
          </table:table-cell>
          <table:table-cell table:formula="of:=['file:///D:/mp/projects/PR0118%20-%20ISO%2011171%20Calibrations/results/2025-05-19-LPA3-NAVAIR-11171-00009/11171-00009-LIVE.ods'#$'6 - B1'.$H$59]" office:value-type="float" office:value="16855" calcext:value-type="float">
            <text:p>16855</text:p>
          </table:table-cell>
          <table:table-cell table:style-name="ce221" table:formula="of:=['file:///D:/mp/projects/PR0118%20-%20ISO%2011171%20Calibrations/results/2025-05-19-LPA3-NAVAIR-11171-00009/11171-00009-LIVE.ods'#$'6 - B1'.$I$59]" office:value-type="float" office:value="16422" calcext:value-type="float">
            <text:p>16422</text:p>
          </table:table-cell>
          <table:table-cell table:formula="of:=['file:///D:/mp/projects/PR0118%20-%20ISO%2011171%20Calibrations/results/2025-05-19-LPA3-NAVAIR-11171-00009/11171-00009-LIVE.ods'#$'6 - B1'.$J$59]" office:value-type="float" office:value="16577" calcext:value-type="float">
            <text:p>16577</text:p>
          </table:table-cell>
          <table:table-cell table:style-name="ce221" table:formula="of:=['file:///D:/mp/projects/PR0118%20-%20ISO%2011171%20Calibrations/results/2025-05-19-LPA3-NAVAIR-11171-00009/11171-00009-LIVE.ods'#$'6 - B1'.$K$59]" office:value-type="float" office:value="16497" calcext:value-type="float">
            <text:p>16497</text:p>
          </table:table-cell>
          <table:table-cell table:style-name="ce221" table:formula="of:=['file:///D:/mp/projects/PR0118%20-%20ISO%2011171%20Calibrations/results/2025-05-19-LPA3-NAVAIR-11171-00009/11171-00009-LIVE.ods'#$'6 - B1'.$L$59]" office:value-type="float" office:value="15210" calcext:value-type="float">
            <text:p>15210</text:p>
          </table:table-cell>
          <table:table-cell table:style-name="ce221" table:formula="of:=['file:///D:/mp/projects/PR0118%20-%20ISO%2011171%20Calibrations/results/2025-05-19-LPA3-NAVAIR-11171-00009/11171-00009-LIVE.ods'#$'6 - B1'.$M$59]" office:value-type="float" office:value="15912" calcext:value-type="float">
            <text:p>15912</text:p>
          </table:table-cell>
          <table:table-cell table:style-name="ce221" table:formula="of:=['file:///D:/mp/projects/PR0118%20-%20ISO%2011171%20Calibrations/results/2025-05-19-LPA3-NAVAIR-11171-00009/11171-00009-LIVE.ods'#$'6 - B1'.$N$59]" office:value-type="float" office:value="15753" calcext:value-type="float">
            <text:p>15753</text:p>
          </table:table-cell>
          <table:table-cell table:formula="of:=['file:///D:/mp/projects/PR0118%20-%20ISO%2011171%20Calibrations/results/2025-05-19-LPA3-NAVAIR-11171-00009/11171-00009-LIVE.ods'#$'6 - B1'.$O$59]" office:value-type="float" office:value="15881" calcext:value-type="float">
            <text:p>15881</text:p>
          </table:table-cell>
          <table:table-cell table:style-name="ce221" table:formula="of:=['file:///D:/mp/projects/PR0118%20-%20ISO%2011171%20Calibrations/results/2025-05-19-LPA3-NAVAIR-11171-00009/11171-00009-LIVE.ods'#$'6 - B1'.$P$59]" office:value-type="float" office:value="15548" calcext:value-type="float">
            <text:p>15548</text:p>
          </table:table-cell>
          <table:table-cell table:number-columns-repeated="33"/>
        </table:table-row>
        <table:table-row table:style-name="ro2">
          <table:table-cell table:style-name="ce221" table:formula="of:=['file:///D:/mp/projects/PR0118%20-%20ISO%2011171%20Calibrations/results/2025-05-19-LPA3-NAVAIR-11171-00009/11171-00009-LIVE.ods'#$'6 - B1'.$A$60]" office:value-type="float" office:value="11" calcext:value-type="float">
            <text:p>11</text:p>
          </table:table-cell>
          <table:table-cell table:formula="of:=['file:///D:/mp/projects/PR0118%20-%20ISO%2011171%20Calibrations/results/2025-05-19-LPA3-NAVAIR-11171-00009/11171-00009-LIVE.ods'#$'6 - B1'.$B$60]" office:value-type="float" office:value="21787" calcext:value-type="float">
            <text:p>21787</text:p>
          </table:table-cell>
          <table:table-cell table:formula="of:=['file:///D:/mp/projects/PR0118%20-%20ISO%2011171%20Calibrations/results/2025-05-19-LPA3-NAVAIR-11171-00009/11171-00009-LIVE.ods'#$'6 - B1'.$C$60]" office:value-type="float" office:value="23373" calcext:value-type="float">
            <text:p>23373</text:p>
          </table:table-cell>
          <table:table-cell table:formula="of:=['file:///D:/mp/projects/PR0118%20-%20ISO%2011171%20Calibrations/results/2025-05-19-LPA3-NAVAIR-11171-00009/11171-00009-LIVE.ods'#$'6 - B1'.$D$60]" office:value-type="float" office:value="23371" calcext:value-type="float">
            <text:p>23371</text:p>
          </table:table-cell>
          <table:table-cell table:formula="of:=['file:///D:/mp/projects/PR0118%20-%20ISO%2011171%20Calibrations/results/2025-05-19-LPA3-NAVAIR-11171-00009/11171-00009-LIVE.ods'#$'6 - B1'.$E$60]" office:value-type="float" office:value="23172" calcext:value-type="float">
            <text:p>23172</text:p>
          </table:table-cell>
          <table:table-cell table:formula="of:=['file:///D:/mp/projects/PR0118%20-%20ISO%2011171%20Calibrations/results/2025-05-19-LPA3-NAVAIR-11171-00009/11171-00009-LIVE.ods'#$'6 - B1'.$F$60]" office:value-type="float" office:value="22930" calcext:value-type="float">
            <text:p>22930</text:p>
          </table:table-cell>
          <table:table-cell table:formula="of:=['file:///D:/mp/projects/PR0118%20-%20ISO%2011171%20Calibrations/results/2025-05-19-LPA3-NAVAIR-11171-00009/11171-00009-LIVE.ods'#$'6 - B1'.$G$60]" office:value-type="float" office:value="12946" calcext:value-type="float">
            <text:p>12946</text:p>
          </table:table-cell>
          <table:table-cell table:formula="of:=['file:///D:/mp/projects/PR0118%20-%20ISO%2011171%20Calibrations/results/2025-05-19-LPA3-NAVAIR-11171-00009/11171-00009-LIVE.ods'#$'6 - B1'.$H$60]" office:value-type="float" office:value="13488" calcext:value-type="float">
            <text:p>13488</text:p>
          </table:table-cell>
          <table:table-cell table:style-name="ce221" table:formula="of:=['file:///D:/mp/projects/PR0118%20-%20ISO%2011171%20Calibrations/results/2025-05-19-LPA3-NAVAIR-11171-00009/11171-00009-LIVE.ods'#$'6 - B1'.$I$60]" office:value-type="float" office:value="13079" calcext:value-type="float">
            <text:p>13079</text:p>
          </table:table-cell>
          <table:table-cell table:formula="of:=['file:///D:/mp/projects/PR0118%20-%20ISO%2011171%20Calibrations/results/2025-05-19-LPA3-NAVAIR-11171-00009/11171-00009-LIVE.ods'#$'6 - B1'.$J$60]" office:value-type="float" office:value="13247" calcext:value-type="float">
            <text:p>13247</text:p>
          </table:table-cell>
          <table:table-cell table:style-name="ce221" table:formula="of:=['file:///D:/mp/projects/PR0118%20-%20ISO%2011171%20Calibrations/results/2025-05-19-LPA3-NAVAIR-11171-00009/11171-00009-LIVE.ods'#$'6 - B1'.$K$60]" office:value-type="float" office:value="13212" calcext:value-type="float">
            <text:p>13212</text:p>
          </table:table-cell>
          <table:table-cell table:style-name="ce221" table:formula="of:=['file:///D:/mp/projects/PR0118%20-%20ISO%2011171%20Calibrations/results/2025-05-19-LPA3-NAVAIR-11171-00009/11171-00009-LIVE.ods'#$'6 - B1'.$L$60]" office:value-type="float" office:value="12182" calcext:value-type="float">
            <text:p>12182</text:p>
          </table:table-cell>
          <table:table-cell table:style-name="ce221" table:formula="of:=['file:///D:/mp/projects/PR0118%20-%20ISO%2011171%20Calibrations/results/2025-05-19-LPA3-NAVAIR-11171-00009/11171-00009-LIVE.ods'#$'6 - B1'.$M$60]" office:value-type="float" office:value="12725" calcext:value-type="float">
            <text:p>12725</text:p>
          </table:table-cell>
          <table:table-cell table:style-name="ce221" table:formula="of:=['file:///D:/mp/projects/PR0118%20-%20ISO%2011171%20Calibrations/results/2025-05-19-LPA3-NAVAIR-11171-00009/11171-00009-LIVE.ods'#$'6 - B1'.$N$60]" office:value-type="float" office:value="12592" calcext:value-type="float">
            <text:p>12592</text:p>
          </table:table-cell>
          <table:table-cell table:formula="of:=['file:///D:/mp/projects/PR0118%20-%20ISO%2011171%20Calibrations/results/2025-05-19-LPA3-NAVAIR-11171-00009/11171-00009-LIVE.ods'#$'6 - B1'.$O$60]" office:value-type="float" office:value="12734" calcext:value-type="float">
            <text:p>12734</text:p>
          </table:table-cell>
          <table:table-cell table:style-name="ce221" table:formula="of:=['file:///D:/mp/projects/PR0118%20-%20ISO%2011171%20Calibrations/results/2025-05-19-LPA3-NAVAIR-11171-00009/11171-00009-LIVE.ods'#$'6 - B1'.$P$60]" office:value-type="float" office:value="12308" calcext:value-type="float">
            <text:p>12308</text:p>
          </table:table-cell>
          <table:table-cell table:number-columns-repeated="33"/>
        </table:table-row>
        <table:table-row table:style-name="ro2">
          <table:table-cell table:style-name="ce221" table:formula="of:=['file:///D:/mp/projects/PR0118%20-%20ISO%2011171%20Calibrations/results/2025-05-19-LPA3-NAVAIR-11171-00009/11171-00009-LIVE.ods'#$'6 - B1'.$A$61]" office:value-type="float" office:value="12" calcext:value-type="float">
            <text:p>12</text:p>
          </table:table-cell>
          <table:table-cell table:formula="of:=['file:///D:/mp/projects/PR0118%20-%20ISO%2011171%20Calibrations/results/2025-05-19-LPA3-NAVAIR-11171-00009/11171-00009-LIVE.ods'#$'6 - B1'.$B$61]" office:value-type="float" office:value="17875" calcext:value-type="float">
            <text:p>17875</text:p>
          </table:table-cell>
          <table:table-cell table:formula="of:=['file:///D:/mp/projects/PR0118%20-%20ISO%2011171%20Calibrations/results/2025-05-19-LPA3-NAVAIR-11171-00009/11171-00009-LIVE.ods'#$'6 - B1'.$C$61]" office:value-type="float" office:value="19353" calcext:value-type="float">
            <text:p>19353</text:p>
          </table:table-cell>
          <table:table-cell table:formula="of:=['file:///D:/mp/projects/PR0118%20-%20ISO%2011171%20Calibrations/results/2025-05-19-LPA3-NAVAIR-11171-00009/11171-00009-LIVE.ods'#$'6 - B1'.$D$61]" office:value-type="float" office:value="19274" calcext:value-type="float">
            <text:p>19274</text:p>
          </table:table-cell>
          <table:table-cell table:formula="of:=['file:///D:/mp/projects/PR0118%20-%20ISO%2011171%20Calibrations/results/2025-05-19-LPA3-NAVAIR-11171-00009/11171-00009-LIVE.ods'#$'6 - B1'.$E$61]" office:value-type="float" office:value="19142" calcext:value-type="float">
            <text:p>19142</text:p>
          </table:table-cell>
          <table:table-cell table:formula="of:=['file:///D:/mp/projects/PR0118%20-%20ISO%2011171%20Calibrations/results/2025-05-19-LPA3-NAVAIR-11171-00009/11171-00009-LIVE.ods'#$'6 - B1'.$F$61]" office:value-type="float" office:value="19006" calcext:value-type="float">
            <text:p>19006</text:p>
          </table:table-cell>
          <table:table-cell table:formula="of:=['file:///D:/mp/projects/PR0118%20-%20ISO%2011171%20Calibrations/results/2025-05-19-LPA3-NAVAIR-11171-00009/11171-00009-LIVE.ods'#$'6 - B1'.$G$61]" office:value-type="float" office:value="10520" calcext:value-type="float">
            <text:p>10520</text:p>
          </table:table-cell>
          <table:table-cell table:formula="of:=['file:///D:/mp/projects/PR0118%20-%20ISO%2011171%20Calibrations/results/2025-05-19-LPA3-NAVAIR-11171-00009/11171-00009-LIVE.ods'#$'6 - B1'.$H$61]" office:value-type="float" office:value="10955" calcext:value-type="float">
            <text:p>10955</text:p>
          </table:table-cell>
          <table:table-cell table:style-name="ce221" table:formula="of:=['file:///D:/mp/projects/PR0118%20-%20ISO%2011171%20Calibrations/results/2025-05-19-LPA3-NAVAIR-11171-00009/11171-00009-LIVE.ods'#$'6 - B1'.$I$61]" office:value-type="float" office:value="10513" calcext:value-type="float">
            <text:p>10513</text:p>
          </table:table-cell>
          <table:table-cell table:formula="of:=['file:///D:/mp/projects/PR0118%20-%20ISO%2011171%20Calibrations/results/2025-05-19-LPA3-NAVAIR-11171-00009/11171-00009-LIVE.ods'#$'6 - B1'.$J$61]" office:value-type="float" office:value="10759" calcext:value-type="float">
            <text:p>10759</text:p>
          </table:table-cell>
          <table:table-cell table:style-name="ce221" table:formula="of:=['file:///D:/mp/projects/PR0118%20-%20ISO%2011171%20Calibrations/results/2025-05-19-LPA3-NAVAIR-11171-00009/11171-00009-LIVE.ods'#$'6 - B1'.$K$61]" office:value-type="float" office:value="10718" calcext:value-type="float">
            <text:p>10718</text:p>
          </table:table-cell>
          <table:table-cell table:style-name="ce221" table:formula="of:=['file:///D:/mp/projects/PR0118%20-%20ISO%2011171%20Calibrations/results/2025-05-19-LPA3-NAVAIR-11171-00009/11171-00009-LIVE.ods'#$'6 - B1'.$L$61]" office:value-type="float" office:value="9996" calcext:value-type="float">
            <text:p>9996</text:p>
          </table:table-cell>
          <table:table-cell table:style-name="ce221" table:formula="of:=['file:///D:/mp/projects/PR0118%20-%20ISO%2011171%20Calibrations/results/2025-05-19-LPA3-NAVAIR-11171-00009/11171-00009-LIVE.ods'#$'6 - B1'.$M$61]" office:value-type="float" office:value="10304" calcext:value-type="float">
            <text:p>10304</text:p>
          </table:table-cell>
          <table:table-cell table:style-name="ce221" table:formula="of:=['file:///D:/mp/projects/PR0118%20-%20ISO%2011171%20Calibrations/results/2025-05-19-LPA3-NAVAIR-11171-00009/11171-00009-LIVE.ods'#$'6 - B1'.$N$61]" office:value-type="float" office:value="10245" calcext:value-type="float">
            <text:p>10245</text:p>
          </table:table-cell>
          <table:table-cell table:formula="of:=['file:///D:/mp/projects/PR0118%20-%20ISO%2011171%20Calibrations/results/2025-05-19-LPA3-NAVAIR-11171-00009/11171-00009-LIVE.ods'#$'6 - B1'.$O$61]" office:value-type="float" office:value="10331" calcext:value-type="float">
            <text:p>10331</text:p>
          </table:table-cell>
          <table:table-cell table:style-name="ce221" table:formula="of:=['file:///D:/mp/projects/PR0118%20-%20ISO%2011171%20Calibrations/results/2025-05-19-LPA3-NAVAIR-11171-00009/11171-00009-LIVE.ods'#$'6 - B1'.$P$61]" office:value-type="float" office:value="10024" calcext:value-type="float">
            <text:p>10024</text:p>
          </table:table-cell>
          <table:table-cell table:number-columns-repeated="33"/>
        </table:table-row>
        <table:table-row table:style-name="ro2">
          <table:table-cell table:style-name="ce221" table:formula="of:=['file:///D:/mp/projects/PR0118%20-%20ISO%2011171%20Calibrations/results/2025-05-19-LPA3-NAVAIR-11171-00009/11171-00009-LIVE.ods'#$'6 - B1'.$A$62]" office:value-type="float" office:value="13" calcext:value-type="float">
            <text:p>13</text:p>
          </table:table-cell>
          <table:table-cell table:formula="of:=['file:///D:/mp/projects/PR0118%20-%20ISO%2011171%20Calibrations/results/2025-05-19-LPA3-NAVAIR-11171-00009/11171-00009-LIVE.ods'#$'6 - B1'.$B$62]" office:value-type="float" office:value="14542" calcext:value-type="float">
            <text:p>14542</text:p>
          </table:table-cell>
          <table:table-cell table:formula="of:=['file:///D:/mp/projects/PR0118%20-%20ISO%2011171%20Calibrations/results/2025-05-19-LPA3-NAVAIR-11171-00009/11171-00009-LIVE.ods'#$'6 - B1'.$C$62]" office:value-type="float" office:value="15773" calcext:value-type="float">
            <text:p>15773</text:p>
          </table:table-cell>
          <table:table-cell table:formula="of:=['file:///D:/mp/projects/PR0118%20-%20ISO%2011171%20Calibrations/results/2025-05-19-LPA3-NAVAIR-11171-00009/11171-00009-LIVE.ods'#$'6 - B1'.$D$62]" office:value-type="float" office:value="15774" calcext:value-type="float">
            <text:p>15774</text:p>
          </table:table-cell>
          <table:table-cell table:formula="of:=['file:///D:/mp/projects/PR0118%20-%20ISO%2011171%20Calibrations/results/2025-05-19-LPA3-NAVAIR-11171-00009/11171-00009-LIVE.ods'#$'6 - B1'.$E$62]" office:value-type="float" office:value="15562" calcext:value-type="float">
            <text:p>15562</text:p>
          </table:table-cell>
          <table:table-cell table:formula="of:=['file:///D:/mp/projects/PR0118%20-%20ISO%2011171%20Calibrations/results/2025-05-19-LPA3-NAVAIR-11171-00009/11171-00009-LIVE.ods'#$'6 - B1'.$F$62]" office:value-type="float" office:value="15566" calcext:value-type="float">
            <text:p>15566</text:p>
          </table:table-cell>
          <table:table-cell table:formula="of:=['file:///D:/mp/projects/PR0118%20-%20ISO%2011171%20Calibrations/results/2025-05-19-LPA3-NAVAIR-11171-00009/11171-00009-LIVE.ods'#$'6 - B1'.$G$62]" office:value-type="float" office:value="8652" calcext:value-type="float">
            <text:p>8652</text:p>
          </table:table-cell>
          <table:table-cell table:formula="of:=['file:///D:/mp/projects/PR0118%20-%20ISO%2011171%20Calibrations/results/2025-05-19-LPA3-NAVAIR-11171-00009/11171-00009-LIVE.ods'#$'6 - B1'.$H$62]" office:value-type="float" office:value="8885" calcext:value-type="float">
            <text:p>8885</text:p>
          </table:table-cell>
          <table:table-cell table:style-name="ce221" table:formula="of:=['file:///D:/mp/projects/PR0118%20-%20ISO%2011171%20Calibrations/results/2025-05-19-LPA3-NAVAIR-11171-00009/11171-00009-LIVE.ods'#$'6 - B1'.$I$62]" office:value-type="float" office:value="8628" calcext:value-type="float">
            <text:p>8628</text:p>
          </table:table-cell>
          <table:table-cell table:formula="of:=['file:///D:/mp/projects/PR0118%20-%20ISO%2011171%20Calibrations/results/2025-05-19-LPA3-NAVAIR-11171-00009/11171-00009-LIVE.ods'#$'6 - B1'.$J$62]" office:value-type="float" office:value="8836" calcext:value-type="float">
            <text:p>8836</text:p>
          </table:table-cell>
          <table:table-cell table:style-name="ce221" table:formula="of:=['file:///D:/mp/projects/PR0118%20-%20ISO%2011171%20Calibrations/results/2025-05-19-LPA3-NAVAIR-11171-00009/11171-00009-LIVE.ods'#$'6 - B1'.$K$62]" office:value-type="float" office:value="8798" calcext:value-type="float">
            <text:p>8798</text:p>
          </table:table-cell>
          <table:table-cell table:style-name="ce221" table:formula="of:=['file:///D:/mp/projects/PR0118%20-%20ISO%2011171%20Calibrations/results/2025-05-19-LPA3-NAVAIR-11171-00009/11171-00009-LIVE.ods'#$'6 - B1'.$L$62]" office:value-type="float" office:value="8154" calcext:value-type="float">
            <text:p>8154</text:p>
          </table:table-cell>
          <table:table-cell table:style-name="ce221" table:formula="of:=['file:///D:/mp/projects/PR0118%20-%20ISO%2011171%20Calibrations/results/2025-05-19-LPA3-NAVAIR-11171-00009/11171-00009-LIVE.ods'#$'6 - B1'.$M$62]" office:value-type="float" office:value="8488" calcext:value-type="float">
            <text:p>8488</text:p>
          </table:table-cell>
          <table:table-cell table:style-name="ce221" table:formula="of:=['file:///D:/mp/projects/PR0118%20-%20ISO%2011171%20Calibrations/results/2025-05-19-LPA3-NAVAIR-11171-00009/11171-00009-LIVE.ods'#$'6 - B1'.$N$62]" office:value-type="float" office:value="8383" calcext:value-type="float">
            <text:p>8383</text:p>
          </table:table-cell>
          <table:table-cell table:formula="of:=['file:///D:/mp/projects/PR0118%20-%20ISO%2011171%20Calibrations/results/2025-05-19-LPA3-NAVAIR-11171-00009/11171-00009-LIVE.ods'#$'6 - B1'.$O$62]" office:value-type="float" office:value="8478" calcext:value-type="float">
            <text:p>8478</text:p>
          </table:table-cell>
          <table:table-cell table:style-name="ce221" table:formula="of:=['file:///D:/mp/projects/PR0118%20-%20ISO%2011171%20Calibrations/results/2025-05-19-LPA3-NAVAIR-11171-00009/11171-00009-LIVE.ods'#$'6 - B1'.$P$62]" office:value-type="float" office:value="8259" calcext:value-type="float">
            <text:p>8259</text:p>
          </table:table-cell>
          <table:table-cell table:number-columns-repeated="33"/>
        </table:table-row>
        <table:table-row table:style-name="ro2">
          <table:table-cell table:style-name="ce221" table:formula="of:=['file:///D:/mp/projects/PR0118%20-%20ISO%2011171%20Calibrations/results/2025-05-19-LPA3-NAVAIR-11171-00009/11171-00009-LIVE.ods'#$'6 - B1'.$A$63]" office:value-type="float" office:value="14" calcext:value-type="float">
            <text:p>14</text:p>
          </table:table-cell>
          <table:table-cell table:formula="of:=['file:///D:/mp/projects/PR0118%20-%20ISO%2011171%20Calibrations/results/2025-05-19-LPA3-NAVAIR-11171-00009/11171-00009-LIVE.ods'#$'6 - B1'.$B$63]" office:value-type="float" office:value="11660" calcext:value-type="float">
            <text:p>11660</text:p>
          </table:table-cell>
          <table:table-cell table:formula="of:=['file:///D:/mp/projects/PR0118%20-%20ISO%2011171%20Calibrations/results/2025-05-19-LPA3-NAVAIR-11171-00009/11171-00009-LIVE.ods'#$'6 - B1'.$C$63]" office:value-type="float" office:value="12639" calcext:value-type="float">
            <text:p>12639</text:p>
          </table:table-cell>
          <table:table-cell table:formula="of:=['file:///D:/mp/projects/PR0118%20-%20ISO%2011171%20Calibrations/results/2025-05-19-LPA3-NAVAIR-11171-00009/11171-00009-LIVE.ods'#$'6 - B1'.$D$63]" office:value-type="float" office:value="12567" calcext:value-type="float">
            <text:p>12567</text:p>
          </table:table-cell>
          <table:table-cell table:formula="of:=['file:///D:/mp/projects/PR0118%20-%20ISO%2011171%20Calibrations/results/2025-05-19-LPA3-NAVAIR-11171-00009/11171-00009-LIVE.ods'#$'6 - B1'.$E$63]" office:value-type="float" office:value="12452" calcext:value-type="float">
            <text:p>12452</text:p>
          </table:table-cell>
          <table:table-cell table:formula="of:=['file:///D:/mp/projects/PR0118%20-%20ISO%2011171%20Calibrations/results/2025-05-19-LPA3-NAVAIR-11171-00009/11171-00009-LIVE.ods'#$'6 - B1'.$F$63]" office:value-type="float" office:value="12403" calcext:value-type="float">
            <text:p>12403</text:p>
          </table:table-cell>
          <table:table-cell table:formula="of:=['file:///D:/mp/projects/PR0118%20-%20ISO%2011171%20Calibrations/results/2025-05-19-LPA3-NAVAIR-11171-00009/11171-00009-LIVE.ods'#$'6 - B1'.$G$63]" office:value-type="float" office:value="7252" calcext:value-type="float">
            <text:p>7252</text:p>
          </table:table-cell>
          <table:table-cell table:formula="of:=['file:///D:/mp/projects/PR0118%20-%20ISO%2011171%20Calibrations/results/2025-05-19-LPA3-NAVAIR-11171-00009/11171-00009-LIVE.ods'#$'6 - B1'.$H$63]" office:value-type="float" office:value="7357" calcext:value-type="float">
            <text:p>7357</text:p>
          </table:table-cell>
          <table:table-cell table:style-name="ce221" table:formula="of:=['file:///D:/mp/projects/PR0118%20-%20ISO%2011171%20Calibrations/results/2025-05-19-LPA3-NAVAIR-11171-00009/11171-00009-LIVE.ods'#$'6 - B1'.$I$63]" office:value-type="float" office:value="7090" calcext:value-type="float">
            <text:p>7090</text:p>
          </table:table-cell>
          <table:table-cell table:formula="of:=['file:///D:/mp/projects/PR0118%20-%20ISO%2011171%20Calibrations/results/2025-05-19-LPA3-NAVAIR-11171-00009/11171-00009-LIVE.ods'#$'6 - B1'.$J$63]" office:value-type="float" office:value="7375" calcext:value-type="float">
            <text:p>7375</text:p>
          </table:table-cell>
          <table:table-cell table:style-name="ce221" table:formula="of:=['file:///D:/mp/projects/PR0118%20-%20ISO%2011171%20Calibrations/results/2025-05-19-LPA3-NAVAIR-11171-00009/11171-00009-LIVE.ods'#$'6 - B1'.$K$63]" office:value-type="float" office:value="7357" calcext:value-type="float">
            <text:p>7357</text:p>
          </table:table-cell>
          <table:table-cell table:style-name="ce221" table:formula="of:=['file:///D:/mp/projects/PR0118%20-%20ISO%2011171%20Calibrations/results/2025-05-19-LPA3-NAVAIR-11171-00009/11171-00009-LIVE.ods'#$'6 - B1'.$L$63]" office:value-type="float" office:value="6800" calcext:value-type="float">
            <text:p>6800</text:p>
          </table:table-cell>
          <table:table-cell table:style-name="ce221" table:formula="of:=['file:///D:/mp/projects/PR0118%20-%20ISO%2011171%20Calibrations/results/2025-05-19-LPA3-NAVAIR-11171-00009/11171-00009-LIVE.ods'#$'6 - B1'.$M$63]" office:value-type="float" office:value="7093" calcext:value-type="float">
            <text:p>7093</text:p>
          </table:table-cell>
          <table:table-cell table:style-name="ce221" table:formula="of:=['file:///D:/mp/projects/PR0118%20-%20ISO%2011171%20Calibrations/results/2025-05-19-LPA3-NAVAIR-11171-00009/11171-00009-LIVE.ods'#$'6 - B1'.$N$63]" office:value-type="float" office:value="7006" calcext:value-type="float">
            <text:p>7006</text:p>
          </table:table-cell>
          <table:table-cell table:formula="of:=['file:///D:/mp/projects/PR0118%20-%20ISO%2011171%20Calibrations/results/2025-05-19-LPA3-NAVAIR-11171-00009/11171-00009-LIVE.ods'#$'6 - B1'.$O$63]" office:value-type="float" office:value="7050" calcext:value-type="float">
            <text:p>7050</text:p>
          </table:table-cell>
          <table:table-cell table:style-name="ce221" table:formula="of:=['file:///D:/mp/projects/PR0118%20-%20ISO%2011171%20Calibrations/results/2025-05-19-LPA3-NAVAIR-11171-00009/11171-00009-LIVE.ods'#$'6 - B1'.$P$63]" office:value-type="float" office:value="6873" calcext:value-type="float">
            <text:p>6873</text:p>
          </table:table-cell>
          <table:table-cell table:number-columns-repeated="33"/>
        </table:table-row>
        <table:table-row table:style-name="ro2">
          <table:table-cell table:style-name="ce221" table:formula="of:=['file:///D:/mp/projects/PR0118%20-%20ISO%2011171%20Calibrations/results/2025-05-19-LPA3-NAVAIR-11171-00009/11171-00009-LIVE.ods'#$'6 - B1'.$A$64]" office:value-type="float" office:value="15" calcext:value-type="float">
            <text:p>15</text:p>
          </table:table-cell>
          <table:table-cell table:formula="of:=['file:///D:/mp/projects/PR0118%20-%20ISO%2011171%20Calibrations/results/2025-05-19-LPA3-NAVAIR-11171-00009/11171-00009-LIVE.ods'#$'6 - B1'.$B$64]" office:value-type="float" office:value="9114" calcext:value-type="float">
            <text:p>9114</text:p>
          </table:table-cell>
          <table:table-cell table:formula="of:=['file:///D:/mp/projects/PR0118%20-%20ISO%2011171%20Calibrations/results/2025-05-19-LPA3-NAVAIR-11171-00009/11171-00009-LIVE.ods'#$'6 - B1'.$C$64]" office:value-type="float" office:value="9941" calcext:value-type="float">
            <text:p>9941</text:p>
          </table:table-cell>
          <table:table-cell table:formula="of:=['file:///D:/mp/projects/PR0118%20-%20ISO%2011171%20Calibrations/results/2025-05-19-LPA3-NAVAIR-11171-00009/11171-00009-LIVE.ods'#$'6 - B1'.$D$64]" office:value-type="float" office:value="9882" calcext:value-type="float">
            <text:p>9882</text:p>
          </table:table-cell>
          <table:table-cell table:formula="of:=['file:///D:/mp/projects/PR0118%20-%20ISO%2011171%20Calibrations/results/2025-05-19-LPA3-NAVAIR-11171-00009/11171-00009-LIVE.ods'#$'6 - B1'.$E$64]" office:value-type="float" office:value="9709" calcext:value-type="float">
            <text:p>9709</text:p>
          </table:table-cell>
          <table:table-cell table:formula="of:=['file:///D:/mp/projects/PR0118%20-%20ISO%2011171%20Calibrations/results/2025-05-19-LPA3-NAVAIR-11171-00009/11171-00009-LIVE.ods'#$'6 - B1'.$F$64]" office:value-type="float" office:value="9701" calcext:value-type="float">
            <text:p>9701</text:p>
          </table:table-cell>
          <table:table-cell table:formula="of:=['file:///D:/mp/projects/PR0118%20-%20ISO%2011171%20Calibrations/results/2025-05-19-LPA3-NAVAIR-11171-00009/11171-00009-LIVE.ods'#$'6 - B1'.$G$64]" office:value-type="float" office:value="6112" calcext:value-type="float">
            <text:p>6112</text:p>
          </table:table-cell>
          <table:table-cell table:formula="of:=['file:///D:/mp/projects/PR0118%20-%20ISO%2011171%20Calibrations/results/2025-05-19-LPA3-NAVAIR-11171-00009/11171-00009-LIVE.ods'#$'6 - B1'.$H$64]" office:value-type="float" office:value="6162" calcext:value-type="float">
            <text:p>6162</text:p>
          </table:table-cell>
          <table:table-cell table:style-name="ce221" table:formula="of:=['file:///D:/mp/projects/PR0118%20-%20ISO%2011171%20Calibrations/results/2025-05-19-LPA3-NAVAIR-11171-00009/11171-00009-LIVE.ods'#$'6 - B1'.$I$64]" office:value-type="float" office:value="6017" calcext:value-type="float">
            <text:p>6017</text:p>
          </table:table-cell>
          <table:table-cell table:formula="of:=['file:///D:/mp/projects/PR0118%20-%20ISO%2011171%20Calibrations/results/2025-05-19-LPA3-NAVAIR-11171-00009/11171-00009-LIVE.ods'#$'6 - B1'.$J$64]" office:value-type="float" office:value="6229" calcext:value-type="float">
            <text:p>6229</text:p>
          </table:table-cell>
          <table:table-cell table:style-name="ce221" table:formula="of:=['file:///D:/mp/projects/PR0118%20-%20ISO%2011171%20Calibrations/results/2025-05-19-LPA3-NAVAIR-11171-00009/11171-00009-LIVE.ods'#$'6 - B1'.$K$64]" office:value-type="float" office:value="6203" calcext:value-type="float">
            <text:p>6203</text:p>
          </table:table-cell>
          <table:table-cell table:style-name="ce221" table:formula="of:=['file:///D:/mp/projects/PR0118%20-%20ISO%2011171%20Calibrations/results/2025-05-19-LPA3-NAVAIR-11171-00009/11171-00009-LIVE.ods'#$'6 - B1'.$L$64]" office:value-type="float" office:value="5768" calcext:value-type="float">
            <text:p>5768</text:p>
          </table:table-cell>
          <table:table-cell table:style-name="ce221" table:formula="of:=['file:///D:/mp/projects/PR0118%20-%20ISO%2011171%20Calibrations/results/2025-05-19-LPA3-NAVAIR-11171-00009/11171-00009-LIVE.ods'#$'6 - B1'.$M$64]" office:value-type="float" office:value="5971" calcext:value-type="float">
            <text:p>5971</text:p>
          </table:table-cell>
          <table:table-cell table:style-name="ce221" table:formula="of:=['file:///D:/mp/projects/PR0118%20-%20ISO%2011171%20Calibrations/results/2025-05-19-LPA3-NAVAIR-11171-00009/11171-00009-LIVE.ods'#$'6 - B1'.$N$64]" office:value-type="float" office:value="5927" calcext:value-type="float">
            <text:p>5927</text:p>
          </table:table-cell>
          <table:table-cell table:formula="of:=['file:///D:/mp/projects/PR0118%20-%20ISO%2011171%20Calibrations/results/2025-05-19-LPA3-NAVAIR-11171-00009/11171-00009-LIVE.ods'#$'6 - B1'.$O$64]" office:value-type="float" office:value="5962" calcext:value-type="float">
            <text:p>5962</text:p>
          </table:table-cell>
          <table:table-cell table:style-name="ce221" table:formula="of:=['file:///D:/mp/projects/PR0118%20-%20ISO%2011171%20Calibrations/results/2025-05-19-LPA3-NAVAIR-11171-00009/11171-00009-LIVE.ods'#$'6 - B1'.$P$64]" office:value-type="float" office:value="5781" calcext:value-type="float">
            <text:p>5781</text:p>
          </table:table-cell>
          <table:table-cell table:number-columns-repeated="33"/>
        </table:table-row>
        <table:table-row table:style-name="ro2">
          <table:table-cell table:style-name="ce221" table:formula="of:=['file:///D:/mp/projects/PR0118%20-%20ISO%2011171%20Calibrations/results/2025-05-19-LPA3-NAVAIR-11171-00009/11171-00009-LIVE.ods'#$'6 - B1'.$A$65]" office:value-type="float" office:value="16" calcext:value-type="float">
            <text:p>16</text:p>
          </table:table-cell>
          <table:table-cell table:formula="of:=['file:///D:/mp/projects/PR0118%20-%20ISO%2011171%20Calibrations/results/2025-05-19-LPA3-NAVAIR-11171-00009/11171-00009-LIVE.ods'#$'6 - B1'.$B$65]" office:value-type="float" office:value="7062" calcext:value-type="float">
            <text:p>7062</text:p>
          </table:table-cell>
          <table:table-cell table:formula="of:=['file:///D:/mp/projects/PR0118%20-%20ISO%2011171%20Calibrations/results/2025-05-19-LPA3-NAVAIR-11171-00009/11171-00009-LIVE.ods'#$'6 - B1'.$C$65]" office:value-type="float" office:value="7694" calcext:value-type="float">
            <text:p>7694</text:p>
          </table:table-cell>
          <table:table-cell table:formula="of:=['file:///D:/mp/projects/PR0118%20-%20ISO%2011171%20Calibrations/results/2025-05-19-LPA3-NAVAIR-11171-00009/11171-00009-LIVE.ods'#$'6 - B1'.$D$65]" office:value-type="float" office:value="7682" calcext:value-type="float">
            <text:p>7682</text:p>
          </table:table-cell>
          <table:table-cell table:formula="of:=['file:///D:/mp/projects/PR0118%20-%20ISO%2011171%20Calibrations/results/2025-05-19-LPA3-NAVAIR-11171-00009/11171-00009-LIVE.ods'#$'6 - B1'.$E$65]" office:value-type="float" office:value="7426" calcext:value-type="float">
            <text:p>7426</text:p>
          </table:table-cell>
          <table:table-cell table:formula="of:=['file:///D:/mp/projects/PR0118%20-%20ISO%2011171%20Calibrations/results/2025-05-19-LPA3-NAVAIR-11171-00009/11171-00009-LIVE.ods'#$'6 - B1'.$F$65]" office:value-type="float" office:value="7485" calcext:value-type="float">
            <text:p>7485</text:p>
          </table:table-cell>
          <table:table-cell table:formula="of:=['file:///D:/mp/projects/PR0118%20-%20ISO%2011171%20Calibrations/results/2025-05-19-LPA3-NAVAIR-11171-00009/11171-00009-LIVE.ods'#$'6 - B1'.$G$65]" office:value-type="float" office:value="5255" calcext:value-type="float">
            <text:p>5255</text:p>
          </table:table-cell>
          <table:table-cell table:formula="of:=['file:///D:/mp/projects/PR0118%20-%20ISO%2011171%20Calibrations/results/2025-05-19-LPA3-NAVAIR-11171-00009/11171-00009-LIVE.ods'#$'6 - B1'.$H$65]" office:value-type="float" office:value="5297" calcext:value-type="float">
            <text:p>5297</text:p>
          </table:table-cell>
          <table:table-cell table:style-name="ce221" table:formula="of:=['file:///D:/mp/projects/PR0118%20-%20ISO%2011171%20Calibrations/results/2025-05-19-LPA3-NAVAIR-11171-00009/11171-00009-LIVE.ods'#$'6 - B1'.$I$65]" office:value-type="float" office:value="5110" calcext:value-type="float">
            <text:p>5110</text:p>
          </table:table-cell>
          <table:table-cell table:formula="of:=['file:///D:/mp/projects/PR0118%20-%20ISO%2011171%20Calibrations/results/2025-05-19-LPA3-NAVAIR-11171-00009/11171-00009-LIVE.ods'#$'6 - B1'.$J$65]" office:value-type="float" office:value="5302" calcext:value-type="float">
            <text:p>5302</text:p>
          </table:table-cell>
          <table:table-cell table:style-name="ce221" table:formula="of:=['file:///D:/mp/projects/PR0118%20-%20ISO%2011171%20Calibrations/results/2025-05-19-LPA3-NAVAIR-11171-00009/11171-00009-LIVE.ods'#$'6 - B1'.$K$65]" office:value-type="float" office:value="5289" calcext:value-type="float">
            <text:p>5289</text:p>
          </table:table-cell>
          <table:table-cell table:style-name="ce221" table:formula="of:=['file:///D:/mp/projects/PR0118%20-%20ISO%2011171%20Calibrations/results/2025-05-19-LPA3-NAVAIR-11171-00009/11171-00009-LIVE.ods'#$'6 - B1'.$L$65]" office:value-type="float" office:value="4988" calcext:value-type="float">
            <text:p>4988</text:p>
          </table:table-cell>
          <table:table-cell table:style-name="ce221" table:formula="of:=['file:///D:/mp/projects/PR0118%20-%20ISO%2011171%20Calibrations/results/2025-05-19-LPA3-NAVAIR-11171-00009/11171-00009-LIVE.ods'#$'6 - B1'.$M$65]" office:value-type="float" office:value="5145" calcext:value-type="float">
            <text:p>5145</text:p>
          </table:table-cell>
          <table:table-cell table:style-name="ce221" table:formula="of:=['file:///D:/mp/projects/PR0118%20-%20ISO%2011171%20Calibrations/results/2025-05-19-LPA3-NAVAIR-11171-00009/11171-00009-LIVE.ods'#$'6 - B1'.$N$65]" office:value-type="float" office:value="5042" calcext:value-type="float">
            <text:p>5042</text:p>
          </table:table-cell>
          <table:table-cell table:formula="of:=['file:///D:/mp/projects/PR0118%20-%20ISO%2011171%20Calibrations/results/2025-05-19-LPA3-NAVAIR-11171-00009/11171-00009-LIVE.ods'#$'6 - B1'.$O$65]" office:value-type="float" office:value="5076" calcext:value-type="float">
            <text:p>5076</text:p>
          </table:table-cell>
          <table:table-cell table:style-name="ce221" table:formula="of:=['file:///D:/mp/projects/PR0118%20-%20ISO%2011171%20Calibrations/results/2025-05-19-LPA3-NAVAIR-11171-00009/11171-00009-LIVE.ods'#$'6 - B1'.$P$65]" office:value-type="float" office:value="4928" calcext:value-type="float">
            <text:p>4928</text:p>
          </table:table-cell>
          <table:table-cell table:number-columns-repeated="33"/>
        </table:table-row>
        <table:table-row table:style-name="ro2">
          <table:table-cell table:style-name="ce221" table:formula="of:=['file:///D:/mp/projects/PR0118%20-%20ISO%2011171%20Calibrations/results/2025-05-19-LPA3-NAVAIR-11171-00009/11171-00009-LIVE.ods'#$'6 - B1'.$A$66]" office:value-type="float" office:value="17" calcext:value-type="float">
            <text:p>17</text:p>
          </table:table-cell>
          <table:table-cell table:formula="of:=['file:///D:/mp/projects/PR0118%20-%20ISO%2011171%20Calibrations/results/2025-05-19-LPA3-NAVAIR-11171-00009/11171-00009-LIVE.ods'#$'6 - B1'.$B$66]" office:value-type="float" office:value="5386" calcext:value-type="float">
            <text:p>5386</text:p>
          </table:table-cell>
          <table:table-cell table:formula="of:=['file:///D:/mp/projects/PR0118%20-%20ISO%2011171%20Calibrations/results/2025-05-19-LPA3-NAVAIR-11171-00009/11171-00009-LIVE.ods'#$'6 - B1'.$C$66]" office:value-type="float" office:value="5910" calcext:value-type="float">
            <text:p>5910</text:p>
          </table:table-cell>
          <table:table-cell table:formula="of:=['file:///D:/mp/projects/PR0118%20-%20ISO%2011171%20Calibrations/results/2025-05-19-LPA3-NAVAIR-11171-00009/11171-00009-LIVE.ods'#$'6 - B1'.$D$66]" office:value-type="float" office:value="5909" calcext:value-type="float">
            <text:p>5909</text:p>
          </table:table-cell>
          <table:table-cell table:formula="of:=['file:///D:/mp/projects/PR0118%20-%20ISO%2011171%20Calibrations/results/2025-05-19-LPA3-NAVAIR-11171-00009/11171-00009-LIVE.ods'#$'6 - B1'.$E$66]" office:value-type="float" office:value="5640" calcext:value-type="float">
            <text:p>5640</text:p>
          </table:table-cell>
          <table:table-cell table:formula="of:=['file:///D:/mp/projects/PR0118%20-%20ISO%2011171%20Calibrations/results/2025-05-19-LPA3-NAVAIR-11171-00009/11171-00009-LIVE.ods'#$'6 - B1'.$F$66]" office:value-type="float" office:value="5698" calcext:value-type="float">
            <text:p>5698</text:p>
          </table:table-cell>
          <table:table-cell table:formula="of:=['file:///D:/mp/projects/PR0118%20-%20ISO%2011171%20Calibrations/results/2025-05-19-LPA3-NAVAIR-11171-00009/11171-00009-LIVE.ods'#$'6 - B1'.$G$66]" office:value-type="float" office:value="4528" calcext:value-type="float">
            <text:p>4528</text:p>
          </table:table-cell>
          <table:table-cell table:formula="of:=['file:///D:/mp/projects/PR0118%20-%20ISO%2011171%20Calibrations/results/2025-05-19-LPA3-NAVAIR-11171-00009/11171-00009-LIVE.ods'#$'6 - B1'.$H$66]" office:value-type="float" office:value="4590" calcext:value-type="float">
            <text:p>4590</text:p>
          </table:table-cell>
          <table:table-cell table:style-name="ce221" table:formula="of:=['file:///D:/mp/projects/PR0118%20-%20ISO%2011171%20Calibrations/results/2025-05-19-LPA3-NAVAIR-11171-00009/11171-00009-LIVE.ods'#$'6 - B1'.$I$66]" office:value-type="float" office:value="4442" calcext:value-type="float">
            <text:p>4442</text:p>
          </table:table-cell>
          <table:table-cell table:formula="of:=['file:///D:/mp/projects/PR0118%20-%20ISO%2011171%20Calibrations/results/2025-05-19-LPA3-NAVAIR-11171-00009/11171-00009-LIVE.ods'#$'6 - B1'.$J$66]" office:value-type="float" office:value="4576" calcext:value-type="float">
            <text:p>4576</text:p>
          </table:table-cell>
          <table:table-cell table:style-name="ce221" table:formula="of:=['file:///D:/mp/projects/PR0118%20-%20ISO%2011171%20Calibrations/results/2025-05-19-LPA3-NAVAIR-11171-00009/11171-00009-LIVE.ods'#$'6 - B1'.$K$66]" office:value-type="float" office:value="4562" calcext:value-type="float">
            <text:p>4562</text:p>
          </table:table-cell>
          <table:table-cell table:style-name="ce221" table:formula="of:=['file:///D:/mp/projects/PR0118%20-%20ISO%2011171%20Calibrations/results/2025-05-19-LPA3-NAVAIR-11171-00009/11171-00009-LIVE.ods'#$'6 - B1'.$L$66]" office:value-type="float" office:value="4285" calcext:value-type="float">
            <text:p>4285</text:p>
          </table:table-cell>
          <table:table-cell table:style-name="ce221" table:formula="of:=['file:///D:/mp/projects/PR0118%20-%20ISO%2011171%20Calibrations/results/2025-05-19-LPA3-NAVAIR-11171-00009/11171-00009-LIVE.ods'#$'6 - B1'.$M$66]" office:value-type="float" office:value="4466" calcext:value-type="float">
            <text:p>4466</text:p>
          </table:table-cell>
          <table:table-cell table:style-name="ce221" table:formula="of:=['file:///D:/mp/projects/PR0118%20-%20ISO%2011171%20Calibrations/results/2025-05-19-LPA3-NAVAIR-11171-00009/11171-00009-LIVE.ods'#$'6 - B1'.$N$66]" office:value-type="float" office:value="4373" calcext:value-type="float">
            <text:p>4373</text:p>
          </table:table-cell>
          <table:table-cell table:formula="of:=['file:///D:/mp/projects/PR0118%20-%20ISO%2011171%20Calibrations/results/2025-05-19-LPA3-NAVAIR-11171-00009/11171-00009-LIVE.ods'#$'6 - B1'.$O$66]" office:value-type="float" office:value="4357" calcext:value-type="float">
            <text:p>4357</text:p>
          </table:table-cell>
          <table:table-cell table:style-name="ce221" table:formula="of:=['file:///D:/mp/projects/PR0118%20-%20ISO%2011171%20Calibrations/results/2025-05-19-LPA3-NAVAIR-11171-00009/11171-00009-LIVE.ods'#$'6 - B1'.$P$66]" office:value-type="float" office:value="4289" calcext:value-type="float">
            <text:p>4289</text:p>
          </table:table-cell>
          <table:table-cell table:number-columns-repeated="33"/>
        </table:table-row>
        <table:table-row table:style-name="ro2">
          <table:table-cell table:style-name="ce221" table:formula="of:=['file:///D:/mp/projects/PR0118%20-%20ISO%2011171%20Calibrations/results/2025-05-19-LPA3-NAVAIR-11171-00009/11171-00009-LIVE.ods'#$'6 - B1'.$A$67]" office:value-type="float" office:value="18" calcext:value-type="float">
            <text:p>18</text:p>
          </table:table-cell>
          <table:table-cell table:formula="of:=['file:///D:/mp/projects/PR0118%20-%20ISO%2011171%20Calibrations/results/2025-05-19-LPA3-NAVAIR-11171-00009/11171-00009-LIVE.ods'#$'6 - B1'.$B$67]" office:value-type="float" office:value="4142" calcext:value-type="float">
            <text:p>4142</text:p>
          </table:table-cell>
          <table:table-cell table:formula="of:=['file:///D:/mp/projects/PR0118%20-%20ISO%2011171%20Calibrations/results/2025-05-19-LPA3-NAVAIR-11171-00009/11171-00009-LIVE.ods'#$'6 - B1'.$C$67]" office:value-type="float" office:value="4444" calcext:value-type="float">
            <text:p>4444</text:p>
          </table:table-cell>
          <table:table-cell table:formula="of:=['file:///D:/mp/projects/PR0118%20-%20ISO%2011171%20Calibrations/results/2025-05-19-LPA3-NAVAIR-11171-00009/11171-00009-LIVE.ods'#$'6 - B1'.$D$67]" office:value-type="float" office:value="4538" calcext:value-type="float">
            <text:p>4538</text:p>
          </table:table-cell>
          <table:table-cell table:formula="of:=['file:///D:/mp/projects/PR0118%20-%20ISO%2011171%20Calibrations/results/2025-05-19-LPA3-NAVAIR-11171-00009/11171-00009-LIVE.ods'#$'6 - B1'.$E$67]" office:value-type="float" office:value="4272" calcext:value-type="float">
            <text:p>4272</text:p>
          </table:table-cell>
          <table:table-cell table:formula="of:=['file:///D:/mp/projects/PR0118%20-%20ISO%2011171%20Calibrations/results/2025-05-19-LPA3-NAVAIR-11171-00009/11171-00009-LIVE.ods'#$'6 - B1'.$F$67]" office:value-type="float" office:value="4234" calcext:value-type="float">
            <text:p>4234</text:p>
          </table:table-cell>
          <table:table-cell table:formula="of:=['file:///D:/mp/projects/PR0118%20-%20ISO%2011171%20Calibrations/results/2025-05-19-LPA3-NAVAIR-11171-00009/11171-00009-LIVE.ods'#$'6 - B1'.$G$67]" office:value-type="float" office:value="3986" calcext:value-type="float">
            <text:p>3986</text:p>
          </table:table-cell>
          <table:table-cell table:formula="of:=['file:///D:/mp/projects/PR0118%20-%20ISO%2011171%20Calibrations/results/2025-05-19-LPA3-NAVAIR-11171-00009/11171-00009-LIVE.ods'#$'6 - B1'.$H$67]" office:value-type="float" office:value="4022" calcext:value-type="float">
            <text:p>4022</text:p>
          </table:table-cell>
          <table:table-cell table:style-name="ce221" table:formula="of:=['file:///D:/mp/projects/PR0118%20-%20ISO%2011171%20Calibrations/results/2025-05-19-LPA3-NAVAIR-11171-00009/11171-00009-LIVE.ods'#$'6 - B1'.$I$67]" office:value-type="float" office:value="3948" calcext:value-type="float">
            <text:p>3948</text:p>
          </table:table-cell>
          <table:table-cell table:formula="of:=['file:///D:/mp/projects/PR0118%20-%20ISO%2011171%20Calibrations/results/2025-05-19-LPA3-NAVAIR-11171-00009/11171-00009-LIVE.ods'#$'6 - B1'.$J$67]" office:value-type="float" office:value="4047" calcext:value-type="float">
            <text:p>4047</text:p>
          </table:table-cell>
          <table:table-cell table:style-name="ce221" table:formula="of:=['file:///D:/mp/projects/PR0118%20-%20ISO%2011171%20Calibrations/results/2025-05-19-LPA3-NAVAIR-11171-00009/11171-00009-LIVE.ods'#$'6 - B1'.$K$67]" office:value-type="float" office:value="3972" calcext:value-type="float">
            <text:p>3972</text:p>
          </table:table-cell>
          <table:table-cell table:style-name="ce221" table:formula="of:=['file:///D:/mp/projects/PR0118%20-%20ISO%2011171%20Calibrations/results/2025-05-19-LPA3-NAVAIR-11171-00009/11171-00009-LIVE.ods'#$'6 - B1'.$L$67]" office:value-type="float" office:value="3770" calcext:value-type="float">
            <text:p>3770</text:p>
          </table:table-cell>
          <table:table-cell table:style-name="ce221" table:formula="of:=['file:///D:/mp/projects/PR0118%20-%20ISO%2011171%20Calibrations/results/2025-05-19-LPA3-NAVAIR-11171-00009/11171-00009-LIVE.ods'#$'6 - B1'.$M$67]" office:value-type="float" office:value="3941" calcext:value-type="float">
            <text:p>3941</text:p>
          </table:table-cell>
          <table:table-cell table:style-name="ce221" table:formula="of:=['file:///D:/mp/projects/PR0118%20-%20ISO%2011171%20Calibrations/results/2025-05-19-LPA3-NAVAIR-11171-00009/11171-00009-LIVE.ods'#$'6 - B1'.$N$67]" office:value-type="float" office:value="3897" calcext:value-type="float">
            <text:p>3897</text:p>
          </table:table-cell>
          <table:table-cell table:formula="of:=['file:///D:/mp/projects/PR0118%20-%20ISO%2011171%20Calibrations/results/2025-05-19-LPA3-NAVAIR-11171-00009/11171-00009-LIVE.ods'#$'6 - B1'.$O$67]" office:value-type="float" office:value="3806" calcext:value-type="float">
            <text:p>3806</text:p>
          </table:table-cell>
          <table:table-cell table:style-name="ce221" table:formula="of:=['file:///D:/mp/projects/PR0118%20-%20ISO%2011171%20Calibrations/results/2025-05-19-LPA3-NAVAIR-11171-00009/11171-00009-LIVE.ods'#$'6 - B1'.$P$67]" office:value-type="float" office:value="3752" calcext:value-type="float">
            <text:p>3752</text:p>
          </table:table-cell>
          <table:table-cell table:number-columns-repeated="33"/>
        </table:table-row>
        <table:table-row table:style-name="ro2">
          <table:table-cell table:style-name="ce221" table:formula="of:=['file:///D:/mp/projects/PR0118%20-%20ISO%2011171%20Calibrations/results/2025-05-19-LPA3-NAVAIR-11171-00009/11171-00009-LIVE.ods'#$'6 - B1'.$A$68]" office:value-type="float" office:value="19" calcext:value-type="float">
            <text:p>19</text:p>
          </table:table-cell>
          <table:table-cell table:formula="of:=['file:///D:/mp/projects/PR0118%20-%20ISO%2011171%20Calibrations/results/2025-05-19-LPA3-NAVAIR-11171-00009/11171-00009-LIVE.ods'#$'6 - B1'.$B$68]" office:value-type="float" office:value="3183" calcext:value-type="float">
            <text:p>3183</text:p>
          </table:table-cell>
          <table:table-cell table:formula="of:=['file:///D:/mp/projects/PR0118%20-%20ISO%2011171%20Calibrations/results/2025-05-19-LPA3-NAVAIR-11171-00009/11171-00009-LIVE.ods'#$'6 - B1'.$C$68]" office:value-type="float" office:value="3376" calcext:value-type="float">
            <text:p>3376</text:p>
          </table:table-cell>
          <table:table-cell table:formula="of:=['file:///D:/mp/projects/PR0118%20-%20ISO%2011171%20Calibrations/results/2025-05-19-LPA3-NAVAIR-11171-00009/11171-00009-LIVE.ods'#$'6 - B1'.$D$68]" office:value-type="float" office:value="3435" calcext:value-type="float">
            <text:p>3435</text:p>
          </table:table-cell>
          <table:table-cell table:formula="of:=['file:///D:/mp/projects/PR0118%20-%20ISO%2011171%20Calibrations/results/2025-05-19-LPA3-NAVAIR-11171-00009/11171-00009-LIVE.ods'#$'6 - B1'.$E$68]" office:value-type="float" office:value="3299" calcext:value-type="float">
            <text:p>3299</text:p>
          </table:table-cell>
          <table:table-cell table:formula="of:=['file:///D:/mp/projects/PR0118%20-%20ISO%2011171%20Calibrations/results/2025-05-19-LPA3-NAVAIR-11171-00009/11171-00009-LIVE.ods'#$'6 - B1'.$F$68]" office:value-type="float" office:value="3199" calcext:value-type="float">
            <text:p>3199</text:p>
          </table:table-cell>
          <table:table-cell table:formula="of:=['file:///D:/mp/projects/PR0118%20-%20ISO%2011171%20Calibrations/results/2025-05-19-LPA3-NAVAIR-11171-00009/11171-00009-LIVE.ods'#$'6 - B1'.$G$68]" office:value-type="float" office:value="3507" calcext:value-type="float">
            <text:p>3507</text:p>
          </table:table-cell>
          <table:table-cell table:formula="of:=['file:///D:/mp/projects/PR0118%20-%20ISO%2011171%20Calibrations/results/2025-05-19-LPA3-NAVAIR-11171-00009/11171-00009-LIVE.ods'#$'6 - B1'.$H$68]" office:value-type="float" office:value="3560" calcext:value-type="float">
            <text:p>3560</text:p>
          </table:table-cell>
          <table:table-cell table:style-name="ce221" table:formula="of:=['file:///D:/mp/projects/PR0118%20-%20ISO%2011171%20Calibrations/results/2025-05-19-LPA3-NAVAIR-11171-00009/11171-00009-LIVE.ods'#$'6 - B1'.$I$68]" office:value-type="float" office:value="3513" calcext:value-type="float">
            <text:p>3513</text:p>
          </table:table-cell>
          <table:table-cell table:formula="of:=['file:///D:/mp/projects/PR0118%20-%20ISO%2011171%20Calibrations/results/2025-05-19-LPA3-NAVAIR-11171-00009/11171-00009-LIVE.ods'#$'6 - B1'.$J$68]" office:value-type="float" office:value="3608" calcext:value-type="float">
            <text:p>3608</text:p>
          </table:table-cell>
          <table:table-cell table:style-name="ce221" table:formula="of:=['file:///D:/mp/projects/PR0118%20-%20ISO%2011171%20Calibrations/results/2025-05-19-LPA3-NAVAIR-11171-00009/11171-00009-LIVE.ods'#$'6 - B1'.$K$68]" office:value-type="float" office:value="3481" calcext:value-type="float">
            <text:p>3481</text:p>
          </table:table-cell>
          <table:table-cell table:style-name="ce221" table:formula="of:=['file:///D:/mp/projects/PR0118%20-%20ISO%2011171%20Calibrations/results/2025-05-19-LPA3-NAVAIR-11171-00009/11171-00009-LIVE.ods'#$'6 - B1'.$L$68]" office:value-type="float" office:value="3320" calcext:value-type="float">
            <text:p>3320</text:p>
          </table:table-cell>
          <table:table-cell table:style-name="ce221" table:formula="of:=['file:///D:/mp/projects/PR0118%20-%20ISO%2011171%20Calibrations/results/2025-05-19-LPA3-NAVAIR-11171-00009/11171-00009-LIVE.ods'#$'6 - B1'.$M$68]" office:value-type="float" office:value="3511" calcext:value-type="float">
            <text:p>3511</text:p>
          </table:table-cell>
          <table:table-cell table:style-name="ce221" table:formula="of:=['file:///D:/mp/projects/PR0118%20-%20ISO%2011171%20Calibrations/results/2025-05-19-LPA3-NAVAIR-11171-00009/11171-00009-LIVE.ods'#$'6 - B1'.$N$68]" office:value-type="float" office:value="3460" calcext:value-type="float">
            <text:p>3460</text:p>
          </table:table-cell>
          <table:table-cell table:formula="of:=['file:///D:/mp/projects/PR0118%20-%20ISO%2011171%20Calibrations/results/2025-05-19-LPA3-NAVAIR-11171-00009/11171-00009-LIVE.ods'#$'6 - B1'.$O$68]" office:value-type="float" office:value="3351" calcext:value-type="float">
            <text:p>3351</text:p>
          </table:table-cell>
          <table:table-cell table:style-name="ce221" table:formula="of:=['file:///D:/mp/projects/PR0118%20-%20ISO%2011171%20Calibrations/results/2025-05-19-LPA3-NAVAIR-11171-00009/11171-00009-LIVE.ods'#$'6 - B1'.$P$68]" office:value-type="float" office:value="3335" calcext:value-type="float">
            <text:p>3335</text:p>
          </table:table-cell>
          <table:table-cell table:number-columns-repeated="33"/>
        </table:table-row>
        <table:table-row table:style-name="ro2">
          <table:table-cell table:style-name="ce221" table:formula="of:=['file:///D:/mp/projects/PR0118%20-%20ISO%2011171%20Calibrations/results/2025-05-19-LPA3-NAVAIR-11171-00009/11171-00009-LIVE.ods'#$'6 - B1'.$A$69]" office:value-type="float" office:value="20" calcext:value-type="float">
            <text:p>20</text:p>
          </table:table-cell>
          <table:table-cell table:formula="of:=['file:///D:/mp/projects/PR0118%20-%20ISO%2011171%20Calibrations/results/2025-05-19-LPA3-NAVAIR-11171-00009/11171-00009-LIVE.ods'#$'6 - B1'.$B$69]" office:value-type="float" office:value="2478" calcext:value-type="float">
            <text:p>2478</text:p>
          </table:table-cell>
          <table:table-cell table:formula="of:=['file:///D:/mp/projects/PR0118%20-%20ISO%2011171%20Calibrations/results/2025-05-19-LPA3-NAVAIR-11171-00009/11171-00009-LIVE.ods'#$'6 - B1'.$C$69]" office:value-type="float" office:value="2570" calcext:value-type="float">
            <text:p>2570</text:p>
          </table:table-cell>
          <table:table-cell table:formula="of:=['file:///D:/mp/projects/PR0118%20-%20ISO%2011171%20Calibrations/results/2025-05-19-LPA3-NAVAIR-11171-00009/11171-00009-LIVE.ods'#$'6 - B1'.$D$69]" office:value-type="float" office:value="2635" calcext:value-type="float">
            <text:p>2635</text:p>
          </table:table-cell>
          <table:table-cell table:formula="of:=['file:///D:/mp/projects/PR0118%20-%20ISO%2011171%20Calibrations/results/2025-05-19-LPA3-NAVAIR-11171-00009/11171-00009-LIVE.ods'#$'6 - B1'.$E$69]" office:value-type="float" office:value="2483" calcext:value-type="float">
            <text:p>2483</text:p>
          </table:table-cell>
          <table:table-cell table:formula="of:=['file:///D:/mp/projects/PR0118%20-%20ISO%2011171%20Calibrations/results/2025-05-19-LPA3-NAVAIR-11171-00009/11171-00009-LIVE.ods'#$'6 - B1'.$F$69]" office:value-type="float" office:value="2430" calcext:value-type="float">
            <text:p>2430</text:p>
          </table:table-cell>
          <table:table-cell table:formula="of:=['file:///D:/mp/projects/PR0118%20-%20ISO%2011171%20Calibrations/results/2025-05-19-LPA3-NAVAIR-11171-00009/11171-00009-LIVE.ods'#$'6 - B1'.$G$69]" office:value-type="float" office:value="3160" calcext:value-type="float">
            <text:p>3160</text:p>
          </table:table-cell>
          <table:table-cell table:formula="of:=['file:///D:/mp/projects/PR0118%20-%20ISO%2011171%20Calibrations/results/2025-05-19-LPA3-NAVAIR-11171-00009/11171-00009-LIVE.ods'#$'6 - B1'.$H$69]" office:value-type="float" office:value="3179" calcext:value-type="float">
            <text:p>3179</text:p>
          </table:table-cell>
          <table:table-cell table:style-name="ce221" table:formula="of:=['file:///D:/mp/projects/PR0118%20-%20ISO%2011171%20Calibrations/results/2025-05-19-LPA3-NAVAIR-11171-00009/11171-00009-LIVE.ods'#$'6 - B1'.$I$69]" office:value-type="float" office:value="3159" calcext:value-type="float">
            <text:p>3159</text:p>
          </table:table-cell>
          <table:table-cell table:formula="of:=['file:///D:/mp/projects/PR0118%20-%20ISO%2011171%20Calibrations/results/2025-05-19-LPA3-NAVAIR-11171-00009/11171-00009-LIVE.ods'#$'6 - B1'.$J$69]" office:value-type="float" office:value="3222" calcext:value-type="float">
            <text:p>3222</text:p>
          </table:table-cell>
          <table:table-cell table:style-name="ce221" table:formula="of:=['file:///D:/mp/projects/PR0118%20-%20ISO%2011171%20Calibrations/results/2025-05-19-LPA3-NAVAIR-11171-00009/11171-00009-LIVE.ods'#$'6 - B1'.$K$69]" office:value-type="float" office:value="3112" calcext:value-type="float">
            <text:p>3112</text:p>
          </table:table-cell>
          <table:table-cell table:style-name="ce221" table:formula="of:=['file:///D:/mp/projects/PR0118%20-%20ISO%2011171%20Calibrations/results/2025-05-19-LPA3-NAVAIR-11171-00009/11171-00009-LIVE.ods'#$'6 - B1'.$L$69]" office:value-type="float" office:value="2954" calcext:value-type="float">
            <text:p>2954</text:p>
          </table:table-cell>
          <table:table-cell table:style-name="ce221" table:formula="of:=['file:///D:/mp/projects/PR0118%20-%20ISO%2011171%20Calibrations/results/2025-05-19-LPA3-NAVAIR-11171-00009/11171-00009-LIVE.ods'#$'6 - B1'.$M$69]" office:value-type="float" office:value="3133" calcext:value-type="float">
            <text:p>3133</text:p>
          </table:table-cell>
          <table:table-cell table:style-name="ce221" table:formula="of:=['file:///D:/mp/projects/PR0118%20-%20ISO%2011171%20Calibrations/results/2025-05-19-LPA3-NAVAIR-11171-00009/11171-00009-LIVE.ods'#$'6 - B1'.$N$69]" office:value-type="float" office:value="3113" calcext:value-type="float">
            <text:p>3113</text:p>
          </table:table-cell>
          <table:table-cell table:formula="of:=['file:///D:/mp/projects/PR0118%20-%20ISO%2011171%20Calibrations/results/2025-05-19-LPA3-NAVAIR-11171-00009/11171-00009-LIVE.ods'#$'6 - B1'.$O$69]" office:value-type="float" office:value="3003" calcext:value-type="float">
            <text:p>3003</text:p>
          </table:table-cell>
          <table:table-cell table:style-name="ce221" table:formula="of:=['file:///D:/mp/projects/PR0118%20-%20ISO%2011171%20Calibrations/results/2025-05-19-LPA3-NAVAIR-11171-00009/11171-00009-LIVE.ods'#$'6 - B1'.$P$69]" office:value-type="float" office:value="2977" calcext:value-type="float">
            <text:p>2977</text:p>
          </table:table-cell>
          <table:table-cell table:number-columns-repeated="33"/>
        </table:table-row>
        <table:table-row table:style-name="ro2">
          <table:table-cell table:style-name="ce221" table:formula="of:=['file:///D:/mp/projects/PR0118%20-%20ISO%2011171%20Calibrations/results/2025-05-19-LPA3-NAVAIR-11171-00009/11171-00009-LIVE.ods'#$'6 - B1'.$A$70]" office:value-type="float" office:value="21" calcext:value-type="float">
            <text:p>21</text:p>
          </table:table-cell>
          <table:table-cell table:formula="of:=['file:///D:/mp/projects/PR0118%20-%20ISO%2011171%20Calibrations/results/2025-05-19-LPA3-NAVAIR-11171-00009/11171-00009-LIVE.ods'#$'6 - B1'.$B$70]" office:value-type="float" office:value="1917" calcext:value-type="float">
            <text:p>1917</text:p>
          </table:table-cell>
          <table:table-cell table:formula="of:=['file:///D:/mp/projects/PR0118%20-%20ISO%2011171%20Calibrations/results/2025-05-19-LPA3-NAVAIR-11171-00009/11171-00009-LIVE.ods'#$'6 - B1'.$C$70]" office:value-type="float" office:value="1944" calcext:value-type="float">
            <text:p>1944</text:p>
          </table:table-cell>
          <table:table-cell table:formula="of:=['file:///D:/mp/projects/PR0118%20-%20ISO%2011171%20Calibrations/results/2025-05-19-LPA3-NAVAIR-11171-00009/11171-00009-LIVE.ods'#$'6 - B1'.$D$70]" office:value-type="float" office:value="2031" calcext:value-type="float">
            <text:p>2031</text:p>
          </table:table-cell>
          <table:table-cell table:formula="of:=['file:///D:/mp/projects/PR0118%20-%20ISO%2011171%20Calibrations/results/2025-05-19-LPA3-NAVAIR-11171-00009/11171-00009-LIVE.ods'#$'6 - B1'.$E$70]" office:value-type="float" office:value="1916" calcext:value-type="float">
            <text:p>1916</text:p>
          </table:table-cell>
          <table:table-cell table:formula="of:=['file:///D:/mp/projects/PR0118%20-%20ISO%2011171%20Calibrations/results/2025-05-19-LPA3-NAVAIR-11171-00009/11171-00009-LIVE.ods'#$'6 - B1'.$F$70]" office:value-type="float" office:value="1828" calcext:value-type="float">
            <text:p>1828</text:p>
          </table:table-cell>
          <table:table-cell table:formula="of:=['file:///D:/mp/projects/PR0118%20-%20ISO%2011171%20Calibrations/results/2025-05-19-LPA3-NAVAIR-11171-00009/11171-00009-LIVE.ods'#$'6 - B1'.$G$70]" office:value-type="float" office:value="2868" calcext:value-type="float">
            <text:p>2868</text:p>
          </table:table-cell>
          <table:table-cell table:formula="of:=['file:///D:/mp/projects/PR0118%20-%20ISO%2011171%20Calibrations/results/2025-05-19-LPA3-NAVAIR-11171-00009/11171-00009-LIVE.ods'#$'6 - B1'.$H$70]" office:value-type="float" office:value="2904" calcext:value-type="float">
            <text:p>2904</text:p>
          </table:table-cell>
          <table:table-cell table:style-name="ce221" table:formula="of:=['file:///D:/mp/projects/PR0118%20-%20ISO%2011171%20Calibrations/results/2025-05-19-LPA3-NAVAIR-11171-00009/11171-00009-LIVE.ods'#$'6 - B1'.$I$70]" office:value-type="float" office:value="2876" calcext:value-type="float">
            <text:p>2876</text:p>
          </table:table-cell>
          <table:table-cell table:formula="of:=['file:///D:/mp/projects/PR0118%20-%20ISO%2011171%20Calibrations/results/2025-05-19-LPA3-NAVAIR-11171-00009/11171-00009-LIVE.ods'#$'6 - B1'.$J$70]" office:value-type="float" office:value="2918" calcext:value-type="float">
            <text:p>2918</text:p>
          </table:table-cell>
          <table:table-cell table:style-name="ce221" table:formula="of:=['file:///D:/mp/projects/PR0118%20-%20ISO%2011171%20Calibrations/results/2025-05-19-LPA3-NAVAIR-11171-00009/11171-00009-LIVE.ods'#$'6 - B1'.$K$70]" office:value-type="float" office:value="2825" calcext:value-type="float">
            <text:p>2825</text:p>
          </table:table-cell>
          <table:table-cell table:style-name="ce221" table:formula="of:=['file:///D:/mp/projects/PR0118%20-%20ISO%2011171%20Calibrations/results/2025-05-19-LPA3-NAVAIR-11171-00009/11171-00009-LIVE.ods'#$'6 - B1'.$L$70]" office:value-type="float" office:value="2697" calcext:value-type="float">
            <text:p>2697</text:p>
          </table:table-cell>
          <table:table-cell table:style-name="ce221" table:formula="of:=['file:///D:/mp/projects/PR0118%20-%20ISO%2011171%20Calibrations/results/2025-05-19-LPA3-NAVAIR-11171-00009/11171-00009-LIVE.ods'#$'6 - B1'.$M$70]" office:value-type="float" office:value="2852" calcext:value-type="float">
            <text:p>2852</text:p>
          </table:table-cell>
          <table:table-cell table:style-name="ce221" table:formula="of:=['file:///D:/mp/projects/PR0118%20-%20ISO%2011171%20Calibrations/results/2025-05-19-LPA3-NAVAIR-11171-00009/11171-00009-LIVE.ods'#$'6 - B1'.$N$70]" office:value-type="float" office:value="2841" calcext:value-type="float">
            <text:p>2841</text:p>
          </table:table-cell>
          <table:table-cell table:formula="of:=['file:///D:/mp/projects/PR0118%20-%20ISO%2011171%20Calibrations/results/2025-05-19-LPA3-NAVAIR-11171-00009/11171-00009-LIVE.ods'#$'6 - B1'.$O$70]" office:value-type="float" office:value="2723" calcext:value-type="float">
            <text:p>2723</text:p>
          </table:table-cell>
          <table:table-cell table:style-name="ce221" table:formula="of:=['file:///D:/mp/projects/PR0118%20-%20ISO%2011171%20Calibrations/results/2025-05-19-LPA3-NAVAIR-11171-00009/11171-00009-LIVE.ods'#$'6 - B1'.$P$70]" office:value-type="float" office:value="2692" calcext:value-type="float">
            <text:p>2692</text:p>
          </table:table-cell>
          <table:table-cell table:number-columns-repeated="33"/>
        </table:table-row>
        <table:table-row table:style-name="ro2">
          <table:table-cell table:style-name="ce221" table:formula="of:=['file:///D:/mp/projects/PR0118%20-%20ISO%2011171%20Calibrations/results/2025-05-19-LPA3-NAVAIR-11171-00009/11171-00009-LIVE.ods'#$'6 - B1'.$A$71]" office:value-type="float" office:value="22" calcext:value-type="float">
            <text:p>22</text:p>
          </table:table-cell>
          <table:table-cell table:formula="of:=['file:///D:/mp/projects/PR0118%20-%20ISO%2011171%20Calibrations/results/2025-05-19-LPA3-NAVAIR-11171-00009/11171-00009-LIVE.ods'#$'6 - B1'.$B$71]" office:value-type="float" office:value="1468" calcext:value-type="float">
            <text:p>1468</text:p>
          </table:table-cell>
          <table:table-cell table:formula="of:=['file:///D:/mp/projects/PR0118%20-%20ISO%2011171%20Calibrations/results/2025-05-19-LPA3-NAVAIR-11171-00009/11171-00009-LIVE.ods'#$'6 - B1'.$C$71]" office:value-type="float" office:value="1488" calcext:value-type="float">
            <text:p>1488</text:p>
          </table:table-cell>
          <table:table-cell table:formula="of:=['file:///D:/mp/projects/PR0118%20-%20ISO%2011171%20Calibrations/results/2025-05-19-LPA3-NAVAIR-11171-00009/11171-00009-LIVE.ods'#$'6 - B1'.$D$71]" office:value-type="float" office:value="1571" calcext:value-type="float">
            <text:p>1571</text:p>
          </table:table-cell>
          <table:table-cell table:formula="of:=['file:///D:/mp/projects/PR0118%20-%20ISO%2011171%20Calibrations/results/2025-05-19-LPA3-NAVAIR-11171-00009/11171-00009-LIVE.ods'#$'6 - B1'.$E$71]" office:value-type="float" office:value="1492" calcext:value-type="float">
            <text:p>1492</text:p>
          </table:table-cell>
          <table:table-cell table:formula="of:=['file:///D:/mp/projects/PR0118%20-%20ISO%2011171%20Calibrations/results/2025-05-19-LPA3-NAVAIR-11171-00009/11171-00009-LIVE.ods'#$'6 - B1'.$F$71]" office:value-type="float" office:value="1409" calcext:value-type="float">
            <text:p>1409</text:p>
          </table:table-cell>
          <table:table-cell table:formula="of:=['file:///D:/mp/projects/PR0118%20-%20ISO%2011171%20Calibrations/results/2025-05-19-LPA3-NAVAIR-11171-00009/11171-00009-LIVE.ods'#$'6 - B1'.$G$71]" office:value-type="float" office:value="2625" calcext:value-type="float">
            <text:p>2625</text:p>
          </table:table-cell>
          <table:table-cell table:formula="of:=['file:///D:/mp/projects/PR0118%20-%20ISO%2011171%20Calibrations/results/2025-05-19-LPA3-NAVAIR-11171-00009/11171-00009-LIVE.ods'#$'6 - B1'.$H$71]" office:value-type="float" office:value="2641" calcext:value-type="float">
            <text:p>2641</text:p>
          </table:table-cell>
          <table:table-cell table:style-name="ce221" table:formula="of:=['file:///D:/mp/projects/PR0118%20-%20ISO%2011171%20Calibrations/results/2025-05-19-LPA3-NAVAIR-11171-00009/11171-00009-LIVE.ods'#$'6 - B1'.$I$71]" office:value-type="float" office:value="2610" calcext:value-type="float">
            <text:p>2610</text:p>
          </table:table-cell>
          <table:table-cell table:formula="of:=['file:///D:/mp/projects/PR0118%20-%20ISO%2011171%20Calibrations/results/2025-05-19-LPA3-NAVAIR-11171-00009/11171-00009-LIVE.ods'#$'6 - B1'.$J$71]" office:value-type="float" office:value="2669" calcext:value-type="float">
            <text:p>2669</text:p>
          </table:table-cell>
          <table:table-cell table:style-name="ce221" table:formula="of:=['file:///D:/mp/projects/PR0118%20-%20ISO%2011171%20Calibrations/results/2025-05-19-LPA3-NAVAIR-11171-00009/11171-00009-LIVE.ods'#$'6 - B1'.$K$71]" office:value-type="float" office:value="2549" calcext:value-type="float">
            <text:p>2549</text:p>
          </table:table-cell>
          <table:table-cell table:style-name="ce221" table:formula="of:=['file:///D:/mp/projects/PR0118%20-%20ISO%2011171%20Calibrations/results/2025-05-19-LPA3-NAVAIR-11171-00009/11171-00009-LIVE.ods'#$'6 - B1'.$L$71]" office:value-type="float" office:value="2476" calcext:value-type="float">
            <text:p>2476</text:p>
          </table:table-cell>
          <table:table-cell table:style-name="ce221" table:formula="of:=['file:///D:/mp/projects/PR0118%20-%20ISO%2011171%20Calibrations/results/2025-05-19-LPA3-NAVAIR-11171-00009/11171-00009-LIVE.ods'#$'6 - B1'.$M$71]" office:value-type="float" office:value="2578" calcext:value-type="float">
            <text:p>2578</text:p>
          </table:table-cell>
          <table:table-cell table:style-name="ce221" table:formula="of:=['file:///D:/mp/projects/PR0118%20-%20ISO%2011171%20Calibrations/results/2025-05-19-LPA3-NAVAIR-11171-00009/11171-00009-LIVE.ods'#$'6 - B1'.$N$71]" office:value-type="float" office:value="2610" calcext:value-type="float">
            <text:p>2610</text:p>
          </table:table-cell>
          <table:table-cell table:formula="of:=['file:///D:/mp/projects/PR0118%20-%20ISO%2011171%20Calibrations/results/2025-05-19-LPA3-NAVAIR-11171-00009/11171-00009-LIVE.ods'#$'6 - B1'.$O$71]" office:value-type="float" office:value="2479" calcext:value-type="float">
            <text:p>2479</text:p>
          </table:table-cell>
          <table:table-cell table:style-name="ce221" table:formula="of:=['file:///D:/mp/projects/PR0118%20-%20ISO%2011171%20Calibrations/results/2025-05-19-LPA3-NAVAIR-11171-00009/11171-00009-LIVE.ods'#$'6 - B1'.$P$71]" office:value-type="float" office:value="2441" calcext:value-type="float">
            <text:p>2441</text:p>
          </table:table-cell>
          <table:table-cell table:number-columns-repeated="33"/>
        </table:table-row>
        <table:table-row table:style-name="ro2">
          <table:table-cell table:style-name="ce221" table:formula="of:=['file:///D:/mp/projects/PR0118%20-%20ISO%2011171%20Calibrations/results/2025-05-19-LPA3-NAVAIR-11171-00009/11171-00009-LIVE.ods'#$'6 - B1'.$A$72]" office:value-type="float" office:value="23" calcext:value-type="float">
            <text:p>23</text:p>
          </table:table-cell>
          <table:table-cell table:formula="of:=['file:///D:/mp/projects/PR0118%20-%20ISO%2011171%20Calibrations/results/2025-05-19-LPA3-NAVAIR-11171-00009/11171-00009-LIVE.ods'#$'6 - B1'.$B$72]" office:value-type="float" office:value="1133" calcext:value-type="float">
            <text:p>1133</text:p>
          </table:table-cell>
          <table:table-cell table:formula="of:=['file:///D:/mp/projects/PR0118%20-%20ISO%2011171%20Calibrations/results/2025-05-19-LPA3-NAVAIR-11171-00009/11171-00009-LIVE.ods'#$'6 - B1'.$C$72]" office:value-type="float" office:value="1135" calcext:value-type="float">
            <text:p>1135</text:p>
          </table:table-cell>
          <table:table-cell table:formula="of:=['file:///D:/mp/projects/PR0118%20-%20ISO%2011171%20Calibrations/results/2025-05-19-LPA3-NAVAIR-11171-00009/11171-00009-LIVE.ods'#$'6 - B1'.$D$72]" office:value-type="float" office:value="1188" calcext:value-type="float">
            <text:p>1188</text:p>
          </table:table-cell>
          <table:table-cell table:formula="of:=['file:///D:/mp/projects/PR0118%20-%20ISO%2011171%20Calibrations/results/2025-05-19-LPA3-NAVAIR-11171-00009/11171-00009-LIVE.ods'#$'6 - B1'.$E$72]" office:value-type="float" office:value="1152" calcext:value-type="float">
            <text:p>1152</text:p>
          </table:table-cell>
          <table:table-cell table:formula="of:=['file:///D:/mp/projects/PR0118%20-%20ISO%2011171%20Calibrations/results/2025-05-19-LPA3-NAVAIR-11171-00009/11171-00009-LIVE.ods'#$'6 - B1'.$F$72]" office:value-type="float" office:value="1063" calcext:value-type="float">
            <text:p>1063</text:p>
          </table:table-cell>
          <table:table-cell table:formula="of:=['file:///D:/mp/projects/PR0118%20-%20ISO%2011171%20Calibrations/results/2025-05-19-LPA3-NAVAIR-11171-00009/11171-00009-LIVE.ods'#$'6 - B1'.$G$72]" office:value-type="float" office:value="2319" calcext:value-type="float">
            <text:p>2319</text:p>
          </table:table-cell>
          <table:table-cell table:formula="of:=['file:///D:/mp/projects/PR0118%20-%20ISO%2011171%20Calibrations/results/2025-05-19-LPA3-NAVAIR-11171-00009/11171-00009-LIVE.ods'#$'6 - B1'.$H$72]" office:value-type="float" office:value="2356" calcext:value-type="float">
            <text:p>2356</text:p>
          </table:table-cell>
          <table:table-cell table:style-name="ce221" table:formula="of:=['file:///D:/mp/projects/PR0118%20-%20ISO%2011171%20Calibrations/results/2025-05-19-LPA3-NAVAIR-11171-00009/11171-00009-LIVE.ods'#$'6 - B1'.$I$72]" office:value-type="float" office:value="2337" calcext:value-type="float">
            <text:p>2337</text:p>
          </table:table-cell>
          <table:table-cell table:formula="of:=['file:///D:/mp/projects/PR0118%20-%20ISO%2011171%20Calibrations/results/2025-05-19-LPA3-NAVAIR-11171-00009/11171-00009-LIVE.ods'#$'6 - B1'.$J$72]" office:value-type="float" office:value="2372" calcext:value-type="float">
            <text:p>2372</text:p>
          </table:table-cell>
          <table:table-cell table:style-name="ce221" table:formula="of:=['file:///D:/mp/projects/PR0118%20-%20ISO%2011171%20Calibrations/results/2025-05-19-LPA3-NAVAIR-11171-00009/11171-00009-LIVE.ods'#$'6 - B1'.$K$72]" office:value-type="float" office:value="2277" calcext:value-type="float">
            <text:p>2277</text:p>
          </table:table-cell>
          <table:table-cell table:style-name="ce221" table:formula="of:=['file:///D:/mp/projects/PR0118%20-%20ISO%2011171%20Calibrations/results/2025-05-19-LPA3-NAVAIR-11171-00009/11171-00009-LIVE.ods'#$'6 - B1'.$L$72]" office:value-type="float" office:value="2216" calcext:value-type="float">
            <text:p>2216</text:p>
          </table:table-cell>
          <table:table-cell table:style-name="ce221" table:formula="of:=['file:///D:/mp/projects/PR0118%20-%20ISO%2011171%20Calibrations/results/2025-05-19-LPA3-NAVAIR-11171-00009/11171-00009-LIVE.ods'#$'6 - B1'.$M$72]" office:value-type="float" office:value="2302" calcext:value-type="float">
            <text:p>2302</text:p>
          </table:table-cell>
          <table:table-cell table:style-name="ce221" table:formula="of:=['file:///D:/mp/projects/PR0118%20-%20ISO%2011171%20Calibrations/results/2025-05-19-LPA3-NAVAIR-11171-00009/11171-00009-LIVE.ods'#$'6 - B1'.$N$72]" office:value-type="float" office:value="2326" calcext:value-type="float">
            <text:p>2326</text:p>
          </table:table-cell>
          <table:table-cell table:formula="of:=['file:///D:/mp/projects/PR0118%20-%20ISO%2011171%20Calibrations/results/2025-05-19-LPA3-NAVAIR-11171-00009/11171-00009-LIVE.ods'#$'6 - B1'.$O$72]" office:value-type="float" office:value="2173" calcext:value-type="float">
            <text:p>2173</text:p>
          </table:table-cell>
          <table:table-cell table:style-name="ce221" table:formula="of:=['file:///D:/mp/projects/PR0118%20-%20ISO%2011171%20Calibrations/results/2025-05-19-LPA3-NAVAIR-11171-00009/11171-00009-LIVE.ods'#$'6 - B1'.$P$72]" office:value-type="float" office:value="2152" calcext:value-type="float">
            <text:p>2152</text:p>
          </table:table-cell>
          <table:table-cell table:number-columns-repeated="33"/>
        </table:table-row>
        <table:table-row table:style-name="ro2">
          <table:table-cell table:style-name="ce221" table:formula="of:=['file:///D:/mp/projects/PR0118%20-%20ISO%2011171%20Calibrations/results/2025-05-19-LPA3-NAVAIR-11171-00009/11171-00009-LIVE.ods'#$'6 - B1'.$A$73]" office:value-type="float" office:value="24" calcext:value-type="float">
            <text:p>24</text:p>
          </table:table-cell>
          <table:table-cell table:formula="of:=['file:///D:/mp/projects/PR0118%20-%20ISO%2011171%20Calibrations/results/2025-05-19-LPA3-NAVAIR-11171-00009/11171-00009-LIVE.ods'#$'6 - B1'.$B$73]" office:value-type="float" office:value="874" calcext:value-type="float">
            <text:p>874</text:p>
          </table:table-cell>
          <table:table-cell table:formula="of:=['file:///D:/mp/projects/PR0118%20-%20ISO%2011171%20Calibrations/results/2025-05-19-LPA3-NAVAIR-11171-00009/11171-00009-LIVE.ods'#$'6 - B1'.$C$73]" office:value-type="float" office:value="868" calcext:value-type="float">
            <text:p>868</text:p>
          </table:table-cell>
          <table:table-cell table:formula="of:=['file:///D:/mp/projects/PR0118%20-%20ISO%2011171%20Calibrations/results/2025-05-19-LPA3-NAVAIR-11171-00009/11171-00009-LIVE.ods'#$'6 - B1'.$D$73]" office:value-type="float" office:value="892" calcext:value-type="float">
            <text:p>892</text:p>
          </table:table-cell>
          <table:table-cell table:formula="of:=['file:///D:/mp/projects/PR0118%20-%20ISO%2011171%20Calibrations/results/2025-05-19-LPA3-NAVAIR-11171-00009/11171-00009-LIVE.ods'#$'6 - B1'.$E$73]" office:value-type="float" office:value="902" calcext:value-type="float">
            <text:p>902</text:p>
          </table:table-cell>
          <table:table-cell table:formula="of:=['file:///D:/mp/projects/PR0118%20-%20ISO%2011171%20Calibrations/results/2025-05-19-LPA3-NAVAIR-11171-00009/11171-00009-LIVE.ods'#$'6 - B1'.$F$73]" office:value-type="float" office:value="773" calcext:value-type="float">
            <text:p>773</text:p>
          </table:table-cell>
          <table:table-cell table:formula="of:=['file:///D:/mp/projects/PR0118%20-%20ISO%2011171%20Calibrations/results/2025-05-19-LPA3-NAVAIR-11171-00009/11171-00009-LIVE.ods'#$'6 - B1'.$G$73]" office:value-type="float" office:value="1976" calcext:value-type="float">
            <text:p>1976</text:p>
          </table:table-cell>
          <table:table-cell table:formula="of:=['file:///D:/mp/projects/PR0118%20-%20ISO%2011171%20Calibrations/results/2025-05-19-LPA3-NAVAIR-11171-00009/11171-00009-LIVE.ods'#$'6 - B1'.$H$73]" office:value-type="float" office:value="2002" calcext:value-type="float">
            <text:p>2002</text:p>
          </table:table-cell>
          <table:table-cell table:style-name="ce221" table:formula="of:=['file:///D:/mp/projects/PR0118%20-%20ISO%2011171%20Calibrations/results/2025-05-19-LPA3-NAVAIR-11171-00009/11171-00009-LIVE.ods'#$'6 - B1'.$I$73]" office:value-type="float" office:value="1977" calcext:value-type="float">
            <text:p>1977</text:p>
          </table:table-cell>
          <table:table-cell table:formula="of:=['file:///D:/mp/projects/PR0118%20-%20ISO%2011171%20Calibrations/results/2025-05-19-LPA3-NAVAIR-11171-00009/11171-00009-LIVE.ods'#$'6 - B1'.$J$73]" office:value-type="float" office:value="2040" calcext:value-type="float">
            <text:p>2040</text:p>
          </table:table-cell>
          <table:table-cell table:style-name="ce221" table:formula="of:=['file:///D:/mp/projects/PR0118%20-%20ISO%2011171%20Calibrations/results/2025-05-19-LPA3-NAVAIR-11171-00009/11171-00009-LIVE.ods'#$'6 - B1'.$K$73]" office:value-type="float" office:value="1938" calcext:value-type="float">
            <text:p>1938</text:p>
          </table:table-cell>
          <table:table-cell table:style-name="ce221" table:formula="of:=['file:///D:/mp/projects/PR0118%20-%20ISO%2011171%20Calibrations/results/2025-05-19-LPA3-NAVAIR-11171-00009/11171-00009-LIVE.ods'#$'6 - B1'.$L$73]" office:value-type="float" office:value="1894" calcext:value-type="float">
            <text:p>1894</text:p>
          </table:table-cell>
          <table:table-cell table:style-name="ce221" table:formula="of:=['file:///D:/mp/projects/PR0118%20-%20ISO%2011171%20Calibrations/results/2025-05-19-LPA3-NAVAIR-11171-00009/11171-00009-LIVE.ods'#$'6 - B1'.$M$73]" office:value-type="float" office:value="1908" calcext:value-type="float">
            <text:p>1908</text:p>
          </table:table-cell>
          <table:table-cell table:style-name="ce221" table:formula="of:=['file:///D:/mp/projects/PR0118%20-%20ISO%2011171%20Calibrations/results/2025-05-19-LPA3-NAVAIR-11171-00009/11171-00009-LIVE.ods'#$'6 - B1'.$N$73]" office:value-type="float" office:value="1970" calcext:value-type="float">
            <text:p>1970</text:p>
          </table:table-cell>
          <table:table-cell table:formula="of:=['file:///D:/mp/projects/PR0118%20-%20ISO%2011171%20Calibrations/results/2025-05-19-LPA3-NAVAIR-11171-00009/11171-00009-LIVE.ods'#$'6 - B1'.$O$73]" office:value-type="float" office:value="1854" calcext:value-type="float">
            <text:p>1854</text:p>
          </table:table-cell>
          <table:table-cell table:style-name="ce221" table:formula="of:=['file:///D:/mp/projects/PR0118%20-%20ISO%2011171%20Calibrations/results/2025-05-19-LPA3-NAVAIR-11171-00009/11171-00009-LIVE.ods'#$'6 - B1'.$P$73]" office:value-type="float" office:value="1818" calcext:value-type="float">
            <text:p>1818</text:p>
          </table:table-cell>
          <table:table-cell table:number-columns-repeated="33"/>
        </table:table-row>
        <table:table-row table:style-name="ro2">
          <table:table-cell table:style-name="ce221" table:formula="of:=['file:///D:/mp/projects/PR0118%20-%20ISO%2011171%20Calibrations/results/2025-05-19-LPA3-NAVAIR-11171-00009/11171-00009-LIVE.ods'#$'6 - B1'.$A$74]" office:value-type="float" office:value="25" calcext:value-type="float">
            <text:p>25</text:p>
          </table:table-cell>
          <table:table-cell table:formula="of:=['file:///D:/mp/projects/PR0118%20-%20ISO%2011171%20Calibrations/results/2025-05-19-LPA3-NAVAIR-11171-00009/11171-00009-LIVE.ods'#$'6 - B1'.$B$74]" office:value-type="float" office:value="664" calcext:value-type="float">
            <text:p>664</text:p>
          </table:table-cell>
          <table:table-cell table:formula="of:=['file:///D:/mp/projects/PR0118%20-%20ISO%2011171%20Calibrations/results/2025-05-19-LPA3-NAVAIR-11171-00009/11171-00009-LIVE.ods'#$'6 - B1'.$C$74]" office:value-type="float" office:value="658" calcext:value-type="float">
            <text:p>658</text:p>
          </table:table-cell>
          <table:table-cell table:formula="of:=['file:///D:/mp/projects/PR0118%20-%20ISO%2011171%20Calibrations/results/2025-05-19-LPA3-NAVAIR-11171-00009/11171-00009-LIVE.ods'#$'6 - B1'.$D$74]" office:value-type="float" office:value="677" calcext:value-type="float">
            <text:p>677</text:p>
          </table:table-cell>
          <table:table-cell table:formula="of:=['file:///D:/mp/projects/PR0118%20-%20ISO%2011171%20Calibrations/results/2025-05-19-LPA3-NAVAIR-11171-00009/11171-00009-LIVE.ods'#$'6 - B1'.$E$74]" office:value-type="float" office:value="670" calcext:value-type="float">
            <text:p>670</text:p>
          </table:table-cell>
          <table:table-cell table:formula="of:=['file:///D:/mp/projects/PR0118%20-%20ISO%2011171%20Calibrations/results/2025-05-19-LPA3-NAVAIR-11171-00009/11171-00009-LIVE.ods'#$'6 - B1'.$F$74]" office:value-type="float" office:value="586" calcext:value-type="float">
            <text:p>586</text:p>
          </table:table-cell>
          <table:table-cell table:formula="of:=['file:///D:/mp/projects/PR0118%20-%20ISO%2011171%20Calibrations/results/2025-05-19-LPA3-NAVAIR-11171-00009/11171-00009-LIVE.ods'#$'6 - B1'.$G$74]" office:value-type="float" office:value="1553" calcext:value-type="float">
            <text:p>1553</text:p>
          </table:table-cell>
          <table:table-cell table:formula="of:=['file:///D:/mp/projects/PR0118%20-%20ISO%2011171%20Calibrations/results/2025-05-19-LPA3-NAVAIR-11171-00009/11171-00009-LIVE.ods'#$'6 - B1'.$H$74]" office:value-type="float" office:value="1563" calcext:value-type="float">
            <text:p>1563</text:p>
          </table:table-cell>
          <table:table-cell table:style-name="ce221" table:formula="of:=['file:///D:/mp/projects/PR0118%20-%20ISO%2011171%20Calibrations/results/2025-05-19-LPA3-NAVAIR-11171-00009/11171-00009-LIVE.ods'#$'6 - B1'.$I$74]" office:value-type="float" office:value="1540" calcext:value-type="float">
            <text:p>1540</text:p>
          </table:table-cell>
          <table:table-cell table:formula="of:=['file:///D:/mp/projects/PR0118%20-%20ISO%2011171%20Calibrations/results/2025-05-19-LPA3-NAVAIR-11171-00009/11171-00009-LIVE.ods'#$'6 - B1'.$J$74]" office:value-type="float" office:value="1620" calcext:value-type="float">
            <text:p>1620</text:p>
          </table:table-cell>
          <table:table-cell table:style-name="ce221" table:formula="of:=['file:///D:/mp/projects/PR0118%20-%20ISO%2011171%20Calibrations/results/2025-05-19-LPA3-NAVAIR-11171-00009/11171-00009-LIVE.ods'#$'6 - B1'.$K$74]" office:value-type="float" office:value="1480" calcext:value-type="float">
            <text:p>1480</text:p>
          </table:table-cell>
          <table:table-cell table:style-name="ce221" table:formula="of:=['file:///D:/mp/projects/PR0118%20-%20ISO%2011171%20Calibrations/results/2025-05-19-LPA3-NAVAIR-11171-00009/11171-00009-LIVE.ods'#$'6 - B1'.$L$74]" office:value-type="float" office:value="1474" calcext:value-type="float">
            <text:p>1474</text:p>
          </table:table-cell>
          <table:table-cell table:style-name="ce221" table:formula="of:=['file:///D:/mp/projects/PR0118%20-%20ISO%2011171%20Calibrations/results/2025-05-19-LPA3-NAVAIR-11171-00009/11171-00009-LIVE.ods'#$'6 - B1'.$M$74]" office:value-type="float" office:value="1477" calcext:value-type="float">
            <text:p>1477</text:p>
          </table:table-cell>
          <table:table-cell table:style-name="ce221" table:formula="of:=['file:///D:/mp/projects/PR0118%20-%20ISO%2011171%20Calibrations/results/2025-05-19-LPA3-NAVAIR-11171-00009/11171-00009-LIVE.ods'#$'6 - B1'.$N$74]" office:value-type="float" office:value="1550" calcext:value-type="float">
            <text:p>1550</text:p>
          </table:table-cell>
          <table:table-cell table:formula="of:=['file:///D:/mp/projects/PR0118%20-%20ISO%2011171%20Calibrations/results/2025-05-19-LPA3-NAVAIR-11171-00009/11171-00009-LIVE.ods'#$'6 - B1'.$O$74]" office:value-type="float" office:value="1434" calcext:value-type="float">
            <text:p>1434</text:p>
          </table:table-cell>
          <table:table-cell table:style-name="ce221" table:formula="of:=['file:///D:/mp/projects/PR0118%20-%20ISO%2011171%20Calibrations/results/2025-05-19-LPA3-NAVAIR-11171-00009/11171-00009-LIVE.ods'#$'6 - B1'.$P$74]" office:value-type="float" office:value="1431" calcext:value-type="float">
            <text:p>1431</text:p>
          </table:table-cell>
          <table:table-cell table:number-columns-repeated="33"/>
        </table:table-row>
        <table:table-row table:style-name="ro2">
          <table:table-cell table:style-name="ce221" table:formula="of:=['file:///D:/mp/projects/PR0118%20-%20ISO%2011171%20Calibrations/results/2025-05-19-LPA3-NAVAIR-11171-00009/11171-00009-LIVE.ods'#$'6 - B1'.$A$75]" office:value-type="float" office:value="26" calcext:value-type="float">
            <text:p>26</text:p>
          </table:table-cell>
          <table:table-cell table:formula="of:=['file:///D:/mp/projects/PR0118%20-%20ISO%2011171%20Calibrations/results/2025-05-19-LPA3-NAVAIR-11171-00009/11171-00009-LIVE.ods'#$'6 - B1'.$B$75]" office:value-type="float" office:value="496" calcext:value-type="float">
            <text:p>496</text:p>
          </table:table-cell>
          <table:table-cell table:formula="of:=['file:///D:/mp/projects/PR0118%20-%20ISO%2011171%20Calibrations/results/2025-05-19-LPA3-NAVAIR-11171-00009/11171-00009-LIVE.ods'#$'6 - B1'.$C$75]" office:value-type="float" office:value="507" calcext:value-type="float">
            <text:p>507</text:p>
          </table:table-cell>
          <table:table-cell table:formula="of:=['file:///D:/mp/projects/PR0118%20-%20ISO%2011171%20Calibrations/results/2025-05-19-LPA3-NAVAIR-11171-00009/11171-00009-LIVE.ods'#$'6 - B1'.$D$75]" office:value-type="float" office:value="514" calcext:value-type="float">
            <text:p>514</text:p>
          </table:table-cell>
          <table:table-cell table:formula="of:=['file:///D:/mp/projects/PR0118%20-%20ISO%2011171%20Calibrations/results/2025-05-19-LPA3-NAVAIR-11171-00009/11171-00009-LIVE.ods'#$'6 - B1'.$E$75]" office:value-type="float" office:value="489" calcext:value-type="float">
            <text:p>489</text:p>
          </table:table-cell>
          <table:table-cell table:formula="of:=['file:///D:/mp/projects/PR0118%20-%20ISO%2011171%20Calibrations/results/2025-05-19-LPA3-NAVAIR-11171-00009/11171-00009-LIVE.ods'#$'6 - B1'.$F$75]" office:value-type="float" office:value="433" calcext:value-type="float">
            <text:p>433</text:p>
          </table:table-cell>
          <table:table-cell table:formula="of:=['file:///D:/mp/projects/PR0118%20-%20ISO%2011171%20Calibrations/results/2025-05-19-LPA3-NAVAIR-11171-00009/11171-00009-LIVE.ods'#$'6 - B1'.$G$75]" office:value-type="float" office:value="1105" calcext:value-type="float">
            <text:p>1105</text:p>
          </table:table-cell>
          <table:table-cell table:formula="of:=['file:///D:/mp/projects/PR0118%20-%20ISO%2011171%20Calibrations/results/2025-05-19-LPA3-NAVAIR-11171-00009/11171-00009-LIVE.ods'#$'6 - B1'.$H$75]" office:value-type="float" office:value="1165" calcext:value-type="float">
            <text:p>1165</text:p>
          </table:table-cell>
          <table:table-cell table:style-name="ce221" table:formula="of:=['file:///D:/mp/projects/PR0118%20-%20ISO%2011171%20Calibrations/results/2025-05-19-LPA3-NAVAIR-11171-00009/11171-00009-LIVE.ods'#$'6 - B1'.$I$75]" office:value-type="float" office:value="1134" calcext:value-type="float">
            <text:p>1134</text:p>
          </table:table-cell>
          <table:table-cell table:formula="of:=['file:///D:/mp/projects/PR0118%20-%20ISO%2011171%20Calibrations/results/2025-05-19-LPA3-NAVAIR-11171-00009/11171-00009-LIVE.ods'#$'6 - B1'.$J$75]" office:value-type="float" office:value="1177" calcext:value-type="float">
            <text:p>1177</text:p>
          </table:table-cell>
          <table:table-cell table:style-name="ce221" table:formula="of:=['file:///D:/mp/projects/PR0118%20-%20ISO%2011171%20Calibrations/results/2025-05-19-LPA3-NAVAIR-11171-00009/11171-00009-LIVE.ods'#$'6 - B1'.$K$75]" office:value-type="float" office:value="1034" calcext:value-type="float">
            <text:p>1034</text:p>
          </table:table-cell>
          <table:table-cell table:style-name="ce221" table:formula="of:=['file:///D:/mp/projects/PR0118%20-%20ISO%2011171%20Calibrations/results/2025-05-19-LPA3-NAVAIR-11171-00009/11171-00009-LIVE.ods'#$'6 - B1'.$L$75]" office:value-type="float" office:value="1079" calcext:value-type="float">
            <text:p>1079</text:p>
          </table:table-cell>
          <table:table-cell table:style-name="ce221" table:formula="of:=['file:///D:/mp/projects/PR0118%20-%20ISO%2011171%20Calibrations/results/2025-05-19-LPA3-NAVAIR-11171-00009/11171-00009-LIVE.ods'#$'6 - B1'.$M$75]" office:value-type="float" office:value="1076" calcext:value-type="float">
            <text:p>1076</text:p>
          </table:table-cell>
          <table:table-cell table:style-name="ce221" table:formula="of:=['file:///D:/mp/projects/PR0118%20-%20ISO%2011171%20Calibrations/results/2025-05-19-LPA3-NAVAIR-11171-00009/11171-00009-LIVE.ods'#$'6 - B1'.$N$75]" office:value-type="float" office:value="1130" calcext:value-type="float">
            <text:p>1130</text:p>
          </table:table-cell>
          <table:table-cell table:formula="of:=['file:///D:/mp/projects/PR0118%20-%20ISO%2011171%20Calibrations/results/2025-05-19-LPA3-NAVAIR-11171-00009/11171-00009-LIVE.ods'#$'6 - B1'.$O$75]" office:value-type="float" office:value="1000" calcext:value-type="float">
            <text:p>1000</text:p>
          </table:table-cell>
          <table:table-cell table:style-name="ce221" table:formula="of:=['file:///D:/mp/projects/PR0118%20-%20ISO%2011171%20Calibrations/results/2025-05-19-LPA3-NAVAIR-11171-00009/11171-00009-LIVE.ods'#$'6 - B1'.$P$75]" office:value-type="float" office:value="1004" calcext:value-type="float">
            <text:p>1004</text:p>
          </table:table-cell>
          <table:table-cell table:number-columns-repeated="33"/>
        </table:table-row>
        <table:table-row table:style-name="ro2">
          <table:table-cell table:style-name="ce221" table:formula="of:=['file:///D:/mp/projects/PR0118%20-%20ISO%2011171%20Calibrations/results/2025-05-19-LPA3-NAVAIR-11171-00009/11171-00009-LIVE.ods'#$'6 - B1'.$A$76]" office:value-type="float" office:value="27" calcext:value-type="float">
            <text:p>27</text:p>
          </table:table-cell>
          <table:table-cell table:formula="of:=['file:///D:/mp/projects/PR0118%20-%20ISO%2011171%20Calibrations/results/2025-05-19-LPA3-NAVAIR-11171-00009/11171-00009-LIVE.ods'#$'6 - B1'.$B$76]" office:value-type="float" office:value="377" calcext:value-type="float">
            <text:p>377</text:p>
          </table:table-cell>
          <table:table-cell table:formula="of:=['file:///D:/mp/projects/PR0118%20-%20ISO%2011171%20Calibrations/results/2025-05-19-LPA3-NAVAIR-11171-00009/11171-00009-LIVE.ods'#$'6 - B1'.$C$76]" office:value-type="float" office:value="368" calcext:value-type="float">
            <text:p>368</text:p>
          </table:table-cell>
          <table:table-cell table:formula="of:=['file:///D:/mp/projects/PR0118%20-%20ISO%2011171%20Calibrations/results/2025-05-19-LPA3-NAVAIR-11171-00009/11171-00009-LIVE.ods'#$'6 - B1'.$D$76]" office:value-type="float" office:value="371" calcext:value-type="float">
            <text:p>371</text:p>
          </table:table-cell>
          <table:table-cell table:formula="of:=['file:///D:/mp/projects/PR0118%20-%20ISO%2011171%20Calibrations/results/2025-05-19-LPA3-NAVAIR-11171-00009/11171-00009-LIVE.ods'#$'6 - B1'.$E$76]" office:value-type="float" office:value="367" calcext:value-type="float">
            <text:p>367</text:p>
          </table:table-cell>
          <table:table-cell table:formula="of:=['file:///D:/mp/projects/PR0118%20-%20ISO%2011171%20Calibrations/results/2025-05-19-LPA3-NAVAIR-11171-00009/11171-00009-LIVE.ods'#$'6 - B1'.$F$76]" office:value-type="float" office:value="314" calcext:value-type="float">
            <text:p>314</text:p>
          </table:table-cell>
          <table:table-cell table:formula="of:=['file:///D:/mp/projects/PR0118%20-%20ISO%2011171%20Calibrations/results/2025-05-19-LPA3-NAVAIR-11171-00009/11171-00009-LIVE.ods'#$'6 - B1'.$G$76]" office:value-type="float" office:value="758" calcext:value-type="float">
            <text:p>758</text:p>
          </table:table-cell>
          <table:table-cell table:formula="of:=['file:///D:/mp/projects/PR0118%20-%20ISO%2011171%20Calibrations/results/2025-05-19-LPA3-NAVAIR-11171-00009/11171-00009-LIVE.ods'#$'6 - B1'.$H$76]" office:value-type="float" office:value="805" calcext:value-type="float">
            <text:p>805</text:p>
          </table:table-cell>
          <table:table-cell table:style-name="ce221" table:formula="of:=['file:///D:/mp/projects/PR0118%20-%20ISO%2011171%20Calibrations/results/2025-05-19-LPA3-NAVAIR-11171-00009/11171-00009-LIVE.ods'#$'6 - B1'.$I$76]" office:value-type="float" office:value="804" calcext:value-type="float">
            <text:p>804</text:p>
          </table:table-cell>
          <table:table-cell table:formula="of:=['file:///D:/mp/projects/PR0118%20-%20ISO%2011171%20Calibrations/results/2025-05-19-LPA3-NAVAIR-11171-00009/11171-00009-LIVE.ods'#$'6 - B1'.$J$76]" office:value-type="float" office:value="826" calcext:value-type="float">
            <text:p>826</text:p>
          </table:table-cell>
          <table:table-cell table:style-name="ce221" table:formula="of:=['file:///D:/mp/projects/PR0118%20-%20ISO%2011171%20Calibrations/results/2025-05-19-LPA3-NAVAIR-11171-00009/11171-00009-LIVE.ods'#$'6 - B1'.$K$76]" office:value-type="float" office:value="700" calcext:value-type="float">
            <text:p>700</text:p>
          </table:table-cell>
          <table:table-cell table:style-name="ce221" table:formula="of:=['file:///D:/mp/projects/PR0118%20-%20ISO%2011171%20Calibrations/results/2025-05-19-LPA3-NAVAIR-11171-00009/11171-00009-LIVE.ods'#$'6 - B1'.$L$76]" office:value-type="float" office:value="730" calcext:value-type="float">
            <text:p>730</text:p>
          </table:table-cell>
          <table:table-cell table:style-name="ce221" table:formula="of:=['file:///D:/mp/projects/PR0118%20-%20ISO%2011171%20Calibrations/results/2025-05-19-LPA3-NAVAIR-11171-00009/11171-00009-LIVE.ods'#$'6 - B1'.$M$76]" office:value-type="float" office:value="736" calcext:value-type="float">
            <text:p>736</text:p>
          </table:table-cell>
          <table:table-cell table:style-name="ce221" table:formula="of:=['file:///D:/mp/projects/PR0118%20-%20ISO%2011171%20Calibrations/results/2025-05-19-LPA3-NAVAIR-11171-00009/11171-00009-LIVE.ods'#$'6 - B1'.$N$76]" office:value-type="float" office:value="809" calcext:value-type="float">
            <text:p>809</text:p>
          </table:table-cell>
          <table:table-cell table:formula="of:=['file:///D:/mp/projects/PR0118%20-%20ISO%2011171%20Calibrations/results/2025-05-19-LPA3-NAVAIR-11171-00009/11171-00009-LIVE.ods'#$'6 - B1'.$O$76]" office:value-type="float" office:value="695" calcext:value-type="float">
            <text:p>695</text:p>
          </table:table-cell>
          <table:table-cell table:style-name="ce221" table:formula="of:=['file:///D:/mp/projects/PR0118%20-%20ISO%2011171%20Calibrations/results/2025-05-19-LPA3-NAVAIR-11171-00009/11171-00009-LIVE.ods'#$'6 - B1'.$P$76]" office:value-type="float" office:value="702" calcext:value-type="float">
            <text:p>702</text:p>
          </table:table-cell>
          <table:table-cell table:number-columns-repeated="33"/>
        </table:table-row>
        <table:table-row table:style-name="ro2">
          <table:table-cell table:style-name="ce221" table:formula="of:=['file:///D:/mp/projects/PR0118%20-%20ISO%2011171%20Calibrations/results/2025-05-19-LPA3-NAVAIR-11171-00009/11171-00009-LIVE.ods'#$'6 - B1'.$A$77]" office:value-type="float" office:value="28" calcext:value-type="float">
            <text:p>28</text:p>
          </table:table-cell>
          <table:table-cell table:formula="of:=['file:///D:/mp/projects/PR0118%20-%20ISO%2011171%20Calibrations/results/2025-05-19-LPA3-NAVAIR-11171-00009/11171-00009-LIVE.ods'#$'6 - B1'.$B$77]" office:value-type="float" office:value="271" calcext:value-type="float">
            <text:p>271</text:p>
          </table:table-cell>
          <table:table-cell table:formula="of:=['file:///D:/mp/projects/PR0118%20-%20ISO%2011171%20Calibrations/results/2025-05-19-LPA3-NAVAIR-11171-00009/11171-00009-LIVE.ods'#$'6 - B1'.$C$77]" office:value-type="float" office:value="266" calcext:value-type="float">
            <text:p>266</text:p>
          </table:table-cell>
          <table:table-cell table:formula="of:=['file:///D:/mp/projects/PR0118%20-%20ISO%2011171%20Calibrations/results/2025-05-19-LPA3-NAVAIR-11171-00009/11171-00009-LIVE.ods'#$'6 - B1'.$D$77]" office:value-type="float" office:value="276" calcext:value-type="float">
            <text:p>276</text:p>
          </table:table-cell>
          <table:table-cell table:formula="of:=['file:///D:/mp/projects/PR0118%20-%20ISO%2011171%20Calibrations/results/2025-05-19-LPA3-NAVAIR-11171-00009/11171-00009-LIVE.ods'#$'6 - B1'.$E$77]" office:value-type="float" office:value="260" calcext:value-type="float">
            <text:p>260</text:p>
          </table:table-cell>
          <table:table-cell table:formula="of:=['file:///D:/mp/projects/PR0118%20-%20ISO%2011171%20Calibrations/results/2025-05-19-LPA3-NAVAIR-11171-00009/11171-00009-LIVE.ods'#$'6 - B1'.$F$77]" office:value-type="float" office:value="204" calcext:value-type="float">
            <text:p>204</text:p>
          </table:table-cell>
          <table:table-cell table:formula="of:=['file:///D:/mp/projects/PR0118%20-%20ISO%2011171%20Calibrations/results/2025-05-19-LPA3-NAVAIR-11171-00009/11171-00009-LIVE.ods'#$'6 - B1'.$G$77]" office:value-type="float" office:value="528" calcext:value-type="float">
            <text:p>528</text:p>
          </table:table-cell>
          <table:table-cell table:formula="of:=['file:///D:/mp/projects/PR0118%20-%20ISO%2011171%20Calibrations/results/2025-05-19-LPA3-NAVAIR-11171-00009/11171-00009-LIVE.ods'#$'6 - B1'.$H$77]" office:value-type="float" office:value="574" calcext:value-type="float">
            <text:p>574</text:p>
          </table:table-cell>
          <table:table-cell table:style-name="ce221" table:formula="of:=['file:///D:/mp/projects/PR0118%20-%20ISO%2011171%20Calibrations/results/2025-05-19-LPA3-NAVAIR-11171-00009/11171-00009-LIVE.ods'#$'6 - B1'.$I$77]" office:value-type="float" office:value="561" calcext:value-type="float">
            <text:p>561</text:p>
          </table:table-cell>
          <table:table-cell table:formula="of:=['file:///D:/mp/projects/PR0118%20-%20ISO%2011171%20Calibrations/results/2025-05-19-LPA3-NAVAIR-11171-00009/11171-00009-LIVE.ods'#$'6 - B1'.$J$77]" office:value-type="float" office:value="575" calcext:value-type="float">
            <text:p>575</text:p>
          </table:table-cell>
          <table:table-cell table:style-name="ce221" table:formula="of:=['file:///D:/mp/projects/PR0118%20-%20ISO%2011171%20Calibrations/results/2025-05-19-LPA3-NAVAIR-11171-00009/11171-00009-LIVE.ods'#$'6 - B1'.$K$77]" office:value-type="float" office:value="494" calcext:value-type="float">
            <text:p>494</text:p>
          </table:table-cell>
          <table:table-cell table:style-name="ce221" table:formula="of:=['file:///D:/mp/projects/PR0118%20-%20ISO%2011171%20Calibrations/results/2025-05-19-LPA3-NAVAIR-11171-00009/11171-00009-LIVE.ods'#$'6 - B1'.$L$77]" office:value-type="float" office:value="530" calcext:value-type="float">
            <text:p>530</text:p>
          </table:table-cell>
          <table:table-cell table:style-name="ce221" table:formula="of:=['file:///D:/mp/projects/PR0118%20-%20ISO%2011171%20Calibrations/results/2025-05-19-LPA3-NAVAIR-11171-00009/11171-00009-LIVE.ods'#$'6 - B1'.$M$77]" office:value-type="float" office:value="501" calcext:value-type="float">
            <text:p>501</text:p>
          </table:table-cell>
          <table:table-cell table:style-name="ce221" table:formula="of:=['file:///D:/mp/projects/PR0118%20-%20ISO%2011171%20Calibrations/results/2025-05-19-LPA3-NAVAIR-11171-00009/11171-00009-LIVE.ods'#$'6 - B1'.$N$77]" office:value-type="float" office:value="553" calcext:value-type="float">
            <text:p>553</text:p>
          </table:table-cell>
          <table:table-cell table:formula="of:=['file:///D:/mp/projects/PR0118%20-%20ISO%2011171%20Calibrations/results/2025-05-19-LPA3-NAVAIR-11171-00009/11171-00009-LIVE.ods'#$'6 - B1'.$O$77]" office:value-type="float" office:value="512" calcext:value-type="float">
            <text:p>512</text:p>
          </table:table-cell>
          <table:table-cell table:style-name="ce221" table:formula="of:=['file:///D:/mp/projects/PR0118%20-%20ISO%2011171%20Calibrations/results/2025-05-19-LPA3-NAVAIR-11171-00009/11171-00009-LIVE.ods'#$'6 - B1'.$P$77]" office:value-type="float" office:value="483" calcext:value-type="float">
            <text:p>483</text:p>
          </table:table-cell>
          <table:table-cell table:number-columns-repeated="33"/>
        </table:table-row>
        <table:table-row table:style-name="ro2">
          <table:table-cell table:style-name="ce221" table:formula="of:=['file:///D:/mp/projects/PR0118%20-%20ISO%2011171%20Calibrations/results/2025-05-19-LPA3-NAVAIR-11171-00009/11171-00009-LIVE.ods'#$'6 - B1'.$A$78]" office:value-type="float" office:value="29" calcext:value-type="float">
            <text:p>29</text:p>
          </table:table-cell>
          <table:table-cell table:formula="of:=['file:///D:/mp/projects/PR0118%20-%20ISO%2011171%20Calibrations/results/2025-05-19-LPA3-NAVAIR-11171-00009/11171-00009-LIVE.ods'#$'6 - B1'.$B$78]" office:value-type="float" office:value="205" calcext:value-type="float">
            <text:p>205</text:p>
          </table:table-cell>
          <table:table-cell table:formula="of:=['file:///D:/mp/projects/PR0118%20-%20ISO%2011171%20Calibrations/results/2025-05-19-LPA3-NAVAIR-11171-00009/11171-00009-LIVE.ods'#$'6 - B1'.$C$78]" office:value-type="float" office:value="190" calcext:value-type="float">
            <text:p>190</text:p>
          </table:table-cell>
          <table:table-cell table:formula="of:=['file:///D:/mp/projects/PR0118%20-%20ISO%2011171%20Calibrations/results/2025-05-19-LPA3-NAVAIR-11171-00009/11171-00009-LIVE.ods'#$'6 - B1'.$D$78]" office:value-type="float" office:value="204" calcext:value-type="float">
            <text:p>204</text:p>
          </table:table-cell>
          <table:table-cell table:formula="of:=['file:///D:/mp/projects/PR0118%20-%20ISO%2011171%20Calibrations/results/2025-05-19-LPA3-NAVAIR-11171-00009/11171-00009-LIVE.ods'#$'6 - B1'.$E$78]" office:value-type="float" office:value="187" calcext:value-type="float">
            <text:p>187</text:p>
          </table:table-cell>
          <table:table-cell table:formula="of:=['file:///D:/mp/projects/PR0118%20-%20ISO%2011171%20Calibrations/results/2025-05-19-LPA3-NAVAIR-11171-00009/11171-00009-LIVE.ods'#$'6 - B1'.$F$78]" office:value-type="float" office:value="143" calcext:value-type="float">
            <text:p>143</text:p>
          </table:table-cell>
          <table:table-cell table:formula="of:=['file:///D:/mp/projects/PR0118%20-%20ISO%2011171%20Calibrations/results/2025-05-19-LPA3-NAVAIR-11171-00009/11171-00009-LIVE.ods'#$'6 - B1'.$G$78]" office:value-type="float" office:value="379" calcext:value-type="float">
            <text:p>379</text:p>
          </table:table-cell>
          <table:table-cell table:formula="of:=['file:///D:/mp/projects/PR0118%20-%20ISO%2011171%20Calibrations/results/2025-05-19-LPA3-NAVAIR-11171-00009/11171-00009-LIVE.ods'#$'6 - B1'.$H$78]" office:value-type="float" office:value="404" calcext:value-type="float">
            <text:p>404</text:p>
          </table:table-cell>
          <table:table-cell table:style-name="ce221" table:formula="of:=['file:///D:/mp/projects/PR0118%20-%20ISO%2011171%20Calibrations/results/2025-05-19-LPA3-NAVAIR-11171-00009/11171-00009-LIVE.ods'#$'6 - B1'.$I$78]" office:value-type="float" office:value="381" calcext:value-type="float">
            <text:p>381</text:p>
          </table:table-cell>
          <table:table-cell table:formula="of:=['file:///D:/mp/projects/PR0118%20-%20ISO%2011171%20Calibrations/results/2025-05-19-LPA3-NAVAIR-11171-00009/11171-00009-LIVE.ods'#$'6 - B1'.$J$78]" office:value-type="float" office:value="411" calcext:value-type="float">
            <text:p>411</text:p>
          </table:table-cell>
          <table:table-cell table:style-name="ce221" table:formula="of:=['file:///D:/mp/projects/PR0118%20-%20ISO%2011171%20Calibrations/results/2025-05-19-LPA3-NAVAIR-11171-00009/11171-00009-LIVE.ods'#$'6 - B1'.$K$78]" office:value-type="float" office:value="347" calcext:value-type="float">
            <text:p>347</text:p>
          </table:table-cell>
          <table:table-cell table:style-name="ce221" table:formula="of:=['file:///D:/mp/projects/PR0118%20-%20ISO%2011171%20Calibrations/results/2025-05-19-LPA3-NAVAIR-11171-00009/11171-00009-LIVE.ods'#$'6 - B1'.$L$78]" office:value-type="float" office:value="376" calcext:value-type="float">
            <text:p>376</text:p>
          </table:table-cell>
          <table:table-cell table:style-name="ce221" table:formula="of:=['file:///D:/mp/projects/PR0118%20-%20ISO%2011171%20Calibrations/results/2025-05-19-LPA3-NAVAIR-11171-00009/11171-00009-LIVE.ods'#$'6 - B1'.$M$78]" office:value-type="float" office:value="348" calcext:value-type="float">
            <text:p>348</text:p>
          </table:table-cell>
          <table:table-cell table:style-name="ce221" table:formula="of:=['file:///D:/mp/projects/PR0118%20-%20ISO%2011171%20Calibrations/results/2025-05-19-LPA3-NAVAIR-11171-00009/11171-00009-LIVE.ods'#$'6 - B1'.$N$78]" office:value-type="float" office:value="395" calcext:value-type="float">
            <text:p>395</text:p>
          </table:table-cell>
          <table:table-cell table:formula="of:=['file:///D:/mp/projects/PR0118%20-%20ISO%2011171%20Calibrations/results/2025-05-19-LPA3-NAVAIR-11171-00009/11171-00009-LIVE.ods'#$'6 - B1'.$O$78]" office:value-type="float" office:value="372" calcext:value-type="float">
            <text:p>372</text:p>
          </table:table-cell>
          <table:table-cell table:style-name="ce221" table:formula="of:=['file:///D:/mp/projects/PR0118%20-%20ISO%2011171%20Calibrations/results/2025-05-19-LPA3-NAVAIR-11171-00009/11171-00009-LIVE.ods'#$'6 - B1'.$P$78]" office:value-type="float" office:value="327" calcext:value-type="float">
            <text:p>327</text:p>
          </table:table-cell>
          <table:table-cell table:number-columns-repeated="33"/>
        </table:table-row>
        <table:table-row table:style-name="ro2">
          <table:table-cell table:style-name="ce221" table:formula="of:=['file:///D:/mp/projects/PR0118%20-%20ISO%2011171%20Calibrations/results/2025-05-19-LPA3-NAVAIR-11171-00009/11171-00009-LIVE.ods'#$'6 - B1'.$A$79]" office:value-type="float" office:value="30" calcext:value-type="float">
            <text:p>30</text:p>
          </table:table-cell>
          <table:table-cell table:formula="of:=['file:///D:/mp/projects/PR0118%20-%20ISO%2011171%20Calibrations/results/2025-05-19-LPA3-NAVAIR-11171-00009/11171-00009-LIVE.ods'#$'6 - B1'.$B$79]" office:value-type="float" office:value="153" calcext:value-type="float">
            <text:p>153</text:p>
          </table:table-cell>
          <table:table-cell table:formula="of:=['file:///D:/mp/projects/PR0118%20-%20ISO%2011171%20Calibrations/results/2025-05-19-LPA3-NAVAIR-11171-00009/11171-00009-LIVE.ods'#$'6 - B1'.$C$79]" office:value-type="float" office:value="130" calcext:value-type="float">
            <text:p>130</text:p>
          </table:table-cell>
          <table:table-cell table:formula="of:=['file:///D:/mp/projects/PR0118%20-%20ISO%2011171%20Calibrations/results/2025-05-19-LPA3-NAVAIR-11171-00009/11171-00009-LIVE.ods'#$'6 - B1'.$D$79]" office:value-type="float" office:value="136" calcext:value-type="float">
            <text:p>136</text:p>
          </table:table-cell>
          <table:table-cell table:formula="of:=['file:///D:/mp/projects/PR0118%20-%20ISO%2011171%20Calibrations/results/2025-05-19-LPA3-NAVAIR-11171-00009/11171-00009-LIVE.ods'#$'6 - B1'.$E$79]" office:value-type="float" office:value="120" calcext:value-type="float">
            <text:p>120</text:p>
          </table:table-cell>
          <table:table-cell table:formula="of:=['file:///D:/mp/projects/PR0118%20-%20ISO%2011171%20Calibrations/results/2025-05-19-LPA3-NAVAIR-11171-00009/11171-00009-LIVE.ods'#$'6 - B1'.$F$79]" office:value-type="float" office:value="91" calcext:value-type="float">
            <text:p>91</text:p>
          </table:table-cell>
          <table:table-cell table:formula="of:=['file:///D:/mp/projects/PR0118%20-%20ISO%2011171%20Calibrations/results/2025-05-19-LPA3-NAVAIR-11171-00009/11171-00009-LIVE.ods'#$'6 - B1'.$G$79]" office:value-type="float" office:value="257" calcext:value-type="float">
            <text:p>257</text:p>
          </table:table-cell>
          <table:table-cell table:formula="of:=['file:///D:/mp/projects/PR0118%20-%20ISO%2011171%20Calibrations/results/2025-05-19-LPA3-NAVAIR-11171-00009/11171-00009-LIVE.ods'#$'6 - B1'.$H$79]" office:value-type="float" office:value="304" calcext:value-type="float">
            <text:p>304</text:p>
          </table:table-cell>
          <table:table-cell table:style-name="ce221" table:formula="of:=['file:///D:/mp/projects/PR0118%20-%20ISO%2011171%20Calibrations/results/2025-05-19-LPA3-NAVAIR-11171-00009/11171-00009-LIVE.ods'#$'6 - B1'.$I$79]" office:value-type="float" office:value="276" calcext:value-type="float">
            <text:p>276</text:p>
          </table:table-cell>
          <table:table-cell table:formula="of:=['file:///D:/mp/projects/PR0118%20-%20ISO%2011171%20Calibrations/results/2025-05-19-LPA3-NAVAIR-11171-00009/11171-00009-LIVE.ods'#$'6 - B1'.$J$79]" office:value-type="float" office:value="307" calcext:value-type="float">
            <text:p>307</text:p>
          </table:table-cell>
          <table:table-cell table:style-name="ce226" table:formula="of:=['file:///D:/mp/projects/PR0118%20-%20ISO%2011171%20Calibrations/results/2025-05-19-LPA3-NAVAIR-11171-00009/11171-00009-LIVE.ods'#$'6 - B1'.$K$79]" office:value-type="float" office:value="236" calcext:value-type="float">
            <text:p>236</text:p>
          </table:table-cell>
          <table:table-cell table:style-name="ce221" table:formula="of:=['file:///D:/mp/projects/PR0118%20-%20ISO%2011171%20Calibrations/results/2025-05-19-LPA3-NAVAIR-11171-00009/11171-00009-LIVE.ods'#$'6 - B1'.$L$79]" office:value-type="float" office:value="275" calcext:value-type="float">
            <text:p>275</text:p>
          </table:table-cell>
          <table:table-cell table:style-name="ce221" table:formula="of:=['file:///D:/mp/projects/PR0118%20-%20ISO%2011171%20Calibrations/results/2025-05-19-LPA3-NAVAIR-11171-00009/11171-00009-LIVE.ods'#$'6 - B1'.$M$79]" office:value-type="float" office:value="260" calcext:value-type="float">
            <text:p>260</text:p>
          </table:table-cell>
          <table:table-cell table:style-name="ce221" table:formula="of:=['file:///D:/mp/projects/PR0118%20-%20ISO%2011171%20Calibrations/results/2025-05-19-LPA3-NAVAIR-11171-00009/11171-00009-LIVE.ods'#$'6 - B1'.$N$79]" office:value-type="float" office:value="295" calcext:value-type="float">
            <text:p>295</text:p>
          </table:table-cell>
          <table:table-cell table:formula="of:=['file:///D:/mp/projects/PR0118%20-%20ISO%2011171%20Calibrations/results/2025-05-19-LPA3-NAVAIR-11171-00009/11171-00009-LIVE.ods'#$'6 - B1'.$O$79]" office:value-type="float" office:value="256" calcext:value-type="float">
            <text:p>256</text:p>
          </table:table-cell>
          <table:table-cell table:style-name="ce221" table:formula="of:=['file:///D:/mp/projects/PR0118%20-%20ISO%2011171%20Calibrations/results/2025-05-19-LPA3-NAVAIR-11171-00009/11171-00009-LIVE.ods'#$'6 - B1'.$P$79]" office:value-type="float" office:value="236" calcext:value-type="float">
            <text:p>236</text:p>
          </table:table-cell>
          <table:table-cell table:number-columns-repeated="33"/>
        </table:table-row>
        <table:table-row table:style-name="ro2">
          <table:table-cell table:style-name="ce221" table:formula="of:=['file:///D:/mp/projects/PR0118%20-%20ISO%2011171%20Calibrations/results/2025-05-19-LPA3-NAVAIR-11171-00009/11171-00009-LIVE.ods'#$'6 - B1'.$A$80]" office:value-type="float" office:value="38" calcext:value-type="float">
            <text:p>38</text:p>
          </table:table-cell>
          <table:table-cell table:formula="of:=['file:///D:/mp/projects/PR0118%20-%20ISO%2011171%20Calibrations/results/2025-05-19-LPA3-NAVAIR-11171-00009/11171-00009-LIVE.ods'#$'6 - B1'.$B$80]" office:value-type="float" office:value="99" calcext:value-type="float">
            <text:p>99</text:p>
          </table:table-cell>
          <table:table-cell table:formula="of:=['file:///D:/mp/projects/PR0118%20-%20ISO%2011171%20Calibrations/results/2025-05-19-LPA3-NAVAIR-11171-00009/11171-00009-LIVE.ods'#$'6 - B1'.$C$80]" office:value-type="float" office:value="93" calcext:value-type="float">
            <text:p>93</text:p>
          </table:table-cell>
          <table:table-cell table:formula="of:=['file:///D:/mp/projects/PR0118%20-%20ISO%2011171%20Calibrations/results/2025-05-19-LPA3-NAVAIR-11171-00009/11171-00009-LIVE.ods'#$'6 - B1'.$D$80]" office:value-type="float" office:value="95" calcext:value-type="float">
            <text:p>95</text:p>
          </table:table-cell>
          <table:table-cell table:formula="of:=['file:///D:/mp/projects/PR0118%20-%20ISO%2011171%20Calibrations/results/2025-05-19-LPA3-NAVAIR-11171-00009/11171-00009-LIVE.ods'#$'6 - B1'.$E$80]" office:value-type="float" office:value="78" calcext:value-type="float">
            <text:p>78</text:p>
          </table:table-cell>
          <table:table-cell table:formula="of:=['file:///D:/mp/projects/PR0118%20-%20ISO%2011171%20Calibrations/results/2025-05-19-LPA3-NAVAIR-11171-00009/11171-00009-LIVE.ods'#$'6 - B1'.$F$80]" office:value-type="float" office:value="60" calcext:value-type="float">
            <text:p>60</text:p>
          </table:table-cell>
          <table:table-cell table:formula="of:=['file:///D:/mp/projects/PR0118%20-%20ISO%2011171%20Calibrations/results/2025-05-19-LPA3-NAVAIR-11171-00009/11171-00009-LIVE.ods'#$'6 - B1'.$G$80]" office:value-type="float" office:value="48" calcext:value-type="float">
            <text:p>48</text:p>
          </table:table-cell>
          <table:table-cell table:formula="of:=['file:///D:/mp/projects/PR0118%20-%20ISO%2011171%20Calibrations/results/2025-05-19-LPA3-NAVAIR-11171-00009/11171-00009-LIVE.ods'#$'6 - B1'.$H$80]" office:value-type="float" office:value="52" calcext:value-type="float">
            <text:p>52</text:p>
          </table:table-cell>
          <table:table-cell table:style-name="ce221" table:formula="of:=['file:///D:/mp/projects/PR0118%20-%20ISO%2011171%20Calibrations/results/2025-05-19-LPA3-NAVAIR-11171-00009/11171-00009-LIVE.ods'#$'6 - B1'.$I$80]" office:value-type="float" office:value="51" calcext:value-type="float">
            <text:p>51</text:p>
          </table:table-cell>
          <table:table-cell table:formula="of:=['file:///D:/mp/projects/PR0118%20-%20ISO%2011171%20Calibrations/results/2025-05-19-LPA3-NAVAIR-11171-00009/11171-00009-LIVE.ods'#$'6 - B1'.$J$80]" office:value-type="float" office:value="59" calcext:value-type="float">
            <text:p>59</text:p>
          </table:table-cell>
          <table:table-cell table:style-name="ce221" table:formula="of:=['file:///D:/mp/projects/PR0118%20-%20ISO%2011171%20Calibrations/results/2025-05-19-LPA3-NAVAIR-11171-00009/11171-00009-LIVE.ods'#$'6 - B1'.$K$80]" office:value-type="float" office:value="37" calcext:value-type="float">
            <text:p>37</text:p>
          </table:table-cell>
          <table:table-cell table:style-name="ce221" table:formula="of:=['file:///D:/mp/projects/PR0118%20-%20ISO%2011171%20Calibrations/results/2025-05-19-LPA3-NAVAIR-11171-00009/11171-00009-LIVE.ods'#$'6 - B1'.$L$80]" office:value-type="float" office:value="58" calcext:value-type="float">
            <text:p>58</text:p>
          </table:table-cell>
          <table:table-cell table:style-name="ce221" table:formula="of:=['file:///D:/mp/projects/PR0118%20-%20ISO%2011171%20Calibrations/results/2025-05-19-LPA3-NAVAIR-11171-00009/11171-00009-LIVE.ods'#$'6 - B1'.$M$80]" office:value-type="float" office:value="50" calcext:value-type="float">
            <text:p>50</text:p>
          </table:table-cell>
          <table:table-cell table:style-name="ce221" table:formula="of:=['file:///D:/mp/projects/PR0118%20-%20ISO%2011171%20Calibrations/results/2025-05-19-LPA3-NAVAIR-11171-00009/11171-00009-LIVE.ods'#$'6 - B1'.$N$80]" office:value-type="float" office:value="52" calcext:value-type="float">
            <text:p>52</text:p>
          </table:table-cell>
          <table:table-cell table:formula="of:=['file:///D:/mp/projects/PR0118%20-%20ISO%2011171%20Calibrations/results/2025-05-19-LPA3-NAVAIR-11171-00009/11171-00009-LIVE.ods'#$'6 - B1'.$O$80]" office:value-type="float" office:value="40" calcext:value-type="float">
            <text:p>40</text:p>
          </table:table-cell>
          <table:table-cell table:style-name="ce221" table:formula="of:=['file:///D:/mp/projects/PR0118%20-%20ISO%2011171%20Calibrations/results/2025-05-19-LPA3-NAVAIR-11171-00009/11171-00009-LIVE.ods'#$'6 - B1'.$P$80]" office:value-type="float" office:value="37" calcext:value-type="float">
            <text:p>37</text:p>
          </table:table-cell>
          <table:table-cell table:number-columns-repeated="33"/>
        </table:table-row>
        <table:table-row table:style-name="ro2">
          <table:table-cell table:style-name="ce221" table:formula="of:=['file:///D:/mp/projects/PR0118%20-%20ISO%2011171%20Calibrations/results/2025-05-19-LPA3-NAVAIR-11171-00009/11171-00009-LIVE.ods'#$'6 - B1'.$A$81]" office:value-type="float" office:value="50" calcext:value-type="float">
            <text:p>50</text:p>
          </table:table-cell>
          <table:table-cell table:formula="of:=['file:///D:/mp/projects/PR0118%20-%20ISO%2011171%20Calibrations/results/2025-05-19-LPA3-NAVAIR-11171-00009/11171-00009-LIVE.ods'#$'6 - B1'.$B$81]" office:value-type="float" office:value="64" calcext:value-type="float">
            <text:p>64</text:p>
          </table:table-cell>
          <table:table-cell table:formula="of:=['file:///D:/mp/projects/PR0118%20-%20ISO%2011171%20Calibrations/results/2025-05-19-LPA3-NAVAIR-11171-00009/11171-00009-LIVE.ods'#$'6 - B1'.$C$81]" office:value-type="float" office:value="49" calcext:value-type="float">
            <text:p>49</text:p>
          </table:table-cell>
          <table:table-cell table:formula="of:=['file:///D:/mp/projects/PR0118%20-%20ISO%2011171%20Calibrations/results/2025-05-19-LPA3-NAVAIR-11171-00009/11171-00009-LIVE.ods'#$'6 - B1'.$D$81]" office:value-type="float" office:value="47" calcext:value-type="float">
            <text:p>47</text:p>
          </table:table-cell>
          <table:table-cell table:formula="of:=['file:///D:/mp/projects/PR0118%20-%20ISO%2011171%20Calibrations/results/2025-05-19-LPA3-NAVAIR-11171-00009/11171-00009-LIVE.ods'#$'6 - B1'.$E$81]" office:value-type="float" office:value="39" calcext:value-type="float">
            <text:p>39</text:p>
          </table:table-cell>
          <table:table-cell table:formula="of:=['file:///D:/mp/projects/PR0118%20-%20ISO%2011171%20Calibrations/results/2025-05-19-LPA3-NAVAIR-11171-00009/11171-00009-LIVE.ods'#$'6 - B1'.$F$81]" office:value-type="float" office:value="34" calcext:value-type="float">
            <text:p>34</text:p>
          </table:table-cell>
          <table:table-cell table:formula="of:=['file:///D:/mp/projects/PR0118%20-%20ISO%2011171%20Calibrations/results/2025-05-19-LPA3-NAVAIR-11171-00009/11171-00009-LIVE.ods'#$'6 - B1'.$G$81]" office:value-type="float" office:value="35" calcext:value-type="float">
            <text:p>35</text:p>
          </table:table-cell>
          <table:table-cell table:formula="of:=['file:///D:/mp/projects/PR0118%20-%20ISO%2011171%20Calibrations/results/2025-05-19-LPA3-NAVAIR-11171-00009/11171-00009-LIVE.ods'#$'6 - B1'.$H$81]" office:value-type="float" office:value="34" calcext:value-type="float">
            <text:p>34</text:p>
          </table:table-cell>
          <table:table-cell table:style-name="ce221" table:formula="of:=['file:///D:/mp/projects/PR0118%20-%20ISO%2011171%20Calibrations/results/2025-05-19-LPA3-NAVAIR-11171-00009/11171-00009-LIVE.ods'#$'6 - B1'.$I$81]" office:value-type="float" office:value="34" calcext:value-type="float">
            <text:p>34</text:p>
          </table:table-cell>
          <table:table-cell table:formula="of:=['file:///D:/mp/projects/PR0118%20-%20ISO%2011171%20Calibrations/results/2025-05-19-LPA3-NAVAIR-11171-00009/11171-00009-LIVE.ods'#$'6 - B1'.$J$81]" office:value-type="float" office:value="33" calcext:value-type="float">
            <text:p>33</text:p>
          </table:table-cell>
          <table:table-cell table:style-name="ce221" table:formula="of:=['file:///D:/mp/projects/PR0118%20-%20ISO%2011171%20Calibrations/results/2025-05-19-LPA3-NAVAIR-11171-00009/11171-00009-LIVE.ods'#$'6 - B1'.$K$81]" office:value-type="float" office:value="19" calcext:value-type="float">
            <text:p>19</text:p>
          </table:table-cell>
          <table:table-cell table:style-name="ce221" table:formula="of:=['file:///D:/mp/projects/PR0118%20-%20ISO%2011171%20Calibrations/results/2025-05-19-LPA3-NAVAIR-11171-00009/11171-00009-LIVE.ods'#$'6 - B1'.$L$81]" office:value-type="float" office:value="36" calcext:value-type="float">
            <text:p>36</text:p>
          </table:table-cell>
          <table:table-cell table:style-name="ce221" table:formula="of:=['file:///D:/mp/projects/PR0118%20-%20ISO%2011171%20Calibrations/results/2025-05-19-LPA3-NAVAIR-11171-00009/11171-00009-LIVE.ods'#$'6 - B1'.$M$81]" office:value-type="float" office:value="23" calcext:value-type="float">
            <text:p>23</text:p>
          </table:table-cell>
          <table:table-cell table:style-name="ce221" table:formula="of:=['file:///D:/mp/projects/PR0118%20-%20ISO%2011171%20Calibrations/results/2025-05-19-LPA3-NAVAIR-11171-00009/11171-00009-LIVE.ods'#$'6 - B1'.$N$81]" office:value-type="float" office:value="30" calcext:value-type="float">
            <text:p>30</text:p>
          </table:table-cell>
          <table:table-cell table:formula="of:=['file:///D:/mp/projects/PR0118%20-%20ISO%2011171%20Calibrations/results/2025-05-19-LPA3-NAVAIR-11171-00009/11171-00009-LIVE.ods'#$'6 - B1'.$O$81]" office:value-type="float" office:value="25" calcext:value-type="float">
            <text:p>25</text:p>
          </table:table-cell>
          <table:table-cell table:style-name="ce221" table:formula="of:=['file:///D:/mp/projects/PR0118%20-%20ISO%2011171%20Calibrations/results/2025-05-19-LPA3-NAVAIR-11171-00009/11171-00009-LIVE.ods'#$'6 - B1'.$P$81]" office:value-type="float" office:value="20" calcext:value-type="float">
            <text:p>20</text:p>
          </table:table-cell>
          <table:table-cell table:number-columns-repeated="33"/>
        </table:table-row>
        <table:table-row table:style-name="ro2">
          <table:table-cell table:style-name="ce221" table:formula="of:=['file:///D:/mp/projects/PR0118%20-%20ISO%2011171%20Calibrations/results/2025-05-19-LPA3-NAVAIR-11171-00009/11171-00009-LIVE.ods'#$'6 - B1'.$A$82]" office:value-type="float" office:value="70" calcext:value-type="float">
            <text:p>70</text:p>
          </table:table-cell>
          <table:table-cell table:formula="of:=['file:///D:/mp/projects/PR0118%20-%20ISO%2011171%20Calibrations/results/2025-05-19-LPA3-NAVAIR-11171-00009/11171-00009-LIVE.ods'#$'6 - B1'.$B$82]" office:value-type="float" office:value="33" calcext:value-type="float">
            <text:p>33</text:p>
          </table:table-cell>
          <table:table-cell table:formula="of:=['file:///D:/mp/projects/PR0118%20-%20ISO%2011171%20Calibrations/results/2025-05-19-LPA3-NAVAIR-11171-00009/11171-00009-LIVE.ods'#$'6 - B1'.$C$82]" office:value-type="float" office:value="21" calcext:value-type="float">
            <text:p>21</text:p>
          </table:table-cell>
          <table:table-cell table:formula="of:=['file:///D:/mp/projects/PR0118%20-%20ISO%2011171%20Calibrations/results/2025-05-19-LPA3-NAVAIR-11171-00009/11171-00009-LIVE.ods'#$'6 - B1'.$D$82]" office:value-type="float" office:value="21" calcext:value-type="float">
            <text:p>21</text:p>
          </table:table-cell>
          <table:table-cell table:formula="of:=['file:///D:/mp/projects/PR0118%20-%20ISO%2011171%20Calibrations/results/2025-05-19-LPA3-NAVAIR-11171-00009/11171-00009-LIVE.ods'#$'6 - B1'.$E$82]" office:value-type="float" office:value="10" calcext:value-type="float">
            <text:p>10</text:p>
          </table:table-cell>
          <table:table-cell table:formula="of:=['file:///D:/mp/projects/PR0118%20-%20ISO%2011171%20Calibrations/results/2025-05-19-LPA3-NAVAIR-11171-00009/11171-00009-LIVE.ods'#$'6 - B1'.$F$82]" office:value-type="float" office:value="16" calcext:value-type="float">
            <text:p>16</text:p>
          </table:table-cell>
          <table:table-cell table:formula="of:=['file:///D:/mp/projects/PR0118%20-%20ISO%2011171%20Calibrations/results/2025-05-19-LPA3-NAVAIR-11171-00009/11171-00009-LIVE.ods'#$'6 - B1'.$G$82]" office:value-type="float" office:value="12" calcext:value-type="float">
            <text:p>12</text:p>
          </table:table-cell>
          <table:table-cell table:formula="of:=['file:///D:/mp/projects/PR0118%20-%20ISO%2011171%20Calibrations/results/2025-05-19-LPA3-NAVAIR-11171-00009/11171-00009-LIVE.ods'#$'6 - B1'.$H$82]" office:value-type="float" office:value="9" calcext:value-type="float">
            <text:p>9</text:p>
          </table:table-cell>
          <table:table-cell table:style-name="ce221" table:formula="of:=['file:///D:/mp/projects/PR0118%20-%20ISO%2011171%20Calibrations/results/2025-05-19-LPA3-NAVAIR-11171-00009/11171-00009-LIVE.ods'#$'6 - B1'.$I$82]" office:value-type="float" office:value="16" calcext:value-type="float">
            <text:p>16</text:p>
          </table:table-cell>
          <table:table-cell table:formula="of:=['file:///D:/mp/projects/PR0118%20-%20ISO%2011171%20Calibrations/results/2025-05-19-LPA3-NAVAIR-11171-00009/11171-00009-LIVE.ods'#$'6 - B1'.$J$82]" office:value-type="float" office:value="8" calcext:value-type="float">
            <text:p>8</text:p>
          </table:table-cell>
          <table:table-cell table:style-name="ce221" table:formula="of:=['file:///D:/mp/projects/PR0118%20-%20ISO%2011171%20Calibrations/results/2025-05-19-LPA3-NAVAIR-11171-00009/11171-00009-LIVE.ods'#$'6 - B1'.$K$82]" office:value-type="float" office:value="5" calcext:value-type="float">
            <text:p>5</text:p>
          </table:table-cell>
          <table:table-cell table:style-name="ce221" table:formula="of:=['file:///D:/mp/projects/PR0118%20-%20ISO%2011171%20Calibrations/results/2025-05-19-LPA3-NAVAIR-11171-00009/11171-00009-LIVE.ods'#$'6 - B1'.$L$82]" office:value-type="float" office:value="15" calcext:value-type="float">
            <text:p>15</text:p>
          </table:table-cell>
          <table:table-cell table:style-name="ce221" table:formula="of:=['file:///D:/mp/projects/PR0118%20-%20ISO%2011171%20Calibrations/results/2025-05-19-LPA3-NAVAIR-11171-00009/11171-00009-LIVE.ods'#$'6 - B1'.$M$82]" office:value-type="float" office:value="9" calcext:value-type="float">
            <text:p>9</text:p>
          </table:table-cell>
          <table:table-cell table:style-name="ce221" table:formula="of:=['file:///D:/mp/projects/PR0118%20-%20ISO%2011171%20Calibrations/results/2025-05-19-LPA3-NAVAIR-11171-00009/11171-00009-LIVE.ods'#$'6 - B1'.$N$82]" office:value-type="float" office:value="9" calcext:value-type="float">
            <text:p>9</text:p>
          </table:table-cell>
          <table:table-cell table:formula="of:=['file:///D:/mp/projects/PR0118%20-%20ISO%2011171%20Calibrations/results/2025-05-19-LPA3-NAVAIR-11171-00009/11171-00009-LIVE.ods'#$'6 - B1'.$O$82]" office:value-type="float" office:value="10" calcext:value-type="float">
            <text:p>10</text:p>
          </table:table-cell>
          <table:table-cell table:style-name="ce221" table:formula="of:=['file:///D:/mp/projects/PR0118%20-%20ISO%2011171%20Calibrations/results/2025-05-19-LPA3-NAVAIR-11171-00009/11171-00009-LIVE.ods'#$'6 - B1'.$P$82]" office:value-type="float" office:value="2" calcext:value-type="float">
            <text:p>2</text:p>
          </table:table-cell>
          <table:table-cell table:number-columns-repeated="33"/>
        </table:table-row>
        <calcext:conditional-formats>
          <calcext:conditional-format calcext:target-range-address="'6 - B3'.H9:'6 - B3'.H40">
            <calcext:condition calcext:apply-style-name="Good" calcext:value="&gt;1000" calcext:base-cell-address="'6 - B3'.H9"/>
          </calcext:conditional-format>
          <calcext:conditional-format calcext:target-range-address="'6 - B3'.K9:'6 - B3'.K40">
            <calcext:condition calcext:apply-style-name="Good" calcext:value="&lt;[.J11]" calcext:base-cell-address="'6 - B3'.K9"/>
          </calcext:conditional-format>
        </calcext:conditional-formats>
      </table:table>
      <table:table table:name="6 - Interpolated Thresholds" table:style-name="ta1">
        <table:table-column table:style-name="co4" table:number-columns-repeated="10" table:default-cell-style-name="Default"/>
        <table:table-column table:style-name="co10" table:default-cell-style-name="Default"/>
        <table:table-column table:style-name="co4" table:number-columns-repeated="29" table:default-cell-style-name="Default"/>
        <table:table-row table:style-name="ro12">
          <table:table-cell table:number-columns-repeated="10"/>
          <table:table-cell table:style-name="ce321" office:value-type="string" calcext:value-type="string" table:number-columns-spanned="5" table:number-rows-spanned="1">
            <text:p>Enter all of the threshold  settings determined in 6.3 in column A <text:span text:style-name="T11">in order of decreasing value of threshold  setting</text:span><text:span text:style-name="T12">. For each calibration suspension sample, enter the  values of X̅</text:span><text:span text:style-name="T13">N</text:span><text:span text:style-name="T14"> obtained for each threshold setting actually used for a sample in the a</text:span></text:p>
          </table:table-cell>
          <table:covered-table-cell table:style-name="ce321" office:value-type="string" calcext:value-type="string">
            <text:p>Enter the <text:s/>particle size and concentration data from the Particle Size Calibration Summary portion of Table 4 <text:s/>in columns F and G. <text:s/>Enter in Table 4 the corresponding <text:s/>interpolated threshold voltage setting displayed in column <text:s/>H of this worksheet.</text:p>
          </table:covered-table-cell>
          <table:covered-table-cell table:number-columns-repeated="2" table:style-name="ce321"/>
          <table:covered-table-cell/>
          <table:table-cell table:number-columns-repeated="25"/>
        </table:table-row>
        <table:table-row table:style-name="ro13">
          <table:table-cell/>
          <table:table-cell table:style-name="ce233" office:value-type="string" calcext:value-type="string">
            <text:p>X̅<text:span text:style-name="T9">N</text:span><text:span text:style-name="T10"> for First Sample</text:span></text:p>
          </table:table-cell>
          <table:table-cell table:style-name="ce233" office:value-type="string" calcext:value-type="string">
            <text:p>X̅<text:span text:style-name="T9">N</text:span><text:span text:style-name="T10"> for Second Sample</text:span></text:p>
          </table:table-cell>
          <table:table-cell table:style-name="ce233" office:value-type="string" calcext:value-type="string">
            <text:p>X̅<text:span text:style-name="T9">N</text:span><text:span text:style-name="T10"> for Third Sample</text:span></text:p>
          </table:table-cell>
          <table:table-cell table:style-name="ce233" office:value-type="string" calcext:value-type="string">
            <text:p>Mean X̅<text:span text:style-name="T9">N</text:span><text:span text:style-name="T10"> </text:span></text:p>
          </table:table-cell>
          <table:table-cell table:style-name="ce234" office:value-type="string" calcext:value-type="string">
            <text:p>Threshold Voltage Setting</text:p>
          </table:table-cell>
          <table:table-cell table:style-name="ce31" office:value-type="string" calcext:value-type="string">
            <text:p>N<text:span text:style-name="T6">C</text:span></text:p>
          </table:table-cell>
          <table:table-cell table:style-name="ce31" office:value-type="string" calcext:value-type="string">
            <text:p>Uncertainty</text:p>
            <text:p>S</text:p>
          </table:table-cell>
          <table:table-cell table:number-columns-repeated="2"/>
          <table:table-cell table:style-name="ce237" office:value-type="string" calcext:value-type="string">
            <text:p><text:s/>Particle Size</text:p>
          </table:table-cell>
          <table:table-cell table:style-name="ce234" office:value-type="string" calcext:value-type="string">
            <text:p>Particle Concentration</text:p>
          </table:table-cell>
          <table:table-cell table:style-name="ce234" office:value-type="string" calcext:value-type="string">
            <text:p>Interpolated Threshold Voltage Setting</text:p>
          </table:table-cell>
          <table:table-cell/>
          <table:table-cell table:style-name="ce16" office:value-type="string" calcext:value-type="string">
            <text:p>34D</text:p>
          </table:table-cell>
          <table:table-cell table:style-name="ce16" office:value-type="string" calcext:value-type="string">
            <text:p>Dilution</text:p>
          </table:table-cell>
          <table:table-cell table:number-columns-repeated="24"/>
        </table:table-row>
        <table:table-row table:style-name="ro14">
          <table:table-cell/>
          <table:table-cell table:number-columns-repeated="4" table:style-name="ce234" office:value-type="string" calcext:value-type="string">
            <text:p>particles per millilitre</text:p>
          </table:table-cell>
          <table:table-cell table:style-name="ce234" office:value-type="string" calcext:value-type="string">
            <text:p>mV</text:p>
          </table:table-cell>
          <table:table-cell table:style-name="ce16" office:value-type="string" calcext:value-type="string">
            <text:p>samples</text:p>
          </table:table-cell>
          <table:table-cell table:style-name="ce16" office:value-type="string" calcext:value-type="string">
            <text:p>/ml</text:p>
          </table:table-cell>
          <table:table-cell table:number-columns-repeated="2"/>
          <table:table-cell table:style-name="ce238" office:value-type="string" calcext:value-type="string">
            <text:p>µm(c) </text:p>
          </table:table-cell>
          <table:table-cell table:style-name="ce234" office:value-type="string" calcext:value-type="string">
            <text:p>particles per millilitre</text:p>
          </table:table-cell>
          <table:table-cell table:style-name="ce234" office:value-type="string" calcext:value-type="string">
            <text:p>mV</text:p>
          </table:table-cell>
          <table:table-cell/>
          <table:table-cell table:style-name="ce241" office:value-type="string" calcext:value-type="string">
            <text:p>Distribution</text:p>
          </table:table-cell>
          <table:table-cell table:style-name="ce242" office:value-type="percentage" office:value="0.1" calcext:value-type="percentage">
            <text:p>10.00%</text:p>
          </table:table-cell>
          <table:table-cell table:number-columns-repeated="24"/>
        </table:table-row>
        <table:table-row table:style-name="ro15">
          <table:table-cell office:value-type="float" office:value="1" calcext:value-type="float">
            <text:p>1</text:p>
          </table:table-cell>
          <table:table-cell table:style-name="ce76" table:formula="of:=[$'6 - B1'.$G$9]" office:value-type="float" office:value="14457.8949307853" calcext:value-type="float">
            <text:p>14457.9</text:p>
          </table:table-cell>
          <table:table-cell table:style-name="ce76" table:formula="of:=[$'6 - B2'.$G$9]" office:value-type="float" office:value="10666.0589315457" calcext:value-type="float">
            <text:p>10666.1</text:p>
          </table:table-cell>
          <table:table-cell table:style-name="ce76" table:formula="of:=[$'6 - B3'.$G$9]" office:value-type="float" office:value="10767.1279846885" calcext:value-type="float">
            <text:p>10767.1</text:p>
          </table:table-cell>
          <table:table-cell table:style-name="ce235" table:formula="of:=AVERAGE([.B4:.D4])" office:value-type="float" office:value="11963.6939490065" calcext:value-type="float">
            <text:p>11963.7</text:p>
          </table:table-cell>
          <table:table-cell table:style-name="ce20" office:value-type="float" office:value="54" calcext:value-type="float">
            <text:p>54</text:p>
          </table:table-cell>
          <table:table-cell table:formula="of:=[$'6 - B1'.$L9]+[$'6 - B2'.$L9]+[$'6 - B3'.$L9]" office:value-type="float" office:value="15" calcext:value-type="float">
            <text:p>15</text:p>
          </table:table-cell>
          <table:table-cell table:style-name="ce76" table:formula="of:=STDEVP([$'6 - B1'.$B9:.F9];[$'6 - B2'.B9:.F9];[$'6 - B3'.B9:.F9])/SQRT([.G4])" office:value-type="float" office:value="456.410324796478" calcext:value-type="float">
            <text:p>456.4</text:p>
          </table:table-cell>
          <table:table-cell table:number-columns-repeated="2"/>
          <table:table-cell table:style-name="ce239" office:value-type="float" office:value="4" calcext:value-type="float">
            <text:p>4</text:p>
          </table:table-cell>
          <table:table-cell table:formula="of:=[.P4]" office:value-type="float" office:value="1075.03" calcext:value-type="float">
            <text:p>1075.03</text:p>
          </table:table-cell>
          <table:table-cell table:style-name="ce75" table:formula="of:=ASTROS.MONTEZUMA.CALCTOOLS.CALCFUNCTIONS.PYTHON.INTERPOLATIONIMPL.INTERPO([.$L4];[.$E$4:.$E$31];[.$F$4:.$F$31])" office:value-type="float" office:value="458.034113890536" calcext:value-type="float">
            <text:p>458</text:p>
          </table:table-cell>
          <table:table-cell/>
          <table:table-cell office:value-type="float" office:value="10750.3" calcext:value-type="float">
            <text:p>10750.3</text:p>
          </table:table-cell>
          <table:table-cell table:formula="of:=[.O4]*[.P$3]" office:value-type="float" office:value="1075.03" calcext:value-type="float">
            <text:p>1075.03</text:p>
          </table:table-cell>
          <table:table-cell table:number-columns-repeated="24"/>
        </table:table-row>
        <table:table-row table:style-name="ro15">
          <table:table-cell office:value-type="float" office:value="2" calcext:value-type="float">
            <text:p>2</text:p>
          </table:table-cell>
          <table:table-cell table:style-name="ce76" table:formula="of:=[$'6 - B1'.$G$10]" office:value-type="float" office:value="12525.9404276776" calcext:value-type="float">
            <text:p>12525.9</text:p>
          </table:table-cell>
          <table:table-cell table:style-name="ce76" table:formula="of:=[$'6 - B2'.$G$10]" office:value-type="float" office:value="9045.35311807998" calcext:value-type="float">
            <text:p>9045.4</text:p>
          </table:table-cell>
          <table:table-cell table:style-name="ce76" table:formula="of:=[$'6 - B3'.$G$10]" office:value-type="float" office:value="9115.16473374319" calcext:value-type="float">
            <text:p>9115.2</text:p>
          </table:table-cell>
          <table:table-cell table:style-name="ce235" table:formula="of:=AVERAGE([.B5:.D5])" office:value-type="float" office:value="10228.8194265002" calcext:value-type="float">
            <text:p>10228.8</text:p>
          </table:table-cell>
          <table:table-cell table:style-name="ce20" office:value-type="float" office:value="63.8601474584642" calcext:value-type="float">
            <text:p>64</text:p>
          </table:table-cell>
          <table:table-cell table:formula="of:=[$'6 - B1'.$L10]+[$'6 - B2'.$L10]+[$'6 - B3'.$L10]" office:value-type="float" office:value="15" calcext:value-type="float">
            <text:p>15</text:p>
          </table:table-cell>
          <table:table-cell table:style-name="ce76" table:formula="of:=STDEVP([$'6 - B1'.$B10:.F10];[$'6 - B2'.B10:.F10];[$'6 - B3'.B10:.F10])/SQRT([.G5])" office:value-type="float" office:value="420.263273660521" calcext:value-type="float">
            <text:p>420.3</text:p>
          </table:table-cell>
          <table:table-cell table:number-columns-repeated="2"/>
          <table:table-cell table:style-name="ce239" office:value-type="float" office:value="5" calcext:value-type="float">
            <text:p>5</text:p>
          </table:table-cell>
          <table:table-cell table:formula="of:=[.P5]" office:value-type="float" office:value="712.11" calcext:value-type="float">
            <text:p>712.11</text:p>
          </table:table-cell>
          <table:table-cell table:style-name="ce20" table:formula="of:=ASTROS.MONTEZUMA.CALCTOOLS.CALCFUNCTIONS.PYTHON.INTERPOLATIONIMPL.INTERPO([.$L5];[.$E$4:.$E$31];[.$F$4:.$F$31])" office:value-type="float" office:value="666.520651103108" calcext:value-type="float">
            <text:p>667</text:p>
          </table:table-cell>
          <table:table-cell/>
          <table:table-cell office:value-type="float" office:value="7121.1" calcext:value-type="float">
            <text:p>7121.1</text:p>
          </table:table-cell>
          <table:table-cell table:formula="of:=[.O5]*[.P$3]" office:value-type="float" office:value="712.11" calcext:value-type="float">
            <text:p>712.11</text:p>
          </table:table-cell>
          <table:table-cell table:number-columns-repeated="24"/>
        </table:table-row>
        <table:table-row table:style-name="ro15">
          <table:table-cell office:value-type="float" office:value="3" calcext:value-type="float">
            <text:p>3</text:p>
          </table:table-cell>
          <table:table-cell table:style-name="ce76" table:formula="of:=[$'6 - B1'.$G$11]" office:value-type="float" office:value="10808.2163742051" calcext:value-type="float">
            <text:p>10808.2</text:p>
          </table:table-cell>
          <table:table-cell table:style-name="ce76" table:formula="of:=[$'6 - B2'.$G$11]" office:value-type="float" office:value="7659.26387693509" calcext:value-type="float">
            <text:p>7659.3</text:p>
          </table:table-cell>
          <table:table-cell table:style-name="ce76" table:formula="of:=[$'6 - B3'.$G$11]" office:value-type="float" office:value="7693.38340887846" calcext:value-type="float">
            <text:p>7693.4</text:p>
          </table:table-cell>
          <table:table-cell table:style-name="ce235" table:formula="of:=AVERAGE([.B6:.D6])" office:value-type="float" office:value="8720.2878866729" calcext:value-type="float">
            <text:p>8720.3</text:p>
          </table:table-cell>
          <table:table-cell table:style-name="ce20" office:value-type="float" office:value="75.5207117299405" calcext:value-type="float">
            <text:p>76</text:p>
          </table:table-cell>
          <table:table-cell table:formula="of:=[$'6 - B1'.$L11]+[$'6 - B2'.$L11]+[$'6 - B3'.$L11]" office:value-type="float" office:value="15" calcext:value-type="float">
            <text:p>15</text:p>
          </table:table-cell>
          <table:table-cell table:style-name="ce76" table:formula="of:=STDEVP([$'6 - B1'.$B11:.F11];[$'6 - B2'.B11:.F11];[$'6 - B3'.B11:.F11])/SQRT([.G6])" office:value-type="float" office:value="382.002101449428" calcext:value-type="float">
            <text:p>382.0</text:p>
          </table:table-cell>
          <table:table-cell table:number-columns-repeated="2"/>
          <table:table-cell table:style-name="ce239" office:value-type="float" office:value="6" calcext:value-type="float">
            <text:p>6</text:p>
          </table:table-cell>
          <table:table-cell table:formula="of:=[.P6]" office:value-type="float" office:value="472.91" calcext:value-type="float">
            <text:p>472.91</text:p>
          </table:table-cell>
          <table:table-cell table:style-name="ce75" table:formula="of:=ASTROS.MONTEZUMA.CALCTOOLS.CALCFUNCTIONS.PYTHON.INTERPOLATIONIMPL.INTERPO([.$L6];[.$E$4:.$E$31];[.$F$4:.$F$31])" office:value-type="float" office:value="1071.68008303119" calcext:value-type="float">
            <text:p>1072</text:p>
          </table:table-cell>
          <table:table-cell/>
          <table:table-cell office:value-type="float" office:value="4729.1" calcext:value-type="float">
            <text:p>4729.1</text:p>
          </table:table-cell>
          <table:table-cell table:formula="of:=[.O6]*[.P$3]" office:value-type="float" office:value="472.91" calcext:value-type="float">
            <text:p>472.91</text:p>
          </table:table-cell>
          <table:table-cell table:number-columns-repeated="24"/>
        </table:table-row>
        <table:table-row table:style-name="ro15">
          <table:table-cell office:value-type="float" office:value="4" calcext:value-type="float">
            <text:p>4</text:p>
          </table:table-cell>
          <table:table-cell table:style-name="ce76" table:formula="of:=[$'6 - B1'.$G$12]" office:value-type="float" office:value="9422.5083147368" calcext:value-type="float">
            <text:p>9422.5</text:p>
          </table:table-cell>
          <table:table-cell table:style-name="ce76" table:formula="of:=[$'6 - B2'.$G$12]" office:value-type="float" office:value="6344.51887622767" calcext:value-type="float">
            <text:p>6344.5</text:p>
          </table:table-cell>
          <table:table-cell table:style-name="ce76" table:formula="of:=[$'6 - B3'.$G$12]" office:value-type="float" office:value="6361.92962802528" calcext:value-type="float">
            <text:p>6361.9</text:p>
          </table:table-cell>
          <table:table-cell table:style-name="ce235" table:formula="of:=AVERAGE([.B7:.D7])" office:value-type="float" office:value="7376.31893966325" calcext:value-type="float">
            <text:p>7376.3</text:p>
          </table:table-cell>
          <table:table-cell table:style-name="ce20" office:value-type="float" office:value="89.3104405044846" calcext:value-type="float">
            <text:p>89</text:p>
          </table:table-cell>
          <table:table-cell table:formula="of:=[$'6 - B1'.$L12]+[$'6 - B2'.$L12]+[$'6 - B3'.$L12]" office:value-type="float" office:value="15" calcext:value-type="float">
            <text:p>15</text:p>
          </table:table-cell>
          <table:table-cell table:style-name="ce76" table:formula="of:=STDEVP([$'6 - B1'.$B12:.F12];[$'6 - B2'.B12:.F12];[$'6 - B3'.B12:.F12])/SQRT([.G7])" office:value-type="float" office:value="374.169837812328" calcext:value-type="float">
            <text:p>374.2</text:p>
          </table:table-cell>
          <table:table-cell table:number-columns-repeated="2"/>
          <table:table-cell table:style-name="ce239" office:value-type="float" office:value="7" calcext:value-type="float">
            <text:p>7</text:p>
          </table:table-cell>
          <table:table-cell table:formula="of:=[.P7]" office:value-type="float" office:value="319.93" calcext:value-type="float">
            <text:p>319.93</text:p>
          </table:table-cell>
          <table:table-cell table:style-name="ce20" table:formula="of:=ASTROS.MONTEZUMA.CALCTOOLS.CALCFUNCTIONS.PYTHON.INTERPOLATIONIMPL.INTERPO([.$L7];[.$E$4:.$E$31];[.$F$4:.$F$31])" office:value-type="float" office:value="1580.51380008794" calcext:value-type="float">
            <text:p>1581</text:p>
          </table:table-cell>
          <table:table-cell/>
          <table:table-cell office:value-type="float" office:value="3199.3" calcext:value-type="float">
            <text:p>3199.3</text:p>
          </table:table-cell>
          <table:table-cell table:formula="of:=[.O7]*[.P$3]" office:value-type="float" office:value="319.93" calcext:value-type="float">
            <text:p>319.93</text:p>
          </table:table-cell>
          <table:table-cell table:number-columns-repeated="24"/>
        </table:table-row>
        <table:table-row table:style-name="ro15">
          <table:table-cell office:value-type="float" office:value="5" calcext:value-type="float">
            <text:p>5</text:p>
          </table:table-cell>
          <table:table-cell table:style-name="ce76" table:formula="of:=[$'6 - B1'.$G$13]" office:value-type="float" office:value="8038.12396527368" calcext:value-type="float">
            <text:p>8038.1</text:p>
          </table:table-cell>
          <table:table-cell table:style-name="ce76" table:formula="of:=[$'6 - B2'.$G$13]" office:value-type="float" office:value="5136.8722117643" calcext:value-type="float">
            <text:p>5136.9</text:p>
          </table:table-cell>
          <table:table-cell table:style-name="ce76" table:formula="of:=[$'6 - B3'.$G$13]" office:value-type="float" office:value="5147.14386398598" calcext:value-type="float">
            <text:p>5147.1</text:p>
          </table:table-cell>
          <table:table-cell table:style-name="ce235" table:formula="of:=AVERAGE([.B8:.D8])" office:value-type="float" office:value="6107.38001367465" calcext:value-type="float">
            <text:p>6107.4</text:p>
          </table:table-cell>
          <table:table-cell table:style-name="ce20" office:value-type="float" office:value="105.618109262903" calcext:value-type="float">
            <text:p>106</text:p>
          </table:table-cell>
          <table:table-cell table:formula="of:=[$'6 - B1'.$L13]+[$'6 - B2'.$L13]+[$'6 - B3'.$L13]" office:value-type="float" office:value="15" calcext:value-type="float">
            <text:p>15</text:p>
          </table:table-cell>
          <table:table-cell table:style-name="ce76" table:formula="of:=STDEVP([$'6 - B1'.$B13:.F13];[$'6 - B2'.B13:.F13];[$'6 - B3'.B13:.F13])/SQRT([.G8])" office:value-type="float" office:value="353.050951321971" calcext:value-type="float">
            <text:p>353.1</text:p>
          </table:table-cell>
          <table:table-cell table:number-columns-repeated="2"/>
          <table:table-cell table:style-name="ce239" office:value-type="float" office:value="8" calcext:value-type="float">
            <text:p>8</text:p>
          </table:table-cell>
          <table:table-cell table:formula="of:=[.P8]" office:value-type="float" office:value="228.06" calcext:value-type="float">
            <text:p>228.06</text:p>
          </table:table-cell>
          <table:table-cell table:style-name="ce20" table:formula="of:=ASTROS.MONTEZUMA.CALCTOOLS.CALCFUNCTIONS.PYTHON.INTERPOLATIONIMPL.INTERPO([.$L8];[.$E$4:.$E$31];[.$F$4:.$F$31])" office:value-type="float" office:value="1957.70840588067" calcext:value-type="float">
            <text:p>1958</text:p>
          </table:table-cell>
          <table:table-cell/>
          <table:table-cell office:value-type="float" office:value="2280.6" calcext:value-type="float">
            <text:p>2280.6</text:p>
          </table:table-cell>
          <table:table-cell table:formula="of:=[.O8]*[.P$3]" office:value-type="float" office:value="228.06" calcext:value-type="float">
            <text:p>228.06</text:p>
          </table:table-cell>
          <table:table-cell table:number-columns-repeated="24"/>
        </table:table-row>
        <table:table-row table:style-name="ro15">
          <table:table-cell office:value-type="float" office:value="6" calcext:value-type="float">
            <text:p>6</text:p>
          </table:table-cell>
          <table:table-cell table:style-name="ce76" table:formula="of:=[$'6 - B1'.$G$14]" office:value-type="float" office:value="6884.36590388498" calcext:value-type="float">
            <text:p>6884.4</text:p>
          </table:table-cell>
          <table:table-cell table:style-name="ce76" table:formula="of:=[$'6 - B2'.$G$14]" office:value-type="float" office:value="4121.42885531325" calcext:value-type="float">
            <text:p>4121.4</text:p>
          </table:table-cell>
          <table:table-cell table:style-name="ce76" table:formula="of:=[$'6 - B3'.$G$14]" office:value-type="float" office:value="4118.38290694856" calcext:value-type="float">
            <text:p>4118.4</text:p>
          </table:table-cell>
          <table:table-cell table:style-name="ce235" table:formula="of:=AVERAGE([.B9:.D9])" office:value-type="float" office:value="5041.39255538226" calcext:value-type="float">
            <text:p>5041.4</text:p>
          </table:table-cell>
          <table:table-cell table:style-name="ce20" office:value-type="float" office:value="124.903482070615" calcext:value-type="float">
            <text:p>125</text:p>
          </table:table-cell>
          <table:table-cell table:formula="of:=[$'6 - B1'.$L14]+[$'6 - B2'.$L14]+[$'6 - B3'.$L14]" office:value-type="float" office:value="15" calcext:value-type="float">
            <text:p>15</text:p>
          </table:table-cell>
          <table:table-cell table:style-name="ce76" table:formula="of:=STDEVP([$'6 - B1'.$B14:.F14];[$'6 - B2'.B14:.F14];[$'6 - B3'.B14:.F14])/SQRT([.G9])" office:value-type="float" office:value="336.883026459541" calcext:value-type="float">
            <text:p>336.9</text:p>
          </table:table-cell>
          <table:table-cell table:number-columns-repeated="2"/>
          <table:table-cell table:style-name="ce239" office:value-type="float" office:value="9" calcext:value-type="float">
            <text:p>9</text:p>
          </table:table-cell>
          <table:table-cell table:formula="of:=[.P9]" office:value-type="float" office:value="161.5" calcext:value-type="float">
            <text:p>161.5</text:p>
          </table:table-cell>
          <table:table-cell table:style-name="ce20" table:formula="of:=ASTROS.MONTEZUMA.CALCTOOLS.CALCFUNCTIONS.PYTHON.INTERPOLATIONIMPL.INTERPO([.$L9];[.$E$4:.$E$31];[.$F$4:.$F$31])" office:value-type="float" office:value="2332.97540113041" calcext:value-type="float">
            <text:p>2333</text:p>
          </table:table-cell>
          <table:table-cell/>
          <table:table-cell office:value-type="float" office:value="1615" calcext:value-type="float">
            <text:p>1615</text:p>
          </table:table-cell>
          <table:table-cell table:formula="of:=[.O9]*[.P$3]" office:value-type="float" office:value="161.5" calcext:value-type="float">
            <text:p>161.5</text:p>
          </table:table-cell>
          <table:table-cell table:number-columns-repeated="24"/>
        </table:table-row>
        <table:table-row table:style-name="ro15">
          <table:table-cell office:value-type="float" office:value="7" calcext:value-type="float">
            <text:p>7</text:p>
          </table:table-cell>
          <table:table-cell table:style-name="ce76" table:formula="of:=[$'6 - B1'.$G$15]" office:value-type="float" office:value="5826.22908217739" calcext:value-type="float">
            <text:p>5826.2</text:p>
          </table:table-cell>
          <table:table-cell table:style-name="ce76" table:formula="of:=[$'6 - B2'.$G$15]" office:value-type="float" office:value="3311.5814022145" calcext:value-type="float">
            <text:p>3311.6</text:p>
          </table:table-cell>
          <table:table-cell table:style-name="ce76" table:formula="of:=[$'6 - B3'.$G$15]" office:value-type="float" office:value="3310.13871380069" calcext:value-type="float">
            <text:p>3310.1</text:p>
          </table:table-cell>
          <table:table-cell table:style-name="ce235" table:formula="of:=AVERAGE([.B10:.D10])" office:value-type="float" office:value="4149.31639939753" calcext:value-type="float">
            <text:p>4149.3</text:p>
          </table:table-cell>
          <table:table-cell table:style-name="ce20" office:value-type="float" office:value="147.710273761205" calcext:value-type="float">
            <text:p>148</text:p>
          </table:table-cell>
          <table:table-cell table:formula="of:=[$'6 - B1'.$L15]+[$'6 - B2'.$L15]+[$'6 - B3'.$L15]" office:value-type="float" office:value="15" calcext:value-type="float">
            <text:p>15</text:p>
          </table:table-cell>
          <table:table-cell table:style-name="ce76" table:formula="of:=STDEVP([$'6 - B1'.$B15:.F15];[$'6 - B2'.B15:.F15];[$'6 - B3'.B15:.F15])/SQRT([.G10])" office:value-type="float" office:value="306.452275013121" calcext:value-type="float">
            <text:p>306.5</text:p>
          </table:table-cell>
          <table:table-cell table:number-columns-repeated="2"/>
          <table:table-cell table:style-name="ce239" office:value-type="float" office:value="10" calcext:value-type="float">
            <text:p>10</text:p>
          </table:table-cell>
          <table:table-cell table:formula="of:=[.P10]" office:value-type="float" office:value="113.05" calcext:value-type="float">
            <text:p>113.05</text:p>
          </table:table-cell>
          <table:table-cell table:style-name="ce75" table:formula="of:=ASTROS.MONTEZUMA.CALCTOOLS.CALCFUNCTIONS.PYTHON.INTERPOLATIONIMPL.INTERPO([.$L10];[.$E$4:.$E$31];[.$F$4:.$F$31])" office:value-type="float" office:value="2766.67362901266" calcext:value-type="float">
            <text:p>2767</text:p>
          </table:table-cell>
          <table:table-cell/>
          <table:table-cell office:value-type="float" office:value="1130.5" calcext:value-type="float">
            <text:p>1130.5</text:p>
          </table:table-cell>
          <table:table-cell table:formula="of:=[.O10]*[.P$3]" office:value-type="float" office:value="113.05" calcext:value-type="float">
            <text:p>113.05</text:p>
          </table:table-cell>
          <table:table-cell table:number-columns-repeated="24"/>
        </table:table-row>
        <table:table-row table:style-name="ro15">
          <table:table-cell office:value-type="float" office:value="8" calcext:value-type="float">
            <text:p>8</text:p>
          </table:table-cell>
          <table:table-cell table:style-name="ce76" table:formula="of:=[$'6 - B1'.$G$16]" office:value-type="float" office:value="4886.37945955052" calcext:value-type="float">
            <text:p>4886.4</text:p>
          </table:table-cell>
          <table:table-cell table:style-name="ce76" table:formula="of:=[$'6 - B2'.$G$16]" office:value-type="float" office:value="2645.68359535875" calcext:value-type="float">
            <text:p>2645.7</text:p>
          </table:table-cell>
          <table:table-cell table:style-name="ce76" table:formula="of:=[$'6 - B3'.$G$16]" office:value-type="float" office:value="2643.90148621858" calcext:value-type="float">
            <text:p>2643.9</text:p>
          </table:table-cell>
          <table:table-cell table:style-name="ce235" table:formula="of:=AVERAGE([.B11:.D11])" office:value-type="float" office:value="3391.98818037595" calcext:value-type="float">
            <text:p>3392.0</text:p>
          </table:table-cell>
          <table:table-cell table:style-name="ce20" office:value-type="float" office:value="174.681478954087" calcext:value-type="float">
            <text:p>175</text:p>
          </table:table-cell>
          <table:table-cell table:formula="of:=[$'6 - B1'.$L16]+[$'6 - B2'.$L16]+[$'6 - B3'.$L16]" office:value-type="float" office:value="15" calcext:value-type="float">
            <text:p>15</text:p>
          </table:table-cell>
          <table:table-cell table:style-name="ce76" table:formula="of:=STDEVP([$'6 - B1'.$B16:.F16];[$'6 - B2'.B16:.F16];[$'6 - B3'.B16:.F16])/SQRT([.G11])" office:value-type="float" office:value="273.126205048538" calcext:value-type="float">
            <text:p>273.1</text:p>
          </table:table-cell>
          <table:table-cell table:number-columns-repeated="2"/>
          <table:table-cell table:style-name="ce239" office:value-type="float" office:value="11" calcext:value-type="float">
            <text:p>11</text:p>
          </table:table-cell>
          <table:table-cell table:formula="of:=[.P11]" office:value-type="float" office:value="81.62" calcext:value-type="float">
            <text:p>81.62</text:p>
          </table:table-cell>
          <table:table-cell table:style-name="ce20" table:formula="of:=ASTROS.MONTEZUMA.CALCTOOLS.CALCFUNCTIONS.PYTHON.INTERPOLATIONIMPL.INTERPO([.$L11];[.$E$4:.$E$31];[.$F$4:.$F$31])" office:value-type="float" office:value="3238.88296656141" calcext:value-type="float">
            <text:p>3239</text:p>
          </table:table-cell>
          <table:table-cell/>
          <table:table-cell office:value-type="float" office:value="816.2" calcext:value-type="float">
            <text:p>816.2</text:p>
          </table:table-cell>
          <table:table-cell table:formula="of:=[.O11]*[.P$3]" office:value-type="float" office:value="81.62" calcext:value-type="float">
            <text:p>81.62</text:p>
          </table:table-cell>
          <table:table-cell table:number-columns-repeated="24"/>
        </table:table-row>
        <table:table-row table:style-name="ro15">
          <table:table-cell office:value-type="float" office:value="9" calcext:value-type="float">
            <text:p>9</text:p>
          </table:table-cell>
          <table:table-cell table:style-name="ce76" table:formula="of:=[$'6 - B1'.$G$17]" office:value-type="float" office:value="4034.26793626886" calcext:value-type="float">
            <text:p>4034.3</text:p>
          </table:table-cell>
          <table:table-cell table:style-name="ce76" table:formula="of:=[$'6 - B2'.$G$17]" office:value-type="float" office:value="2144.15120704893" calcext:value-type="float">
            <text:p>2144.2</text:p>
          </table:table-cell>
          <table:table-cell table:style-name="ce76" table:formula="of:=[$'6 - B3'.$G$17]" office:value-type="float" office:value="2152.01093026173" calcext:value-type="float">
            <text:p>2152.0</text:p>
          </table:table-cell>
          <table:table-cell table:style-name="ce235" table:formula="of:=AVERAGE([.B12:.D12])" office:value-type="float" office:value="2776.81002452651" calcext:value-type="float">
            <text:p>2776.8</text:p>
          </table:table-cell>
          <table:table-cell table:style-name="ce20" office:value-type="float" office:value="206.577500079085" calcext:value-type="float">
            <text:p>207</text:p>
          </table:table-cell>
          <table:table-cell table:formula="of:=[$'6 - B1'.$L17]+[$'6 - B2'.$L17]+[$'6 - B3'.$L17]" office:value-type="float" office:value="15" calcext:value-type="float">
            <text:p>15</text:p>
          </table:table-cell>
          <table:table-cell table:style-name="ce76" table:formula="of:=STDEVP([$'6 - B1'.$B17:.F17];[$'6 - B2'.B17:.F17];[$'6 - B3'.B17:.F17])/SQRT([.G12])" office:value-type="float" office:value="229.849276054964" calcext:value-type="float">
            <text:p>229.8</text:p>
          </table:table-cell>
          <table:table-cell table:number-columns-repeated="2"/>
          <table:table-cell table:style-name="ce239" office:value-type="float" office:value="12" calcext:value-type="float">
            <text:p>12</text:p>
          </table:table-cell>
          <table:table-cell table:formula="of:=[.P12]" office:value-type="float" office:value="61.86" calcext:value-type="float">
            <text:p>61.86</text:p>
          </table:table-cell>
          <table:table-cell table:style-name="ce20" table:formula="of:=ASTROS.MONTEZUMA.CALCTOOLS.CALCFUNCTIONS.PYTHON.INTERPOLATIONIMPL.INTERPO([.$L12];[.$E$4:.$E$31];[.$F$4:.$F$31])" office:value-type="float" office:value="3698.16383545853" calcext:value-type="float">
            <text:p>3698</text:p>
          </table:table-cell>
          <table:table-cell/>
          <table:table-cell office:value-type="float" office:value="618.6" calcext:value-type="float">
            <text:p>618.6</text:p>
          </table:table-cell>
          <table:table-cell table:formula="of:=[.O12]*[.P$3]" office:value-type="float" office:value="61.86" calcext:value-type="float">
            <text:p>61.86</text:p>
          </table:table-cell>
          <table:table-cell table:number-columns-repeated="24"/>
        </table:table-row>
        <table:table-row table:style-name="ro15">
          <table:table-cell office:value-type="float" office:value="10" calcext:value-type="float">
            <text:p>10</text:p>
          </table:table-cell>
          <table:table-cell table:style-name="ce76" table:formula="of:=[$'6 - B1'.$G$18]" office:value-type="float" office:value="3291.11462936978" calcext:value-type="float">
            <text:p>3291.1</text:p>
          </table:table-cell>
          <table:table-cell table:style-name="ce76" table:formula="of:=[$'6 - B2'.$G$18]" office:value-type="float" office:value="1756.60908882327" calcext:value-type="float">
            <text:p>1756.6</text:p>
          </table:table-cell>
          <table:table-cell table:style-name="ce76" table:formula="of:=[$'6 - B3'.$G$18]" office:value-type="float" office:value="1765.5230686644" calcext:value-type="float">
            <text:p>1765.5</text:p>
          </table:table-cell>
          <table:table-cell table:style-name="ce235" table:formula="of:=AVERAGE([.B13:.D13])" office:value-type="float" office:value="2271.08226228582" calcext:value-type="float">
            <text:p>2271.1</text:p>
          </table:table-cell>
          <table:table-cell table:style-name="ce20" office:value-type="float" office:value="244.297585493542" calcext:value-type="float">
            <text:p>244</text:p>
          </table:table-cell>
          <table:table-cell table:formula="of:=[$'6 - B1'.$L18]+[$'6 - B2'.$L18]+[$'6 - B3'.$L18]" office:value-type="float" office:value="15" calcext:value-type="float">
            <text:p>15</text:p>
          </table:table-cell>
          <table:table-cell table:style-name="ce76" table:formula="of:=STDEVP([$'6 - B1'.$B18:.F18];[$'6 - B2'.B18:.F18];[$'6 - B3'.B18:.F18])/SQRT([.G13])" office:value-type="float" office:value="186.444932433757" calcext:value-type="float">
            <text:p>186.4</text:p>
          </table:table-cell>
          <table:table-cell table:number-columns-repeated="2"/>
          <table:table-cell table:style-name="ce239" office:value-type="float" office:value="13" calcext:value-type="float">
            <text:p>13</text:p>
          </table:table-cell>
          <table:table-cell table:formula="of:=[.P13]" office:value-type="float" office:value="48.19" calcext:value-type="float">
            <text:p>48.19</text:p>
          </table:table-cell>
          <table:table-cell table:style-name="ce20" table:formula="of:=ASTROS.MONTEZUMA.CALCTOOLS.CALCFUNCTIONS.PYTHON.INTERPOLATIONIMPL.INTERPO([.$L13];[.$E$4:.$E$31];[.$F$4:.$F$31])" office:value-type="float" office:value="4176.60110025045" calcext:value-type="float">
            <text:p>4177</text:p>
          </table:table-cell>
          <table:table-cell/>
          <table:table-cell office:value-type="float" office:value="481.9" calcext:value-type="float">
            <text:p>481.9</text:p>
          </table:table-cell>
          <table:table-cell table:formula="of:=[.O13]*[.P$3]" office:value-type="float" office:value="48.19" calcext:value-type="float">
            <text:p>48.19</text:p>
          </table:table-cell>
          <table:table-cell table:number-columns-repeated="24"/>
        </table:table-row>
        <table:table-row table:style-name="ro15">
          <table:table-cell office:value-type="float" office:value="11" calcext:value-type="float">
            <text:p>11</text:p>
          </table:table-cell>
          <table:table-cell table:style-name="ce76" table:formula="of:=[$'6 - B1'.$G$19]" office:value-type="float" office:value="2630.7458069757" calcext:value-type="float">
            <text:p>2630.7</text:p>
          </table:table-cell>
          <table:table-cell table:style-name="ce76" table:formula="of:=[$'6 - B2'.$G$19]" office:value-type="float" office:value="1461.22261112207" calcext:value-type="float">
            <text:p>1461.2</text:p>
          </table:table-cell>
          <table:table-cell table:style-name="ce76" table:formula="of:=[$'6 - B3'.$G$19]" office:value-type="float" office:value="1472.13298261467" calcext:value-type="float">
            <text:p>1472.1</text:p>
          </table:table-cell>
          <table:table-cell table:style-name="ce235" table:formula="of:=AVERAGE([.B14:.D14])" office:value-type="float" office:value="1854.70046690414" calcext:value-type="float">
            <text:p>1854.7</text:p>
          </table:table-cell>
          <table:table-cell table:style-name="ce20" office:value-type="float" office:value="288.90518209934" calcext:value-type="float">
            <text:p>289</text:p>
          </table:table-cell>
          <table:table-cell table:formula="of:=[$'6 - B1'.$L19]+[$'6 - B2'.$L19]+[$'6 - B3'.$L19]" office:value-type="float" office:value="15" calcext:value-type="float">
            <text:p>15</text:p>
          </table:table-cell>
          <table:table-cell table:style-name="ce76" table:formula="of:=STDEVP([$'6 - B1'.$B19:.F19];[$'6 - B2'.B19:.F19];[$'6 - B3'.B19:.F19])/SQRT([.G14])" office:value-type="float" office:value="141.91698178856" calcext:value-type="float">
            <text:p>141.9</text:p>
          </table:table-cell>
          <table:table-cell table:number-columns-repeated="2"/>
          <table:table-cell table:style-name="ce239" office:value-type="float" office:value="14" calcext:value-type="float">
            <text:p>14</text:p>
          </table:table-cell>
          <table:table-cell table:formula="of:=[.P14]" office:value-type="float" office:value="38.47" calcext:value-type="float">
            <text:p>38.47</text:p>
          </table:table-cell>
          <table:table-cell table:style-name="ce75" table:formula="of:=ASTROS.MONTEZUMA.CALCTOOLS.CALCFUNCTIONS.PYTHON.INTERPOLATIONIMPL.INTERPO([.$L14];[.$E$4:.$E$31];[.$F$4:.$F$31])" office:value-type="float" office:value="4415.28694733033" calcext:value-type="float">
            <text:p>4415</text:p>
          </table:table-cell>
          <table:table-cell/>
          <table:table-cell office:value-type="float" office:value="384.7" calcext:value-type="float">
            <text:p>384.7</text:p>
          </table:table-cell>
          <table:table-cell table:formula="of:=[.O14]*[.P$3]" office:value-type="float" office:value="38.47" calcext:value-type="float">
            <text:p>38.47</text:p>
          </table:table-cell>
          <table:table-cell table:number-columns-repeated="24"/>
        </table:table-row>
        <table:table-row table:style-name="ro15">
          <table:table-cell office:value-type="float" office:value="12" calcext:value-type="float">
            <text:p>12</text:p>
          </table:table-cell>
          <table:table-cell table:style-name="ce76" table:formula="of:=[$'6 - B1'.$G$20]" office:value-type="float" office:value="2060.6736775776" calcext:value-type="float">
            <text:p>2060.7</text:p>
          </table:table-cell>
          <table:table-cell table:style-name="ce76" table:formula="of:=[$'6 - B2'.$G$20]" office:value-type="float" office:value="1232.28662643042" calcext:value-type="float">
            <text:p>1232.3</text:p>
          </table:table-cell>
          <table:table-cell table:style-name="ce76" table:formula="of:=[$'6 - B3'.$G$20]" office:value-type="float" office:value="1243.36848096286" calcext:value-type="float">
            <text:p>1243.4</text:p>
          </table:table-cell>
          <table:table-cell table:style-name="ce235" table:formula="of:=AVERAGE([.B15:.D15])" office:value-type="float" office:value="1512.10959499029" calcext:value-type="float">
            <text:p>1512.1</text:p>
          </table:table-cell>
          <table:table-cell table:style-name="ce20" office:value-type="float" office:value="341.657917229227" calcext:value-type="float">
            <text:p>342</text:p>
          </table:table-cell>
          <table:table-cell table:formula="of:=[$'6 - B1'.$L20]+[$'6 - B2'.$L20]+[$'6 - B3'.$L20]" office:value-type="float" office:value="15" calcext:value-type="float">
            <text:p>15</text:p>
          </table:table-cell>
          <table:table-cell table:style-name="ce76" table:formula="of:=STDEVP([$'6 - B1'.$B20:.F20];[$'6 - B2'.B20:.F20];[$'6 - B3'.B20:.F20])/SQRT([.G15])" office:value-type="float" office:value="100.423625550242" calcext:value-type="float">
            <text:p>100.4</text:p>
          </table:table-cell>
          <table:table-cell table:number-columns-repeated="2"/>
          <table:table-cell table:style-name="ce239" office:value-type="float" office:value="15" calcext:value-type="float">
            <text:p>15</text:p>
          </table:table-cell>
          <table:table-cell table:formula="of:=[.P15]" office:value-type="float" office:value="31.46" calcext:value-type="float">
            <text:p>31.46</text:p>
          </table:table-cell>
          <table:table-cell table:style-name="ce20" table:formula="of:=ASTROS.MONTEZUMA.CALCTOOLS.CALCFUNCTIONS.PYTHON.INTERPOLATIONIMPL.INTERPO([.$L15];[.$E$4:.$E$31];[.$F$4:.$F$31])" office:value-type="float" office:value="4574.39998422423" calcext:value-type="float">
            <text:p>4574</text:p>
          </table:table-cell>
          <table:table-cell/>
          <table:table-cell office:value-type="float" office:value="314.6" calcext:value-type="float">
            <text:p>314.6</text:p>
          </table:table-cell>
          <table:table-cell table:formula="of:=[.O15]*[.P$3]" office:value-type="float" office:value="31.46" calcext:value-type="float">
            <text:p>31.46</text:p>
          </table:table-cell>
          <table:table-cell table:number-columns-repeated="24"/>
        </table:table-row>
        <table:table-row table:style-name="ro15">
          <table:table-cell office:value-type="float" office:value="13" calcext:value-type="float">
            <text:p>13</text:p>
          </table:table-cell>
          <table:table-cell table:style-name="ce76" table:formula="of:=[$'6 - B1'.$G$21]" office:value-type="float" office:value="1591.98495393634" calcext:value-type="float">
            <text:p>1592.0</text:p>
          </table:table-cell>
          <table:table-cell table:style-name="ce76" table:formula="of:=[$'6 - B2'.$G$21]" office:value-type="float" office:value="1053.06227027153" calcext:value-type="float">
            <text:p>1053.1</text:p>
          </table:table-cell>
          <table:table-cell table:style-name="ce76" table:formula="of:=[$'6 - B3'.$G$21]" office:value-type="float" office:value="1064.66799743625" calcext:value-type="float">
            <text:p>1064.7</text:p>
          </table:table-cell>
          <table:table-cell table:style-name="ce235" table:formula="of:=AVERAGE([.B16:.D16])" office:value-type="float" office:value="1236.57174054804" calcext:value-type="float">
            <text:p>1236.6</text:p>
          </table:table-cell>
          <table:table-cell table:style-name="ce20" office:value-type="float" office:value="404.043055085374" calcext:value-type="float">
            <text:p>404</text:p>
          </table:table-cell>
          <table:table-cell table:formula="of:=[$'6 - B1'.$L21]+[$'6 - B2'.$L21]+[$'6 - B3'.$L21]" office:value-type="float" office:value="15" calcext:value-type="float">
            <text:p>15</text:p>
          </table:table-cell>
          <table:table-cell table:style-name="ce76" table:formula="of:=STDEVP([$'6 - B1'.$B21:.F21];[$'6 - B2'.B21:.F21];[$'6 - B3'.B21:.F21])/SQRT([.G16])" office:value-type="float" office:value="65.3064762872113" calcext:value-type="float">
            <text:p>65.3</text:p>
          </table:table-cell>
          <table:table-cell table:number-columns-repeated="2"/>
          <table:table-cell table:style-name="ce239" office:value-type="float" office:value="16" calcext:value-type="float">
            <text:p>16</text:p>
          </table:table-cell>
          <table:table-cell table:formula="of:=[.P16]" office:value-type="float" office:value="26.18" calcext:value-type="float">
            <text:p>26.18</text:p>
          </table:table-cell>
          <table:table-cell table:style-name="ce20" table:formula="of:=ASTROS.MONTEZUMA.CALCTOOLS.CALCFUNCTIONS.PYTHON.INTERPOLATIONIMPL.INTERPO([.$L16];[.$E$4:.$E$31];[.$F$4:.$F$31])" office:value-type="float" office:value="4694.24546707727" calcext:value-type="float">
            <text:p>4694</text:p>
          </table:table-cell>
          <table:table-cell/>
          <table:table-cell office:value-type="float" office:value="261.8" calcext:value-type="float">
            <text:p>261.8</text:p>
          </table:table-cell>
          <table:table-cell table:formula="of:=[.O16]*[.P$3]" office:value-type="float" office:value="26.18" calcext:value-type="float">
            <text:p>26.18</text:p>
          </table:table-cell>
          <table:table-cell table:number-columns-repeated="24"/>
        </table:table-row>
        <table:table-row table:style-name="ro15">
          <table:table-cell office:value-type="float" office:value="14" calcext:value-type="float">
            <text:p>14</text:p>
          </table:table-cell>
          <table:table-cell table:style-name="ce76" table:formula="of:=[$'6 - B1'.$G$22]" office:value-type="float" office:value="1216.62537357004" calcext:value-type="float">
            <text:p>1216.6</text:p>
          </table:table-cell>
          <table:table-cell table:style-name="ce76" table:formula="of:=[$'6 - B2'.$G$22]" office:value-type="float" office:value="910.431663495075" calcext:value-type="float">
            <text:p>910.4</text:p>
          </table:table-cell>
          <table:table-cell table:style-name="ce76" table:formula="of:=[$'6 - B3'.$G$22]" office:value-type="float" office:value="920.43944770182" calcext:value-type="float">
            <text:p>920.4</text:p>
          </table:table-cell>
          <table:table-cell table:style-name="ce235" table:formula="of:=AVERAGE([.B17:.D17])" office:value-type="float" office:value="1015.83216158898" calcext:value-type="float">
            <text:p>1015.8</text:p>
          </table:table-cell>
          <table:table-cell table:style-name="ce20" office:value-type="float" office:value="477.819427357784" calcext:value-type="float">
            <text:p>478</text:p>
          </table:table-cell>
          <table:table-cell table:formula="of:=[$'6 - B1'.$L22]+[$'6 - B2'.$L22]+[$'6 - B3'.$L22]" office:value-type="float" office:value="15" calcext:value-type="float">
            <text:p>15</text:p>
          </table:table-cell>
          <table:table-cell table:style-name="ce76" table:formula="of:=STDEVP([$'6 - B1'.$B22:.F22];[$'6 - B2'.B22:.F22];[$'6 - B3'.B22:.F22])/SQRT([.G17])" office:value-type="float" office:value="37.1865091561318" calcext:value-type="float">
            <text:p>37.2</text:p>
          </table:table-cell>
          <table:table-cell table:number-columns-repeated="2"/>
          <table:table-cell table:style-name="ce239" office:value-type="float" office:value="17" calcext:value-type="float">
            <text:p>17</text:p>
          </table:table-cell>
          <table:table-cell table:formula="of:=[.P17]" office:value-type="float" office:value="22.12" calcext:value-type="float">
            <text:p>22.12</text:p>
          </table:table-cell>
          <table:table-cell table:style-name="ce20" table:formula="of:=ASTROS.MONTEZUMA.CALCTOOLS.CALCFUNCTIONS.PYTHON.INTERPOLATIONIMPL.INTERPO([.$L17];[.$E$4:.$E$31];[.$F$4:.$F$31])" office:value-type="float" office:value="4786.39938002866" calcext:value-type="float">
            <text:p>4786</text:p>
          </table:table-cell>
          <table:table-cell/>
          <table:table-cell office:value-type="float" office:value="221.2" calcext:value-type="float">
            <text:p>221.2</text:p>
          </table:table-cell>
          <table:table-cell table:formula="of:=[.O17]*[.P$3]" office:value-type="float" office:value="22.12" calcext:value-type="float">
            <text:p>22.12</text:p>
          </table:table-cell>
          <table:table-cell table:number-columns-repeated="24"/>
        </table:table-row>
        <table:table-row table:style-name="ro15">
          <table:table-cell office:value-type="float" office:value="15" calcext:value-type="float">
            <text:p>15</text:p>
          </table:table-cell>
          <table:table-cell table:style-name="ce76" table:formula="of:=[$'6 - B1'.$G$23]" office:value-type="float" office:value="922.15020160617" calcext:value-type="float">
            <text:p>922.2</text:p>
          </table:table-cell>
          <table:table-cell table:style-name="ce76" table:formula="of:=[$'6 - B2'.$G$23]" office:value-type="float" office:value="801.221750717713" calcext:value-type="float">
            <text:p>801.2</text:p>
          </table:table-cell>
          <table:table-cell table:style-name="ce76" table:formula="of:=[$'6 - B3'.$G$23]" office:value-type="float" office:value="810.33935615467" calcext:value-type="float">
            <text:p>810.3</text:p>
          </table:table-cell>
          <table:table-cell table:style-name="ce235" table:formula="of:=AVERAGE([.B18:.D18])" office:value-type="float" office:value="844.570436159518" calcext:value-type="float">
            <text:p>844.6</text:p>
          </table:table-cell>
          <table:table-cell table:style-name="ce20" office:value-type="float" office:value="565.067020177538" calcext:value-type="float">
            <text:p>565</text:p>
          </table:table-cell>
          <table:table-cell table:formula="of:=[$'6 - B1'.$L23]+[$'6 - B2'.$L23]+[$'6 - B3'.$L23]" office:value-type="float" office:value="15" calcext:value-type="float">
            <text:p>15</text:p>
          </table:table-cell>
          <table:table-cell table:style-name="ce76" table:formula="of:=STDEVP([$'6 - B1'.$B23:.F23];[$'6 - B2'.B23:.F23];[$'6 - B3'.B23:.F23])/SQRT([.G18])" office:value-type="float" office:value="15.3321503207114" calcext:value-type="float">
            <text:p>15.3</text:p>
          </table:table-cell>
          <table:table-cell table:number-columns-repeated="2"/>
          <table:table-cell table:style-name="ce239" office:value-type="float" office:value="18" calcext:value-type="float">
            <text:p>18</text:p>
          </table:table-cell>
          <table:table-cell table:formula="of:=[.P18]" office:value-type="float" office:value="18.87" calcext:value-type="float">
            <text:p>18.87</text:p>
          </table:table-cell>
          <table:table-cell table:style-name="ce20" table:formula="of:=ASTROS.MONTEZUMA.CALCTOOLS.CALCFUNCTIONS.PYTHON.INTERPOLATIONIMPL.INTERPO([.$L18];[.$E$4:.$E$31];[.$F$4:.$F$31])" office:value-type="float" office:value="4860.167906406" calcext:value-type="float">
            <text:p>4860</text:p>
          </table:table-cell>
          <table:table-cell/>
          <table:table-cell office:value-type="float" office:value="188.7" calcext:value-type="float">
            <text:p>188.7</text:p>
          </table:table-cell>
          <table:table-cell table:formula="of:=[.O18]*[.P$3]" office:value-type="float" office:value="18.87" calcext:value-type="float">
            <text:p>18.87</text:p>
          </table:table-cell>
          <table:table-cell table:number-columns-repeated="24"/>
        </table:table-row>
        <table:table-row table:style-name="ro15">
          <table:table-cell office:value-type="float" office:value="16" calcext:value-type="float">
            <text:p>16</text:p>
          </table:table-cell>
          <table:table-cell table:style-name="ce76" table:formula="of:=[$'6 - B1'.$G$24]" office:value-type="float" office:value="703.16350172416" calcext:value-type="float">
            <text:p>703.2</text:p>
          </table:table-cell>
          <table:table-cell table:style-name="ce76" table:formula="of:=[$'6 - B2'.$G$24]" office:value-type="float" office:value="708.678924053245" calcext:value-type="float">
            <text:p>708.7</text:p>
          </table:table-cell>
          <table:table-cell table:style-name="ce76" table:formula="of:=[$'6 - B3'.$G$24]" office:value-type="float" office:value="717.731102626678" calcext:value-type="float">
            <text:p>717.7</text:p>
          </table:table-cell>
          <table:table-cell table:style-name="ce235" table:formula="of:=AVERAGE([.B19:.D19])" office:value-type="float" office:value="709.857842801361" calcext:value-type="float">
            <text:p>709.9</text:p>
          </table:table-cell>
          <table:table-cell table:style-name="ce20" office:value-type="float" office:value="668.245615415787" calcext:value-type="float">
            <text:p>668</text:p>
          </table:table-cell>
          <table:table-cell table:formula="of:=[$'6 - B1'.$L24]+[$'6 - B2'.$L24]+[$'6 - B3'.$L24]" office:value-type="float" office:value="15" calcext:value-type="float">
            <text:p>15</text:p>
          </table:table-cell>
          <table:table-cell table:style-name="ce76" table:formula="of:=STDEVP([$'6 - B1'.$B24:.F24];[$'6 - B2'.B24:.F24];[$'6 - B3'.B24:.F24])/SQRT([.G19])" office:value-type="float" office:value="4.87596588878838" calcext:value-type="float">
            <text:p>4.9</text:p>
          </table:table-cell>
          <table:table-cell table:number-columns-repeated="2"/>
          <table:table-cell table:style-name="ce239" office:value-type="float" office:value="19" calcext:value-type="float">
            <text:p>19</text:p>
          </table:table-cell>
          <table:table-cell table:formula="of:=[.P19]" office:value-type="float" office:value="16.1" calcext:value-type="float">
            <text:p>16.1</text:p>
          </table:table-cell>
          <table:table-cell table:style-name="ce20" table:formula="of:=ASTROS.MONTEZUMA.CALCTOOLS.CALCFUNCTIONS.PYTHON.INTERPOLATIONIMPL.INTERPO([.$L19];[.$E$4:.$E$31];[.$F$4:.$F$31])" office:value-type="float" office:value="4923.04138888761" calcext:value-type="float">
            <text:p>4923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[.O19]*[.P$3]" office:value-type="float" office:value="16.1" calcext:value-type="float">
            <text:p>16.1</text:p>
          </table:table-cell>
          <table:table-cell table:number-columns-repeated="24"/>
        </table:table-row>
        <table:table-row table:style-name="ro15">
          <table:table-cell office:value-type="float" office:value="17" calcext:value-type="float">
            <text:p>17</text:p>
          </table:table-cell>
          <table:table-cell table:style-name="ce76" table:formula="of:=[$'6 - B1'.$G$25]" office:value-type="float" office:value="537.17868040822" calcext:value-type="float">
            <text:p>537.2</text:p>
          </table:table-cell>
          <table:table-cell table:style-name="ce76" table:formula="of:=[$'6 - B2'.$G$25]" office:value-type="float" office:value="635.048271997209" calcext:value-type="float">
            <text:p>635.0</text:p>
          </table:table-cell>
          <table:table-cell table:style-name="ce76" table:formula="of:=[$'6 - B3'.$G$25]" office:value-type="float" office:value="641.72131141858" calcext:value-type="float">
            <text:p>641.7</text:p>
          </table:table-cell>
          <table:table-cell table:style-name="ce235" table:formula="of:=AVERAGE([.B20:.D20])" office:value-type="float" office:value="604.64942127467" calcext:value-type="float">
            <text:p>604.6</text:p>
          </table:table-cell>
          <table:table-cell table:style-name="ce20" office:value-type="float" office:value="790.264139609709" calcext:value-type="float">
            <text:p>790</text:p>
          </table:table-cell>
          <table:table-cell table:formula="of:=[$'6 - B1'.$L25]+[$'6 - B2'.$L25]+[$'6 - B3'.$L25]" office:value-type="float" office:value="15" calcext:value-type="float">
            <text:p>15</text:p>
          </table:table-cell>
          <table:table-cell table:style-name="ce76" table:formula="of:=STDEVP([$'6 - B1'.$B25:.F25];[$'6 - B2'.B25:.F25];[$'6 - B3'.B25:.F25])/SQRT([.G20])" office:value-type="float" office:value="13.0746404747253" calcext:value-type="float">
            <text:p>13.1</text:p>
          </table:table-cell>
          <table:table-cell table:number-columns-repeated="2"/>
          <table:table-cell table:style-name="ce239" office:value-type="float" office:value="20" calcext:value-type="float">
            <text:p>20</text:p>
          </table:table-cell>
          <table:table-cell table:formula="of:=[.P20]" office:value-type="float" office:value="13.64" calcext:value-type="float">
            <text:p>13.64</text:p>
          </table:table-cell>
          <table:table-cell table:style-name="ce20" table:formula="of:=ASTROS.MONTEZUMA.CALCTOOLS.CALCFUNCTIONS.PYTHON.INTERPOLATIONIMPL.INTERPO([.$L20];[.$E$4:.$E$31];[.$F$4:.$F$31])" office:value-type="float" office:value="4978.87848885323" calcext:value-type="float">
            <text:p>4979</text:p>
          </table:table-cell>
          <table:table-cell/>
          <table:table-cell office:value-type="float" office:value="136.4" calcext:value-type="float">
            <text:p>136.4</text:p>
          </table:table-cell>
          <table:table-cell table:formula="of:=[.O20]*[.P$3]" office:value-type="float" office:value="13.64" calcext:value-type="float">
            <text:p>13.64</text:p>
          </table:table-cell>
          <table:table-cell table:number-columns-repeated="24"/>
        </table:table-row>
        <table:table-row table:style-name="ro15">
          <table:table-cell office:value-type="float" office:value="18" calcext:value-type="float">
            <text:p>18</text:p>
          </table:table-cell>
          <table:table-cell table:style-name="ce76" table:formula="of:=[$'6 - B1'.$G$26]" office:value-type="float" office:value="418.072913904593" calcext:value-type="float">
            <text:p>418.1</text:p>
          </table:table-cell>
          <table:table-cell table:style-name="ce76" table:formula="of:=[$'6 - B2'.$G$26]" office:value-type="float" office:value="577.236500613833" calcext:value-type="float">
            <text:p>577.2</text:p>
          </table:table-cell>
          <table:table-cell table:style-name="ce76" table:formula="of:=[$'6 - B3'.$G$26]" office:value-type="float" office:value="583.626216986233" calcext:value-type="float">
            <text:p>583.6</text:p>
          </table:table-cell>
          <table:table-cell table:style-name="ce235" table:formula="of:=AVERAGE([.B21:.D21])" office:value-type="float" office:value="526.31187716822" calcext:value-type="float">
            <text:p>526.3</text:p>
          </table:table-cell>
          <table:table-cell table:style-name="ce20" office:value-type="float" office:value="934.562675678007" calcext:value-type="float">
            <text:p>935</text:p>
          </table:table-cell>
          <table:table-cell table:formula="of:=[$'6 - B1'.$L26]+[$'6 - B2'.$L26]+[$'6 - B3'.$L26]" office:value-type="float" office:value="14" calcext:value-type="float">
            <text:p>14</text:p>
          </table:table-cell>
          <table:table-cell table:style-name="ce76" table:formula="of:=STDEVP([$'6 - B1'.$B26:.F26];[$'6 - B2'.B26:.F26];[$'6 - B3'.B26:.F26])/SQRT([.G21])" office:value-type="float" office:value="19.9759637991679" calcext:value-type="float">
            <text:p>20.0</text:p>
          </table:table-cell>
          <table:table-cell table:number-columns-repeated="2"/>
          <table:table-cell table:style-name="ce239" office:value-type="float" office:value="21" calcext:value-type="float">
            <text:p>21</text:p>
          </table:table-cell>
          <table:table-cell table:formula="of:=[.P21]" office:value-type="float" office:value="11.44" calcext:value-type="float">
            <text:p>11.44</text:p>
          </table:table-cell>
          <table:table-cell table:style-name="ce20" table:formula="of:=ASTROS.MONTEZUMA.CALCTOOLS.CALCFUNCTIONS.PYTHON.INTERPOLATIONIMPL.INTERPO([.$L21];[.$E$4:.$E$31];[.$F$4:.$F$31])" office:value-type="float" office:value="5028.81410670866" calcext:value-type="float">
            <text:p>5029</text:p>
          </table:table-cell>
          <table:table-cell/>
          <table:table-cell office:value-type="float" office:value="114.4" calcext:value-type="float">
            <text:p>114.4</text:p>
          </table:table-cell>
          <table:table-cell table:formula="of:=[.O21]*[.P$3]" office:value-type="float" office:value="11.44" calcext:value-type="float">
            <text:p>11.44</text:p>
          </table:table-cell>
          <table:table-cell table:number-columns-repeated="24"/>
        </table:table-row>
        <table:table-row table:style-name="ro15">
          <table:table-cell office:value-type="float" office:value="19" calcext:value-type="float">
            <text:p>19</text:p>
          </table:table-cell>
          <table:table-cell table:style-name="ce76" table:formula="of:=[$'6 - B1'.$G$27]" office:value-type="float" office:value="322.250019462818" calcext:value-type="float">
            <text:p>322.3</text:p>
          </table:table-cell>
          <table:table-cell table:style-name="ce76" table:formula="of:=[$'6 - B2'.$G$27]" office:value-type="float" office:value="525.245084702788" calcext:value-type="float">
            <text:p>525.2</text:p>
          </table:table-cell>
          <table:table-cell table:style-name="ce76" table:formula="of:=[$'6 - B3'.$G$27]" office:value-type="float" office:value="532.059757917669" calcext:value-type="float">
            <text:p>532.1</text:p>
          </table:table-cell>
          <table:table-cell table:style-name="ce235" table:formula="of:=AVERAGE([.B22:.D22])" office:value-type="float" office:value="459.851620694425" calcext:value-type="float">
            <text:p>459.9</text:p>
          </table:table-cell>
          <table:table-cell table:style-name="ce20" office:value-type="float" office:value="1105.20944959212" calcext:value-type="float">
            <text:p>1105</text:p>
          </table:table-cell>
          <table:table-cell table:formula="of:=[$'6 - B1'.$L27]+[$'6 - B2'.$L27]+[$'6 - B3'.$L27]" office:value-type="float" office:value="14" calcext:value-type="float">
            <text:p>14</text:p>
          </table:table-cell>
          <table:table-cell table:style-name="ce76" table:formula="of:=STDEVP([$'6 - B1'.$B27:.F27];[$'6 - B2'.B27:.F27];[$'6 - B3'.B27:.F27])/SQRT([.G22])" office:value-type="float" office:value="25.2150474966867" calcext:value-type="float">
            <text:p>25.2</text:p>
          </table:table-cell>
          <table:table-cell table:number-columns-repeated="2"/>
          <table:table-cell table:style-name="ce239" office:value-type="float" office:value="22" calcext:value-type="float">
            <text:p>22</text:p>
          </table:table-cell>
          <table:table-cell table:formula="of:=[.P22]" office:value-type="float" office:value="9.53" calcext:value-type="float">
            <text:p>9.53</text:p>
          </table:table-cell>
          <table:table-cell table:style-name="ce20" table:formula="of:=ASTROS.MONTEZUMA.CALCTOOLS.CALCFUNCTIONS.PYTHON.INTERPOLATIONIMPL.INTERPO([.$L22];[.$E$4:.$E$31];[.$F$4:.$F$31])" office:value-type="float" office:value="5072.16730221042" calcext:value-type="float">
            <text:p>5072</text:p>
          </table:table-cell>
          <table:table-cell/>
          <table:table-cell office:value-type="float" office:value="95.3" calcext:value-type="float">
            <text:p>95.3</text:p>
          </table:table-cell>
          <table:table-cell table:formula="of:=[.O22]*[.P$3]" office:value-type="float" office:value="9.53" calcext:value-type="float">
            <text:p>9.53</text:p>
          </table:table-cell>
          <table:table-cell table:number-columns-repeated="24"/>
        </table:table-row>
        <table:table-row table:style-name="ro15">
          <table:table-cell office:value-type="float" office:value="20" calcext:value-type="float">
            <text:p>20</text:p>
          </table:table-cell>
          <table:table-cell table:style-name="ce76" table:formula="of:=[$'6 - B1'.$G$28]" office:value-type="float" office:value="246.730295678889" calcext:value-type="float">
            <text:p>246.7</text:p>
          </table:table-cell>
          <table:table-cell table:style-name="ce76" table:formula="of:=[$'6 - B2'.$G$28]" office:value-type="float" office:value="467.721126204487" calcext:value-type="float">
            <text:p>467.7</text:p>
          </table:table-cell>
          <table:table-cell table:style-name="ce76" table:formula="of:=[$'6 - B3'.$G$28]" office:value-type="float" office:value="472.285120481152" calcext:value-type="float">
            <text:p>472.3</text:p>
          </table:table-cell>
          <table:table-cell table:style-name="ce235" table:formula="of:=AVERAGE([.B23:.D23])" office:value-type="float" office:value="395.578847454843" calcext:value-type="float">
            <text:p>395.6</text:p>
          </table:table-cell>
          <table:table-cell table:style-name="ce20" office:value-type="float" office:value="1307.01552636001" calcext:value-type="float">
            <text:p>1307</text:p>
          </table:table-cell>
          <table:table-cell table:formula="of:=[$'6 - B1'.$L28]+[$'6 - B2'.$L28]+[$'6 - B3'.$L28]" office:value-type="float" office:value="14" calcext:value-type="float">
            <text:p>14</text:p>
          </table:table-cell>
          <table:table-cell table:style-name="ce76" table:formula="of:=STDEVP([$'6 - B1'.$B28:.F28];[$'6 - B2'.B28:.F28];[$'6 - B3'.B28:.F28])/SQRT([.G23])" office:value-type="float" office:value="27.1913295725995" calcext:value-type="float">
            <text:p>27.2</text:p>
          </table:table-cell>
          <table:table-cell table:number-columns-repeated="2"/>
          <table:table-cell table:style-name="ce239" office:value-type="float" office:value="23" calcext:value-type="float">
            <text:p>23</text:p>
          </table:table-cell>
          <table:table-cell table:formula="of:=[.P23]" office:value-type="float" office:value="7.9" calcext:value-type="float">
            <text:p>7.9</text:p>
          </table:table-cell>
          <table:table-cell table:style-name="ce20" table:formula="of:=ASTROS.MONTEZUMA.CALCTOOLS.CALCFUNCTIONS.PYTHON.INTERPOLATIONIMPL.INTERPO([.$L23];[.$E$4:.$E$31];[.$F$4:.$F$31])" office:value-type="float" office:value="5109.16505543968" calcext:value-type="float">
            <text:p>5109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O23]*[.P$3]" office:value-type="float" office:value="7.9" calcext:value-type="float">
            <text:p>7.9</text:p>
          </table:table-cell>
          <table:table-cell table:number-columns-repeated="24"/>
        </table:table-row>
        <table:table-row table:style-name="ro15">
          <table:table-cell office:value-type="float" office:value="21" calcext:value-type="float">
            <text:p>21</text:p>
          </table:table-cell>
          <table:table-cell table:style-name="ce76" table:formula="of:=[$'6 - B1'.$G$29]" office:value-type="float" office:value="189.338270961433" calcext:value-type="float">
            <text:p>189.3</text:p>
          </table:table-cell>
          <table:table-cell table:style-name="ce76" table:formula="of:=[$'6 - B2'.$G$29]" office:value-type="float" office:value="398.407153792845" calcext:value-type="float">
            <text:p>398.4</text:p>
          </table:table-cell>
          <table:table-cell table:style-name="ce76" table:formula="of:=[$'6 - B3'.$G$29]" office:value-type="float" office:value="399.402624855688" calcext:value-type="float">
            <text:p>399.4</text:p>
          </table:table-cell>
          <table:table-cell table:style-name="ce235" table:formula="of:=AVERAGE([.B24:.D24])" office:value-type="float" office:value="329.049349869989" calcext:value-type="float">
            <text:p>329.0</text:p>
          </table:table-cell>
          <table:table-cell table:style-name="ce20" office:value-type="float" office:value="1545.67044896023" calcext:value-type="float">
            <text:p>1546</text:p>
          </table:table-cell>
          <table:table-cell table:formula="of:=[$'6 - B1'.$L29]+[$'6 - B2'.$L29]+[$'6 - B3'.$L29]" office:value-type="float" office:value="14" calcext:value-type="float">
            <text:p>14</text:p>
          </table:table-cell>
          <table:table-cell table:style-name="ce76" table:formula="of:=STDEVP([$'6 - B1'.$B29:.F29];[$'6 - B2'.B29:.F29];[$'6 - B3'.B29:.F29])/SQRT([.G24])" office:value-type="float" office:value="25.4887715459104" calcext:value-type="float">
            <text:p>25.5</text:p>
          </table:table-cell>
          <table:table-cell table:number-columns-repeated="2"/>
          <table:table-cell table:style-name="ce239" office:value-type="float" office:value="24" calcext:value-type="float">
            <text:p>24</text:p>
          </table:table-cell>
          <table:table-cell table:formula="of:=[.P24]" office:value-type="float" office:value="6.53" calcext:value-type="float">
            <text:p>6.53</text:p>
          </table:table-cell>
          <table:table-cell table:style-name="ce20" table:formula="of:=ASTROS.MONTEZUMA.CALCTOOLS.CALCFUNCTIONS.PYTHON.INTERPOLATIONIMPL.INTERPO([.$L24];[.$E$4:.$E$31];[.$F$4:.$F$31])" office:value-type="float" office:value="5140.26132655874" calcext:value-type="float">
            <text:p>5140</text:p>
          </table:table-cell>
          <table:table-cell/>
          <table:table-cell office:value-type="float" office:value="65.3" calcext:value-type="float">
            <text:p>65.3</text:p>
          </table:table-cell>
          <table:table-cell table:formula="of:=[.O24]*[.P$3]" office:value-type="float" office:value="6.53" calcext:value-type="float">
            <text:p>6.53</text:p>
          </table:table-cell>
          <table:table-cell table:number-columns-repeated="24"/>
        </table:table-row>
        <table:table-row table:style-name="ro15">
          <table:table-cell office:value-type="float" office:value="22" calcext:value-type="float">
            <text:p>22</text:p>
          </table:table-cell>
          <table:table-cell table:style-name="ce76" table:formula="of:=[$'6 - B1'.$G$30]" office:value-type="float" office:value="142.930077253541" calcext:value-type="float">
            <text:p>142.9</text:p>
          </table:table-cell>
          <table:table-cell table:style-name="ce76" table:formula="of:=[$'6 - B2'.$G$30]" office:value-type="float" office:value="311.106328011927" calcext:value-type="float">
            <text:p>311.1</text:p>
          </table:table-cell>
          <table:table-cell table:style-name="ce76" table:formula="of:=[$'6 - B3'.$G$30]" office:value-type="float" office:value="311.510617117402" calcext:value-type="float">
            <text:p>311.5</text:p>
          </table:table-cell>
          <table:table-cell table:style-name="ce235" table:formula="of:=AVERAGE([.B25:.D25])" office:value-type="float" office:value="255.18234079429" calcext:value-type="float">
            <text:p>255.2</text:p>
          </table:table-cell>
          <table:table-cell table:style-name="ce20" office:value-type="float" office:value="1827.90264431094" calcext:value-type="float">
            <text:p>1828</text:p>
          </table:table-cell>
          <table:table-cell table:formula="of:=[$'6 - B1'.$L30]+[$'6 - B2'.$L30]+[$'6 - B3'.$L30]" office:value-type="float" office:value="14" calcext:value-type="float">
            <text:p>14</text:p>
          </table:table-cell>
          <table:table-cell table:style-name="ce76" table:formula="of:=STDEVP([$'6 - B1'.$B30:.F30];[$'6 - B2'.B30:.F30];[$'6 - B3'.B30:.F30])/SQRT([.G25])" office:value-type="float" office:value="20.5132913651698" calcext:value-type="float">
            <text:p>20.5</text:p>
          </table:table-cell>
          <table:table-cell table:number-columns-repeated="2"/>
          <table:table-cell table:style-name="ce239" office:value-type="float" office:value="25" calcext:value-type="float">
            <text:p>25</text:p>
          </table:table-cell>
          <table:table-cell table:formula="of:=[.P25]" office:value-type="float" office:value="5.38" calcext:value-type="float">
            <text:p>5.38</text:p>
          </table:table-cell>
          <table:table-cell table:style-name="ce20" table:formula="of:=ASTROS.MONTEZUMA.CALCTOOLS.CALCFUNCTIONS.PYTHON.INTERPOLATIONIMPL.INTERPO([.$L25];[.$E$4:.$E$31];[.$F$4:.$F$31])" office:value-type="float" office:value="5166.36403589226" calcext:value-type="float">
            <text:p>5166</text:p>
          </table:table-cell>
          <table:table-cell/>
          <table:table-cell office:value-type="float" office:value="53.8" calcext:value-type="float">
            <text:p>53.8</text:p>
          </table:table-cell>
          <table:table-cell table:formula="of:=[.O25]*[.P$3]" office:value-type="float" office:value="5.38" calcext:value-type="float">
            <text:p>5.38</text:p>
          </table:table-cell>
          <table:table-cell table:number-columns-repeated="24"/>
        </table:table-row>
        <table:table-row table:style-name="ro15">
          <table:table-cell office:value-type="float" office:value="23" calcext:value-type="float">
            <text:p>23</text:p>
          </table:table-cell>
          <table:table-cell table:style-name="ce76" table:formula="of:=[$'6 - B1'.$G$31]" office:value-type="float" office:value="107.419828537381" calcext:value-type="float">
            <text:p>107.4</text:p>
          </table:table-cell>
          <table:table-cell table:style-name="ce76" table:formula="of:=[$'6 - B2'.$G$31]" office:value-type="float" office:value="225.176364839641" calcext:value-type="float">
            <text:p>225.2</text:p>
          </table:table-cell>
          <table:table-cell table:style-name="ce76" table:formula="of:=[$'6 - B3'.$G$31]" office:value-type="float" office:value="223.733735271001" calcext:value-type="float">
            <text:p>223.7</text:p>
          </table:table-cell>
          <table:table-cell table:style-name="ce235" table:formula="of:=AVERAGE([.B26:.D26])" office:value-type="float" office:value="185.443309549341" calcext:value-type="float">
            <text:p>185.4</text:p>
          </table:table-cell>
          <table:table-cell table:style-name="ce20" office:value-type="float" office:value="2161.66911861877" calcext:value-type="float">
            <text:p>2162</text:p>
          </table:table-cell>
          <table:table-cell table:formula="of:=[$'6 - B1'.$L31]+[$'6 - B2'.$L31]+[$'6 - B3'.$L31]" office:value-type="float" office:value="14" calcext:value-type="float">
            <text:p>14</text:p>
          </table:table-cell>
          <table:table-cell table:style-name="ce76" table:formula="of:=STDEVP([$'6 - B1'.$B31:.F31];[$'6 - B2'.B31:.F31];[$'6 - B3'.B31:.F31])/SQRT([.G26])" office:value-type="float" office:value="14.3871257041612" calcext:value-type="float">
            <text:p>14.4</text:p>
          </table:table-cell>
          <table:table-cell table:number-columns-repeated="2"/>
          <table:table-cell table:style-name="ce239" office:value-type="float" office:value="26" calcext:value-type="float">
            <text:p>26</text:p>
          </table:table-cell>
          <table:table-cell table:formula="of:=[.P26]" office:value-type="float" office:value="4.46" calcext:value-type="float">
            <text:p>4.46</text:p>
          </table:table-cell>
          <table:table-cell table:style-name="ce20" table:formula="of:=ASTROS.MONTEZUMA.CALCTOOLS.CALCFUNCTIONS.PYTHON.INTERPOLATIONIMPL.INTERPO([.$L26];[.$E$4:.$E$31];[.$F$4:.$F$31])" office:value-type="float" office:value="5187.24620335908" calcext:value-type="float">
            <text:p>5187</text:p>
          </table:table-cell>
          <table:table-cell/>
          <table:table-cell office:value-type="float" office:value="44.6" calcext:value-type="float">
            <text:p>44.6</text:p>
          </table:table-cell>
          <table:table-cell table:formula="of:=[.O26]*[.P$3]" office:value-type="float" office:value="4.46" calcext:value-type="float">
            <text:p>4.46</text:p>
          </table:table-cell>
          <table:table-cell table:number-columns-repeated="24"/>
        </table:table-row>
        <table:table-row table:style-name="ro15">
          <table:table-cell office:value-type="float" office:value="24" calcext:value-type="float">
            <text:p>24</text:p>
          </table:table-cell>
          <table:table-cell table:style-name="ce76" table:formula="of:=[$'6 - B1'.$G$32]" office:value-type="float" office:value="79.4424996321581" calcext:value-type="float">
            <text:p>79.4</text:p>
          </table:table-cell>
          <table:table-cell table:style-name="ce76" table:formula="of:=[$'6 - B2'.$G$32]" office:value-type="float" office:value="156.1028961514" calcext:value-type="float">
            <text:p>156.1</text:p>
          </table:table-cell>
          <table:table-cell table:style-name="ce76" table:formula="of:=[$'6 - B3'.$G$32]" office:value-type="float" office:value="155.279573201537" calcext:value-type="float">
            <text:p>155.3</text:p>
          </table:table-cell>
          <table:table-cell table:style-name="ce235" table:formula="of:=AVERAGE([.B27:.D27])" office:value-type="float" office:value="130.274989661699" calcext:value-type="float">
            <text:p>130.3</text:p>
          </table:table-cell>
          <table:table-cell table:style-name="ce20" office:value-type="float" office:value="2556.37979021116" calcext:value-type="float">
            <text:p>2556</text:p>
          </table:table-cell>
          <table:table-cell table:formula="of:=[$'6 - B1'.$L32]+[$'6 - B2'.$L32]+[$'6 - B3'.$L32]" office:value-type="float" office:value="14" calcext:value-type="float">
            <text:p>14</text:p>
          </table:table-cell>
          <table:table-cell table:style-name="ce76" table:formula="of:=STDEVP([$'6 - B1'.$B32:.F32];[$'6 - B2'.B32:.F32];[$'6 - B3'.B32:.F32])/SQRT([.G27])" office:value-type="float" office:value="9.43809847031328" calcext:value-type="float">
            <text:p>9.4</text:p>
          </table:table-cell>
          <table:table-cell table:number-columns-repeated="2"/>
          <table:table-cell table:style-name="ce239" office:value-type="float" office:value="27" calcext:value-type="float">
            <text:p>27</text:p>
          </table:table-cell>
          <table:table-cell table:formula="of:=[.P27]" office:value-type="float" office:value="3.7" calcext:value-type="float">
            <text:p>3.7</text:p>
          </table:table-cell>
          <table:table-cell table:style-name="ce20" table:formula="of:=ASTROS.MONTEZUMA.CALCTOOLS.CALCFUNCTIONS.PYTHON.INTERPOLATIONIMPL.INTERPO([.$L27];[.$E$4:.$E$31];[.$F$4:.$F$31])" office:value-type="float" office:value="5204.49668952732" calcext:value-type="float">
            <text:p>5204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O27]*[.P$3]" office:value-type="float" office:value="3.7" calcext:value-type="float">
            <text:p>3.7</text:p>
          </table:table-cell>
          <table:table-cell table:number-columns-repeated="24"/>
        </table:table-row>
        <table:table-row table:style-name="ro15">
          <table:table-cell office:value-type="float" office:value="25" calcext:value-type="float">
            <text:p>25</text:p>
          </table:table-cell>
          <table:table-cell table:style-name="ce76" table:formula="of:=[$'6 - B1'.$G$33]" office:value-type="float" office:value="57.476256485008" calcext:value-type="float">
            <text:p>57.5</text:p>
          </table:table-cell>
          <table:table-cell table:style-name="ce76" table:formula="of:=[$'6 - B2'.$G$33]" office:value-type="float" office:value="109.5373777924" calcext:value-type="float">
            <text:p>109.5</text:p>
          </table:table-cell>
          <table:table-cell table:style-name="ce76" table:formula="of:=[$'6 - B3'.$G$33]" office:value-type="float" office:value="109.109939318029" calcext:value-type="float">
            <text:p>109.1</text:p>
          </table:table-cell>
          <table:table-cell table:style-name="ce235" table:formula="of:=AVERAGE([.B28:.D28])" office:value-type="float" office:value="92.0411911984791" calcext:value-type="float">
            <text:p>92.0</text:p>
          </table:table-cell>
          <table:table-cell table:style-name="ce20" office:value-type="float" office:value="3023.16278449486" calcext:value-type="float">
            <text:p>3023</text:p>
          </table:table-cell>
          <table:table-cell table:formula="of:=[$'6 - B1'.$L33]+[$'6 - B2'.$L33]+[$'6 - B3'.$L33]" office:value-type="float" office:value="14" calcext:value-type="float">
            <text:p>14</text:p>
          </table:table-cell>
          <table:table-cell table:style-name="ce76" table:formula="of:=STDEVP([$'6 - B1'.$B33:.F33];[$'6 - B2'.B33:.F33];[$'6 - B3'.B33:.F33])/SQRT([.G28])" office:value-type="float" office:value="6.42565705744225" calcext:value-type="float">
            <text:p>6.4</text:p>
          </table:table-cell>
          <table:table-cell table:number-columns-repeated="2"/>
          <table:table-cell table:style-name="ce239" office:value-type="float" office:value="28" calcext:value-type="float">
            <text:p>28</text:p>
          </table:table-cell>
          <table:table-cell table:formula="of:=[.P28]" office:value-type="float" office:value="3.07" calcext:value-type="float">
            <text:p>3.07</text:p>
          </table:table-cell>
          <table:table-cell table:style-name="ce20" table:formula="of:=ASTROS.MONTEZUMA.CALCTOOLS.CALCFUNCTIONS.PYTHON.INTERPOLATIONIMPL.INTERPO([.$L28];[.$E$4:.$E$31];[.$F$4:.$F$31])" office:value-type="float" office:value="5218.79643464047" calcext:value-type="float">
            <text:p>5219</text:p>
          </table:table-cell>
          <table:table-cell/>
          <table:table-cell office:value-type="float" office:value="30.7" calcext:value-type="float">
            <text:p>30.7</text:p>
          </table:table-cell>
          <table:table-cell table:formula="of:=[.O28]*[.P$3]" office:value-type="float" office:value="3.07" calcext:value-type="float">
            <text:p>3.07</text:p>
          </table:table-cell>
          <table:table-cell table:number-columns-repeated="24"/>
        </table:table-row>
        <table:table-row table:style-name="ro15">
          <table:table-cell office:value-type="float" office:value="26" calcext:value-type="float">
            <text:p>26</text:p>
          </table:table-cell>
          <table:table-cell table:style-name="ce76" table:formula="of:=[$'6 - B1'.$G$34]" office:value-type="float" office:value="42.1236833093189" calcext:value-type="float">
            <text:p>42.1</text:p>
          </table:table-cell>
          <table:table-cell table:style-name="ce76" table:formula="of:=[$'6 - B2'.$G$34]" office:value-type="float" office:value="77.0745687071496" calcext:value-type="float">
            <text:p>77.1</text:p>
          </table:table-cell>
          <table:table-cell table:style-name="ce76" table:formula="of:=[$'6 - B3'.$G$34]" office:value-type="float" office:value="76.9236570064184" calcext:value-type="float">
            <text:p>76.9</text:p>
          </table:table-cell>
          <table:table-cell table:style-name="ce235" table:formula="of:=AVERAGE([.B29:.D29])" office:value-type="float" office:value="65.3739696742956" calcext:value-type="float">
            <text:p>65.4</text:p>
          </table:table-cell>
          <table:table-cell table:style-name="ce20" office:value-type="float" office:value="3575.17817053302" calcext:value-type="float">
            <text:p>3575</text:p>
          </table:table-cell>
          <table:table-cell table:formula="of:=[$'6 - B1'.$L34]+[$'6 - B2'.$L34]+[$'6 - B3'.$L34]" office:value-type="float" office:value="14" calcext:value-type="float">
            <text:p>14</text:p>
          </table:table-cell>
          <table:table-cell table:style-name="ce76" table:formula="of:=STDEVP([$'6 - B1'.$B34:.F34];[$'6 - B2'.B34:.F34];[$'6 - B3'.B34:.F34])/SQRT([.G29])" office:value-type="float" office:value="4.39003362683136" calcext:value-type="float">
            <text:p>4.4</text:p>
          </table:table-cell>
          <table:table-cell table:number-columns-repeated="2"/>
          <table:table-cell table:style-name="ce239" office:value-type="float" office:value="29" calcext:value-type="float">
            <text:p>29</text:p>
          </table:table-cell>
          <table:table-cell table:formula="of:=[.P29]" office:value-type="float" office:value="2.52" calcext:value-type="float">
            <text:p>2.52</text:p>
          </table:table-cell>
          <table:table-cell table:style-name="ce20" table:formula="of:=ASTROS.MONTEZUMA.CALCTOOLS.CALCFUNCTIONS.PYTHON.INTERPOLATIONIMPL.INTERPO([.$L29];[.$E$4:.$E$31];[.$F$4:.$F$31])" office:value-type="float" office:value="5231.28033910432" calcext:value-type="float">
            <text:p>5231</text:p>
          </table:table-cell>
          <table:table-cell/>
          <table:table-cell office:value-type="float" office:value="25.2" calcext:value-type="float">
            <text:p>25.2</text:p>
          </table:table-cell>
          <table:table-cell table:formula="of:=[.O29]*[.P$3]" office:value-type="float" office:value="2.52" calcext:value-type="float">
            <text:p>2.52</text:p>
          </table:table-cell>
          <table:table-cell table:number-columns-repeated="24"/>
        </table:table-row>
        <table:table-row table:style-name="ro15">
          <table:table-cell office:value-type="float" office:value="27" calcext:value-type="float">
            <text:p>27</text:p>
          </table:table-cell>
          <table:table-cell table:style-name="ce76" table:formula="of:=[$'6 - B1'.$G$35]" office:value-type="float" office:value="28.9255258630512" calcext:value-type="float">
            <text:p>28.9</text:p>
          </table:table-cell>
          <table:table-cell table:style-name="ce76" table:formula="of:=[$'6 - B2'.$G$35]" office:value-type="float" office:value="55.2986136873441" calcext:value-type="float">
            <text:p>55.3</text:p>
          </table:table-cell>
          <table:table-cell table:style-name="ce76" table:formula="of:=[$'6 - B3'.$G$35]" office:value-type="float" office:value="55.9410674155422" calcext:value-type="float">
            <text:p>55.9</text:p>
          </table:table-cell>
          <table:table-cell table:style-name="ce235" table:formula="of:=AVERAGE([.B30:.D30])" office:value-type="float" office:value="46.7217356553125" calcext:value-type="float">
            <text:p>46.7</text:p>
          </table:table-cell>
          <table:table-cell table:style-name="ce20" office:value-type="float" office:value="4227.98898445409" calcext:value-type="float">
            <text:p>4228</text:p>
          </table:table-cell>
          <table:table-cell table:formula="of:=[$'6 - B1'.$L35]+[$'6 - B2'.$L35]+[$'6 - B3'.$L35]" office:value-type="float" office:value="14" calcext:value-type="float">
            <text:p>14</text:p>
          </table:table-cell>
          <table:table-cell table:style-name="ce76" table:formula="of:=STDEVP([$'6 - B1'.$B35:.F35];[$'6 - B2'.B35:.F35];[$'6 - B3'.B35:.F35])/SQRT([.G30])" office:value-type="float" office:value="3.44067933103439" calcext:value-type="float">
            <text:p>3.4</text:p>
          </table:table-cell>
          <table:table-cell table:number-columns-repeated="2"/>
          <table:table-cell table:style-name="ce239" office:value-type="float" office:value="30" calcext:value-type="float">
            <text:p>30</text:p>
          </table:table-cell>
          <table:table-cell table:formula="of:=[.P30]" office:value-type="float" office:value="2.01" calcext:value-type="float">
            <text:p>2.01</text:p>
          </table:table-cell>
          <table:table-cell table:style-name="ce20" table:formula="of:=ASTROS.MONTEZUMA.CALCTOOLS.CALCFUNCTIONS.PYTHON.INTERPOLATIONIMPL.INTERPO([.$L30];[.$E$4:.$E$31];[.$F$4:.$F$31])" office:value-type="float" office:value="5242.85632324354" calcext:value-type="float">
            <text:p>5243</text:p>
          </table:table-cell>
          <table:table-cell/>
          <table:table-cell office:value-type="float" office:value="20.1" calcext:value-type="float">
            <text:p>20.1</text:p>
          </table:table-cell>
          <table:table-cell table:formula="of:=[.O30]*[.P$3]" office:value-type="float" office:value="2.01" calcext:value-type="float">
            <text:p>2.01</text:p>
          </table:table-cell>
          <table:table-cell table:number-columns-repeated="24"/>
        </table:table-row>
        <table:table-row table:style-name="ro15">
          <table:table-cell office:value-type="float" office:value="28" calcext:value-type="float">
            <text:p>28</text:p>
          </table:table-cell>
          <table:table-cell table:style-name="ce76" table:formula="of:=[$'6 - B1'.$G$36]" office:value-type="float" office:value="18.1724276347106" calcext:value-type="float">
            <text:p>18.2</text:p>
          </table:table-cell>
          <table:table-cell table:style-name="ce76" table:formula="of:=[$'6 - B2'.$G$36]" office:value-type="float" office:value="9.90248466474076" calcext:value-type="float">
            <text:p>9.9</text:p>
          </table:table-cell>
          <table:table-cell table:style-name="ce76" table:formula="of:=[$'6 - B3'.$G$36]" office:value-type="float" office:value="10.0534536013708" calcext:value-type="float">
            <text:p>10.1</text:p>
          </table:table-cell>
          <table:table-cell table:style-name="ce235" table:formula="of:=AVERAGE([.B31:.D31])" office:value-type="float" office:value="12.709455300274" calcext:value-type="float">
            <text:p>12.7</text:p>
          </table:table-cell>
          <table:table-cell table:style-name="ce20" office:value-type="float" office:value="5000.00000000001" calcext:value-type="float">
            <text:p>5000</text:p>
          </table:table-cell>
          <table:table-cell table:formula="of:=[$'6 - B1'.$L36]+[$'6 - B2'.$L36]+[$'6 - B3'.$L36]" office:value-type="float" office:value="15" calcext:value-type="float">
            <text:p>15</text:p>
          </table:table-cell>
          <table:table-cell table:style-name="ce76" table:formula="of:=STDEVP([$'6 - B1'.$B36:.F36];[$'6 - B2'.B36:.F36];[$'6 - B3'.B36:.F36])/SQRT([.G31])" office:value-type="float" office:value="1.16872810697382" calcext:value-type="float">
            <text:p>1.2</text:p>
          </table:table-cell>
          <table:table-cell table:number-columns-repeated="2"/>
          <table:table-cell table:style-name="ce239"/>
          <table:table-cell table:number-columns-repeated="29"/>
        </table:table-row>
        <table:table-row table:style-name="ro2" table:number-rows-repeated="2">
          <table:table-cell/>
          <table:table-cell table:style-name="ce76"/>
          <table:table-cell table:number-columns-repeated="38"/>
        </table:table-row>
        <table:table-row table:style-name="ro2" table:number-rows-repeated="8">
          <table:table-cell table:number-columns-repeated="40"/>
        </table:table-row>
        <table:table-row table:style-name="ro15">
          <table:table-cell table:number-columns-repeated="12"/>
          <table:table-cell table:style-name="ce240" table:number-columns-repeated="28"/>
        </table:table-row>
        <table:table-row table:style-name="ro2" table:number-rows-repeated="2">
          <table:table-cell table:number-columns-repeated="40"/>
        </table:table-row>
        <table:table-row table:style-name="ro15" table:number-rows-repeated="28">
          <table:table-cell table:number-columns-repeated="12"/>
          <table:table-cell table:style-name="ce240"/>
          <table:table-cell table:number-columns-repeated="27"/>
        </table:table-row>
        <table:table-row table:style-name="ro16" table:number-rows-repeated="1048503">
          <table:table-cell table:number-columns-repeated="40"/>
        </table:table-row>
        <table:table-row table:style-name="ro16">
          <table:table-cell table:number-columns-repeated="40"/>
        </table:table-row>
      </table:table>
      <table:table table:name="Clause 6 - Spheres" table:style-name="ta1">
        <table:table-column table:style-name="co11" table:default-cell-style-name="Default"/>
        <table:table-column table:style-name="co4" table:number-columns-repeated="2" table:default-cell-style-name="Default"/>
        <table:table-column table:style-name="co4" table:default-cell-style-name="ce173"/>
        <table:table-column table:style-name="co4" table:number-columns-repeated="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6" table:default-cell-style-name="Default"/>
        <table:table-row table:style-name="ro2">
          <table:table-cell table:style-name="ce33" office:value-type="string" calcext:value-type="string">
            <text:p>APC Model</text:p>
          </table:table-cell>
          <table:table-cell table:style-name="ce33"/>
          <table:table-cell table:style-name="ce179"/>
          <table:table-cell table:style-name="ce47" office:value-type="string" calcext:value-type="string">
            <text:p>LPA3-NAVAIR</text:p>
          </table:table-cell>
          <table:table-cell table:number-columns-repeated="13"/>
        </table:table-row>
        <table:table-row table:style-name="ro2">
          <table:table-cell table:style-name="ce33" office:value-type="string" calcext:value-type="string">
            <text:p>APC S/N</text:p>
          </table:table-cell>
          <table:table-cell table:style-name="ce33" table:number-columns-repeated="2"/>
          <table:table-cell table:style-name="ce33" office:value-type="string" calcext:value-type="string">
            <text:p>11171-00009</text:p>
          </table:table-cell>
          <table:table-cell table:number-columns-repeated="13"/>
        </table:table-row>
        <table:table-row table:style-name="ro2">
          <table:table-cell table:style-name="ce33" office:value-type="string" calcext:value-type="string">
            <text:p>Date</text:p>
          </table:table-cell>
          <table:table-cell table:style-name="ce33" table:number-columns-repeated="2"/>
          <table:table-cell table:style-name="ce255"/>
          <table:table-cell table:number-columns-repeated="13"/>
        </table:table-row>
        <table:table-row table:style-name="ro2">
          <table:table-cell table:style-name="ce33" office:value-type="string" calcext:value-type="string">
            <text:p>Sensor S/N</text:p>
          </table:table-cell>
          <table:table-cell table:style-name="ce33" table:number-columns-repeated="2"/>
          <table:table-cell table:style-name="ce33" office:value-type="string" calcext:value-type="string">
            <text:p>11171-00009</text:p>
          </table:table-cell>
          <table:table-cell table:number-columns-repeated="13"/>
        </table:table-row>
        <table:table-row table:style-name="ro2">
          <table:table-cell table:style-name="ce33" office:value-type="string" calcext:value-type="string">
            <text:p>Sensor Model</text:p>
          </table:table-cell>
          <table:table-cell table:style-name="ce33" table:number-columns-repeated="2"/>
          <table:table-cell table:style-name="ce47" office:value-type="string" calcext:value-type="string">
            <text:p>LPA3-NAVAIR</text:p>
          </table:table-cell>
          <table:table-cell table:number-columns-repeated="13"/>
        </table:table-row>
        <table:table-row table:style-name="ro2">
          <table:table-cell table:style-name="ce179" office:value-type="string" calcext:value-type="string">
            <text:p>Bottle Sampler</text:p>
          </table:table-cell>
          <table:table-cell table:style-name="ce33" table:number-columns-repeated="2"/>
          <table:table-cell table:style-name="ce37" office:value-type="string" calcext:value-type="string">
            <text:p>BS110 BS2042</text:p>
          </table:table-cell>
          <table:table-cell table:number-columns-repeated="13"/>
        </table:table-row>
        <table:table-row table:style-name="ro2">
          <table:table-cell table:style-name="ce33" office:value-type="string" calcext:value-type="string">
            <text:p>Operator</text:p>
          </table:table-cell>
          <table:table-cell table:style-name="ce33" table:number-columns-repeated="2"/>
          <table:table-cell table:style-name="ce46" office:value-type="string" calcext:value-type="string">
            <text:p>JMD</text:p>
          </table:table-cell>
          <table:table-cell table:number-columns-repeated="13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13"/>
        </table:table-row>
        <table:table-row table:style-name="ro2">
          <table:table-cell table:style-name="ce11" office:value-type="string" calcext:value-type="string">
            <text:p>Poly Spheres Concentrate Calculator</text:p>
          </table:table-cell>
          <table:table-cell table:style-name="ce11" table:number-columns-repeated="3"/>
          <table:table-cell table:number-columns-repeated="13"/>
        </table:table-row>
        <table:table-row table:style-name="ro2">
          <table:table-cell table:style-name="ce11" table:number-columns-repeated="4"/>
          <table:table-cell table:number-columns-repeated="3"/>
          <table:table-cell table:style-name="ce89"/>
          <table:table-cell table:number-columns-repeated="9"/>
        </table:table-row>
        <table:table-row table:style-name="ro2">
          <table:table-cell table:style-name="ce243" office:value-type="float" office:value="49.4" calcext:value-type="float">
            <text:p>49.4</text:p>
          </table:table-cell>
          <table:table-cell table:style-name="ce250" office:value-type="string" calcext:value-type="string">
            <text:p>microns</text:p>
          </table:table-cell>
          <table:table-cell table:style-name="ce250" office:value-type="string" calcext:value-type="string">
            <text:p>diameter</text:p>
          </table:table-cell>
          <table:table-cell table:style-name="ce256"/>
          <table:table-cell/>
          <table:table-cell table:style-name="ce259" office:value-type="float" office:value="39" calcext:value-type="float">
            <text:p>39</text:p>
          </table:table-cell>
          <table:table-cell table:style-name="ce250" office:value-type="string" calcext:value-type="string">
            <text:p>microns</text:p>
          </table:table-cell>
          <table:table-cell table:style-name="ce250" office:value-type="string" calcext:value-type="string">
            <text:p>diameter</text:p>
          </table:table-cell>
          <table:table-cell table:style-name="ce117"/>
          <table:table-cell table:style-name="ce118"/>
          <table:table-cell table:number-columns-repeated="2"/>
          <table:table-cell table:style-name="ce243" office:value-type="float" office:value="69.7" calcext:value-type="float">
            <text:p>69.7</text:p>
          </table:table-cell>
          <table:table-cell table:style-name="ce250" office:value-type="string" calcext:value-type="string">
            <text:p>microns</text:p>
          </table:table-cell>
          <table:table-cell table:style-name="ce250" office:value-type="string" calcext:value-type="string">
            <text:p>diameter</text:p>
          </table:table-cell>
          <table:table-cell table:style-name="ce117"/>
          <table:table-cell table:style-name="ce118"/>
        </table:table-row>
        <table:table-row table:style-name="ro2">
          <table:table-cell table:style-name="ce244" table:formula="of:=(4/3)*(3.1415936)*(([.A12]*0.000001/2)^3)" office:value-type="float" office:value="0.000000000000063121832711697" calcext:value-type="float">
            <text:p>6.312E-14</text:p>
          </table:table-cell>
          <table:table-cell table:style-name="ce11" office:value-type="string" calcext:value-type="string">
            <text:p>m^3</text:p>
          </table:table-cell>
          <table:table-cell table:style-name="ce11" office:value-type="string" calcext:value-type="string">
            <text:p>volume of a sphere</text:p>
          </table:table-cell>
          <table:table-cell table:style-name="ce257"/>
          <table:table-cell/>
          <table:table-cell table:style-name="ce244" table:formula="of:=(4/3)*(3.1415936)*(([.F12]*0.000001/2)^3)" office:value-type="float" office:value="0.0000000000000310593651264" calcext:value-type="float">
            <text:p>3.106E-14</text:p>
          </table:table-cell>
          <table:table-cell table:style-name="ce11" office:value-type="string" calcext:value-type="string">
            <text:p>m^3</text:p>
          </table:table-cell>
          <table:table-cell table:style-name="ce11" office:value-type="string" calcext:value-type="string">
            <text:p>volume of a sphere</text:p>
          </table:table-cell>
          <table:table-cell/>
          <table:table-cell table:style-name="ce173"/>
          <table:table-cell table:number-columns-repeated="2"/>
          <table:table-cell table:style-name="ce244" table:formula="of:=(4/3)*(3.1415936)*(([.M12]*0.000001/2)^3)" office:value-type="float" office:value="0.000000000000177295244720002" calcext:value-type="float">
            <text:p>1.773E-13</text:p>
          </table:table-cell>
          <table:table-cell table:style-name="ce11" office:value-type="string" calcext:value-type="string">
            <text:p>m^3</text:p>
          </table:table-cell>
          <table:table-cell table:style-name="ce11" office:value-type="string" calcext:value-type="string">
            <text:p>volume of a sphere</text:p>
          </table:table-cell>
          <table:table-cell/>
          <table:table-cell table:style-name="ce173"/>
        </table:table-row>
        <table:table-row table:style-name="ro2">
          <table:table-cell table:style-name="ce244" table:formula="of:=[.A13]*1.05*1000" office:value-type="float" office:value="0.0000000000662779243472819" calcext:value-type="float">
            <text:p>6.628E-11</text:p>
          </table:table-cell>
          <table:table-cell table:style-name="ce11" office:value-type="string" calcext:value-type="string">
            <text:p>kg</text:p>
          </table:table-cell>
          <table:table-cell table:style-name="ce11" office:value-type="string" calcext:value-type="string">
            <text:p>mass of a sphere</text:p>
          </table:table-cell>
          <table:table-cell table:style-name="ce257"/>
          <table:table-cell/>
          <table:table-cell table:style-name="ce244" table:formula="of:=[.F13]*1.05*1000" office:value-type="float" office:value="0.00000000003261233338272" calcext:value-type="float">
            <text:p>3.261E-11</text:p>
          </table:table-cell>
          <table:table-cell table:style-name="ce11" office:value-type="string" calcext:value-type="string">
            <text:p>kg</text:p>
          </table:table-cell>
          <table:table-cell table:style-name="ce11" office:value-type="string" calcext:value-type="string">
            <text:p>mass of a sphere</text:p>
          </table:table-cell>
          <table:table-cell/>
          <table:table-cell table:style-name="ce173"/>
          <table:table-cell table:number-columns-repeated="2"/>
          <table:table-cell table:style-name="ce244" table:formula="of:=[.M13]*1.05*1000" office:value-type="float" office:value="0.000000000186160006956002" calcext:value-type="float">
            <text:p>1.862E-10</text:p>
          </table:table-cell>
          <table:table-cell table:style-name="ce11" office:value-type="string" calcext:value-type="string">
            <text:p>kg</text:p>
          </table:table-cell>
          <table:table-cell table:style-name="ce11" office:value-type="string" calcext:value-type="string">
            <text:p>mass of a sphere</text:p>
          </table:table-cell>
          <table:table-cell/>
          <table:table-cell table:style-name="ce173"/>
        </table:table-row>
        <table:table-row table:style-name="ro2">
          <table:table-cell table:style-name="ce244" table:formula="of:=0.000001/[.A14]" office:value-type="float" office:value="15087.980045365" calcext:value-type="float">
            <text:p>1.509E+04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spheres per mg</text:p>
          </table:table-cell>
          <table:table-cell table:style-name="ce257"/>
          <table:table-cell/>
          <table:table-cell table:style-name="ce244" table:formula="of:=0.000001/[.F14]" office:value-type="float" office:value="30663.2459647877" calcext:value-type="float">
            <text:p>3.066E+04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spheres per mg</text:p>
          </table:table-cell>
          <table:table-cell/>
          <table:table-cell table:style-name="ce173"/>
          <table:table-cell table:number-columns-repeated="2"/>
          <table:table-cell table:style-name="ce244" table:formula="of:=0.000001/[.M14]" office:value-type="float" office:value="5371.72304809993" calcext:value-type="float">
            <text:p>5.372E+03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spheres per mg</text:p>
          </table:table-cell>
          <table:table-cell/>
          <table:table-cell table:style-name="ce173"/>
        </table:table-row>
        <table:table-row table:style-name="ro2">
          <table:table-cell table:style-name="ce245" office:value-type="float" office:value="5000" calcext:value-type="float">
            <text:p>5000</text:p>
          </table:table-cell>
          <table:table-cell table:style-name="ce11"/>
          <table:table-cell table:style-name="ce11" office:value-type="string" calcext:value-type="string">
            <text:p>Target concentration per ml</text:p>
          </table:table-cell>
          <table:table-cell table:style-name="ce257"/>
          <table:table-cell/>
          <table:table-cell table:style-name="ce245" office:value-type="float" office:value="3000" calcext:value-type="float">
            <text:p>3000</text:p>
          </table:table-cell>
          <table:table-cell table:style-name="ce11"/>
          <table:table-cell table:style-name="ce11" office:value-type="string" calcext:value-type="string">
            <text:p>Target concentration per ml</text:p>
          </table:table-cell>
          <table:table-cell/>
          <table:table-cell table:style-name="ce173"/>
          <table:table-cell table:number-columns-repeated="2"/>
          <table:table-cell table:style-name="ce245" office:value-type="float" office:value="2000" calcext:value-type="float">
            <text:p>2000</text:p>
          </table:table-cell>
          <table:table-cell table:style-name="ce11"/>
          <table:table-cell table:style-name="ce11" office:value-type="string" calcext:value-type="string">
            <text:p>Target concentration per ml</text:p>
          </table:table-cell>
          <table:table-cell/>
          <table:table-cell table:style-name="ce173"/>
        </table:table-row>
        <table:table-row table:style-name="ro2">
          <table:table-cell table:style-name="ce246" table:formula="of:=[.A16]/[.A15]*1000" office:value-type="float" office:value="331.38962173641" calcext:value-type="float">
            <text:p>331.39</text:p>
          </table:table-cell>
          <table:table-cell table:style-name="ce11" office:value-type="string" calcext:value-type="string">
            <text:p>mg/l</text:p>
          </table:table-cell>
          <table:table-cell table:style-name="ce11" office:value-type="string" calcext:value-type="string">
            <text:p>spheres to add per liter</text:p>
          </table:table-cell>
          <table:table-cell table:style-name="ce257"/>
          <table:table-cell/>
          <table:table-cell table:style-name="ce246" table:formula="of:=[.F16]/[.F15]*1000" office:value-type="float" office:value="97.83700014816" calcext:value-type="float">
            <text:p>97.84</text:p>
          </table:table-cell>
          <table:table-cell table:style-name="ce11" office:value-type="string" calcext:value-type="string">
            <text:p>mg/l</text:p>
          </table:table-cell>
          <table:table-cell table:style-name="ce11" office:value-type="string" calcext:value-type="string">
            <text:p>spheres to add per liter</text:p>
          </table:table-cell>
          <table:table-cell/>
          <table:table-cell table:style-name="ce173"/>
          <table:table-cell table:number-columns-repeated="2"/>
          <table:table-cell table:style-name="ce246" table:formula="of:=[.M16]/[.M15]*1000" office:value-type="float" office:value="372.320013912004" calcext:value-type="float">
            <text:p>372.32</text:p>
          </table:table-cell>
          <table:table-cell table:style-name="ce11" office:value-type="string" calcext:value-type="string">
            <text:p>mg/l</text:p>
          </table:table-cell>
          <table:table-cell table:style-name="ce11" office:value-type="string" calcext:value-type="string">
            <text:p>spheres to add per liter</text:p>
          </table:table-cell>
          <table:table-cell/>
          <table:table-cell table:style-name="ce173"/>
        </table:table-row>
        <table:table-row table:style-name="ro2">
          <table:table-cell table:style-name="ce247" office:value-type="float" office:value="0.2028" calcext:value-type="float">
            <text:p>0.2028</text:p>
          </table:table-cell>
          <table:table-cell table:style-name="ce11" office:value-type="string" calcext:value-type="string">
            <text:p>litres</text:p>
          </table:table-cell>
          <table:table-cell table:style-name="ce11" office:value-type="string" calcext:value-type="string">
            <text:p>Bottle / Rig volume</text:p>
          </table:table-cell>
          <table:table-cell table:style-name="ce257"/>
          <table:table-cell/>
          <table:table-cell table:style-name="ce247" office:value-type="float" office:value="0.1" calcext:value-type="float">
            <text:p>0.1</text:p>
          </table:table-cell>
          <table:table-cell table:style-name="ce11" office:value-type="string" calcext:value-type="string">
            <text:p>litres</text:p>
          </table:table-cell>
          <table:table-cell table:style-name="ce11" office:value-type="string" calcext:value-type="string">
            <text:p>Bottle / Rig volume</text:p>
          </table:table-cell>
          <table:table-cell/>
          <table:table-cell table:style-name="ce173"/>
          <table:table-cell table:number-columns-repeated="2"/>
          <table:table-cell table:style-name="ce247" office:value-type="float" office:value="0.2" calcext:value-type="float">
            <text:p>0.2</text:p>
          </table:table-cell>
          <table:table-cell table:style-name="ce11" office:value-type="string" calcext:value-type="string">
            <text:p>litres</text:p>
          </table:table-cell>
          <table:table-cell table:style-name="ce11" office:value-type="string" calcext:value-type="string">
            <text:p>Bottle / Rig volume</text:p>
          </table:table-cell>
          <table:table-cell/>
          <table:table-cell table:style-name="ce173"/>
        </table:table-row>
        <table:table-row table:style-name="ro2">
          <table:table-cell table:style-name="ce246" table:formula="of:=[.A18]*[.A17]" office:value-type="float" office:value="67.2058152881439" calcext:value-type="float">
            <text:p>67.21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Total mass of spheres to add</text:p>
          </table:table-cell>
          <table:table-cell table:style-name="ce257"/>
          <table:table-cell/>
          <table:table-cell table:style-name="ce246" table:formula="of:=[.F18]*[.F17]" office:value-type="float" office:value="9.783700014816" calcext:value-type="float">
            <text:p>9.78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Total mass of spheres to add</text:p>
          </table:table-cell>
          <table:table-cell/>
          <table:table-cell table:style-name="ce173"/>
          <table:table-cell table:number-columns-repeated="2"/>
          <table:table-cell table:style-name="ce246" table:formula="of:=[.M18]*[.M17]" office:value-type="float" office:value="74.4640027824009" calcext:value-type="float">
            <text:p>74.46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Total mass of spheres to add</text:p>
          </table:table-cell>
          <table:table-cell/>
          <table:table-cell table:style-name="ce173"/>
        </table:table-row>
        <table:table-row table:style-name="ro2">
          <table:table-cell table:style-name="ce247" office:value-type="float" office:value="67.2" calcext:value-type="float">
            <text:p>67.2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Actual mass added</text:p>
          </table:table-cell>
          <table:table-cell table:style-name="ce257"/>
          <table:table-cell/>
          <table:table-cell table:style-name="ce247" office:value-type="float" office:value="13.46" calcext:value-type="float">
            <text:p>13.46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Actual mass added</text:p>
          </table:table-cell>
          <table:table-cell/>
          <table:table-cell table:style-name="ce173"/>
          <table:table-cell table:number-columns-repeated="2"/>
          <table:table-cell table:style-name="ce247" office:value-type="float" office:value="77.57" calcext:value-type="float">
            <text:p>77.57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Actual mass added</text:p>
          </table:table-cell>
          <table:table-cell/>
          <table:table-cell table:style-name="ce173"/>
        </table:table-row>
        <table:table-row table:style-name="ro2">
          <table:table-cell table:style-name="ce248" table:formula="of:=[.A20]/[.A19]*[.A16]" office:value-type="float" office:value="4999.56735231029" calcext:value-type="float">
            <text:p>5000</text:p>
          </table:table-cell>
          <table:table-cell table:style-name="ce11" office:value-type="string" calcext:value-type="string">
            <text:p>N/ml</text:p>
          </table:table-cell>
          <table:table-cell table:style-name="ce11" office:value-type="string" calcext:value-type="string">
            <text:p>Concentration expected</text:p>
          </table:table-cell>
          <table:table-cell table:style-name="ce257"/>
          <table:table-cell/>
          <table:table-cell table:style-name="ce248" table:formula="of:=[.F20]/[.F19]*[.F16]" office:value-type="float" office:value="4127.27290686042" calcext:value-type="float">
            <text:p>4127</text:p>
          </table:table-cell>
          <table:table-cell table:style-name="ce11" office:value-type="string" calcext:value-type="string">
            <text:p>N/ml</text:p>
          </table:table-cell>
          <table:table-cell table:style-name="ce11" office:value-type="string" calcext:value-type="string">
            <text:p>Concentration expected</text:p>
          </table:table-cell>
          <table:table-cell/>
          <table:table-cell table:style-name="ce173"/>
          <table:table-cell table:number-columns-repeated="2"/>
          <table:table-cell table:style-name="ce248" table:formula="of:=[.M20]/[.M19]*[.M16]" office:value-type="float" office:value="2083.42278420556" calcext:value-type="float">
            <text:p>2083</text:p>
          </table:table-cell>
          <table:table-cell table:style-name="ce11" office:value-type="string" calcext:value-type="string">
            <text:p>N/ml</text:p>
          </table:table-cell>
          <table:table-cell table:style-name="ce11" office:value-type="string" calcext:value-type="string">
            <text:p>Concentration expected</text:p>
          </table:table-cell>
          <table:table-cell/>
          <table:table-cell table:style-name="ce173"/>
        </table:table-row>
        <table:table-row table:style-name="ro2">
          <table:table-cell table:style-name="ce164"/>
          <table:table-cell table:number-columns-repeated="4"/>
          <table:table-cell table:style-name="ce249" table:formula="of:=[.F20]*[.F15]" office:value-type="float" office:value="412727.290686042" calcext:value-type="float">
            <text:p>412727.3</text:p>
          </table:table-cell>
          <table:table-cell/>
          <table:table-cell office:value-type="string" calcext:value-type="string">
            <text:p>Spheres added</text:p>
          </table:table-cell>
          <table:table-cell/>
          <table:table-cell table:style-name="ce173"/>
          <table:table-cell table:number-columns-repeated="2"/>
          <table:table-cell table:style-name="ce249" table:formula="of:=[.M20]*[.M15]" office:value-type="float" office:value="416684.556841111" calcext:value-type="float">
            <text:p>416684.6</text:p>
          </table:table-cell>
          <table:table-cell/>
          <table:table-cell office:value-type="string" calcext:value-type="string">
            <text:p>Spheres added</text:p>
          </table:table-cell>
          <table:table-cell/>
          <table:table-cell table:style-name="ce173"/>
        </table:table-row>
        <table:table-row table:style-name="ro2">
          <table:table-cell table:style-name="ce164"/>
          <table:table-cell table:number-columns-repeated="4"/>
          <table:table-cell table:style-name="ce249" table:formula="of:=[.F21]/[.F16]*[.F18]*1000" office:value-type="float" office:value="137.575763562014" calcext:value-type="float">
            <text:p>137.6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Adjusted volume required</text:p>
          </table:table-cell>
          <table:table-cell/>
          <table:table-cell table:style-name="ce173"/>
          <table:table-cell table:number-columns-repeated="2"/>
          <table:table-cell table:style-name="ce249" table:formula="of:=[.M21]/[.M16]*[.M18]*1000" office:value-type="float" office:value="208.342278420556" calcext:value-type="float">
            <text:p>208.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Adjusted volume required</text:p>
          </table:table-cell>
          <table:table-cell/>
          <table:table-cell table:style-name="ce173"/>
        </table:table-row>
        <table:table-row table:style-name="ro2">
          <table:table-cell table:style-name="ce164"/>
          <table:table-cell table:number-columns-repeated="4"/>
          <table:table-cell table:style-name="ce249" table:formula="of:=[.F23]-[.F18]*1000" office:value-type="float" office:value="37.5757635620141" calcext:value-type="float">
            <text:p>37.6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Extra volume to add</text:p>
          </table:table-cell>
          <table:table-cell/>
          <table:table-cell table:style-name="ce173"/>
          <table:table-cell table:number-columns-repeated="2"/>
          <table:table-cell table:style-name="ce249" table:formula="of:=[.M23]-[.M18]*1000" office:value-type="float" office:value="8.34227842055566" calcext:value-type="float">
            <text:p>8.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Extra volume to add</text:p>
          </table:table-cell>
          <table:table-cell/>
          <table:table-cell table:style-name="ce173"/>
        </table:table-row>
        <table:table-row table:style-name="ro2" table:number-rows-repeated="2">
          <table:table-cell table:style-name="ce164"/>
          <table:table-cell table:number-columns-repeated="4"/>
          <table:table-cell table:style-name="ce164"/>
          <table:table-cell table:number-columns-repeated="3"/>
          <table:table-cell table:style-name="ce173"/>
          <table:table-cell table:number-columns-repeated="2"/>
          <table:table-cell table:style-name="ce164"/>
          <table:table-cell table:number-columns-repeated="3"/>
          <table:table-cell table:style-name="ce173"/>
        </table:table-row>
        <table:table-row table:style-name="ro2">
          <table:table-cell table:style-name="ce164" office:value-type="string" calcext:value-type="string">
            <text:p>Dilution</text:p>
          </table:table-cell>
          <table:table-cell table:number-columns-repeated="4"/>
          <table:table-cell table:style-name="ce164" office:value-type="string" calcext:value-type="string">
            <text:p>Dilution</text:p>
          </table:table-cell>
          <table:table-cell table:number-columns-repeated="3"/>
          <table:table-cell table:style-name="ce173"/>
          <table:table-cell table:number-columns-repeated="2"/>
          <table:table-cell table:style-name="ce164" office:value-type="string" calcext:value-type="string">
            <text:p>Dilution</text:p>
          </table:table-cell>
          <table:table-cell table:number-columns-repeated="3"/>
          <table:table-cell table:style-name="ce173"/>
        </table:table-row>
        <table:table-row table:style-name="ro2">
          <table:table-cell table:style-name="ce164"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Desired fluid quantity</text:p>
          </table:table-cell>
          <table:table-cell table:number-columns-repeated="2"/>
          <table:table-cell table:style-name="ce164"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Desired fluid quantity</text:p>
          </table:table-cell>
          <table:table-cell/>
          <table:table-cell table:style-name="ce173"/>
          <table:table-cell table:number-columns-repeated="2"/>
          <table:table-cell table:style-name="ce164"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Desired fluid quantity</text:p>
          </table:table-cell>
          <table:table-cell/>
          <table:table-cell table:style-name="ce173"/>
        </table:table-row>
        <table:table-row table:style-name="ro2">
          <table:table-cell table:style-name="ce164" office:value-type="float" office:value="300" calcext:value-type="float">
            <text:p>3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Desired final sphere concentration</text:p>
          </table:table-cell>
          <table:table-cell table:number-columns-repeated="2"/>
          <table:table-cell table:style-name="ce164" office:value-type="float" office:value="300" calcext:value-type="float">
            <text:p>3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Desired final sphere concentration for analysis</text:p>
          </table:table-cell>
          <table:table-cell/>
          <table:table-cell table:style-name="ce173"/>
          <table:table-cell table:number-columns-repeated="2"/>
          <table:table-cell table:style-name="ce164" office:value-type="float" office:value="300" calcext:value-type="float">
            <text:p>3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Desired final sphere concentration for analysis</text:p>
          </table:table-cell>
          <table:table-cell/>
          <table:table-cell table:style-name="ce173"/>
        </table:table-row>
        <table:table-row table:style-name="ro2">
          <table:table-cell table:style-name="ce164" table:formula="of:=[.A28]*[.A29]" office:value-type="float" office:value="30000" calcext:value-type="float">
            <text:p>30000</text:p>
          </table:table-cell>
          <table:table-cell office:value-type="string" calcext:value-type="string">
            <text:p>/bottle</text:p>
          </table:table-cell>
          <table:table-cell office:value-type="string" calcext:value-type="string">
            <text:p>Desired sphere quantity total</text:p>
          </table:table-cell>
          <table:table-cell table:number-columns-repeated="2"/>
          <table:table-cell table:style-name="ce164" table:formula="of:=[.F28]*[.F29]" office:value-type="float" office:value="30000" calcext:value-type="float">
            <text:p>30000</text:p>
          </table:table-cell>
          <table:table-cell office:value-type="string" calcext:value-type="string">
            <text:p>/bottle</text:p>
          </table:table-cell>
          <table:table-cell office:value-type="string" calcext:value-type="string">
            <text:p>Desired sphere quantity total</text:p>
          </table:table-cell>
          <table:table-cell/>
          <table:table-cell table:style-name="ce173"/>
          <table:table-cell table:number-columns-repeated="2"/>
          <table:table-cell table:style-name="ce164" table:formula="of:=[.M28]*[.M29]" office:value-type="float" office:value="30000" calcext:value-type="float">
            <text:p>30000</text:p>
          </table:table-cell>
          <table:table-cell office:value-type="string" calcext:value-type="string">
            <text:p>/bottle</text:p>
          </table:table-cell>
          <table:table-cell office:value-type="string" calcext:value-type="string">
            <text:p>Desired sphere quantity total</text:p>
          </table:table-cell>
          <table:table-cell/>
          <table:table-cell table:style-name="ce173"/>
        </table:table-row>
        <table:table-row table:style-name="ro2">
          <table:table-cell table:style-name="ce249" table:formula="of:=[.A30]/[.A21]" office:value-type="float" office:value="6.0005192221557" calcext:value-type="float">
            <text:p>6.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concentrate</text:p>
          </table:table-cell>
          <table:table-cell table:number-columns-repeated="2"/>
          <table:table-cell table:style-name="ce249" table:formula="of:=[.F30]/[.F21]" office:value-type="float" office:value="7.26872215068053" calcext:value-type="float">
            <text:p>7.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concentrate</text:p>
          </table:table-cell>
          <table:table-cell/>
          <table:table-cell table:style-name="ce173"/>
          <table:table-cell table:number-columns-repeated="2"/>
          <table:table-cell table:style-name="ce249" table:formula="of:=[.M30]/[.M21]" office:value-type="float" office:value="14.399381742117" calcext:value-type="float">
            <text:p>14.4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concentrate</text:p>
          </table:table-cell>
          <table:table-cell/>
          <table:table-cell table:style-name="ce173"/>
        </table:table-row>
        <table:table-row table:style-name="ro2">
          <table:table-cell table:style-name="ce249" table:formula="of:=[.A28]-[.A31]" office:value-type="float" office:value="93.9994807778443" calcext:value-type="float">
            <text:p>94.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diluent</text:p>
          </table:table-cell>
          <table:table-cell table:number-columns-repeated="2"/>
          <table:table-cell table:style-name="ce249" table:formula="of:=[.F28]-[.F31]" office:value-type="float" office:value="92.7312778493195" calcext:value-type="float">
            <text:p>92.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diluent</text:p>
          </table:table-cell>
          <table:table-cell/>
          <table:table-cell table:style-name="ce173"/>
          <table:table-cell table:number-columns-repeated="2"/>
          <table:table-cell table:style-name="ce249" table:formula="of:=[.M28]-[.M31]" office:value-type="float" office:value="85.600618257883" calcext:value-type="float">
            <text:p>85.6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diluent</text:p>
          </table:table-cell>
          <table:table-cell/>
          <table:table-cell table:style-name="ce173"/>
        </table:table-row>
        <table:table-row table:style-name="ro2">
          <table:table-cell table:style-name="ce164"/>
          <table:table-cell table:number-columns-repeated="4"/>
          <table:table-cell table:style-name="ce164"/>
          <table:table-cell table:number-columns-repeated="3"/>
          <table:table-cell table:style-name="ce173"/>
          <table:table-cell table:number-columns-repeated="2"/>
          <table:table-cell table:style-name="ce164"/>
          <table:table-cell table:number-columns-repeated="3"/>
          <table:table-cell table:style-name="ce173"/>
        </table:table-row>
        <table:table-row table:style-name="ro2">
          <table:table-cell table:style-name="ce165"/>
          <table:table-cell table:style-name="ce91" table:number-columns-repeated="2"/>
          <table:table-cell table:style-name="ce211"/>
          <table:table-cell/>
          <table:table-cell table:style-name="ce165"/>
          <table:table-cell table:style-name="ce91" table:number-columns-repeated="3"/>
          <table:table-cell table:style-name="ce211"/>
          <table:table-cell table:number-columns-repeated="2"/>
          <table:table-cell table:style-name="ce165"/>
          <table:table-cell table:style-name="ce91" table:number-columns-repeated="3"/>
          <table:table-cell table:style-name="ce211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13"/>
        </table:table-row>
        <table:table-row table:style-name="ro2">
          <table:table-cell table:style-name="ce89" office:value-type="string" calcext:value-type="string">
            <text:p>Iterative Calculator for sliding window half-count method of PSL sphere threshold measuremen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 table:number-columns-repeated="3"/>
          <table:table-cell table:style-name="Default"/>
          <table:table-cell table:number-columns-repeated="13"/>
        </table:table-row>
        <table:table-row table:style-name="ro2">
          <table:table-cell table:number-columns-repeated="3"/>
          <table:table-cell table:style-name="Default"/>
          <table:table-cell/>
          <table:table-cell table:style-name="ce55"/>
          <table:table-cell table:number-columns-repeated="11"/>
        </table:table-row>
        <table:table-row table:style-name="ro2">
          <table:table-cell office:value-type="string" calcext:value-type="string">
            <text:p>Calibrated Channel Size</text:p>
          </table:table-cell>
          <table:table-cell/>
          <table:table-cell table:style-name="ce89" table:formula="of:=[.A12]" office:value-type="float" office:value="49.4" calcext:value-type="float">
            <text:p>49.4</text:p>
          </table:table-cell>
          <table:table-cell table:style-name="Default" office:value-type="string" calcext:value-type="string">
            <text:p>μm(c)</text:p>
          </table:table-cell>
          <table:table-cell table:number-columns-repeated="2"/>
          <table:table-cell table:style-name="ce89" table:formula="of:=[.F12]" office:value-type="float" office:value="39" calcext:value-type="float">
            <text:p>39</text:p>
          </table:table-cell>
          <table:table-cell office:value-type="string" calcext:value-type="string">
            <text:p>μm(c)</text:p>
          </table:table-cell>
          <table:table-cell table:number-columns-repeated="5"/>
          <table:table-cell table:style-name="ce89" table:formula="of:=[.M12]" office:value-type="float" office:value="69.7" calcext:value-type="float">
            <text:p>69.7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Channel Threshold (LPA-View value)</text:p>
          </table:table-cell>
          <table:table-cell table:style-name="ce251" table:formula="of:=0.56*[.C42]" office:value-type="float" office:value="8736" calcext:value-type="float">
            <text:p>8736</text:p>
          </table:table-cell>
          <table:table-cell table:style-name="ce254" office:value-type="float" office:value="15600" calcext:value-type="float">
            <text:p>15600</text:p>
          </table:table-cell>
          <table:table-cell table:style-name="ce258" table:formula="of:=1.56*[.C42]" office:value-type="float" office:value="24336" calcext:value-type="float">
            <text:p>24336</text:p>
          </table:table-cell>
          <table:table-cell/>
          <table:table-cell table:style-name="ce251" table:formula="of:=0.56*[.G42]" office:value-type="float" office:value="5600" calcext:value-type="float">
            <text:p>5600</text:p>
          </table:table-cell>
          <table:table-cell table:style-name="ce254" office:value-type="float" office:value="10000" calcext:value-type="float">
            <text:p>10000</text:p>
          </table:table-cell>
          <table:table-cell table:style-name="ce258" table:formula="of:=1.56*[.G42]" office:value-type="float" office:value="15600" calcext:value-type="float">
            <text:p>15600</text:p>
          </table:table-cell>
          <table:table-cell table:number-columns-repeated="4"/>
          <table:table-cell table:style-name="ce251" table:formula="of:=0.56*[.N42]" office:value-type="float" office:value="14000" calcext:value-type="float">
            <text:p>14000</text:p>
          </table:table-cell>
          <table:table-cell table:style-name="ce254" office:value-type="float" office:value="25000" calcext:value-type="float">
            <text:p>25000</text:p>
          </table:table-cell>
          <table:table-cell table:style-name="ce258" table:formula="of:=1.56*[.N42]" office:value-type="float" office:value="39000" calcext:value-type="float">
            <text:p>39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mulative Counts / 100ml</text:p>
          </table:table-cell>
          <table:table-cell table:style-name="ce165" office:value-type="float" office:value="41252" calcext:value-type="float">
            <text:p>41252</text:p>
          </table:table-cell>
          <table:table-cell table:style-name="ce91" office:value-type="float" office:value="20600" calcext:value-type="float">
            <text:p>20600</text:p>
          </table:table-cell>
          <table:table-cell table:style-name="ce211" office:value-type="float" office:value="92" calcext:value-type="float">
            <text:p>92</text:p>
          </table:table-cell>
          <table:table-cell/>
          <table:table-cell table:style-name="ce165" office:value-type="float" office:value="43502" calcext:value-type="float">
            <text:p>43502</text:p>
          </table:table-cell>
          <table:table-cell table:style-name="ce91" office:value-type="float" office:value="21877" calcext:value-type="float">
            <text:p>21877</text:p>
          </table:table-cell>
          <table:table-cell table:style-name="ce211" office:value-type="float" office:value="134" calcext:value-type="float">
            <text:p>134</text:p>
          </table:table-cell>
          <table:table-cell table:number-columns-repeated="4"/>
          <table:table-cell table:style-name="ce165" office:value-type="float" office:value="20135" calcext:value-type="float">
            <text:p>20135</text:p>
          </table:table-cell>
          <table:table-cell table:style-name="ce91" office:value-type="float" office:value="10070" calcext:value-type="float">
            <text:p>10070</text:p>
          </table:table-cell>
          <table:table-cell table:style-name="ce211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fferential Counts / 100ml</text:p>
          </table:table-cell>
          <table:table-cell table:style-name="ce252" office:value-type="float" office:value="13047" calcext:value-type="float">
            <text:p>13047</text:p>
          </table:table-cell>
          <table:table-cell table:style-name="ce252" office:value-type="float" office:value="13354" calcext:value-type="float">
            <text:p>13354</text:p>
          </table:table-cell>
          <table:table-cell table:style-name="ce252" table:formula="of:=[.D43]-[.L43]" office:value-type="float" office:value="92" calcext:value-type="float">
            <text:p>92</text:p>
          </table:table-cell>
          <table:table-cell/>
          <table:table-cell table:style-name="ce252" table:formula="of:=[.F43]-[.G43]" office:value-type="float" office:value="21625" calcext:value-type="float">
            <text:p>21625</text:p>
          </table:table-cell>
          <table:table-cell table:style-name="ce252" table:formula="of:=[.G43]-[.H43]" office:value-type="float" office:value="21743" calcext:value-type="float">
            <text:p>21743</text:p>
          </table:table-cell>
          <table:table-cell table:style-name="ce252" table:formula="of:=[.H43]-[.P43]" office:value-type="float" office:value="134" calcext:value-type="float">
            <text:p>134</text:p>
          </table:table-cell>
          <table:table-cell table:number-columns-repeated="4"/>
          <table:table-cell table:style-name="ce252" table:formula="of:=[.M43]-[.N43]" office:value-type="float" office:value="10065" calcext:value-type="float">
            <text:p>10065</text:p>
          </table:table-cell>
          <table:table-cell table:style-name="ce252" table:formula="of:=[.N43]-[.O43]" office:value-type="float" office:value="10070" calcext:value-type="float">
            <text:p>10070</text:p>
          </table:table-cell>
          <table:table-cell table:style-name="ce252" table:formula="of:=[.O43]-[.B43]" office:value-type="float" office:value="-41252" calcext:value-type="float">
            <text:p>-4125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D</text:p>
          </table:table-cell>
          <table:table-cell table:style-name="ce253" table:formula="of:=(1-[.B44]/[.C44])" office:value-type="percentage" office:value="0.0229893664819529" calcext:value-type="percentage">
            <text:p>2.30%</text:p>
          </table:table-cell>
          <table:table-cell/>
          <table:table-cell table:style-name="Default"/>
          <table:table-cell/>
          <table:table-cell table:style-name="ce253" table:formula="of:=(1-[.F44]/[.G44])" office:value-type="percentage" office:value="0.00542703398795019" calcext:value-type="percentage">
            <text:p>0.54%</text:p>
          </table:table-cell>
          <table:table-cell table:number-columns-repeated="6"/>
          <table:table-cell table:style-name="ce253" table:formula="of:=(1-[.M44]/[.N44])" office:value-type="percentage" office:value="0.000496524329692161" calcext:value-type="percentage">
            <text:p>0.05%</text:p>
          </table:table-cell>
          <table:table-cell table:number-columns-repeated="4"/>
        </table:table-row>
      </table:table>
      <table:table table:name="6 - Calibration Curve" table:style-name="ta1">
        <table:table-column table:style-name="co4" table:default-cell-style-name="Default"/>
        <table:table-column table:style-name="co4" table:default-cell-style-name="ce20"/>
        <table:table-column table:style-name="co4" table:default-cell-style-name="Default"/>
        <table:table-column table:style-name="co4" table:default-cell-style-name="ce20"/>
        <table:table-column table:style-name="co4" table:number-columns-repeated="32" table:default-cell-style-name="Default"/>
        <table:table-row table:style-name="ro16">
          <table:table-cell table:style-name="ce238" office:value-type="string" calcext:value-type="string" table:number-columns-spanned="2" table:number-rows-spanned="1">
            <text:p>Data from Table 4</text:p>
          </table:table-cell>
          <table:covered-table-cell table:style-name="ce238"/>
          <table:table-cell table:style-name="ce238" office:value-type="string" calcext:value-type="string" table:number-columns-spanned="2" table:number-rows-spanned="1">
            <text:p>Threshold Settings corresponding to Sizes of Interest</text:p>
          </table:table-cell>
          <table:covered-table-cell table:style-name="ce238"/>
          <table:table-cell table:number-columns-repeated="32"/>
        </table:table-row>
        <table:table-row table:style-name="ro17">
          <table:table-cell table:style-name="ce260" office:value-type="string" calcext:value-type="string" table:number-columns-spanned="2" table:number-rows-spanned="1">
            <text:p>Enter the particle sizes and corresponding threshold settings from Table 4 (also columns F and H of the Clause 6.9 worksheet) <text:span text:style-name="T11">in order of increasing value of particle size</text:span><text:span text:style-name="T12">.</text:span></text:p>
          </table:table-cell>
          <table:covered-table-cell table:style-name="ce263"/>
          <table:table-cell table:style-name="ce260" office:value-type="string" calcext:value-type="string" table:number-columns-spanned="2" table:number-rows-spanned="1">
            <text:p>Enter particle sizes of interest (that lie within the range of the data in column A) <text:span text:style-name="T11">in order of increasing particle size</text:span><text:span text:style-name="T12">. The corresponding interpolated threshold voltage settings are displayed in column D.</text:span></text:p>
          </table:table-cell>
          <table:covered-table-cell table:style-name="ce263"/>
          <table:table-cell/>
          <table:table-cell>
            <draw:frame draw:z-index="0" draw:style-name="gr3" draw:text-style-name="P2" svg:width="20.292cm" svg:height="11.414cm" svg:x="0.326cm" svg:y="3.304cm">
              <draw:object draw:notify-on-update-of-ranges="'Clause 6 - Spheres'.D5:'6 - Calibration Curve'.D34 'Clause 6 - Spheres'.C5:'6 - Calibration Curve'.C34 'Clause 6 - Spheres'.D5:'6 - Calibration Curve'.D3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0"/>
        </table:table-row>
        <table:table-row table:style-name="ro18">
          <table:table-cell table:style-name="ce261" office:value-type="string" calcext:value-type="string">
            <text:p>Particle Size</text:p>
          </table:table-cell>
          <table:table-cell table:style-name="ce264" office:value-type="string" calcext:value-type="string">
            <text:p>Threshold Setting</text:p>
          </table:table-cell>
          <table:table-cell table:style-name="ce261" office:value-type="string" calcext:value-type="string">
            <text:p><text:s/>Particle Size</text:p>
          </table:table-cell>
          <table:table-cell table:style-name="ce265" office:value-type="string" calcext:value-type="string">
            <text:p>Interpolated Threshold Voltage Setting</text:p>
          </table:table-cell>
          <table:table-cell table:number-columns-repeated="32"/>
        </table:table-row>
        <table:table-row table:style-name="ro16">
          <table:table-cell table:style-name="ce238" office:value-type="string" calcext:value-type="string">
            <text:p>µm(c) </text:p>
          </table:table-cell>
          <table:table-cell table:style-name="ce265" office:value-type="string" calcext:value-type="string">
            <text:p>mV</text:p>
          </table:table-cell>
          <table:table-cell table:style-name="ce238" office:value-type="string" calcext:value-type="string">
            <text:p>µm(c) </text:p>
          </table:table-cell>
          <table:table-cell table:style-name="ce265" office:value-type="string" calcext:value-type="string">
            <text:p>mV</text:p>
          </table:table-cell>
          <table:table-cell table:number-columns-repeated="3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$'6 - Interpolated Thresholds'.$M4]" office:value-type="float" office:value="458.034113890536" calcext:value-type="float">
            <text:p>458</text:p>
          </table:table-cell>
          <table:table-cell table:style-name="ce89" office:value-type="float" office:value="4" calcext:value-type="float">
            <text:p>4</text:p>
          </table:table-cell>
          <table:table-cell table:style-name="ce75" table:formula="of:=ASTROS.MONTEZUMA.CALCTOOLS.CALCFUNCTIONS.PYTHON.INTERPOLATIONIMPL.INTERPO([.C5];[.A$5:.A$34];[.B$5:.B$34])" office:value-type="float" office:value="458.034113890536" calcext:value-type="float">
            <text:p>458</text:p>
          </table:table-cell>
          <table:table-cell table:number-columns-repeated="3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$'6 - Interpolated Thresholds'.$M5]" office:value-type="float" office:value="666.520651103108" calcext:value-type="float">
            <text:p>667</text:p>
          </table:table-cell>
          <table:table-cell office:value-type="float" office:value="5" calcext:value-type="float">
            <text:p>5</text:p>
          </table:table-cell>
          <table:table-cell table:formula="of:=ASTROS.MONTEZUMA.CALCTOOLS.CALCFUNCTIONS.PYTHON.INTERPOLATIONIMPL.INTERPO([.C6];[.A$5:.A$34];[.B$5:.B$34])" office:value-type="float" office:value="666.520651103108" calcext:value-type="float">
            <text:p>667</text:p>
          </table:table-cell>
          <table:table-cell table:number-columns-repeated="32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$'6 - Interpolated Thresholds'.$M6]" office:value-type="float" office:value="1071.68008303119" calcext:value-type="float">
            <text:p>1072</text:p>
          </table:table-cell>
          <table:table-cell table:style-name="ce89" office:value-type="float" office:value="6" calcext:value-type="float">
            <text:p>6</text:p>
          </table:table-cell>
          <table:table-cell table:style-name="ce75" table:formula="of:=ASTROS.MONTEZUMA.CALCTOOLS.CALCFUNCTIONS.PYTHON.INTERPOLATIONIMPL.INTERPO([.C7];[.A$5:.A$34];[.B$5:.B$34])" office:value-type="float" office:value="1071.68008303119" calcext:value-type="float">
            <text:p>1072</text:p>
          </table:table-cell>
          <table:table-cell table:number-columns-repeated="32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$'6 - Interpolated Thresholds'.$M7]" office:value-type="float" office:value="1580.51380008794" calcext:value-type="float">
            <text:p>1581</text:p>
          </table:table-cell>
          <table:table-cell office:value-type="float" office:value="7" calcext:value-type="float">
            <text:p>7</text:p>
          </table:table-cell>
          <table:table-cell table:formula="of:=ASTROS.MONTEZUMA.CALCTOOLS.CALCFUNCTIONS.PYTHON.INTERPOLATIONIMPL.INTERPO([.C8];[.A$5:.A$34];[.B$5:.B$34])" office:value-type="float" office:value="1580.51380008794" calcext:value-type="float">
            <text:p>1581</text:p>
          </table:table-cell>
          <table:table-cell table:number-columns-repeated="3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$'6 - Interpolated Thresholds'.$M8]" office:value-type="float" office:value="1957.70840588067" calcext:value-type="float">
            <text:p>1958</text:p>
          </table:table-cell>
          <table:table-cell office:value-type="float" office:value="8" calcext:value-type="float">
            <text:p>8</text:p>
          </table:table-cell>
          <table:table-cell table:formula="of:=ASTROS.MONTEZUMA.CALCTOOLS.CALCFUNCTIONS.PYTHON.INTERPOLATIONIMPL.INTERPO([.C9];[.A$5:.A$34];[.B$5:.B$34])" office:value-type="float" office:value="1957.70840588067" calcext:value-type="float">
            <text:p>1958</text:p>
          </table:table-cell>
          <table:table-cell table:number-columns-repeated="3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$'6 - Interpolated Thresholds'.$M9]" office:value-type="float" office:value="2332.97540113041" calcext:value-type="float">
            <text:p>2333</text:p>
          </table:table-cell>
          <table:table-cell office:value-type="float" office:value="9" calcext:value-type="float">
            <text:p>9</text:p>
          </table:table-cell>
          <table:table-cell table:formula="of:=ASTROS.MONTEZUMA.CALCTOOLS.CALCFUNCTIONS.PYTHON.INTERPOLATIONIMPL.INTERPO([.C10];[.A$5:.A$34];[.B$5:.B$34])" office:value-type="float" office:value="2332.97540113041" calcext:value-type="float">
            <text:p>2333</text:p>
          </table:table-cell>
          <table:table-cell table:number-columns-repeated="3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$'6 - Interpolated Thresholds'.$M10]" office:value-type="float" office:value="2766.67362901266" calcext:value-type="float">
            <text:p>2767</text:p>
          </table:table-cell>
          <table:table-cell office:value-type="float" office:value="10" calcext:value-type="float">
            <text:p>10</text:p>
          </table:table-cell>
          <table:table-cell table:formula="of:=ASTROS.MONTEZUMA.CALCTOOLS.CALCFUNCTIONS.PYTHON.INTERPOLATIONIMPL.INTERPO([.C11];[.A$5:.A$34];[.B$5:.B$34])" office:value-type="float" office:value="2766.67362901266" calcext:value-type="float">
            <text:p>2767</text:p>
          </table:table-cell>
          <table:table-cell table:number-columns-repeated="32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$'6 - Interpolated Thresholds'.$M11]" office:value-type="float" office:value="3238.88296656141" calcext:value-type="float">
            <text:p>3239</text:p>
          </table:table-cell>
          <table:table-cell office:value-type="float" office:value="11" calcext:value-type="float">
            <text:p>11</text:p>
          </table:table-cell>
          <table:table-cell table:formula="of:=ASTROS.MONTEZUMA.CALCTOOLS.CALCFUNCTIONS.PYTHON.INTERPOLATIONIMPL.INTERPO([.C12];[.A$5:.A$34];[.B$5:.B$34])" office:value-type="float" office:value="3238.88296656141" calcext:value-type="float">
            <text:p>3239</text:p>
          </table:table-cell>
          <table:table-cell table:number-columns-repeated="32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$'6 - Interpolated Thresholds'.$M12]" office:value-type="float" office:value="3698.16383545853" calcext:value-type="float">
            <text:p>3698</text:p>
          </table:table-cell>
          <table:table-cell office:value-type="float" office:value="12" calcext:value-type="float">
            <text:p>12</text:p>
          </table:table-cell>
          <table:table-cell table:formula="of:=ASTROS.MONTEZUMA.CALCTOOLS.CALCFUNCTIONS.PYTHON.INTERPOLATIONIMPL.INTERPO([.C13];[.A$5:.A$34];[.B$5:.B$34])" office:value-type="float" office:value="3698.16383545853" calcext:value-type="float">
            <text:p>3698</text:p>
          </table:table-cell>
          <table:table-cell table:number-columns-repeated="32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$'6 - Interpolated Thresholds'.$M13]" office:value-type="float" office:value="4176.60110025045" calcext:value-type="float">
            <text:p>4177</text:p>
          </table:table-cell>
          <table:table-cell office:value-type="float" office:value="13" calcext:value-type="float">
            <text:p>13</text:p>
          </table:table-cell>
          <table:table-cell table:formula="of:=ASTROS.MONTEZUMA.CALCTOOLS.CALCFUNCTIONS.PYTHON.INTERPOLATIONIMPL.INTERPO([.C14];[.A$5:.A$34];[.B$5:.B$34])" office:value-type="float" office:value="4176.60110025045" calcext:value-type="float">
            <text:p>4177</text:p>
          </table:table-cell>
          <table:table-cell table:number-columns-repeated="32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$'6 - Interpolated Thresholds'.$M14]" office:value-type="float" office:value="4415.28694733033" calcext:value-type="float">
            <text:p>4415</text:p>
          </table:table-cell>
          <table:table-cell table:style-name="ce89" office:value-type="float" office:value="14" calcext:value-type="float">
            <text:p>14</text:p>
          </table:table-cell>
          <table:table-cell table:style-name="ce75" table:formula="of:=ASTROS.MONTEZUMA.CALCTOOLS.CALCFUNCTIONS.PYTHON.INTERPOLATIONIMPL.INTERPO([.C15];[.A$5:.A$34];[.B$5:.B$34])" office:value-type="float" office:value="4415.28694733033" calcext:value-type="float">
            <text:p>4415</text:p>
          </table:table-cell>
          <table:table-cell table:number-columns-repeated="32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$'6 - Interpolated Thresholds'.$M15]" office:value-type="float" office:value="4574.39998422423" calcext:value-type="float">
            <text:p>4574</text:p>
          </table:table-cell>
          <table:table-cell office:value-type="float" office:value="15" calcext:value-type="float">
            <text:p>15</text:p>
          </table:table-cell>
          <table:table-cell table:formula="of:=ASTROS.MONTEZUMA.CALCTOOLS.CALCFUNCTIONS.PYTHON.INTERPOLATIONIMPL.INTERPO([.C16];[.A$5:.A$34];[.B$5:.B$34])" office:value-type="float" office:value="4574.39998422423" calcext:value-type="float">
            <text:p>4574</text:p>
          </table:table-cell>
          <table:table-cell table:number-columns-repeated="32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$'6 - Interpolated Thresholds'.$M16]" office:value-type="float" office:value="4694.24546707727" calcext:value-type="float">
            <text:p>4694</text:p>
          </table:table-cell>
          <table:table-cell office:value-type="float" office:value="16" calcext:value-type="float">
            <text:p>16</text:p>
          </table:table-cell>
          <table:table-cell table:formula="of:=ASTROS.MONTEZUMA.CALCTOOLS.CALCFUNCTIONS.PYTHON.INTERPOLATIONIMPL.INTERPO([.C17];[.A$5:.A$34];[.B$5:.B$34])" office:value-type="float" office:value="4694.24546707727" calcext:value-type="float">
            <text:p>4694</text:p>
          </table:table-cell>
          <table:table-cell table:number-columns-repeated="32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$'6 - Interpolated Thresholds'.$M17]" office:value-type="float" office:value="4786.39938002866" calcext:value-type="float">
            <text:p>4786</text:p>
          </table:table-cell>
          <table:table-cell office:value-type="float" office:value="17" calcext:value-type="float">
            <text:p>17</text:p>
          </table:table-cell>
          <table:table-cell table:formula="of:=ASTROS.MONTEZUMA.CALCTOOLS.CALCFUNCTIONS.PYTHON.INTERPOLATIONIMPL.INTERPO([.C18];[.A$5:.A$34];[.B$5:.B$34])" office:value-type="float" office:value="4786.39938002866" calcext:value-type="float">
            <text:p>4786</text:p>
          </table:table-cell>
          <table:table-cell table:number-columns-repeated="32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$'6 - Interpolated Thresholds'.$M18]" office:value-type="float" office:value="4860.167906406" calcext:value-type="float">
            <text:p>4860</text:p>
          </table:table-cell>
          <table:table-cell office:value-type="float" office:value="18" calcext:value-type="float">
            <text:p>18</text:p>
          </table:table-cell>
          <table:table-cell table:formula="of:=ASTROS.MONTEZUMA.CALCTOOLS.CALCFUNCTIONS.PYTHON.INTERPOLATIONIMPL.INTERPO([.C19];[.A$5:.A$34];[.B$5:.B$34])" office:value-type="float" office:value="4860.167906406" calcext:value-type="float">
            <text:p>4860</text:p>
          </table:table-cell>
          <table:table-cell table:number-columns-repeated="32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$'6 - Interpolated Thresholds'.$M19]" office:value-type="float" office:value="4923.04138888761" calcext:value-type="float">
            <text:p>4923</text:p>
          </table:table-cell>
          <table:table-cell office:value-type="float" office:value="19" calcext:value-type="float">
            <text:p>19</text:p>
          </table:table-cell>
          <table:table-cell table:formula="of:=ASTROS.MONTEZUMA.CALCTOOLS.CALCFUNCTIONS.PYTHON.INTERPOLATIONIMPL.INTERPO([.C20];[.A$5:.A$34];[.B$5:.B$34])" office:value-type="float" office:value="4923.04138888761" calcext:value-type="float">
            <text:p>4923</text:p>
          </table:table-cell>
          <table:table-cell table:number-columns-repeated="32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$'6 - Interpolated Thresholds'.$M20]" office:value-type="float" office:value="4978.87848885323" calcext:value-type="float">
            <text:p>4979</text:p>
          </table:table-cell>
          <table:table-cell office:value-type="float" office:value="20" calcext:value-type="float">
            <text:p>20</text:p>
          </table:table-cell>
          <table:table-cell table:formula="of:=ASTROS.MONTEZUMA.CALCTOOLS.CALCFUNCTIONS.PYTHON.INTERPOLATIONIMPL.INTERPO([.C21];[.A$5:.A$34];[.B$5:.B$34])" office:value-type="float" office:value="4978.87848885323" calcext:value-type="float">
            <text:p>4979</text:p>
          </table:table-cell>
          <table:table-cell table:number-columns-repeated="32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$'6 - Interpolated Thresholds'.$M21]" office:value-type="float" office:value="5028.81410670866" calcext:value-type="float">
            <text:p>5029</text:p>
          </table:table-cell>
          <table:table-cell table:style-name="ce89" office:value-type="float" office:value="21" calcext:value-type="float">
            <text:p>21</text:p>
          </table:table-cell>
          <table:table-cell table:style-name="ce75" table:formula="of:=ASTROS.MONTEZUMA.CALCTOOLS.CALCFUNCTIONS.PYTHON.INTERPOLATIONIMPL.INTERPO([.C22];[.A$5:.A$34];[.B$5:.B$34])" office:value-type="float" office:value="5028.81410670866" calcext:value-type="float">
            <text:p>5029</text:p>
          </table:table-cell>
          <table:table-cell table:number-columns-repeated="2"/>
          <table:table-cell table:style-name="ce20" table:formula="of:=[$'6 - Calibration Curve'.$D$5]" office:value-type="float" office:value="458.034113890536" calcext:value-type="float">
            <text:p>458</text:p>
          </table:table-cell>
          <table:table-cell table:style-name="ce20" table:formula="of:=[$'6 - Calibration Curve'.$D$6]" office:value-type="float" office:value="666.520651103108" calcext:value-type="float">
            <text:p>667</text:p>
          </table:table-cell>
          <table:table-cell table:style-name="ce20" table:formula="of:=[$'6 - Calibration Curve'.$D$7]" office:value-type="float" office:value="1071.68008303119" calcext:value-type="float">
            <text:p>1072</text:p>
          </table:table-cell>
          <table:table-cell table:style-name="ce20" table:formula="of:=[$'6 - Calibration Curve'.$D$8]" office:value-type="float" office:value="1580.51380008794" calcext:value-type="float">
            <text:p>1581</text:p>
          </table:table-cell>
          <table:table-cell table:style-name="ce20" table:formula="of:=[$'6 - Calibration Curve'.$D$9]" office:value-type="float" office:value="1957.70840588067" calcext:value-type="float">
            <text:p>1958</text:p>
          </table:table-cell>
          <table:table-cell table:style-name="ce20" table:formula="of:=[$'6 - Calibration Curve'.$D$10]" office:value-type="float" office:value="2332.97540113041" calcext:value-type="float">
            <text:p>2333</text:p>
          </table:table-cell>
          <table:table-cell table:style-name="ce20" table:formula="of:=[$'6 - Calibration Curve'.$D$11]" office:value-type="float" office:value="2766.67362901266" calcext:value-type="float">
            <text:p>2767</text:p>
          </table:table-cell>
          <table:table-cell table:style-name="ce20" table:formula="of:=[$'6 - Calibration Curve'.$D$12]" office:value-type="float" office:value="3238.88296656141" calcext:value-type="float">
            <text:p>3239</text:p>
          </table:table-cell>
          <table:table-cell table:style-name="ce20" table:formula="of:=[$'6 - Calibration Curve'.$D$13]" office:value-type="float" office:value="3698.16383545853" calcext:value-type="float">
            <text:p>3698</text:p>
          </table:table-cell>
          <table:table-cell table:style-name="ce20" table:formula="of:=[$'6 - Calibration Curve'.$D$14]" office:value-type="float" office:value="4176.60110025045" calcext:value-type="float">
            <text:p>4177</text:p>
          </table:table-cell>
          <table:table-cell table:style-name="ce20" table:formula="of:=[$'6 - Calibration Curve'.$D$15]" office:value-type="float" office:value="4415.28694733033" calcext:value-type="float">
            <text:p>4415</text:p>
          </table:table-cell>
          <table:table-cell table:style-name="ce20" table:formula="of:=[$'6 - Calibration Curve'.$D$16]" office:value-type="float" office:value="4574.39998422423" calcext:value-type="float">
            <text:p>4574</text:p>
          </table:table-cell>
          <table:table-cell table:style-name="ce20" table:formula="of:=[$'6 - Calibration Curve'.$D$17]" office:value-type="float" office:value="4694.24546707727" calcext:value-type="float">
            <text:p>4694</text:p>
          </table:table-cell>
          <table:table-cell table:style-name="ce20" table:formula="of:=[$'6 - Calibration Curve'.$D$18]" office:value-type="float" office:value="4786.39938002866" calcext:value-type="float">
            <text:p>4786</text:p>
          </table:table-cell>
          <table:table-cell table:style-name="ce20" table:formula="of:=[$'6 - Calibration Curve'.$D$19]" office:value-type="float" office:value="4860.167906406" calcext:value-type="float">
            <text:p>4860</text:p>
          </table:table-cell>
          <table:table-cell table:style-name="ce20" table:formula="of:=[$'6 - Calibration Curve'.$D$20]" office:value-type="float" office:value="4923.04138888761" calcext:value-type="float">
            <text:p>4923</text:p>
          </table:table-cell>
          <table:table-cell table:style-name="ce20" table:formula="of:=[$'6 - Calibration Curve'.$D$21]" office:value-type="float" office:value="4978.87848885323" calcext:value-type="float">
            <text:p>4979</text:p>
          </table:table-cell>
          <table:table-cell table:style-name="ce20" table:formula="of:=[$'6 - Calibration Curve'.$D$22]" office:value-type="float" office:value="5028.81410670866" calcext:value-type="float">
            <text:p>5029</text:p>
          </table:table-cell>
          <table:table-cell table:style-name="ce20" table:formula="of:=[$'6 - Calibration Curve'.$D$23]" office:value-type="float" office:value="5072.16730221042" calcext:value-type="float">
            <text:p>5072</text:p>
          </table:table-cell>
          <table:table-cell table:style-name="ce20" table:formula="of:=[$'6 - Calibration Curve'.$D$24]" office:value-type="float" office:value="5109.16505543968" calcext:value-type="float">
            <text:p>5109</text:p>
          </table:table-cell>
          <table:table-cell table:style-name="ce20" table:formula="of:=[$'6 - Calibration Curve'.$D$25]" office:value-type="float" office:value="5140.26132655874" calcext:value-type="float">
            <text:p>5140</text:p>
          </table:table-cell>
          <table:table-cell table:style-name="ce20" table:formula="of:=[$'6 - Calibration Curve'.$D$26]" office:value-type="float" office:value="5166.36403589226" calcext:value-type="float">
            <text:p>5166</text:p>
          </table:table-cell>
          <table:table-cell table:style-name="ce20" table:formula="of:=[$'6 - Calibration Curve'.$D$27]" office:value-type="float" office:value="5187.24620335908" calcext:value-type="float">
            <text:p>5187</text:p>
          </table:table-cell>
          <table:table-cell table:style-name="ce20" table:formula="of:=[$'6 - Calibration Curve'.$D$28]" office:value-type="float" office:value="5204.49668952732" calcext:value-type="float">
            <text:p>5204</text:p>
          </table:table-cell>
          <table:table-cell table:style-name="ce20" table:formula="of:=[$'6 - Calibration Curve'.$D$29]" office:value-type="float" office:value="5218.79643464047" calcext:value-type="float">
            <text:p>5219</text:p>
          </table:table-cell>
          <table:table-cell table:style-name="ce20" table:formula="of:=[$'6 - Calibration Curve'.$D$30]" office:value-type="float" office:value="5231.28033910432" calcext:value-type="float">
            <text:p>5231</text:p>
          </table:table-cell>
          <table:table-cell table:style-name="ce20" table:formula="of:=[$'6 - Calibration Curve'.$D$31]" office:value-type="float" office:value="5242.85632324354" calcext:value-type="float">
            <text:p>5243</text:p>
          </table:table-cell>
          <table:table-cell table:style-name="ce20" table:formula="of:=[$'6 - Calibration Curve'.$D$32]" office:value-type="float" office:value="9521.20625813817" calcext:value-type="float">
            <text:p>9521</text:p>
          </table:table-cell>
          <table:table-cell table:style-name="ce20" table:formula="of:=[$'6 - Calibration Curve'.$D$33]" office:value-type="float" office:value="15586.6995073892" calcext:value-type="float">
            <text:p>15587</text:p>
          </table:table-cell>
          <table:table-cell table:style-name="ce20" table:formula="of:=[$'6 - Calibration Curve'.$D$34]" office:value-type="float" office:value="25143.3497536946" calcext:value-type="float">
            <text:p>2514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$'6 - Interpolated Thresholds'.$M22]" office:value-type="float" office:value="5072.16730221042" calcext:value-type="float">
            <text:p>5072</text:p>
          </table:table-cell>
          <table:table-cell office:value-type="float" office:value="22" calcext:value-type="float">
            <text:p>22</text:p>
          </table:table-cell>
          <table:table-cell table:formula="of:=ASTROS.MONTEZUMA.CALCTOOLS.CALCFUNCTIONS.PYTHON.INTERPOLATIONIMPL.INTERPO([.C23];[.A$5:.A$34];[.B$5:.B$34])" office:value-type="float" office:value="5072.16730221042" calcext:value-type="float">
            <text:p>5072</text:p>
          </table:table-cell>
          <table:table-cell/>
          <table:table-cell office:value-type="string" calcext:value-type="string">
            <text:p>ROUNDED</text:p>
          </table:table-cell>
          <table:table-cell table:formula="of:=INT([.G22]+0.5)" office:value-type="float" office:value="458" calcext:value-type="float">
            <text:p>458</text:p>
          </table:table-cell>
          <table:table-cell table:formula="of:=INT([.H22]+0.5)" office:value-type="float" office:value="667" calcext:value-type="float">
            <text:p>667</text:p>
          </table:table-cell>
          <table:table-cell table:formula="of:=INT([.I22]+0.5)" office:value-type="float" office:value="1072" calcext:value-type="float">
            <text:p>1072</text:p>
          </table:table-cell>
          <table:table-cell table:formula="of:=INT([.J22]+0.5)" office:value-type="float" office:value="1581" calcext:value-type="float">
            <text:p>1581</text:p>
          </table:table-cell>
          <table:table-cell table:formula="of:=INT([.K22]+0.5)" office:value-type="float" office:value="1958" calcext:value-type="float">
            <text:p>1958</text:p>
          </table:table-cell>
          <table:table-cell table:formula="of:=INT([.L22]+0.5)" office:value-type="float" office:value="2333" calcext:value-type="float">
            <text:p>2333</text:p>
          </table:table-cell>
          <table:table-cell table:formula="of:=INT([.M22]+0.5)" office:value-type="float" office:value="2767" calcext:value-type="float">
            <text:p>2767</text:p>
          </table:table-cell>
          <table:table-cell table:formula="of:=INT([.N22]+0.5)" office:value-type="float" office:value="3239" calcext:value-type="float">
            <text:p>3239</text:p>
          </table:table-cell>
          <table:table-cell table:formula="of:=INT([.O22]+0.5)" office:value-type="float" office:value="3698" calcext:value-type="float">
            <text:p>3698</text:p>
          </table:table-cell>
          <table:table-cell table:formula="of:=INT([.P22]+0.5)" office:value-type="float" office:value="4177" calcext:value-type="float">
            <text:p>4177</text:p>
          </table:table-cell>
          <table:table-cell table:formula="of:=INT([.Q22]+0.5)" office:value-type="float" office:value="4415" calcext:value-type="float">
            <text:p>4415</text:p>
          </table:table-cell>
          <table:table-cell table:formula="of:=INT([.R22]+0.5)" office:value-type="float" office:value="4574" calcext:value-type="float">
            <text:p>4574</text:p>
          </table:table-cell>
          <table:table-cell table:formula="of:=INT([.S22]+0.5)" office:value-type="float" office:value="4694" calcext:value-type="float">
            <text:p>4694</text:p>
          </table:table-cell>
          <table:table-cell table:formula="of:=INT([.T22]+0.5)" office:value-type="float" office:value="4786" calcext:value-type="float">
            <text:p>4786</text:p>
          </table:table-cell>
          <table:table-cell table:formula="of:=INT([.U22]+0.5)" office:value-type="float" office:value="4860" calcext:value-type="float">
            <text:p>4860</text:p>
          </table:table-cell>
          <table:table-cell table:formula="of:=INT([.V22]+0.5)" office:value-type="float" office:value="4923" calcext:value-type="float">
            <text:p>4923</text:p>
          </table:table-cell>
          <table:table-cell table:formula="of:=INT([.W22]+0.5)" office:value-type="float" office:value="4979" calcext:value-type="float">
            <text:p>4979</text:p>
          </table:table-cell>
          <table:table-cell table:formula="of:=INT([.X22]+0.5)" office:value-type="float" office:value="5029" calcext:value-type="float">
            <text:p>5029</text:p>
          </table:table-cell>
          <table:table-cell table:formula="of:=INT([.Y22]+0.5)" office:value-type="float" office:value="5072" calcext:value-type="float">
            <text:p>5072</text:p>
          </table:table-cell>
          <table:table-cell table:formula="of:=INT([.Z22]+0.5)" office:value-type="float" office:value="5109" calcext:value-type="float">
            <text:p>5109</text:p>
          </table:table-cell>
          <table:table-cell table:formula="of:=INT([.AA22]+0.5)" office:value-type="float" office:value="5140" calcext:value-type="float">
            <text:p>5140</text:p>
          </table:table-cell>
          <table:table-cell table:formula="of:=INT([.AB22]+0.5)" office:value-type="float" office:value="5166" calcext:value-type="float">
            <text:p>5166</text:p>
          </table:table-cell>
          <table:table-cell table:formula="of:=INT([.AC22]+0.5)" office:value-type="float" office:value="5187" calcext:value-type="float">
            <text:p>5187</text:p>
          </table:table-cell>
          <table:table-cell table:formula="of:=INT([.AD22]+0.5)" office:value-type="float" office:value="5204" calcext:value-type="float">
            <text:p>5204</text:p>
          </table:table-cell>
          <table:table-cell table:formula="of:=INT([.AE22]+0.5)" office:value-type="float" office:value="5219" calcext:value-type="float">
            <text:p>5219</text:p>
          </table:table-cell>
          <table:table-cell table:formula="of:=INT([.AF22]+0.5)" office:value-type="float" office:value="5231" calcext:value-type="float">
            <text:p>5231</text:p>
          </table:table-cell>
          <table:table-cell table:formula="of:=INT([.AG22]+0.5)" office:value-type="float" office:value="5243" calcext:value-type="float">
            <text:p>5243</text:p>
          </table:table-cell>
          <table:table-cell table:formula="of:=INT([.AH22]+0.5)" office:value-type="float" office:value="9521" calcext:value-type="float">
            <text:p>9521</text:p>
          </table:table-cell>
          <table:table-cell table:formula="of:=INT([.AI22]+0.5)" office:value-type="float" office:value="15587" calcext:value-type="float">
            <text:p>15587</text:p>
          </table:table-cell>
          <table:table-cell table:formula="of:=INT([.AJ22]+0.5)" office:value-type="float" office:value="25143" calcext:value-type="float">
            <text:p>2514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$'6 - Interpolated Thresholds'.$M23]" office:value-type="float" office:value="5109.16505543968" calcext:value-type="float">
            <text:p>5109</text:p>
          </table:table-cell>
          <table:table-cell office:value-type="float" office:value="23" calcext:value-type="float">
            <text:p>23</text:p>
          </table:table-cell>
          <table:table-cell table:formula="of:=ASTROS.MONTEZUMA.CALCTOOLS.CALCFUNCTIONS.PYTHON.INTERPOLATIONIMPL.INTERPO([.C24];[.A$5:.A$34];[.B$5:.B$34])" office:value-type="float" office:value="5109.16505543968" calcext:value-type="float">
            <text:p>5109</text:p>
          </table:table-cell>
          <table:table-cell table:number-columns-repeated="32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$'6 - Interpolated Thresholds'.$M24]" office:value-type="float" office:value="5140.26132655874" calcext:value-type="float">
            <text:p>5140</text:p>
          </table:table-cell>
          <table:table-cell office:value-type="float" office:value="24" calcext:value-type="float">
            <text:p>24</text:p>
          </table:table-cell>
          <table:table-cell table:formula="of:=ASTROS.MONTEZUMA.CALCTOOLS.CALCFUNCTIONS.PYTHON.INTERPOLATIONIMPL.INTERPO([.C25];[.A$5:.A$34];[.B$5:.B$34])" office:value-type="float" office:value="5140.26132655874" calcext:value-type="float">
            <text:p>5140</text:p>
          </table:table-cell>
          <table:table-cell table:number-columns-repeated="32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$'6 - Interpolated Thresholds'.$M25]" office:value-type="float" office:value="5166.36403589226" calcext:value-type="float">
            <text:p>5166</text:p>
          </table:table-cell>
          <table:table-cell table:style-name="ce89" office:value-type="float" office:value="25" calcext:value-type="float">
            <text:p>25</text:p>
          </table:table-cell>
          <table:table-cell table:style-name="ce75" table:formula="of:=ASTROS.MONTEZUMA.CALCTOOLS.CALCFUNCTIONS.PYTHON.INTERPOLATIONIMPL.INTERPO([.C26];[.A$5:.A$34];[.B$5:.B$34])" office:value-type="float" office:value="5166.36403589226" calcext:value-type="float">
            <text:p>5166</text:p>
          </table:table-cell>
          <table:table-cell table:number-columns-repeated="32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$'6 - Interpolated Thresholds'.$M26]" office:value-type="float" office:value="5187.24620335908" calcext:value-type="float">
            <text:p>5187</text:p>
          </table:table-cell>
          <table:table-cell office:value-type="float" office:value="26" calcext:value-type="float">
            <text:p>26</text:p>
          </table:table-cell>
          <table:table-cell table:formula="of:=ASTROS.MONTEZUMA.CALCTOOLS.CALCFUNCTIONS.PYTHON.INTERPOLATIONIMPL.INTERPO([.C27];[.A$5:.A$34];[.B$5:.B$34])" office:value-type="float" office:value="5187.24620335908" calcext:value-type="float">
            <text:p>5187</text:p>
          </table:table-cell>
          <table:table-cell table:number-columns-repeated="32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$'6 - Interpolated Thresholds'.$M27]" office:value-type="float" office:value="5204.49668952732" calcext:value-type="float">
            <text:p>5204</text:p>
          </table:table-cell>
          <table:table-cell office:value-type="float" office:value="27" calcext:value-type="float">
            <text:p>27</text:p>
          </table:table-cell>
          <table:table-cell table:formula="of:=ASTROS.MONTEZUMA.CALCTOOLS.CALCFUNCTIONS.PYTHON.INTERPOLATIONIMPL.INTERPO([.C28];[.A$5:.A$34];[.B$5:.B$34])" office:value-type="float" office:value="5204.49668952732" calcext:value-type="float">
            <text:p>5204</text:p>
          </table:table-cell>
          <table:table-cell table:number-columns-repeated="32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$'6 - Interpolated Thresholds'.$M28]" office:value-type="float" office:value="5218.79643464047" calcext:value-type="float">
            <text:p>5219</text:p>
          </table:table-cell>
          <table:table-cell office:value-type="float" office:value="28" calcext:value-type="float">
            <text:p>28</text:p>
          </table:table-cell>
          <table:table-cell table:formula="of:=ASTROS.MONTEZUMA.CALCTOOLS.CALCFUNCTIONS.PYTHON.INTERPOLATIONIMPL.INTERPO([.C29];[.A$5:.A$34];[.B$5:.B$34])" office:value-type="float" office:value="5218.79643464047" calcext:value-type="float">
            <text:p>5219</text:p>
          </table:table-cell>
          <table:table-cell table:number-columns-repeated="32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$'6 - Interpolated Thresholds'.$M29]" office:value-type="float" office:value="5231.28033910432" calcext:value-type="float">
            <text:p>5231</text:p>
          </table:table-cell>
          <table:table-cell office:value-type="float" office:value="29" calcext:value-type="float">
            <text:p>29</text:p>
          </table:table-cell>
          <table:table-cell table:formula="of:=ASTROS.MONTEZUMA.CALCTOOLS.CALCFUNCTIONS.PYTHON.INTERPOLATIONIMPL.INTERPO([.C30];[.A$5:.A$34];[.B$5:.B$34])" office:value-type="float" office:value="5231.28033910432" calcext:value-type="float">
            <text:p>5231</text:p>
          </table:table-cell>
          <table:table-cell table:number-columns-repeated="32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$'6 - Interpolated Thresholds'.$M30]" office:value-type="float" office:value="5242.85632324354" calcext:value-type="float">
            <text:p>5243</text:p>
          </table:table-cell>
          <table:table-cell office:value-type="float" office:value="30" calcext:value-type="float">
            <text:p>30</text:p>
          </table:table-cell>
          <table:table-cell table:formula="of:=ASTROS.MONTEZUMA.CALCTOOLS.CALCFUNCTIONS.PYTHON.INTERPOLATIONIMPL.INTERPO([.C31];[.A$5:.A$34];[.B$5:.B$34])" office:value-type="float" office:value="5242.85632324354" calcext:value-type="float">
            <text:p>5243</text:p>
          </table:table-cell>
          <table:table-cell table:number-columns-repeated="32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Default" office:value-type="float" office:value="10056" calcext:value-type="float">
            <text:p>10056</text:p>
          </table:table-cell>
          <table:table-cell table:style-name="ce89" office:value-type="float" office:value="38" calcext:value-type="float">
            <text:p>38</text:p>
          </table:table-cell>
          <table:table-cell table:style-name="ce75" table:formula="of:=ASTROS.MONTEZUMA.CALCTOOLS.CALCFUNCTIONS.PYTHON.INTERPOLATIONIMPL.INTERPO([.C32];[.A$5:.A$34];[.B$5:.B$34])" office:value-type="float" office:value="9521.20625813817" calcext:value-type="float">
            <text:p>9521</text:p>
          </table:table-cell>
          <table:table-cell table:number-columns-repeated="32"/>
        </table:table-row>
        <table:table-row table:style-name="ro2">
          <table:table-cell office:value-type="float" office:value="49.4" calcext:value-type="float">
            <text:p>49.4</text:p>
          </table:table-cell>
          <table:table-cell table:style-name="Default" office:value-type="float" office:value="15300" calcext:value-type="float">
            <text:p>15300</text:p>
          </table:table-cell>
          <table:table-cell table:style-name="ce89" office:value-type="float" office:value="50" calcext:value-type="float">
            <text:p>50</text:p>
          </table:table-cell>
          <table:table-cell table:style-name="ce75" table:formula="of:=ASTROS.MONTEZUMA.CALCTOOLS.CALCFUNCTIONS.PYTHON.INTERPOLATIONIMPL.INTERPO([.C33];[.A$5:.A$34];[.B$5:.B$34])" office:value-type="float" office:value="15586.6995073892" calcext:value-type="float">
            <text:p>15587</text:p>
          </table:table-cell>
          <table:table-cell table:number-columns-repeated="32"/>
        </table:table-row>
        <table:table-row table:style-name="ro2">
          <table:table-cell office:value-type="float" office:value="69.7" calcext:value-type="float">
            <text:p>69.7</text:p>
          </table:table-cell>
          <table:table-cell table:style-name="Default" office:value-type="float" office:value="25000" calcext:value-type="float">
            <text:p>25000</text:p>
          </table:table-cell>
          <table:table-cell table:style-name="ce89" office:value-type="float" office:value="70" calcext:value-type="float">
            <text:p>70</text:p>
          </table:table-cell>
          <table:table-cell table:style-name="ce75" table:formula="of:=ASTROS.MONTEZUMA.CALCTOOLS.CALCFUNCTIONS.PYTHON.INTERPOLATIONIMPL.INTERPO([.C34];[.A$5:.A$34];[.B$5:.B$34])" office:value-type="float" office:value="25143.3497536946" calcext:value-type="float">
            <text:p>25143</text:p>
          </table:table-cell>
          <table:table-cell table:number-columns-repeated="32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2"/>
        </table:table-row>
        <table:table-row table:style-name="ro8">
          <table:table-cell table:style-name="ce262" office:value-type="string" calcext:value-type="string">
            <text:p>THRESHOLD CALIBRATION</text:p>
          </table:table-cell>
          <table:table-cell table:style-name="Default"/>
          <table:table-cell/>
          <table:table-cell table:style-name="Default"/>
          <table:table-cell table:number-columns-repeated="32"/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/>
          <table:table-cell table:number-columns-repeated="32"/>
        </table:table-row>
        <table:table-row table:style-name="ro2">
          <table:table-cell office:value-type="string" calcext:value-type="string">
            <text:p>Need &gt;10000 particles <text:span text:style-name="T5">at the smallest threshold setting</text:span><text:span text:style-name="T15"> for each sub-sample / test portion. </text:span></text:p>
          </table:table-cell>
          <table:table-cell table:style-name="Default"/>
          <table:table-cell/>
          <table:table-cell table:style-name="Default"/>
          <table:table-cell table:number-columns-repeated="32"/>
        </table:table-row>
        <table:table-row table:style-name="ro2">
          <table:table-cell office:value-type="string" calcext:value-type="string">
            <text:p>Need &gt;1000 particles <text:span text:style-name="T5">counted</text:span> at each calibrated size, for each of the three calibration tests.</text:p>
          </table:table-cell>
          <table:table-cell table:style-name="Default"/>
          <table:table-cell/>
          <table:table-cell table:style-name="Default"/>
          <table:table-cell table:number-columns-repeated="32"/>
        </table:table-row>
        <table:table-row table:style-name="ro2">
          <table:table-cell office:value-type="string" calcext:value-type="string">
            <text:p>SRM2806D has 14/ml at 30um</text:p>
          </table:table-cell>
          <table:table-cell table:style-name="Default"/>
          <table:table-cell/>
          <table:table-cell table:style-name="Default"/>
          <table:table-cell table:number-columns-repeated="32"/>
        </table:table-row>
        <table:table-row table:style-name="ro2">
          <table:table-cell office:value-type="string" calcext:value-type="string">
            <text:p>This implies we need at least 1000/14 = 71ml per test.</text:p>
          </table:table-cell>
          <table:table-cell table:style-name="Default"/>
          <table:table-cell/>
          <table:table-cell table:style-name="Default"/>
          <table:table-cell table:number-columns-repeated="32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2"/>
        </table:table-row>
        <table:table-row table:style-name="ro2">
          <table:table-cell office:value-type="string" calcext:value-type="string">
            <text:p>At 21um we have 88.64/ml requiring 11.28ml counted volume per test which is more practical. </text:p>
          </table:table-cell>
          <table:table-cell table:style-name="Default"/>
          <table:table-cell/>
          <table:table-cell table:style-name="Default"/>
          <table:table-cell table:number-columns-repeated="32"/>
        </table:table-row>
      </table:table>
      <table:table table:name="Annex C - Flow Rate" table:style-name="ta1">
        <table:table-column table:style-name="co4" table:default-cell-style-name="ce33"/>
        <table:table-column table:style-name="co5" table:default-cell-style-name="ce33"/>
        <table:table-column table:style-name="co4" table:default-cell-style-name="ce33"/>
        <table:table-column table:style-name="co4" table:default-cell-style-name="Default"/>
        <table:table-column table:style-name="co4" table:number-columns-repeated="2" table:default-cell-style-name="ce33"/>
        <table:table-column table:style-name="co4" table:number-columns-repeated="2" table:default-cell-style-name="Default"/>
        <table:table-column table:style-name="co4" table:default-cell-style-name="ce33"/>
        <table:table-column table:style-name="co4" table:number-columns-repeated="3" table:default-cell-style-name="Default"/>
        <table:table-column table:style-name="co4" table:default-cell-style-name="ce33"/>
        <table:table-column table:style-name="co4" table:default-cell-style-name="Default"/>
        <table:table-column table:style-name="co4" table:default-cell-style-name="ce33"/>
        <table:table-row table:style-name="ro19">
          <table:table-cell table:style-name="ce351" table:formula="of:=RIGHT(CELL(&quot;filename&quot;);19)" office:value-type="string" office:string-value="Annex C - Flow Rate" calcext:value-type="string" table:number-columns-spanned="5" table:number-rows-spanned="1">
            <text:p>Annex C - Flow Rate</text:p>
          </table:table-cell>
          <table:covered-table-cell table:style-name="ce353"/>
          <table:covered-table-cell table:style-name="ce355"/>
          <table:covered-table-cell table:style-name="ce33"/>
          <table:covered-table-cell/>
          <table:table-cell/>
          <table:table-cell table:style-name="ce33" table:number-columns-repeated="2"/>
          <table:table-cell/>
          <table:table-cell table:style-name="ce33" table:number-columns-repeated="3"/>
          <table:table-cell/>
          <table:table-cell table:style-name="ce33"/>
          <table:table-cell/>
        </table:table-row>
        <table:table-row table:style-name="ro16">
          <table:table-cell table:number-columns-repeated="3"/>
          <table:table-cell table:style-name="ce33"/>
          <table:table-cell table:number-columns-repeated="2"/>
          <table:table-cell table:style-name="ce33" table:number-columns-repeated="2"/>
          <table:table-cell/>
          <table:table-cell table:style-name="ce33" table:number-columns-repeated="3"/>
          <table:table-cell/>
          <table:table-cell table:style-name="ce33"/>
          <table:table-cell/>
        </table:table-row>
        <table:table-row table:style-name="ro20">
          <table:table-cell table:style-name="ce34" office:value-type="string" calcext:value-type="string">
            <text:p>Analysis using Bottle Sampler and RM8632a</text:p>
          </table:table-cell>
          <table:table-cell table:number-columns-repeated="2"/>
          <table:table-cell table:style-name="ce33"/>
          <table:table-cell table:number-columns-repeated="2"/>
          <table:table-cell table:style-name="ce34"/>
          <table:table-cell table:style-name="ce33"/>
          <table:table-cell/>
          <table:table-cell table:style-name="ce33" table:number-columns-repeated="2"/>
          <table:table-cell table:style-name="ce34"/>
          <table:table-cell/>
          <table:table-cell table:style-name="ce33"/>
          <table:table-cell/>
        </table:table-row>
        <table:table-row table:style-name="ro16">
          <table:table-cell table:number-columns-repeated="6"/>
          <table:table-cell table:style-name="ce33" table:number-columns-repeated="2"/>
          <table:table-cell/>
          <table:table-cell table:style-name="ce33" table:number-columns-repeated="3"/>
          <table:table-cell/>
          <table:table-cell table:style-name="ce33"/>
          <table:table-cell/>
        </table:table-row>
        <table:table-row table:style-name="ro16">
          <table:table-cell office:value-type="string" calcext:value-type="string">
            <text:p>Bottle Sampler</text:p>
          </table:table-cell>
          <table:table-cell/>
          <table:table-cell table:style-name="ce37" office:value-type="string" calcext:value-type="string">
            <text:p>BS11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33" table:number-columns-repeated="2"/>
          <table:table-cell/>
          <table:table-cell table:style-name="ce33"/>
          <table:table-cell/>
        </table:table-row>
        <table:table-row table:style-name="ro16">
          <table:table-cell office:value-type="string" calcext:value-type="string">
            <text:p>APC Model</text:p>
          </table:table-cell>
          <table:table-cell/>
          <table:table-cell table:style-name="ce37" office:value-type="string" calcext:value-type="string">
            <text:p>LPA3-NAVAIR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33" table:number-columns-repeated="2"/>
          <table:table-cell/>
          <table:table-cell table:style-name="ce33"/>
          <table:table-cell/>
        </table:table-row>
        <table:table-row table:style-name="ro16">
          <table:table-cell office:value-type="string" calcext:value-type="string">
            <text:p>APC S/N</text:p>
          </table:table-cell>
          <table:table-cell/>
          <table:table-cell table:style-name="ce37" office:value-type="string" calcext:value-type="string">
            <text:p>11171-00009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33" table:number-columns-repeated="2"/>
          <table:table-cell/>
          <table:table-cell table:style-name="ce33"/>
          <table:table-cell/>
        </table:table-row>
        <table:table-row table:style-name="ro16">
          <table:table-cell office:value-type="string" calcext:value-type="string">
            <text:p>Sensor Model</text:p>
          </table:table-cell>
          <table:table-cell/>
          <table:table-cell table:style-name="ce37" office:value-type="string" calcext:value-type="string">
            <text:p>LPA3-NAVAIR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33" table:number-columns-repeated="2"/>
          <table:table-cell/>
          <table:table-cell table:style-name="ce33"/>
          <table:table-cell/>
        </table:table-row>
        <table:table-row table:style-name="ro16">
          <table:table-cell office:value-type="string" calcext:value-type="string">
            <text:p>Sensor S/N</text:p>
          </table:table-cell>
          <table:table-cell/>
          <table:table-cell table:style-name="ce37" office:value-type="string" calcext:value-type="string">
            <text:p>11171-00009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33" table:number-columns-repeated="2"/>
          <table:table-cell/>
          <table:table-cell table:style-name="ce33"/>
          <table:table-cell/>
        </table:table-row>
        <table:table-row table:style-name="ro16">
          <table:table-cell office:value-type="string" calcext:value-type="string">
            <text:p>Date</text:p>
          </table:table-cell>
          <table:table-cell/>
          <table:table-cell table:style-name="ce255" office:value-type="date" office:date-value="2025-06-12" calcext:value-type="date">
            <text:p>2025-06-1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33" table:number-columns-repeated="2"/>
          <table:table-cell/>
          <table:table-cell table:style-name="ce33"/>
          <table:table-cell/>
        </table:table-row>
        <table:table-row table:style-name="ro16">
          <table:table-cell office:value-type="string" calcext:value-type="string">
            <text:p>Operator</text:p>
          </table:table-cell>
          <table:table-cell/>
          <table:table-cell table:style-name="ce46" office:value-type="string" calcext:value-type="string">
            <text:p>JMD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33" table:number-columns-repeated="2"/>
          <table:table-cell/>
          <table:table-cell table:style-name="ce33"/>
          <table:table-cell/>
        </table:table-row>
        <table:table-row table:style-name="ro16">
          <table:table-cell office:value-type="string" calcext:value-type="string">
            <text:p>Threshold Noise</text:p>
          </table:table-cell>
          <table:table-cell/>
          <table:table-cell table:style-name="ce47" office:value-type="float" office:value="36" calcext:value-type="float">
            <text:p>36</text:p>
          </table:table-cell>
          <table:table-cell table:number-columns-repeated="2"/>
          <table:table-cell table:style-name="ce32"/>
          <table:table-cell table:number-columns-repeated="2"/>
          <table:table-cell table:style-name="Default"/>
          <table:table-cell/>
          <table:table-cell table:style-name="ce33" table:number-columns-repeated="2"/>
          <table:table-cell/>
          <table:table-cell table:style-name="ce33"/>
          <table:table-cell/>
        </table:table-row>
        <table:table-row table:style-name="ro16">
          <table:table-cell table:number-columns-repeated="3"/>
          <table:table-cell table:style-name="ce37"/>
          <table:table-cell/>
          <table:table-cell table:style-name="ce53"/>
          <table:table-cell table:number-columns-repeated="2"/>
          <table:table-cell table:style-name="Default"/>
          <table:table-cell/>
          <table:table-cell table:style-name="ce33" table:number-columns-repeated="2"/>
          <table:table-cell/>
          <table:table-cell table:style-name="ce33"/>
          <table:table-cell/>
        </table:table-row>
        <table:table-row table:style-name="ro16">
          <table:table-cell table:style-name="ce89" office:value-type="string" calcext:value-type="string">
            <text:p>See Annex A for Sample Preparation Calculations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ce37"/>
          <table:table-cell table:style-name="ce33" table:number-columns-repeated="2"/>
          <table:table-cell/>
          <table:table-cell table:style-name="ce33"/>
          <table:table-cell/>
        </table:table-row>
        <table:table-row table:style-name="ro16">
          <table:table-cell table:style-name="Default" table:number-columns-repeated="3"/>
          <table:table-cell table:number-columns-repeated="2"/>
          <table:table-cell table:style-name="ce53"/>
          <table:table-cell table:number-columns-repeated="3"/>
          <table:table-cell table:style-name="ce33" table:number-columns-repeated="3"/>
          <table:table-cell/>
          <table:table-cell table:style-name="ce33"/>
          <table:table-cell/>
        </table:table-row>
        <table:table-row table:style-name="ro16">
          <table:table-cell/>
          <table:table-cell table:style-name="Default" table:number-columns-repeated="2"/>
          <table:table-cell table:number-columns-repeated="2"/>
          <table:table-cell table:style-name="ce32"/>
          <table:table-cell table:number-columns-repeated="7"/>
          <table:table-cell table:style-name="ce37"/>
          <table:table-cell/>
        </table:table-row>
        <table:table-row table:style-name="ro16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  <table:table-cell table:style-name="ce82"/>
          <table:table-cell/>
        </table:table-row>
        <table:table-row table:style-name="ro16">
          <table:table-cell/>
          <table:table-cell table:style-name="ce37" office:value-type="string" calcext:value-type="string">
            <text:p>&gt;4μm(c)/100ml</text:p>
          </table:table-cell>
          <table:table-cell table:style-name="ce37" office:value-type="string" calcext:value-type="string">
            <text:p>Deviation</text:p>
          </table:table-cell>
          <table:table-cell table:number-columns-repeated="2"/>
          <table:table-cell table:style-name="Default"/>
          <table:table-cell table:number-columns-repeated="7"/>
          <table:table-cell table:style-name="ce82"/>
          <table:table-cell/>
        </table:table-row>
        <table:table-row table:style-name="ro16">
          <table:table-cell table:number-columns-repeated="4"/>
          <table:table-cell table:style-name="Default"/>
          <table:table-cell/>
          <table:table-cell table:style-name="ce33"/>
          <table:table-cell table:style-name="ce148"/>
          <table:table-cell table:style-name="ce11" table:number-columns-repeated="2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6">
          <table:table-cell office:value-type="string" calcext:value-type="string">
            <text:p>Bottle 1</text:p>
          </table:table-cell>
          <table:table-cell table:style-name="ce38" office:value-type="float" office:value="9105" calcext:value-type="float">
            <text:p>9105</text:p>
          </table:table-cell>
          <table:table-cell table:style-name="ce44" table:formula="of:=([.B20]-[.$B$26])/[.$B$26]" office:value-type="percentage" office:value="-0.00293479927287055" calcext:value-type="percentage">
            <text:p>-0.29%</text:p>
          </table:table-cell>
          <table:table-cell/>
          <table:table-cell table:style-name="Default"/>
          <table:table-cell/>
          <table:table-cell table:style-name="ce33"/>
          <table:table-cell table:style-name="ce13"/>
          <table:table-cell table:style-name="ce11" table:number-columns-repeated="2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6">
          <table:table-cell office:value-type="string" calcext:value-type="string">
            <text:p>Bottle 2</text:p>
          </table:table-cell>
          <table:table-cell table:style-name="ce40" office:value-type="float" office:value="9129" calcext:value-type="float">
            <text:p>9129</text:p>
          </table:table-cell>
          <table:table-cell table:style-name="ce44" table:formula="of:=([.B21]-[.$B$26])/[.$B$26]" office:value-type="percentage" office:value="-0.000306620819553568" calcext:value-type="percentage">
            <text:p>-0.03%</text:p>
          </table:table-cell>
          <table:table-cell table:number-columns-repeated="3"/>
          <table:table-cell table:style-name="ce33"/>
          <table:table-cell table:style-name="ce14"/>
          <table:table-cell table:style-name="ce11" table:number-columns-repeated="2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6">
          <table:table-cell office:value-type="string" calcext:value-type="string">
            <text:p>Bottle 3</text:p>
          </table:table-cell>
          <table:table-cell table:style-name="ce40" office:value-type="float" office:value="9164" calcext:value-type="float">
            <text:p>9164</text:p>
          </table:table-cell>
          <table:table-cell table:style-name="ce44" table:formula="of:=([.B22]-[.$B$26])/[.$B$26]" office:value-type="percentage" office:value="0.00352613942486703" calcext:value-type="percentage">
            <text:p>0.35%</text:p>
          </table:table-cell>
          <table:table-cell table:number-columns-repeated="3"/>
          <table:table-cell table:style-name="ce33"/>
          <table:table-cell table:style-name="ce13"/>
          <table:table-cell table:style-name="ce11" table:number-columns-repeated="2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6">
          <table:table-cell office:value-type="string" calcext:value-type="string">
            <text:p>Bottle 4</text:p>
          </table:table-cell>
          <table:table-cell table:style-name="ce40" office:value-type="float" office:value="9170" calcext:value-type="float">
            <text:p>9170</text:p>
          </table:table-cell>
          <table:table-cell table:style-name="ce44" table:formula="of:=([.B23]-[.$B$26])/[.$B$26]" office:value-type="percentage" office:value="0.00418318403819627" calcext:value-type="percentage">
            <text:p>0.42%</text:p>
          </table:table-cell>
          <table:table-cell table:number-columns-repeated="3"/>
          <table:table-cell table:style-name="ce33"/>
          <table:table-cell table:style-name="ce14"/>
          <table:table-cell table:style-name="ce11" table:number-columns-repeated="2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6">
          <table:table-cell office:value-type="string" calcext:value-type="string">
            <text:p>Bottle 5</text:p>
          </table:table-cell>
          <table:table-cell table:style-name="ce41" office:value-type="float" office:value="9091" calcext:value-type="float">
            <text:p>9091</text:p>
          </table:table-cell>
          <table:table-cell table:style-name="ce44" table:formula="of:=([.B24]-[.$B$26])/[.$B$26]" office:value-type="percentage" office:value="-0.00446790337063879" calcext:value-type="percentage">
            <text:p>-0.45%</text:p>
          </table:table-cell>
          <table:table-cell/>
          <table:table-cell table:style-name="ce103"/>
          <table:table-cell/>
          <table:table-cell table:style-name="ce33"/>
          <table:table-cell table:style-name="ce151"/>
          <table:table-cell table:style-name="ce11" table:number-columns-repeated="2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6">
          <table:table-cell table:number-columns-repeated="6"/>
          <table:table-cell table:style-name="ce33" table:number-columns-repeated="2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6">
          <table:table-cell office:value-type="string" calcext:value-type="string">
            <text:p>Mean</text:p>
          </table:table-cell>
          <table:table-cell table:style-name="ce42" table:formula="of:=AVERAGE([.B20:.B24])" office:value-type="float" office:value="9131.8" calcext:value-type="float">
            <text:p>9132</text:p>
          </table:table-cell>
          <table:table-cell table:number-columns-repeated="4"/>
          <table:table-cell table:style-name="ce33" table:number-columns-repeated="2"/>
          <table:table-cell table:style-name="ce44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6">
          <table:table-cell office:value-type="string" calcext:value-type="string">
            <text:p>Sample StdDev</text:p>
          </table:table-cell>
          <table:table-cell table:style-name="ce42" table:formula="of:=STDEVP([.B20:.B24])" office:value-type="float" office:value="31.2627573959816" calcext:value-type="float">
            <text:p>31</text:p>
          </table:table-cell>
          <table:table-cell table:number-columns-repeated="4"/>
          <table:table-cell table:style-name="ce33" table:number-columns-repeated="2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6">
          <table:table-cell/>
          <table:table-cell table:style-name="ce42">
            <draw:frame draw:z-index="0" draw:name="Image 1" draw:style-name="gr2" draw:text-style-name="P2" svg:width="4.44cm" svg:height="1.664cm" svg:x="0cm" svg:y="0.27cm">
              <draw:image xlink:href="Pictures/10000001000001B0000000A2370564DF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33" table:number-columns-repeated="2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6">
          <table:table-cell table:number-columns-repeated="6"/>
          <table:table-cell table:style-name="ce33" table:number-columns-repeated="2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44"/>
          <table:table-cell table:number-columns-repeated="4"/>
          <table:table-cell table:style-name="ce33" table:number-columns-repeated="2"/>
          <table:table-cell table:style-name="ce44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2" table:number-rows-repeated="3">
          <table:table-cell table:number-columns-repeated="4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2">
          <table:table-cell office:value-type="string" calcext:value-type="string">
            <text:p>CV<text:span text:style-name="T6">VOL</text:span></text:p>
          </table:table-cell>
          <table:table-cell table:style-name="ce354" table:formula="of:=[.B27]/[.B26]" office:value-type="percentage" office:value="0.00342350439080812" calcext:value-type="percentage">
            <text:p>0.34%</text:p>
          </table:table-cell>
          <table:table-cell table:formula="of:=IF([.B34]&lt;0.03;&quot;&lt;3% = PASS&quot;;&quot;&gt;3% = FAIL&quot;)" office:value-type="string" office:string-value="&lt;3% = PASS" calcext:value-type="string">
            <text:p>&lt;3% = PASS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</table:table-row>
        <calcext:conditional-formats>
          <calcext:conditional-format calcext:target-range-address="'Annex C - Flow Rate'.B34:'Annex C - Flow Rate'.B34">
            <calcext:condition calcext:apply-style-name="Good" calcext:value="&lt;0.03" calcext:base-cell-address="'Annex D Resolution'.B34"/>
            <calcext:condition calcext:apply-style-name="Bad" calcext:value="!=&quot;&lt;3% = PASS&quot;" calcext:base-cell-address="'Annex D Resolution'.B34"/>
          </calcext:conditional-format>
        </calcext:conditional-formats>
      </table:table>
      <table:table table:name="Annex D Resolution" table:style-name="ta1">
        <table:shapes>
          <draw:frame draw:z-index="0" draw:style-name="gr3" draw:text-style-name="P2" svg:width="19.162cm" svg:height="10.778cm" svg:x="7.925cm" svg:y="12.597cm">
            <draw:object draw:notify-on-update-of-ranges="'6 - Calibration Curve'.L2:'6 - Calibration Curve'.L1002 '6 - Calibration Curve'.M1:'6 - Calibration Curve'.M1 '6 - Calibration Curve'.M2:'6 - Calibration Curve'.M1002 '6 - Calibration Curve'.L2:'6 - Calibration Curve'.L1002 '6 - Calibration Curve'.N1:'6 - Calibration Curve'.N1 '6 - Calibration Curve'.N2:'6 - Calibration Curve'.N100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4" table:default-cell-style-name="Default"/>
        <table:table-column table:style-name="co15" table:default-cell-style-name="Default"/>
        <table:table-column table:style-name="co4" table:number-columns-repeated="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number-columns-repeated="1011" table:default-cell-style-name="Default"/>
        <table:table-row table:style-name="ro21">
          <table:table-cell table:style-name="ce356" office:value-type="string" calcext:value-type="string">
            <text:p>Cv<text:span text:style-name="T2">DIAM_10</text:span> &lt; +/-15%</text:p>
            <text:p><text:span text:style-name="T3">→ Cv</text:span><text:span text:style-name="T4">SIGNAL_10</text:span><text:span text:style-name="T3"> &lt; +/-32%</text:span></text:p>
            <text:p/>
          </table:table-cell>
          <table:table-cell table:style-name="ce88" office:value-type="string" calcext:value-type="string">
            <text:p>10um spheres</text:p>
          </table:table-cell>
          <table:table-cell table:style-name="ce85" office:value-type="string" calcext:value-type="string" table:number-columns-spanned="6" table:number-rows-spanned="1">
            <text:p>Annex D – resolution. Establish threshold corresponding to spheres (equal diff counts for 0.72 and 1.0 relative channel thresholds). Set thresholds corresponding to 0.9, 1.0 and 1.1 times diameter so inferred from cal curve. </text:p>
          </table:table-cell>
          <table:covered-table-cell table:number-columns-repeated="5" table:style-name="ce88"/>
          <table:table-cell table:style-name="ce88" table:number-columns-repeated="3"/>
          <table:table-cell office:value-type="string" calcext:value-type="string">
            <text:p>#</text:p>
          </table:table-cell>
          <table:table-cell office:value-type="string" calcext:value-type="string">
            <text:p>dsp.height</text:p>
          </table:table-cell>
          <table:table-cell table:style-name="ce88" office:value-type="string" calcext:value-type="string">
            <text:p>Average</text:p>
          </table:table-cell>
          <table:table-cell table:style-name="ce88" office:value-type="string" calcext:value-type="string">
            <text:p>Max/2</text:p>
          </table:table-cell>
          <table:table-cell table:style-name="ce88" table:number-columns-repeated="1009"/>
        </table:table-row>
        <table:table-row table:style-name="ro16">
          <table:table-cell office:value-type="string" calcext:value-type="string">
            <text:p>Date</text:p>
          </table:table-cell>
          <table:table-cell table:style-name="ce55" office:value-type="date" office:date-value="2025-05-21" calcext:value-type="date">
            <text:p>2025-05-21</text:p>
          </table:table-cell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office:value-type="string" calcext:value-type="string">
            <text:p>Operator</text:p>
          </table:table-cell>
          <table:table-cell table:style-name="ce16" office:value-type="string" calcext:value-type="string">
            <text:p>JMD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office:value-type="string" calcext:value-type="string">
            <text:p>Particle Counter</text:p>
          </table:table-cell>
          <table:table-cell office:value-type="float" office:value="61110029" calcext:value-type="float">
            <text:p>6111002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office:value-type="string" calcext:value-type="string">
            <text:p>Firmware</text:p>
          </table:table-cell>
          <table:table-cell office:value-type="float" office:value="5.1" calcext:value-type="float">
            <text:p>5.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AVERAGE([.M2:.M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style-name="ce11" office:value-type="string" calcext:value-type="string">
            <text:p>Concentration / ml</text:p>
          </table:table-cell>
          <table:table-cell table:style-name="ce22" office:value-type="float" office:value="5060" calcext:value-type="float">
            <text:p>5060</text:p>
          </table:table-cell>
          <table:table-cell table:style-name="ce11"/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AVERAGE([.M3:.M1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style-name="ce11" table:number-columns-repeated="3"/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AVERAGE([.M4:.M1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style-name="ce11" office:value-type="float" office:value="10.2" calcext:value-type="float">
            <text:p>10.2</text:p>
          </table:table-cell>
          <table:table-cell table:style-name="ce11" office:value-type="string" calcext:value-type="string">
            <text:p>microns</text:p>
          </table:table-cell>
          <table:table-cell table:style-name="ce11" office:value-type="string" calcext:value-type="string">
            <text:p>diameter</text:p>
          </table:table-cell>
          <table:table-cell table:number-columns-repeated="2"/>
          <table:table-cell office:value-type="string" calcext:value-type="string">
            <text:p>LC10 spheres batch DC-10-03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AVERAGE([.M5:.M1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style-name="ce52" table:formula="of:=(4/3)*(3.1415936)*(([.A8]*0.000001/2)^3)" office:value-type="float" office:value="5.556473768448E-016" calcext:value-type="float">
            <text:p>5.56E-16</text:p>
          </table:table-cell>
          <table:table-cell table:style-name="ce11" office:value-type="string" calcext:value-type="string">
            <text:p>m^3</text:p>
          </table:table-cell>
          <table:table-cell table:style-name="ce11" office:value-type="string" calcext:value-type="string">
            <text:p>volume of a sphere</text:p>
          </table:table-cell>
          <table:table-cell table:number-columns-repeated="2"/>
          <table:table-cell table:style-name="ce16" office:value-type="string" calcext:value-type="string">
            <text:p>10.2±0.4</text:p>
          </table:table-cell>
          <table:table-cell office:value-type="string" calcext:value-type="string">
            <text:p>μm certified mean diamater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AVERAGE([.M6:.M1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style-name="ce52" table:formula="of:=[.A9]*1.05*1000" office:value-type="float" office:value="0.00000000000058342974568704" calcext:value-type="float">
            <text:p>5.83E-13</text:p>
          </table:table-cell>
          <table:table-cell table:style-name="ce11" office:value-type="string" calcext:value-type="string">
            <text:p>kg</text:p>
          </table:table-cell>
          <table:table-cell table:style-name="ce11" office:value-type="string" calcext:value-type="string">
            <text:p>mass of a sphere</text:p>
          </table:table-cell>
          <table:table-cell table:number-columns-repeated="2"/>
          <table:table-cell table:style-name="ce21" office:value-type="percentage" office:value="0.069" calcext:value-type="percentage">
            <text:p>6.90%</text:p>
          </table:table-cell>
          <table:table-cell office:value-type="string" calcext:value-type="string">
            <text:p>CV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AVERAGE([.M7:.M1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style-name="ce52" table:formula="of:=0.000001/[.A10]" office:value-type="float" office:value="1714002.42684303" calcext:value-type="float">
            <text:p>1.71E+06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spheres per mg</text:p>
          </table:table-cell>
          <table:table-cell table:number-columns-repeated="2"/>
          <table:table-cell office:value-type="string" calcext:value-type="string">
            <text:p>NIST TRACEABLE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AVERAGE([.M8:.M1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style-name="ce12" office:value-type="float" office:value="250000" calcext:value-type="float">
            <text:p>2.50E+005</text:p>
          </table:table-cell>
          <table:table-cell table:style-name="ce11"/>
          <table:table-cell table:style-name="ce11" office:value-type="string" calcext:value-type="string">
            <text:p>Target concentration per ml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AVERAGE([.M9:.M1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style-name="ce13" table:formula="of:=[.A12]/[.A11]*10" office:value-type="float" office:value="1.4585743642176" calcext:value-type="float">
            <text:p>1.46</text:p>
          </table:table-cell>
          <table:table-cell table:style-name="ce11" office:value-type="string" calcext:value-type="string">
            <text:p>mg/l</text:p>
          </table:table-cell>
          <table:table-cell table:style-name="ce11" office:value-type="string" calcext:value-type="string">
            <text:p>spheres to add per liter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AVERAGE([.M10:.M1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style-name="ce14" office:value-type="float" office:value="0.2" calcext:value-type="float">
            <text:p>0.2</text:p>
          </table:table-cell>
          <table:table-cell table:style-name="ce11" office:value-type="string" calcext:value-type="string">
            <text:p>litres</text:p>
          </table:table-cell>
          <table:table-cell table:style-name="ce11" office:value-type="string" calcext:value-type="string">
            <text:p>Rig volume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AVERAGE([.M11:.M1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style-name="ce13" table:formula="of:=[.A14]*[.A13]" office:value-type="float" office:value="0.29171487284352" calcext:value-type="float">
            <text:p>0.29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Total mass of spheres to add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AVERAGE([.M12:.M1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style-name="ce14" office:value-type="float" office:value="29.56" calcext:value-type="float">
            <text:p>29.56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Actual mass added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AVERAGE([.M13:.M2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style-name="ce22" office:value-type="float" office:value="5066" calcext:value-type="float">
            <text:p>5066</text:p>
          </table:table-cell>
          <table:table-cell table:style-name="ce11" office:value-type="string" calcext:value-type="string">
            <text:p>N/ml</text:p>
          </table:table-cell>
          <table:table-cell table:style-name="ce11" office:value-type="string" calcext:value-type="string">
            <text:p>Concentration expected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AVERAGE([.M14:.M2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style-name="ce11" table:formula="of:=SUM([.M200:.M1000])" office:value-type="float" office:value="94457" calcext:value-type="float">
            <text:p>94457</text:p>
          </table:table-cell>
          <table:table-cell table:style-name="ce11" office:value-type="string" calcext:value-type="string">
            <text:p>10μm particles</text:p>
          </table:table-cell>
          <table:table-cell table:style-name="ce11" office:value-type="string" calcext:value-type="string">
            <text:p>Total 10um particles Sized and Plotted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AVERAGE([.M15:.M2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style-name="ce11" table:number-columns-repeated="3"/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AVERAGE([.M16:.M2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style-name="ce11" table:number-columns-repeated="3"/>
          <table:table-cell table:number-columns-repeated="8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AVERAGE([.M17:.M2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AVERAGE([.M18:.M2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AVERAGE([.M19:.M2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style-name="ce53" table:formula="of:=MAX([.$N$2:.$N$1000])" office:value-type="float" office:value="1930.375" calcext:value-type="float">
            <text:p>1930.38</text:p>
          </table:table-cell>
          <table:table-cell office:value-type="string" calcext:value-type="string">
            <text:p>Peak data value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AVERAGE([.M20:.M2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style-name="ce53" table:formula="of:=MATCH([.A23]; [.N3:.N1000]; 0)" office:value-type="float" office:value="218" calcext:value-type="float">
            <text:p>218.00</text:p>
          </table:table-cell>
          <table:table-cell office:value-type="string" calcext:value-type="string">
            <text:p>Peak Position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AVERAGE([.M21:.M2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style-name="ce53" table:formula="of:=MAX([.$A$23])/2" office:value-type="float" office:value="965.1875" calcext:value-type="float">
            <text:p>965.19</text:p>
          </table:table-cell>
          <table:table-cell office:value-type="string" calcext:value-type="string">
            <text:p>half peak value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AVERAGE([.M22:.M2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style-name="ce53" table:formula="of:=MATCH([.A25]; [.N2:.N1000]; 1)" office:value-type="float" office:value="195" calcext:value-type="float">
            <text:p>195.00</text:p>
          </table:table-cell>
          <table:table-cell office:value-type="string" calcext:value-type="string">
            <text:p>LHS FWHM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AVERAGE([.M23:.M3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style-name="ce53" table:formula="of:=INDEX([.L2:.L1000];[.A26])" office:value-type="float" office:value="194" calcext:value-type="float">
            <text:p>194.00</text:p>
          </table:table-cell>
          <table:table-cell office:value-type="string" calcext:value-type="string">
            <text:p>X value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AVERAGE([.M24:.M3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style-name="ce53" table:formula="of:=[.A24]-[.A27]" office:value-type="float" office:value="24" calcext:value-type="float">
            <text:p>24.00</text:p>
          </table:table-cell>
          <table:table-cell office:value-type="string" calcext:value-type="string">
            <text:p>½ FWHM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AVERAGE([.M25:.M3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style-name="ce53" table:formula="of:=[.A28]*2" office:value-type="float" office:value="48" calcext:value-type="float">
            <text:p>48.00</text:p>
          </table:table-cell>
          <table:table-cell office:value-type="string" calcext:value-type="string">
            <text:p>FWHM</text:p>
          </table:table-cell>
          <table:table-cell table:number-columns-repeated="9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AVERAGE([.M26:.M3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style-name="ce53" table:formula="of:=[.A29] / (2 * SQRT(2 * LN(2)))" office:value-type="float" office:value="20.3837232069125" calcext:value-type="float">
            <text:p>20.38</text:p>
          </table:table-cell>
          <table:table-cell office:value-type="string" calcext:value-type="string">
            <text:p>Std.Dev.</text:p>
          </table:table-cell>
          <table:table-cell table:number-columns-repeated="9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AVERAGE([.M27:.M3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style-name="ce360" table:formula="of:=[.A30]/[.A24]" office:value-type="percentage" office:value="0.0935033174629012" calcext:value-type="percentage">
            <text:p>9.35%</text:p>
          </table:table-cell>
          <table:table-cell table:style-name="ce362" office:value-type="string" calcext:value-type="string">
            <text:p>CV<text:span text:style-name="T6">SIGNAL</text:span><text:span text:style-name="T16"> &lt; 30%</text:span>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AVERAGE([.M28:.M3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style-name="ce53"/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AVERAGE([.M29:.M3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style-name="ce361" table:formula="of:=[.A31]/2" office:value-type="percentage" office:value="0.0467516587314506" calcext:value-type="percentage">
            <text:p>4.68%</text:p>
          </table:table-cell>
          <table:table-cell table:style-name="ce362" office:value-type="string" calcext:value-type="string">
            <text:p>CV<text:span text:style-name="T6">DIAMETER</text:span> &lt; 15%</text:p>
          </table:table-cell>
          <table:table-cell table:number-columns-repeated="9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AVERAGE([.M30:.M3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AVERAGE([.M31:.M3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AVERAGE([.M32:.M3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AVERAGE([.M33:.M4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AVERAGE([.M34:.M4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AVERAGE([.M35:.M4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AVERAGE([.M36:.M4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AVERAGE([.M37:.M4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AVERAGE([.M38:.M4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AVERAGE([.M39:.M4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office:value-type="string" calcext:value-type="string">
            <text:p>Boxcar_n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AVERAGE([.M40:.M4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office:value-type="string" calcext:value-type="string">
            <text:p>Flow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ml/min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AVERAGE([.M41:.M4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office:value-type="string" calcext:value-type="string">
            <text:p>Detection Threshol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DU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AVERAGE([.M42:.M4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AVERAGE([.M43:.M5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office:value-type="string" calcext:value-type="string">
            <text:p>Volume scanned</text:p>
          </table:table-cell>
          <table:table-cell office:value-type="float" office:value="24.87" calcext:value-type="float">
            <text:p>24.87</text:p>
          </table:table-cell>
          <table:table-cell office:value-type="string" calcext:value-type="string">
            <text:p>ml</text:p>
          </table:table-cell>
          <table:table-cell table:number-columns-repeated="8"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AVERAGE([.M44:.M5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office:value-type="string" calcext:value-type="string">
            <text:p>Total Samp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  <table:table-cell table:number-columns-repeated="8"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AVERAGE([.M45:.M5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office:value-type="string" calcext:value-type="string">
            <text:p>Capture Fraction</text:p>
          </table:table-cell>
          <table:table-cell table:style-name="ce21" table:formula="of:=[.B47]/[.B48]" office:value-type="percentage" office:value="0.4974" calcext:value-type="percentage">
            <text:p>49.74%</text:p>
          </table:table-cell>
          <table:table-cell table:number-columns-repeated="9"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AVERAGE([.M46:.M5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AVERAGE([.M47:.M5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AVERAGE([.M48:.M5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AVERAGE([.M49:.M5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AVERAGE([.M50:.M5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AVERAGE([.M51:.M5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AVERAGE([.M52:.M5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AVERAGE([.M53:.M6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AVERAGE([.M54:.M6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AVERAGE([.M55:.M6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AVERAGE([.M56:.M6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AVERAGE([.M57:.M6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AVERAGE([.M58:.M6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AVERAGE([.M59:.M6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AVERAGE([.M60:.M6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AVERAGE([.M61:.M6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AVERAGE([.M62:.M6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AVERAGE([.M63:.M7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AVERAGE([.M64:.M7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AVERAGE([.M65:.M7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AVERAGE([.M66:.M7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AVERAGE([.M67:.M7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AVERAGE([.M68:.M7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AVERAGE([.M69:.M7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AVERAGE([.M70:.M7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AVERAGE([.M71:.M7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AVERAGE([.M72:.M7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AVERAGE([.M73:.M8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AVERAGE([.M74:.M8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AVERAGE([.M75:.M8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AVERAGE([.M76:.M8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AVERAGE([.M77:.M8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AVERAGE([.M78:.M8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AVERAGE([.M79:.M8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AVERAGE([.M80:.M8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AVERAGE([.M81:.M8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AVERAGE([.M82:.M8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AVERAGE([.M83:.M9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AVERAGE([.M84:.M9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AVERAGE([.M85:.M9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AVERAGE([.M86:.M9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AVERAGE([.M87:.M9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AVERAGE([.M88:.M9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AVERAGE([.M89:.M9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AVERAGE([.M90:.M9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AVERAGE([.M91:.M9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AVERAGE([.M92:.M9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AVERAGE([.M93:.M10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AVERAGE([.M94:.M10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AVERAGE([.M95:.M102])" office:value-type="float" office:value="8.125" calcext:value-type="float">
            <text:p>8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AVERAGE([.M96:.M103])" office:value-type="float" office:value="14.75" calcext:value-type="float">
            <text:p>1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AVERAGE([.M97:.M104])" office:value-type="float" office:value="21.125" calcext:value-type="float">
            <text:p>21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AVERAGE([.M98:.M105])" office:value-type="float" office:value="28.25" calcext:value-type="float">
            <text:p>28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formula="of:=AVERAGE([.M99:.M106])" office:value-type="float" office:value="36.5" calcext:value-type="float">
            <text:p>36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table:formula="of:=AVERAGE([.M100:.M107])" office:value-type="float" office:value="44.125" calcext:value-type="float">
            <text:p>4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02" calcext:value-type="float">
            <text:p>102</text:p>
          </table:table-cell>
          <table:table-cell office:value-type="float" office:value="51" calcext:value-type="float">
            <text:p>51</text:p>
          </table:table-cell>
          <table:table-cell table:formula="of:=AVERAGE([.M101:.M108])" office:value-type="float" office:value="52.75" calcext:value-type="float">
            <text:p>5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table:formula="of:=AVERAGE([.M102:.M109])" office:value-type="float" office:value="60.375" calcext:value-type="float">
            <text:p>60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04" calcext:value-type="float">
            <text:p>104</text:p>
          </table:table-cell>
          <table:table-cell office:value-type="float" office:value="66" calcext:value-type="float">
            <text:p>66</text:p>
          </table:table-cell>
          <table:table-cell table:formula="of:=AVERAGE([.M103:.M110])" office:value-type="float" office:value="61.625" calcext:value-type="float">
            <text:p>61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 table:formula="of:=AVERAGE([.M104:.M111])" office:value-type="float" office:value="62.125" calcext:value-type="float">
            <text:p>62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06" calcext:value-type="float">
            <text:p>106</text:p>
          </table:table-cell>
          <table:table-cell office:value-type="float" office:value="69" calcext:value-type="float">
            <text:p>69</text:p>
          </table:table-cell>
          <table:table-cell table:formula="of:=AVERAGE([.M105:.M112])" office:value-type="float" office:value="64.25" calcext:value-type="float">
            <text:p>6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07" calcext:value-type="float">
            <text:p>107</text:p>
          </table:table-cell>
          <table:table-cell office:value-type="float" office:value="61" calcext:value-type="float">
            <text:p>61</text:p>
          </table:table-cell>
          <table:table-cell table:formula="of:=AVERAGE([.M106:.M113])" office:value-type="float" office:value="65.75" calcext:value-type="float">
            <text:p>6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table:formula="of:=AVERAGE([.M107:.M114])" office:value-type="float" office:value="64.125" calcext:value-type="float">
            <text:p>6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09" calcext:value-type="float">
            <text:p>109</text:p>
          </table:table-cell>
          <table:table-cell office:value-type="float" office:value="57" calcext:value-type="float">
            <text:p>57</text:p>
          </table:table-cell>
          <table:table-cell table:formula="of:=AVERAGE([.M108:.M115])" office:value-type="float" office:value="63.5" calcext:value-type="float">
            <text:p>6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table:formula="of:=AVERAGE([.M109:.M116])" office:value-type="float" office:value="62.875" calcext:value-type="float">
            <text:p>6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11" calcext:value-type="float">
            <text:p>111</text:p>
          </table:table-cell>
          <table:table-cell office:value-type="float" office:value="69" calcext:value-type="float">
            <text:p>69</text:p>
          </table:table-cell>
          <table:table-cell table:formula="of:=AVERAGE([.M110:.M117])" office:value-type="float" office:value="63.125" calcext:value-type="float">
            <text:p>6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12" calcext:value-type="float">
            <text:p>112</text:p>
          </table:table-cell>
          <table:table-cell office:value-type="float" office:value="53" calcext:value-type="float">
            <text:p>53</text:p>
          </table:table-cell>
          <table:table-cell table:formula="of:=AVERAGE([.M111:.M118])" office:value-type="float" office:value="60.5" calcext:value-type="float">
            <text:p>60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13" calcext:value-type="float">
            <text:p>113</text:p>
          </table:table-cell>
          <table:table-cell office:value-type="float" office:value="56" calcext:value-type="float">
            <text:p>56</text:p>
          </table:table-cell>
          <table:table-cell table:formula="of:=AVERAGE([.M112:.M119])" office:value-type="float" office:value="60.625" calcext:value-type="float">
            <text:p>60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14" calcext:value-type="float">
            <text:p>114</text:p>
          </table:table-cell>
          <table:table-cell office:value-type="float" office:value="64" calcext:value-type="float">
            <text:p>64</text:p>
          </table:table-cell>
          <table:table-cell table:formula="of:=AVERAGE([.M113:.M120])" office:value-type="float" office:value="60" calcext:value-type="float">
            <text:p>6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15" calcext:value-type="float">
            <text:p>115</text:p>
          </table:table-cell>
          <table:table-cell office:value-type="float" office:value="63" calcext:value-type="float">
            <text:p>63</text:p>
          </table:table-cell>
          <table:table-cell table:formula="of:=AVERAGE([.M114:.M121])" office:value-type="float" office:value="60.875" calcext:value-type="float">
            <text:p>6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16" calcext:value-type="float">
            <text:p>116</text:p>
          </table:table-cell>
          <table:table-cell office:value-type="float" office:value="54" calcext:value-type="float">
            <text:p>54</text:p>
          </table:table-cell>
          <table:table-cell table:formula="of:=AVERAGE([.M115:.M122])" office:value-type="float" office:value="61.125" calcext:value-type="float">
            <text:p>61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17" calcext:value-type="float">
            <text:p>117</text:p>
          </table:table-cell>
          <table:table-cell office:value-type="float" office:value="58" calcext:value-type="float">
            <text:p>58</text:p>
          </table:table-cell>
          <table:table-cell table:formula="of:=AVERAGE([.M116:.M123])" office:value-type="float" office:value="62" calcext:value-type="float">
            <text:p>62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18" calcext:value-type="float">
            <text:p>118</text:p>
          </table:table-cell>
          <table:table-cell office:value-type="float" office:value="63" calcext:value-type="float">
            <text:p>63</text:p>
          </table:table-cell>
          <table:table-cell table:formula="of:=AVERAGE([.M117:.M124])" office:value-type="float" office:value="60.875" calcext:value-type="float">
            <text:p>6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19" calcext:value-type="float">
            <text:p>119</text:p>
          </table:table-cell>
          <table:table-cell office:value-type="float" office:value="76" calcext:value-type="float">
            <text:p>76</text:p>
          </table:table-cell>
          <table:table-cell table:formula="of:=AVERAGE([.M118:.M125])" office:value-type="float" office:value="60" calcext:value-type="float">
            <text:p>6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table:formula="of:=AVERAGE([.M119:.M126])" office:value-type="float" office:value="62.375" calcext:value-type="float">
            <text:p>6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  <table:table-cell table:formula="of:=AVERAGE([.M120:.M127])" office:value-type="float" office:value="64.375" calcext:value-type="float">
            <text:p>6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22" calcext:value-type="float">
            <text:p>122</text:p>
          </table:table-cell>
          <table:table-cell office:value-type="float" office:value="55" calcext:value-type="float">
            <text:p>55</text:p>
          </table:table-cell>
          <table:table-cell table:formula="of:=AVERAGE([.M121:.M128])" office:value-type="float" office:value="64.875" calcext:value-type="float">
            <text:p>6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23" calcext:value-type="float">
            <text:p>123</text:p>
          </table:table-cell>
          <table:table-cell office:value-type="float" office:value="56" calcext:value-type="float">
            <text:p>56</text:p>
          </table:table-cell>
          <table:table-cell table:formula="of:=AVERAGE([.M122:.M129])" office:value-type="float" office:value="63" calcext:value-type="float">
            <text:p>63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24" calcext:value-type="float">
            <text:p>124</text:p>
          </table:table-cell>
          <table:table-cell office:value-type="float" office:value="73" calcext:value-type="float">
            <text:p>73</text:p>
          </table:table-cell>
          <table:table-cell table:formula="of:=AVERAGE([.M123:.M130])" office:value-type="float" office:value="62.75" calcext:value-type="float">
            <text:p>6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25" calcext:value-type="float">
            <text:p>125</text:p>
          </table:table-cell>
          <table:table-cell office:value-type="float" office:value="74" calcext:value-type="float">
            <text:p>74</text:p>
          </table:table-cell>
          <table:table-cell table:formula="of:=AVERAGE([.M124:.M131])" office:value-type="float" office:value="62" calcext:value-type="float">
            <text:p>62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26" calcext:value-type="float">
            <text:p>126</text:p>
          </table:table-cell>
          <table:table-cell office:value-type="float" office:value="67" calcext:value-type="float">
            <text:p>67</text:p>
          </table:table-cell>
          <table:table-cell table:formula="of:=AVERAGE([.M125:.M132])" office:value-type="float" office:value="63.75" calcext:value-type="float">
            <text:p>6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27" calcext:value-type="float">
            <text:p>127</text:p>
          </table:table-cell>
          <table:table-cell office:value-type="float" office:value="61" calcext:value-type="float">
            <text:p>61</text:p>
          </table:table-cell>
          <table:table-cell table:formula="of:=AVERAGE([.M126:.M133])" office:value-type="float" office:value="62.375" calcext:value-type="float">
            <text:p>6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28" calcext:value-type="float">
            <text:p>128</text:p>
          </table:table-cell>
          <table:table-cell office:value-type="float" office:value="53" calcext:value-type="float">
            <text:p>53</text:p>
          </table:table-cell>
          <table:table-cell table:formula="of:=AVERAGE([.M127:.M134])" office:value-type="float" office:value="60.5" calcext:value-type="float">
            <text:p>60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29" calcext:value-type="float">
            <text:p>129</text:p>
          </table:table-cell>
          <table:table-cell office:value-type="float" office:value="57" calcext:value-type="float">
            <text:p>57</text:p>
          </table:table-cell>
          <table:table-cell table:formula="of:=AVERAGE([.M128:.M135])" office:value-type="float" office:value="58.75" calcext:value-type="float">
            <text:p>58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30" calcext:value-type="float">
            <text:p>130</text:p>
          </table:table-cell>
          <table:table-cell office:value-type="float" office:value="69" calcext:value-type="float">
            <text:p>69</text:p>
          </table:table-cell>
          <table:table-cell table:formula="of:=AVERAGE([.M129:.M136])" office:value-type="float" office:value="57.25" calcext:value-type="float">
            <text:p>57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31" calcext:value-type="float">
            <text:p>131</text:p>
          </table:table-cell>
          <table:table-cell office:value-type="float" office:value="45" calcext:value-type="float">
            <text:p>45</text:p>
          </table:table-cell>
          <table:table-cell table:formula="of:=AVERAGE([.M130:.M137])" office:value-type="float" office:value="58" calcext:value-type="float">
            <text:p>58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32" calcext:value-type="float">
            <text:p>132</text:p>
          </table:table-cell>
          <table:table-cell office:value-type="float" office:value="58" calcext:value-type="float">
            <text:p>58</text:p>
          </table:table-cell>
          <table:table-cell table:formula="of:=AVERAGE([.M131:.M138])" office:value-type="float" office:value="59" calcext:value-type="float">
            <text:p>59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33" calcext:value-type="float">
            <text:p>133</text:p>
          </table:table-cell>
          <table:table-cell office:value-type="float" office:value="60" calcext:value-type="float">
            <text:p>60</text:p>
          </table:table-cell>
          <table:table-cell table:formula="of:=AVERAGE([.M132:.M139])" office:value-type="float" office:value="60.875" calcext:value-type="float">
            <text:p>6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34" calcext:value-type="float">
            <text:p>134</text:p>
          </table:table-cell>
          <table:table-cell office:value-type="float" office:value="55" calcext:value-type="float">
            <text:p>55</text:p>
          </table:table-cell>
          <table:table-cell table:formula="of:=AVERAGE([.M133:.M140])" office:value-type="float" office:value="59.75" calcext:value-type="float">
            <text:p>59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35" calcext:value-type="float">
            <text:p>135</text:p>
          </table:table-cell>
          <table:table-cell office:value-type="float" office:value="67" calcext:value-type="float">
            <text:p>67</text:p>
          </table:table-cell>
          <table:table-cell table:formula="of:=AVERAGE([.M134:.M141])" office:value-type="float" office:value="60.5" calcext:value-type="float">
            <text:p>60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36" calcext:value-type="float">
            <text:p>136</text:p>
          </table:table-cell>
          <table:table-cell office:value-type="float" office:value="61" calcext:value-type="float">
            <text:p>61</text:p>
          </table:table-cell>
          <table:table-cell table:formula="of:=AVERAGE([.M135:.M142])" office:value-type="float" office:value="62.25" calcext:value-type="float">
            <text:p>62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37" calcext:value-type="float">
            <text:p>137</text:p>
          </table:table-cell>
          <table:table-cell office:value-type="float" office:value="72" calcext:value-type="float">
            <text:p>72</text:p>
          </table:table-cell>
          <table:table-cell table:formula="of:=AVERAGE([.M136:.M143])" office:value-type="float" office:value="61.25" calcext:value-type="float">
            <text:p>61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38" calcext:value-type="float">
            <text:p>138</text:p>
          </table:table-cell>
          <table:table-cell office:value-type="float" office:value="60" calcext:value-type="float">
            <text:p>60</text:p>
          </table:table-cell>
          <table:table-cell table:formula="of:=AVERAGE([.M137:.M144])" office:value-type="float" office:value="63.75" calcext:value-type="float">
            <text:p>6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39" calcext:value-type="float">
            <text:p>139</text:p>
          </table:table-cell>
          <table:table-cell office:value-type="float" office:value="51" calcext:value-type="float">
            <text:p>51</text:p>
          </table:table-cell>
          <table:table-cell table:formula="of:=AVERAGE([.M138:.M145])" office:value-type="float" office:value="63.75" calcext:value-type="float">
            <text:p>6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40" calcext:value-type="float">
            <text:p>140</text:p>
          </table:table-cell>
          <table:table-cell office:value-type="float" office:value="72" calcext:value-type="float">
            <text:p>72</text:p>
          </table:table-cell>
          <table:table-cell table:formula="of:=AVERAGE([.M139:.M146])" office:value-type="float" office:value="64.5" calcext:value-type="float">
            <text:p>6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41" calcext:value-type="float">
            <text:p>141</text:p>
          </table:table-cell>
          <table:table-cell office:value-type="float" office:value="52" calcext:value-type="float">
            <text:p>52</text:p>
          </table:table-cell>
          <table:table-cell table:formula="of:=AVERAGE([.M140:.M147])" office:value-type="float" office:value="63.875" calcext:value-type="float">
            <text:p>6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table:formula="of:=AVERAGE([.M141:.M148])" office:value-type="float" office:value="66" calcext:value-type="float">
            <text:p>66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43" calcext:value-type="float">
            <text:p>143</text:p>
          </table:table-cell>
          <table:table-cell office:value-type="float" office:value="67" calcext:value-type="float">
            <text:p>67</text:p>
          </table:table-cell>
          <table:table-cell table:formula="of:=AVERAGE([.M142:.M149])" office:value-type="float" office:value="67" calcext:value-type="float">
            <text:p>67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44" calcext:value-type="float">
            <text:p>144</text:p>
          </table:table-cell>
          <table:table-cell office:value-type="float" office:value="67" calcext:value-type="float">
            <text:p>67</text:p>
          </table:table-cell>
          <table:table-cell table:formula="of:=AVERAGE([.M143:.M150])" office:value-type="float" office:value="65.125" calcext:value-type="float">
            <text:p>65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45" calcext:value-type="float">
            <text:p>145</text:p>
          </table:table-cell>
          <table:table-cell office:value-type="float" office:value="67" calcext:value-type="float">
            <text:p>67</text:p>
          </table:table-cell>
          <table:table-cell table:formula="of:=AVERAGE([.M144:.M151])" office:value-type="float" office:value="67.5" calcext:value-type="float">
            <text:p>67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46" calcext:value-type="float">
            <text:p>146</text:p>
          </table:table-cell>
          <table:table-cell office:value-type="float" office:value="77" calcext:value-type="float">
            <text:p>77</text:p>
          </table:table-cell>
          <table:table-cell table:formula="of:=AVERAGE([.M145:.M152])" office:value-type="float" office:value="65.625" calcext:value-type="float">
            <text:p>65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47" calcext:value-type="float">
            <text:p>147</text:p>
          </table:table-cell>
          <table:table-cell office:value-type="float" office:value="59" calcext:value-type="float">
            <text:p>59</text:p>
          </table:table-cell>
          <table:table-cell table:formula="of:=AVERAGE([.M146:.M153])" office:value-type="float" office:value="66.75" calcext:value-type="float">
            <text:p>66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48" calcext:value-type="float">
            <text:p>148</text:p>
          </table:table-cell>
          <table:table-cell office:value-type="float" office:value="57" calcext:value-type="float">
            <text:p>57</text:p>
          </table:table-cell>
          <table:table-cell table:formula="of:=AVERAGE([.M147:.M154])" office:value-type="float" office:value="67.875" calcext:value-type="float">
            <text:p>67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49" calcext:value-type="float">
            <text:p>149</text:p>
          </table:table-cell>
          <table:table-cell office:value-type="float" office:value="71" calcext:value-type="float">
            <text:p>71</text:p>
          </table:table-cell>
          <table:table-cell table:formula="of:=AVERAGE([.M148:.M155])" office:value-type="float" office:value="68.375" calcext:value-type="float">
            <text:p>68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formula="of:=AVERAGE([.M149:.M156])" office:value-type="float" office:value="68.625" calcext:value-type="float">
            <text:p>68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  <table:table-cell table:formula="of:=AVERAGE([.M150:.M157])" office:value-type="float" office:value="72.5" calcext:value-type="float">
            <text:p>7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52" calcext:value-type="float">
            <text:p>152</text:p>
          </table:table-cell>
          <table:table-cell office:value-type="float" office:value="76" calcext:value-type="float">
            <text:p>76</text:p>
          </table:table-cell>
          <table:table-cell table:formula="of:=AVERAGE([.M151:.M158])" office:value-type="float" office:value="76.75" calcext:value-type="float">
            <text:p>76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53" calcext:value-type="float">
            <text:p>153</text:p>
          </table:table-cell>
          <table:table-cell office:value-type="float" office:value="71" calcext:value-type="float">
            <text:p>71</text:p>
          </table:table-cell>
          <table:table-cell table:formula="of:=AVERAGE([.M152:.M159])" office:value-type="float" office:value="78" calcext:value-type="float">
            <text:p>78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54" calcext:value-type="float">
            <text:p>154</text:p>
          </table:table-cell>
          <table:table-cell office:value-type="float" office:value="79" calcext:value-type="float">
            <text:p>79</text:p>
          </table:table-cell>
          <table:table-cell table:formula="of:=AVERAGE([.M153:.M160])" office:value-type="float" office:value="80.875" calcext:value-type="float">
            <text:p>8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55" calcext:value-type="float">
            <text:p>155</text:p>
          </table:table-cell>
          <table:table-cell office:value-type="float" office:value="90" calcext:value-type="float">
            <text:p>90</text:p>
          </table:table-cell>
          <table:table-cell table:formula="of:=AVERAGE([.M154:.M161])" office:value-type="float" office:value="83" calcext:value-type="float">
            <text:p>83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56" calcext:value-type="float">
            <text:p>156</text:p>
          </table:table-cell>
          <table:table-cell office:value-type="float" office:value="91" calcext:value-type="float">
            <text:p>91</text:p>
          </table:table-cell>
          <table:table-cell table:formula="of:=AVERAGE([.M155:.M162])" office:value-type="float" office:value="84.25" calcext:value-type="float">
            <text:p>8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57" calcext:value-type="float">
            <text:p>157</text:p>
          </table:table-cell>
          <table:table-cell office:value-type="float" office:value="81" calcext:value-type="float">
            <text:p>81</text:p>
          </table:table-cell>
          <table:table-cell table:formula="of:=AVERAGE([.M156:.M163])" office:value-type="float" office:value="88.625" calcext:value-type="float">
            <text:p>88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58" calcext:value-type="float">
            <text:p>158</text:p>
          </table:table-cell>
          <table:table-cell office:value-type="float" office:value="83" calcext:value-type="float">
            <text:p>83</text:p>
          </table:table-cell>
          <table:table-cell table:formula="of:=AVERAGE([.M157:.M164])" office:value-type="float" office:value="92.125" calcext:value-type="float">
            <text:p>92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59" calcext:value-type="float">
            <text:p>159</text:p>
          </table:table-cell>
          <table:table-cell office:value-type="float" office:value="93" calcext:value-type="float">
            <text:p>93</text:p>
          </table:table-cell>
          <table:table-cell table:formula="of:=AVERAGE([.M158:.M165])" office:value-type="float" office:value="92.625" calcext:value-type="float">
            <text:p>9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60" calcext:value-type="float">
            <text:p>160</text:p>
          </table:table-cell>
          <table:table-cell office:value-type="float" office:value="86" calcext:value-type="float">
            <text:p>86</text:p>
          </table:table-cell>
          <table:table-cell table:formula="of:=AVERAGE([.M159:.M166])" office:value-type="float" office:value="95.5" calcext:value-type="float">
            <text:p>95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61" calcext:value-type="float">
            <text:p>161</text:p>
          </table:table-cell>
          <table:table-cell office:value-type="float" office:value="106" calcext:value-type="float">
            <text:p>106</text:p>
          </table:table-cell>
          <table:table-cell table:formula="of:=AVERAGE([.M160:.M167])" office:value-type="float" office:value="103.125" calcext:value-type="float">
            <text:p>10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table:formula="of:=AVERAGE([.M161:.M168])" office:value-type="float" office:value="107.75" calcext:value-type="float">
            <text:p>107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63" calcext:value-type="float">
            <text:p>163</text:p>
          </table:table-cell>
          <table:table-cell office:value-type="float" office:value="94" calcext:value-type="float">
            <text:p>94</text:p>
          </table:table-cell>
          <table:table-cell table:formula="of:=AVERAGE([.M162:.M169])" office:value-type="float" office:value="111.75" calcext:value-type="float">
            <text:p>111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64" calcext:value-type="float">
            <text:p>164</text:p>
          </table:table-cell>
          <table:table-cell office:value-type="float" office:value="114" calcext:value-type="float">
            <text:p>114</text:p>
          </table:table-cell>
          <table:table-cell table:formula="of:=AVERAGE([.M163:.M170])" office:value-type="float" office:value="118.25" calcext:value-type="float">
            <text:p>118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65" calcext:value-type="float">
            <text:p>165</text:p>
          </table:table-cell>
          <table:table-cell office:value-type="float" office:value="142" calcext:value-type="float">
            <text:p>142</text:p>
          </table:table-cell>
          <table:table-cell table:formula="of:=AVERAGE([.M164:.M171])" office:value-type="float" office:value="121.125" calcext:value-type="float">
            <text:p>121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66" calcext:value-type="float">
            <text:p>166</text:p>
          </table:table-cell>
          <table:table-cell office:value-type="float" office:value="120" calcext:value-type="float">
            <text:p>120</text:p>
          </table:table-cell>
          <table:table-cell table:formula="of:=AVERAGE([.M165:.M172])" office:value-type="float" office:value="127" calcext:value-type="float">
            <text:p>127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67" calcext:value-type="float">
            <text:p>167</text:p>
          </table:table-cell>
          <table:table-cell office:value-type="float" office:value="125" calcext:value-type="float">
            <text:p>125</text:p>
          </table:table-cell>
          <table:table-cell table:formula="of:=AVERAGE([.M166:.M173])" office:value-type="float" office:value="135.25" calcext:value-type="float">
            <text:p>135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68" calcext:value-type="float">
            <text:p>168</text:p>
          </table:table-cell>
          <table:table-cell office:value-type="float" office:value="138" calcext:value-type="float">
            <text:p>138</text:p>
          </table:table-cell>
          <table:table-cell table:formula="of:=AVERAGE([.M167:.M174])" office:value-type="float" office:value="146" calcext:value-type="float">
            <text:p>146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69" calcext:value-type="float">
            <text:p>169</text:p>
          </table:table-cell>
          <table:table-cell office:value-type="float" office:value="129" calcext:value-type="float">
            <text:p>129</text:p>
          </table:table-cell>
          <table:table-cell table:formula="of:=AVERAGE([.M168:.M175])" office:value-type="float" office:value="150.875" calcext:value-type="float">
            <text:p>15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70" calcext:value-type="float">
            <text:p>170</text:p>
          </table:table-cell>
          <table:table-cell office:value-type="float" office:value="154" calcext:value-type="float">
            <text:p>154</text:p>
          </table:table-cell>
          <table:table-cell table:formula="of:=AVERAGE([.M169:.M176])" office:value-type="float" office:value="164.875" calcext:value-type="float">
            <text:p>16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71" calcext:value-type="float">
            <text:p>171</text:p>
          </table:table-cell>
          <table:table-cell office:value-type="float" office:value="160" calcext:value-type="float">
            <text:p>160</text:p>
          </table:table-cell>
          <table:table-cell table:formula="of:=AVERAGE([.M170:.M177])" office:value-type="float" office:value="174.375" calcext:value-type="float">
            <text:p>17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72" calcext:value-type="float">
            <text:p>172</text:p>
          </table:table-cell>
          <table:table-cell office:value-type="float" office:value="200" calcext:value-type="float">
            <text:p>200</text:p>
          </table:table-cell>
          <table:table-cell table:formula="of:=AVERAGE([.M171:.M178])" office:value-type="float" office:value="188.875" calcext:value-type="float">
            <text:p>188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73" calcext:value-type="float">
            <text:p>173</text:p>
          </table:table-cell>
          <table:table-cell office:value-type="float" office:value="181" calcext:value-type="float">
            <text:p>181</text:p>
          </table:table-cell>
          <table:table-cell table:formula="of:=AVERAGE([.M172:.M179])" office:value-type="float" office:value="208.5" calcext:value-type="float">
            <text:p>208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74" calcext:value-type="float">
            <text:p>174</text:p>
          </table:table-cell>
          <table:table-cell office:value-type="float" office:value="232" calcext:value-type="float">
            <text:p>232</text:p>
          </table:table-cell>
          <table:table-cell table:formula="of:=AVERAGE([.M173:.M180])" office:value-type="float" office:value="227.75" calcext:value-type="float">
            <text:p>227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75" calcext:value-type="float">
            <text:p>175</text:p>
          </table:table-cell>
          <table:table-cell office:value-type="float" office:value="201" calcext:value-type="float">
            <text:p>201</text:p>
          </table:table-cell>
          <table:table-cell table:formula="of:=AVERAGE([.M174:.M181])" office:value-type="float" office:value="245" calcext:value-type="float">
            <text:p>24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76" calcext:value-type="float">
            <text:p>176</text:p>
          </table:table-cell>
          <table:table-cell office:value-type="float" office:value="254" calcext:value-type="float">
            <text:p>254</text:p>
          </table:table-cell>
          <table:table-cell table:formula="of:=AVERAGE([.M175:.M182])" office:value-type="float" office:value="262" calcext:value-type="float">
            <text:p>262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77" calcext:value-type="float">
            <text:p>177</text:p>
          </table:table-cell>
          <table:table-cell office:value-type="float" office:value="286" calcext:value-type="float">
            <text:p>286</text:p>
          </table:table-cell>
          <table:table-cell table:formula="of:=AVERAGE([.M176:.M183])" office:value-type="float" office:value="287.5" calcext:value-type="float">
            <text:p>287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78" calcext:value-type="float">
            <text:p>178</text:p>
          </table:table-cell>
          <table:table-cell office:value-type="float" office:value="308" calcext:value-type="float">
            <text:p>308</text:p>
          </table:table-cell>
          <table:table-cell table:formula="of:=AVERAGE([.M177:.M184])" office:value-type="float" office:value="306.875" calcext:value-type="float">
            <text:p>306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79" calcext:value-type="float">
            <text:p>179</text:p>
          </table:table-cell>
          <table:table-cell office:value-type="float" office:value="298" calcext:value-type="float">
            <text:p>298</text:p>
          </table:table-cell>
          <table:table-cell table:formula="of:=AVERAGE([.M178:.M185])" office:value-type="float" office:value="329" calcext:value-type="float">
            <text:p>329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80" calcext:value-type="float">
            <text:p>180</text:p>
          </table:table-cell>
          <table:table-cell office:value-type="float" office:value="336" calcext:value-type="float">
            <text:p>336</text:p>
          </table:table-cell>
          <table:table-cell table:formula="of:=AVERAGE([.M179:.M186])" office:value-type="float" office:value="352.5" calcext:value-type="float">
            <text:p>35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81" calcext:value-type="float">
            <text:p>181</text:p>
          </table:table-cell>
          <table:table-cell office:value-type="float" office:value="385" calcext:value-type="float">
            <text:p>385</text:p>
          </table:table-cell>
          <table:table-cell table:formula="of:=AVERAGE([.M180:.M187])" office:value-type="float" office:value="372.625" calcext:value-type="float">
            <text:p>37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82" calcext:value-type="float">
            <text:p>182</text:p>
          </table:table-cell>
          <table:table-cell office:value-type="float" office:value="387" calcext:value-type="float">
            <text:p>387</text:p>
          </table:table-cell>
          <table:table-cell table:formula="of:=AVERAGE([.M181:.M188])" office:value-type="float" office:value="399.625" calcext:value-type="float">
            <text:p>399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83" calcext:value-type="float">
            <text:p>183</text:p>
          </table:table-cell>
          <table:table-cell office:value-type="float" office:value="378" calcext:value-type="float">
            <text:p>378</text:p>
          </table:table-cell>
          <table:table-cell table:formula="of:=AVERAGE([.M182:.M189])" office:value-type="float" office:value="432.5" calcext:value-type="float">
            <text:p>43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84" calcext:value-type="float">
            <text:p>184</text:p>
          </table:table-cell>
          <table:table-cell office:value-type="float" office:value="442" calcext:value-type="float">
            <text:p>442</text:p>
          </table:table-cell>
          <table:table-cell table:formula="of:=AVERAGE([.M183:.M190])" office:value-type="float" office:value="463.5" calcext:value-type="float">
            <text:p>46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85" calcext:value-type="float">
            <text:p>185</text:p>
          </table:table-cell>
          <table:table-cell office:value-type="float" office:value="447" calcext:value-type="float">
            <text:p>447</text:p>
          </table:table-cell>
          <table:table-cell table:formula="of:=AVERAGE([.M184:.M191])" office:value-type="float" office:value="500.25" calcext:value-type="float">
            <text:p>500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86" calcext:value-type="float">
            <text:p>186</text:p>
          </table:table-cell>
          <table:table-cell office:value-type="float" office:value="524" calcext:value-type="float">
            <text:p>524</text:p>
          </table:table-cell>
          <table:table-cell table:formula="of:=AVERAGE([.M185:.M192])" office:value-type="float" office:value="535.75" calcext:value-type="float">
            <text:p>53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87" calcext:value-type="float">
            <text:p>187</text:p>
          </table:table-cell>
          <table:table-cell office:value-type="float" office:value="561" calcext:value-type="float">
            <text:p>561</text:p>
          </table:table-cell>
          <table:table-cell table:formula="of:=AVERAGE([.M186:.M193])" office:value-type="float" office:value="583.25" calcext:value-type="float">
            <text:p>58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88" calcext:value-type="float">
            <text:p>188</text:p>
          </table:table-cell>
          <table:table-cell office:value-type="float" office:value="584" calcext:value-type="float">
            <text:p>584</text:p>
          </table:table-cell>
          <table:table-cell table:formula="of:=AVERAGE([.M187:.M194])" office:value-type="float" office:value="622.75" calcext:value-type="float">
            <text:p>62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89" calcext:value-type="float">
            <text:p>189</text:p>
          </table:table-cell>
          <table:table-cell office:value-type="float" office:value="679" calcext:value-type="float">
            <text:p>679</text:p>
          </table:table-cell>
          <table:table-cell table:formula="of:=AVERAGE([.M188:.M195])" office:value-type="float" office:value="674.25" calcext:value-type="float">
            <text:p>67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90" calcext:value-type="float">
            <text:p>190</text:p>
          </table:table-cell>
          <table:table-cell office:value-type="float" office:value="671" calcext:value-type="float">
            <text:p>671</text:p>
          </table:table-cell>
          <table:table-cell table:formula="of:=AVERAGE([.M189:.M196])" office:value-type="float" office:value="720.75" calcext:value-type="float">
            <text:p>720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91" calcext:value-type="float">
            <text:p>191</text:p>
          </table:table-cell>
          <table:table-cell office:value-type="float" office:value="758" calcext:value-type="float">
            <text:p>758</text:p>
          </table:table-cell>
          <table:table-cell table:formula="of:=AVERAGE([.M190:.M197])" office:value-type="float" office:value="768.75" calcext:value-type="float">
            <text:p>768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92" calcext:value-type="float">
            <text:p>192</text:p>
          </table:table-cell>
          <table:table-cell office:value-type="float" office:value="758" calcext:value-type="float">
            <text:p>758</text:p>
          </table:table-cell>
          <table:table-cell table:formula="of:=AVERAGE([.M191:.M198])" office:value-type="float" office:value="821.5" calcext:value-type="float">
            <text:p>821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93" calcext:value-type="float">
            <text:p>193</text:p>
          </table:table-cell>
          <table:table-cell office:value-type="float" office:value="859" calcext:value-type="float">
            <text:p>859</text:p>
          </table:table-cell>
          <table:table-cell table:formula="of:=AVERAGE([.M192:.M199])" office:value-type="float" office:value="879.25" calcext:value-type="float">
            <text:p>879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94" calcext:value-type="float">
            <text:p>194</text:p>
          </table:table-cell>
          <table:table-cell office:value-type="float" office:value="896" calcext:value-type="float">
            <text:p>896</text:p>
          </table:table-cell>
          <table:table-cell table:formula="of:=AVERAGE([.M193:.M200])" office:value-type="float" office:value="935.375" calcext:value-type="float">
            <text:p>935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95" calcext:value-type="float">
            <text:p>195</text:p>
          </table:table-cell>
          <table:table-cell office:value-type="float" office:value="945" calcext:value-type="float">
            <text:p>945</text:p>
          </table:table-cell>
          <table:table-cell table:formula="of:=AVERAGE([.M194:.M201])" office:value-type="float" office:value="994" calcext:value-type="float">
            <text:p>994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96" calcext:value-type="float">
            <text:p>196</text:p>
          </table:table-cell>
          <table:table-cell office:value-type="float" office:value="1006" calcext:value-type="float">
            <text:p>1006</text:p>
          </table:table-cell>
          <table:table-cell table:formula="of:=AVERAGE([.M195:.M202])" office:value-type="float" office:value="1065" calcext:value-type="float">
            <text:p>106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97" calcext:value-type="float">
            <text:p>197</text:p>
          </table:table-cell>
          <table:table-cell office:value-type="float" office:value="1141" calcext:value-type="float">
            <text:p>1141</text:p>
          </table:table-cell>
          <table:table-cell table:formula="of:=AVERAGE([.M196:.M203])" office:value-type="float" office:value="1130.125" calcext:value-type="float">
            <text:p>1130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98" calcext:value-type="float">
            <text:p>198</text:p>
          </table:table-cell>
          <table:table-cell office:value-type="float" office:value="1120" calcext:value-type="float">
            <text:p>1120</text:p>
          </table:table-cell>
          <table:table-cell table:formula="of:=AVERAGE([.M197:.M204])" office:value-type="float" office:value="1198.125" calcext:value-type="float">
            <text:p>1198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199" calcext:value-type="float">
            <text:p>199</text:p>
          </table:table-cell>
          <table:table-cell office:value-type="float" office:value="1227" calcext:value-type="float">
            <text:p>1227</text:p>
          </table:table-cell>
          <table:table-cell table:formula="of:=AVERAGE([.M198:.M205])" office:value-type="float" office:value="1264.5" calcext:value-type="float">
            <text:p>126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6">
          <table:table-cell table:number-columns-repeated="11"/>
          <table:table-cell office:value-type="float" office:value="200" calcext:value-type="float">
            <text:p>200</text:p>
          </table:table-cell>
          <table:table-cell office:value-type="float" office:value="1326" calcext:value-type="float">
            <text:p>1326</text:p>
          </table:table-cell>
          <table:table-cell table:formula="of:=AVERAGE([.M199:.M206])" office:value-type="float" office:value="1330.125" calcext:value-type="float">
            <text:p>1330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01" calcext:value-type="float">
            <text:p>201</text:p>
          </table:table-cell>
          <table:table-cell office:value-type="float" office:value="1380" calcext:value-type="float">
            <text:p>1380</text:p>
          </table:table-cell>
          <table:table-cell table:formula="of:=AVERAGE([.M200:.M207])" office:value-type="float" office:value="1382" calcext:value-type="float">
            <text:p>1382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02" calcext:value-type="float">
            <text:p>202</text:p>
          </table:table-cell>
          <table:table-cell office:value-type="float" office:value="1440" calcext:value-type="float">
            <text:p>1440</text:p>
          </table:table-cell>
          <table:table-cell table:formula="of:=AVERAGE([.M201:.M208])" office:value-type="float" office:value="1452.5" calcext:value-type="float">
            <text:p>145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03" calcext:value-type="float">
            <text:p>203</text:p>
          </table:table-cell>
          <table:table-cell office:value-type="float" office:value="1476" calcext:value-type="float">
            <text:p>1476</text:p>
          </table:table-cell>
          <table:table-cell table:formula="of:=AVERAGE([.M202:.M209])" office:value-type="float" office:value="1510.25" calcext:value-type="float">
            <text:p>1510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04" calcext:value-type="float">
            <text:p>204</text:p>
          </table:table-cell>
          <table:table-cell office:value-type="float" office:value="1531" calcext:value-type="float">
            <text:p>1531</text:p>
          </table:table-cell>
          <table:table-cell table:formula="of:=AVERAGE([.M203:.M210])" office:value-type="float" office:value="1563.5" calcext:value-type="float">
            <text:p>156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05" calcext:value-type="float">
            <text:p>205</text:p>
          </table:table-cell>
          <table:table-cell office:value-type="float" office:value="1556" calcext:value-type="float">
            <text:p>1556</text:p>
          </table:table-cell>
          <table:table-cell table:formula="of:=AVERAGE([.M204:.M211])" office:value-type="float" office:value="1619.625" calcext:value-type="float">
            <text:p>1619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06" calcext:value-type="float">
            <text:p>206</text:p>
          </table:table-cell>
          <table:table-cell office:value-type="float" office:value="1684" calcext:value-type="float">
            <text:p>1684</text:p>
          </table:table-cell>
          <table:table-cell table:formula="of:=AVERAGE([.M205:.M212])" office:value-type="float" office:value="1667.375" calcext:value-type="float">
            <text:p>1667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07" calcext:value-type="float">
            <text:p>207</text:p>
          </table:table-cell>
          <table:table-cell office:value-type="float" office:value="1689" calcext:value-type="float">
            <text:p>1689</text:p>
          </table:table-cell>
          <table:table-cell table:formula="of:=AVERAGE([.M206:.M213])" office:value-type="float" office:value="1715.25" calcext:value-type="float">
            <text:p>1715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08" calcext:value-type="float">
            <text:p>208</text:p>
          </table:table-cell>
          <table:table-cell office:value-type="float" office:value="1752" calcext:value-type="float">
            <text:p>1752</text:p>
          </table:table-cell>
          <table:table-cell table:formula="of:=AVERAGE([.M207:.M214])" office:value-type="float" office:value="1762.75" calcext:value-type="float">
            <text:p>176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09" calcext:value-type="float">
            <text:p>209</text:p>
          </table:table-cell>
          <table:table-cell office:value-type="float" office:value="1829" calcext:value-type="float">
            <text:p>1829</text:p>
          </table:table-cell>
          <table:table-cell table:formula="of:=AVERAGE([.M208:.M215])" office:value-type="float" office:value="1804.5" calcext:value-type="float">
            <text:p>180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10" calcext:value-type="float">
            <text:p>210</text:p>
          </table:table-cell>
          <table:table-cell office:value-type="float" office:value="1822" calcext:value-type="float">
            <text:p>1822</text:p>
          </table:table-cell>
          <table:table-cell table:formula="of:=AVERAGE([.M209:.M216])" office:value-type="float" office:value="1822.75" calcext:value-type="float">
            <text:p>182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11" calcext:value-type="float">
            <text:p>211</text:p>
          </table:table-cell>
          <table:table-cell office:value-type="float" office:value="1859" calcext:value-type="float">
            <text:p>1859</text:p>
          </table:table-cell>
          <table:table-cell table:formula="of:=AVERAGE([.M210:.M217])" office:value-type="float" office:value="1850.75" calcext:value-type="float">
            <text:p>1850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12" calcext:value-type="float">
            <text:p>212</text:p>
          </table:table-cell>
          <table:table-cell office:value-type="float" office:value="1911" calcext:value-type="float">
            <text:p>1911</text:p>
          </table:table-cell>
          <table:table-cell table:formula="of:=AVERAGE([.M211:.M218])" office:value-type="float" office:value="1879.625" calcext:value-type="float">
            <text:p>1879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13" calcext:value-type="float">
            <text:p>213</text:p>
          </table:table-cell>
          <table:table-cell office:value-type="float" office:value="1890" calcext:value-type="float">
            <text:p>1890</text:p>
          </table:table-cell>
          <table:table-cell table:formula="of:=AVERAGE([.M212:.M219])" office:value-type="float" office:value="1888.875" calcext:value-type="float">
            <text:p>1888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14" calcext:value-type="float">
            <text:p>214</text:p>
          </table:table-cell>
          <table:table-cell office:value-type="float" office:value="1830" calcext:value-type="float">
            <text:p>1830</text:p>
          </table:table-cell>
          <table:table-cell table:formula="of:=AVERAGE([.M213:.M220])" office:value-type="float" office:value="1907.875" calcext:value-type="float">
            <text:p>1907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15" calcext:value-type="float">
            <text:p>215</text:p>
          </table:table-cell>
          <table:table-cell office:value-type="float" office:value="1913" calcext:value-type="float">
            <text:p>1913</text:p>
          </table:table-cell>
          <table:table-cell table:formula="of:=AVERAGE([.M214:.M221])" office:value-type="float" office:value="1921.625" calcext:value-type="float">
            <text:p>1921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16" calcext:value-type="float">
            <text:p>216</text:p>
          </table:table-cell>
          <table:table-cell office:value-type="float" office:value="1983" calcext:value-type="float">
            <text:p>1983</text:p>
          </table:table-cell>
          <table:table-cell table:formula="of:=AVERAGE([.M215:.M222])" office:value-type="float" office:value="1911.375" calcext:value-type="float">
            <text:p>1911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17" calcext:value-type="float">
            <text:p>217</text:p>
          </table:table-cell>
          <table:table-cell office:value-type="float" office:value="1903" calcext:value-type="float">
            <text:p>1903</text:p>
          </table:table-cell>
          <table:table-cell table:formula="of:=AVERAGE([.M216:.M223])" office:value-type="float" office:value="1920.125" calcext:value-type="float">
            <text:p>1920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18" calcext:value-type="float">
            <text:p>218</text:p>
          </table:table-cell>
          <table:table-cell office:value-type="float" office:value="1974" calcext:value-type="float">
            <text:p>1974</text:p>
          </table:table-cell>
          <table:table-cell table:formula="of:=AVERAGE([.M217:.M224])" office:value-type="float" office:value="1930.375" calcext:value-type="float">
            <text:p>1930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19" calcext:value-type="float">
            <text:p>219</text:p>
          </table:table-cell>
          <table:table-cell office:value-type="float" office:value="1969" calcext:value-type="float">
            <text:p>1969</text:p>
          </table:table-cell>
          <table:table-cell table:formula="of:=AVERAGE([.M218:.M225])" office:value-type="float" office:value="1929" calcext:value-type="float">
            <text:p>1929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20" calcext:value-type="float">
            <text:p>220</text:p>
          </table:table-cell>
          <table:table-cell office:value-type="float" office:value="1829" calcext:value-type="float">
            <text:p>1829</text:p>
          </table:table-cell>
          <table:table-cell table:formula="of:=AVERAGE([.M219:.M226])" office:value-type="float" office:value="1905" calcext:value-type="float">
            <text:p>190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21" calcext:value-type="float">
            <text:p>221</text:p>
          </table:table-cell>
          <table:table-cell office:value-type="float" office:value="1960" calcext:value-type="float">
            <text:p>1960</text:p>
          </table:table-cell>
          <table:table-cell table:formula="of:=AVERAGE([.M220:.M227])" office:value-type="float" office:value="1899.25" calcext:value-type="float">
            <text:p>1899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22" calcext:value-type="float">
            <text:p>222</text:p>
          </table:table-cell>
          <table:table-cell office:value-type="float" office:value="1912" calcext:value-type="float">
            <text:p>1912</text:p>
          </table:table-cell>
          <table:table-cell table:formula="of:=AVERAGE([.M221:.M228])" office:value-type="float" office:value="1883.375" calcext:value-type="float">
            <text:p>188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23" calcext:value-type="float">
            <text:p>223</text:p>
          </table:table-cell>
          <table:table-cell office:value-type="float" office:value="1902" calcext:value-type="float">
            <text:p>1902</text:p>
          </table:table-cell>
          <table:table-cell table:formula="of:=AVERAGE([.M222:.M229])" office:value-type="float" office:value="1856.875" calcext:value-type="float">
            <text:p>1856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24" calcext:value-type="float">
            <text:p>224</text:p>
          </table:table-cell>
          <table:table-cell office:value-type="float" office:value="1791" calcext:value-type="float">
            <text:p>1791</text:p>
          </table:table-cell>
          <table:table-cell table:formula="of:=AVERAGE([.M223:.M230])" office:value-type="float" office:value="1846.5" calcext:value-type="float">
            <text:p>1846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25" calcext:value-type="float">
            <text:p>225</text:p>
          </table:table-cell>
          <table:table-cell office:value-type="float" office:value="1857" calcext:value-type="float">
            <text:p>1857</text:p>
          </table:table-cell>
          <table:table-cell table:formula="of:=AVERAGE([.M224:.M231])" office:value-type="float" office:value="1809.75" calcext:value-type="float">
            <text:p>1809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26" calcext:value-type="float">
            <text:p>226</text:p>
          </table:table-cell>
          <table:table-cell office:value-type="float" office:value="1847" calcext:value-type="float">
            <text:p>1847</text:p>
          </table:table-cell>
          <table:table-cell table:formula="of:=AVERAGE([.M225:.M232])" office:value-type="float" office:value="1774.25" calcext:value-type="float">
            <text:p>177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27" calcext:value-type="float">
            <text:p>227</text:p>
          </table:table-cell>
          <table:table-cell office:value-type="float" office:value="1757" calcext:value-type="float">
            <text:p>1757</text:p>
          </table:table-cell>
          <table:table-cell table:formula="of:=AVERAGE([.M226:.M233])" office:value-type="float" office:value="1721.625" calcext:value-type="float">
            <text:p>1721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28" calcext:value-type="float">
            <text:p>228</text:p>
          </table:table-cell>
          <table:table-cell office:value-type="float" office:value="1746" calcext:value-type="float">
            <text:p>1746</text:p>
          </table:table-cell>
          <table:table-cell table:formula="of:=AVERAGE([.M227:.M234])" office:value-type="float" office:value="1685.375" calcext:value-type="float">
            <text:p>1685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29" calcext:value-type="float">
            <text:p>229</text:p>
          </table:table-cell>
          <table:table-cell office:value-type="float" office:value="1666" calcext:value-type="float">
            <text:p>1666</text:p>
          </table:table-cell>
          <table:table-cell table:formula="of:=AVERAGE([.M228:.M235])" office:value-type="float" office:value="1629.625" calcext:value-type="float">
            <text:p>1629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30" calcext:value-type="float">
            <text:p>230</text:p>
          </table:table-cell>
          <table:table-cell office:value-type="float" office:value="1628" calcext:value-type="float">
            <text:p>1628</text:p>
          </table:table-cell>
          <table:table-cell table:formula="of:=AVERAGE([.M229:.M236])" office:value-type="float" office:value="1575.5" calcext:value-type="float">
            <text:p>1575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31" calcext:value-type="float">
            <text:p>231</text:p>
          </table:table-cell>
          <table:table-cell office:value-type="float" office:value="1481" calcext:value-type="float">
            <text:p>1481</text:p>
          </table:table-cell>
          <table:table-cell table:formula="of:=AVERAGE([.M230:.M237])" office:value-type="float" office:value="1519.5" calcext:value-type="float">
            <text:p>1519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32" calcext:value-type="float">
            <text:p>232</text:p>
          </table:table-cell>
          <table:table-cell office:value-type="float" office:value="1501" calcext:value-type="float">
            <text:p>1501</text:p>
          </table:table-cell>
          <table:table-cell table:formula="of:=AVERAGE([.M231:.M238])" office:value-type="float" office:value="1459.875" calcext:value-type="float">
            <text:p>1459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33" calcext:value-type="float">
            <text:p>233</text:p>
          </table:table-cell>
          <table:table-cell office:value-type="float" office:value="1411" calcext:value-type="float">
            <text:p>1411</text:p>
          </table:table-cell>
          <table:table-cell table:formula="of:=AVERAGE([.M232:.M239])" office:value-type="float" office:value="1410" calcext:value-type="float">
            <text:p>1410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34" calcext:value-type="float">
            <text:p>234</text:p>
          </table:table-cell>
          <table:table-cell office:value-type="float" office:value="1414" calcext:value-type="float">
            <text:p>1414</text:p>
          </table:table-cell>
          <table:table-cell table:formula="of:=AVERAGE([.M233:.M240])" office:value-type="float" office:value="1354.375" calcext:value-type="float">
            <text:p>135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35" calcext:value-type="float">
            <text:p>235</text:p>
          </table:table-cell>
          <table:table-cell office:value-type="float" office:value="1309" calcext:value-type="float">
            <text:p>1309</text:p>
          </table:table-cell>
          <table:table-cell table:formula="of:=AVERAGE([.M234:.M241])" office:value-type="float" office:value="1311.125" calcext:value-type="float">
            <text:p>1311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36" calcext:value-type="float">
            <text:p>236</text:p>
          </table:table-cell>
          <table:table-cell office:value-type="float" office:value="1269" calcext:value-type="float">
            <text:p>1269</text:p>
          </table:table-cell>
          <table:table-cell table:formula="of:=AVERAGE([.M235:.M242])" office:value-type="float" office:value="1260" calcext:value-type="float">
            <text:p>1260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37" calcext:value-type="float">
            <text:p>237</text:p>
          </table:table-cell>
          <table:table-cell office:value-type="float" office:value="1267" calcext:value-type="float">
            <text:p>1267</text:p>
          </table:table-cell>
          <table:table-cell table:formula="of:=AVERAGE([.M236:.M243])" office:value-type="float" office:value="1215.75" calcext:value-type="float">
            <text:p>121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38" calcext:value-type="float">
            <text:p>238</text:p>
          </table:table-cell>
          <table:table-cell office:value-type="float" office:value="1183" calcext:value-type="float">
            <text:p>1183</text:p>
          </table:table-cell>
          <table:table-cell table:formula="of:=AVERAGE([.M237:.M244])" office:value-type="float" office:value="1162.625" calcext:value-type="float">
            <text:p>116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39" calcext:value-type="float">
            <text:p>239</text:p>
          </table:table-cell>
          <table:table-cell office:value-type="float" office:value="1135" calcext:value-type="float">
            <text:p>1135</text:p>
          </table:table-cell>
          <table:table-cell table:formula="of:=AVERAGE([.M238:.M245])" office:value-type="float" office:value="1118.625" calcext:value-type="float">
            <text:p>1118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40" calcext:value-type="float">
            <text:p>240</text:p>
          </table:table-cell>
          <table:table-cell office:value-type="float" office:value="1092" calcext:value-type="float">
            <text:p>1092</text:p>
          </table:table-cell>
          <table:table-cell table:formula="of:=AVERAGE([.M239:.M246])" office:value-type="float" office:value="1071.375" calcext:value-type="float">
            <text:p>1071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41" calcext:value-type="float">
            <text:p>241</text:p>
          </table:table-cell>
          <table:table-cell office:value-type="float" office:value="1057" calcext:value-type="float">
            <text:p>1057</text:p>
          </table:table-cell>
          <table:table-cell table:formula="of:=AVERAGE([.M240:.M247])" office:value-type="float" office:value="1019.875" calcext:value-type="float">
            <text:p>1019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42" calcext:value-type="float">
            <text:p>242</text:p>
          </table:table-cell>
          <table:table-cell office:value-type="float" office:value="989" calcext:value-type="float">
            <text:p>989</text:p>
          </table:table-cell>
          <table:table-cell table:formula="of:=AVERAGE([.M241:.M248])" office:value-type="float" office:value="970.625" calcext:value-type="float">
            <text:p>970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43" calcext:value-type="float">
            <text:p>243</text:p>
          </table:table-cell>
          <table:table-cell office:value-type="float" office:value="957" calcext:value-type="float">
            <text:p>957</text:p>
          </table:table-cell>
          <table:table-cell table:formula="of:=AVERAGE([.M242:.M249])" office:value-type="float" office:value="916.75" calcext:value-type="float">
            <text:p>916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44" calcext:value-type="float">
            <text:p>244</text:p>
          </table:table-cell>
          <table:table-cell office:value-type="float" office:value="891" calcext:value-type="float">
            <text:p>891</text:p>
          </table:table-cell>
          <table:table-cell table:formula="of:=AVERAGE([.M243:.M250])" office:value-type="float" office:value="861.875" calcext:value-type="float">
            <text:p>861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45" calcext:value-type="float">
            <text:p>245</text:p>
          </table:table-cell>
          <table:table-cell office:value-type="float" office:value="855" calcext:value-type="float">
            <text:p>855</text:p>
          </table:table-cell>
          <table:table-cell table:formula="of:=AVERAGE([.M244:.M251])" office:value-type="float" office:value="815.125" calcext:value-type="float">
            <text:p>815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46" calcext:value-type="float">
            <text:p>246</text:p>
          </table:table-cell>
          <table:table-cell office:value-type="float" office:value="789" calcext:value-type="float">
            <text:p>789</text:p>
          </table:table-cell>
          <table:table-cell table:formula="of:=AVERAGE([.M245:.M252])" office:value-type="float" office:value="771.375" calcext:value-type="float">
            <text:p>771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47" calcext:value-type="float">
            <text:p>247</text:p>
          </table:table-cell>
          <table:table-cell office:value-type="float" office:value="704" calcext:value-type="float">
            <text:p>704</text:p>
          </table:table-cell>
          <table:table-cell table:formula="of:=AVERAGE([.M246:.M253])" office:value-type="float" office:value="725.625" calcext:value-type="float">
            <text:p>725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48" calcext:value-type="float">
            <text:p>248</text:p>
          </table:table-cell>
          <table:table-cell office:value-type="float" office:value="653" calcext:value-type="float">
            <text:p>653</text:p>
          </table:table-cell>
          <table:table-cell table:formula="of:=AVERAGE([.M247:.M254])" office:value-type="float" office:value="682.5" calcext:value-type="float">
            <text:p>68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49" calcext:value-type="float">
            <text:p>249</text:p>
          </table:table-cell>
          <table:table-cell office:value-type="float" office:value="683" calcext:value-type="float">
            <text:p>683</text:p>
          </table:table-cell>
          <table:table-cell table:formula="of:=AVERAGE([.M248:.M255])" office:value-type="float" office:value="641.5" calcext:value-type="float">
            <text:p>641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50" calcext:value-type="float">
            <text:p>250</text:p>
          </table:table-cell>
          <table:table-cell office:value-type="float" office:value="639" calcext:value-type="float">
            <text:p>639</text:p>
          </table:table-cell>
          <table:table-cell table:formula="of:=AVERAGE([.M249:.M256])" office:value-type="float" office:value="603" calcext:value-type="float">
            <text:p>60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51" calcext:value-type="float">
            <text:p>251</text:p>
          </table:table-cell>
          <table:table-cell office:value-type="float" office:value="591" calcext:value-type="float">
            <text:p>591</text:p>
          </table:table-cell>
          <table:table-cell table:formula="of:=AVERAGE([.M250:.M257])" office:value-type="float" office:value="572.75" calcext:value-type="float">
            <text:p>57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52" calcext:value-type="float">
            <text:p>252</text:p>
          </table:table-cell>
          <table:table-cell office:value-type="float" office:value="546" calcext:value-type="float">
            <text:p>546</text:p>
          </table:table-cell>
          <table:table-cell table:formula="of:=AVERAGE([.M251:.M258])" office:value-type="float" office:value="543.25" calcext:value-type="float">
            <text:p>54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53" calcext:value-type="float">
            <text:p>253</text:p>
          </table:table-cell>
          <table:table-cell office:value-type="float" office:value="527" calcext:value-type="float">
            <text:p>527</text:p>
          </table:table-cell>
          <table:table-cell table:formula="of:=AVERAGE([.M252:.M259])" office:value-type="float" office:value="502.25" calcext:value-type="float">
            <text:p>502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54" calcext:value-type="float">
            <text:p>254</text:p>
          </table:table-cell>
          <table:table-cell office:value-type="float" office:value="481" calcext:value-type="float">
            <text:p>481</text:p>
          </table:table-cell>
          <table:table-cell table:formula="of:=AVERAGE([.M253:.M260])" office:value-type="float" office:value="468.25" calcext:value-type="float">
            <text:p>468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55" calcext:value-type="float">
            <text:p>255</text:p>
          </table:table-cell>
          <table:table-cell office:value-type="float" office:value="462" calcext:value-type="float">
            <text:p>462</text:p>
          </table:table-cell>
          <table:table-cell table:formula="of:=AVERAGE([.M254:.M261])" office:value-type="float" office:value="438" calcext:value-type="float">
            <text:p>438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56" calcext:value-type="float">
            <text:p>256</text:p>
          </table:table-cell>
          <table:table-cell office:value-type="float" office:value="417" calcext:value-type="float">
            <text:p>417</text:p>
          </table:table-cell>
          <table:table-cell table:formula="of:=AVERAGE([.M255:.M262])" office:value-type="float" office:value="410" calcext:value-type="float">
            <text:p>410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57" calcext:value-type="float">
            <text:p>257</text:p>
          </table:table-cell>
          <table:table-cell office:value-type="float" office:value="355" calcext:value-type="float">
            <text:p>355</text:p>
          </table:table-cell>
          <table:table-cell table:formula="of:=AVERAGE([.M256:.M263])" office:value-type="float" office:value="381.375" calcext:value-type="float">
            <text:p>381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58" calcext:value-type="float">
            <text:p>258</text:p>
          </table:table-cell>
          <table:table-cell office:value-type="float" office:value="367" calcext:value-type="float">
            <text:p>367</text:p>
          </table:table-cell>
          <table:table-cell table:formula="of:=AVERAGE([.M257:.M264])" office:value-type="float" office:value="355.75" calcext:value-type="float">
            <text:p>35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59" calcext:value-type="float">
            <text:p>259</text:p>
          </table:table-cell>
          <table:table-cell office:value-type="float" office:value="349" calcext:value-type="float">
            <text:p>349</text:p>
          </table:table-cell>
          <table:table-cell table:formula="of:=AVERAGE([.M258:.M265])" office:value-type="float" office:value="327.5" calcext:value-type="float">
            <text:p>327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60" calcext:value-type="float">
            <text:p>260</text:p>
          </table:table-cell>
          <table:table-cell office:value-type="float" office:value="322" calcext:value-type="float">
            <text:p>322</text:p>
          </table:table-cell>
          <table:table-cell table:formula="of:=AVERAGE([.M259:.M266])" office:value-type="float" office:value="302.75" calcext:value-type="float">
            <text:p>30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61" calcext:value-type="float">
            <text:p>261</text:p>
          </table:table-cell>
          <table:table-cell office:value-type="float" office:value="298" calcext:value-type="float">
            <text:p>298</text:p>
          </table:table-cell>
          <table:table-cell table:formula="of:=AVERAGE([.M260:.M267])" office:value-type="float" office:value="284" calcext:value-type="float">
            <text:p>284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62" calcext:value-type="float">
            <text:p>262</text:p>
          </table:table-cell>
          <table:table-cell office:value-type="float" office:value="276" calcext:value-type="float">
            <text:p>276</text:p>
          </table:table-cell>
          <table:table-cell table:formula="of:=AVERAGE([.M261:.M268])" office:value-type="float" office:value="259.5" calcext:value-type="float">
            <text:p>259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63" calcext:value-type="float">
            <text:p>263</text:p>
          </table:table-cell>
          <table:table-cell office:value-type="float" office:value="236" calcext:value-type="float">
            <text:p>236</text:p>
          </table:table-cell>
          <table:table-cell table:formula="of:=AVERAGE([.M262:.M269])" office:value-type="float" office:value="238.125" calcext:value-type="float">
            <text:p>238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64" calcext:value-type="float">
            <text:p>264</text:p>
          </table:table-cell>
          <table:table-cell office:value-type="float" office:value="219" calcext:value-type="float">
            <text:p>219</text:p>
          </table:table-cell>
          <table:table-cell table:formula="of:=AVERAGE([.M263:.M270])" office:value-type="float" office:value="219.125" calcext:value-type="float">
            <text:p>219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65" calcext:value-type="float">
            <text:p>265</text:p>
          </table:table-cell>
          <table:table-cell office:value-type="float" office:value="205" calcext:value-type="float">
            <text:p>205</text:p>
          </table:table-cell>
          <table:table-cell table:formula="of:=AVERAGE([.M264:.M271])" office:value-type="float" office:value="195.875" calcext:value-type="float">
            <text:p>195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66" calcext:value-type="float">
            <text:p>266</text:p>
          </table:table-cell>
          <table:table-cell office:value-type="float" office:value="171" calcext:value-type="float">
            <text:p>171</text:p>
          </table:table-cell>
          <table:table-cell table:formula="of:=AVERAGE([.M265:.M272])" office:value-type="float" office:value="178.75" calcext:value-type="float">
            <text:p>178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67" calcext:value-type="float">
            <text:p>267</text:p>
          </table:table-cell>
          <table:table-cell office:value-type="float" office:value="178" calcext:value-type="float">
            <text:p>178</text:p>
          </table:table-cell>
          <table:table-cell table:formula="of:=AVERAGE([.M266:.M273])" office:value-type="float" office:value="166.875" calcext:value-type="float">
            <text:p>166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68" calcext:value-type="float">
            <text:p>268</text:p>
          </table:table-cell>
          <table:table-cell office:value-type="float" office:value="170" calcext:value-type="float">
            <text:p>170</text:p>
          </table:table-cell>
          <table:table-cell table:formula="of:=AVERAGE([.M267:.M274])" office:value-type="float" office:value="153" calcext:value-type="float">
            <text:p>15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69" calcext:value-type="float">
            <text:p>269</text:p>
          </table:table-cell>
          <table:table-cell office:value-type="float" office:value="112" calcext:value-type="float">
            <text:p>112</text:p>
          </table:table-cell>
          <table:table-cell table:formula="of:=AVERAGE([.M268:.M275])" office:value-type="float" office:value="141.625" calcext:value-type="float">
            <text:p>141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70" calcext:value-type="float">
            <text:p>270</text:p>
          </table:table-cell>
          <table:table-cell office:value-type="float" office:value="139" calcext:value-type="float">
            <text:p>139</text:p>
          </table:table-cell>
          <table:table-cell table:formula="of:=AVERAGE([.M269:.M276])" office:value-type="float" office:value="133.25" calcext:value-type="float">
            <text:p>13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71" calcext:value-type="float">
            <text:p>271</text:p>
          </table:table-cell>
          <table:table-cell office:value-type="float" office:value="141" calcext:value-type="float">
            <text:p>141</text:p>
          </table:table-cell>
          <table:table-cell table:formula="of:=AVERAGE([.M270:.M277])" office:value-type="float" office:value="125.375" calcext:value-type="float">
            <text:p>125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72" calcext:value-type="float">
            <text:p>272</text:p>
          </table:table-cell>
          <table:table-cell office:value-type="float" office:value="108" calcext:value-type="float">
            <text:p>108</text:p>
          </table:table-cell>
          <table:table-cell table:formula="of:=AVERAGE([.M271:.M278])" office:value-type="float" office:value="113.125" calcext:value-type="float">
            <text:p>11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73" calcext:value-type="float">
            <text:p>273</text:p>
          </table:table-cell>
          <table:table-cell office:value-type="float" office:value="114" calcext:value-type="float">
            <text:p>114</text:p>
          </table:table-cell>
          <table:table-cell table:formula="of:=AVERAGE([.M272:.M279])" office:value-type="float" office:value="106.5" calcext:value-type="float">
            <text:p>106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74" calcext:value-type="float">
            <text:p>274</text:p>
          </table:table-cell>
          <table:table-cell office:value-type="float" office:value="104" calcext:value-type="float">
            <text:p>104</text:p>
          </table:table-cell>
          <table:table-cell table:formula="of:=AVERAGE([.M273:.M280])" office:value-type="float" office:value="98.5" calcext:value-type="float">
            <text:p>98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75" calcext:value-type="float">
            <text:p>275</text:p>
          </table:table-cell>
          <table:table-cell office:value-type="float" office:value="115" calcext:value-type="float">
            <text:p>115</text:p>
          </table:table-cell>
          <table:table-cell table:formula="of:=AVERAGE([.M274:.M281])" office:value-type="float" office:value="91.625" calcext:value-type="float">
            <text:p>91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76" calcext:value-type="float">
            <text:p>276</text:p>
          </table:table-cell>
          <table:table-cell office:value-type="float" office:value="72" calcext:value-type="float">
            <text:p>72</text:p>
          </table:table-cell>
          <table:table-cell table:formula="of:=AVERAGE([.M275:.M282])" office:value-type="float" office:value="86.625" calcext:value-type="float">
            <text:p>86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77" calcext:value-type="float">
            <text:p>277</text:p>
          </table:table-cell>
          <table:table-cell office:value-type="float" office:value="59" calcext:value-type="float">
            <text:p>59</text:p>
          </table:table-cell>
          <table:table-cell table:formula="of:=AVERAGE([.M276:.M283])" office:value-type="float" office:value="79.75" calcext:value-type="float">
            <text:p>79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78" calcext:value-type="float">
            <text:p>278</text:p>
          </table:table-cell>
          <table:table-cell office:value-type="float" office:value="75" calcext:value-type="float">
            <text:p>75</text:p>
          </table:table-cell>
          <table:table-cell table:formula="of:=AVERAGE([.M277:.M284])" office:value-type="float" office:value="72.875" calcext:value-type="float">
            <text:p>7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79" calcext:value-type="float">
            <text:p>279</text:p>
          </table:table-cell>
          <table:table-cell office:value-type="float" office:value="86" calcext:value-type="float">
            <text:p>86</text:p>
          </table:table-cell>
          <table:table-cell table:formula="of:=AVERAGE([.M278:.M285])" office:value-type="float" office:value="65.375" calcext:value-type="float">
            <text:p>65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80" calcext:value-type="float">
            <text:p>280</text:p>
          </table:table-cell>
          <table:table-cell office:value-type="float" office:value="68" calcext:value-type="float">
            <text:p>68</text:p>
          </table:table-cell>
          <table:table-cell table:formula="of:=AVERAGE([.M279:.M286])" office:value-type="float" office:value="62.25" calcext:value-type="float">
            <text:p>62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81" calcext:value-type="float">
            <text:p>281</text:p>
          </table:table-cell>
          <table:table-cell office:value-type="float" office:value="59" calcext:value-type="float">
            <text:p>59</text:p>
          </table:table-cell>
          <table:table-cell table:formula="of:=AVERAGE([.M280:.M287])" office:value-type="float" office:value="60.5" calcext:value-type="float">
            <text:p>60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82" calcext:value-type="float">
            <text:p>282</text:p>
          </table:table-cell>
          <table:table-cell office:value-type="float" office:value="49" calcext:value-type="float">
            <text:p>49</text:p>
          </table:table-cell>
          <table:table-cell table:formula="of:=AVERAGE([.M281:.M288])" office:value-type="float" office:value="56.375" calcext:value-type="float">
            <text:p>56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83" calcext:value-type="float">
            <text:p>283</text:p>
          </table:table-cell>
          <table:table-cell office:value-type="float" office:value="55" calcext:value-type="float">
            <text:p>55</text:p>
          </table:table-cell>
          <table:table-cell table:formula="of:=AVERAGE([.M282:.M289])" office:value-type="float" office:value="50.625" calcext:value-type="float">
            <text:p>50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84" calcext:value-type="float">
            <text:p>284</text:p>
          </table:table-cell>
          <table:table-cell office:value-type="float" office:value="47" calcext:value-type="float">
            <text:p>47</text:p>
          </table:table-cell>
          <table:table-cell table:formula="of:=AVERAGE([.M283:.M290])" office:value-type="float" office:value="48.875" calcext:value-type="float">
            <text:p>48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85" calcext:value-type="float">
            <text:p>285</text:p>
          </table:table-cell>
          <table:table-cell office:value-type="float" office:value="45" calcext:value-type="float">
            <text:p>45</text:p>
          </table:table-cell>
          <table:table-cell table:formula="of:=AVERAGE([.M284:.M291])" office:value-type="float" office:value="47" calcext:value-type="float">
            <text:p>47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86" calcext:value-type="float">
            <text:p>286</text:p>
          </table:table-cell>
          <table:table-cell office:value-type="float" office:value="42" calcext:value-type="float">
            <text:p>42</text:p>
          </table:table-cell>
          <table:table-cell table:formula="of:=AVERAGE([.M285:.M292])" office:value-type="float" office:value="45" calcext:value-type="float">
            <text:p>4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87" calcext:value-type="float">
            <text:p>287</text:p>
          </table:table-cell>
          <table:table-cell office:value-type="float" office:value="40" calcext:value-type="float">
            <text:p>40</text:p>
          </table:table-cell>
          <table:table-cell table:formula="of:=AVERAGE([.M286:.M293])" office:value-type="float" office:value="43" calcext:value-type="float">
            <text:p>4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88" calcext:value-type="float">
            <text:p>288</text:p>
          </table:table-cell>
          <table:table-cell office:value-type="float" office:value="54" calcext:value-type="float">
            <text:p>54</text:p>
          </table:table-cell>
          <table:table-cell table:formula="of:=AVERAGE([.M287:.M294])" office:value-type="float" office:value="41.375" calcext:value-type="float">
            <text:p>41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89" calcext:value-type="float">
            <text:p>289</text:p>
          </table:table-cell>
          <table:table-cell office:value-type="float" office:value="44" calcext:value-type="float">
            <text:p>44</text:p>
          </table:table-cell>
          <table:table-cell table:formula="of:=AVERAGE([.M288:.M295])" office:value-type="float" office:value="39.375" calcext:value-type="float">
            <text:p>39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90" calcext:value-type="float">
            <text:p>290</text:p>
          </table:table-cell>
          <table:table-cell office:value-type="float" office:value="33" calcext:value-type="float">
            <text:p>33</text:p>
          </table:table-cell>
          <table:table-cell table:formula="of:=AVERAGE([.M289:.M296])" office:value-type="float" office:value="38.625" calcext:value-type="float">
            <text:p>38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91" calcext:value-type="float">
            <text:p>291</text:p>
          </table:table-cell>
          <table:table-cell office:value-type="float" office:value="39" calcext:value-type="float">
            <text:p>39</text:p>
          </table:table-cell>
          <table:table-cell table:formula="of:=AVERAGE([.M290:.M297])" office:value-type="float" office:value="38.75" calcext:value-type="float">
            <text:p>38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92" calcext:value-type="float">
            <text:p>292</text:p>
          </table:table-cell>
          <table:table-cell office:value-type="float" office:value="34" calcext:value-type="float">
            <text:p>34</text:p>
          </table:table-cell>
          <table:table-cell table:formula="of:=AVERAGE([.M291:.M298])" office:value-type="float" office:value="35.875" calcext:value-type="float">
            <text:p>35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93" calcext:value-type="float">
            <text:p>293</text:p>
          </table:table-cell>
          <table:table-cell office:value-type="float" office:value="29" calcext:value-type="float">
            <text:p>29</text:p>
          </table:table-cell>
          <table:table-cell table:formula="of:=AVERAGE([.M292:.M299])" office:value-type="float" office:value="33.125" calcext:value-type="float">
            <text:p>3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94" calcext:value-type="float">
            <text:p>294</text:p>
          </table:table-cell>
          <table:table-cell office:value-type="float" office:value="36" calcext:value-type="float">
            <text:p>36</text:p>
          </table:table-cell>
          <table:table-cell table:formula="of:=AVERAGE([.M293:.M300])" office:value-type="float" office:value="32.125" calcext:value-type="float">
            <text:p>32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95" calcext:value-type="float">
            <text:p>295</text:p>
          </table:table-cell>
          <table:table-cell office:value-type="float" office:value="41" calcext:value-type="float">
            <text:p>41</text:p>
          </table:table-cell>
          <table:table-cell table:formula="of:=AVERAGE([.M294:.M301])" office:value-type="float" office:value="31.125" calcext:value-type="float">
            <text:p>31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96" calcext:value-type="float">
            <text:p>296</text:p>
          </table:table-cell>
          <table:table-cell office:value-type="float" office:value="31" calcext:value-type="float">
            <text:p>31</text:p>
          </table:table-cell>
          <table:table-cell table:formula="of:=AVERAGE([.M295:.M302])" office:value-type="float" office:value="30.625" calcext:value-type="float">
            <text:p>30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97" calcext:value-type="float">
            <text:p>297</text:p>
          </table:table-cell>
          <table:table-cell office:value-type="float" office:value="22" calcext:value-type="float">
            <text:p>22</text:p>
          </table:table-cell>
          <table:table-cell table:formula="of:=AVERAGE([.M296:.M303])" office:value-type="float" office:value="29.25" calcext:value-type="float">
            <text:p>29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98" calcext:value-type="float">
            <text:p>298</text:p>
          </table:table-cell>
          <table:table-cell office:value-type="float" office:value="25" calcext:value-type="float">
            <text:p>25</text:p>
          </table:table-cell>
          <table:table-cell table:formula="of:=AVERAGE([.M297:.M304])" office:value-type="float" office:value="27.75" calcext:value-type="float">
            <text:p>27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299" calcext:value-type="float">
            <text:p>299</text:p>
          </table:table-cell>
          <table:table-cell office:value-type="float" office:value="31" calcext:value-type="float">
            <text:p>31</text:p>
          </table:table-cell>
          <table:table-cell table:formula="of:=AVERAGE([.M298:.M305])" office:value-type="float" office:value="27.125" calcext:value-type="float">
            <text:p>27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table:formula="of:=AVERAGE([.M299:.M306])" office:value-type="float" office:value="26.875" calcext:value-type="float">
            <text:p>26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01" calcext:value-type="float">
            <text:p>301</text:p>
          </table:table-cell>
          <table:table-cell office:value-type="float" office:value="18" calcext:value-type="float">
            <text:p>18</text:p>
          </table:table-cell>
          <table:table-cell table:formula="of:=AVERAGE([.M300:.M307])" office:value-type="float" office:value="29.375" calcext:value-type="float">
            <text:p>29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02" calcext:value-type="float">
            <text:p>302</text:p>
          </table:table-cell>
          <table:table-cell office:value-type="float" office:value="24" calcext:value-type="float">
            <text:p>24</text:p>
          </table:table-cell>
          <table:table-cell table:formula="of:=AVERAGE([.M301:.M308])" office:value-type="float" office:value="29.75" calcext:value-type="float">
            <text:p>29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03" calcext:value-type="float">
            <text:p>303</text:p>
          </table:table-cell>
          <table:table-cell office:value-type="float" office:value="36" calcext:value-type="float">
            <text:p>36</text:p>
          </table:table-cell>
          <table:table-cell table:formula="of:=AVERAGE([.M302:.M309])" office:value-type="float" office:value="29.875" calcext:value-type="float">
            <text:p>29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04" calcext:value-type="float">
            <text:p>304</text:p>
          </table:table-cell>
          <table:table-cell office:value-type="float" office:value="29" calcext:value-type="float">
            <text:p>29</text:p>
          </table:table-cell>
          <table:table-cell table:formula="of:=AVERAGE([.M303:.M310])" office:value-type="float" office:value="28.875" calcext:value-type="float">
            <text:p>28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05" calcext:value-type="float">
            <text:p>305</text:p>
          </table:table-cell>
          <table:table-cell office:value-type="float" office:value="42" calcext:value-type="float">
            <text:p>42</text:p>
          </table:table-cell>
          <table:table-cell table:formula="of:=AVERAGE([.M304:.M311])" office:value-type="float" office:value="28.875" calcext:value-type="float">
            <text:p>28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06" calcext:value-type="float">
            <text:p>306</text:p>
          </table:table-cell>
          <table:table-cell office:value-type="float" office:value="28" calcext:value-type="float">
            <text:p>28</text:p>
          </table:table-cell>
          <table:table-cell table:formula="of:=AVERAGE([.M305:.M312])" office:value-type="float" office:value="28.5" calcext:value-type="float">
            <text:p>28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07" calcext:value-type="float">
            <text:p>307</text:p>
          </table:table-cell>
          <table:table-cell office:value-type="float" office:value="32" calcext:value-type="float">
            <text:p>32</text:p>
          </table:table-cell>
          <table:table-cell table:formula="of:=AVERAGE([.M306:.M313])" office:value-type="float" office:value="27.75" calcext:value-type="float">
            <text:p>27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08" calcext:value-type="float">
            <text:p>308</text:p>
          </table:table-cell>
          <table:table-cell office:value-type="float" office:value="22" calcext:value-type="float">
            <text:p>22</text:p>
          </table:table-cell>
          <table:table-cell table:formula="of:=AVERAGE([.M307:.M314])" office:value-type="float" office:value="27" calcext:value-type="float">
            <text:p>27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09" calcext:value-type="float">
            <text:p>309</text:p>
          </table:table-cell>
          <table:table-cell office:value-type="float" office:value="18" calcext:value-type="float">
            <text:p>18</text:p>
          </table:table-cell>
          <table:table-cell table:formula="of:=AVERAGE([.M308:.M315])" office:value-type="float" office:value="24.75" calcext:value-type="float">
            <text:p>2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10" calcext:value-type="float">
            <text:p>310</text:p>
          </table:table-cell>
          <table:table-cell office:value-type="float" office:value="21" calcext:value-type="float">
            <text:p>21</text:p>
          </table:table-cell>
          <table:table-cell table:formula="of:=AVERAGE([.M309:.M316])" office:value-type="float" office:value="23.875" calcext:value-type="float">
            <text:p>2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11" calcext:value-type="float">
            <text:p>311</text:p>
          </table:table-cell>
          <table:table-cell office:value-type="float" office:value="30" calcext:value-type="float">
            <text:p>30</text:p>
          </table:table-cell>
          <table:table-cell table:formula="of:=AVERAGE([.M310:.M317])" office:value-type="float" office:value="24.5" calcext:value-type="float">
            <text:p>2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12" calcext:value-type="float">
            <text:p>312</text:p>
          </table:table-cell>
          <table:table-cell office:value-type="float" office:value="23" calcext:value-type="float">
            <text:p>23</text:p>
          </table:table-cell>
          <table:table-cell table:formula="of:=AVERAGE([.M311:.M318])" office:value-type="float" office:value="24.75" calcext:value-type="float">
            <text:p>2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13" calcext:value-type="float">
            <text:p>313</text:p>
          </table:table-cell>
          <table:table-cell office:value-type="float" office:value="24" calcext:value-type="float">
            <text:p>24</text:p>
          </table:table-cell>
          <table:table-cell table:formula="of:=AVERAGE([.M312:.M319])" office:value-type="float" office:value="25" calcext:value-type="float">
            <text:p>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14" calcext:value-type="float">
            <text:p>314</text:p>
          </table:table-cell>
          <table:table-cell office:value-type="float" office:value="21" calcext:value-type="float">
            <text:p>21</text:p>
          </table:table-cell>
          <table:table-cell table:formula="of:=AVERAGE([.M313:.M320])" office:value-type="float" office:value="25.625" calcext:value-type="float">
            <text:p>25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15" calcext:value-type="float">
            <text:p>315</text:p>
          </table:table-cell>
          <table:table-cell office:value-type="float" office:value="37" calcext:value-type="float">
            <text:p>37</text:p>
          </table:table-cell>
          <table:table-cell table:formula="of:=AVERAGE([.M314:.M321])" office:value-type="float" office:value="24.5" calcext:value-type="float">
            <text:p>2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16" calcext:value-type="float">
            <text:p>316</text:p>
          </table:table-cell>
          <table:table-cell office:value-type="float" office:value="24" calcext:value-type="float">
            <text:p>24</text:p>
          </table:table-cell>
          <table:table-cell table:formula="of:=AVERAGE([.M315:.M322])" office:value-type="float" office:value="24.875" calcext:value-type="float">
            <text:p>2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17" calcext:value-type="float">
            <text:p>317</text:p>
          </table:table-cell>
          <table:table-cell office:value-type="float" office:value="20" calcext:value-type="float">
            <text:p>20</text:p>
          </table:table-cell>
          <table:table-cell table:formula="of:=AVERAGE([.M316:.M323])" office:value-type="float" office:value="26.125" calcext:value-type="float">
            <text:p>26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18" calcext:value-type="float">
            <text:p>318</text:p>
          </table:table-cell>
          <table:table-cell office:value-type="float" office:value="26" calcext:value-type="float">
            <text:p>26</text:p>
          </table:table-cell>
          <table:table-cell table:formula="of:=AVERAGE([.M317:.M324])" office:value-type="float" office:value="25.875" calcext:value-type="float">
            <text:p>25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19" calcext:value-type="float">
            <text:p>319</text:p>
          </table:table-cell>
          <table:table-cell office:value-type="float" office:value="21" calcext:value-type="float">
            <text:p>21</text:p>
          </table:table-cell>
          <table:table-cell table:formula="of:=AVERAGE([.M318:.M325])" office:value-type="float" office:value="23.5" calcext:value-type="float">
            <text:p>2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20" calcext:value-type="float">
            <text:p>320</text:p>
          </table:table-cell>
          <table:table-cell office:value-type="float" office:value="26" calcext:value-type="float">
            <text:p>26</text:p>
          </table:table-cell>
          <table:table-cell table:formula="of:=AVERAGE([.M319:.M326])" office:value-type="float" office:value="24" calcext:value-type="float">
            <text:p>24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21" calcext:value-type="float">
            <text:p>321</text:p>
          </table:table-cell>
          <table:table-cell office:value-type="float" office:value="34" calcext:value-type="float">
            <text:p>34</text:p>
          </table:table-cell>
          <table:table-cell table:formula="of:=AVERAGE([.M320:.M327])" office:value-type="float" office:value="24.875" calcext:value-type="float">
            <text:p>2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22" calcext:value-type="float">
            <text:p>322</text:p>
          </table:table-cell>
          <table:table-cell office:value-type="float" office:value="19" calcext:value-type="float">
            <text:p>19</text:p>
          </table:table-cell>
          <table:table-cell table:formula="of:=AVERAGE([.M321:.M328])" office:value-type="float" office:value="25.625" calcext:value-type="float">
            <text:p>25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23" calcext:value-type="float">
            <text:p>323</text:p>
          </table:table-cell>
          <table:table-cell office:value-type="float" office:value="18" calcext:value-type="float">
            <text:p>18</text:p>
          </table:table-cell>
          <table:table-cell table:formula="of:=AVERAGE([.M322:.M329])" office:value-type="float" office:value="25.625" calcext:value-type="float">
            <text:p>25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24" calcext:value-type="float">
            <text:p>324</text:p>
          </table:table-cell>
          <table:table-cell office:value-type="float" office:value="28" calcext:value-type="float">
            <text:p>28</text:p>
          </table:table-cell>
          <table:table-cell table:formula="of:=AVERAGE([.M323:.M330])" office:value-type="float" office:value="26.125" calcext:value-type="float">
            <text:p>26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25" calcext:value-type="float">
            <text:p>325</text:p>
          </table:table-cell>
          <table:table-cell office:value-type="float" office:value="27" calcext:value-type="float">
            <text:p>27</text:p>
          </table:table-cell>
          <table:table-cell table:formula="of:=AVERAGE([.M324:.M331])" office:value-type="float" office:value="24.625" calcext:value-type="float">
            <text:p>24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26" calcext:value-type="float">
            <text:p>326</text:p>
          </table:table-cell>
          <table:table-cell office:value-type="float" office:value="32" calcext:value-type="float">
            <text:p>32</text:p>
          </table:table-cell>
          <table:table-cell table:formula="of:=AVERAGE([.M325:.M332])" office:value-type="float" office:value="24.875" calcext:value-type="float">
            <text:p>2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27" calcext:value-type="float">
            <text:p>327</text:p>
          </table:table-cell>
          <table:table-cell office:value-type="float" office:value="21" calcext:value-type="float">
            <text:p>21</text:p>
          </table:table-cell>
          <table:table-cell table:formula="of:=AVERAGE([.M326:.M333])" office:value-type="float" office:value="25" calcext:value-type="float">
            <text:p>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28" calcext:value-type="float">
            <text:p>328</text:p>
          </table:table-cell>
          <table:table-cell office:value-type="float" office:value="30" calcext:value-type="float">
            <text:p>30</text:p>
          </table:table-cell>
          <table:table-cell table:formula="of:=AVERAGE([.M327:.M334])" office:value-type="float" office:value="24.375" calcext:value-type="float">
            <text:p>2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29" calcext:value-type="float">
            <text:p>329</text:p>
          </table:table-cell>
          <table:table-cell office:value-type="float" office:value="22" calcext:value-type="float">
            <text:p>22</text:p>
          </table:table-cell>
          <table:table-cell table:formula="of:=AVERAGE([.M328:.M335])" office:value-type="float" office:value="25.75" calcext:value-type="float">
            <text:p>2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30" calcext:value-type="float">
            <text:p>330</text:p>
          </table:table-cell>
          <table:table-cell office:value-type="float" office:value="21" calcext:value-type="float">
            <text:p>21</text:p>
          </table:table-cell>
          <table:table-cell table:formula="of:=AVERAGE([.M329:.M336])" office:value-type="float" office:value="25.75" calcext:value-type="float">
            <text:p>2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table:formula="of:=AVERAGE([.M330:.M337])" office:value-type="float" office:value="25.625" calcext:value-type="float">
            <text:p>25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32" calcext:value-type="float">
            <text:p>332</text:p>
          </table:table-cell>
          <table:table-cell office:value-type="float" office:value="23" calcext:value-type="float">
            <text:p>23</text:p>
          </table:table-cell>
          <table:table-cell table:formula="of:=AVERAGE([.M331:.M338])" office:value-type="float" office:value="25.25" calcext:value-type="float">
            <text:p>25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33" calcext:value-type="float">
            <text:p>333</text:p>
          </table:table-cell>
          <table:table-cell office:value-type="float" office:value="38" calcext:value-type="float">
            <text:p>38</text:p>
          </table:table-cell>
          <table:table-cell table:formula="of:=AVERAGE([.M332:.M339])" office:value-type="float" office:value="25.75" calcext:value-type="float">
            <text:p>2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34" calcext:value-type="float">
            <text:p>334</text:p>
          </table:table-cell>
          <table:table-cell office:value-type="float" office:value="32" calcext:value-type="float">
            <text:p>32</text:p>
          </table:table-cell>
          <table:table-cell table:formula="of:=AVERAGE([.M333:.M340])" office:value-type="float" office:value="26" calcext:value-type="float">
            <text:p>26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35" calcext:value-type="float">
            <text:p>335</text:p>
          </table:table-cell>
          <table:table-cell office:value-type="float" office:value="20" calcext:value-type="float">
            <text:p>20</text:p>
          </table:table-cell>
          <table:table-cell table:formula="of:=AVERAGE([.M334:.M341])" office:value-type="float" office:value="27.625" calcext:value-type="float">
            <text:p>27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36" calcext:value-type="float">
            <text:p>336</text:p>
          </table:table-cell>
          <table:table-cell office:value-type="float" office:value="27" calcext:value-type="float">
            <text:p>27</text:p>
          </table:table-cell>
          <table:table-cell table:formula="of:=AVERAGE([.M335:.M342])" office:value-type="float" office:value="27.375" calcext:value-type="float">
            <text:p>27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37" calcext:value-type="float">
            <text:p>337</text:p>
          </table:table-cell>
          <table:table-cell office:value-type="float" office:value="26" calcext:value-type="float">
            <text:p>26</text:p>
          </table:table-cell>
          <table:table-cell table:formula="of:=AVERAGE([.M336:.M343])" office:value-type="float" office:value="28.125" calcext:value-type="float">
            <text:p>28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38" calcext:value-type="float">
            <text:p>338</text:p>
          </table:table-cell>
          <table:table-cell office:value-type="float" office:value="23" calcext:value-type="float">
            <text:p>23</text:p>
          </table:table-cell>
          <table:table-cell table:formula="of:=AVERAGE([.M337:.M344])" office:value-type="float" office:value="26.875" calcext:value-type="float">
            <text:p>26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39" calcext:value-type="float">
            <text:p>339</text:p>
          </table:table-cell>
          <table:table-cell office:value-type="float" office:value="32" calcext:value-type="float">
            <text:p>32</text:p>
          </table:table-cell>
          <table:table-cell table:formula="of:=AVERAGE([.M338:.M345])" office:value-type="float" office:value="29" calcext:value-type="float">
            <text:p>29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40" calcext:value-type="float">
            <text:p>340</text:p>
          </table:table-cell>
          <table:table-cell office:value-type="float" office:value="21" calcext:value-type="float">
            <text:p>21</text:p>
          </table:table-cell>
          <table:table-cell table:formula="of:=AVERAGE([.M339:.M346])" office:value-type="float" office:value="29.625" calcext:value-type="float">
            <text:p>29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41" calcext:value-type="float">
            <text:p>341</text:p>
          </table:table-cell>
          <table:table-cell office:value-type="float" office:value="44" calcext:value-type="float">
            <text:p>44</text:p>
          </table:table-cell>
          <table:table-cell table:formula="of:=AVERAGE([.M340:.M347])" office:value-type="float" office:value="30.375" calcext:value-type="float">
            <text:p>30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42" calcext:value-type="float">
            <text:p>342</text:p>
          </table:table-cell>
          <table:table-cell office:value-type="float" office:value="22" calcext:value-type="float">
            <text:p>22</text:p>
          </table:table-cell>
          <table:table-cell table:formula="of:=AVERAGE([.M341:.M348])" office:value-type="float" office:value="32" calcext:value-type="float">
            <text:p>32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43" calcext:value-type="float">
            <text:p>343</text:p>
          </table:table-cell>
          <table:table-cell office:value-type="float" office:value="37" calcext:value-type="float">
            <text:p>37</text:p>
          </table:table-cell>
          <table:table-cell table:formula="of:=AVERAGE([.M342:.M349])" office:value-type="float" office:value="32.5" calcext:value-type="float">
            <text:p>3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44" calcext:value-type="float">
            <text:p>344</text:p>
          </table:table-cell>
          <table:table-cell office:value-type="float" office:value="32" calcext:value-type="float">
            <text:p>32</text:p>
          </table:table-cell>
          <table:table-cell table:formula="of:=AVERAGE([.M343:.M350])" office:value-type="float" office:value="33" calcext:value-type="float">
            <text:p>3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45" calcext:value-type="float">
            <text:p>345</text:p>
          </table:table-cell>
          <table:table-cell office:value-type="float" office:value="32" calcext:value-type="float">
            <text:p>32</text:p>
          </table:table-cell>
          <table:table-cell table:formula="of:=AVERAGE([.M344:.M351])" office:value-type="float" office:value="33.625" calcext:value-type="float">
            <text:p>3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46" calcext:value-type="float">
            <text:p>346</text:p>
          </table:table-cell>
          <table:table-cell office:value-type="float" office:value="36" calcext:value-type="float">
            <text:p>36</text:p>
          </table:table-cell>
          <table:table-cell table:formula="of:=AVERAGE([.M345:.M352])" office:value-type="float" office:value="35.375" calcext:value-type="float">
            <text:p>35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table:formula="of:=AVERAGE([.M346:.M353])" office:value-type="float" office:value="35" calcext:value-type="float">
            <text:p>3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48" calcext:value-type="float">
            <text:p>348</text:p>
          </table:table-cell>
          <table:table-cell office:value-type="float" office:value="25" calcext:value-type="float">
            <text:p>25</text:p>
          </table:table-cell>
          <table:table-cell table:formula="of:=AVERAGE([.M347:.M354])" office:value-type="float" office:value="36.125" calcext:value-type="float">
            <text:p>36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49" calcext:value-type="float">
            <text:p>349</text:p>
          </table:table-cell>
          <table:table-cell office:value-type="float" office:value="49" calcext:value-type="float">
            <text:p>49</text:p>
          </table:table-cell>
          <table:table-cell table:formula="of:=AVERAGE([.M348:.M355])" office:value-type="float" office:value="37" calcext:value-type="float">
            <text:p>37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50" calcext:value-type="float">
            <text:p>350</text:p>
          </table:table-cell>
          <table:table-cell office:value-type="float" office:value="36" calcext:value-type="float">
            <text:p>36</text:p>
          </table:table-cell>
          <table:table-cell table:formula="of:=AVERAGE([.M349:.M356])" office:value-type="float" office:value="38.125" calcext:value-type="float">
            <text:p>38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51" calcext:value-type="float">
            <text:p>351</text:p>
          </table:table-cell>
          <table:table-cell office:value-type="float" office:value="34" calcext:value-type="float">
            <text:p>34</text:p>
          </table:table-cell>
          <table:table-cell table:formula="of:=AVERAGE([.M350:.M357])" office:value-type="float" office:value="38.375" calcext:value-type="float">
            <text:p>38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52" calcext:value-type="float">
            <text:p>352</text:p>
          </table:table-cell>
          <table:table-cell office:value-type="float" office:value="41" calcext:value-type="float">
            <text:p>41</text:p>
          </table:table-cell>
          <table:table-cell table:formula="of:=AVERAGE([.M351:.M358])" office:value-type="float" office:value="40.625" calcext:value-type="float">
            <text:p>40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53" calcext:value-type="float">
            <text:p>353</text:p>
          </table:table-cell>
          <table:table-cell office:value-type="float" office:value="39" calcext:value-type="float">
            <text:p>39</text:p>
          </table:table-cell>
          <table:table-cell table:formula="of:=AVERAGE([.M352:.M359])" office:value-type="float" office:value="39.875" calcext:value-type="float">
            <text:p>39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54" calcext:value-type="float">
            <text:p>354</text:p>
          </table:table-cell>
          <table:table-cell office:value-type="float" office:value="45" calcext:value-type="float">
            <text:p>45</text:p>
          </table:table-cell>
          <table:table-cell table:formula="of:=AVERAGE([.M353:.M360])" office:value-type="float" office:value="40.625" calcext:value-type="float">
            <text:p>40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55" calcext:value-type="float">
            <text:p>355</text:p>
          </table:table-cell>
          <table:table-cell office:value-type="float" office:value="38" calcext:value-type="float">
            <text:p>38</text:p>
          </table:table-cell>
          <table:table-cell table:formula="of:=AVERAGE([.M354:.M361])" office:value-type="float" office:value="42.125" calcext:value-type="float">
            <text:p>42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56" calcext:value-type="float">
            <text:p>356</text:p>
          </table:table-cell>
          <table:table-cell office:value-type="float" office:value="43" calcext:value-type="float">
            <text:p>43</text:p>
          </table:table-cell>
          <table:table-cell table:formula="of:=AVERAGE([.M355:.M362])" office:value-type="float" office:value="43.125" calcext:value-type="float">
            <text:p>4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57" calcext:value-type="float">
            <text:p>357</text:p>
          </table:table-cell>
          <table:table-cell office:value-type="float" office:value="43" calcext:value-type="float">
            <text:p>43</text:p>
          </table:table-cell>
          <table:table-cell table:formula="of:=AVERAGE([.M356:.M363])" office:value-type="float" office:value="44.125" calcext:value-type="float">
            <text:p>4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58" calcext:value-type="float">
            <text:p>358</text:p>
          </table:table-cell>
          <table:table-cell office:value-type="float" office:value="42" calcext:value-type="float">
            <text:p>42</text:p>
          </table:table-cell>
          <table:table-cell table:formula="of:=AVERAGE([.M357:.M364])" office:value-type="float" office:value="45.5" calcext:value-type="float">
            <text:p>45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59" calcext:value-type="float">
            <text:p>359</text:p>
          </table:table-cell>
          <table:table-cell office:value-type="float" office:value="46" calcext:value-type="float">
            <text:p>46</text:p>
          </table:table-cell>
          <table:table-cell table:formula="of:=AVERAGE([.M358:.M365])" office:value-type="float" office:value="46" calcext:value-type="float">
            <text:p>46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60" calcext:value-type="float">
            <text:p>360</text:p>
          </table:table-cell>
          <table:table-cell office:value-type="float" office:value="49" calcext:value-type="float">
            <text:p>49</text:p>
          </table:table-cell>
          <table:table-cell table:formula="of:=AVERAGE([.M359:.M366])" office:value-type="float" office:value="44.75" calcext:value-type="float">
            <text:p>4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61" calcext:value-type="float">
            <text:p>361</text:p>
          </table:table-cell>
          <table:table-cell office:value-type="float" office:value="47" calcext:value-type="float">
            <text:p>47</text:p>
          </table:table-cell>
          <table:table-cell table:formula="of:=AVERAGE([.M360:.M367])" office:value-type="float" office:value="44.625" calcext:value-type="float">
            <text:p>44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62" calcext:value-type="float">
            <text:p>362</text:p>
          </table:table-cell>
          <table:table-cell office:value-type="float" office:value="56" calcext:value-type="float">
            <text:p>56</text:p>
          </table:table-cell>
          <table:table-cell table:formula="of:=AVERAGE([.M361:.M368])" office:value-type="float" office:value="46.25" calcext:value-type="float">
            <text:p>46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63" calcext:value-type="float">
            <text:p>363</text:p>
          </table:table-cell>
          <table:table-cell office:value-type="float" office:value="42" calcext:value-type="float">
            <text:p>42</text:p>
          </table:table-cell>
          <table:table-cell table:formula="of:=AVERAGE([.M362:.M369])" office:value-type="float" office:value="47.375" calcext:value-type="float">
            <text:p>47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64" calcext:value-type="float">
            <text:p>364</text:p>
          </table:table-cell>
          <table:table-cell office:value-type="float" office:value="33" calcext:value-type="float">
            <text:p>33</text:p>
          </table:table-cell>
          <table:table-cell table:formula="of:=AVERAGE([.M363:.M370])" office:value-type="float" office:value="47.5" calcext:value-type="float">
            <text:p>47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65" calcext:value-type="float">
            <text:p>365</text:p>
          </table:table-cell>
          <table:table-cell office:value-type="float" office:value="42" calcext:value-type="float">
            <text:p>42</text:p>
          </table:table-cell>
          <table:table-cell table:formula="of:=AVERAGE([.M364:.M371])" office:value-type="float" office:value="48.75" calcext:value-type="float">
            <text:p>48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66" calcext:value-type="float">
            <text:p>366</text:p>
          </table:table-cell>
          <table:table-cell office:value-type="float" office:value="55" calcext:value-type="float">
            <text:p>55</text:p>
          </table:table-cell>
          <table:table-cell table:formula="of:=AVERAGE([.M365:.M372])" office:value-type="float" office:value="47.75" calcext:value-type="float">
            <text:p>47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67" calcext:value-type="float">
            <text:p>367</text:p>
          </table:table-cell>
          <table:table-cell office:value-type="float" office:value="55" calcext:value-type="float">
            <text:p>55</text:p>
          </table:table-cell>
          <table:table-cell table:formula="of:=AVERAGE([.M366:.M373])" office:value-type="float" office:value="48.875" calcext:value-type="float">
            <text:p>48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68" calcext:value-type="float">
            <text:p>368</text:p>
          </table:table-cell>
          <table:table-cell office:value-type="float" office:value="50" calcext:value-type="float">
            <text:p>50</text:p>
          </table:table-cell>
          <table:table-cell table:formula="of:=AVERAGE([.M367:.M374])" office:value-type="float" office:value="50.625" calcext:value-type="float">
            <text:p>50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69" calcext:value-type="float">
            <text:p>369</text:p>
          </table:table-cell>
          <table:table-cell office:value-type="float" office:value="57" calcext:value-type="float">
            <text:p>57</text:p>
          </table:table-cell>
          <table:table-cell table:formula="of:=AVERAGE([.M368:.M375])" office:value-type="float" office:value="52.875" calcext:value-type="float">
            <text:p>5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70" calcext:value-type="float">
            <text:p>370</text:p>
          </table:table-cell>
          <table:table-cell office:value-type="float" office:value="48" calcext:value-type="float">
            <text:p>48</text:p>
          </table:table-cell>
          <table:table-cell table:formula="of:=AVERAGE([.M369:.M376])" office:value-type="float" office:value="52.75" calcext:value-type="float">
            <text:p>5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71" calcext:value-type="float">
            <text:p>371</text:p>
          </table:table-cell>
          <table:table-cell office:value-type="float" office:value="51" calcext:value-type="float">
            <text:p>51</text:p>
          </table:table-cell>
          <table:table-cell table:formula="of:=AVERAGE([.M370:.M377])" office:value-type="float" office:value="51.25" calcext:value-type="float">
            <text:p>51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72" calcext:value-type="float">
            <text:p>372</text:p>
          </table:table-cell>
          <table:table-cell office:value-type="float" office:value="47" calcext:value-type="float">
            <text:p>47</text:p>
          </table:table-cell>
          <table:table-cell table:formula="of:=AVERAGE([.M371:.M378])" office:value-type="float" office:value="51.5" calcext:value-type="float">
            <text:p>51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73" calcext:value-type="float">
            <text:p>373</text:p>
          </table:table-cell>
          <table:table-cell office:value-type="float" office:value="60" calcext:value-type="float">
            <text:p>60</text:p>
          </table:table-cell>
          <table:table-cell table:formula="of:=AVERAGE([.M372:.M379])" office:value-type="float" office:value="49.625" calcext:value-type="float">
            <text:p>49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74" calcext:value-type="float">
            <text:p>374</text:p>
          </table:table-cell>
          <table:table-cell office:value-type="float" office:value="54" calcext:value-type="float">
            <text:p>54</text:p>
          </table:table-cell>
          <table:table-cell table:formula="of:=AVERAGE([.M373:.M380])" office:value-type="float" office:value="50.875" calcext:value-type="float">
            <text:p>5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75" calcext:value-type="float">
            <text:p>375</text:p>
          </table:table-cell>
          <table:table-cell office:value-type="float" office:value="43" calcext:value-type="float">
            <text:p>43</text:p>
          </table:table-cell>
          <table:table-cell table:formula="of:=AVERAGE([.M374:.M381])" office:value-type="float" office:value="50.875" calcext:value-type="float">
            <text:p>5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76" calcext:value-type="float">
            <text:p>376</text:p>
          </table:table-cell>
          <table:table-cell office:value-type="float" office:value="52" calcext:value-type="float">
            <text:p>52</text:p>
          </table:table-cell>
          <table:table-cell table:formula="of:=AVERAGE([.M375:.M382])" office:value-type="float" office:value="52" calcext:value-type="float">
            <text:p>52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77" calcext:value-type="float">
            <text:p>377</text:p>
          </table:table-cell>
          <table:table-cell office:value-type="float" office:value="42" calcext:value-type="float">
            <text:p>42</text:p>
          </table:table-cell>
          <table:table-cell table:formula="of:=AVERAGE([.M376:.M383])" office:value-type="float" office:value="53" calcext:value-type="float">
            <text:p>5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78" calcext:value-type="float">
            <text:p>378</text:p>
          </table:table-cell>
          <table:table-cell office:value-type="float" office:value="58" calcext:value-type="float">
            <text:p>58</text:p>
          </table:table-cell>
          <table:table-cell table:formula="of:=AVERAGE([.M377:.M384])" office:value-type="float" office:value="54.125" calcext:value-type="float">
            <text:p>5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79" calcext:value-type="float">
            <text:p>379</text:p>
          </table:table-cell>
          <table:table-cell office:value-type="float" office:value="51" calcext:value-type="float">
            <text:p>51</text:p>
          </table:table-cell>
          <table:table-cell table:formula="of:=AVERAGE([.M378:.M385])" office:value-type="float" office:value="56.125" calcext:value-type="float">
            <text:p>56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80" calcext:value-type="float">
            <text:p>380</text:p>
          </table:table-cell>
          <table:table-cell office:value-type="float" office:value="56" calcext:value-type="float">
            <text:p>56</text:p>
          </table:table-cell>
          <table:table-cell table:formula="of:=AVERAGE([.M379:.M386])" office:value-type="float" office:value="54.875" calcext:value-type="float">
            <text:p>5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81" calcext:value-type="float">
            <text:p>381</text:p>
          </table:table-cell>
          <table:table-cell office:value-type="float" office:value="68" calcext:value-type="float">
            <text:p>68</text:p>
          </table:table-cell>
          <table:table-cell table:formula="of:=AVERAGE([.M380:.M387])" office:value-type="float" office:value="57" calcext:value-type="float">
            <text:p>57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82" calcext:value-type="float">
            <text:p>382</text:p>
          </table:table-cell>
          <table:table-cell office:value-type="float" office:value="63" calcext:value-type="float">
            <text:p>63</text:p>
          </table:table-cell>
          <table:table-cell table:formula="of:=AVERAGE([.M381:.M388])" office:value-type="float" office:value="57.625" calcext:value-type="float">
            <text:p>57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83" calcext:value-type="float">
            <text:p>383</text:p>
          </table:table-cell>
          <table:table-cell office:value-type="float" office:value="59" calcext:value-type="float">
            <text:p>59</text:p>
          </table:table-cell>
          <table:table-cell table:formula="of:=AVERAGE([.M382:.M389])" office:value-type="float" office:value="58.5" calcext:value-type="float">
            <text:p>58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84" calcext:value-type="float">
            <text:p>384</text:p>
          </table:table-cell>
          <table:table-cell office:value-type="float" office:value="42" calcext:value-type="float">
            <text:p>42</text:p>
          </table:table-cell>
          <table:table-cell table:formula="of:=AVERAGE([.M383:.M390])" office:value-type="float" office:value="58" calcext:value-type="float">
            <text:p>58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18" calcext:value-type="float">
            <text:p>21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85" calcext:value-type="float">
            <text:p>385</text:p>
          </table:table-cell>
          <table:table-cell office:value-type="float" office:value="59" calcext:value-type="float">
            <text:p>59</text:p>
          </table:table-cell>
          <table:table-cell table:formula="of:=AVERAGE([.M384:.M391])" office:value-type="float" office:value="57.25" calcext:value-type="float">
            <text:p>57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86" calcext:value-type="float">
            <text:p>386</text:p>
          </table:table-cell>
          <table:table-cell office:value-type="float" office:value="63" calcext:value-type="float">
            <text:p>63</text:p>
          </table:table-cell>
          <table:table-cell table:formula="of:=AVERAGE([.M385:.M392])" office:value-type="float" office:value="57.375" calcext:value-type="float">
            <text:p>57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87" calcext:value-type="float">
            <text:p>387</text:p>
          </table:table-cell>
          <table:table-cell office:value-type="float" office:value="58" calcext:value-type="float">
            <text:p>58</text:p>
          </table:table-cell>
          <table:table-cell table:formula="of:=AVERAGE([.M386:.M393])" office:value-type="float" office:value="56.125" calcext:value-type="float">
            <text:p>56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88" calcext:value-type="float">
            <text:p>388</text:p>
          </table:table-cell>
          <table:table-cell office:value-type="float" office:value="52" calcext:value-type="float">
            <text:p>52</text:p>
          </table:table-cell>
          <table:table-cell table:formula="of:=AVERAGE([.M387:.M394])" office:value-type="float" office:value="56.25" calcext:value-type="float">
            <text:p>56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71" calcext:value-type="float">
            <text:p>27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89" calcext:value-type="float">
            <text:p>389</text:p>
          </table:table-cell>
          <table:table-cell office:value-type="float" office:value="62" calcext:value-type="float">
            <text:p>62</text:p>
          </table:table-cell>
          <table:table-cell table:formula="of:=AVERAGE([.M388:.M395])" office:value-type="float" office:value="57.75" calcext:value-type="float">
            <text:p>57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90" calcext:value-type="float">
            <text:p>390</text:p>
          </table:table-cell>
          <table:table-cell office:value-type="float" office:value="64" calcext:value-type="float">
            <text:p>64</text:p>
          </table:table-cell>
          <table:table-cell table:formula="of:=AVERAGE([.M389:.M396])" office:value-type="float" office:value="57.875" calcext:value-type="float">
            <text:p>57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91" calcext:value-type="float">
            <text:p>391</text:p>
          </table:table-cell>
          <table:table-cell office:value-type="float" office:value="49" calcext:value-type="float">
            <text:p>49</text:p>
          </table:table-cell>
          <table:table-cell table:formula="of:=AVERAGE([.M390:.M397])" office:value-type="float" office:value="59.625" calcext:value-type="float">
            <text:p>59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92" calcext:value-type="float">
            <text:p>392</text:p>
          </table:table-cell>
          <table:table-cell office:value-type="float" office:value="43" calcext:value-type="float">
            <text:p>43</text:p>
          </table:table-cell>
          <table:table-cell table:formula="of:=AVERAGE([.M391:.M398])" office:value-type="float" office:value="60.25" calcext:value-type="float">
            <text:p>60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93" calcext:value-type="float">
            <text:p>393</text:p>
          </table:table-cell>
          <table:table-cell office:value-type="float" office:value="71" calcext:value-type="float">
            <text:p>71</text:p>
          </table:table-cell>
          <table:table-cell table:formula="of:=AVERAGE([.M392:.M399])" office:value-type="float" office:value="59.5" calcext:value-type="float">
            <text:p>59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78" calcext:value-type="float">
            <text:p>27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94" calcext:value-type="float">
            <text:p>394</text:p>
          </table:table-cell>
          <table:table-cell office:value-type="float" office:value="64" calcext:value-type="float">
            <text:p>64</text:p>
          </table:table-cell>
          <table:table-cell table:formula="of:=AVERAGE([.M393:.M400])" office:value-type="float" office:value="57.75" calcext:value-type="float">
            <text:p>57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95" calcext:value-type="float">
            <text:p>395</text:p>
          </table:table-cell>
          <table:table-cell office:value-type="float" office:value="72" calcext:value-type="float">
            <text:p>72</text:p>
          </table:table-cell>
          <table:table-cell table:formula="of:=AVERAGE([.M394:.M401])" office:value-type="float" office:value="58.25" calcext:value-type="float">
            <text:p>58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77" calcext:value-type="float">
            <text:p>27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96" calcext:value-type="float">
            <text:p>396</text:p>
          </table:table-cell>
          <table:table-cell office:value-type="float" office:value="57" calcext:value-type="float">
            <text:p>57</text:p>
          </table:table-cell>
          <table:table-cell table:formula="of:=AVERAGE([.M395:.M402])" office:value-type="float" office:value="58.5" calcext:value-type="float">
            <text:p>58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97" calcext:value-type="float">
            <text:p>397</text:p>
          </table:table-cell>
          <table:table-cell office:value-type="float" office:value="56" calcext:value-type="float">
            <text:p>56</text:p>
          </table:table-cell>
          <table:table-cell table:formula="of:=AVERAGE([.M396:.M403])" office:value-type="float" office:value="57.625" calcext:value-type="float">
            <text:p>57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98" calcext:value-type="float">
            <text:p>398</text:p>
          </table:table-cell>
          <table:table-cell office:value-type="float" office:value="50" calcext:value-type="float">
            <text:p>50</text:p>
          </table:table-cell>
          <table:table-cell table:formula="of:=AVERAGE([.M397:.M404])" office:value-type="float" office:value="57.375" calcext:value-type="float">
            <text:p>57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399" calcext:value-type="float">
            <text:p>399</text:p>
          </table:table-cell>
          <table:table-cell office:value-type="float" office:value="53" calcext:value-type="float">
            <text:p>53</text:p>
          </table:table-cell>
          <table:table-cell table:formula="of:=AVERAGE([.M398:.M405])" office:value-type="float" office:value="55.5" calcext:value-type="float">
            <text:p>55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4" calcext:value-type="float">
            <text:p>32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00" calcext:value-type="float">
            <text:p>400</text:p>
          </table:table-cell>
          <table:table-cell office:value-type="float" office:value="45" calcext:value-type="float">
            <text:p>45</text:p>
          </table:table-cell>
          <table:table-cell table:formula="of:=AVERAGE([.M399:.M406])" office:value-type="float" office:value="55.125" calcext:value-type="float">
            <text:p>55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2" calcext:value-type="float">
            <text:p>32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01" calcext:value-type="float">
            <text:p>401</text:p>
          </table:table-cell>
          <table:table-cell office:value-type="float" office:value="64" calcext:value-type="float">
            <text:p>64</text:p>
          </table:table-cell>
          <table:table-cell table:formula="of:=AVERAGE([.M400:.M407])" office:value-type="float" office:value="56" calcext:value-type="float">
            <text:p>56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3" calcext:value-type="float">
            <text:p>32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02" calcext:value-type="float">
            <text:p>402</text:p>
          </table:table-cell>
          <table:table-cell office:value-type="float" office:value="62" calcext:value-type="float">
            <text:p>62</text:p>
          </table:table-cell>
          <table:table-cell table:formula="of:=AVERAGE([.M401:.M408])" office:value-type="float" office:value="57.25" calcext:value-type="float">
            <text:p>57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73" calcext:value-type="float">
            <text:p>37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03" calcext:value-type="float">
            <text:p>403</text:p>
          </table:table-cell>
          <table:table-cell office:value-type="float" office:value="57" calcext:value-type="float">
            <text:p>57</text:p>
          </table:table-cell>
          <table:table-cell table:formula="of:=AVERAGE([.M402:.M409])" office:value-type="float" office:value="57" calcext:value-type="float">
            <text:p>57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56" calcext:value-type="float">
            <text:p>35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04" calcext:value-type="float">
            <text:p>404</text:p>
          </table:table-cell>
          <table:table-cell office:value-type="float" office:value="54" calcext:value-type="float">
            <text:p>54</text:p>
          </table:table-cell>
          <table:table-cell table:formula="of:=AVERAGE([.M403:.M410])" office:value-type="float" office:value="58.625" calcext:value-type="float">
            <text:p>58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88" calcext:value-type="float">
            <text:p>38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05" calcext:value-type="float">
            <text:p>405</text:p>
          </table:table-cell>
          <table:table-cell office:value-type="float" office:value="63" calcext:value-type="float">
            <text:p>63</text:p>
          </table:table-cell>
          <table:table-cell table:formula="of:=AVERAGE([.M404:.M411])" office:value-type="float" office:value="57.375" calcext:value-type="float">
            <text:p>57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99" calcext:value-type="float">
            <text:p>39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06" calcext:value-type="float">
            <text:p>406</text:p>
          </table:table-cell>
          <table:table-cell office:value-type="float" office:value="60" calcext:value-type="float">
            <text:p>60</text:p>
          </table:table-cell>
          <table:table-cell table:formula="of:=AVERAGE([.M405:.M412])" office:value-type="float" office:value="56.5" calcext:value-type="float">
            <text:p>56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07" calcext:value-type="float">
            <text:p>407</text:p>
          </table:table-cell>
          <table:table-cell office:value-type="float" office:value="51" calcext:value-type="float">
            <text:p>51</text:p>
          </table:table-cell>
          <table:table-cell table:formula="of:=AVERAGE([.M406:.M413])" office:value-type="float" office:value="55.75" calcext:value-type="float">
            <text:p>5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08" calcext:value-type="float">
            <text:p>40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08" calcext:value-type="float">
            <text:p>408</text:p>
          </table:table-cell>
          <table:table-cell office:value-type="float" office:value="58" calcext:value-type="float">
            <text:p>58</text:p>
          </table:table-cell>
          <table:table-cell table:formula="of:=AVERAGE([.M407:.M414])" office:value-type="float" office:value="55.5" calcext:value-type="float">
            <text:p>55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03" calcext:value-type="float">
            <text:p>40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09" calcext:value-type="float">
            <text:p>409</text:p>
          </table:table-cell>
          <table:table-cell office:value-type="float" office:value="54" calcext:value-type="float">
            <text:p>54</text:p>
          </table:table-cell>
          <table:table-cell table:formula="of:=AVERAGE([.M408:.M415])" office:value-type="float" office:value="52.625" calcext:value-type="float">
            <text:p>5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06" calcext:value-type="float">
            <text:p>40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10" calcext:value-type="float">
            <text:p>410</text:p>
          </table:table-cell>
          <table:table-cell office:value-type="float" office:value="55" calcext:value-type="float">
            <text:p>55</text:p>
          </table:table-cell>
          <table:table-cell table:formula="of:=AVERAGE([.M409:.M416])" office:value-type="float" office:value="52.375" calcext:value-type="float">
            <text:p>5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11" calcext:value-type="float">
            <text:p>411</text:p>
          </table:table-cell>
          <table:table-cell office:value-type="float" office:value="51" calcext:value-type="float">
            <text:p>51</text:p>
          </table:table-cell>
          <table:table-cell table:formula="of:=AVERAGE([.M410:.M417])" office:value-type="float" office:value="52.75" calcext:value-type="float">
            <text:p>5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52" calcext:value-type="float">
            <text:p>45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12" calcext:value-type="float">
            <text:p>412</text:p>
          </table:table-cell>
          <table:table-cell office:value-type="float" office:value="52" calcext:value-type="float">
            <text:p>52</text:p>
          </table:table-cell>
          <table:table-cell table:formula="of:=AVERAGE([.M411:.M418])" office:value-type="float" office:value="52.5" calcext:value-type="float">
            <text:p>5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40" calcext:value-type="float">
            <text:p>44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13" calcext:value-type="float">
            <text:p>413</text:p>
          </table:table-cell>
          <table:table-cell office:value-type="float" office:value="40" calcext:value-type="float">
            <text:p>40</text:p>
          </table:table-cell>
          <table:table-cell table:formula="of:=AVERAGE([.M412:.M419])" office:value-type="float" office:value="54.25" calcext:value-type="float">
            <text:p>5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96" calcext:value-type="float">
            <text:p>49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14" calcext:value-type="float">
            <text:p>414</text:p>
          </table:table-cell>
          <table:table-cell office:value-type="float" office:value="58" calcext:value-type="float">
            <text:p>58</text:p>
          </table:table-cell>
          <table:table-cell table:formula="of:=AVERAGE([.M413:.M420])" office:value-type="float" office:value="55.125" calcext:value-type="float">
            <text:p>55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76" calcext:value-type="float">
            <text:p>47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15" calcext:value-type="float">
            <text:p>415</text:p>
          </table:table-cell>
          <table:table-cell office:value-type="float" office:value="54" calcext:value-type="float">
            <text:p>54</text:p>
          </table:table-cell>
          <table:table-cell table:formula="of:=AVERAGE([.M414:.M421])" office:value-type="float" office:value="56.125" calcext:value-type="float">
            <text:p>56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03" calcext:value-type="float">
            <text:p>50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16" calcext:value-type="float">
            <text:p>416</text:p>
          </table:table-cell>
          <table:table-cell office:value-type="float" office:value="56" calcext:value-type="float">
            <text:p>56</text:p>
          </table:table-cell>
          <table:table-cell table:formula="of:=AVERAGE([.M415:.M422])" office:value-type="float" office:value="55.125" calcext:value-type="float">
            <text:p>55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99" calcext:value-type="float">
            <text:p>49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17" calcext:value-type="float">
            <text:p>417</text:p>
          </table:table-cell>
          <table:table-cell office:value-type="float" office:value="68" calcext:value-type="float">
            <text:p>68</text:p>
          </table:table-cell>
          <table:table-cell table:formula="of:=AVERAGE([.M416:.M423])" office:value-type="float" office:value="56.625" calcext:value-type="float">
            <text:p>56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32" calcext:value-type="float">
            <text:p>53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18" calcext:value-type="float">
            <text:p>418</text:p>
          </table:table-cell>
          <table:table-cell office:value-type="float" office:value="62" calcext:value-type="float">
            <text:p>62</text:p>
          </table:table-cell>
          <table:table-cell table:formula="of:=AVERAGE([.M417:.M424])" office:value-type="float" office:value="55" calcext:value-type="float">
            <text:p>5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95" calcext:value-type="float">
            <text:p>49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19" calcext:value-type="float">
            <text:p>419</text:p>
          </table:table-cell>
          <table:table-cell office:value-type="float" office:value="59" calcext:value-type="float">
            <text:p>59</text:p>
          </table:table-cell>
          <table:table-cell table:formula="of:=AVERAGE([.M418:.M425])" office:value-type="float" office:value="52.75" calcext:value-type="float">
            <text:p>5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21" calcext:value-type="float">
            <text:p>52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20" calcext:value-type="float">
            <text:p>420</text:p>
          </table:table-cell>
          <table:table-cell office:value-type="float" office:value="44" calcext:value-type="float">
            <text:p>44</text:p>
          </table:table-cell>
          <table:table-cell table:formula="of:=AVERAGE([.M419:.M426])" office:value-type="float" office:value="52.375" calcext:value-type="float">
            <text:p>5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48" calcext:value-type="float">
            <text:p>54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21" calcext:value-type="float">
            <text:p>421</text:p>
          </table:table-cell>
          <table:table-cell office:value-type="float" office:value="52" calcext:value-type="float">
            <text:p>52</text:p>
          </table:table-cell>
          <table:table-cell table:formula="of:=AVERAGE([.M420:.M427])" office:value-type="float" office:value="50.125" calcext:value-type="float">
            <text:p>50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68" calcext:value-type="float">
            <text:p>56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22" calcext:value-type="float">
            <text:p>422</text:p>
          </table:table-cell>
          <table:table-cell office:value-type="float" office:value="45" calcext:value-type="float">
            <text:p>45</text:p>
          </table:table-cell>
          <table:table-cell table:formula="of:=AVERAGE([.M421:.M428])" office:value-type="float" office:value="47.75" calcext:value-type="float">
            <text:p>47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68" calcext:value-type="float">
            <text:p>56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23" calcext:value-type="float">
            <text:p>423</text:p>
          </table:table-cell>
          <table:table-cell office:value-type="float" office:value="36" calcext:value-type="float">
            <text:p>36</text:p>
          </table:table-cell>
          <table:table-cell table:formula="of:=AVERAGE([.M422:.M429])" office:value-type="float" office:value="45.125" calcext:value-type="float">
            <text:p>45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63" calcext:value-type="float">
            <text:p>56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24" calcext:value-type="float">
            <text:p>424</text:p>
          </table:table-cell>
          <table:table-cell office:value-type="float" office:value="53" calcext:value-type="float">
            <text:p>53</text:p>
          </table:table-cell>
          <table:table-cell table:formula="of:=AVERAGE([.M423:.M430])" office:value-type="float" office:value="45.375" calcext:value-type="float">
            <text:p>45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89" calcext:value-type="float">
            <text:p>58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25" calcext:value-type="float">
            <text:p>425</text:p>
          </table:table-cell>
          <table:table-cell office:value-type="float" office:value="50" calcext:value-type="float">
            <text:p>50</text:p>
          </table:table-cell>
          <table:table-cell table:formula="of:=AVERAGE([.M424:.M431])" office:value-type="float" office:value="43.125" calcext:value-type="float">
            <text:p>4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67" calcext:value-type="float">
            <text:p>56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26" calcext:value-type="float">
            <text:p>426</text:p>
          </table:table-cell>
          <table:table-cell office:value-type="float" office:value="43" calcext:value-type="float">
            <text:p>43</text:p>
          </table:table-cell>
          <table:table-cell table:formula="of:=AVERAGE([.M425:.M432])" office:value-type="float" office:value="42.75" calcext:value-type="float">
            <text:p>4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51" calcext:value-type="float">
            <text:p>65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27" calcext:value-type="float">
            <text:p>427</text:p>
          </table:table-cell>
          <table:table-cell office:value-type="float" office:value="38" calcext:value-type="float">
            <text:p>38</text:p>
          </table:table-cell>
          <table:table-cell table:formula="of:=AVERAGE([.M426:.M433])" office:value-type="float" office:value="43.125" calcext:value-type="float">
            <text:p>4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03" calcext:value-type="float">
            <text:p>60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28" calcext:value-type="float">
            <text:p>428</text:p>
          </table:table-cell>
          <table:table-cell office:value-type="float" office:value="46" calcext:value-type="float">
            <text:p>46</text:p>
          </table:table-cell>
          <table:table-cell table:formula="of:=AVERAGE([.M427:.M434])" office:value-type="float" office:value="42" calcext:value-type="float">
            <text:p>42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04" calcext:value-type="float">
            <text:p>60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29" calcext:value-type="float">
            <text:p>429</text:p>
          </table:table-cell>
          <table:table-cell office:value-type="float" office:value="34" calcext:value-type="float">
            <text:p>34</text:p>
          </table:table-cell>
          <table:table-cell table:formula="of:=AVERAGE([.M428:.M435])" office:value-type="float" office:value="41.375" calcext:value-type="float">
            <text:p>41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52" calcext:value-type="float">
            <text:p>65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30" calcext:value-type="float">
            <text:p>430</text:p>
          </table:table-cell>
          <table:table-cell office:value-type="float" office:value="42" calcext:value-type="float">
            <text:p>42</text:p>
          </table:table-cell>
          <table:table-cell table:formula="of:=AVERAGE([.M429:.M436])" office:value-type="float" office:value="41.25" calcext:value-type="float">
            <text:p>41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62" calcext:value-type="float">
            <text:p>66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31" calcext:value-type="float">
            <text:p>431</text:p>
          </table:table-cell>
          <table:table-cell office:value-type="float" office:value="39" calcext:value-type="float">
            <text:p>39</text:p>
          </table:table-cell>
          <table:table-cell table:formula="of:=AVERAGE([.M430:.M437])" office:value-type="float" office:value="42" calcext:value-type="float">
            <text:p>42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53" calcext:value-type="float">
            <text:p>65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32" calcext:value-type="float">
            <text:p>432</text:p>
          </table:table-cell>
          <table:table-cell office:value-type="float" office:value="44" calcext:value-type="float">
            <text:p>44</text:p>
          </table:table-cell>
          <table:table-cell table:formula="of:=AVERAGE([.M431:.M438])" office:value-type="float" office:value="44.25" calcext:value-type="float">
            <text:p>4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67" calcext:value-type="float">
            <text:p>66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33" calcext:value-type="float">
            <text:p>433</text:p>
          </table:table-cell>
          <table:table-cell office:value-type="float" office:value="45" calcext:value-type="float">
            <text:p>45</text:p>
          </table:table-cell>
          <table:table-cell table:formula="of:=AVERAGE([.M432:.M439])" office:value-type="float" office:value="45.75" calcext:value-type="float">
            <text:p>4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76" calcext:value-type="float">
            <text:p>67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34" calcext:value-type="float">
            <text:p>434</text:p>
          </table:table-cell>
          <table:table-cell office:value-type="float" office:value="42" calcext:value-type="float">
            <text:p>42</text:p>
          </table:table-cell>
          <table:table-cell table:formula="of:=AVERAGE([.M433:.M440])" office:value-type="float" office:value="44.875" calcext:value-type="float">
            <text:p>4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04" calcext:value-type="float">
            <text:p>70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35" calcext:value-type="float">
            <text:p>435</text:p>
          </table:table-cell>
          <table:table-cell office:value-type="float" office:value="44" calcext:value-type="float">
            <text:p>44</text:p>
          </table:table-cell>
          <table:table-cell table:formula="of:=AVERAGE([.M434:.M441])" office:value-type="float" office:value="44.375" calcext:value-type="float">
            <text:p>4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60" calcext:value-type="float">
            <text:p>76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36" calcext:value-type="float">
            <text:p>436</text:p>
          </table:table-cell>
          <table:table-cell office:value-type="float" office:value="64" calcext:value-type="float">
            <text:p>64</text:p>
          </table:table-cell>
          <table:table-cell table:formula="of:=AVERAGE([.M435:.M442])" office:value-type="float" office:value="43.25" calcext:value-type="float">
            <text:p>4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13" calcext:value-type="float">
            <text:p>71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37" calcext:value-type="float">
            <text:p>437</text:p>
          </table:table-cell>
          <table:table-cell office:value-type="float" office:value="46" calcext:value-type="float">
            <text:p>46</text:p>
          </table:table-cell>
          <table:table-cell table:formula="of:=AVERAGE([.M436:.M443])" office:value-type="float" office:value="42.25" calcext:value-type="float">
            <text:p>42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72" calcext:value-type="float">
            <text:p>67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38" calcext:value-type="float">
            <text:p>438</text:p>
          </table:table-cell>
          <table:table-cell office:value-type="float" office:value="35" calcext:value-type="float">
            <text:p>35</text:p>
          </table:table-cell>
          <table:table-cell table:formula="of:=AVERAGE([.M437:.M444])" office:value-type="float" office:value="41.25" calcext:value-type="float">
            <text:p>41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39" calcext:value-type="float">
            <text:p>73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39" calcext:value-type="float">
            <text:p>439</text:p>
          </table:table-cell>
          <table:table-cell office:value-type="float" office:value="35" calcext:value-type="float">
            <text:p>35</text:p>
          </table:table-cell>
          <table:table-cell table:formula="of:=AVERAGE([.M438:.M445])" office:value-type="float" office:value="40" calcext:value-type="float">
            <text:p>40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05" calcext:value-type="float">
            <text:p>80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40" calcext:value-type="float">
            <text:p>440</text:p>
          </table:table-cell>
          <table:table-cell office:value-type="float" office:value="35" calcext:value-type="float">
            <text:p>35</text:p>
          </table:table-cell>
          <table:table-cell table:formula="of:=AVERAGE([.M439:.M446])" office:value-type="float" office:value="36.75" calcext:value-type="float">
            <text:p>36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98" calcext:value-type="float">
            <text:p>79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41" calcext:value-type="float">
            <text:p>441</text:p>
          </table:table-cell>
          <table:table-cell office:value-type="float" office:value="37" calcext:value-type="float">
            <text:p>37</text:p>
          </table:table-cell>
          <table:table-cell table:formula="of:=AVERAGE([.M440:.M447])" office:value-type="float" office:value="35" calcext:value-type="float">
            <text:p>3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42" calcext:value-type="float">
            <text:p>442</text:p>
          </table:table-cell>
          <table:table-cell office:value-type="float" office:value="34" calcext:value-type="float">
            <text:p>34</text:p>
          </table:table-cell>
          <table:table-cell table:formula="of:=AVERAGE([.M441:.M448])" office:value-type="float" office:value="32.875" calcext:value-type="float">
            <text:p>3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36" calcext:value-type="float">
            <text:p>73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43" calcext:value-type="float">
            <text:p>443</text:p>
          </table:table-cell>
          <table:table-cell office:value-type="float" office:value="34" calcext:value-type="float">
            <text:p>34</text:p>
          </table:table-cell>
          <table:table-cell table:formula="of:=AVERAGE([.M442:.M449])" office:value-type="float" office:value="32" calcext:value-type="float">
            <text:p>32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44" calcext:value-type="float">
            <text:p>444</text:p>
          </table:table-cell>
          <table:table-cell office:value-type="float" office:value="38" calcext:value-type="float">
            <text:p>38</text:p>
          </table:table-cell>
          <table:table-cell table:formula="of:=AVERAGE([.M443:.M450])" office:value-type="float" office:value="31" calcext:value-type="float">
            <text:p>31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03" calcext:value-type="float">
            <text:p>80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45" calcext:value-type="float">
            <text:p>445</text:p>
          </table:table-cell>
          <table:table-cell office:value-type="float" office:value="32" calcext:value-type="float">
            <text:p>32</text:p>
          </table:table-cell>
          <table:table-cell table:formula="of:=AVERAGE([.M444:.M451])" office:value-type="float" office:value="30" calcext:value-type="float">
            <text:p>30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22" calcext:value-type="float">
            <text:p>82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46" calcext:value-type="float">
            <text:p>446</text:p>
          </table:table-cell>
          <table:table-cell office:value-type="float" office:value="18" calcext:value-type="float">
            <text:p>18</text:p>
          </table:table-cell>
          <table:table-cell table:formula="of:=AVERAGE([.M445:.M452])" office:value-type="float" office:value="28.625" calcext:value-type="float">
            <text:p>28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61" calcext:value-type="float">
            <text:p>86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47" calcext:value-type="float">
            <text:p>447</text:p>
          </table:table-cell>
          <table:table-cell office:value-type="float" office:value="28" calcext:value-type="float">
            <text:p>28</text:p>
          </table:table-cell>
          <table:table-cell table:formula="of:=AVERAGE([.M446:.M453])" office:value-type="float" office:value="28" calcext:value-type="float">
            <text:p>28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51" calcext:value-type="float">
            <text:p>85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48" calcext:value-type="float">
            <text:p>448</text:p>
          </table:table-cell>
          <table:table-cell office:value-type="float" office:value="27" calcext:value-type="float">
            <text:p>27</text:p>
          </table:table-cell>
          <table:table-cell table:formula="of:=AVERAGE([.M447:.M454])" office:value-type="float" office:value="26" calcext:value-type="float">
            <text:p>26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49" calcext:value-type="float">
            <text:p>84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49" calcext:value-type="float">
            <text:p>449</text:p>
          </table:table-cell>
          <table:table-cell office:value-type="float" office:value="29" calcext:value-type="float">
            <text:p>29</text:p>
          </table:table-cell>
          <table:table-cell table:formula="of:=AVERAGE([.M448:.M455])" office:value-type="float" office:value="25.625" calcext:value-type="float">
            <text:p>25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21" calcext:value-type="float">
            <text:p>82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50" calcext:value-type="float">
            <text:p>450</text:p>
          </table:table-cell>
          <table:table-cell office:value-type="float" office:value="23" calcext:value-type="float">
            <text:p>23</text:p>
          </table:table-cell>
          <table:table-cell table:formula="of:=AVERAGE([.M449:.M456])" office:value-type="float" office:value="25.875" calcext:value-type="float">
            <text:p>25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37" calcext:value-type="float">
            <text:p>83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51" calcext:value-type="float">
            <text:p>451</text:p>
          </table:table-cell>
          <table:table-cell office:value-type="float" office:value="29" calcext:value-type="float">
            <text:p>29</text:p>
          </table:table-cell>
          <table:table-cell table:formula="of:=AVERAGE([.M450:.M457])" office:value-type="float" office:value="25.5" calcext:value-type="float">
            <text:p>25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88" calcext:value-type="float">
            <text:p>88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52" calcext:value-type="float">
            <text:p>452</text:p>
          </table:table-cell>
          <table:table-cell office:value-type="float" office:value="22" calcext:value-type="float">
            <text:p>22</text:p>
          </table:table-cell>
          <table:table-cell table:formula="of:=AVERAGE([.M451:.M458])" office:value-type="float" office:value="25.75" calcext:value-type="float">
            <text:p>2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86" calcext:value-type="float">
            <text:p>88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53" calcext:value-type="float">
            <text:p>453</text:p>
          </table:table-cell>
          <table:table-cell office:value-type="float" office:value="29" calcext:value-type="float">
            <text:p>29</text:p>
          </table:table-cell>
          <table:table-cell table:formula="of:=AVERAGE([.M452:.M459])" office:value-type="float" office:value="25.75" calcext:value-type="float">
            <text:p>2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90" calcext:value-type="float">
            <text:p>89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54" calcext:value-type="float">
            <text:p>454</text:p>
          </table:table-cell>
          <table:table-cell office:value-type="float" office:value="20" calcext:value-type="float">
            <text:p>20</text:p>
          </table:table-cell>
          <table:table-cell table:formula="of:=AVERAGE([.M453:.M460])" office:value-type="float" office:value="24.875" calcext:value-type="float">
            <text:p>2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55" calcext:value-type="float">
            <text:p>455</text:p>
          </table:table-cell>
          <table:table-cell office:value-type="float" office:value="25" calcext:value-type="float">
            <text:p>25</text:p>
          </table:table-cell>
          <table:table-cell table:formula="of:=AVERAGE([.M454:.M461])" office:value-type="float" office:value="24.75" calcext:value-type="float">
            <text:p>2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96" calcext:value-type="float">
            <text:p>89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56" calcext:value-type="float">
            <text:p>456</text:p>
          </table:table-cell>
          <table:table-cell office:value-type="float" office:value="29" calcext:value-type="float">
            <text:p>29</text:p>
          </table:table-cell>
          <table:table-cell table:formula="of:=AVERAGE([.M455:.M462])" office:value-type="float" office:value="24.75" calcext:value-type="float">
            <text:p>2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84" calcext:value-type="float">
            <text:p>88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57" calcext:value-type="float">
            <text:p>457</text:p>
          </table:table-cell>
          <table:table-cell office:value-type="float" office:value="29" calcext:value-type="float">
            <text:p>29</text:p>
          </table:table-cell>
          <table:table-cell table:formula="of:=AVERAGE([.M456:.M463])" office:value-type="float" office:value="24.25" calcext:value-type="float">
            <text:p>2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82" calcext:value-type="float">
            <text:p>88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58" calcext:value-type="float">
            <text:p>458</text:p>
          </table:table-cell>
          <table:table-cell office:value-type="float" office:value="16" calcext:value-type="float">
            <text:p>16</text:p>
          </table:table-cell>
          <table:table-cell table:formula="of:=AVERAGE([.M457:.M464])" office:value-type="float" office:value="24.625" calcext:value-type="float">
            <text:p>24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91" calcext:value-type="float">
            <text:p>89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59" calcext:value-type="float">
            <text:p>459</text:p>
          </table:table-cell>
          <table:table-cell office:value-type="float" office:value="28" calcext:value-type="float">
            <text:p>28</text:p>
          </table:table-cell>
          <table:table-cell table:formula="of:=AVERAGE([.M458:.M465])" office:value-type="float" office:value="23.5" calcext:value-type="float">
            <text:p>2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51" calcext:value-type="float">
            <text:p>95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60" calcext:value-type="float">
            <text:p>460</text:p>
          </table:table-cell>
          <table:table-cell office:value-type="float" office:value="22" calcext:value-type="float">
            <text:p>22</text:p>
          </table:table-cell>
          <table:table-cell table:formula="of:=AVERAGE([.M459:.M466])" office:value-type="float" office:value="22.25" calcext:value-type="float">
            <text:p>22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90" calcext:value-type="float">
            <text:p>89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61" calcext:value-type="float">
            <text:p>461</text:p>
          </table:table-cell>
          <table:table-cell office:value-type="float" office:value="25" calcext:value-type="float">
            <text:p>25</text:p>
          </table:table-cell>
          <table:table-cell table:formula="of:=AVERAGE([.M460:.M467])" office:value-type="float" office:value="20.875" calcext:value-type="float">
            <text:p>2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89" calcext:value-type="float">
            <text:p>88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62" calcext:value-type="float">
            <text:p>462</text:p>
          </table:table-cell>
          <table:table-cell office:value-type="float" office:value="23" calcext:value-type="float">
            <text:p>23</text:p>
          </table:table-cell>
          <table:table-cell table:formula="of:=AVERAGE([.M461:.M468])" office:value-type="float" office:value="21.375" calcext:value-type="float">
            <text:p>21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11" calcext:value-type="float">
            <text:p>91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63" calcext:value-type="float">
            <text:p>463</text:p>
          </table:table-cell>
          <table:table-cell office:value-type="float" office:value="16" calcext:value-type="float">
            <text:p>16</text:p>
          </table:table-cell>
          <table:table-cell table:formula="of:=AVERAGE([.M462:.M469])" office:value-type="float" office:value="19.75" calcext:value-type="float">
            <text:p>19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74" calcext:value-type="float">
            <text:p>97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64" calcext:value-type="float">
            <text:p>464</text:p>
          </table:table-cell>
          <table:table-cell office:value-type="float" office:value="19" calcext:value-type="float">
            <text:p>19</text:p>
          </table:table-cell>
          <table:table-cell table:formula="of:=AVERAGE([.M463:.M470])" office:value-type="float" office:value="20" calcext:value-type="float">
            <text:p>20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65" calcext:value-type="float">
            <text:p>465</text:p>
          </table:table-cell>
          <table:table-cell office:value-type="float" office:value="18" calcext:value-type="float">
            <text:p>18</text:p>
          </table:table-cell>
          <table:table-cell table:formula="of:=AVERAGE([.M464:.M471])" office:value-type="float" office:value="19.125" calcext:value-type="float">
            <text:p>19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32" calcext:value-type="float">
            <text:p>93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66" calcext:value-type="float">
            <text:p>466</text:p>
          </table:table-cell>
          <table:table-cell office:value-type="float" office:value="20" calcext:value-type="float">
            <text:p>20</text:p>
          </table:table-cell>
          <table:table-cell table:formula="of:=AVERAGE([.M465:.M472])" office:value-type="float" office:value="18.625" calcext:value-type="float">
            <text:p>18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24" calcext:value-type="float">
            <text:p>92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67" calcext:value-type="float">
            <text:p>467</text:p>
          </table:table-cell>
          <table:table-cell office:value-type="float" office:value="15" calcext:value-type="float">
            <text:p>15</text:p>
          </table:table-cell>
          <table:table-cell table:formula="of:=AVERAGE([.M466:.M473])" office:value-type="float" office:value="18" calcext:value-type="float">
            <text:p>18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10" calcext:value-type="float">
            <text:p>91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68" calcext:value-type="float">
            <text:p>468</text:p>
          </table:table-cell>
          <table:table-cell office:value-type="float" office:value="24" calcext:value-type="float">
            <text:p>24</text:p>
          </table:table-cell>
          <table:table-cell table:formula="of:=AVERAGE([.M467:.M474])" office:value-type="float" office:value="17.875" calcext:value-type="float">
            <text:p>17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27" calcext:value-type="float">
            <text:p>92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69" calcext:value-type="float">
            <text:p>469</text:p>
          </table:table-cell>
          <table:table-cell office:value-type="float" office:value="18" calcext:value-type="float">
            <text:p>18</text:p>
          </table:table-cell>
          <table:table-cell table:formula="of:=AVERAGE([.M468:.M475])" office:value-type="float" office:value="18" calcext:value-type="float">
            <text:p>18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97" calcext:value-type="float">
            <text:p>99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70" calcext:value-type="float">
            <text:p>470</text:p>
          </table:table-cell>
          <table:table-cell office:value-type="float" office:value="19" calcext:value-type="float">
            <text:p>19</text:p>
          </table:table-cell>
          <table:table-cell table:formula="of:=AVERAGE([.M469:.M476])" office:value-type="float" office:value="17" calcext:value-type="float">
            <text:p>17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87" calcext:value-type="float">
            <text:p>98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71" calcext:value-type="float">
            <text:p>471</text:p>
          </table:table-cell>
          <table:table-cell office:value-type="float" office:value="11" calcext:value-type="float">
            <text:p>11</text:p>
          </table:table-cell>
          <table:table-cell table:formula="of:=AVERAGE([.M470:.M477])" office:value-type="float" office:value="16.875" calcext:value-type="float">
            <text:p>16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46" calcext:value-type="float">
            <text:p>94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72" calcext:value-type="float">
            <text:p>472</text:p>
          </table:table-cell>
          <table:table-cell office:value-type="float" office:value="18" calcext:value-type="float">
            <text:p>18</text:p>
          </table:table-cell>
          <table:table-cell table:formula="of:=AVERAGE([.M471:.M478])" office:value-type="float" office:value="15.25" calcext:value-type="float">
            <text:p>15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76" calcext:value-type="float">
            <text:p>97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73" calcext:value-type="float">
            <text:p>473</text:p>
          </table:table-cell>
          <table:table-cell office:value-type="float" office:value="19" calcext:value-type="float">
            <text:p>19</text:p>
          </table:table-cell>
          <table:table-cell table:formula="of:=AVERAGE([.M472:.M479])" office:value-type="float" office:value="14.875" calcext:value-type="float">
            <text:p>1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91" calcext:value-type="float">
            <text:p>89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74" calcext:value-type="float">
            <text:p>474</text:p>
          </table:table-cell>
          <table:table-cell office:value-type="float" office:value="12" calcext:value-type="float">
            <text:p>12</text:p>
          </table:table-cell>
          <table:table-cell table:formula="of:=AVERAGE([.M473:.M480])" office:value-type="float" office:value="13.75" calcext:value-type="float">
            <text:p>1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84" calcext:value-type="float">
            <text:p>98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75" calcext:value-type="float">
            <text:p>475</text:p>
          </table:table-cell>
          <table:table-cell office:value-type="float" office:value="14" calcext:value-type="float">
            <text:p>14</text:p>
          </table:table-cell>
          <table:table-cell table:formula="of:=AVERAGE([.M474:.M481])" office:value-type="float" office:value="14.125" calcext:value-type="float">
            <text:p>1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51" calcext:value-type="float">
            <text:p>95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76" calcext:value-type="float">
            <text:p>476</text:p>
          </table:table-cell>
          <table:table-cell office:value-type="float" office:value="11" calcext:value-type="float">
            <text:p>11</text:p>
          </table:table-cell>
          <table:table-cell table:formula="of:=AVERAGE([.M475:.M482])" office:value-type="float" office:value="13" calcext:value-type="float">
            <text:p>1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84" calcext:value-type="float">
            <text:p>98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77" calcext:value-type="float">
            <text:p>477</text:p>
          </table:table-cell>
          <table:table-cell office:value-type="float" office:value="15" calcext:value-type="float">
            <text:p>15</text:p>
          </table:table-cell>
          <table:table-cell table:formula="of:=AVERAGE([.M476:.M483])" office:value-type="float" office:value="12.25" calcext:value-type="float">
            <text:p>12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73" calcext:value-type="float">
            <text:p>97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78" calcext:value-type="float">
            <text:p>478</text:p>
          </table:table-cell>
          <table:table-cell office:value-type="float" office:value="10" calcext:value-type="float">
            <text:p>10</text:p>
          </table:table-cell>
          <table:table-cell table:formula="of:=AVERAGE([.M477:.M484])" office:value-type="float" office:value="12.375" calcext:value-type="float">
            <text:p>1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40" calcext:value-type="float">
            <text:p>94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79" calcext:value-type="float">
            <text:p>479</text:p>
          </table:table-cell>
          <table:table-cell office:value-type="float" office:value="14" calcext:value-type="float">
            <text:p>14</text:p>
          </table:table-cell>
          <table:table-cell table:formula="of:=AVERAGE([.M478:.M485])" office:value-type="float" office:value="11.875" calcext:value-type="float">
            <text:p>11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90" calcext:value-type="float">
            <text:p>99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table:formula="of:=AVERAGE([.M479:.M486])" office:value-type="float" office:value="11.375" calcext:value-type="float">
            <text:p>11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94" calcext:value-type="float">
            <text:p>99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81" calcext:value-type="float">
            <text:p>481</text:p>
          </table:table-cell>
          <table:table-cell office:value-type="float" office:value="13" calcext:value-type="float">
            <text:p>13</text:p>
          </table:table-cell>
          <table:table-cell table:formula="of:=AVERAGE([.M480:.M487])" office:value-type="float" office:value="10.875" calcext:value-type="float">
            <text:p>1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58" calcext:value-type="float">
            <text:p>95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82" calcext:value-type="float">
            <text:p>482</text:p>
          </table:table-cell>
          <table:table-cell office:value-type="float" office:value="13" calcext:value-type="float">
            <text:p>13</text:p>
          </table:table-cell>
          <table:table-cell table:formula="of:=AVERAGE([.M481:.M488])" office:value-type="float" office:value="10.625" calcext:value-type="float">
            <text:p>10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81" calcext:value-type="float">
            <text:p>98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table:formula="of:=AVERAGE([.M482:.M489])" office:value-type="float" office:value="10.75" calcext:value-type="float">
            <text:p>10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76" calcext:value-type="float">
            <text:p>97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84" calcext:value-type="float">
            <text:p>484</text:p>
          </table:table-cell>
          <table:table-cell office:value-type="float" office:value="7" calcext:value-type="float">
            <text:p>7</text:p>
          </table:table-cell>
          <table:table-cell table:formula="of:=AVERAGE([.M483:.M490])" office:value-type="float" office:value="10.25" calcext:value-type="float">
            <text:p>10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55" calcext:value-type="float">
            <text:p>95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85" calcext:value-type="float">
            <text:p>485</text:p>
          </table:table-cell>
          <table:table-cell office:value-type="float" office:value="11" calcext:value-type="float">
            <text:p>11</text:p>
          </table:table-cell>
          <table:table-cell table:formula="of:=AVERAGE([.M484:.M491])" office:value-type="float" office:value="9.5" calcext:value-type="float">
            <text:p>9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06" calcext:value-type="float">
            <text:p>90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86" calcext:value-type="float">
            <text:p>486</text:p>
          </table:table-cell>
          <table:table-cell office:value-type="float" office:value="8" calcext:value-type="float">
            <text:p>8</text:p>
          </table:table-cell>
          <table:table-cell table:formula="of:=AVERAGE([.M485:.M492])" office:value-type="float" office:value="8.875" calcext:value-type="float">
            <text:p>8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76" calcext:value-type="float">
            <text:p>97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87" calcext:value-type="float">
            <text:p>487</text:p>
          </table:table-cell>
          <table:table-cell office:value-type="float" office:value="15" calcext:value-type="float">
            <text:p>15</text:p>
          </table:table-cell>
          <table:table-cell table:formula="of:=AVERAGE([.M486:.M493])" office:value-type="float" office:value="8.625" calcext:value-type="float">
            <text:p>8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36" calcext:value-type="float">
            <text:p>93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88" calcext:value-type="float">
            <text:p>488</text:p>
          </table:table-cell>
          <table:table-cell office:value-type="float" office:value="5" calcext:value-type="float">
            <text:p>5</text:p>
          </table:table-cell>
          <table:table-cell table:formula="of:=AVERAGE([.M487:.M494])" office:value-type="float" office:value="8.5" calcext:value-type="float">
            <text:p>8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63" calcext:value-type="float">
            <text:p>96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89" calcext:value-type="float">
            <text:p>489</text:p>
          </table:table-cell>
          <table:table-cell office:value-type="float" office:value="7" calcext:value-type="float">
            <text:p>7</text:p>
          </table:table-cell>
          <table:table-cell table:formula="of:=AVERAGE([.M488:.M495])" office:value-type="float" office:value="8.125" calcext:value-type="float">
            <text:p>8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32" calcext:value-type="float">
            <text:p>93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90" calcext:value-type="float">
            <text:p>490</text:p>
          </table:table-cell>
          <table:table-cell office:value-type="float" office:value="8" calcext:value-type="float">
            <text:p>8</text:p>
          </table:table-cell>
          <table:table-cell table:formula="of:=AVERAGE([.M489:.M496])" office:value-type="float" office:value="7.875" calcext:value-type="float">
            <text:p>7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18" calcext:value-type="float">
            <text:p>91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91" calcext:value-type="float">
            <text:p>491</text:p>
          </table:table-cell>
          <table:table-cell office:value-type="float" office:value="8" calcext:value-type="float">
            <text:p>8</text:p>
          </table:table-cell>
          <table:table-cell table:formula="of:=AVERAGE([.M490:.M497])" office:value-type="float" office:value="7.375" calcext:value-type="float">
            <text:p>7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35" calcext:value-type="float">
            <text:p>93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92" calcext:value-type="float">
            <text:p>492</text:p>
          </table:table-cell>
          <table:table-cell office:value-type="float" office:value="6" calcext:value-type="float">
            <text:p>6</text:p>
          </table:table-cell>
          <table:table-cell table:formula="of:=AVERAGE([.M491:.M498])" office:value-type="float" office:value="8" calcext:value-type="float">
            <text:p>8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01" calcext:value-type="float">
            <text:p>90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93" calcext:value-type="float">
            <text:p>493</text:p>
          </table:table-cell>
          <table:table-cell office:value-type="float" office:value="8" calcext:value-type="float">
            <text:p>8</text:p>
          </table:table-cell>
          <table:table-cell table:formula="of:=AVERAGE([.M492:.M499])" office:value-type="float" office:value="8.125" calcext:value-type="float">
            <text:p>8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10" calcext:value-type="float">
            <text:p>91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94" calcext:value-type="float">
            <text:p>494</text:p>
          </table:table-cell>
          <table:table-cell office:value-type="float" office:value="6" calcext:value-type="float">
            <text:p>6</text:p>
          </table:table-cell>
          <table:table-cell table:formula="of:=AVERAGE([.M493:.M500])" office:value-type="float" office:value="7.375" calcext:value-type="float">
            <text:p>7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53" calcext:value-type="float">
            <text:p>95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95" calcext:value-type="float">
            <text:p>495</text:p>
          </table:table-cell>
          <table:table-cell office:value-type="float" office:value="11" calcext:value-type="float">
            <text:p>11</text:p>
          </table:table-cell>
          <table:table-cell table:formula="of:=AVERAGE([.M494:.M501])" office:value-type="float" office:value="7" calcext:value-type="float">
            <text:p>7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82" calcext:value-type="float">
            <text:p>98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96" calcext:value-type="float">
            <text:p>496</text:p>
          </table:table-cell>
          <table:table-cell office:value-type="float" office:value="10" calcext:value-type="float">
            <text:p>10</text:p>
          </table:table-cell>
          <table:table-cell table:formula="of:=AVERAGE([.M495:.M502])" office:value-type="float" office:value="7.25" calcext:value-type="float">
            <text:p>7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32" calcext:value-type="float">
            <text:p>93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97" calcext:value-type="float">
            <text:p>497</text:p>
          </table:table-cell>
          <table:table-cell office:value-type="float" office:value="8" calcext:value-type="float">
            <text:p>8</text:p>
          </table:table-cell>
          <table:table-cell table:formula="of:=AVERAGE([.M496:.M503])" office:value-type="float" office:value="6.75" calcext:value-type="float">
            <text:p>6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15" calcext:value-type="float">
            <text:p>91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98" calcext:value-type="float">
            <text:p>498</text:p>
          </table:table-cell>
          <table:table-cell office:value-type="float" office:value="2" calcext:value-type="float">
            <text:p>2</text:p>
          </table:table-cell>
          <table:table-cell table:formula="of:=AVERAGE([.M497:.M504])" office:value-type="float" office:value="6.625" calcext:value-type="float">
            <text:p>6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54" calcext:value-type="float">
            <text:p>95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499" calcext:value-type="float">
            <text:p>499</text:p>
          </table:table-cell>
          <table:table-cell office:value-type="float" office:value="5" calcext:value-type="float">
            <text:p>5</text:p>
          </table:table-cell>
          <table:table-cell table:formula="of:=AVERAGE([.M498:.M505])" office:value-type="float" office:value="6.25" calcext:value-type="float">
            <text:p>6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60" calcext:value-type="float">
            <text:p>96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formula="of:=AVERAGE([.M499:.M506])" office:value-type="float" office:value="6.25" calcext:value-type="float">
            <text:p>6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48" calcext:value-type="float">
            <text:p>94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01" calcext:value-type="float">
            <text:p>501</text:p>
          </table:table-cell>
          <table:table-cell office:value-type="float" office:value="4" calcext:value-type="float">
            <text:p>4</text:p>
          </table:table-cell>
          <table:table-cell table:formula="of:=AVERAGE([.M500:.M507])" office:value-type="float" office:value="5.625" calcext:value-type="float">
            <text:p>5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42" calcext:value-type="float">
            <text:p>94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02" calcext:value-type="float">
            <text:p>502</text:p>
          </table:table-cell>
          <table:table-cell office:value-type="float" office:value="5" calcext:value-type="float">
            <text:p>5</text:p>
          </table:table-cell>
          <table:table-cell table:formula="of:=AVERAGE([.M501:.M508])" office:value-type="float" office:value="5.875" calcext:value-type="float">
            <text:p>5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09" calcext:value-type="float">
            <text:p>90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03" calcext:value-type="float">
            <text:p>503</text:p>
          </table:table-cell>
          <table:table-cell office:value-type="float" office:value="8" calcext:value-type="float">
            <text:p>8</text:p>
          </table:table-cell>
          <table:table-cell table:formula="of:=AVERAGE([.M502:.M509])" office:value-type="float" office:value="5.5" calcext:value-type="float">
            <text:p>5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88" calcext:value-type="float">
            <text:p>98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04" calcext:value-type="float">
            <text:p>504</text:p>
          </table:table-cell>
          <table:table-cell office:value-type="float" office:value="10" calcext:value-type="float">
            <text:p>10</text:p>
          </table:table-cell>
          <table:table-cell table:formula="of:=AVERAGE([.M503:.M510])" office:value-type="float" office:value="5" calcext:value-type="float">
            <text:p>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08" calcext:value-type="float">
            <text:p>90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05" calcext:value-type="float">
            <text:p>505</text:p>
          </table:table-cell>
          <table:table-cell office:value-type="float" office:value="3" calcext:value-type="float">
            <text:p>3</text:p>
          </table:table-cell>
          <table:table-cell table:formula="of:=AVERAGE([.M504:.M511])" office:value-type="float" office:value="4.875" calcext:value-type="float">
            <text:p>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41" calcext:value-type="float">
            <text:p>94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06" calcext:value-type="float">
            <text:p>506</text:p>
          </table:table-cell>
          <table:table-cell office:value-type="float" office:value="4" calcext:value-type="float">
            <text:p>4</text:p>
          </table:table-cell>
          <table:table-cell table:formula="of:=AVERAGE([.M505:.M512])" office:value-type="float" office:value="4.5" calcext:value-type="float">
            <text:p>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24" calcext:value-type="float">
            <text:p>92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 table:formula="of:=AVERAGE([.M506:.M513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93" calcext:value-type="float">
            <text:p>89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08" calcext:value-type="float">
            <text:p>508</text:p>
          </table:table-cell>
          <table:table-cell office:value-type="float" office:value="4" calcext:value-type="float">
            <text:p>4</text:p>
          </table:table-cell>
          <table:table-cell table:formula="of:=AVERAGE([.M507:.M514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04" calcext:value-type="float">
            <text:p>90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09" calcext:value-type="float">
            <text:p>509</text:p>
          </table:table-cell>
          <table:table-cell office:value-type="float" office:value="3" calcext:value-type="float">
            <text:p>3</text:p>
          </table:table-cell>
          <table:table-cell table:formula="of:=AVERAGE([.M508:.M515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01" calcext:value-type="float">
            <text:p>90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10" calcext:value-type="float">
            <text:p>510</text:p>
          </table:table-cell>
          <table:table-cell office:value-type="float" office:value="2" calcext:value-type="float">
            <text:p>2</text:p>
          </table:table-cell>
          <table:table-cell table:formula="of:=AVERAGE([.M509:.M516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47" calcext:value-type="float">
            <text:p>84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11" calcext:value-type="float">
            <text:p>511</text:p>
          </table:table-cell>
          <table:table-cell office:value-type="float" office:value="3" calcext:value-type="float">
            <text:p>3</text:p>
          </table:table-cell>
          <table:table-cell table:formula="of:=AVERAGE([.M510:.M517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75" calcext:value-type="float">
            <text:p>87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table:formula="of:=AVERAGE([.M511:.M518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38" calcext:value-type="float">
            <text:p>83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13" calcext:value-type="float">
            <text:p>513</text:p>
          </table:table-cell>
          <table:table-cell office:value-type="float" office:value="3" calcext:value-type="float">
            <text:p>3</text:p>
          </table:table-cell>
          <table:table-cell table:formula="of:=AVERAGE([.M512:.M519])" office:value-type="float" office:value="4" calcext:value-type="float">
            <text:p>4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37" calcext:value-type="float">
            <text:p>83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14" calcext:value-type="float">
            <text:p>514</text:p>
          </table:table-cell>
          <table:table-cell office:value-type="float" office:value="4" calcext:value-type="float">
            <text:p>4</text:p>
          </table:table-cell>
          <table:table-cell table:formula="of:=AVERAGE([.M513:.M520])" office:value-type="float" office:value="4.75" calcext:value-type="float">
            <text:p>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15" calcext:value-type="float">
            <text:p>515</text:p>
          </table:table-cell>
          <table:table-cell office:value-type="float" office:value="4" calcext:value-type="float">
            <text:p>4</text:p>
          </table:table-cell>
          <table:table-cell table:formula="of:=AVERAGE([.M514:.M521])" office:value-type="float" office:value="4.875" calcext:value-type="float">
            <text:p>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10" calcext:value-type="float">
            <text:p>81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16" calcext:value-type="float">
            <text:p>516</text:p>
          </table:table-cell>
          <table:table-cell office:value-type="float" office:value="4" calcext:value-type="float">
            <text:p>4</text:p>
          </table:table-cell>
          <table:table-cell table:formula="of:=AVERAGE([.M515:.M522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72" calcext:value-type="float">
            <text:p>87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17" calcext:value-type="float">
            <text:p>517</text:p>
          </table:table-cell>
          <table:table-cell office:value-type="float" office:value="4" calcext:value-type="float">
            <text:p>4</text:p>
          </table:table-cell>
          <table:table-cell table:formula="of:=AVERAGE([.M516:.M523])" office:value-type="float" office:value="4.25" calcext:value-type="float">
            <text:p>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17" calcext:value-type="float">
            <text:p>81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18" calcext:value-type="float">
            <text:p>518</text:p>
          </table:table-cell>
          <table:table-cell office:value-type="float" office:value="8" calcext:value-type="float">
            <text:p>8</text:p>
          </table:table-cell>
          <table:table-cell table:formula="of:=AVERAGE([.M517:.M524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57" calcext:value-type="float">
            <text:p>85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19" calcext:value-type="float">
            <text:p>519</text:p>
          </table:table-cell>
          <table:table-cell office:value-type="float" office:value="4" calcext:value-type="float">
            <text:p>4</text:p>
          </table:table-cell>
          <table:table-cell table:formula="of:=AVERAGE([.M518:.M525])" office:value-type="float" office:value="4.625" calcext:value-type="float">
            <text:p>4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86" calcext:value-type="float">
            <text:p>78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20" calcext:value-type="float">
            <text:p>520</text:p>
          </table:table-cell>
          <table:table-cell office:value-type="float" office:value="2" calcext:value-type="float">
            <text:p>2</text:p>
          </table:table-cell>
          <table:table-cell table:formula="of:=AVERAGE([.M519:.M526])" office:value-type="float" office:value="5" calcext:value-type="float">
            <text:p>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26" calcext:value-type="float">
            <text:p>82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21" calcext:value-type="float">
            <text:p>521</text:p>
          </table:table-cell>
          <table:table-cell office:value-type="float" office:value="4" calcext:value-type="float">
            <text:p>4</text:p>
          </table:table-cell>
          <table:table-cell table:formula="of:=AVERAGE([.M520:.M527])" office:value-type="float" office:value="5" calcext:value-type="float">
            <text:p>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99" calcext:value-type="float">
            <text:p>79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22" calcext:value-type="float">
            <text:p>522</text:p>
          </table:table-cell>
          <table:table-cell office:value-type="float" office:value="3" calcext:value-type="float">
            <text:p>3</text:p>
          </table:table-cell>
          <table:table-cell table:formula="of:=AVERAGE([.M521:.M528])" office:value-type="float" office:value="4.5" calcext:value-type="float">
            <text:p>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11" calcext:value-type="float">
            <text:p>81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23" calcext:value-type="float">
            <text:p>523</text:p>
          </table:table-cell>
          <table:table-cell office:value-type="float" office:value="8" calcext:value-type="float">
            <text:p>8</text:p>
          </table:table-cell>
          <table:table-cell table:formula="of:=AVERAGE([.M522:.M529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37" calcext:value-type="float">
            <text:p>83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24" calcext:value-type="float">
            <text:p>524</text:p>
          </table:table-cell>
          <table:table-cell office:value-type="float" office:value="7" calcext:value-type="float">
            <text:p>7</text:p>
          </table:table-cell>
          <table:table-cell table:formula="of:=AVERAGE([.M523:.M530])" office:value-type="float" office:value="4.625" calcext:value-type="float">
            <text:p>4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21" calcext:value-type="float">
            <text:p>82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25" calcext:value-type="float">
            <text:p>525</text:p>
          </table:table-cell>
          <table:table-cell office:value-type="float" office:value="4" calcext:value-type="float">
            <text:p>4</text:p>
          </table:table-cell>
          <table:table-cell table:formula="of:=AVERAGE([.M524:.M531])" office:value-type="float" office:value="4.625" calcext:value-type="float">
            <text:p>4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57" calcext:value-type="float">
            <text:p>75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26" calcext:value-type="float">
            <text:p>526</text:p>
          </table:table-cell>
          <table:table-cell office:value-type="float" office:value="4" calcext:value-type="float">
            <text:p>4</text:p>
          </table:table-cell>
          <table:table-cell table:formula="of:=AVERAGE([.M525:.M532])" office:value-type="float" office:value="4.75" calcext:value-type="float">
            <text:p>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24" calcext:value-type="float">
            <text:p>82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table:formula="of:=AVERAGE([.M526:.M533])" office:value-type="float" office:value="4.25" calcext:value-type="float">
            <text:p>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06" calcext:value-type="float">
            <text:p>80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28" calcext:value-type="float">
            <text:p>528</text:p>
          </table:table-cell>
          <table:table-cell office:value-type="float" office:value="6" calcext:value-type="float">
            <text:p>6</text:p>
          </table:table-cell>
          <table:table-cell table:formula="of:=AVERAGE([.M527:.M534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39" calcext:value-type="float">
            <text:p>73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29" calcext:value-type="float">
            <text:p>529</text:p>
          </table:table-cell>
          <table:table-cell office:value-type="float" office:value="4" calcext:value-type="float">
            <text:p>4</text:p>
          </table:table-cell>
          <table:table-cell table:formula="of:=AVERAGE([.M528:.M535])" office:value-type="float" office:value="3.25" calcext:value-type="float">
            <text:p>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77" calcext:value-type="float">
            <text:p>77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30" calcext:value-type="float">
            <text:p>530</text:p>
          </table:table-cell>
          <table:table-cell office:value-type="float" office:value="4" calcext:value-type="float">
            <text:p>4</text:p>
          </table:table-cell>
          <table:table-cell table:formula="of:=AVERAGE([.M529:.M536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29" calcext:value-type="float">
            <text:p>72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31" calcext:value-type="float">
            <text:p>531</text:p>
          </table:table-cell>
          <table:table-cell office:value-type="float" office:value="4" calcext:value-type="float">
            <text:p>4</text:p>
          </table:table-cell>
          <table:table-cell table:formula="of:=AVERAGE([.M530:.M537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67" calcext:value-type="float">
            <text:p>76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table:formula="of:=AVERAGE([.M531:.M538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08" calcext:value-type="float">
            <text:p>70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33" calcext:value-type="float">
            <text:p>533</text:p>
          </table:table-cell>
          <table:table-cell office:value-type="float" office:value="2" calcext:value-type="float">
            <text:p>2</text:p>
          </table:table-cell>
          <table:table-cell table:formula="of:=AVERAGE([.M532:.M539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22" calcext:value-type="float">
            <text:p>72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34" calcext:value-type="float">
            <text:p>534</text:p>
          </table:table-cell>
          <table:table-cell office:value-type="float" office:value="2" calcext:value-type="float">
            <text:p>2</text:p>
          </table:table-cell>
          <table:table-cell table:formula="of:=AVERAGE([.M533:.M540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06" calcext:value-type="float">
            <text:p>70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35" calcext:value-type="float">
            <text:p>535</text:p>
          </table:table-cell>
          <table:table-cell office:value-type="float" office:value="4" calcext:value-type="float">
            <text:p>4</text:p>
          </table:table-cell>
          <table:table-cell table:formula="of:=AVERAGE([.M534:.M541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06" calcext:value-type="float">
            <text:p>70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36" calcext:value-type="float">
            <text:p>536</text:p>
          </table:table-cell>
          <table:table-cell office:value-type="float" office:value="4" calcext:value-type="float">
            <text:p>4</text:p>
          </table:table-cell>
          <table:table-cell table:formula="of:=AVERAGE([.M535:.M542])" office:value-type="float" office:value="4" calcext:value-type="float">
            <text:p>4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15" calcext:value-type="float">
            <text:p>71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37" calcext:value-type="float">
            <text:p>537</text:p>
          </table:table-cell>
          <table:table-cell office:value-type="float" office:value="4" calcext:value-type="float">
            <text:p>4</text:p>
          </table:table-cell>
          <table:table-cell table:formula="of:=AVERAGE([.M536:.M543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87" calcext:value-type="float">
            <text:p>68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38" calcext:value-type="float">
            <text:p>538</text:p>
          </table:table-cell>
          <table:table-cell office:value-type="float" office:value="6" calcext:value-type="float">
            <text:p>6</text:p>
          </table:table-cell>
          <table:table-cell table:formula="of:=AVERAGE([.M537:.M544])" office:value-type="float" office:value="4.375" calcext:value-type="float">
            <text:p>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95" calcext:value-type="float">
            <text:p>69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39" calcext:value-type="float">
            <text:p>539</text:p>
          </table:table-cell>
          <table:table-cell office:value-type="float" office:value="6" calcext:value-type="float">
            <text:p>6</text:p>
          </table:table-cell>
          <table:table-cell table:formula="of:=AVERAGE([.M538:.M545])" office:value-type="float" office:value="4.25" calcext:value-type="float">
            <text:p>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79" calcext:value-type="float">
            <text:p>67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40" calcext:value-type="float">
            <text:p>540</text:p>
          </table:table-cell>
          <table:table-cell office:value-type="float" office:value="4" calcext:value-type="float">
            <text:p>4</text:p>
          </table:table-cell>
          <table:table-cell table:formula="of:=AVERAGE([.M539:.M546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43" calcext:value-type="float">
            <text:p>64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41" calcext:value-type="float">
            <text:p>541</text:p>
          </table:table-cell>
          <table:table-cell office:value-type="float" office:value="3" calcext:value-type="float">
            <text:p>3</text:p>
          </table:table-cell>
          <table:table-cell table:formula="of:=AVERAGE([.M540:.M547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46" calcext:value-type="float">
            <text:p>64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42" calcext:value-type="float">
            <text:p>542</text:p>
          </table:table-cell>
          <table:table-cell office:value-type="float" office:value="4" calcext:value-type="float">
            <text:p>4</text:p>
          </table:table-cell>
          <table:table-cell table:formula="of:=AVERAGE([.M541:.M548])" office:value-type="float" office:value="3.75" calcext:value-type="float">
            <text:p>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27" calcext:value-type="float">
            <text:p>62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43" calcext:value-type="float">
            <text:p>543</text:p>
          </table:table-cell>
          <table:table-cell office:value-type="float" office:value="3" calcext:value-type="float">
            <text:p>3</text:p>
          </table:table-cell>
          <table:table-cell table:formula="of:=AVERAGE([.M542:.M549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72" calcext:value-type="float">
            <text:p>67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table:formula="of:=AVERAGE([.M543:.M550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45" calcext:value-type="float">
            <text:p>545</text:p>
          </table:table-cell>
          <table:table-cell office:value-type="float" office:value="6" calcext:value-type="float">
            <text:p>6</text:p>
          </table:table-cell>
          <table:table-cell table:formula="of:=AVERAGE([.M544:.M551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33" calcext:value-type="float">
            <text:p>63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46" calcext:value-type="float">
            <text:p>546</text:p>
          </table:table-cell>
          <table:table-cell office:value-type="float" office:value="3" calcext:value-type="float">
            <text:p>3</text:p>
          </table:table-cell>
          <table:table-cell table:formula="of:=AVERAGE([.M545:.M552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16" calcext:value-type="float">
            <text:p>61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table:formula="of:=AVERAGE([.M546:.M553])" office:value-type="float" office:value="2.5" calcext:value-type="float">
            <text:p>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26" calcext:value-type="float">
            <text:p>62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table:formula="of:=AVERAGE([.M547:.M554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52" calcext:value-type="float">
            <text:p>55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49" calcext:value-type="float">
            <text:p>549</text:p>
          </table:table-cell>
          <table:table-cell office:value-type="float" office:value="4" calcext:value-type="float">
            <text:p>4</text:p>
          </table:table-cell>
          <table:table-cell table:formula="of:=AVERAGE([.M548:.M555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11" calcext:value-type="float">
            <text:p>61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50" calcext:value-type="float">
            <text:p>550</text:p>
          </table:table-cell>
          <table:table-cell office:value-type="float" office:value="2" calcext:value-type="float">
            <text:p>2</text:p>
          </table:table-cell>
          <table:table-cell table:formula="of:=AVERAGE([.M549:.M556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89" calcext:value-type="float">
            <text:p>58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51" calcext:value-type="float">
            <text:p>551</text:p>
          </table:table-cell>
          <table:table-cell office:value-type="float" office:value="2" calcext:value-type="float">
            <text:p>2</text:p>
          </table:table-cell>
          <table:table-cell table:formula="of:=AVERAGE([.M550:.M557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51" calcext:value-type="float">
            <text:p>55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  <table:table-cell table:formula="of:=AVERAGE([.M551:.M558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07" calcext:value-type="float">
            <text:p>60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53" calcext:value-type="float">
            <text:p>553</text:p>
          </table:table-cell>
          <table:table-cell office:value-type="float" office:value="4" calcext:value-type="float">
            <text:p>4</text:p>
          </table:table-cell>
          <table:table-cell table:formula="of:=AVERAGE([.M552:.M559])" office:value-type="float" office:value="2.375" calcext:value-type="float">
            <text:p>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37" calcext:value-type="float">
            <text:p>53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54" calcext:value-type="float">
            <text:p>554</text:p>
          </table:table-cell>
          <table:table-cell office:value-type="float" office:value="3" calcext:value-type="float">
            <text:p>3</text:p>
          </table:table-cell>
          <table:table-cell table:formula="of:=AVERAGE([.M553:.M560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12" calcext:value-type="float">
            <text:p>61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table:formula="of:=AVERAGE([.M554:.M561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57" calcext:value-type="float">
            <text:p>55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56" calcext:value-type="float">
            <text:p>556</text:p>
          </table:table-cell>
          <table:table-cell office:value-type="float" office:value="2" calcext:value-type="float">
            <text:p>2</text:p>
          </table:table-cell>
          <table:table-cell table:formula="of:=AVERAGE([.M555:.M562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57" calcext:value-type="float">
            <text:p>55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table:formula="of:=AVERAGE([.M556:.M563])" office:value-type="float" office:value="2.375" calcext:value-type="float">
            <text:p>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58" calcext:value-type="float">
            <text:p>558</text:p>
          </table:table-cell>
          <table:table-cell office:value-type="float" office:value="5" calcext:value-type="float">
            <text:p>5</text:p>
          </table:table-cell>
          <table:table-cell table:formula="of:=AVERAGE([.M557:.M564])" office:value-type="float" office:value="2" calcext:value-type="float">
            <text:p>2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59" calcext:value-type="float">
            <text:p>559</text:p>
          </table:table-cell>
          <table:table-cell office:value-type="float" office:value="3" calcext:value-type="float">
            <text:p>3</text:p>
          </table:table-cell>
          <table:table-cell table:formula="of:=AVERAGE([.M558:.M565])" office:value-type="float" office:value="2.125" calcext:value-type="float">
            <text:p>2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07" calcext:value-type="float">
            <text:p>50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60" calcext:value-type="float">
            <text:p>560</text:p>
          </table:table-cell>
          <table:table-cell office:value-type="float" office:value="3" calcext:value-type="float">
            <text:p>3</text:p>
          </table:table-cell>
          <table:table-cell table:formula="of:=AVERAGE([.M559:.M566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75" calcext:value-type="float">
            <text:p>47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table:formula="of:=AVERAGE([.M560:.M567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23" calcext:value-type="float">
            <text:p>52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AVERAGE([.M561:.M568])" office:value-type="float" office:value="2.5" calcext:value-type="float">
            <text:p>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42" calcext:value-type="float">
            <text:p>44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63" calcext:value-type="float">
            <text:p>563</text:p>
          </table:table-cell>
          <table:table-cell office:value-type="float" office:value="2" calcext:value-type="float">
            <text:p>2</text:p>
          </table:table-cell>
          <table:table-cell table:formula="of:=AVERAGE([.M562:.M569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86" calcext:value-type="float">
            <text:p>48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64" calcext:value-type="float">
            <text:p>564</text:p>
          </table:table-cell>
          <table:table-cell office:value-type="float" office:value="6" calcext:value-type="float">
            <text:p>6</text:p>
          </table:table-cell>
          <table:table-cell table:formula="of:=AVERAGE([.M563:.M570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47" calcext:value-type="float">
            <text:p>44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65" calcext:value-type="float">
            <text:p>565</text:p>
          </table:table-cell>
          <table:table-cell office:value-type="float" office:value="2" calcext:value-type="float">
            <text:p>2</text:p>
          </table:table-cell>
          <table:table-cell table:formula="of:=AVERAGE([.M564:.M571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79" calcext:value-type="float">
            <text:p>47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66" calcext:value-type="float">
            <text:p>566</text:p>
          </table:table-cell>
          <table:table-cell office:value-type="float" office:value="3" calcext:value-type="float">
            <text:p>3</text:p>
          </table:table-cell>
          <table:table-cell table:formula="of:=AVERAGE([.M565:.M572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67" calcext:value-type="float">
            <text:p>567</text:p>
          </table:table-cell>
          <table:table-cell office:value-type="float" office:value="5" calcext:value-type="float">
            <text:p>5</text:p>
          </table:table-cell>
          <table:table-cell table:formula="of:=AVERAGE([.M566:.M573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37" calcext:value-type="float">
            <text:p>43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68" calcext:value-type="float">
            <text:p>568</text:p>
          </table:table-cell>
          <table:table-cell office:value-type="float" office:value="5" calcext:value-type="float">
            <text:p>5</text:p>
          </table:table-cell>
          <table:table-cell table:formula="of:=AVERAGE([.M567:.M574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  <table:table-cell table:formula="of:=AVERAGE([.M568:.M575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89" calcext:value-type="float">
            <text:p>38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70" calcext:value-type="float">
            <text:p>570</text:p>
          </table:table-cell>
          <table:table-cell office:value-type="float" office:value="4" calcext:value-type="float">
            <text:p>4</text:p>
          </table:table-cell>
          <table:table-cell table:formula="of:=AVERAGE([.M569:.M576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42" calcext:value-type="float">
            <text:p>44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71" calcext:value-type="float">
            <text:p>571</text:p>
          </table:table-cell>
          <table:table-cell office:value-type="float" office:value="5" calcext:value-type="float">
            <text:p>5</text:p>
          </table:table-cell>
          <table:table-cell table:formula="of:=AVERAGE([.M570:.M577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72" calcext:value-type="float">
            <text:p>572</text:p>
          </table:table-cell>
          <table:table-cell office:value-type="float" office:value="2" calcext:value-type="float">
            <text:p>2</text:p>
          </table:table-cell>
          <table:table-cell table:formula="of:=AVERAGE([.M571:.M578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29" calcext:value-type="float">
            <text:p>42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73" calcext:value-type="float">
            <text:p>573</text:p>
          </table:table-cell>
          <table:table-cell office:value-type="float" office:value="3" calcext:value-type="float">
            <text:p>3</text:p>
          </table:table-cell>
          <table:table-cell table:formula="of:=AVERAGE([.M572:.M579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74" calcext:value-type="float">
            <text:p>574</text:p>
          </table:table-cell>
          <table:table-cell office:value-type="float" office:value="3" calcext:value-type="float">
            <text:p>3</text:p>
          </table:table-cell>
          <table:table-cell table:formula="of:=AVERAGE([.M573:.M580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24" calcext:value-type="float">
            <text:p>42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75" calcext:value-type="float">
            <text:p>575</text:p>
          </table:table-cell>
          <table:table-cell office:value-type="float" office:value="2" calcext:value-type="float">
            <text:p>2</text:p>
          </table:table-cell>
          <table:table-cell table:formula="of:=AVERAGE([.M574:.M581])" office:value-type="float" office:value="2.5" calcext:value-type="float">
            <text:p>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76" calcext:value-type="float">
            <text:p>576</text:p>
          </table:table-cell>
          <table:table-cell office:value-type="float" office:value="3" calcext:value-type="float">
            <text:p>3</text:p>
          </table:table-cell>
          <table:table-cell table:formula="of:=AVERAGE([.M575:.M582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table:formula="of:=AVERAGE([.M576:.M583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78" calcext:value-type="float">
            <text:p>578</text:p>
          </table:table-cell>
          <table:table-cell office:value-type="float" office:value="2" calcext:value-type="float">
            <text:p>2</text:p>
          </table:table-cell>
          <table:table-cell table:formula="of:=AVERAGE([.M577:.M584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91" calcext:value-type="float">
            <text:p>39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79" calcext:value-type="float">
            <text:p>579</text:p>
          </table:table-cell>
          <table:table-cell office:value-type="float" office:value="4" calcext:value-type="float">
            <text:p>4</text:p>
          </table:table-cell>
          <table:table-cell table:formula="of:=AVERAGE([.M578:.M585])" office:value-type="float" office:value="3.25" calcext:value-type="float">
            <text:p>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63" calcext:value-type="float">
            <text:p>36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80" calcext:value-type="float">
            <text:p>580</text:p>
          </table:table-cell>
          <table:table-cell office:value-type="float" office:value="3" calcext:value-type="float">
            <text:p>3</text:p>
          </table:table-cell>
          <table:table-cell table:formula="of:=AVERAGE([.M579:.M586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41" calcext:value-type="float">
            <text:p>34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81" calcext:value-type="float">
            <text:p>581</text:p>
          </table:table-cell>
          <table:table-cell office:value-type="float" office:value="3" calcext:value-type="float">
            <text:p>3</text:p>
          </table:table-cell>
          <table:table-cell table:formula="of:=AVERAGE([.M580:.M587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82" calcext:value-type="float">
            <text:p>582</text:p>
          </table:table-cell>
          <table:table-cell office:value-type="float" office:value="5" calcext:value-type="float">
            <text:p>5</text:p>
          </table:table-cell>
          <table:table-cell table:formula="of:=AVERAGE([.M581:.M588])" office:value-type="float" office:value="4.375" calcext:value-type="float">
            <text:p>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83" calcext:value-type="float">
            <text:p>583</text:p>
          </table:table-cell>
          <table:table-cell office:value-type="float" office:value="5" calcext:value-type="float">
            <text:p>5</text:p>
          </table:table-cell>
          <table:table-cell table:formula="of:=AVERAGE([.M582:.M589])" office:value-type="float" office:value="4.25" calcext:value-type="float">
            <text:p>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84" calcext:value-type="float">
            <text:p>584</text:p>
          </table:table-cell>
          <table:table-cell office:value-type="float" office:value="5" calcext:value-type="float">
            <text:p>5</text:p>
          </table:table-cell>
          <table:table-cell table:formula="of:=AVERAGE([.M583:.M590])" office:value-type="float" office:value="4.25" calcext:value-type="float">
            <text:p>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18" calcext:value-type="float">
            <text:p>31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85" calcext:value-type="float">
            <text:p>585</text:p>
          </table:table-cell>
          <table:table-cell office:value-type="float" office:value="2" calcext:value-type="float">
            <text:p>2</text:p>
          </table:table-cell>
          <table:table-cell table:formula="of:=AVERAGE([.M584:.M591])" office:value-type="float" office:value="4.5" calcext:value-type="float">
            <text:p>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86" calcext:value-type="float">
            <text:p>586</text:p>
          </table:table-cell>
          <table:table-cell office:value-type="float" office:value="8" calcext:value-type="float">
            <text:p>8</text:p>
          </table:table-cell>
          <table:table-cell table:formula="of:=AVERAGE([.M585:.M592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87" calcext:value-type="float">
            <text:p>587</text:p>
          </table:table-cell>
          <table:table-cell office:value-type="float" office:value="3" calcext:value-type="float">
            <text:p>3</text:p>
          </table:table-cell>
          <table:table-cell table:formula="of:=AVERAGE([.M586:.M593])" office:value-type="float" office:value="3.25" calcext:value-type="float">
            <text:p>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2" calcext:value-type="float">
            <text:p>28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88" calcext:value-type="float">
            <text:p>588</text:p>
          </table:table-cell>
          <table:table-cell office:value-type="float" office:value="3" calcext:value-type="float">
            <text:p>3</text:p>
          </table:table-cell>
          <table:table-cell table:formula="of:=AVERAGE([.M587:.M594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95" calcext:value-type="float">
            <text:p>29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89" calcext:value-type="float">
            <text:p>589</text:p>
          </table:table-cell>
          <table:table-cell office:value-type="float" office:value="5" calcext:value-type="float">
            <text:p>5</text:p>
          </table:table-cell>
          <table:table-cell table:formula="of:=AVERAGE([.M588:.M595])" office:value-type="float" office:value="3.75" calcext:value-type="float">
            <text:p>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69" calcext:value-type="float">
            <text:p>26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formula="of:=AVERAGE([.M589:.M596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7" calcext:value-type="float">
            <text:p>28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formula="of:=AVERAGE([.M590:.M597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92" calcext:value-type="float">
            <text:p>592</text:p>
          </table:table-cell>
          <table:table-cell office:value-type="float" office:value="7" calcext:value-type="float">
            <text:p>7</text:p>
          </table:table-cell>
          <table:table-cell table:formula="of:=AVERAGE([.M591:.M598])" office:value-type="float" office:value="3.75" calcext:value-type="float">
            <text:p>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93" calcext:value-type="float">
            <text:p>593</text:p>
          </table:table-cell>
          <table:table-cell office:value-type="float" office:value="4" calcext:value-type="float">
            <text:p>4</text:p>
          </table:table-cell>
          <table:table-cell table:formula="of:=AVERAGE([.M592:.M599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94" calcext:value-type="float">
            <text:p>594</text:p>
          </table:table-cell>
          <table:table-cell office:value-type="float" office:value="3" calcext:value-type="float">
            <text:p>3</text:p>
          </table:table-cell>
          <table:table-cell table:formula="of:=AVERAGE([.M593:.M600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63" calcext:value-type="float">
            <text:p>26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95" calcext:value-type="float">
            <text:p>595</text:p>
          </table:table-cell>
          <table:table-cell office:value-type="float" office:value="5" calcext:value-type="float">
            <text:p>5</text:p>
          </table:table-cell>
          <table:table-cell table:formula="of:=AVERAGE([.M594:.M601])" office:value-type="float" office:value="4.75" calcext:value-type="float">
            <text:p>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37" calcext:value-type="float">
            <text:p>23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96" calcext:value-type="float">
            <text:p>596</text:p>
          </table:table-cell>
          <table:table-cell office:value-type="float" office:value="6" calcext:value-type="float">
            <text:p>6</text:p>
          </table:table-cell>
          <table:table-cell table:formula="of:=AVERAGE([.M595:.M602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97" calcext:value-type="float">
            <text:p>597</text:p>
          </table:table-cell>
          <table:table-cell office:value-type="float" office:value="3" calcext:value-type="float">
            <text:p>3</text:p>
          </table:table-cell>
          <table:table-cell table:formula="of:=AVERAGE([.M596:.M603])" office:value-type="float" office:value="4.375" calcext:value-type="float">
            <text:p>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29" calcext:value-type="float">
            <text:p>22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98" calcext:value-type="float">
            <text:p>598</text:p>
          </table:table-cell>
          <table:table-cell office:value-type="float" office:value="3" calcext:value-type="float">
            <text:p>3</text:p>
          </table:table-cell>
          <table:table-cell table:formula="of:=AVERAGE([.M597:.M604])" office:value-type="float" office:value="4.5" calcext:value-type="float">
            <text:p>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599" calcext:value-type="float">
            <text:p>599</text:p>
          </table:table-cell>
          <table:table-cell office:value-type="float" office:value="7" calcext:value-type="float">
            <text:p>7</text:p>
          </table:table-cell>
          <table:table-cell table:formula="of:=AVERAGE([.M598:.M605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35" calcext:value-type="float">
            <text:p>23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AVERAGE([.M599:.M606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01" calcext:value-type="float">
            <text:p>601</text:p>
          </table:table-cell>
          <table:table-cell office:value-type="float" office:value="6" calcext:value-type="float">
            <text:p>6</text:p>
          </table:table-cell>
          <table:table-cell table:formula="of:=AVERAGE([.M600:.M607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02" calcext:value-type="float">
            <text:p>602</text:p>
          </table:table-cell>
          <table:table-cell office:value-type="float" office:value="4" calcext:value-type="float">
            <text:p>4</text:p>
          </table:table-cell>
          <table:table-cell table:formula="of:=AVERAGE([.M601:.M608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table:formula="of:=AVERAGE([.M602:.M609])" office:value-type="float" office:value="3.25" calcext:value-type="float">
            <text:p>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04" calcext:value-type="float">
            <text:p>604</text:p>
          </table:table-cell>
          <table:table-cell office:value-type="float" office:value="3" calcext:value-type="float">
            <text:p>3</text:p>
          </table:table-cell>
          <table:table-cell table:formula="of:=AVERAGE([.M603:.M610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05" calcext:value-type="float">
            <text:p>605</text:p>
          </table:table-cell>
          <table:table-cell office:value-type="float" office:value="3" calcext:value-type="float">
            <text:p>3</text:p>
          </table:table-cell>
          <table:table-cell table:formula="of:=AVERAGE([.M604:.M611])" office:value-type="float" office:value="2.5" calcext:value-type="float">
            <text:p>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06" calcext:value-type="float">
            <text:p>606</text:p>
          </table:table-cell>
          <table:table-cell office:value-type="float" office:value="3" calcext:value-type="float">
            <text:p>3</text:p>
          </table:table-cell>
          <table:table-cell table:formula="of:=AVERAGE([.M605:.M612])" office:value-type="float" office:value="2.375" calcext:value-type="float">
            <text:p>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07" calcext:value-type="float">
            <text:p>607</text:p>
          </table:table-cell>
          <table:table-cell office:value-type="float" office:value="5" calcext:value-type="float">
            <text:p>5</text:p>
          </table:table-cell>
          <table:table-cell table:formula="of:=AVERAGE([.M606:.M613])" office:value-type="float" office:value="2.375" calcext:value-type="float">
            <text:p>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  <table:table-cell table:formula="of:=AVERAGE([.M607:.M614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table:formula="of:=AVERAGE([.M608:.M615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10" calcext:value-type="float">
            <text:p>610</text:p>
          </table:table-cell>
          <table:table-cell office:value-type="float" office:value="3" calcext:value-type="float">
            <text:p>3</text:p>
          </table:table-cell>
          <table:table-cell table:formula="of:=AVERAGE([.M609:.M616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AVERAGE([.M610:.M617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12" calcext:value-type="float">
            <text:p>612</text:p>
          </table:table-cell>
          <table:table-cell office:value-type="float" office:value="8" calcext:value-type="float">
            <text:p>8</text:p>
          </table:table-cell>
          <table:table-cell table:formula="of:=AVERAGE([.M611:.M618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13" calcext:value-type="float">
            <text:p>613</text:p>
          </table:table-cell>
          <table:table-cell office:value-type="float" office:value="3" calcext:value-type="float">
            <text:p>3</text:p>
          </table:table-cell>
          <table:table-cell table:formula="of:=AVERAGE([.M612:.M619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14" calcext:value-type="float">
            <text:p>614</text:p>
          </table:table-cell>
          <table:table-cell office:value-type="float" office:value="6" calcext:value-type="float">
            <text:p>6</text:p>
          </table:table-cell>
          <table:table-cell table:formula="of:=AVERAGE([.M613:.M620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15" calcext:value-type="float">
            <text:p>615</text:p>
          </table:table-cell>
          <table:table-cell office:value-type="float" office:value="1" calcext:value-type="float">
            <text:p>1</text:p>
          </table:table-cell>
          <table:table-cell table:formula="of:=AVERAGE([.M614:.M621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16" calcext:value-type="float">
            <text:p>616</text:p>
          </table:table-cell>
          <table:table-cell office:value-type="float" office:value="2" calcext:value-type="float">
            <text:p>2</text:p>
          </table:table-cell>
          <table:table-cell table:formula="of:=AVERAGE([.M615:.M622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17" calcext:value-type="float">
            <text:p>617</text:p>
          </table:table-cell>
          <table:table-cell office:value-type="float" office:value="2" calcext:value-type="float">
            <text:p>2</text:p>
          </table:table-cell>
          <table:table-cell table:formula="of:=AVERAGE([.M616:.M623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18" calcext:value-type="float">
            <text:p>618</text:p>
          </table:table-cell>
          <table:table-cell office:value-type="float" office:value="6" calcext:value-type="float">
            <text:p>6</text:p>
          </table:table-cell>
          <table:table-cell table:formula="of:=AVERAGE([.M617:.M624])" office:value-type="float" office:value="2.125" calcext:value-type="float">
            <text:p>2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table:formula="of:=AVERAGE([.M618:.M625])" office:value-type="float" office:value="2.5" calcext:value-type="float">
            <text:p>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20" calcext:value-type="float">
            <text:p>620</text:p>
          </table:table-cell>
          <table:table-cell office:value-type="float" office:value="2" calcext:value-type="float">
            <text:p>2</text:p>
          </table:table-cell>
          <table:table-cell table:formula="of:=AVERAGE([.M619:.M626])" office:value-type="float" office:value="2.5" calcext:value-type="float">
            <text:p>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  <table:table-cell table:formula="of:=AVERAGE([.M620:.M627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22" calcext:value-type="float">
            <text:p>622</text:p>
          </table:table-cell>
          <table:table-cell office:value-type="float" office:value="2" calcext:value-type="float">
            <text:p>2</text:p>
          </table:table-cell>
          <table:table-cell table:formula="of:=AVERAGE([.M621:.M628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23" calcext:value-type="float">
            <text:p>623</text:p>
          </table:table-cell>
          <table:table-cell office:value-type="float" office:value="4" calcext:value-type="float">
            <text:p>4</text:p>
          </table:table-cell>
          <table:table-cell table:formula="of:=AVERAGE([.M622:.M629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24" calcext:value-type="float">
            <text:p>624</text:p>
          </table:table-cell>
          <table:table-cell office:value-type="float" office:value="2" calcext:value-type="float">
            <text:p>2</text:p>
          </table:table-cell>
          <table:table-cell table:formula="of:=AVERAGE([.M623:.M630])" office:value-type="float" office:value="3.75" calcext:value-type="float">
            <text:p>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25" calcext:value-type="float">
            <text:p>625</text:p>
          </table:table-cell>
          <table:table-cell office:value-type="float" office:value="5" calcext:value-type="float">
            <text:p>5</text:p>
          </table:table-cell>
          <table:table-cell table:formula="of:=AVERAGE([.M624:.M631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26" calcext:value-type="float">
            <text:p>626</text:p>
          </table:table-cell>
          <table:table-cell office:value-type="float" office:value="4" calcext:value-type="float">
            <text:p>4</text:p>
          </table:table-cell>
          <table:table-cell table:formula="of:=AVERAGE([.M625:.M632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27" calcext:value-type="float">
            <text:p>627</text:p>
          </table:table-cell>
          <table:table-cell office:value-type="float" office:value="9" calcext:value-type="float">
            <text:p>9</text:p>
          </table:table-cell>
          <table:table-cell table:formula="of:=AVERAGE([.M626:.M633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28" calcext:value-type="float">
            <text:p>628</text:p>
          </table:table-cell>
          <table:table-cell office:value-type="float" office:value="3" calcext:value-type="float">
            <text:p>3</text:p>
          </table:table-cell>
          <table:table-cell table:formula="of:=AVERAGE([.M627:.M634])" office:value-type="float" office:value="4.375" calcext:value-type="float">
            <text:p>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29" calcext:value-type="float">
            <text:p>629</text:p>
          </table:table-cell>
          <table:table-cell office:value-type="float" office:value="4" calcext:value-type="float">
            <text:p>4</text:p>
          </table:table-cell>
          <table:table-cell table:formula="of:=AVERAGE([.M628:.M635])" office:value-type="float" office:value="4.375" calcext:value-type="float">
            <text:p>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30" calcext:value-type="float">
            <text:p>630</text:p>
          </table:table-cell>
          <table:table-cell office:value-type="float" office:value="2" calcext:value-type="float">
            <text:p>2</text:p>
          </table:table-cell>
          <table:table-cell table:formula="of:=AVERAGE([.M629:.M636])" office:value-type="float" office:value="4.25" calcext:value-type="float">
            <text:p>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31" calcext:value-type="float">
            <text:p>631</text:p>
          </table:table-cell>
          <table:table-cell office:value-type="float" office:value="4" calcext:value-type="float">
            <text:p>4</text:p>
          </table:table-cell>
          <table:table-cell table:formula="of:=AVERAGE([.M630:.M637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32" calcext:value-type="float">
            <text:p>632</text:p>
          </table:table-cell>
          <table:table-cell office:value-type="float" office:value="4" calcext:value-type="float">
            <text:p>4</text:p>
          </table:table-cell>
          <table:table-cell table:formula="of:=AVERAGE([.M631:.M638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33" calcext:value-type="float">
            <text:p>633</text:p>
          </table:table-cell>
          <table:table-cell office:value-type="float" office:value="5" calcext:value-type="float">
            <text:p>5</text:p>
          </table:table-cell>
          <table:table-cell table:formula="of:=AVERAGE([.M632:.M639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34" calcext:value-type="float">
            <text:p>634</text:p>
          </table:table-cell>
          <table:table-cell office:value-type="float" office:value="3" calcext:value-type="float">
            <text:p>3</text:p>
          </table:table-cell>
          <table:table-cell table:formula="of:=AVERAGE([.M633:.M640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35" calcext:value-type="float">
            <text:p>635</text:p>
          </table:table-cell>
          <table:table-cell office:value-type="float" office:value="2" calcext:value-type="float">
            <text:p>2</text:p>
          </table:table-cell>
          <table:table-cell table:formula="of:=AVERAGE([.M634:.M641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table:formula="of:=AVERAGE([.M635:.M642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37" calcext:value-type="float">
            <text:p>637</text:p>
          </table:table-cell>
          <table:table-cell office:value-type="float" office:value="7" calcext:value-type="float">
            <text:p>7</text:p>
          </table:table-cell>
          <table:table-cell table:formula="of:=AVERAGE([.M636:.M643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38" calcext:value-type="float">
            <text:p>638</text:p>
          </table:table-cell>
          <table:table-cell office:value-type="float" office:value="2" calcext:value-type="float">
            <text:p>2</text:p>
          </table:table-cell>
          <table:table-cell table:formula="of:=AVERAGE([.M637:.M644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39" calcext:value-type="float">
            <text:p>639</text:p>
          </table:table-cell>
          <table:table-cell office:value-type="float" office:value="5" calcext:value-type="float">
            <text:p>5</text:p>
          </table:table-cell>
          <table:table-cell table:formula="of:=AVERAGE([.M638:.M645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table:formula="of:=AVERAGE([.M639:.M646])" office:value-type="float" office:value="4" calcext:value-type="float">
            <text:p>4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41" calcext:value-type="float">
            <text:p>641</text:p>
          </table:table-cell>
          <table:table-cell office:value-type="float" office:value="5" calcext:value-type="float">
            <text:p>5</text:p>
          </table:table-cell>
          <table:table-cell table:formula="of:=AVERAGE([.M640:.M647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42" calcext:value-type="float">
            <text:p>642</text:p>
          </table:table-cell>
          <table:table-cell office:value-type="float" office:value="4" calcext:value-type="float">
            <text:p>4</text:p>
          </table:table-cell>
          <table:table-cell table:formula="of:=AVERAGE([.M641:.M648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43" calcext:value-type="float">
            <text:p>643</text:p>
          </table:table-cell>
          <table:table-cell office:value-type="float" office:value="2" calcext:value-type="float">
            <text:p>2</text:p>
          </table:table-cell>
          <table:table-cell table:formula="of:=AVERAGE([.M642:.M649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44" calcext:value-type="float">
            <text:p>644</text:p>
          </table:table-cell>
          <table:table-cell office:value-type="float" office:value="5" calcext:value-type="float">
            <text:p>5</text:p>
          </table:table-cell>
          <table:table-cell table:formula="of:=AVERAGE([.M643:.M650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45" calcext:value-type="float">
            <text:p>645</text:p>
          </table:table-cell>
          <table:table-cell office:value-type="float" office:value="2" calcext:value-type="float">
            <text:p>2</text:p>
          </table:table-cell>
          <table:table-cell table:formula="of:=AVERAGE([.M644:.M651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46" calcext:value-type="float">
            <text:p>646</text:p>
          </table:table-cell>
          <table:table-cell office:value-type="float" office:value="2" calcext:value-type="float">
            <text:p>2</text:p>
          </table:table-cell>
          <table:table-cell table:formula="of:=AVERAGE([.M645:.M652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47" calcext:value-type="float">
            <text:p>647</text:p>
          </table:table-cell>
          <table:table-cell office:value-type="float" office:value="2" calcext:value-type="float">
            <text:p>2</text:p>
          </table:table-cell>
          <table:table-cell table:formula="of:=AVERAGE([.M646:.M653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48" calcext:value-type="float">
            <text:p>648</text:p>
          </table:table-cell>
          <table:table-cell office:value-type="float" office:value="2" calcext:value-type="float">
            <text:p>2</text:p>
          </table:table-cell>
          <table:table-cell table:formula="of:=AVERAGE([.M647:.M654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49" calcext:value-type="float">
            <text:p>649</text:p>
          </table:table-cell>
          <table:table-cell office:value-type="float" office:value="4" calcext:value-type="float">
            <text:p>4</text:p>
          </table:table-cell>
          <table:table-cell table:formula="of:=AVERAGE([.M648:.M655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50" calcext:value-type="float">
            <text:p>650</text:p>
          </table:table-cell>
          <table:table-cell office:value-type="float" office:value="4" calcext:value-type="float">
            <text:p>4</text:p>
          </table:table-cell>
          <table:table-cell table:formula="of:=AVERAGE([.M649:.M656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  <table:table-cell table:formula="of:=AVERAGE([.M650:.M657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52" calcext:value-type="float">
            <text:p>652</text:p>
          </table:table-cell>
          <table:table-cell office:value-type="float" office:value="6" calcext:value-type="float">
            <text:p>6</text:p>
          </table:table-cell>
          <table:table-cell table:formula="of:=AVERAGE([.M651:.M658])" office:value-type="float" office:value="4.25" calcext:value-type="float">
            <text:p>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53" calcext:value-type="float">
            <text:p>653</text:p>
          </table:table-cell>
          <table:table-cell office:value-type="float" office:value="4" calcext:value-type="float">
            <text:p>4</text:p>
          </table:table-cell>
          <table:table-cell table:formula="of:=AVERAGE([.M652:.M659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54" calcext:value-type="float">
            <text:p>654</text:p>
          </table:table-cell>
          <table:table-cell office:value-type="float" office:value="5" calcext:value-type="float">
            <text:p>5</text:p>
          </table:table-cell>
          <table:table-cell table:formula="of:=AVERAGE([.M653:.M660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55" calcext:value-type="float">
            <text:p>655</text:p>
          </table:table-cell>
          <table:table-cell office:value-type="float" office:value="5" calcext:value-type="float">
            <text:p>5</text:p>
          </table:table-cell>
          <table:table-cell table:formula="of:=AVERAGE([.M654:.M661])" office:value-type="float" office:value="4" calcext:value-type="float">
            <text:p>4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56" calcext:value-type="float">
            <text:p>656</text:p>
          </table:table-cell>
          <table:table-cell office:value-type="float" office:value="5" calcext:value-type="float">
            <text:p>5</text:p>
          </table:table-cell>
          <table:table-cell table:formula="of:=AVERAGE([.M655:.M662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  <table:table-cell table:formula="of:=AVERAGE([.M656:.M663])" office:value-type="float" office:value="3.75" calcext:value-type="float">
            <text:p>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58" calcext:value-type="float">
            <text:p>658</text:p>
          </table:table-cell>
          <table:table-cell office:value-type="float" office:value="2" calcext:value-type="float">
            <text:p>2</text:p>
          </table:table-cell>
          <table:table-cell table:formula="of:=AVERAGE([.M657:.M664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59" calcext:value-type="float">
            <text:p>659</text:p>
          </table:table-cell>
          <table:table-cell office:value-type="float" office:value="4" calcext:value-type="float">
            <text:p>4</text:p>
          </table:table-cell>
          <table:table-cell table:formula="of:=AVERAGE([.M658:.M665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  <table:table-cell table:formula="of:=AVERAGE([.M659:.M666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61" calcext:value-type="float">
            <text:p>661</text:p>
          </table:table-cell>
          <table:table-cell office:value-type="float" office:value="6" calcext:value-type="float">
            <text:p>6</text:p>
          </table:table-cell>
          <table:table-cell table:formula="of:=AVERAGE([.M660:.M667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62" calcext:value-type="float">
            <text:p>662</text:p>
          </table:table-cell>
          <table:table-cell office:value-type="float" office:value="2" calcext:value-type="float">
            <text:p>2</text:p>
          </table:table-cell>
          <table:table-cell table:formula="of:=AVERAGE([.M661:.M668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63" calcext:value-type="float">
            <text:p>663</text:p>
          </table:table-cell>
          <table:table-cell office:value-type="float" office:value="2" calcext:value-type="float">
            <text:p>2</text:p>
          </table:table-cell>
          <table:table-cell table:formula="of:=AVERAGE([.M662:.M669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64" calcext:value-type="float">
            <text:p>664</text:p>
          </table:table-cell>
          <table:table-cell office:value-type="float" office:value="4" calcext:value-type="float">
            <text:p>4</text:p>
          </table:table-cell>
          <table:table-cell table:formula="of:=AVERAGE([.M663:.M670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65" calcext:value-type="float">
            <text:p>665</text:p>
          </table:table-cell>
          <table:table-cell office:value-type="float" office:value="2" calcext:value-type="float">
            <text:p>2</text:p>
          </table:table-cell>
          <table:table-cell table:formula="of:=AVERAGE([.M664:.M671])" office:value-type="float" office:value="2.375" calcext:value-type="float">
            <text:p>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66" calcext:value-type="float">
            <text:p>666</text:p>
          </table:table-cell>
          <table:table-cell office:value-type="float" office:value="3" calcext:value-type="float">
            <text:p>3</text:p>
          </table:table-cell>
          <table:table-cell table:formula="of:=AVERAGE([.M665:.M672])" office:value-type="float" office:value="2.5" calcext:value-type="float">
            <text:p>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  <table:table-cell table:formula="of:=AVERAGE([.M666:.M673])" office:value-type="float" office:value="2.375" calcext:value-type="float">
            <text:p>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68" calcext:value-type="float">
            <text:p>668</text:p>
          </table:table-cell>
          <table:table-cell office:value-type="float" office:value="5" calcext:value-type="float">
            <text:p>5</text:p>
          </table:table-cell>
          <table:table-cell table:formula="of:=AVERAGE([.M667:.M674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table:formula="of:=AVERAGE([.M668:.M675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70" calcext:value-type="float">
            <text:p>670</text:p>
          </table:table-cell>
          <table:table-cell office:value-type="float" office:value="3" calcext:value-type="float">
            <text:p>3</text:p>
          </table:table-cell>
          <table:table-cell table:formula="of:=AVERAGE([.M669:.M676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table:formula="of:=AVERAGE([.M670:.M677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72" calcext:value-type="float">
            <text:p>672</text:p>
          </table:table-cell>
          <table:table-cell office:value-type="float" office:value="7" calcext:value-type="float">
            <text:p>7</text:p>
          </table:table-cell>
          <table:table-cell table:formula="of:=AVERAGE([.M671:.M678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  <table:table-cell table:formula="of:=AVERAGE([.M672:.M679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74" calcext:value-type="float">
            <text:p>674</text:p>
          </table:table-cell>
          <table:table-cell office:value-type="float" office:value="6" calcext:value-type="float">
            <text:p>6</text:p>
          </table:table-cell>
          <table:table-cell table:formula="of:=AVERAGE([.M673:.M680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75" calcext:value-type="float">
            <text:p>675</text:p>
          </table:table-cell>
          <table:table-cell office:value-type="float" office:value="2" calcext:value-type="float">
            <text:p>2</text:p>
          </table:table-cell>
          <table:table-cell table:formula="of:=AVERAGE([.M674:.M681])" office:value-type="float" office:value="3.25" calcext:value-type="float">
            <text:p>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table:formula="of:=AVERAGE([.M675:.M682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77" calcext:value-type="float">
            <text:p>677</text:p>
          </table:table-cell>
          <table:table-cell office:value-type="float" office:value="1" calcext:value-type="float">
            <text:p>1</text:p>
          </table:table-cell>
          <table:table-cell table:formula="of:=AVERAGE([.M676:.M683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78" calcext:value-type="float">
            <text:p>678</text:p>
          </table:table-cell>
          <table:table-cell office:value-type="float" office:value="2" calcext:value-type="float">
            <text:p>2</text:p>
          </table:table-cell>
          <table:table-cell table:formula="of:=AVERAGE([.M677:.M684])" office:value-type="float" office:value="2.125" calcext:value-type="float">
            <text:p>2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79" calcext:value-type="float">
            <text:p>679</text:p>
          </table:table-cell>
          <table:table-cell office:value-type="float" office:value="6" calcext:value-type="float">
            <text:p>6</text:p>
          </table:table-cell>
          <table:table-cell table:formula="of:=AVERAGE([.M678:.M685])" office:value-type="float" office:value="2.5" calcext:value-type="float">
            <text:p>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80" calcext:value-type="float">
            <text:p>680</text:p>
          </table:table-cell>
          <table:table-cell office:value-type="float" office:value="3" calcext:value-type="float">
            <text:p>3</text:p>
          </table:table-cell>
          <table:table-cell table:formula="of:=AVERAGE([.M679:.M686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81" calcext:value-type="float">
            <text:p>681</text:p>
          </table:table-cell>
          <table:table-cell office:value-type="float" office:value="2" calcext:value-type="float">
            <text:p>2</text:p>
          </table:table-cell>
          <table:table-cell table:formula="of:=AVERAGE([.M680:.M687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formula="of:=AVERAGE([.M681:.M688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83" calcext:value-type="float">
            <text:p>683</text:p>
          </table:table-cell>
          <table:table-cell office:value-type="float" office:value="5" calcext:value-type="float">
            <text:p>5</text:p>
          </table:table-cell>
          <table:table-cell table:formula="of:=AVERAGE([.M682:.M689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84" calcext:value-type="float">
            <text:p>684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686:.N1684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687:.N1685])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86" calcext:value-type="float">
            <text:p>686</text:p>
          </table:table-cell>
          <table:table-cell office:value-type="float" office:value="7" calcext:value-type="float">
            <text:p>7</text:p>
          </table:table-cell>
          <table:table-cell/>
          <table:table-cell table:formula="of:=MAX([.N688:.N1686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689:.N1687])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88" calcext:value-type="float">
            <text:p>688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690:.N1688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89" calcext:value-type="float">
            <text:p>689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691:.N1689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692:.N1690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91" calcext:value-type="float">
            <text:p>691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693:.N1691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694:.N1692])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93" calcext:value-type="float">
            <text:p>693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695:.N1693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696:.N1694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95" calcext:value-type="float">
            <text:p>695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697:.N1695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698:.N1696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97" calcext:value-type="float">
            <text:p>697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699:.N1697])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98" calcext:value-type="float">
            <text:p>698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00:.N1698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699" calcext:value-type="float">
            <text:p>699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01:.N1699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02:.N1700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01" calcext:value-type="float">
            <text:p>701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03:.N1701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02" calcext:value-type="float">
            <text:p>702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704:.N1702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03" calcext:value-type="float">
            <text:p>703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05:.N1703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04" calcext:value-type="float">
            <text:p>704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06:.N1704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05" calcext:value-type="float">
            <text:p>705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07:.N1705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08:.N1706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09:.N1707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10:.N1708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09" calcext:value-type="float">
            <text:p>709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711:.N1709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12:.N1710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13:.N1711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12" calcext:value-type="float">
            <text:p>712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14:.N1712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13" calcext:value-type="float">
            <text:p>713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15:.N1713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14" calcext:value-type="float">
            <text:p>714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16:.N1714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17:.N1715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18:.N1716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17" calcext:value-type="float">
            <text:p>71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19:.N1717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18" calcext:value-type="float">
            <text:p>718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20:.N1718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21:.N1719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22:.N1720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21" calcext:value-type="float">
            <text:p>721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23:.N1721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22" calcext:value-type="float">
            <text:p>722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24:.N1722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23" calcext:value-type="float">
            <text:p>723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25:.N1723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24" calcext:value-type="float">
            <text:p>724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26:.N1724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27:.N1725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26" calcext:value-type="float">
            <text:p>726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28:.N1726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27" calcext:value-type="float">
            <text:p>727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29:.N1727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28" calcext:value-type="float">
            <text:p>728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30:.N1728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29" calcext:value-type="float">
            <text:p>729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31:.N172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30" calcext:value-type="float">
            <text:p>730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32:.N1730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33:.N1731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32" calcext:value-type="float">
            <text:p>732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34:.N1732]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33" calcext:value-type="float">
            <text:p>733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35:.N1733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36:.N1734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37:.N1735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38:.N1736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37" calcext:value-type="float">
            <text:p>737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39:.N1737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40:.N1738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41:.N173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40" calcext:value-type="float">
            <text:p>740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42:.N1740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41" calcext:value-type="float">
            <text:p>741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43:.N1741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44:.N1742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43" calcext:value-type="float">
            <text:p>743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45:.N1743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46:.N1744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47:.N174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46" calcext:value-type="float">
            <text:p>746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48:.N1746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49:.N1747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50:.N1748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49" calcext:value-type="float">
            <text:p>749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51:.N174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52:.N1750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53:.N1751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52" calcext:value-type="float">
            <text:p>752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54:.N1752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53" calcext:value-type="float">
            <text:p>75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55:.N1753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54" calcext:value-type="float">
            <text:p>754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56:.N1754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55" calcext:value-type="float">
            <text:p>755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57:.N1755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58:.N1756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59:.N1757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58" calcext:value-type="float">
            <text:p>758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60:.N1758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61:.N1759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60" calcext:value-type="float">
            <text:p>760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62:.N1760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61" calcext:value-type="float">
            <text:p>761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63:.N1761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62" calcext:value-type="float">
            <text:p>762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64:.N1762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65:.N1763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66:.N1764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65" calcext:value-type="float">
            <text:p>76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67:.N1765]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66" calcext:value-type="float">
            <text:p>766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68:.N1766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69:.N1767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70:.N1768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69" calcext:value-type="float">
            <text:p>769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71:.N1769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72:.N1770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71" calcext:value-type="float">
            <text:p>771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73:.N1771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74:.N1772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73" calcext:value-type="float">
            <text:p>77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75:.N1773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76:.N1774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77:.N1775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76" calcext:value-type="float">
            <text:p>776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78:.N1776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79:.N1777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80:.N1778]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79" calcext:value-type="float">
            <text:p>779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81:.N177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82:.N1780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81" calcext:value-type="float">
            <text:p>781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83:.N1781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84:.N1782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83" calcext:value-type="float">
            <text:p>783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85:.N1783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86:.N1784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85" calcext:value-type="float">
            <text:p>785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87:.N1785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86" calcext:value-type="float">
            <text:p>78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88:.N1786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87" calcext:value-type="float">
            <text:p>787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89:.N1787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88" calcext:value-type="float">
            <text:p>788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90:.N1788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91:.N1789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92:.N1790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93:.N1791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92" calcext:value-type="float">
            <text:p>792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94:.N1792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95:.N1793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94" calcext:value-type="float">
            <text:p>794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96:.N179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97:.N1795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96" calcext:value-type="float">
            <text:p>796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98:.N1796]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99:.N1797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98" calcext:value-type="float">
            <text:p>798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00:.N1798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01:.N1799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02:.N1800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03:.N1801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04:.N1802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03" calcext:value-type="float">
            <text:p>803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05:.N1803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06:.N1804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05" calcext:value-type="float">
            <text:p>805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07:.N180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08:.N1806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07" calcext:value-type="float">
            <text:p>807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09:.N1807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08" calcext:value-type="float">
            <text:p>808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10:.N1808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09" calcext:value-type="float">
            <text:p>809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11:.N180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10" calcext:value-type="float">
            <text:p>810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12:.N1810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13:.N1811]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14:.N1812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15:.N1813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16:.N1814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17:.N1815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16" calcext:value-type="float">
            <text:p>81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18:.N1816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19:.N1817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20:.N1818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21:.N1819]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20" calcext:value-type="float">
            <text:p>820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22:.N1820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23:.N1821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24:.N1822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25:.N1823]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24" calcext:value-type="float">
            <text:p>824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26:.N1824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27:.N1825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26" calcext:value-type="float">
            <text:p>826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28:.N1826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27" calcext:value-type="float">
            <text:p>827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29:.N1827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30:.N1828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31:.N1829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32:.N1830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31" calcext:value-type="float">
            <text:p>831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33:.N1831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32" calcext:value-type="float">
            <text:p>832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34:.N1832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35:.N1833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34" calcext:value-type="float">
            <text:p>834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36:.N1834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37:.N1835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36" calcext:value-type="float">
            <text:p>836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38:.N1836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39:.N1837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38" calcext:value-type="float">
            <text:p>838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40:.N1838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41:.N1839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42:.N1840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43:.N1841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42" calcext:value-type="float">
            <text:p>842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44:.N1842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45:.N1843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44" calcext:value-type="float">
            <text:p>844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46:.N1844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45" calcext:value-type="float">
            <text:p>845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47:.N1845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46" calcext:value-type="float">
            <text:p>846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48:.N1846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47" calcext:value-type="float">
            <text:p>84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49:.N1847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48" calcext:value-type="float">
            <text:p>84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50:.N1848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51:.N1849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50" calcext:value-type="float">
            <text:p>850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52:.N1850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51" calcext:value-type="float">
            <text:p>851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53:.N1851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54:.N1852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53" calcext:value-type="float">
            <text:p>853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55:.N1853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56:.N1854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57:.N185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58:.N1856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57" calcext:value-type="float">
            <text:p>85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59:.N1857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58" calcext:value-type="float">
            <text:p>858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60:.N1858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61:.N1859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62:.N1860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63:.N1861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64:.N1862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65:.N1863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66:.N1864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65" calcext:value-type="float">
            <text:p>865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67:.N186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68:.N1866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69:.N1867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70:.N1868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71:.N1869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70" calcext:value-type="float">
            <text:p>870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72:.N1870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73:.N1871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72" calcext:value-type="float">
            <text:p>872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74:.N1872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75:.N1873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76:.N187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75" calcext:value-type="float">
            <text:p>875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77:.N1875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78:.N1876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79:.N1877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78" calcext:value-type="float">
            <text:p>87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80:.N1878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81:.N1879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82:.N1880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83:.N1881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84:.N1882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85:.N1883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86:.N1884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87:.N188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86" calcext:value-type="float">
            <text:p>886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88:.N1886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87" calcext:value-type="float">
            <text:p>887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89:.N1887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88" calcext:value-type="float">
            <text:p>88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90:.N1888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91:.N1889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92:.N1890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91" calcext:value-type="float">
            <text:p>891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93:.N1891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94:.N1892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95:.N1893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94" calcext:value-type="float">
            <text:p>894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96:.N1894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97:.N1895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96" calcext:value-type="float">
            <text:p>896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98:.N1896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99:.N1897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00:.N1898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01:.N1899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02:.N1900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03:.N1901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02" calcext:value-type="float">
            <text:p>902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04:.N1902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05:.N1903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06:.N190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05" calcext:value-type="float">
            <text:p>905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07:.N1905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08:.N1906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09:.N1907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10:.N1908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09" calcext:value-type="float">
            <text:p>90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11:.N190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10" calcext:value-type="float">
            <text:p>910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12:.N1910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11" calcext:value-type="float">
            <text:p>911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13:.N1911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12" calcext:value-type="float">
            <text:p>912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914:.N1912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15:.N1913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16:.N191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15" calcext:value-type="float">
            <text:p>915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17:.N191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18:.N1916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19:.N1917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20:.N1918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19" calcext:value-type="float">
            <text:p>919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21:.N1919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20" calcext:value-type="float">
            <text:p>920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22:.N1920])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21" calcext:value-type="float">
            <text:p>921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23:.N1921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24:.N1922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25:.N1923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26:.N1924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27:.N1925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26" calcext:value-type="float">
            <text:p>92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28:.N1926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29:.N1927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30:.N1928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31:.N1929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30" calcext:value-type="float">
            <text:p>930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32:.N1930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33:.N1931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32" calcext:value-type="float">
            <text:p>93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34:.N1932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33" calcext:value-type="float">
            <text:p>933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35:.N1933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36:.N1934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37:.N193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36" calcext:value-type="float">
            <text:p>936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38:.N1936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37" calcext:value-type="float">
            <text:p>937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39:.N1937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0:.N1938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1:.N1939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42:.N1940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3:.N1941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44:.N1942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5:.N1943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46:.N194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7:.N1945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8:.N1946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9:.N1947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50:.N1948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51:.N1949])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52:.N1950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51" calcext:value-type="float">
            <text:p>951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953:.N1951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52" calcext:value-type="float">
            <text:p>95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54:.N1952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53" calcext:value-type="float">
            <text:p>953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955:.N1953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54" calcext:value-type="float">
            <text:p>954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56:.N195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57:.N1955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58:.N1956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57" calcext:value-type="float">
            <text:p>95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59:.N1957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60:.N1958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59" calcext:value-type="float">
            <text:p>959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61:.N1959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62:.N1960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63:.N1961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62" calcext:value-type="float">
            <text:p>962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964:.N1962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63" calcext:value-type="float">
            <text:p>96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65:.N1963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66:.N1964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67:.N1965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68:.N1966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69:.N1967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70:.N1968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69" calcext:value-type="float">
            <text:p>969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71:.N1969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72:.N1970])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71" calcext:value-type="float">
            <text:p>971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73:.N1971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72" calcext:value-type="float">
            <text:p>972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74:.N1972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75:.N1973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76:.N1974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75" calcext:value-type="float">
            <text:p>975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77:.N1975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78:.N1976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79:.N1977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78" calcext:value-type="float">
            <text:p>97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80:.N1978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81:.N1979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82:.N1980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83:.N1981])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82" calcext:value-type="float">
            <text:p>982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84:.N1982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85:.N1983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84" calcext:value-type="float">
            <text:p>984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86:.N1984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87:.N1985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86" calcext:value-type="float">
            <text:p>98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88:.N1986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89:.N1987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90:.N1988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91:.N1989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92:.N1990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93:.N1991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94:.N1992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93" calcext:value-type="float">
            <text:p>993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95:.N1993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96:.N1994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97:.N1995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98:.N1996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99:.N1997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1000:.N1998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1001:.N1999])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7"/>
        </table:table-row>
        <table:table-row table:style-name="ro16">
          <table:table-cell table:number-columns-repeated="11"/>
          <table:table-cell office:value-type="float" office:value="1000" calcext:value-type="float">
            <text:p>1000</text:p>
          </table:table-cell>
          <table:table-cell table:number-columns-repeated="2"/>
          <table:table-cell table:formula="of:=MAX([.N1002:.N2000])" office:value-type="float" office:value="0" calcext:value-type="float">
            <text:p>0</text:p>
          </table:table-cell>
          <table:table-cell table:number-columns-repeated="1009"/>
        </table:table-row>
        <table:table-row table:style-name="ro16" table:number-rows-repeated="48">
          <table:table-cell table:number-columns-repeated="1024"/>
        </table:table-row>
        <table:table-row table:style-name="ro16">
          <table:table-cell table:number-columns-repeated="1024"/>
        </table:table-row>
        <calcext:conditional-formats>
          <calcext:conditional-format calcext:target-range-address="'Annex D Resolution'.A33:'Annex D Resolution'.A33">
            <calcext:condition calcext:apply-style-name="Good" calcext:value="&lt;0.15" calcext:base-cell-address="'Annex C - Flow Rate'.A33"/>
          </calcext:conditional-format>
          <calcext:conditional-format calcext:target-range-address="'Annex D Resolution'.A31:'Annex D Resolution'.A31">
            <calcext:condition calcext:apply-style-name="Good" calcext:value="&lt;0.3" calcext:base-cell-address="'Annex C - Flow Rate'.A31"/>
          </calcext:conditional-format>
        </calcext:conditional-formats>
      </table:table>
      <table:table table:name="ANNEX E - B1" table:style-name="ta1">
        <table:table-column table:style-name="co4" table:number-columns-repeated="49" table:default-cell-style-name="Default"/>
        <table:table-row table:style-name="ro16">
          <table:table-cell office:value-type="string" calcext:value-type="string">
            <text:p>Data Preprocessing and Quality Assessment</text:p>
          </table:table-cell>
          <table:table-cell table:number-columns-repeated="48"/>
        </table:table-row>
        <table:table-row table:style-name="ro22">
          <table:table-cell table:number-columns-repeated="14"/>
          <table:table-cell table:style-name="ce215" office:value-type="string" calcext:value-type="string">
            <text:p>BOTTLE 1</text:p>
          </table:table-cell>
          <table:table-cell table:number-columns-repeated="34"/>
        </table:table-row>
        <table:table-row table:style-name="ro16">
          <table:table-cell table:number-columns-repeated="49"/>
        </table:table-row>
        <table:table-row table:style-name="ro22">
          <table:table-cell table:style-name="ce89" office:value-type="string" calcext:value-type="string">
            <text:p>Date</text:p>
          </table:table-cell>
          <table:table-cell table:number-columns-repeated="13"/>
          <table:table-cell table:style-name="ce215" office:value-type="string" calcext:value-type="string">
            <text:p>RM8632a</text:p>
          </table:table-cell>
          <table:table-cell table:number-columns-repeated="34"/>
        </table:table-row>
        <table:table-row table:style-name="ro16">
          <table:table-cell table:number-columns-repeated="14"/>
          <table:table-cell table:style-name="ce55" office:value-type="date" office:date-value="2025-05-21" calcext:value-type="date">
            <text:p>2025-05-21</text:p>
          </table:table-cell>
          <table:table-cell table:number-columns-repeated="34"/>
        </table:table-row>
        <table:table-row table:style-name="ro16">
          <table:table-cell office:value-type="string" calcext:value-type="string">
            <text:p>Partistan 34D</text:p>
          </table:table-cell>
          <table:table-cell table:style-name="ce89" table:number-columns-repeated="5"/>
          <table:table-cell table:number-columns-repeated="8"/>
          <table:table-cell office:value-type="string" calcext:value-type="string">
            <text:p>#00009</text:p>
          </table:table-cell>
          <table:table-cell table:number-columns-repeated="34"/>
        </table:table-row>
        <table:table-row table:style-name="ro16">
          <table:table-cell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202" office:value-type="string" calcext:value-type="string">
            <text:p>X<text:span text:style-name="T8"> / ml</text:span></text:p>
          </table:table-cell>
          <table:table-cell table:style-name="ce31" office:value-type="string" calcext:value-type="string">
            <text:p>N<text:span text:style-name="T6">TOTAL</text:span></text:p>
          </table:table-cell>
          <table:table-cell table:style-name="ce31" office:value-type="string" calcext:value-type="string">
            <text:p>CV</text:p>
          </table:table-cell>
          <table:table-cell table:style-name="ce31" office:value-type="string" calcext:value-type="string">
            <text:p>D<text:span text:style-name="T6">QMAX</text:span></text:p>
          </table:table-cell>
          <table:table-cell table:style-name="ce31" office:value-type="string" calcext:value-type="string">
            <text:p>D<text:span text:style-name="T6">Q</text:span></text:p>
          </table:table-cell>
          <table:table-cell/>
          <table:table-cell table:style-name="ce31"/>
          <table:table-cell table:number-columns-repeated="36"/>
        </table:table-row>
        <table:table-row table:style-name="ro16">
          <table:table-cell table:style-name="ce16" office:value-type="string" calcext:value-type="string">
            <text:p>Scanned ml</text:p>
          </table:table-cell>
          <table:table-cell office:value-type="float" office:value="4.870482" calcext:value-type="float">
            <text:p>4.870482</text:p>
          </table:table-cell>
          <table:table-cell office:value-type="float" office:value="5.166697" calcext:value-type="float">
            <text:p>5.166697</text:p>
          </table:table-cell>
          <table:table-cell office:value-type="float" office:value="5.120954" calcext:value-type="float">
            <text:p>5.120954</text:p>
          </table:table-cell>
          <table:table-cell office:value-type="float" office:value="5.213185" calcext:value-type="float">
            <text:p>5.213185</text:p>
          </table:table-cell>
          <table:table-cell office:value-type="float" office:value="5.138114" calcext:value-type="float">
            <text:p>5.138114</text:p>
          </table:table-cell>
          <table:table-cell table:style-name="ce203" office:value-type="float" office:value="25.517626" calcext:value-type="float">
            <text:p>25.5</text:p>
          </table:table-cell>
          <table:table-cell table:style-name="ce203" table:formula="of:=AVERAGE([.B$8:.F$8])*5" office:value-type="float" office:value="25.509432" calcext:value-type="float">
            <text:p>25.5</text:p>
          </table:table-cell>
          <table:table-cell table:style-name="ce212"/>
          <table:table-cell/>
          <table:table-cell table:style-name="ce212"/>
          <table:table-cell table:number-columns-repeated="38"/>
        </table:table-row>
        <table:table-row table:style-name="ro16">
          <table:table-cell table:style-name="ce199" office:value-type="string" calcext:value-type="string">
            <text:p>count_4</text:p>
          </table:table-cell>
          <table:table-cell table:style-name="ce117" office:value-type="float" office:value="29462" calcext:value-type="float">
            <text:p>29462</text:p>
          </table:table-cell>
          <table:table-cell table:style-name="ce117" office:value-type="float" office:value="30722" calcext:value-type="float">
            <text:p>30722</text:p>
          </table:table-cell>
          <table:table-cell table:style-name="ce117" office:value-type="float" office:value="30719" calcext:value-type="float">
            <text:p>30719</text:p>
          </table:table-cell>
          <table:table-cell table:style-name="ce117" office:value-type="float" office:value="31067" calcext:value-type="float">
            <text:p>31067</text:p>
          </table:table-cell>
          <table:table-cell table:style-name="ce117" office:value-type="float" office:value="30629" calcext:value-type="float">
            <text:p>30629</text:p>
          </table:table-cell>
          <table:table-cell table:style-name="ce363" table:formula="of:=AVERAGE([.B9:.F9])/AVERAGE([.B$8:.F$8])" office:value-type="float" office:value="5982.06185069115" calcext:value-type="float">
            <text:p>5982.1</text:p>
          </table:table-cell>
          <table:table-cell table:style-name="ce365" table:formula="of:=[.G9]*[.H$8]" office:value-type="float" office:value="152599" calcext:value-type="float">
            <text:p>152599</text:p>
          </table:table-cell>
          <table:table-cell table:style-name="ce370" table:formula="of:=STDEVP([.B9:.F9])/AVERAGE([.B9:.F9])" office:value-type="percentage" office:value="0.0180113080363656" calcext:value-type="percentage">
            <text:p>1.8%</text:p>
          </table:table-cell>
          <table:table-cell table:style-name="ce370" table:formula="of:=IF([.H9]&gt;[.$A$43]; [.$C$43]; IF([.H9]&gt;[.$A$44]; [.$C$44]; IF([.H9]&gt;[.$A$45];[.$C$45];IF([.H9]&gt;[.$A$46];[.$C$46]; IF([.H9]&gt;[.$A$47];[.$C$47];IF([.H9]&gt;[.$A$48];[.$C$48];[.$C$49]))))))/100" office:value-type="percentage" office:value="0.11" calcext:value-type="percentage">
            <text:p>11.0%</text:p>
          </table:table-cell>
          <table:table-cell table:style-name="ce372" table:formula="of:=(MAX([.B9:.F9])-MIN([.B9:.F9]))/[.H9]*5" office:value-type="percentage" office:value="0.0525888111979764" calcext:value-type="percentage">
            <text:p>5.3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16" office:value-type="string" calcext:value-type="string">
            <text:p>count_5</text:p>
          </table:table-cell>
          <table:table-cell office:value-type="float" office:value="17681" calcext:value-type="float">
            <text:p>17681</text:p>
          </table:table-cell>
          <table:table-cell office:value-type="float" office:value="18493" calcext:value-type="float">
            <text:p>18493</text:p>
          </table:table-cell>
          <table:table-cell office:value-type="float" office:value="18556" calcext:value-type="float">
            <text:p>18556</text:p>
          </table:table-cell>
          <table:table-cell office:value-type="float" office:value="18788" calcext:value-type="float">
            <text:p>18788</text:p>
          </table:table-cell>
          <table:table-cell office:value-type="float" office:value="18326" calcext:value-type="float">
            <text:p>18326</text:p>
          </table:table-cell>
          <table:table-cell table:style-name="ce204" table:formula="of:=AVERAGE([.B10:.F10])/AVERAGE([.B$8:.F$8])" office:value-type="float" office:value="3600.39376807763" calcext:value-type="float">
            <text:p>3600.4</text:p>
          </table:table-cell>
          <table:table-cell table:style-name="ce366" table:formula="of:=[.G10]*[.H$8]" office:value-type="float" office:value="91844" calcext:value-type="float">
            <text:p>91844</text:p>
          </table:table-cell>
          <table:table-cell table:style-name="ce212" table:formula="of:=STDEVP([.B10:.F10])/AVERAGE([.B10:.F10])" office:value-type="percentage" office:value="0.0203856152920813" calcext:value-type="percentage">
            <text:p>2.0%</text:p>
          </table:table-cell>
          <table:table-cell table:style-name="ce212" table:formula="of:=IF([.H10]&gt;[.$A$43]; [.$C$43]; IF([.H10]&gt;[.$A$44]; [.$C$44]; IF([.H10]&gt;[.$A$45];[.$C$45];IF([.H10]&gt;[.$A$46];[.$C$46]; IF([.H10]&gt;[.$A$47];[.$C$47];IF([.H10]&gt;[.$A$48];[.$C$48];[.$C$49]))))))/100" office:value-type="percentage" office:value="0.11" calcext:value-type="percentage">
            <text:p>11.0%</text:p>
          </table:table-cell>
          <table:table-cell table:style-name="ce373" table:formula="of:=(MAX([.B10:.F10])-MIN([.B10:.F10]))/[.H10]*5" office:value-type="percentage" office:value="0.0602652323505074" calcext:value-type="percentage">
            <text:p>6.0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16" office:value-type="string" calcext:value-type="string">
            <text:p>count_6</text:p>
          </table:table-cell>
          <table:table-cell office:value-type="float" office:value="9568" calcext:value-type="float">
            <text:p>9568</text:p>
          </table:table-cell>
          <table:table-cell office:value-type="float" office:value="9915" calcext:value-type="float">
            <text:p>9915</text:p>
          </table:table-cell>
          <table:table-cell office:value-type="float" office:value="9949" calcext:value-type="float">
            <text:p>9949</text:p>
          </table:table-cell>
          <table:table-cell office:value-type="float" office:value="9987" calcext:value-type="float">
            <text:p>9987</text:p>
          </table:table-cell>
          <table:table-cell office:value-type="float" office:value="9797" calcext:value-type="float">
            <text:p>9797</text:p>
          </table:table-cell>
          <table:table-cell table:style-name="ce204" table:formula="of:=AVERAGE([.B11:.F11])/AVERAGE([.B$8:.F$8])" office:value-type="float" office:value="1929.32559219664" calcext:value-type="float">
            <text:p>1929.3</text:p>
          </table:table-cell>
          <table:table-cell table:style-name="ce366" table:formula="of:=[.G11]*[.H$8]" office:value-type="float" office:value="49216" calcext:value-type="float">
            <text:p>49216</text:p>
          </table:table-cell>
          <table:table-cell table:style-name="ce212" table:formula="of:=STDEVP([.B11:.F11])/AVERAGE([.B11:.F11])" office:value-type="percentage" office:value="0.0154004231899065" calcext:value-type="percentage">
            <text:p>1.5%</text:p>
          </table:table-cell>
          <table:table-cell table:style-name="ce212" table:formula="of:=IF([.H11]&gt;[.$A$43]; [.$C$43]; IF([.H11]&gt;[.$A$44]; [.$C$44]; IF([.H11]&gt;[.$A$45];[.$C$45];IF([.H11]&gt;[.$A$46];[.$C$46]; IF([.H11]&gt;[.$A$47];[.$C$47];IF([.H11]&gt;[.$A$48];[.$C$48];[.$C$49]))))))/100" office:value-type="percentage" office:value="0.11" calcext:value-type="percentage">
            <text:p>11.0%</text:p>
          </table:table-cell>
          <table:table-cell table:style-name="ce373" table:formula="of:=(MAX([.B11:.F11])-MIN([.B11:.F11]))/[.H11]*5" office:value-type="percentage" office:value="0.0425674577373212" calcext:value-type="percentage">
            <text:p>4.3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16" office:value-type="string" calcext:value-type="string">
            <text:p>count_7</text:p>
          </table:table-cell>
          <table:table-cell office:value-type="float" office:value="4731" calcext:value-type="float">
            <text:p>4731</text:p>
          </table:table-cell>
          <table:table-cell office:value-type="float" office:value="4974" calcext:value-type="float">
            <text:p>4974</text:p>
          </table:table-cell>
          <table:table-cell office:value-type="float" office:value="5007" calcext:value-type="float">
            <text:p>5007</text:p>
          </table:table-cell>
          <table:table-cell office:value-type="float" office:value="5047" calcext:value-type="float">
            <text:p>5047</text:p>
          </table:table-cell>
          <table:table-cell office:value-type="float" office:value="4927" calcext:value-type="float">
            <text:p>4927</text:p>
          </table:table-cell>
          <table:table-cell table:style-name="ce204" table:formula="of:=AVERAGE([.B12:.F12])/AVERAGE([.B$8:.F$8])" office:value-type="float" office:value="967.720488641221" calcext:value-type="float">
            <text:p>967.7</text:p>
          </table:table-cell>
          <table:table-cell table:style-name="ce366" table:formula="of:=[.G12]*[.H$8]" office:value-type="float" office:value="24686" calcext:value-type="float">
            <text:p>24686</text:p>
          </table:table-cell>
          <table:table-cell table:style-name="ce212" table:formula="of:=STDEVP([.B12:.F12])/AVERAGE([.B12:.F12])" office:value-type="percentage" office:value="0.0223542466351641" calcext:value-type="percentage">
            <text:p>2.2%</text:p>
          </table:table-cell>
          <table:table-cell table:style-name="ce212" table:formula="of:=IF([.H12]&gt;[.$A$43]; [.$C$43]; IF([.H12]&gt;[.$A$44]; [.$C$44]; IF([.H12]&gt;[.$A$45];[.$C$45];IF([.H12]&gt;[.$A$46];[.$C$46]; IF([.H12]&gt;[.$A$47];[.$C$47];IF([.H12]&gt;[.$A$48];[.$C$48];[.$C$49]))))))/100" office:value-type="percentage" office:value="0.11" calcext:value-type="percentage">
            <text:p>11.0%</text:p>
          </table:table-cell>
          <table:table-cell table:style-name="ce373" table:formula="of:=(MAX([.B12:.F12])-MIN([.B12:.F12]))/[.H12]*5" office:value-type="percentage" office:value="0.0640038888438791" calcext:value-type="percentage">
            <text:p>6.4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16" office:value-type="string" calcext:value-type="string">
            <text:p>count_8</text:p>
          </table:table-cell>
          <table:table-cell office:value-type="float" office:value="2535" calcext:value-type="float">
            <text:p>2535</text:p>
          </table:table-cell>
          <table:table-cell office:value-type="float" office:value="2591" calcext:value-type="float">
            <text:p>2591</text:p>
          </table:table-cell>
          <table:table-cell office:value-type="float" office:value="2546" calcext:value-type="float">
            <text:p>2546</text:p>
          </table:table-cell>
          <table:table-cell office:value-type="float" office:value="2596" calcext:value-type="float">
            <text:p>2596</text:p>
          </table:table-cell>
          <table:table-cell office:value-type="float" office:value="2562" calcext:value-type="float">
            <text:p>2562</text:p>
          </table:table-cell>
          <table:table-cell table:style-name="ce204" table:formula="of:=AVERAGE([.B13:.F13])/AVERAGE([.B$8:.F$8])" office:value-type="float" office:value="502.951222120508" calcext:value-type="float">
            <text:p>503.0</text:p>
          </table:table-cell>
          <table:table-cell table:style-name="ce366" table:formula="of:=[.G13]*[.H$8]" office:value-type="float" office:value="12830" calcext:value-type="float">
            <text:p>12830</text:p>
          </table:table-cell>
          <table:table-cell table:style-name="ce212" table:formula="of:=STDEVP([.B13:.F13])/AVERAGE([.B13:.F13])" office:value-type="percentage" office:value="0.00938873432355607" calcext:value-type="percentage">
            <text:p>0.9%</text:p>
          </table:table-cell>
          <table:table-cell table:style-name="ce212" table:formula="of:=IF([.H13]&gt;[.$A$43]; [.$C$43]; IF([.H13]&gt;[.$A$44]; [.$C$44]; IF([.H13]&gt;[.$A$45];[.$C$45];IF([.H13]&gt;[.$A$46];[.$C$46]; IF([.H13]&gt;[.$A$47];[.$C$47];IF([.H13]&gt;[.$A$48];[.$C$48];[.$C$49]))))))/100" office:value-type="percentage" office:value="0.11" calcext:value-type="percentage">
            <text:p>11.0%</text:p>
          </table:table-cell>
          <table:table-cell table:style-name="ce373" table:formula="of:=(MAX([.B13:.F13])-MIN([.B13:.F13]))/[.H13]*5" office:value-type="percentage" office:value="0.0237724084177708" calcext:value-type="percentage">
            <text:p>2.4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200" office:value-type="string" calcext:value-type="string">
            <text:p>count_9</text:p>
          </table:table-cell>
          <table:table-cell table:style-name="ce91" office:value-type="float" office:value="1205" calcext:value-type="float">
            <text:p>1205</text:p>
          </table:table-cell>
          <table:table-cell table:style-name="ce91" office:value-type="float" office:value="1256" calcext:value-type="float">
            <text:p>1256</text:p>
          </table:table-cell>
          <table:table-cell table:style-name="ce91" office:value-type="float" office:value="1151" calcext:value-type="float">
            <text:p>1151</text:p>
          </table:table-cell>
          <table:table-cell table:style-name="ce91" office:value-type="float" office:value="1220" calcext:value-type="float">
            <text:p>1220</text:p>
          </table:table-cell>
          <table:table-cell table:style-name="ce91" office:value-type="float" office:value="1213" calcext:value-type="float">
            <text:p>1213</text:p>
          </table:table-cell>
          <table:table-cell table:style-name="ce364" table:formula="of:=AVERAGE([.B14:.F14])/AVERAGE([.B$8:.F$8])" office:value-type="float" office:value="236.971172074706" calcext:value-type="float">
            <text:p>237.0</text:p>
          </table:table-cell>
          <table:table-cell table:style-name="ce367" table:formula="of:=[.G14]*[.H$8]" office:value-type="float" office:value="6045" calcext:value-type="float">
            <text:p>6045</text:p>
          </table:table-cell>
          <table:table-cell table:style-name="ce371" table:formula="of:=STDEVP([.B14:.F14])/AVERAGE([.B14:.F14])" office:value-type="percentage" office:value="0.0279907392663029" calcext:value-type="percentage">
            <text:p>2.8%</text:p>
          </table:table-cell>
          <table:table-cell table:style-name="ce371" table:formula="of:=IF([.H14]&gt;[.$A$43]; [.$C$43]; IF([.H14]&gt;[.$A$44]; [.$C$44]; IF([.H14]&gt;[.$A$45];[.$C$45];IF([.H14]&gt;[.$A$46];[.$C$46]; IF([.H14]&gt;[.$A$47];[.$C$47];IF([.H14]&gt;[.$A$48];[.$C$48];[.$C$49]))))))/100" office:value-type="percentage" office:value="0.113" calcext:value-type="percentage">
            <text:p>11.3%</text:p>
          </table:table-cell>
          <table:table-cell table:style-name="ce374" table:formula="of:=(MAX([.B14:.F14])-MIN([.B14:.F14]))/[.H14]*5" office:value-type="percentage" office:value="0.086848635235732" calcext:value-type="percentage">
            <text:p>8.7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16" office:value-type="string" calcext:value-type="string">
            <text:p>count_10</text:p>
          </table:table-cell>
          <table:table-cell office:value-type="float" office:value="583" calcext:value-type="float">
            <text:p>583</text:p>
          </table:table-cell>
          <table:table-cell office:value-type="float" office:value="596" calcext:value-type="float">
            <text:p>596</text:p>
          </table:table-cell>
          <table:table-cell office:value-type="float" office:value="564" calcext:value-type="float">
            <text:p>564</text:p>
          </table:table-cell>
          <table:table-cell office:value-type="float" office:value="560" calcext:value-type="float">
            <text:p>560</text:p>
          </table:table-cell>
          <table:table-cell office:value-type="float" office:value="542" calcext:value-type="float">
            <text:p>542</text:p>
          </table:table-cell>
          <table:table-cell table:style-name="ce204" table:formula="of:=AVERAGE([.B15:.F15])/AVERAGE([.B$8:.F$8])" office:value-type="float" office:value="111.527375442934" calcext:value-type="float">
            <text:p>111.5</text:p>
          </table:table-cell>
          <table:table-cell table:style-name="ce366" table:formula="of:=[.G15]*[.H$8]" office:value-type="float" office:value="2845" calcext:value-type="float">
            <text:p>2845</text:p>
          </table:table-cell>
          <table:table-cell table:style-name="ce212" table:formula="of:=STDEVP([.B15:.F15])/AVERAGE([.B15:.F15])" office:value-type="percentage" office:value="0.0329730457632579" calcext:value-type="percentage">
            <text:p>3.3%</text:p>
          </table:table-cell>
          <table:table-cell table:style-name="ce212" table:formula="of:=IF([.H15]&gt;[.$A$43]; [.$C$43]; IF([.H15]&gt;[.$A$44]; [.$C$44]; IF([.H15]&gt;[.$A$45];[.$C$45];IF([.H15]&gt;[.$A$46];[.$C$46]; IF([.H15]&gt;[.$A$47];[.$C$47];IF([.H15]&gt;[.$A$48];[.$C$48];[.$C$49]))))))/100" office:value-type="percentage" office:value="0.119" calcext:value-type="percentage">
            <text:p>11.9%</text:p>
          </table:table-cell>
          <table:table-cell table:style-name="ce373" table:formula="of:=(MAX([.B15:.F15])-MIN([.B15:.F15]))/[.H15]*5" office:value-type="percentage" office:value="0.0949033391915641" calcext:value-type="percentage">
            <text:p>9.5%</text:p>
          </table:table-cell>
          <table:table-cell/>
          <table:table-cell table:style-name="ce20"/>
          <table:table-cell table:number-columns-repeated="4"/>
          <table:table-cell table:style-name="ce16" table:number-columns-repeated="32"/>
        </table:table-row>
        <table:table-row table:style-name="ro16">
          <table:table-cell table:style-name="ce16" office:value-type="string" calcext:value-type="string">
            <text:p>count_11</text:p>
          </table:table-cell>
          <table:table-cell office:value-type="float" office:value="264" calcext:value-type="float">
            <text:p>264</text:p>
          </table:table-cell>
          <table:table-cell office:value-type="float" office:value="288" calcext:value-type="float">
            <text:p>288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262" calcext:value-type="float">
            <text:p>262</text:p>
          </table:table-cell>
          <table:table-cell table:style-name="ce204" table:formula="of:=AVERAGE([.B16:.F16])/AVERAGE([.B$8:.F$8])" office:value-type="float" office:value="53.5488206871874" calcext:value-type="float">
            <text:p>53.5</text:p>
          </table:table-cell>
          <table:table-cell table:style-name="ce366" table:formula="of:=[.G16]*[.H$8]" office:value-type="float" office:value="1366" calcext:value-type="float">
            <text:p>1366</text:p>
          </table:table-cell>
          <table:table-cell table:style-name="ce212" table:formula="of:=STDEVP([.B16:.F16])/AVERAGE([.B16:.F16])" office:value-type="percentage" office:value="0.0346011780324933" calcext:value-type="percentage">
            <text:p>3.5%</text:p>
          </table:table-cell>
          <table:table-cell table:style-name="ce212" table:formula="of:=IF([.H16]&gt;[.$A$43]; [.$C$43]; IF([.H16]&gt;[.$A$44]; [.$C$44]; IF([.H16]&gt;[.$A$45];[.$C$45];IF([.H16]&gt;[.$A$46];[.$C$46]; IF([.H16]&gt;[.$A$47];[.$C$47];IF([.H16]&gt;[.$A$48];[.$C$48];[.$C$49]))))))/100" office:value-type="percentage" office:value="0.134" calcext:value-type="percentage">
            <text:p>13.4%</text:p>
          </table:table-cell>
          <table:table-cell table:style-name="ce373" table:formula="of:=(MAX([.B16:.F16])-MIN([.B16:.F16]))/[.H16]*5" office:value-type="percentage" office:value="0.0951683748169839" calcext:value-type="percentage">
            <text:p>9.5%</text:p>
          </table:table-cell>
          <table:table-cell/>
          <table:table-cell table:style-name="ce20"/>
          <table:table-cell table:number-columns-repeated="2"/>
          <table:table-cell table:style-name="ce89" table:number-columns-repeated="2"/>
          <table:table-cell table:style-name="ce16" table:number-columns-repeated="32"/>
        </table:table-row>
        <table:table-row table:style-name="ro16">
          <table:table-cell table:style-name="ce16" office:value-type="string" calcext:value-type="string">
            <text:p>count_12</text:p>
          </table:table-cell>
          <table:table-cell office:value-type="float" office:value="143" calcext:value-type="float">
            <text:p>143</text:p>
          </table:table-cell>
          <table:table-cell office:value-type="float" office:value="152" calcext:value-type="float">
            <text:p>152</text:p>
          </table:table-cell>
          <table:table-cell office:value-type="float" office:value="149" calcext:value-type="float">
            <text:p>149</text:p>
          </table:table-cell>
          <table:table-cell office:value-type="float" office:value="163" calcext:value-type="float">
            <text:p>163</text:p>
          </table:table-cell>
          <table:table-cell office:value-type="float" office:value="161" calcext:value-type="float">
            <text:p>161</text:p>
          </table:table-cell>
          <table:table-cell table:style-name="ce204" table:formula="of:=AVERAGE([.B17:.F17])/AVERAGE([.B$8:.F$8])" office:value-type="float" office:value="30.1065111916251" calcext:value-type="float">
            <text:p>30.1</text:p>
          </table:table-cell>
          <table:table-cell table:style-name="ce366" table:formula="of:=[.G17]*[.H$8]" office:value-type="float" office:value="768" calcext:value-type="float">
            <text:p>768</text:p>
          </table:table-cell>
          <table:table-cell table:style-name="ce212" table:formula="of:=STDEVP([.B17:.F17])/AVERAGE([.B17:.F17])" office:value-type="percentage" office:value="0.0486498481569516" calcext:value-type="percentage">
            <text:p>4.9%</text:p>
          </table:table-cell>
          <table:table-cell table:style-name="ce212" table:formula="of:=IF([.H17]&gt;[.$A$43]; [.$C$43]; IF([.H17]&gt;[.$A$44]; [.$C$44]; IF([.H17]&gt;[.$A$45];[.$C$45];IF([.H17]&gt;[.$A$46];[.$C$46]; IF([.H17]&gt;[.$A$47];[.$C$47];IF([.H17]&gt;[.$A$48];[.$C$48];[.$C$49]))))))/100" office:value-type="percentage" office:value="0.156" calcext:value-type="percentage">
            <text:p>15.6%</text:p>
          </table:table-cell>
          <table:table-cell table:style-name="ce373" table:formula="of:=(MAX([.B17:.F17])-MIN([.B17:.F17]))/[.H17]*5" office:value-type="percentage" office:value="0.130208333333333" calcext:value-type="percentage">
            <text:p>13.0%</text:p>
          </table:table-cell>
          <table:table-cell/>
          <table:table-cell table:style-name="ce20"/>
          <table:table-cell table:number-columns-repeated="2"/>
          <table:table-cell table:style-name="ce89" table:number-columns-repeated="2"/>
          <table:table-cell table:style-name="ce16" table:number-columns-repeated="32"/>
        </table:table-row>
        <table:table-row table:style-name="ro16">
          <table:table-cell table:style-name="ce16" office:value-type="string" calcext:value-type="string">
            <text:p>count_13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style-name="ce204" table:formula="of:=AVERAGE([.B18:.F18])/AVERAGE([.B$8:.F$8])" office:value-type="float" office:value="19.482989664372" calcext:value-type="float">
            <text:p>19.5</text:p>
          </table:table-cell>
          <table:table-cell table:style-name="ce366" table:formula="of:=[.G18]*[.H$8]" office:value-type="float" office:value="497" calcext:value-type="float">
            <text:p>497</text:p>
          </table:table-cell>
          <table:table-cell table:style-name="ce212" table:formula="of:=STDEVP([.B18:.F18])/AVERAGE([.B18:.F18])" office:value-type="percentage" office:value="0.0526993998137175" calcext:value-type="percentage">
            <text:p>5.3%</text:p>
          </table:table-cell>
          <table:table-cell table:style-name="ce212" table:formula="of:=IF([.H18]&gt;[.$A$43]; [.$C$43]; IF([.H18]&gt;[.$A$44]; [.$C$44]; IF([.H18]&gt;[.$A$45];[.$C$45];IF([.H18]&gt;[.$A$46];[.$C$46]; IF([.H18]&gt;[.$A$47];[.$C$47];IF([.H18]&gt;[.$A$48];[.$C$48];[.$C$49]))))))/100" office:value-type="percentage" office:value="0.193" calcext:value-type="percentage">
            <text:p>19.3%</text:p>
          </table:table-cell>
          <table:table-cell table:style-name="ce373" table:formula="of:=(MAX([.B18:.F18])-MIN([.B18:.F18]))/[.H18]*5" office:value-type="percentage" office:value="0.160965794768612" calcext:value-type="percentage">
            <text:p>16.1%</text:p>
          </table:table-cell>
          <table:table-cell/>
          <table:table-cell table:style-name="ce20"/>
          <table:table-cell table:number-columns-repeated="2"/>
          <table:table-cell table:style-name="ce89" table:number-columns-repeated="2"/>
          <table:table-cell table:style-name="ce16" table:number-columns-repeated="32"/>
        </table:table-row>
        <table:table-row table:style-name="ro16">
          <table:table-cell table:style-name="ce16" office:value-type="string" calcext:value-type="string">
            <text:p>count_14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table:style-name="ce204" table:formula="of:=AVERAGE([.B19:.F19])/AVERAGE([.B$8:.F$8])" office:value-type="float" office:value="12.7403855954143" calcext:value-type="float">
            <text:p>12.7</text:p>
          </table:table-cell>
          <table:table-cell table:style-name="ce366" table:formula="of:=[.G19]*[.H$8]" office:value-type="float" office:value="325" calcext:value-type="float">
            <text:p>325</text:p>
          </table:table-cell>
          <table:table-cell table:style-name="ce212" table:formula="of:=STDEVP([.B19:.F19])/AVERAGE([.B19:.F19])" office:value-type="percentage" office:value="0.0853811503108407" calcext:value-type="percentage">
            <text:p>8.5%</text:p>
          </table:table-cell>
          <table:table-cell table:style-name="ce212" table:formula="of:=IF([.H19]&gt;[.$A$43]; [.$C$43]; IF([.H19]&gt;[.$A$44]; [.$C$44]; IF([.H19]&gt;[.$A$45];[.$C$45];IF([.H19]&gt;[.$A$46];[.$C$46]; IF([.H19]&gt;[.$A$47];[.$C$47];IF([.H19]&gt;[.$A$48];[.$C$48];[.$C$49]))))))/100" office:value-type="percentage" office:value="0.193" calcext:value-type="percentage">
            <text:p>19.3%</text:p>
          </table:table-cell>
          <table:table-cell table:style-name="ce373" table:formula="of:=(MAX([.B19:.F19])-MIN([.B19:.F19]))/[.H19]*5" office:value-type="percentage" office:value="0.215384615384615" calcext:value-type="percentage">
            <text:p>21.5%</text:p>
          </table:table-cell>
          <table:table-cell/>
          <table:table-cell table:style-name="ce20"/>
          <table:table-cell table:number-columns-repeated="2"/>
          <table:table-cell table:style-name="ce89" table:number-columns-repeated="2"/>
          <table:table-cell table:style-name="ce16" table:number-columns-repeated="32"/>
        </table:table-row>
        <table:table-row table:style-name="ro16">
          <table:table-cell table:style-name="ce16" office:value-type="string" calcext:value-type="string">
            <text:p>count_15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style-name="ce204" table:formula="of:=AVERAGE([.B20:.F20])/AVERAGE([.B$8:.F$8])" office:value-type="float" office:value="9.21227881514571" calcext:value-type="float">
            <text:p>9.2</text:p>
          </table:table-cell>
          <table:table-cell table:style-name="ce366" table:formula="of:=[.G20]*[.H$8]" office:value-type="float" office:value="235" calcext:value-type="float">
            <text:p>235</text:p>
          </table:table-cell>
          <table:table-cell table:style-name="ce212" table:formula="of:=STDEVP([.B20:.F20])/AVERAGE([.B20:.F20])" office:value-type="percentage" office:value="0.0554825736612991" calcext:value-type="percentage">
            <text:p>5.5%</text:p>
          </table:table-cell>
          <table:table-cell table:style-name="ce212" table:formula="of:=IF([.H20]&gt;[.$A$43]; [.$C$43]; IF([.H20]&gt;[.$A$44]; [.$C$44]; IF([.H20]&gt;[.$A$45];[.$C$45];IF([.H20]&gt;[.$A$46];[.$C$46]; IF([.H20]&gt;[.$A$47];[.$C$47];IF([.H20]&gt;[.$A$48];[.$C$48];[.$C$49]))))))/100" office:value-type="percentage" office:value="0.193" calcext:value-type="percentage">
            <text:p>19.3%</text:p>
          </table:table-cell>
          <table:table-cell table:style-name="ce373" table:formula="of:=(MAX([.B20:.F20])-MIN([.B20:.F20]))/[.H20]*5" office:value-type="percentage" office:value="0.170212765957447" calcext:value-type="percentage">
            <text:p>17.0%</text:p>
          </table:table-cell>
          <table:table-cell/>
          <table:table-cell table:style-name="ce20"/>
          <table:table-cell table:number-columns-repeated="2"/>
          <table:table-cell table:style-name="ce89" table:number-columns-repeated="2"/>
          <table:table-cell table:style-name="ce16" table:number-columns-repeated="32"/>
        </table:table-row>
        <table:table-row table:style-name="ro16">
          <table:table-cell table:style-name="ce16" office:value-type="string" calcext:value-type="string">
            <text:p>count_16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ce204" table:formula="of:=AVERAGE([.B21:.F21])/AVERAGE([.B$8:.F$8])" office:value-type="float" office:value="6.89940881474742" calcext:value-type="float">
            <text:p>6.9</text:p>
          </table:table-cell>
          <table:table-cell table:style-name="ce366" table:formula="of:=[.G21]*[.H$8]" office:value-type="float" office:value="176" calcext:value-type="float">
            <text:p>176</text:p>
          </table:table-cell>
          <table:table-cell table:style-name="ce212" table:formula="of:=STDEVP([.B21:.F21])/AVERAGE([.B21:.F21])" office:value-type="percentage" office:value="0.0923186182344995" calcext:value-type="percentage">
            <text:p>9.2%</text:p>
          </table:table-cell>
          <table:table-cell table:style-name="ce212" table:formula="of:=IF([.H21]&gt;[.$A$43]; [.$C$43]; IF([.H21]&gt;[.$A$44]; [.$C$44]; IF([.H21]&gt;[.$A$45];[.$C$45];IF([.H21]&gt;[.$A$46];[.$C$46]; IF([.H21]&gt;[.$A$47];[.$C$47];IF([.H21]&gt;[.$A$48];[.$C$48];[.$C$49]))))))/100" office:value-type="percentage" office:value="0.275" calcext:value-type="percentage">
            <text:p>27.5%</text:p>
          </table:table-cell>
          <table:table-cell table:style-name="ce373" table:formula="of:=(MAX([.B21:.F21])-MIN([.B21:.F21]))/[.H21]*5" office:value-type="percentage" office:value="0.255681818181818" calcext:value-type="percentage">
            <text:p>25.6%</text:p>
          </table:table-cell>
          <table:table-cell/>
          <table:table-cell table:style-name="ce20"/>
          <table:table-cell/>
          <table:table-cell table:style-name="ce89"/>
          <table:table-cell table:number-columns-repeated="2"/>
          <table:table-cell table:style-name="ce31" table:number-columns-repeated="2"/>
          <table:table-cell table:style-name="ce16" table:number-columns-repeated="30"/>
        </table:table-row>
        <table:table-row table:style-name="ro16">
          <table:table-cell table:style-name="ce16" office:value-type="string" calcext:value-type="string">
            <text:p>count_17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style-name="ce204" table:formula="of:=AVERAGE([.B22:.F22])/AVERAGE([.B$8:.F$8])" office:value-type="float" office:value="5.88017796711428" calcext:value-type="float">
            <text:p>5.9</text:p>
          </table:table-cell>
          <table:table-cell table:style-name="ce366" table:formula="of:=[.G22]*[.H$8]" office:value-type="float" office:value="150" calcext:value-type="float">
            <text:p>150</text:p>
          </table:table-cell>
          <table:table-cell table:style-name="ce212" table:formula="of:=STDEVP([.B22:.F22])/AVERAGE([.B22:.F22])" office:value-type="percentage" office:value="0.0760116950066092" calcext:value-type="percentage">
            <text:p>7.6%</text:p>
          </table:table-cell>
          <table:table-cell table:style-name="ce212" table:formula="of:=IF([.H22]&gt;[.$A$43]; [.$C$43]; IF([.H22]&gt;[.$A$44]; [.$C$44]; IF([.H22]&gt;[.$A$45];[.$C$45];IF([.H22]&gt;[.$A$46];[.$C$46]; IF([.H22]&gt;[.$A$47];[.$C$47];IF([.H22]&gt;[.$A$48];[.$C$48];[.$C$49]))))))/100" office:value-type="percentage" office:value="0.275" calcext:value-type="percentage">
            <text:p>27.5%</text:p>
          </table:table-cell>
          <table:table-cell table:style-name="ce373" table:formula="of:=(MAX([.B22:.F22])-MIN([.B22:.F22]))/[.H22]*5" office:value-type="percentage" office:value="0.2" calcext:value-type="percentage">
            <text:p>20.0%</text:p>
          </table:table-cell>
          <table:table-cell/>
          <table:table-cell table:style-name="ce20"/>
          <table:table-cell/>
          <table:table-cell table:style-name="ce202"/>
          <table:table-cell table:style-name="ce16"/>
          <table:table-cell table:number-columns-repeated="3"/>
          <table:table-cell table:style-name="ce76" table:number-columns-repeated="30"/>
        </table:table-row>
        <table:table-row table:style-name="ro16">
          <table:table-cell table:style-name="ce16" office:value-type="string" calcext:value-type="string">
            <text:p>count_1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style-name="ce204" table:formula="of:=AVERAGE([.B23:.F23])/AVERAGE([.B$8:.F$8])" office:value-type="float" office:value="5.05695305171828" calcext:value-type="float">
            <text:p>5.1</text:p>
          </table:table-cell>
          <table:table-cell table:style-name="ce366" table:formula="of:=[.G23]*[.H$8]" office:value-type="float" office:value="129" calcext:value-type="float">
            <text:p>129</text:p>
          </table:table-cell>
          <table:table-cell table:style-name="ce212" table:formula="of:=STDEVP([.B23:.F23])/AVERAGE([.B23:.F23])" office:value-type="percentage" office:value="0.102255084947852" calcext:value-type="percentage">
            <text:p>10.2%</text:p>
          </table:table-cell>
          <table:table-cell table:style-name="ce212" table:formula="of:=IF([.H23]&gt;[.$A$43]; [.$C$43]; IF([.H23]&gt;[.$A$44]; [.$C$44]; IF([.H23]&gt;[.$A$45];[.$C$45];IF([.H23]&gt;[.$A$46];[.$C$46]; IF([.H23]&gt;[.$A$47];[.$C$47];IF([.H23]&gt;[.$A$48];[.$C$48];[.$C$49]))))))/100" office:value-type="percentage" office:value="0.275" calcext:value-type="percentage">
            <text:p>27.5%</text:p>
          </table:table-cell>
          <table:table-cell table:style-name="ce373" table:formula="of:=(MAX([.B23:.F23])-MIN([.B23:.F23]))/[.H23]*5" office:value-type="percentage" office:value="0.310077519379845" calcext:value-type="percentage">
            <text:p>31.0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16">
          <table:table-cell table:style-name="ce16" office:value-type="string" calcext:value-type="string">
            <text:p>count_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ce204" table:formula="of:=AVERAGE([.B24:.F24])/AVERAGE([.B$8:.F$8])" office:value-type="float" office:value="4.27292932276971" calcext:value-type="float">
            <text:p>4.3</text:p>
          </table:table-cell>
          <table:table-cell table:style-name="ce366" table:formula="of:=[.G24]*[.H$8]" office:value-type="float" office:value="109" calcext:value-type="float">
            <text:p>109</text:p>
          </table:table-cell>
          <table:table-cell table:style-name="ce212" table:formula="of:=STDEVP([.B24:.F24])/AVERAGE([.B24:.F24])" office:value-type="percentage" office:value="0.0789204152939691" calcext:value-type="percentage">
            <text:p>7.9%</text:p>
          </table:table-cell>
          <table:table-cell table:style-name="ce212" table:formula="of:=IF([.H24]&gt;[.$A$43]; [.$C$43]; IF([.H24]&gt;[.$A$44]; [.$C$44]; IF([.H24]&gt;[.$A$45];[.$C$45];IF([.H24]&gt;[.$A$46];[.$C$46]; IF([.H24]&gt;[.$A$47];[.$C$47];IF([.H24]&gt;[.$A$48];[.$C$48];[.$C$49]))))))/100" office:value-type="percentage" office:value="0.275" calcext:value-type="percentage">
            <text:p>27.5%</text:p>
          </table:table-cell>
          <table:table-cell table:style-name="ce373" table:formula="of:=(MAX([.B24:.F24])-MIN([.B24:.F24]))/[.H24]*5" office:value-type="percentage" office:value="0.229357798165138" calcext:value-type="percentage">
            <text:p>22.9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12" table:number-columns-repeated="30"/>
        </table:table-row>
        <table:table-row table:style-name="ro16">
          <table:table-cell table:style-name="ce16" office:value-type="string" calcext:value-type="string">
            <text:p>count_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204" table:formula="of:=AVERAGE([.B25:.F25])/AVERAGE([.B$8:.F$8])" office:value-type="float" office:value="3.567307966716" calcext:value-type="float">
            <text:p>3.6</text:p>
          </table:table-cell>
          <table:table-cell table:style-name="ce366" table:formula="of:=[.G25]*[.H$8]" office:value-type="float" office:value="91" calcext:value-type="float">
            <text:p>91</text:p>
          </table:table-cell>
          <table:table-cell table:style-name="ce212" table:formula="of:=STDEVP([.B25:.F25])/AVERAGE([.B25:.F25])" office:value-type="percentage" office:value="0.117330530242102" calcext:value-type="percentage">
            <text:p>11.7%</text:p>
          </table:table-cell>
          <table:table-cell table:style-name="ce212" table:formula="of:=IF([.H25]&gt;[.$A$43]; [.$C$43]; IF([.H25]&gt;[.$A$44]; [.$C$44]; IF([.H25]&gt;[.$A$45];[.$C$45];IF([.H25]&gt;[.$A$46];[.$C$46]; IF([.H25]&gt;[.$A$47];[.$C$47];IF([.H25]&gt;[.$A$48];[.$C$48];[.$C$49]))))))/100" office:value-type="percentage" office:value="0.275" calcext:value-type="percentage">
            <text:p>27.5%</text:p>
          </table:table-cell>
          <table:table-cell table:style-name="ce373" table:formula="of:=(MAX([.B25:.F25])-MIN([.B25:.F25]))/[.H25]*5" office:value-type="percentage" office:value="0.32967032967033" calcext:value-type="percentage">
            <text:p>33.0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16">
          <table:table-cell table:style-name="ce16" office:value-type="string" calcext:value-type="string">
            <text:p>count_2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204" table:formula="of:=AVERAGE([.B26:.F26])/AVERAGE([.B$8:.F$8])" office:value-type="float" office:value="2.82248542421486" calcext:value-type="float">
            <text:p>2.8</text:p>
          </table:table-cell>
          <table:table-cell table:style-name="ce366" table:formula="of:=[.G26]*[.H$8]" office:value-type="float" office:value="72" calcext:value-type="float">
            <text:p>72</text:p>
          </table:table-cell>
          <table:table-cell table:style-name="ce212" table:formula="of:=STDEVP([.B26:.F26])/AVERAGE([.B26:.F26])" office:value-type="percentage" office:value="0.0941990275434065" calcext:value-type="percentage">
            <text:p>9.4%</text:p>
          </table:table-cell>
          <table:table-cell table:style-name="ce212" table:formula="of:=IF([.H26]&gt;[.$A$43]; [.$C$43]; IF([.H26]&gt;[.$A$44]; [.$C$44]; IF([.H26]&gt;[.$A$45];[.$C$45];IF([.H26]&gt;[.$A$46];[.$C$46]; IF([.H26]&gt;[.$A$47];[.$C$47];IF([.H26]&gt;[.$A$48];[.$C$48];[.$C$49]))))))/100" office:value-type="percentage" office:value="0.275" calcext:value-type="percentage">
            <text:p>27.5%</text:p>
          </table:table-cell>
          <table:table-cell table:style-name="ce373" table:formula="of:=(MAX([.B26:.F26])-MIN([.B26:.F26]))/[.H26]*5" office:value-type="percentage" office:value="0.277777777777778" calcext:value-type="percentage">
            <text:p>27.8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16" office:value-type="string" calcext:value-type="string">
            <text:p>count_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204" table:formula="of:=AVERAGE([.B27:.F27])/AVERAGE([.B$8:.F$8])" office:value-type="float" office:value="2.43047355974057" calcext:value-type="float">
            <text:p>2.4</text:p>
          </table:table-cell>
          <table:table-cell table:style-name="ce366" table:formula="of:=[.G27]*[.H$8]" office:value-type="float" office:value="62" calcext:value-type="float">
            <text:p>62</text:p>
          </table:table-cell>
          <table:table-cell table:style-name="ce212" table:formula="of:=STDEVP([.B27:.F27])/AVERAGE([.B27:.F27])" office:value-type="percentage" office:value="0.120698625379805" calcext:value-type="percentage">
            <text:p>12.1%</text:p>
          </table:table-cell>
          <table:table-cell table:style-name="ce212" table:formula="of:=IF([.H27]&gt;[.$A$43]; [.$C$43]; IF([.H27]&gt;[.$A$44]; [.$C$44]; IF([.H27]&gt;[.$A$45];[.$C$45];IF([.H27]&gt;[.$A$46];[.$C$46]; IF([.H27]&gt;[.$A$47];[.$C$47];IF([.H27]&gt;[.$A$48];[.$C$48];[.$C$49]))))))/100" office:value-type="percentage" office:value="0.275" calcext:value-type="percentage">
            <text:p>27.5%</text:p>
          </table:table-cell>
          <table:table-cell table:style-name="ce373" table:formula="of:=(MAX([.B27:.F27])-MIN([.B27:.F27]))/[.H27]*5" office:value-type="percentage" office:value="0.32258064516129" calcext:value-type="percentage">
            <text:p>32.3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16" office:value-type="string" calcext:value-type="string">
            <text:p>count_2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style-name="ce204" table:formula="of:=AVERAGE([.B28:.F28])/AVERAGE([.B$8:.F$8])" office:value-type="float" office:value="2.15606525460857" calcext:value-type="float">
            <text:p>2.2</text:p>
          </table:table-cell>
          <table:table-cell table:style-name="ce366" table:formula="of:=[.G28]*[.H$8]" office:value-type="float" office:value="55" calcext:value-type="float">
            <text:p>55</text:p>
          </table:table-cell>
          <table:table-cell table:style-name="ce212" table:formula="of:=STDEVP([.B28:.F28])/AVERAGE([.B28:.F28])" office:value-type="percentage" office:value="0.128564869306645" calcext:value-type="percentage">
            <text:p>12.9%</text:p>
          </table:table-cell>
          <table:table-cell table:style-name="ce212" table:formula="of:=IF([.H28]&gt;[.$A$43]; [.$C$43]; IF([.H28]&gt;[.$A$44]; [.$C$44]; IF([.H28]&gt;[.$A$45];[.$C$45];IF([.H28]&gt;[.$A$46];[.$C$46]; IF([.H28]&gt;[.$A$47];[.$C$47];IF([.H28]&gt;[.$A$48];[.$C$48];[.$C$49]))))))/100" office:value-type="percentage" office:value="0.275" calcext:value-type="percentage">
            <text:p>27.5%</text:p>
          </table:table-cell>
          <table:table-cell table:style-name="ce373" table:formula="of:=(MAX([.B28:.F28])-MIN([.B28:.F28]))/[.H28]*5" office:value-type="percentage" office:value="0.363636363636364" calcext:value-type="percentage">
            <text:p>36.4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16" office:value-type="string" calcext:value-type="string">
            <text:p>count_2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04" table:formula="of:=AVERAGE([.B29:.F29])/AVERAGE([.B$8:.F$8])" office:value-type="float" office:value="1.920858135924" calcext:value-type="float">
            <text:p>1.9</text:p>
          </table:table-cell>
          <table:table-cell table:style-name="ce366" table:formula="of:=[.G29]*[.H$8]" office:value-type="float" office:value="49" calcext:value-type="float">
            <text:p>49</text:p>
          </table:table-cell>
          <table:table-cell table:style-name="ce212" table:formula="of:=STDEVP([.B29:.F29])/AVERAGE([.B29:.F29])" office:value-type="percentage" office:value="0.175557658511074" calcext:value-type="percentage">
            <text:p>17.6%</text:p>
          </table:table-cell>
          <table:table-cell table:style-name="ce212" table:formula="of:=IF([.H29]&gt;[.$A$43]; [.$C$43]; IF([.H29]&gt;[.$A$44]; [.$C$44]; IF([.H29]&gt;[.$A$45];[.$C$45];IF([.H29]&gt;[.$A$46];[.$C$46]; IF([.H29]&gt;[.$A$47];[.$C$47];IF([.H29]&gt;[.$A$48];[.$C$48];[.$C$49]))))))/100" office:value-type="percentage" office:value="0.275" calcext:value-type="percentage">
            <text:p>27.5%</text:p>
          </table:table-cell>
          <table:table-cell table:style-name="ce373" table:formula="of:=(MAX([.B29:.F29])-MIN([.B29:.F29]))/[.H29]*5" office:value-type="percentage" office:value="0.510204081632653" calcext:value-type="percentage">
            <text:p>51.0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16" office:value-type="string" calcext:value-type="string">
            <text:p>count_2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204" table:formula="of:=AVERAGE([.B30:.F30])/AVERAGE([.B$8:.F$8])" office:value-type="float" office:value="1.68565101723943" calcext:value-type="float">
            <text:p>1.7</text:p>
          </table:table-cell>
          <table:table-cell table:style-name="ce366" table:formula="of:=[.G30]*[.H$8]" office:value-type="float" office:value="43" calcext:value-type="float">
            <text:p>43</text:p>
          </table:table-cell>
          <table:table-cell table:style-name="ce212" table:formula="of:=STDEVP([.B30:.F30])/AVERAGE([.B30:.F30])" office:value-type="percentage" office:value="0.215665546406877" calcext:value-type="percentage">
            <text:p>21.6%</text:p>
          </table:table-cell>
          <table:table-cell table:style-name="ce212" table:formula="of:=IF([.H30]&gt;[.$A$43]; [.$C$43]; IF([.H30]&gt;[.$A$44]; [.$C$44]; IF([.H30]&gt;[.$A$45];[.$C$45];IF([.H30]&gt;[.$A$46];[.$C$46]; IF([.H30]&gt;[.$A$47];[.$C$47];IF([.H30]&gt;[.$A$48];[.$C$48];[.$C$49]))))))/100" office:value-type="percentage" office:value="0.275" calcext:value-type="percentage">
            <text:p>27.5%</text:p>
          </table:table-cell>
          <table:table-cell table:style-name="ce373" table:formula="of:=(MAX([.B30:.F30])-MIN([.B30:.F30]))/[.H30]*5" office:value-type="percentage" office:value="0.581395348837209" calcext:value-type="percentage">
            <text:p>58.1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16" office:value-type="string" calcext:value-type="string">
            <text:p>count_2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204" table:formula="of:=AVERAGE([.B31:.F31])/AVERAGE([.B$8:.F$8])" office:value-type="float" office:value="1.56804745789714" calcext:value-type="float">
            <text:p>1.6</text:p>
          </table:table-cell>
          <table:table-cell table:style-name="ce366" table:formula="of:=[.G31]*[.H$8]" office:value-type="float" office:value="40" calcext:value-type="float">
            <text:p>40</text:p>
          </table:table-cell>
          <table:table-cell table:style-name="ce212" table:formula="of:=STDEVP([.B31:.F31])/AVERAGE([.B31:.F31])" office:value-type="percentage" office:value="0.262202212042538" calcext:value-type="percentage">
            <text:p>26.2%</text:p>
          </table:table-cell>
          <table:table-cell table:style-name="ce212" table:formula="of:=IF([.H31]&gt;[.$A$43]; [.$C$43]; IF([.H31]&gt;[.$A$44]; [.$C$44]; IF([.H31]&gt;[.$A$45];[.$C$45];IF([.H31]&gt;[.$A$46];[.$C$46]; IF([.H31]&gt;[.$A$47];[.$C$47];IF([.H31]&gt;[.$A$48];[.$C$48];[.$C$49]))))))/100" office:value-type="percentage" office:value="0.275" calcext:value-type="percentage">
            <text:p>27.5%</text:p>
          </table:table-cell>
          <table:table-cell table:style-name="ce373" table:formula="of:=(MAX([.B31:.F31])-MIN([.B31:.F31]))/[.H31]*5" office:value-type="percentage" office:value="0.75" calcext:value-type="percentage">
            <text:p>75.0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16" office:value-type="string" calcext:value-type="string">
            <text:p>count_2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204" table:formula="of:=AVERAGE([.B32:.F32])/AVERAGE([.B$8:.F$8])" office:value-type="float" office:value="1.41124271210743" calcext:value-type="float">
            <text:p>1.4</text:p>
          </table:table-cell>
          <table:table-cell table:style-name="ce366" table:formula="of:=[.G32]*[.H$8]" office:value-type="float" office:value="36" calcext:value-type="float">
            <text:p>36</text:p>
          </table:table-cell>
          <table:table-cell table:style-name="ce212" table:formula="of:=STDEVP([.B32:.F32])/AVERAGE([.B32:.F32])" office:value-type="percentage" office:value="0.204124145231932" calcext:value-type="percentage">
            <text:p>20.4%</text:p>
          </table:table-cell>
          <table:table-cell table:style-name="ce212" table:formula="of:=IF([.H32]&gt;[.$A$43]; [.$C$43]; IF([.H32]&gt;[.$A$44]; [.$C$44]; IF([.H32]&gt;[.$A$45];[.$C$45];IF([.H32]&gt;[.$A$46];[.$C$46]; IF([.H32]&gt;[.$A$47];[.$C$47];IF([.H32]&gt;[.$A$48];[.$C$48];[.$C$49]))))))/100" office:value-type="percentage" office:value="0.275" calcext:value-type="percentage">
            <text:p>27.5%</text:p>
          </table:table-cell>
          <table:table-cell table:style-name="ce373" table:formula="of:=(MAX([.B32:.F32])-MIN([.B32:.F32]))/[.H32]*5" office:value-type="percentage" office:value="0.555555555555556" calcext:value-type="percentage">
            <text:p>55.6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16" office:value-type="string" calcext:value-type="string">
            <text:p>count_2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04" table:formula="of:=AVERAGE([.B33:.F33])/AVERAGE([.B$8:.F$8])" office:value-type="float" office:value="1.17603559342286" calcext:value-type="float">
            <text:p>1.2</text:p>
          </table:table-cell>
          <table:table-cell table:style-name="ce366" table:formula="of:=[.G33]*[.H$8]" office:value-type="float" office:value="30" calcext:value-type="float">
            <text:p>30</text:p>
          </table:table-cell>
          <table:table-cell table:style-name="ce212" table:formula="of:=STDEVP([.B33:.F33])/AVERAGE([.B33:.F33])" office:value-type="percentage" office:value="0.298142396999972" calcext:value-type="percentage">
            <text:p>29.8%</text:p>
          </table:table-cell>
          <table:table-cell table:style-name="ce212" table:formula="of:=IF([.H33]&gt;[.$A$43]; [.$C$43]; IF([.H33]&gt;[.$A$44]; [.$C$44]; IF([.H33]&gt;[.$A$45];[.$C$45];IF([.H33]&gt;[.$A$46];[.$C$46]; IF([.H33]&gt;[.$A$47];[.$C$47];IF([.H33]&gt;[.$A$48];[.$C$48];[.$C$49]))))))/100" office:value-type="percentage" office:value="0.275" calcext:value-type="percentage">
            <text:p>27.5%</text:p>
          </table:table-cell>
          <table:table-cell table:style-name="ce373" table:formula="of:=(MAX([.B33:.F33])-MIN([.B33:.F33]))/[.H33]*5" office:value-type="percentage" office:value="0.833333333333334" calcext:value-type="percentage">
            <text:p>83.3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16" office:value-type="string" calcext:value-type="string">
            <text:p>count_2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04" table:formula="of:=AVERAGE([.B34:.F34])/AVERAGE([.B$8:.F$8])" office:value-type="float" office:value="1.01923084763314" calcext:value-type="float">
            <text:p>1.0</text:p>
          </table:table-cell>
          <table:table-cell table:style-name="ce366" table:formula="of:=[.G34]*[.H$8]" office:value-type="float" office:value="26" calcext:value-type="float">
            <text:p>26</text:p>
          </table:table-cell>
          <table:table-cell table:style-name="ce212" table:formula="of:=STDEVP([.B34:.F34])/AVERAGE([.B34:.F34])" office:value-type="percentage" office:value="0.307692307692308" calcext:value-type="percentage">
            <text:p>30.8%</text:p>
          </table:table-cell>
          <table:table-cell table:style-name="ce212" table:formula="of:=IF([.H34]&gt;[.$A$43]; [.$C$43]; IF([.H34]&gt;[.$A$44]; [.$C$44]; IF([.H34]&gt;[.$A$45];[.$C$45];IF([.H34]&gt;[.$A$46];[.$C$46]; IF([.H34]&gt;[.$A$47];[.$C$47];IF([.H34]&gt;[.$A$48];[.$C$48];[.$C$49]))))))/100" office:value-type="percentage" office:value="0.275" calcext:value-type="percentage">
            <text:p>27.5%</text:p>
          </table:table-cell>
          <table:table-cell table:style-name="ce373" table:formula="of:=(MAX([.B34:.F34])-MIN([.B34:.F34]))/[.H34]*5" office:value-type="percentage" office:value="0.769230769230769" calcext:value-type="percentage">
            <text:p>76.9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16" office:value-type="string" calcext:value-type="string">
            <text:p>count_3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04" table:formula="of:=AVERAGE([.B35:.F35])/AVERAGE([.B$8:.F$8])" office:value-type="float" office:value="0.901627288290857" calcext:value-type="float">
            <text:p>0.9</text:p>
          </table:table-cell>
          <table:table-cell table:style-name="ce366" table:formula="of:=[.G35]*[.H$8]" office:value-type="float" office:value="23" calcext:value-type="float">
            <text:p>23</text:p>
          </table:table-cell>
          <table:table-cell table:style-name="ce212" table:formula="of:=STDEVP([.B35:.F35])/AVERAGE([.B35:.F35])" office:value-type="percentage" office:value="0.260869565217391" calcext:value-type="percentage">
            <text:p>26.1%</text:p>
          </table:table-cell>
          <table:table-cell table:style-name="ce212" table:formula="of:=IF([.H35]&gt;[.$A$43]; [.$C$43]; IF([.H35]&gt;[.$A$44]; [.$C$44]; IF([.H35]&gt;[.$A$45];[.$C$45];IF([.H35]&gt;[.$A$46];[.$C$46]; IF([.H35]&gt;[.$A$47];[.$C$47];IF([.H35]&gt;[.$A$48];[.$C$48];[.$C$49]))))))/100" office:value-type="percentage" office:value="0.275" calcext:value-type="percentage">
            <text:p>27.5%</text:p>
          </table:table-cell>
          <table:table-cell table:style-name="ce373" table:formula="of:=(MAX([.B35:.F35])-MIN([.B35:.F35]))/[.H35]*5" office:value-type="percentage" office:value="0.652173913043478" calcext:value-type="percentage">
            <text:p>65.2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16" office:value-type="string" calcext:value-type="string">
            <text:p>count_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04" table:formula="of:=AVERAGE([.B36:.F36])/AVERAGE([.B$8:.F$8])" office:value-type="float" office:value="0.392011864474285" calcext:value-type="float">
            <text:p>0.4</text:p>
          </table:table-cell>
          <table:table-cell table:style-name="ce366" table:formula="of:=[.G36]*[.H$8]" office:value-type="float" office:value="10" calcext:value-type="float">
            <text:p>10</text:p>
          </table:table-cell>
          <table:table-cell table:style-name="ce212" table:formula="of:=STDEVP([.B36:.F36])/AVERAGE([.B36:.F36])" office:value-type="percentage" office:value="0.894427190999916" calcext:value-type="percentage">
            <text:p>89.4%</text:p>
          </table:table-cell>
          <table:table-cell table:style-name="ce212" table:formula="of:=IF([.H36]&gt;[.$A$43]; [.$C$43]; IF([.H36]&gt;[.$A$44]; [.$C$44]; IF([.H36]&gt;[.$A$45];[.$C$45];IF([.H36]&gt;[.$A$46];[.$C$46]; IF([.H36]&gt;[.$A$47];[.$C$47];IF([.H36]&gt;[.$A$48];[.$C$48];[.$C$49]))))))/100" office:value-type="percentage" office:value="0.275" calcext:value-type="percentage">
            <text:p>27.5%</text:p>
          </table:table-cell>
          <table:table-cell table:style-name="ce373" table:formula="of:=(MAX([.B36:.F36])-MIN([.B36:.F36]))/[.H36]*5" office:value-type="percentage" office:value="2" calcext:value-type="percentage">
            <text:p>200.0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16" office:value-type="string" calcext:value-type="string">
            <text:p>count_5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4" table:formula="of:=AVERAGE([.B37:.F37])/AVERAGE([.B$8:.F$8])" office:value-type="float" office:value="0.0784023728948571" calcext:value-type="float">
            <text:p>0.1</text:p>
          </table:table-cell>
          <table:table-cell table:style-name="ce366" table:formula="of:=[.G37]*[.H$8]" office:value-type="float" office:value="2" calcext:value-type="float">
            <text:p>2</text:p>
          </table:table-cell>
          <table:table-cell table:style-name="ce212" table:formula="of:=STDEVP([.B37:.F37])/AVERAGE([.B37:.F37])" office:value-type="percentage" office:value="1.22474487139159" calcext:value-type="percentage">
            <text:p>122.5%</text:p>
          </table:table-cell>
          <table:table-cell table:style-name="ce212" table:formula="of:=IF([.H37]&gt;[.$A$43]; [.$C$43]; IF([.H37]&gt;[.$A$44]; [.$C$44]; IF([.H37]&gt;[.$A$45];[.$C$45];IF([.H37]&gt;[.$A$46];[.$C$46]; IF([.H37]&gt;[.$A$47];[.$C$47];IF([.H37]&gt;[.$A$48];[.$C$48];[.$C$49]))))))/100" office:value-type="percentage" office:value="0.275" calcext:value-type="percentage">
            <text:p>27.5%</text:p>
          </table:table-cell>
          <table:table-cell table:style-name="ce373" table:formula="of:=(MAX([.B37:.F37])-MIN([.B37:.F37]))/[.H37]*5" office:value-type="percentage" office:value="2.5" calcext:value-type="percentage">
            <text:p>250.0%</text:p>
          </table:table-cell>
          <table:table-cell table:number-columns-repeated="38"/>
        </table:table-row>
        <table:table-row table:style-name="ro16">
          <table:table-cell table:style-name="ce16" office:value-type="string" calcext:value-type="string">
            <text:p>count_7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4" table:formula="of:=AVERAGE([.B38:.F38])/AVERAGE([.B$8:.F$8])" office:value-type="float" office:value="0" calcext:value-type="float">
            <text:p>0.0</text:p>
          </table:table-cell>
          <table:table-cell table:style-name="ce366" table:formula="of:=[.G38]*[.H$8]" office:value-type="float" office:value="0" calcext:value-type="float">
            <text:p>0</text:p>
          </table:table-cell>
          <table:table-cell table:style-name="ce212" table:formula="of:=STDEVP([.B38:.F38])/AVERAGE([.B38:.F38])" office:value-type="string" office:string-value="" calcext:value-type="error">
            <text:p>#DIV/0!</text:p>
          </table:table-cell>
          <table:table-cell table:style-name="ce212" table:formula="of:=IF([.H38]&gt;[.$A$43]; [.$C$43]; IF([.H38]&gt;[.$A$44]; [.$C$44]; IF([.H38]&gt;[.$A$45];[.$C$45];IF([.H38]&gt;[.$A$46];[.$C$46]; IF([.H38]&gt;[.$A$47];[.$C$47];IF([.H38]&gt;[.$A$48];[.$C$48];[.$C$49]))))))/100" office:value-type="percentage" office:value="0.275" calcext:value-type="percentage">
            <text:p>27.5%</text:p>
          </table:table-cell>
          <table:table-cell table:style-name="ce373" table:formula="of:=(MAX([.B38:.F38])-MIN([.B38:.F38]))/[.H38]*5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6">
          <table:table-cell table:number-columns-repeated="7"/>
          <table:table-cell table:style-name="ce368"/>
          <table:table-cell table:number-columns-repeated="41"/>
        </table:table-row>
        <table:table-row table:style-name="ro16">
          <table:table-cell office:value-type="string" calcext:value-type="string">
            <text:p>Table C.2</text:p>
          </table:table-cell>
          <table:table-cell table:number-columns-repeated="6"/>
          <table:table-cell table:style-name="ce368"/>
          <table:table-cell table:number-columns-repeated="41"/>
        </table:table-row>
        <table:table-row table:style-name="ro16">
          <table:table-cell table:style-name="ce115"/>
          <table:table-cell table:style-name="ce199" office:value-type="string" calcext:value-type="string">
            <text:p>Mean counted X</text:p>
          </table:table-cell>
          <table:table-cell table:style-name="ce115"/>
          <table:table-cell table:style-name="ce201" office:value-type="string" calcext:value-type="string">
            <text:p>C<text:span text:style-name="T6">V_MAX</text:span></text:p>
          </table:table-cell>
          <table:table-cell table:style-name="ce117" table:number-columns-repeated="3"/>
          <table:table-cell table:style-name="ce118"/>
          <table:table-cell table:number-columns-repeated="41"/>
        </table:table-row>
        <table:table-row table:style-name="ro16">
          <table:table-cell table:style-name="ce193" office:value-type="string" calcext:value-type="string">
            <text:p>X &gt;=</text:p>
          </table:table-cell>
          <table:table-cell table:style-name="ce200" office:value-type="string" calcext:value-type="string">
            <text:p>X &lt;</text:p>
          </table:table-cell>
          <table:table-cell table:style-name="ce193" office:value-type="string" calcext:value-type="string">
            <text:p>D<text:span text:style-name="T6">QMAX / SAMPLE</text:span></text:p>
          </table:table-cell>
          <table:table-cell table:style-name="ce193" office:value-type="string" calcext:value-type="string">
            <text:p>N=3</text:p>
          </table:table-cell>
          <table:table-cell table:style-name="ce200" office:value-type="string" calcext:value-type="string">
            <text:p>N=6</text:p>
          </table:table-cell>
          <table:table-cell table:style-name="ce200" office:value-type="string" calcext:value-type="string">
            <text:p>N=10</text:p>
          </table:table-cell>
          <table:table-cell table:style-name="ce200" office:value-type="string" calcext:value-type="string">
            <text:p>N=20</text:p>
          </table:table-cell>
          <table:table-cell table:style-name="ce210" office:value-type="string" calcext:value-type="string">
            <text:p>N=40</text:p>
          </table:table-cell>
          <table:table-cell table:number-columns-repeated="41"/>
        </table:table-row>
        <table:table-row table:style-name="ro16">
          <table:table-cell table:style-name="ce164" office:value-type="float" office:value="10000" calcext:value-type="float">
            <text:p>10000</text:p>
          </table:table-cell>
          <table:table-cell/>
          <table:table-cell table:style-name="ce164" office:value-type="float" office:value="11" calcext:value-type="float">
            <text:p>11</text:p>
          </table:table-cell>
          <table:table-cell table:style-name="ce164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173" office:value-type="float" office:value="1.8" calcext:value-type="float">
            <text:p>1.8</text:p>
          </table:table-cell>
          <table:table-cell table:number-columns-repeated="41"/>
        </table:table-row>
        <table:table-row table:style-name="ro16">
          <table:table-cell table:style-name="ce164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164" office:value-type="float" office:value="11.3" calcext:value-type="float">
            <text:p>11.3</text:p>
          </table:table-cell>
          <table:table-cell table:style-name="ce164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173" office:value-type="float" office:value="1.9" calcext:value-type="float">
            <text:p>1.9</text:p>
          </table:table-cell>
          <table:table-cell table:number-columns-repeated="41"/>
        </table:table-row>
        <table:table-row table:style-name="ro16">
          <table:table-cell table:style-name="ce164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164" office:value-type="float" office:value="11.9" calcext:value-type="float">
            <text:p>11.9</text:p>
          </table:table-cell>
          <table:table-cell table:style-name="ce164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173" office:value-type="float" office:value="2.1" calcext:value-type="float">
            <text:p>2.1</text:p>
          </table:table-cell>
          <table:table-cell table:number-columns-repeated="41"/>
        </table:table-row>
        <table:table-row table:style-name="ro16">
          <table:table-cell table:style-name="ce164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164" office:value-type="float" office:value="13.4" calcext:value-type="float">
            <text:p>13.4</text:p>
          </table:table-cell>
          <table:table-cell table:style-name="ce164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173" office:value-type="float" office:value="2.4" calcext:value-type="float">
            <text:p>2.4</text:p>
          </table:table-cell>
          <table:table-cell table:number-columns-repeated="41"/>
        </table:table-row>
        <table:table-row table:style-name="ro16">
          <table:table-cell table:style-name="ce164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164" office:value-type="float" office:value="15.6" calcext:value-type="float">
            <text:p>15.6</text:p>
          </table:table-cell>
          <table:table-cell table:style-name="ce164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173" office:value-type="float" office:value="2.9" calcext:value-type="float">
            <text:p>2.9</text:p>
          </table:table-cell>
          <table:table-cell table:number-columns-repeated="41"/>
        </table:table-row>
        <table:table-row table:style-name="ro16">
          <table:table-cell table:style-name="ce164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164" office:value-type="float" office:value="19.3" calcext:value-type="float">
            <text:p>19.3</text:p>
          </table:table-cell>
          <table:table-cell table:style-name="ce164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173" office:value-type="float" office:value="4.1" calcext:value-type="float">
            <text:p>4.1</text:p>
          </table:table-cell>
          <table:table-cell table:number-columns-repeated="41"/>
        </table:table-row>
        <table:table-row table:style-name="ro16">
          <table:table-cell table:style-name="ce165" office:value-type="float" office:value="100" calcext:value-type="float">
            <text:p>100</text:p>
          </table:table-cell>
          <table:table-cell table:style-name="ce91" office:value-type="float" office:value="200" calcext:value-type="float">
            <text:p>200</text:p>
          </table:table-cell>
          <table:table-cell table:style-name="ce165" office:value-type="float" office:value="27.5" calcext:value-type="float">
            <text:p>27.5</text:p>
          </table:table-cell>
          <table:table-cell table:style-name="ce165" office:value-type="float" office:value="10" calcext:value-type="float">
            <text:p>10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7" calcext:value-type="float">
            <text:p>7</text:p>
          </table:table-cell>
          <table:table-cell table:style-name="ce91" office:value-type="float" office:value="6.1" calcext:value-type="float">
            <text:p>6.1</text:p>
          </table:table-cell>
          <table:table-cell table:style-name="ce211" office:value-type="float" office:value="5.5" calcext:value-type="float">
            <text:p>5.5</text:p>
          </table:table-cell>
          <table:table-cell table:number-columns-repeated="41"/>
        </table:table-row>
        <table:table-row table:style-name="ro16" table:number-rows-repeated="2">
          <table:table-cell table:number-columns-repeated="49"/>
        </table:table-row>
        <table:table-row table:style-name="ro16">
          <table:table-cell office:value-type="string" calcext:value-type="string">
            <text:p>scanned_volume_ml</text:p>
          </table:table-cell>
          <table:table-cell office:value-type="string" calcext:value-type="string">
            <text:p>count_4</text:p>
          </table:table-cell>
          <table:table-cell office:value-type="string" calcext:value-type="string">
            <text:p>count_5</text:p>
          </table:table-cell>
          <table:table-cell office:value-type="string" calcext:value-type="string">
            <text:p>count_6</text:p>
          </table:table-cell>
          <table:table-cell office:value-type="string" calcext:value-type="string">
            <text:p>count_7</text:p>
          </table:table-cell>
          <table:table-cell office:value-type="string" calcext:value-type="string">
            <text:p>count_8</text:p>
          </table:table-cell>
          <table:table-cell office:value-type="string" calcext:value-type="string">
            <text:p>count_9</text:p>
          </table:table-cell>
          <table:table-cell office:value-type="string" calcext:value-type="string">
            <text:p>count_10</text:p>
          </table:table-cell>
          <table:table-cell office:value-type="string" calcext:value-type="string">
            <text:p>count_11</text:p>
          </table:table-cell>
          <table:table-cell office:value-type="string" calcext:value-type="string">
            <text:p>count_12</text:p>
          </table:table-cell>
          <table:table-cell office:value-type="string" calcext:value-type="string">
            <text:p>count_13</text:p>
          </table:table-cell>
          <table:table-cell office:value-type="string" calcext:value-type="string">
            <text:p>count_14</text:p>
          </table:table-cell>
          <table:table-cell office:value-type="string" calcext:value-type="string">
            <text:p>count_15</text:p>
          </table:table-cell>
          <table:table-cell office:value-type="string" calcext:value-type="string">
            <text:p>count_16</text:p>
          </table:table-cell>
          <table:table-cell office:value-type="string" calcext:value-type="string">
            <text:p>count_17</text:p>
          </table:table-cell>
          <table:table-cell office:value-type="string" calcext:value-type="string">
            <text:p>count_18</text:p>
          </table:table-cell>
          <table:table-cell office:value-type="string" calcext:value-type="string">
            <text:p>count_19</text:p>
          </table:table-cell>
          <table:table-cell office:value-type="string" calcext:value-type="string">
            <text:p>count_20</text:p>
          </table:table-cell>
          <table:table-cell office:value-type="string" calcext:value-type="string">
            <text:p>count_21</text:p>
          </table:table-cell>
          <table:table-cell office:value-type="string" calcext:value-type="string">
            <text:p>count_22</text:p>
          </table:table-cell>
          <table:table-cell office:value-type="string" calcext:value-type="string">
            <text:p>count_23</text:p>
          </table:table-cell>
          <table:table-cell office:value-type="string" calcext:value-type="string">
            <text:p>count_24</text:p>
          </table:table-cell>
          <table:table-cell office:value-type="string" calcext:value-type="string">
            <text:p>count_25</text:p>
          </table:table-cell>
          <table:table-cell office:value-type="string" calcext:value-type="string">
            <text:p>count_26</text:p>
          </table:table-cell>
          <table:table-cell office:value-type="string" calcext:value-type="string">
            <text:p>count_27</text:p>
          </table:table-cell>
          <table:table-cell office:value-type="string" calcext:value-type="string">
            <text:p>count_28</text:p>
          </table:table-cell>
          <table:table-cell office:value-type="string" calcext:value-type="string">
            <text:p>count_29</text:p>
          </table:table-cell>
          <table:table-cell office:value-type="string" calcext:value-type="string">
            <text:p>count_30</text:p>
          </table:table-cell>
          <table:table-cell office:value-type="string" calcext:value-type="string">
            <text:p>count_38</text:p>
          </table:table-cell>
          <table:table-cell office:value-type="string" calcext:value-type="string">
            <text:p>count_50</text:p>
          </table:table-cell>
          <table:table-cell office:value-type="string" calcext:value-type="string">
            <text:p>count_70</text:p>
          </table:table-cell>
          <table:table-cell table:number-columns-repeated="18"/>
        </table:table-row>
        <table:table-row table:style-name="ro16">
          <table:table-cell office:value-type="float" office:value="4.870482" calcext:value-type="float">
            <text:p>4.870482</text:p>
          </table:table-cell>
          <table:table-cell office:value-type="float" office:value="29462" calcext:value-type="float">
            <text:p>29462</text:p>
          </table:table-cell>
          <table:table-cell office:value-type="float" office:value="17681" calcext:value-type="float">
            <text:p>17681</text:p>
          </table:table-cell>
          <table:table-cell office:value-type="float" office:value="9568" calcext:value-type="float">
            <text:p>9568</text:p>
          </table:table-cell>
          <table:table-cell office:value-type="float" office:value="4731" calcext:value-type="float">
            <text:p>4731</text:p>
          </table:table-cell>
          <table:table-cell office:value-type="float" office:value="2535" calcext:value-type="float">
            <text:p>2535</text:p>
          </table:table-cell>
          <table:table-cell office:value-type="float" office:value="1205" calcext:value-type="float">
            <text:p>1205</text:p>
          </table:table-cell>
          <table:table-cell office:value-type="float" office:value="583" calcext:value-type="float">
            <text:p>583</text:p>
          </table:table-cell>
          <table:table-cell office:value-type="float" office:value="264" calcext:value-type="float">
            <text:p>264</text:p>
          </table:table-cell>
          <table:table-cell office:value-type="float" office:value="143" calcext:value-type="float">
            <text:p>143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6">
          <table:table-cell office:value-type="float" office:value="5.166697" calcext:value-type="float">
            <text:p>5.166697</text:p>
          </table:table-cell>
          <table:table-cell office:value-type="float" office:value="30722" calcext:value-type="float">
            <text:p>30722</text:p>
          </table:table-cell>
          <table:table-cell office:value-type="float" office:value="18493" calcext:value-type="float">
            <text:p>18493</text:p>
          </table:table-cell>
          <table:table-cell office:value-type="float" office:value="9915" calcext:value-type="float">
            <text:p>9915</text:p>
          </table:table-cell>
          <table:table-cell office:value-type="float" office:value="4974" calcext:value-type="float">
            <text:p>4974</text:p>
          </table:table-cell>
          <table:table-cell office:value-type="float" office:value="2591" calcext:value-type="float">
            <text:p>2591</text:p>
          </table:table-cell>
          <table:table-cell office:value-type="float" office:value="1256" calcext:value-type="float">
            <text:p>1256</text:p>
          </table:table-cell>
          <table:table-cell office:value-type="float" office:value="596" calcext:value-type="float">
            <text:p>596</text:p>
          </table:table-cell>
          <table:table-cell office:value-type="float" office:value="288" calcext:value-type="float">
            <text:p>288</text:p>
          </table:table-cell>
          <table:table-cell office:value-type="float" office:value="152" calcext:value-type="float">
            <text:p>152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6">
          <table:table-cell office:value-type="float" office:value="5.120954" calcext:value-type="float">
            <text:p>5.120954</text:p>
          </table:table-cell>
          <table:table-cell office:value-type="float" office:value="30719" calcext:value-type="float">
            <text:p>30719</text:p>
          </table:table-cell>
          <table:table-cell office:value-type="float" office:value="18556" calcext:value-type="float">
            <text:p>18556</text:p>
          </table:table-cell>
          <table:table-cell office:value-type="float" office:value="9949" calcext:value-type="float">
            <text:p>9949</text:p>
          </table:table-cell>
          <table:table-cell office:value-type="float" office:value="5007" calcext:value-type="float">
            <text:p>5007</text:p>
          </table:table-cell>
          <table:table-cell office:value-type="float" office:value="2546" calcext:value-type="float">
            <text:p>2546</text:p>
          </table:table-cell>
          <table:table-cell office:value-type="float" office:value="1151" calcext:value-type="float">
            <text:p>1151</text:p>
          </table:table-cell>
          <table:table-cell office:value-type="float" office:value="564" calcext:value-type="float">
            <text:p>564</text:p>
          </table:table-cell>
          <table:table-cell office:value-type="float" office:value="275" calcext:value-type="float">
            <text:p>275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6">
          <table:table-cell office:value-type="float" office:value="5.213185" calcext:value-type="float">
            <text:p>5.213185</text:p>
          </table:table-cell>
          <table:table-cell office:value-type="float" office:value="31067" calcext:value-type="float">
            <text:p>31067</text:p>
          </table:table-cell>
          <table:table-cell office:value-type="float" office:value="18788" calcext:value-type="float">
            <text:p>18788</text:p>
          </table:table-cell>
          <table:table-cell office:value-type="float" office:value="9987" calcext:value-type="float">
            <text:p>9987</text:p>
          </table:table-cell>
          <table:table-cell office:value-type="float" office:value="5047" calcext:value-type="float">
            <text:p>5047</text:p>
          </table:table-cell>
          <table:table-cell office:value-type="float" office:value="2596" calcext:value-type="float">
            <text:p>2596</text:p>
          </table:table-cell>
          <table:table-cell office:value-type="float" office:value="1220" calcext:value-type="float">
            <text:p>1220</text:p>
          </table:table-cell>
          <table:table-cell office:value-type="float" office:value="560" calcext:value-type="float">
            <text:p>560</text:p>
          </table:table-cell>
          <table:table-cell office:value-type="float" office:value="277" calcext:value-type="float">
            <text:p>277</text:p>
          </table:table-cell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6">
          <table:table-cell office:value-type="float" office:value="5.138114" calcext:value-type="float">
            <text:p>5.138114</text:p>
          </table:table-cell>
          <table:table-cell office:value-type="float" office:value="30629" calcext:value-type="float">
            <text:p>30629</text:p>
          </table:table-cell>
          <table:table-cell office:value-type="float" office:value="18326" calcext:value-type="float">
            <text:p>18326</text:p>
          </table:table-cell>
          <table:table-cell office:value-type="float" office:value="9797" calcext:value-type="float">
            <text:p>9797</text:p>
          </table:table-cell>
          <table:table-cell office:value-type="float" office:value="4927" calcext:value-type="float">
            <text:p>4927</text:p>
          </table:table-cell>
          <table:table-cell office:value-type="float" office:value="2562" calcext:value-type="float">
            <text:p>2562</text:p>
          </table:table-cell>
          <table:table-cell office:value-type="float" office:value="1213" calcext:value-type="float">
            <text:p>1213</text:p>
          </table:table-cell>
          <table:table-cell office:value-type="float" office:value="542" calcext:value-type="float">
            <text:p>542</text:p>
          </table:table-cell>
          <table:table-cell office:value-type="float" office:value="262" calcext:value-type="float">
            <text:p>262</text:p>
          </table:table-cell>
          <table:table-cell office:value-type="float" office:value="161" calcext:value-type="float">
            <text:p>161</text:p>
          </table:table-cell>
          <table:table-cell office:value-type="float" office:value="107" calcext:value-type="float">
            <text:p>107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6">
          <table:table-cell office:value-type="float" office:value="25.50943" calcext:value-type="float">
            <text:p>25.50943</text:p>
          </table:table-cell>
          <table:table-cell office:value-type="float" office:value="152599" calcext:value-type="float">
            <text:p>152599</text:p>
          </table:table-cell>
          <table:table-cell office:value-type="float" office:value="91844" calcext:value-type="float">
            <text:p>91844</text:p>
          </table:table-cell>
          <table:table-cell office:value-type="float" office:value="49216" calcext:value-type="float">
            <text:p>49216</text:p>
          </table:table-cell>
          <table:table-cell office:value-type="float" office:value="24686" calcext:value-type="float">
            <text:p>24686</text:p>
          </table:table-cell>
          <table:table-cell office:value-type="float" office:value="12830" calcext:value-type="float">
            <text:p>12830</text:p>
          </table:table-cell>
          <table:table-cell office:value-type="float" office:value="6045" calcext:value-type="float">
            <text:p>6045</text:p>
          </table:table-cell>
          <table:table-cell office:value-type="float" office:value="2845" calcext:value-type="float">
            <text:p>2845</text:p>
          </table:table-cell>
          <table:table-cell office:value-type="float" office:value="1367" calcext:value-type="float">
            <text:p>1367</text:p>
          </table:table-cell>
          <table:table-cell office:value-type="float" office:value="767" calcext:value-type="float">
            <text:p>767</text:p>
          </table:table-cell>
          <table:table-cell office:value-type="float" office:value="498" calcext:value-type="float">
            <text:p>498</text:p>
          </table:table-cell>
          <table:table-cell office:value-type="float" office:value="325" calcext:value-type="float">
            <text:p>325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6">
          <table:table-cell office:value-type="float" office:value="4.877143" calcext:value-type="float">
            <text:p>4.877143</text:p>
          </table:table-cell>
          <table:table-cell office:value-type="float" office:value="28618" calcext:value-type="float">
            <text:p>28618</text:p>
          </table:table-cell>
          <table:table-cell office:value-type="float" office:value="17169" calcext:value-type="float">
            <text:p>17169</text:p>
          </table:table-cell>
          <table:table-cell office:value-type="float" office:value="9054" calcext:value-type="float">
            <text:p>9054</text:p>
          </table:table-cell>
          <table:table-cell office:value-type="float" office:value="4444" calcext:value-type="float">
            <text:p>4444</text:p>
          </table:table-cell>
          <table:table-cell office:value-type="float" office:value="2276" calcext:value-type="float">
            <text:p>2276</text:p>
          </table:table-cell>
          <table:table-cell office:value-type="float" office:value="1067" calcext:value-type="float">
            <text:p>1067</text:p>
          </table:table-cell>
          <table:table-cell office:value-type="float" office:value="487" calcext:value-type="float">
            <text:p>487</text:p>
          </table:table-cell>
          <table:table-cell office:value-type="float" office:value="234" calcext:value-type="float">
            <text:p>234</text:p>
          </table:table-cell>
          <table:table-cell office:value-type="float" office:value="130" calcext:value-type="float">
            <text:p>130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6">
          <table:table-cell office:value-type="float" office:value="5.196125" calcext:value-type="float">
            <text:p>5.196125</text:p>
          </table:table-cell>
          <table:table-cell office:value-type="float" office:value="30775" calcext:value-type="float">
            <text:p>30775</text:p>
          </table:table-cell>
          <table:table-cell office:value-type="float" office:value="18382" calcext:value-type="float">
            <text:p>18382</text:p>
          </table:table-cell>
          <table:table-cell office:value-type="float" office:value="9822" calcext:value-type="float">
            <text:p>9822</text:p>
          </table:table-cell>
          <table:table-cell office:value-type="float" office:value="4919" calcext:value-type="float">
            <text:p>4919</text:p>
          </table:table-cell>
          <table:table-cell office:value-type="float" office:value="2609" calcext:value-type="float">
            <text:p>2609</text:p>
          </table:table-cell>
          <table:table-cell office:value-type="float" office:value="1234" calcext:value-type="float">
            <text:p>1234</text:p>
          </table:table-cell>
          <table:table-cell office:value-type="float" office:value="606" calcext:value-type="float">
            <text:p>606</text:p>
          </table:table-cell>
          <table:table-cell office:value-type="float" office:value="304" calcext:value-type="float">
            <text:p>304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6">
          <table:table-cell office:value-type="float" office:value="5.131249" calcext:value-type="float">
            <text:p>5.131249</text:p>
          </table:table-cell>
          <table:table-cell office:value-type="float" office:value="30220" calcext:value-type="float">
            <text:p>30220</text:p>
          </table:table-cell>
          <table:table-cell office:value-type="float" office:value="18044" calcext:value-type="float">
            <text:p>18044</text:p>
          </table:table-cell>
          <table:table-cell office:value-type="float" office:value="9679" calcext:value-type="float">
            <text:p>9679</text:p>
          </table:table-cell>
          <table:table-cell office:value-type="float" office:value="4826" calcext:value-type="float">
            <text:p>4826</text:p>
          </table:table-cell>
          <table:table-cell office:value-type="float" office:value="2452" calcext:value-type="float">
            <text:p>2452</text:p>
          </table:table-cell>
          <table:table-cell office:value-type="float" office:value="1174" calcext:value-type="float">
            <text:p>1174</text:p>
          </table:table-cell>
          <table:table-cell office:value-type="float" office:value="530" calcext:value-type="float">
            <text:p>530</text:p>
          </table:table-cell>
          <table:table-cell office:value-type="float" office:value="255" calcext:value-type="float">
            <text:p>255</text:p>
          </table:table-cell>
          <table:table-cell office:value-type="float" office:value="137" calcext:value-type="float">
            <text:p>137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6">
          <table:table-cell office:value-type="float" office:value="5.19361" calcext:value-type="float">
            <text:p>5.19361</text:p>
          </table:table-cell>
          <table:table-cell office:value-type="float" office:value="30933" calcext:value-type="float">
            <text:p>30933</text:p>
          </table:table-cell>
          <table:table-cell office:value-type="float" office:value="18516" calcext:value-type="float">
            <text:p>18516</text:p>
          </table:table-cell>
          <table:table-cell office:value-type="float" office:value="9907" calcext:value-type="float">
            <text:p>9907</text:p>
          </table:table-cell>
          <table:table-cell office:value-type="float" office:value="4934" calcext:value-type="float">
            <text:p>4934</text:p>
          </table:table-cell>
          <table:table-cell office:value-type="float" office:value="2527" calcext:value-type="float">
            <text:p>2527</text:p>
          </table:table-cell>
          <table:table-cell office:value-type="float" office:value="1206" calcext:value-type="float">
            <text:p>1206</text:p>
          </table:table-cell>
          <table:table-cell office:value-type="float" office:value="579" calcext:value-type="float">
            <text:p>579</text:p>
          </table:table-cell>
          <table:table-cell office:value-type="float" office:value="297" calcext:value-type="float">
            <text:p>297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6">
          <table:table-cell office:value-type="float" office:value="5.140053" calcext:value-type="float">
            <text:p>5.140053</text:p>
          </table:table-cell>
          <table:table-cell office:value-type="float" office:value="31112" calcext:value-type="float">
            <text:p>31112</text:p>
          </table:table-cell>
          <table:table-cell office:value-type="float" office:value="18750" calcext:value-type="float">
            <text:p>18750</text:p>
          </table:table-cell>
          <table:table-cell office:value-type="float" office:value="9896" calcext:value-type="float">
            <text:p>9896</text:p>
          </table:table-cell>
          <table:table-cell office:value-type="float" office:value="4972" calcext:value-type="float">
            <text:p>4972</text:p>
          </table:table-cell>
          <table:table-cell office:value-type="float" office:value="2693" calcext:value-type="float">
            <text:p>2693</text:p>
          </table:table-cell>
          <table:table-cell office:value-type="float" office:value="1268" calcext:value-type="float">
            <text:p>1268</text:p>
          </table:table-cell>
          <table:table-cell office:value-type="float" office:value="596" calcext:value-type="float">
            <text:p>596</text:p>
          </table:table-cell>
          <table:table-cell office:value-type="float" office:value="289" calcext:value-type="float">
            <text:p>289</text:p>
          </table:table-cell>
          <table:table-cell office:value-type="float" office:value="169" calcext:value-type="float">
            <text:p>169</text:p>
          </table:table-cell>
          <table:table-cell office:value-type="float" office:value="114" calcext:value-type="float">
            <text:p>114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6">
          <table:table-cell office:value-type="float" office:value="25.538179" calcext:value-type="float">
            <text:p>25.538179</text:p>
          </table:table-cell>
          <table:table-cell office:value-type="float" office:value="151658" calcext:value-type="float">
            <text:p>151658</text:p>
          </table:table-cell>
          <table:table-cell office:value-type="float" office:value="90862" calcext:value-type="float">
            <text:p>90862</text:p>
          </table:table-cell>
          <table:table-cell office:value-type="float" office:value="48358" calcext:value-type="float">
            <text:p>48358</text:p>
          </table:table-cell>
          <table:table-cell office:value-type="float" office:value="24096" calcext:value-type="float">
            <text:p>24096</text:p>
          </table:table-cell>
          <table:table-cell office:value-type="float" office:value="12556" calcext:value-type="float">
            <text:p>12556</text:p>
          </table:table-cell>
          <table:table-cell office:value-type="float" office:value="5950" calcext:value-type="float">
            <text:p>5950</text:p>
          </table:table-cell>
          <table:table-cell office:value-type="float" office:value="2798" calcext:value-type="float">
            <text:p>2798</text:p>
          </table:table-cell>
          <table:table-cell office:value-type="float" office:value="1381" calcext:value-type="float">
            <text:p>1381</text:p>
          </table:table-cell>
          <table:table-cell office:value-type="float" office:value="763" calcext:value-type="float">
            <text:p>763</text:p>
          </table:table-cell>
          <table:table-cell office:value-type="float" office:value="490" calcext:value-type="float">
            <text:p>490</text:p>
          </table:table-cell>
          <table:table-cell office:value-type="float" office:value="326" calcext:value-type="float">
            <text:p>326</text:p>
          </table:table-cell>
          <table:table-cell office:value-type="float" office:value="225" calcext:value-type="float">
            <text:p>225</text:p>
          </table:table-cell>
          <table:table-cell office:value-type="float" office:value="176" calcext:value-type="float">
            <text:p>176</text:p>
          </table:table-cell>
          <table:table-cell office:value-type="float" office:value="149" calcext:value-type="float">
            <text:p>149</text:p>
          </table:table-cell>
          <table:table-cell office:value-type="float" office:value="125" calcext:value-type="float">
            <text:p>125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6">
          <table:table-cell office:value-type="float" office:value="4.923135" calcext:value-type="float">
            <text:p>4.923135</text:p>
          </table:table-cell>
          <table:table-cell office:value-type="float" office:value="29157" calcext:value-type="float">
            <text:p>29157</text:p>
          </table:table-cell>
          <table:table-cell office:value-type="float" office:value="17360" calcext:value-type="float">
            <text:p>17360</text:p>
          </table:table-cell>
          <table:table-cell office:value-type="float" office:value="9287" calcext:value-type="float">
            <text:p>9287</text:p>
          </table:table-cell>
          <table:table-cell office:value-type="float" office:value="4587" calcext:value-type="float">
            <text:p>4587</text:p>
          </table:table-cell>
          <table:table-cell office:value-type="float" office:value="2348" calcext:value-type="float">
            <text:p>2348</text:p>
          </table:table-cell>
          <table:table-cell office:value-type="float" office:value="1088" calcext:value-type="float">
            <text:p>1088</text:p>
          </table:table-cell>
          <table:table-cell office:value-type="float" office:value="532" calcext:value-type="float">
            <text:p>532</text:p>
          </table:table-cell>
          <table:table-cell office:value-type="float" office:value="270" calcext:value-type="float">
            <text:p>270</text:p>
          </table:table-cell>
          <table:table-cell office:value-type="float" office:value="164" calcext:value-type="float">
            <text:p>164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6">
          <table:table-cell office:value-type="float" office:value="5.228722" calcext:value-type="float">
            <text:p>5.228722</text:p>
          </table:table-cell>
          <table:table-cell office:value-type="float" office:value="30687" calcext:value-type="float">
            <text:p>30687</text:p>
          </table:table-cell>
          <table:table-cell office:value-type="float" office:value="18503" calcext:value-type="float">
            <text:p>18503</text:p>
          </table:table-cell>
          <table:table-cell office:value-type="float" office:value="9843" calcext:value-type="float">
            <text:p>9843</text:p>
          </table:table-cell>
          <table:table-cell office:value-type="float" office:value="4921" calcext:value-type="float">
            <text:p>4921</text:p>
          </table:table-cell>
          <table:table-cell office:value-type="float" office:value="2546" calcext:value-type="float">
            <text:p>2546</text:p>
          </table:table-cell>
          <table:table-cell office:value-type="float" office:value="1198" calcext:value-type="float">
            <text:p>1198</text:p>
          </table:table-cell>
          <table:table-cell office:value-type="float" office:value="560" calcext:value-type="float">
            <text:p>560</text:p>
          </table:table-cell>
          <table:table-cell office:value-type="float" office:value="276" calcext:value-type="float">
            <text:p>276</text:p>
          </table:table-cell>
          <table:table-cell office:value-type="float" office:value="149" calcext:value-type="float">
            <text:p>149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6">
          <table:table-cell office:value-type="float" office:value="5.174204" calcext:value-type="float">
            <text:p>5.174204</text:p>
          </table:table-cell>
          <table:table-cell office:value-type="float" office:value="30764" calcext:value-type="float">
            <text:p>30764</text:p>
          </table:table-cell>
          <table:table-cell office:value-type="float" office:value="18397" calcext:value-type="float">
            <text:p>18397</text:p>
          </table:table-cell>
          <table:table-cell office:value-type="float" office:value="9784" calcext:value-type="float">
            <text:p>9784</text:p>
          </table:table-cell>
          <table:table-cell office:value-type="float" office:value="4957" calcext:value-type="float">
            <text:p>4957</text:p>
          </table:table-cell>
          <table:table-cell office:value-type="float" office:value="2570" calcext:value-type="float">
            <text:p>2570</text:p>
          </table:table-cell>
          <table:table-cell office:value-type="float" office:value="1203" calcext:value-type="float">
            <text:p>1203</text:p>
          </table:table-cell>
          <table:table-cell office:value-type="float" office:value="561" calcext:value-type="float">
            <text:p>561</text:p>
          </table:table-cell>
          <table:table-cell office:value-type="float" office:value="286" calcext:value-type="float">
            <text:p>286</text:p>
          </table:table-cell>
          <table:table-cell office:value-type="float" office:value="163" calcext:value-type="float">
            <text:p>163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6">
          <table:table-cell office:value-type="float" office:value="5.179934" calcext:value-type="float">
            <text:p>5.179934</text:p>
          </table:table-cell>
          <table:table-cell office:value-type="float" office:value="30363" calcext:value-type="float">
            <text:p>30363</text:p>
          </table:table-cell>
          <table:table-cell office:value-type="float" office:value="18440" calcext:value-type="float">
            <text:p>18440</text:p>
          </table:table-cell>
          <table:table-cell office:value-type="float" office:value="9952" calcext:value-type="float">
            <text:p>9952</text:p>
          </table:table-cell>
          <table:table-cell office:value-type="float" office:value="5035" calcext:value-type="float">
            <text:p>5035</text:p>
          </table:table-cell>
          <table:table-cell office:value-type="float" office:value="2656" calcext:value-type="float">
            <text:p>2656</text:p>
          </table:table-cell>
          <table:table-cell office:value-type="float" office:value="1267" calcext:value-type="float">
            <text:p>1267</text:p>
          </table:table-cell>
          <table:table-cell office:value-type="float" office:value="572" calcext:value-type="float">
            <text:p>572</text:p>
          </table:table-cell>
          <table:table-cell office:value-type="float" office:value="277" calcext:value-type="float">
            <text:p>277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6">
          <table:table-cell office:value-type="float" office:value="5.227057" calcext:value-type="float">
            <text:p>5.227057</text:p>
          </table:table-cell>
          <table:table-cell office:value-type="float" office:value="30954" calcext:value-type="float">
            <text:p>30954</text:p>
          </table:table-cell>
          <table:table-cell office:value-type="float" office:value="18549" calcext:value-type="float">
            <text:p>18549</text:p>
          </table:table-cell>
          <table:table-cell office:value-type="float" office:value="9906" calcext:value-type="float">
            <text:p>9906</text:p>
          </table:table-cell>
          <table:table-cell office:value-type="float" office:value="4939" calcext:value-type="float">
            <text:p>4939</text:p>
          </table:table-cell>
          <table:table-cell office:value-type="float" office:value="2616" calcext:value-type="float">
            <text:p>2616</text:p>
          </table:table-cell>
          <table:table-cell office:value-type="float" office:value="1255" calcext:value-type="float">
            <text:p>1255</text:p>
          </table:table-cell>
          <table:table-cell office:value-type="float" office:value="588" calcext:value-type="float">
            <text:p>588</text:p>
          </table:table-cell>
          <table:table-cell office:value-type="float" office:value="317" calcext:value-type="float">
            <text:p>317</text:p>
          </table:table-cell>
          <table:table-cell office:value-type="float" office:value="180" calcext:value-type="float">
            <text:p>180</text:p>
          </table:table-cell>
          <table:table-cell office:value-type="float" office:value="116" calcext:value-type="float">
            <text:p>116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6">
          <table:table-cell office:value-type="float" office:value="25.733051" calcext:value-type="float">
            <text:p>25.733051</text:p>
          </table:table-cell>
          <table:table-cell office:value-type="float" office:value="151924" calcext:value-type="float">
            <text:p>151924</text:p>
          </table:table-cell>
          <table:table-cell office:value-type="float" office:value="91248" calcext:value-type="float">
            <text:p>91248</text:p>
          </table:table-cell>
          <table:table-cell office:value-type="float" office:value="48772" calcext:value-type="float">
            <text:p>48772</text:p>
          </table:table-cell>
          <table:table-cell office:value-type="float" office:value="24438" calcext:value-type="float">
            <text:p>24438</text:p>
          </table:table-cell>
          <table:table-cell office:value-type="float" office:value="12735" calcext:value-type="float">
            <text:p>12735</text:p>
          </table:table-cell>
          <table:table-cell office:value-type="float" office:value="6011" calcext:value-type="float">
            <text:p>6011</text:p>
          </table:table-cell>
          <table:table-cell office:value-type="float" office:value="2812" calcext:value-type="float">
            <text:p>2812</text:p>
          </table:table-cell>
          <table:table-cell office:value-type="float" office:value="1426" calcext:value-type="float">
            <text:p>1426</text:p>
          </table:table-cell>
          <table:table-cell office:value-type="float" office:value="804" calcext:value-type="float">
            <text:p>804</text:p>
          </table:table-cell>
          <table:table-cell office:value-type="float" office:value="526" calcext:value-type="float">
            <text:p>526</text:p>
          </table:table-cell>
          <table:table-cell office:value-type="float" office:value="348" calcext:value-type="float">
            <text:p>348</text:p>
          </table:table-cell>
          <table:table-cell office:value-type="float" office:value="255" calcext:value-type="float">
            <text:p>255</text:p>
          </table:table-cell>
          <table:table-cell office:value-type="float" office:value="189" calcext:value-type="float">
            <text:p>189</text:p>
          </table:table-cell>
          <table:table-cell office:value-type="float" office:value="162" calcext:value-type="float">
            <text:p>162</text:p>
          </table:table-cell>
          <table:table-cell office:value-type="float" office:value="137" calcext:value-type="float">
            <text:p>137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8"/>
        </table:table-row>
        <table:table-row table:style-name="ro16">
          <table:table-cell table:number-columns-repeated="7"/>
          <table:table-cell table:style-name="ce20"/>
          <table:table-cell/>
          <table:table-cell table:style-name="ce20"/>
          <table:table-cell table:number-columns-repeated="39"/>
        </table:table-row>
        <table:table-row table:style-name="ro16">
          <table:table-cell table:number-columns-repeated="6"/>
          <table:table-cell table:style-name="ce20" table:number-columns-repeated="4"/>
          <table:table-cell table:number-columns-repeated="39"/>
        </table:table-row>
        <table:table-row table:style-name="ro16">
          <table:table-cell table:style-name="ce89"/>
          <table:table-cell table:number-columns-repeated="48"/>
        </table:table-row>
        <table:table-row table:style-name="ro16" table:number-rows-repeated="3">
          <table:table-cell table:number-columns-repeated="49"/>
        </table:table-row>
        <table:table-row table:style-name="ro16">
          <table:table-cell table:number-columns-repeated="7"/>
          <table:table-cell table:style-name="ce21"/>
          <table:table-cell/>
          <table:table-cell table:style-name="ce21"/>
          <table:table-cell table:number-columns-repeated="39"/>
        </table:table-row>
        <table:table-row table:style-name="ro16">
          <table:table-cell table:style-name="ce89"/>
          <table:table-cell table:number-columns-repeated="6"/>
          <table:table-cell table:style-name="ce123"/>
          <table:table-cell/>
          <table:table-cell table:style-name="ce123"/>
          <table:table-cell table:number-columns-repeated="39"/>
        </table:table-row>
        <table:table-row table:style-name="ro16">
          <table:table-cell table:number-columns-repeated="10"/>
          <table:table-cell table:style-name="ce31"/>
          <table:table-cell table:number-columns-repeated="38"/>
        </table:table-row>
        <table:table-row table:style-name="ro16" table:number-rows-repeated="21">
          <table:table-cell table:number-columns-repeated="49"/>
        </table:table-row>
        <table:table-row table:style-name="ro16">
          <table:table-cell table:number-columns-repeated="49"/>
        </table:table-row>
        <calcext:conditional-formats>
          <calcext:conditional-format calcext:target-range-address="'ANNEX E - B1'.H9:'ANNEX E - B1'.H40">
            <calcext:condition calcext:apply-style-name="Good" calcext:value="&gt;1000" calcext:base-cell-address="'ANNEX E - B1'.H9"/>
          </calcext:conditional-format>
          <calcext:conditional-format calcext:target-range-address="'ANNEX E - B1'.K9:'ANNEX E - B1'.K38">
            <calcext:condition calcext:apply-style-name="Good" calcext:value="&lt;[.J11]" calcext:base-cell-address="'ANNEX E - B1'.K9"/>
          </calcext:conditional-format>
        </calcext:conditional-formats>
      </table:table>
      <table:table table:name="ANNEX E - B2" table:style-name="ta1">
        <table:table-column table:style-name="co4" table:number-columns-repeated="49" table:default-cell-style-name="Default"/>
        <table:table-row table:style-name="ro16">
          <table:table-cell office:value-type="string" calcext:value-type="string">
            <text:p>Data Preprocessing and Quality Assessment</text:p>
          </table:table-cell>
          <table:table-cell table:number-columns-repeated="48"/>
        </table:table-row>
        <table:table-row table:style-name="ro22">
          <table:table-cell table:number-columns-repeated="14"/>
          <table:table-cell table:style-name="ce215"/>
          <table:table-cell table:number-columns-repeated="34"/>
        </table:table-row>
        <table:table-row table:style-name="ro16">
          <table:table-cell table:number-columns-repeated="49"/>
        </table:table-row>
        <table:table-row table:style-name="ro22">
          <table:table-cell table:style-name="ce89" office:value-type="string" calcext:value-type="string">
            <text:p>Date</text:p>
          </table:table-cell>
          <table:table-cell table:number-columns-repeated="13"/>
          <table:table-cell table:style-name="ce215" office:value-type="string" calcext:value-type="string">
            <text:p>RM8632a</text:p>
          </table:table-cell>
          <table:table-cell table:number-columns-repeated="34"/>
        </table:table-row>
        <table:table-row table:style-name="ro16">
          <table:table-cell table:number-columns-repeated="14"/>
          <table:table-cell table:style-name="ce55" office:value-type="date" office:date-value="2025-05-21" calcext:value-type="date">
            <text:p>2025-05-21</text:p>
          </table:table-cell>
          <table:table-cell table:number-columns-repeated="34"/>
        </table:table-row>
        <table:table-row table:style-name="ro16">
          <table:table-cell office:value-type="string" calcext:value-type="string">
            <text:p>Partistan 34D</text:p>
          </table:table-cell>
          <table:table-cell table:style-name="ce89" table:number-columns-repeated="5"/>
          <table:table-cell table:number-columns-repeated="8"/>
          <table:table-cell office:value-type="string" calcext:value-type="string">
            <text:p>#00009</text:p>
          </table:table-cell>
          <table:table-cell table:number-columns-repeated="34"/>
        </table:table-row>
        <table:table-row table:style-name="ro16">
          <table:table-cell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202" office:value-type="string" calcext:value-type="string">
            <text:p>X<text:span text:style-name="T8"> / ml</text:span></text:p>
          </table:table-cell>
          <table:table-cell table:style-name="ce31" office:value-type="string" calcext:value-type="string">
            <text:p>N<text:span text:style-name="T6">TOTAL</text:span></text:p>
          </table:table-cell>
          <table:table-cell table:style-name="ce31" office:value-type="string" calcext:value-type="string">
            <text:p>CV</text:p>
          </table:table-cell>
          <table:table-cell table:style-name="ce31" office:value-type="string" calcext:value-type="string">
            <text:p>D<text:span text:style-name="T6">QMAX</text:span></text:p>
          </table:table-cell>
          <table:table-cell table:style-name="ce31" office:value-type="string" calcext:value-type="string">
            <text:p>D<text:span text:style-name="T6">Q</text:span></text:p>
          </table:table-cell>
          <table:table-cell/>
          <table:table-cell table:style-name="ce31"/>
          <table:table-cell table:number-columns-repeated="36"/>
        </table:table-row>
        <table:table-row table:style-name="ro16">
          <table:table-cell table:style-name="ce16" office:value-type="string" calcext:value-type="string">
            <text:p>Scanned ml</text:p>
          </table:table-cell>
          <table:table-cell office:value-type="float" office:value="4.877143" calcext:value-type="float">
            <text:p>4.877143</text:p>
          </table:table-cell>
          <table:table-cell office:value-type="float" office:value="5.196125" calcext:value-type="float">
            <text:p>5.196125</text:p>
          </table:table-cell>
          <table:table-cell office:value-type="float" office:value="5.131249" calcext:value-type="float">
            <text:p>5.131249</text:p>
          </table:table-cell>
          <table:table-cell office:value-type="float" office:value="5.19361" calcext:value-type="float">
            <text:p>5.19361</text:p>
          </table:table-cell>
          <table:table-cell office:value-type="float" office:value="5.140053" calcext:value-type="float">
            <text:p>5.140053</text:p>
          </table:table-cell>
          <table:table-cell table:style-name="ce203" office:value-type="float" office:value="25.517626" calcext:value-type="float">
            <text:p>25.5</text:p>
          </table:table-cell>
          <table:table-cell table:style-name="ce203" table:formula="of:=AVERAGE([.B$8:.F$8])*5" office:value-type="float" office:value="25.53818" calcext:value-type="float">
            <text:p>25.5</text:p>
          </table:table-cell>
          <table:table-cell table:style-name="ce212"/>
          <table:table-cell/>
          <table:table-cell table:style-name="ce212"/>
          <table:table-cell table:number-columns-repeated="38"/>
        </table:table-row>
        <table:table-row table:style-name="ro16">
          <table:table-cell table:style-name="ce199" office:value-type="string" calcext:value-type="string">
            <text:p>count_4</text:p>
          </table:table-cell>
          <table:table-cell table:style-name="ce117" office:value-type="float" office:value="28618" calcext:value-type="float">
            <text:p>28618</text:p>
          </table:table-cell>
          <table:table-cell table:style-name="ce117" office:value-type="float" office:value="30775" calcext:value-type="float">
            <text:p>30775</text:p>
          </table:table-cell>
          <table:table-cell table:style-name="ce117" office:value-type="float" office:value="30220" calcext:value-type="float">
            <text:p>30220</text:p>
          </table:table-cell>
          <table:table-cell table:style-name="ce117" office:value-type="float" office:value="30933" calcext:value-type="float">
            <text:p>30933</text:p>
          </table:table-cell>
          <table:table-cell table:style-name="ce117" office:value-type="float" office:value="31112" calcext:value-type="float">
            <text:p>31112</text:p>
          </table:table-cell>
          <table:table-cell table:style-name="ce363" table:formula="of:=AVERAGE([.B9:.F9])/AVERAGE([.B$8:.F$8])" office:value-type="float" office:value="5938.48112903895" calcext:value-type="float">
            <text:p>5938.5</text:p>
          </table:table-cell>
          <table:table-cell table:style-name="ce375" table:formula="of:=[.G9]*[.H$8]" office:value-type="float" office:value="151658" calcext:value-type="float">
            <text:p>151658</text:p>
          </table:table-cell>
          <table:table-cell table:style-name="ce370" table:formula="of:=STDEVP([.B9:.F9])/AVERAGE([.B9:.F9])" office:value-type="percentage" office:value="0.0299135077125193" calcext:value-type="percentage">
            <text:p>3.0%</text:p>
          </table:table-cell>
          <table:table-cell table:style-name="ce370" table:formula="of:=IF([.H9]&gt;[.$A$43]; [.$C$43]; IF([.H9]&gt;[.$A$44]; [.$C$44]; IF([.H9]&gt;[.$A$45];[.$C$45];IF([.H9]&gt;[.$A$46];[.$C$46]; IF([.H9]&gt;[.$A$47];[.$C$47];IF([.H9]&gt;[.$A$48];[.$C$48];[.$C$49]))))))/100" office:value-type="percentage" office:value="0.11" calcext:value-type="percentage">
            <text:p>11.0%</text:p>
          </table:table-cell>
          <table:table-cell table:style-name="ce379" table:formula="of:=(MAX([.B9:.F9])-MIN([.B9:.F9]))/[.H9]*5" office:value-type="percentage" office:value="0.0822244787614238" calcext:value-type="percentage">
            <text:p>8.2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16" office:value-type="string" calcext:value-type="string">
            <text:p>count_5</text:p>
          </table:table-cell>
          <table:table-cell office:value-type="float" office:value="17169" calcext:value-type="float">
            <text:p>17169</text:p>
          </table:table-cell>
          <table:table-cell office:value-type="float" office:value="18382" calcext:value-type="float">
            <text:p>18382</text:p>
          </table:table-cell>
          <table:table-cell office:value-type="float" office:value="18044" calcext:value-type="float">
            <text:p>18044</text:p>
          </table:table-cell>
          <table:table-cell office:value-type="float" office:value="18516" calcext:value-type="float">
            <text:p>18516</text:p>
          </table:table-cell>
          <table:table-cell office:value-type="float" office:value="18750" calcext:value-type="float">
            <text:p>18750</text:p>
          </table:table-cell>
          <table:table-cell table:style-name="ce204" table:formula="of:=AVERAGE([.B10:.F10])/AVERAGE([.B$8:.F$8])" office:value-type="float" office:value="3557.84946303926" calcext:value-type="float">
            <text:p>3557.8</text:p>
          </table:table-cell>
          <table:table-cell table:style-name="ce376" table:formula="of:=[.G10]*[.H$8]" office:value-type="float" office:value="90861" calcext:value-type="float">
            <text:p>90861</text:p>
          </table:table-cell>
          <table:table-cell table:style-name="ce212" table:formula="of:=STDEVP([.B10:.F10])/AVERAGE([.B10:.F10])" office:value-type="percentage" office:value="0.0303301047955955" calcext:value-type="percentage">
            <text:p>3.0%</text:p>
          </table:table-cell>
          <table:table-cell table:style-name="ce212" table:formula="of:=IF([.H10]&gt;[.$A$43]; [.$C$43]; IF([.H10]&gt;[.$A$44]; [.$C$44]; IF([.H10]&gt;[.$A$45];[.$C$45];IF([.H10]&gt;[.$A$46];[.$C$46]; IF([.H10]&gt;[.$A$47];[.$C$47];IF([.H10]&gt;[.$A$48];[.$C$48];[.$C$49]))))))/100" office:value-type="percentage" office:value="0.11" calcext:value-type="percentage">
            <text:p>11.0%</text:p>
          </table:table-cell>
          <table:table-cell table:style-name="ce380" table:formula="of:=(MAX([.B10:.F10])-MIN([.B10:.F10]))/[.H10]*5" office:value-type="percentage" office:value="0.0870010235414534" calcext:value-type="percentage">
            <text:p>8.7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16" office:value-type="string" calcext:value-type="string">
            <text:p>count_6</text:p>
          </table:table-cell>
          <table:table-cell office:value-type="float" office:value="9054" calcext:value-type="float">
            <text:p>9054</text:p>
          </table:table-cell>
          <table:table-cell office:value-type="float" office:value="9822" calcext:value-type="float">
            <text:p>9822</text:p>
          </table:table-cell>
          <table:table-cell office:value-type="float" office:value="9679" calcext:value-type="float">
            <text:p>9679</text:p>
          </table:table-cell>
          <table:table-cell office:value-type="float" office:value="9907" calcext:value-type="float">
            <text:p>9907</text:p>
          </table:table-cell>
          <table:table-cell office:value-type="float" office:value="9896" calcext:value-type="float">
            <text:p>9896</text:p>
          </table:table-cell>
          <table:table-cell table:style-name="ce204" table:formula="of:=AVERAGE([.B11:.F11])/AVERAGE([.B$8:.F$8])" office:value-type="float" office:value="1893.55701933341" calcext:value-type="float">
            <text:p>1893.6</text:p>
          </table:table-cell>
          <table:table-cell table:style-name="ce376" table:formula="of:=[.G11]*[.H$8]" office:value-type="float" office:value="48358" calcext:value-type="float">
            <text:p>48358</text:p>
          </table:table-cell>
          <table:table-cell table:style-name="ce212" table:formula="of:=STDEVP([.B11:.F11])/AVERAGE([.B11:.F11])" office:value-type="percentage" office:value="0.0330177719679551" calcext:value-type="percentage">
            <text:p>3.3%</text:p>
          </table:table-cell>
          <table:table-cell table:style-name="ce212" table:formula="of:=IF([.H11]&gt;[.$A$43]; [.$C$43]; IF([.H11]&gt;[.$A$44]; [.$C$44]; IF([.H11]&gt;[.$A$45];[.$C$45];IF([.H11]&gt;[.$A$46];[.$C$46]; IF([.H11]&gt;[.$A$47];[.$C$47];IF([.H11]&gt;[.$A$48];[.$C$48];[.$C$49]))))))/100" office:value-type="percentage" office:value="0.11" calcext:value-type="percentage">
            <text:p>11.0%</text:p>
          </table:table-cell>
          <table:table-cell table:style-name="ce380" table:formula="of:=(MAX([.B11:.F11])-MIN([.B11:.F11]))/[.H11]*5" office:value-type="percentage" office:value="0.0881963687497415" calcext:value-type="percentage">
            <text:p>8.8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16" office:value-type="string" calcext:value-type="string">
            <text:p>count_7</text:p>
          </table:table-cell>
          <table:table-cell office:value-type="float" office:value="4444" calcext:value-type="float">
            <text:p>4444</text:p>
          </table:table-cell>
          <table:table-cell office:value-type="float" office:value="4919" calcext:value-type="float">
            <text:p>4919</text:p>
          </table:table-cell>
          <table:table-cell office:value-type="float" office:value="4826" calcext:value-type="float">
            <text:p>4826</text:p>
          </table:table-cell>
          <table:table-cell office:value-type="float" office:value="4934" calcext:value-type="float">
            <text:p>4934</text:p>
          </table:table-cell>
          <table:table-cell office:value-type="float" office:value="4972" calcext:value-type="float">
            <text:p>4972</text:p>
          </table:table-cell>
          <table:table-cell table:style-name="ce204" table:formula="of:=AVERAGE([.B12:.F12])/AVERAGE([.B$8:.F$8])" office:value-type="float" office:value="943.489316779818" calcext:value-type="float">
            <text:p>943.5</text:p>
          </table:table-cell>
          <table:table-cell table:style-name="ce376" table:formula="of:=[.G12]*[.H$8]" office:value-type="float" office:value="24095" calcext:value-type="float">
            <text:p>24095</text:p>
          </table:table-cell>
          <table:table-cell table:style-name="ce212" table:formula="of:=STDEVP([.B12:.F12])/AVERAGE([.B12:.F12])" office:value-type="percentage" office:value="0.0401639330860594" calcext:value-type="percentage">
            <text:p>4.0%</text:p>
          </table:table-cell>
          <table:table-cell table:style-name="ce212" table:formula="of:=IF([.H12]&gt;[.$A$43]; [.$C$43]; IF([.H12]&gt;[.$A$44]; [.$C$44]; IF([.H12]&gt;[.$A$45];[.$C$45];IF([.H12]&gt;[.$A$46];[.$C$46]; IF([.H12]&gt;[.$A$47];[.$C$47];IF([.H12]&gt;[.$A$48];[.$C$48];[.$C$49]))))))/100" office:value-type="percentage" office:value="0.11" calcext:value-type="percentage">
            <text:p>11.0%</text:p>
          </table:table-cell>
          <table:table-cell table:style-name="ce380" table:formula="of:=(MAX([.B12:.F12])-MIN([.B12:.F12]))/[.H12]*5" office:value-type="percentage" office:value="0.109566300062254" calcext:value-type="percentage">
            <text:p>11.0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16" office:value-type="string" calcext:value-type="string">
            <text:p>count_8</text:p>
          </table:table-cell>
          <table:table-cell/>
          <table:table-cell office:value-type="float" office:value="2609" calcext:value-type="float">
            <text:p>2609</text:p>
          </table:table-cell>
          <table:table-cell office:value-type="float" office:value="2452" calcext:value-type="float">
            <text:p>2452</text:p>
          </table:table-cell>
          <table:table-cell office:value-type="float" office:value="2527" calcext:value-type="float">
            <text:p>2527</text:p>
          </table:table-cell>
          <table:table-cell office:value-type="float" office:value="2693" calcext:value-type="float">
            <text:p>2693</text:p>
          </table:table-cell>
          <table:table-cell table:style-name="ce204" table:formula="of:=AVERAGE([.B13:.F13])/AVERAGE([.B$8:.F$8])" office:value-type="float" office:value="503.217143899839" calcext:value-type="float">
            <text:p>503.2</text:p>
          </table:table-cell>
          <table:table-cell table:style-name="ce376" table:formula="of:=[.G13]*[.H$8]" office:value-type="float" office:value="12851.25" calcext:value-type="float">
            <text:p>12851</text:p>
          </table:table-cell>
          <table:table-cell table:style-name="ce212" table:formula="of:=STDEVP([.B13:.F13])/AVERAGE([.B13:.F13])" office:value-type="percentage" office:value="0.0350283403083702" calcext:value-type="percentage">
            <text:p>3.5%</text:p>
          </table:table-cell>
          <table:table-cell table:style-name="ce212" table:formula="of:=IF([.H13]&gt;[.$A$43]; [.$C$43]; IF([.H13]&gt;[.$A$44]; [.$C$44]; IF([.H13]&gt;[.$A$45];[.$C$45];IF([.H13]&gt;[.$A$46];[.$C$46]; IF([.H13]&gt;[.$A$47];[.$C$47];IF([.H13]&gt;[.$A$48];[.$C$48];[.$C$49]))))))/100" office:value-type="percentage" office:value="0.11" calcext:value-type="percentage">
            <text:p>11.0%</text:p>
          </table:table-cell>
          <table:table-cell table:style-name="ce380" table:formula="of:=(MAX([.B13:.F13])-MIN([.B13:.F13]))/[.H13]*5" office:value-type="percentage" office:value="0.0937651979379438" calcext:value-type="percentage">
            <text:p>9.4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200" office:value-type="string" calcext:value-type="string">
            <text:p>count_9</text:p>
          </table:table-cell>
          <table:table-cell table:style-name="ce91"/>
          <table:table-cell table:style-name="ce91" office:value-type="float" office:value="1234" calcext:value-type="float">
            <text:p>1234</text:p>
          </table:table-cell>
          <table:table-cell table:style-name="ce91" office:value-type="float" office:value="1174" calcext:value-type="float">
            <text:p>1174</text:p>
          </table:table-cell>
          <table:table-cell table:style-name="ce91" office:value-type="float" office:value="1206" calcext:value-type="float">
            <text:p>1206</text:p>
          </table:table-cell>
          <table:table-cell table:style-name="ce91" office:value-type="float" office:value="1268" calcext:value-type="float">
            <text:p>1268</text:p>
          </table:table-cell>
          <table:table-cell table:style-name="ce364" table:formula="of:=AVERAGE([.B14:.F14])/AVERAGE([.B$8:.F$8])" office:value-type="float" office:value="238.955947526409" calcext:value-type="float">
            <text:p>239.0</text:p>
          </table:table-cell>
          <table:table-cell table:style-name="ce377" table:formula="of:=[.G14]*[.H$8]" office:value-type="float" office:value="6102.5" calcext:value-type="float">
            <text:p>6103</text:p>
          </table:table-cell>
          <table:table-cell table:style-name="ce371" table:formula="of:=STDEVP([.B14:.F14])/AVERAGE([.B14:.F14])" office:value-type="percentage" office:value="0.0284151464708887" calcext:value-type="percentage">
            <text:p>2.8%</text:p>
          </table:table-cell>
          <table:table-cell table:style-name="ce371" table:formula="of:=IF([.H14]&gt;[.$A$43]; [.$C$43]; IF([.H14]&gt;[.$A$44]; [.$C$44]; IF([.H14]&gt;[.$A$45];[.$C$45];IF([.H14]&gt;[.$A$46];[.$C$46]; IF([.H14]&gt;[.$A$47];[.$C$47];IF([.H14]&gt;[.$A$48];[.$C$48];[.$C$49]))))))/100" office:value-type="percentage" office:value="0.113" calcext:value-type="percentage">
            <text:p>11.3%</text:p>
          </table:table-cell>
          <table:table-cell table:style-name="ce381" table:formula="of:=(MAX([.B14:.F14])-MIN([.B14:.F14]))/[.H14]*5" office:value-type="percentage" office:value="0.0770176157312577" calcext:value-type="percentage">
            <text:p>7.7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16" office:value-type="string" calcext:value-type="string">
            <text:p>count_10</text:p>
          </table:table-cell>
          <table:table-cell office:value-type="float" office:value="487" calcext:value-type="float">
            <text:p>487</text:p>
          </table:table-cell>
          <table:table-cell office:value-type="float" office:value="606" calcext:value-type="float">
            <text:p>606</text:p>
          </table:table-cell>
          <table:table-cell office:value-type="float" office:value="530" calcext:value-type="float">
            <text:p>530</text:p>
          </table:table-cell>
          <table:table-cell office:value-type="float" office:value="579" calcext:value-type="float">
            <text:p>579</text:p>
          </table:table-cell>
          <table:table-cell office:value-type="float" office:value="596" calcext:value-type="float">
            <text:p>596</text:p>
          </table:table-cell>
          <table:table-cell table:style-name="ce204" table:formula="of:=AVERAGE([.B15:.F15])/AVERAGE([.B$8:.F$8])" office:value-type="float" office:value="109.561448779827" calcext:value-type="float">
            <text:p>109.6</text:p>
          </table:table-cell>
          <table:table-cell table:style-name="ce376" table:formula="of:=[.G15]*[.H$8]" office:value-type="float" office:value="2798" calcext:value-type="float">
            <text:p>2798</text:p>
          </table:table-cell>
          <table:table-cell table:style-name="ce212" table:formula="of:=STDEVP([.B15:.F15])/AVERAGE([.B15:.F15])" office:value-type="percentage" office:value="0.0799214488046376" calcext:value-type="percentage">
            <text:p>8.0%</text:p>
          </table:table-cell>
          <table:table-cell table:style-name="ce212" table:formula="of:=IF([.H15]&gt;[.$A$43]; [.$C$43]; IF([.H15]&gt;[.$A$44]; [.$C$44]; IF([.H15]&gt;[.$A$45];[.$C$45];IF([.H15]&gt;[.$A$46];[.$C$46]; IF([.H15]&gt;[.$A$47];[.$C$47];IF([.H15]&gt;[.$A$48];[.$C$48];[.$C$49]))))))/100" office:value-type="percentage" office:value="0.119" calcext:value-type="percentage">
            <text:p>11.9%</text:p>
          </table:table-cell>
          <table:table-cell table:style-name="ce380" table:formula="of:=(MAX([.B15:.F15])-MIN([.B15:.F15]))/[.H15]*5" office:value-type="percentage" office:value="0.21265189421015" calcext:value-type="percentage">
            <text:p>21.3%</text:p>
          </table:table-cell>
          <table:table-cell/>
          <table:table-cell table:style-name="ce20"/>
          <table:table-cell table:number-columns-repeated="4"/>
          <table:table-cell table:style-name="ce16" table:number-columns-repeated="32"/>
        </table:table-row>
        <table:table-row table:style-name="ro16">
          <table:table-cell table:style-name="ce16" office:value-type="string" calcext:value-type="string">
            <text:p>count_11</text:p>
          </table:table-cell>
          <table:table-cell office:value-type="float" office:value="234" calcext:value-type="float">
            <text:p>234</text:p>
          </table:table-cell>
          <table:table-cell office:value-type="float" office:value="304" calcext:value-type="float">
            <text:p>304</text:p>
          </table:table-cell>
          <table:table-cell office:value-type="float" office:value="255" calcext:value-type="float">
            <text:p>255</text:p>
          </table:table-cell>
          <table:table-cell office:value-type="float" office:value="297" calcext:value-type="float">
            <text:p>297</text:p>
          </table:table-cell>
          <table:table-cell office:value-type="float" office:value="289" calcext:value-type="float">
            <text:p>289</text:p>
          </table:table-cell>
          <table:table-cell table:style-name="ce204" table:formula="of:=AVERAGE([.B16:.F16])/AVERAGE([.B$8:.F$8])" office:value-type="float" office:value="53.9975832263693" calcext:value-type="float">
            <text:p>54.0</text:p>
          </table:table-cell>
          <table:table-cell table:style-name="ce376" table:formula="of:=[.G16]*[.H$8]" office:value-type="float" office:value="1379" calcext:value-type="float">
            <text:p>1379</text:p>
          </table:table-cell>
          <table:table-cell table:style-name="ce212" table:formula="of:=STDEVP([.B16:.F16])/AVERAGE([.B16:.F16])" office:value-type="percentage" office:value="0.0972746309691891" calcext:value-type="percentage">
            <text:p>9.7%</text:p>
          </table:table-cell>
          <table:table-cell table:style-name="ce212" table:formula="of:=IF([.H16]&gt;[.$A$43]; [.$C$43]; IF([.H16]&gt;[.$A$44]; [.$C$44]; IF([.H16]&gt;[.$A$45];[.$C$45];IF([.H16]&gt;[.$A$46];[.$C$46]; IF([.H16]&gt;[.$A$47];[.$C$47];IF([.H16]&gt;[.$A$48];[.$C$48];[.$C$49]))))))/100" office:value-type="percentage" office:value="0.134" calcext:value-type="percentage">
            <text:p>13.4%</text:p>
          </table:table-cell>
          <table:table-cell table:style-name="ce380" table:formula="of:=(MAX([.B16:.F16])-MIN([.B16:.F16]))/[.H16]*5" office:value-type="percentage" office:value="0.253807106598985" calcext:value-type="percentage">
            <text:p>25.4%</text:p>
          </table:table-cell>
          <table:table-cell/>
          <table:table-cell table:style-name="ce20"/>
          <table:table-cell table:number-columns-repeated="2"/>
          <table:table-cell table:style-name="ce89" table:number-columns-repeated="2"/>
          <table:table-cell table:style-name="ce16" table:number-columns-repeated="32"/>
        </table:table-row>
        <table:table-row table:style-name="ro16">
          <table:table-cell table:style-name="ce16" office:value-type="string" calcext:value-type="string">
            <text:p>count_12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137" calcext:value-type="float">
            <text:p>137</text:p>
          </table:table-cell>
          <table:table-cell office:value-type="float" office:value="158" calcext:value-type="float">
            <text:p>158</text:p>
          </table:table-cell>
          <table:table-cell office:value-type="float" office:value="169" calcext:value-type="float">
            <text:p>169</text:p>
          </table:table-cell>
          <table:table-cell table:style-name="ce204" table:formula="of:=AVERAGE([.B17:.F17])/AVERAGE([.B$8:.F$8])" office:value-type="float" office:value="29.9159924473866" calcext:value-type="float">
            <text:p>29.9</text:p>
          </table:table-cell>
          <table:table-cell table:style-name="ce376" table:formula="of:=[.G17]*[.H$8]" office:value-type="float" office:value="764" calcext:value-type="float">
            <text:p>764</text:p>
          </table:table-cell>
          <table:table-cell table:style-name="ce212" table:formula="of:=STDEVP([.B17:.F17])/AVERAGE([.B17:.F17])" office:value-type="percentage" office:value="0.107728158866766" calcext:value-type="percentage">
            <text:p>10.8%</text:p>
          </table:table-cell>
          <table:table-cell table:style-name="ce212" table:formula="of:=IF([.H17]&gt;[.$A$43]; [.$C$43]; IF([.H17]&gt;[.$A$44]; [.$C$44]; IF([.H17]&gt;[.$A$45];[.$C$45];IF([.H17]&gt;[.$A$46];[.$C$46]; IF([.H17]&gt;[.$A$47];[.$C$47];IF([.H17]&gt;[.$A$48];[.$C$48];[.$C$49]))))))/100" office:value-type="percentage" office:value="0.156" calcext:value-type="percentage">
            <text:p>15.6%</text:p>
          </table:table-cell>
          <table:table-cell table:style-name="ce380" table:formula="of:=(MAX([.B17:.F17])-MIN([.B17:.F17]))/[.H17]*5" office:value-type="percentage" office:value="0.261780104712042" calcext:value-type="percentage">
            <text:p>26.2%</text:p>
          </table:table-cell>
          <table:table-cell/>
          <table:table-cell table:style-name="ce20"/>
          <table:table-cell table:number-columns-repeated="2"/>
          <table:table-cell table:style-name="ce89" table:number-columns-repeated="2"/>
          <table:table-cell table:style-name="ce16" table:number-columns-repeated="32"/>
        </table:table-row>
        <table:table-row table:style-name="ro16">
          <table:table-cell table:style-name="ce16" office:value-type="string" calcext:value-type="string">
            <text:p>count_13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table:style-name="ce204" table:formula="of:=AVERAGE([.B18:.F18])/AVERAGE([.B$8:.F$8])" office:value-type="float" office:value="19.1869585068317" calcext:value-type="float">
            <text:p>19.2</text:p>
          </table:table-cell>
          <table:table-cell table:style-name="ce376" table:formula="of:=[.G18]*[.H$8]" office:value-type="float" office:value="490" calcext:value-type="float">
            <text:p>490</text:p>
          </table:table-cell>
          <table:table-cell table:style-name="ce212" table:formula="of:=STDEVP([.B18:.F18])/AVERAGE([.B18:.F18])" office:value-type="percentage" office:value="0.0980866517607993" calcext:value-type="percentage">
            <text:p>9.8%</text:p>
          </table:table-cell>
          <table:table-cell table:style-name="ce212" table:formula="of:=IF([.H18]&gt;[.$A$43]; [.$C$43]; IF([.H18]&gt;[.$A$44]; [.$C$44]; IF([.H18]&gt;[.$A$45];[.$C$45];IF([.H18]&gt;[.$A$46];[.$C$46]; IF([.H18]&gt;[.$A$47];[.$C$47];IF([.H18]&gt;[.$A$48];[.$C$48];[.$C$49]))))))/100" office:value-type="percentage" office:value="0.193" calcext:value-type="percentage">
            <text:p>19.3%</text:p>
          </table:table-cell>
          <table:table-cell table:style-name="ce380" table:formula="of:=(MAX([.B18:.F18])-MIN([.B18:.F18]))/[.H18]*5" office:value-type="percentage" office:value="0.306122448979592" calcext:value-type="percentage">
            <text:p>30.6%</text:p>
          </table:table-cell>
          <table:table-cell/>
          <table:table-cell table:style-name="ce20"/>
          <table:table-cell table:number-columns-repeated="2"/>
          <table:table-cell table:style-name="ce89" table:number-columns-repeated="2"/>
          <table:table-cell table:style-name="ce16" table:number-columns-repeated="32"/>
        </table:table-row>
        <table:table-row table:style-name="ro16">
          <table:table-cell table:style-name="ce16" office:value-type="string" calcext:value-type="string">
            <text:p>count_14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table:style-name="ce204" table:formula="of:=AVERAGE([.B19:.F19])/AVERAGE([.B$8:.F$8])" office:value-type="float" office:value="12.7652009657697" calcext:value-type="float">
            <text:p>12.8</text:p>
          </table:table-cell>
          <table:table-cell table:style-name="ce376" table:formula="of:=[.G19]*[.H$8]" office:value-type="float" office:value="326" calcext:value-type="float">
            <text:p>326</text:p>
          </table:table-cell>
          <table:table-cell table:style-name="ce212" table:formula="of:=STDEVP([.B19:.F19])/AVERAGE([.B19:.F19])" office:value-type="percentage" office:value="0.0885860679643782" calcext:value-type="percentage">
            <text:p>8.9%</text:p>
          </table:table-cell>
          <table:table-cell table:style-name="ce212" table:formula="of:=IF([.H19]&gt;[.$A$43]; [.$C$43]; IF([.H19]&gt;[.$A$44]; [.$C$44]; IF([.H19]&gt;[.$A$45];[.$C$45];IF([.H19]&gt;[.$A$46];[.$C$46]; IF([.H19]&gt;[.$A$47];[.$C$47];IF([.H19]&gt;[.$A$48];[.$C$48];[.$C$49]))))))/100" office:value-type="percentage" office:value="0.193" calcext:value-type="percentage">
            <text:p>19.3%</text:p>
          </table:table-cell>
          <table:table-cell table:style-name="ce380" table:formula="of:=(MAX([.B19:.F19])-MIN([.B19:.F19]))/[.H19]*5" office:value-type="percentage" office:value="0.260736196319018" calcext:value-type="percentage">
            <text:p>26.1%</text:p>
          </table:table-cell>
          <table:table-cell/>
          <table:table-cell table:style-name="ce20"/>
          <table:table-cell table:number-columns-repeated="2"/>
          <table:table-cell table:style-name="ce89" table:number-columns-repeated="2"/>
          <table:table-cell table:style-name="ce16" table:number-columns-repeated="32"/>
        </table:table-row>
        <table:table-row table:style-name="ro16">
          <table:table-cell table:style-name="ce16" office:value-type="string" calcext:value-type="string">
            <text:p>count_15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style-name="ce204" table:formula="of:=AVERAGE([.B20:.F20])/AVERAGE([.B$8:.F$8])" office:value-type="float" office:value="8.81033808987171" calcext:value-type="float">
            <text:p>8.8</text:p>
          </table:table-cell>
          <table:table-cell table:style-name="ce376" table:formula="of:=[.G20]*[.H$8]" office:value-type="float" office:value="225" calcext:value-type="float">
            <text:p>225</text:p>
          </table:table-cell>
          <table:table-cell table:style-name="ce212" table:formula="of:=STDEVP([.B20:.F20])/AVERAGE([.B20:.F20])" office:value-type="percentage" office:value="0.113311544746506" calcext:value-type="percentage">
            <text:p>11.3%</text:p>
          </table:table-cell>
          <table:table-cell table:style-name="ce212" table:formula="of:=IF([.H20]&gt;[.$A$43]; [.$C$43]; IF([.H20]&gt;[.$A$44]; [.$C$44]; IF([.H20]&gt;[.$A$45];[.$C$45];IF([.H20]&gt;[.$A$46];[.$C$46]; IF([.H20]&gt;[.$A$47];[.$C$47];IF([.H20]&gt;[.$A$48];[.$C$48];[.$C$49]))))))/100" office:value-type="percentage" office:value="0.193" calcext:value-type="percentage">
            <text:p>19.3%</text:p>
          </table:table-cell>
          <table:table-cell table:style-name="ce380" table:formula="of:=(MAX([.B20:.F20])-MIN([.B20:.F20]))/[.H20]*5" office:value-type="percentage" office:value="0.355555555555556" calcext:value-type="percentage">
            <text:p>35.6%</text:p>
          </table:table-cell>
          <table:table-cell/>
          <table:table-cell table:style-name="ce20"/>
          <table:table-cell table:number-columns-repeated="2"/>
          <table:table-cell table:style-name="ce89" table:number-columns-repeated="2"/>
          <table:table-cell table:style-name="ce16" table:number-columns-repeated="32"/>
        </table:table-row>
        <table:table-row table:style-name="ro16">
          <table:table-cell table:style-name="ce16" office:value-type="string" calcext:value-type="string">
            <text:p>count_16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style-name="ce204" table:formula="of:=AVERAGE([.B21:.F21])/AVERAGE([.B$8:.F$8])" office:value-type="float" office:value="6.93079929736575" calcext:value-type="float">
            <text:p>6.9</text:p>
          </table:table-cell>
          <table:table-cell table:style-name="ce376" table:formula="of:=[.G21]*[.H$8]" office:value-type="float" office:value="177" calcext:value-type="float">
            <text:p>177</text:p>
          </table:table-cell>
          <table:table-cell table:style-name="ce212" table:formula="of:=STDEVP([.B21:.F21])/AVERAGE([.B21:.F21])" office:value-type="percentage" office:value="0.0972014154468093" calcext:value-type="percentage">
            <text:p>9.7%</text:p>
          </table:table-cell>
          <table:table-cell table:style-name="ce212" table:formula="of:=IF([.H21]&gt;[.$A$43]; [.$C$43]; IF([.H21]&gt;[.$A$44]; [.$C$44]; IF([.H21]&gt;[.$A$45];[.$C$45];IF([.H21]&gt;[.$A$46];[.$C$46]; IF([.H21]&gt;[.$A$47];[.$C$47];IF([.H21]&gt;[.$A$48];[.$C$48];[.$C$49]))))))/100" office:value-type="percentage" office:value="0.275" calcext:value-type="percentage">
            <text:p>27.5%</text:p>
          </table:table-cell>
          <table:table-cell table:style-name="ce380" table:formula="of:=(MAX([.B21:.F21])-MIN([.B21:.F21]))/[.H21]*5" office:value-type="percentage" office:value="0.254237288135593" calcext:value-type="percentage">
            <text:p>25.4%</text:p>
          </table:table-cell>
          <table:table-cell/>
          <table:table-cell table:style-name="ce20"/>
          <table:table-cell/>
          <table:table-cell table:style-name="ce89"/>
          <table:table-cell table:number-columns-repeated="2"/>
          <table:table-cell table:style-name="ce31" table:number-columns-repeated="2"/>
          <table:table-cell table:style-name="ce16" table:number-columns-repeated="30"/>
        </table:table-row>
        <table:table-row table:style-name="ro16">
          <table:table-cell table:style-name="ce16" office:value-type="string" calcext:value-type="string">
            <text:p>count_17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style-name="ce204" table:formula="of:=AVERAGE([.B22:.F22])/AVERAGE([.B$8:.F$8])" office:value-type="float" office:value="5.83440166840394" calcext:value-type="float">
            <text:p>5.8</text:p>
          </table:table-cell>
          <table:table-cell table:style-name="ce376" table:formula="of:=[.G22]*[.H$8]" office:value-type="float" office:value="149" calcext:value-type="float">
            <text:p>149</text:p>
          </table:table-cell>
          <table:table-cell table:style-name="ce212" table:formula="of:=STDEVP([.B22:.F22])/AVERAGE([.B22:.F22])" office:value-type="percentage" office:value="0.152158175151069" calcext:value-type="percentage">
            <text:p>15.2%</text:p>
          </table:table-cell>
          <table:table-cell table:style-name="ce212" table:formula="of:=IF([.H22]&gt;[.$A$43]; [.$C$43]; IF([.H22]&gt;[.$A$44]; [.$C$44]; IF([.H22]&gt;[.$A$45];[.$C$45];IF([.H22]&gt;[.$A$46];[.$C$46]; IF([.H22]&gt;[.$A$47];[.$C$47];IF([.H22]&gt;[.$A$48];[.$C$48];[.$C$49]))))))/100" office:value-type="percentage" office:value="0.275" calcext:value-type="percentage">
            <text:p>27.5%</text:p>
          </table:table-cell>
          <table:table-cell table:style-name="ce380" table:formula="of:=(MAX([.B22:.F22])-MIN([.B22:.F22]))/[.H22]*5" office:value-type="percentage" office:value="0.369127516778524" calcext:value-type="percentage">
            <text:p>36.9%</text:p>
          </table:table-cell>
          <table:table-cell/>
          <table:table-cell table:style-name="ce20"/>
          <table:table-cell/>
          <table:table-cell table:style-name="ce202"/>
          <table:table-cell table:style-name="ce16"/>
          <table:table-cell table:number-columns-repeated="3"/>
          <table:table-cell table:style-name="ce76" table:number-columns-repeated="30"/>
        </table:table-row>
        <table:table-row table:style-name="ro16">
          <table:table-cell table:style-name="ce16" office:value-type="string" calcext:value-type="string">
            <text:p>count_1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style-name="ce204" table:formula="of:=AVERAGE([.B23:.F23])/AVERAGE([.B$8:.F$8])" office:value-type="float" office:value="4.89463227215095" calcext:value-type="float">
            <text:p>4.9</text:p>
          </table:table-cell>
          <table:table-cell table:style-name="ce376" table:formula="of:=[.G23]*[.H$8]" office:value-type="float" office:value="125" calcext:value-type="float">
            <text:p>125</text:p>
          </table:table-cell>
          <table:table-cell table:style-name="ce212" table:formula="of:=STDEVP([.B23:.F23])/AVERAGE([.B23:.F23])" office:value-type="percentage" office:value="0.169705627484771" calcext:value-type="percentage">
            <text:p>17.0%</text:p>
          </table:table-cell>
          <table:table-cell table:style-name="ce212" table:formula="of:=IF([.H23]&gt;[.$A$43]; [.$C$43]; IF([.H23]&gt;[.$A$44]; [.$C$44]; IF([.H23]&gt;[.$A$45];[.$C$45];IF([.H23]&gt;[.$A$46];[.$C$46]; IF([.H23]&gt;[.$A$47];[.$C$47];IF([.H23]&gt;[.$A$48];[.$C$48];[.$C$49]))))))/100" office:value-type="percentage" office:value="0.275" calcext:value-type="percentage">
            <text:p>27.5%</text:p>
          </table:table-cell>
          <table:table-cell table:style-name="ce380" table:formula="of:=(MAX([.B23:.F23])-MIN([.B23:.F23]))/[.H23]*5" office:value-type="percentage" office:value="0.44" calcext:value-type="percentage">
            <text:p>44.0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16">
          <table:table-cell table:style-name="ce16" office:value-type="string" calcext:value-type="string">
            <text:p>count_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204" table:formula="of:=AVERAGE([.B24:.F24])/AVERAGE([.B$8:.F$8])" office:value-type="float" office:value="3.83739170136635" calcext:value-type="float">
            <text:p>3.8</text:p>
          </table:table-cell>
          <table:table-cell table:style-name="ce376" table:formula="of:=[.G24]*[.H$8]" office:value-type="float" office:value="98" calcext:value-type="float">
            <text:p>98</text:p>
          </table:table-cell>
          <table:table-cell table:style-name="ce212" table:formula="of:=STDEVP([.B24:.F24])/AVERAGE([.B24:.F24])" office:value-type="percentage" office:value="0.153400983452785" calcext:value-type="percentage">
            <text:p>15.3%</text:p>
          </table:table-cell>
          <table:table-cell table:style-name="ce212" table:formula="of:=IF([.H24]&gt;[.$A$43]; [.$C$43]; IF([.H24]&gt;[.$A$44]; [.$C$44]; IF([.H24]&gt;[.$A$45];[.$C$45];IF([.H24]&gt;[.$A$46];[.$C$46]; IF([.H24]&gt;[.$A$47];[.$C$47];IF([.H24]&gt;[.$A$48];[.$C$48];[.$C$49]))))))/100" office:value-type="percentage" office:value="0.275" calcext:value-type="percentage">
            <text:p>27.5%</text:p>
          </table:table-cell>
          <table:table-cell table:style-name="ce380" table:formula="of:=(MAX([.B24:.F24])-MIN([.B24:.F24]))/[.H24]*5" office:value-type="percentage" office:value="0.459183673469388" calcext:value-type="percentage">
            <text:p>45.9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12" table:number-columns-repeated="30"/>
        </table:table-row>
        <table:table-row table:style-name="ro16">
          <table:table-cell table:style-name="ce16" office:value-type="string" calcext:value-type="string">
            <text:p>count_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204" table:formula="of:=AVERAGE([.B25:.F25])/AVERAGE([.B$8:.F$8])" office:value-type="float" office:value="2.93677936329057" calcext:value-type="float">
            <text:p>2.9</text:p>
          </table:table-cell>
          <table:table-cell table:style-name="ce376" table:formula="of:=[.G25]*[.H$8]" office:value-type="float" office:value="75" calcext:value-type="float">
            <text:p>75</text:p>
          </table:table-cell>
          <table:table-cell table:style-name="ce212" table:formula="of:=STDEVP([.B25:.F25])/AVERAGE([.B25:.F25])" office:value-type="percentage" office:value="0.197765292989218" calcext:value-type="percentage">
            <text:p>19.8%</text:p>
          </table:table-cell>
          <table:table-cell table:style-name="ce212" table:formula="of:=IF([.H25]&gt;[.$A$43]; [.$C$43]; IF([.H25]&gt;[.$A$44]; [.$C$44]; IF([.H25]&gt;[.$A$45];[.$C$45];IF([.H25]&gt;[.$A$46];[.$C$46]; IF([.H25]&gt;[.$A$47];[.$C$47];IF([.H25]&gt;[.$A$48];[.$C$48];[.$C$49]))))))/100" office:value-type="percentage" office:value="0.275" calcext:value-type="percentage">
            <text:p>27.5%</text:p>
          </table:table-cell>
          <table:table-cell table:style-name="ce380" table:formula="of:=(MAX([.B25:.F25])-MIN([.B25:.F25]))/[.H25]*5" office:value-type="percentage" office:value="0.533333333333333" calcext:value-type="percentage">
            <text:p>53.3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16">
          <table:table-cell table:style-name="ce16" office:value-type="string" calcext:value-type="string">
            <text:p>count_2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style-name="ce204" table:formula="of:=AVERAGE([.B26:.F26])/AVERAGE([.B$8:.F$8])" office:value-type="float" office:value="2.5843658396957" calcext:value-type="float">
            <text:p>2.6</text:p>
          </table:table-cell>
          <table:table-cell table:style-name="ce376" table:formula="of:=[.G26]*[.H$8]" office:value-type="float" office:value="66" calcext:value-type="float">
            <text:p>66</text:p>
          </table:table-cell>
          <table:table-cell table:style-name="ce212" table:formula="of:=STDEVP([.B26:.F26])/AVERAGE([.B26:.F26])" office:value-type="percentage" office:value="0.211036186017941" calcext:value-type="percentage">
            <text:p>21.1%</text:p>
          </table:table-cell>
          <table:table-cell table:style-name="ce212" table:formula="of:=IF([.H26]&gt;[.$A$43]; [.$C$43]; IF([.H26]&gt;[.$A$44]; [.$C$44]; IF([.H26]&gt;[.$A$45];[.$C$45];IF([.H26]&gt;[.$A$46];[.$C$46]; IF([.H26]&gt;[.$A$47];[.$C$47];IF([.H26]&gt;[.$A$48];[.$C$48];[.$C$49]))))))/100" office:value-type="percentage" office:value="0.275" calcext:value-type="percentage">
            <text:p>27.5%</text:p>
          </table:table-cell>
          <table:table-cell table:style-name="ce380" table:formula="of:=(MAX([.B26:.F26])-MIN([.B26:.F26]))/[.H26]*5" office:value-type="percentage" office:value="0.606060606060606" calcext:value-type="percentage">
            <text:p>60.6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16" office:value-type="string" calcext:value-type="string">
            <text:p>count_2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style-name="ce204" table:formula="of:=AVERAGE([.B27:.F27])/AVERAGE([.B$8:.F$8])" office:value-type="float" office:value="2.34942349063246" calcext:value-type="float">
            <text:p>2.3</text:p>
          </table:table-cell>
          <table:table-cell table:style-name="ce376" table:formula="of:=[.G27]*[.H$8]" office:value-type="float" office:value="60" calcext:value-type="float">
            <text:p>60</text:p>
          </table:table-cell>
          <table:table-cell table:style-name="ce212" table:formula="of:=STDEVP([.B27:.F27])/AVERAGE([.B27:.F27])" office:value-type="percentage" office:value="0.263523138347365" calcext:value-type="percentage">
            <text:p>26.4%</text:p>
          </table:table-cell>
          <table:table-cell table:style-name="ce212" table:formula="of:=IF([.H27]&gt;[.$A$43]; [.$C$43]; IF([.H27]&gt;[.$A$44]; [.$C$44]; IF([.H27]&gt;[.$A$45];[.$C$45];IF([.H27]&gt;[.$A$46];[.$C$46]; IF([.H27]&gt;[.$A$47];[.$C$47];IF([.H27]&gt;[.$A$48];[.$C$48];[.$C$49]))))))/100" office:value-type="percentage" office:value="0.275" calcext:value-type="percentage">
            <text:p>27.5%</text:p>
          </table:table-cell>
          <table:table-cell table:style-name="ce380" table:formula="of:=(MAX([.B27:.F27])-MIN([.B27:.F27]))/[.H27]*5" office:value-type="percentage" office:value="0.75" calcext:value-type="percentage">
            <text:p>75.0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16" office:value-type="string" calcext:value-type="string">
            <text:p>count_2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204" table:formula="of:=AVERAGE([.B28:.F28])/AVERAGE([.B$8:.F$8])" office:value-type="float" office:value="2.11448114156921" calcext:value-type="float">
            <text:p>2.1</text:p>
          </table:table-cell>
          <table:table-cell table:style-name="ce376" table:formula="of:=[.G28]*[.H$8]" office:value-type="float" office:value="54" calcext:value-type="float">
            <text:p>54</text:p>
          </table:table-cell>
          <table:table-cell table:style-name="ce212" table:formula="of:=STDEVP([.B28:.F28])/AVERAGE([.B28:.F28])" office:value-type="percentage" office:value="0.214367350051671" calcext:value-type="percentage">
            <text:p>21.4%</text:p>
          </table:table-cell>
          <table:table-cell table:style-name="ce212" table:formula="of:=IF([.H28]&gt;[.$A$43]; [.$C$43]; IF([.H28]&gt;[.$A$44]; [.$C$44]; IF([.H28]&gt;[.$A$45];[.$C$45];IF([.H28]&gt;[.$A$46];[.$C$46]; IF([.H28]&gt;[.$A$47];[.$C$47];IF([.H28]&gt;[.$A$48];[.$C$48];[.$C$49]))))))/100" office:value-type="percentage" office:value="0.275" calcext:value-type="percentage">
            <text:p>27.5%</text:p>
          </table:table-cell>
          <table:table-cell table:style-name="ce380" table:formula="of:=(MAX([.B28:.F28])-MIN([.B28:.F28]))/[.H28]*5" office:value-type="percentage" office:value="0.648148148148148" calcext:value-type="percentage">
            <text:p>64.8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16" office:value-type="string" calcext:value-type="string">
            <text:p>count_2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204" table:formula="of:=AVERAGE([.B29:.F29])/AVERAGE([.B$8:.F$8])" office:value-type="float" office:value="1.76206761797434" calcext:value-type="float">
            <text:p>1.8</text:p>
          </table:table-cell>
          <table:table-cell table:style-name="ce376" table:formula="of:=[.G29]*[.H$8]" office:value-type="float" office:value="45" calcext:value-type="float">
            <text:p>45</text:p>
          </table:table-cell>
          <table:table-cell table:style-name="ce212" table:formula="of:=STDEVP([.B29:.F29])/AVERAGE([.B29:.F29])" office:value-type="percentage" office:value="0.314269680527355" calcext:value-type="percentage">
            <text:p>31.4%</text:p>
          </table:table-cell>
          <table:table-cell table:style-name="ce212" table:formula="of:=IF([.H29]&gt;[.$A$43]; [.$C$43]; IF([.H29]&gt;[.$A$44]; [.$C$44]; IF([.H29]&gt;[.$A$45];[.$C$45];IF([.H29]&gt;[.$A$46];[.$C$46]; IF([.H29]&gt;[.$A$47];[.$C$47];IF([.H29]&gt;[.$A$48];[.$C$48];[.$C$49]))))))/100" office:value-type="percentage" office:value="0.275" calcext:value-type="percentage">
            <text:p>27.5%</text:p>
          </table:table-cell>
          <table:table-cell table:style-name="ce380" table:formula="of:=(MAX([.B29:.F29])-MIN([.B29:.F29]))/[.H29]*5" office:value-type="percentage" office:value="0.888888888888889" calcext:value-type="percentage">
            <text:p>88.9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16" office:value-type="string" calcext:value-type="string">
            <text:p>count_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style-name="ce204" table:formula="of:=AVERAGE([.B30:.F30])/AVERAGE([.B$8:.F$8])" office:value-type="float" office:value="1.60543938526551" calcext:value-type="float">
            <text:p>1.6</text:p>
          </table:table-cell>
          <table:table-cell table:style-name="ce376" table:formula="of:=[.G30]*[.H$8]" office:value-type="float" office:value="41" calcext:value-type="float">
            <text:p>41</text:p>
          </table:table-cell>
          <table:table-cell table:style-name="ce212" table:formula="of:=STDEVP([.B30:.F30])/AVERAGE([.B30:.F30])" office:value-type="percentage" office:value="0.339716787248393" calcext:value-type="percentage">
            <text:p>34.0%</text:p>
          </table:table-cell>
          <table:table-cell table:style-name="ce212" table:formula="of:=IF([.H30]&gt;[.$A$43]; [.$C$43]; IF([.H30]&gt;[.$A$44]; [.$C$44]; IF([.H30]&gt;[.$A$45];[.$C$45];IF([.H30]&gt;[.$A$46];[.$C$46]; IF([.H30]&gt;[.$A$47];[.$C$47];IF([.H30]&gt;[.$A$48];[.$C$48];[.$C$49]))))))/100" office:value-type="percentage" office:value="0.275" calcext:value-type="percentage">
            <text:p>27.5%</text:p>
          </table:table-cell>
          <table:table-cell table:style-name="ce380" table:formula="of:=(MAX([.B30:.F30])-MIN([.B30:.F30]))/[.H30]*5" office:value-type="percentage" office:value="0.975609756097561" calcext:value-type="percentage">
            <text:p>97.6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16" office:value-type="string" calcext:value-type="string">
            <text:p>count_2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204" table:formula="of:=AVERAGE([.B31:.F31])/AVERAGE([.B$8:.F$8])" office:value-type="float" office:value="1.25302586167064" calcext:value-type="float">
            <text:p>1.3</text:p>
          </table:table-cell>
          <table:table-cell table:style-name="ce376" table:formula="of:=[.G31]*[.H$8]" office:value-type="float" office:value="32" calcext:value-type="float">
            <text:p>32</text:p>
          </table:table-cell>
          <table:table-cell table:style-name="ce212" table:formula="of:=STDEVP([.B31:.F31])/AVERAGE([.B31:.F31])" office:value-type="percentage" office:value="0.125" calcext:value-type="percentage">
            <text:p>12.5%</text:p>
          </table:table-cell>
          <table:table-cell table:style-name="ce212" table:formula="of:=IF([.H31]&gt;[.$A$43]; [.$C$43]; IF([.H31]&gt;[.$A$44]; [.$C$44]; IF([.H31]&gt;[.$A$45];[.$C$45];IF([.H31]&gt;[.$A$46];[.$C$46]; IF([.H31]&gt;[.$A$47];[.$C$47];IF([.H31]&gt;[.$A$48];[.$C$48];[.$C$49]))))))/100" office:value-type="percentage" office:value="0.275" calcext:value-type="percentage">
            <text:p>27.5%</text:p>
          </table:table-cell>
          <table:table-cell table:style-name="ce380" table:formula="of:=(MAX([.B31:.F31])-MIN([.B31:.F31]))/[.H31]*5" office:value-type="percentage" office:value="0.3125" calcext:value-type="percentage">
            <text:p>31.3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16" office:value-type="string" calcext:value-type="string">
            <text:p>count_2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04" table:formula="of:=AVERAGE([.B32:.F32])/AVERAGE([.B$8:.F$8])" office:value-type="float" office:value="1.09639762896181" calcext:value-type="float">
            <text:p>1.1</text:p>
          </table:table-cell>
          <table:table-cell table:style-name="ce376" table:formula="of:=[.G32]*[.H$8]" office:value-type="float" office:value="28" calcext:value-type="float">
            <text:p>28</text:p>
          </table:table-cell>
          <table:table-cell table:style-name="ce212" table:formula="of:=STDEVP([.B32:.F32])/AVERAGE([.B32:.F32])" office:value-type="percentage" office:value="0.142857142857143" calcext:value-type="percentage">
            <text:p>14.3%</text:p>
          </table:table-cell>
          <table:table-cell table:style-name="ce212" table:formula="of:=IF([.H32]&gt;[.$A$43]; [.$C$43]; IF([.H32]&gt;[.$A$44]; [.$C$44]; IF([.H32]&gt;[.$A$45];[.$C$45];IF([.H32]&gt;[.$A$46];[.$C$46]; IF([.H32]&gt;[.$A$47];[.$C$47];IF([.H32]&gt;[.$A$48];[.$C$48];[.$C$49]))))))/100" office:value-type="percentage" office:value="0.275" calcext:value-type="percentage">
            <text:p>27.5%</text:p>
          </table:table-cell>
          <table:table-cell table:style-name="ce380" table:formula="of:=(MAX([.B32:.F32])-MIN([.B32:.F32]))/[.H32]*5" office:value-type="percentage" office:value="0.357142857142857" calcext:value-type="percentage">
            <text:p>35.7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16" office:value-type="string" calcext:value-type="string">
            <text:p>count_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04" table:formula="of:=AVERAGE([.B33:.F33])/AVERAGE([.B$8:.F$8])" office:value-type="float" office:value="0.939769396252983" calcext:value-type="float">
            <text:p>0.9</text:p>
          </table:table-cell>
          <table:table-cell table:style-name="ce376" table:formula="of:=[.G33]*[.H$8]" office:value-type="float" office:value="24" calcext:value-type="float">
            <text:p>24</text:p>
          </table:table-cell>
          <table:table-cell table:style-name="ce212" table:formula="of:=STDEVP([.B33:.F33])/AVERAGE([.B33:.F33])" office:value-type="percentage" office:value="0.155902391115581" calcext:value-type="percentage">
            <text:p>15.6%</text:p>
          </table:table-cell>
          <table:table-cell table:style-name="ce212" table:formula="of:=IF([.H33]&gt;[.$A$43]; [.$C$43]; IF([.H33]&gt;[.$A$44]; [.$C$44]; IF([.H33]&gt;[.$A$45];[.$C$45];IF([.H33]&gt;[.$A$46];[.$C$46]; IF([.H33]&gt;[.$A$47];[.$C$47];IF([.H33]&gt;[.$A$48];[.$C$48];[.$C$49]))))))/100" office:value-type="percentage" office:value="0.275" calcext:value-type="percentage">
            <text:p>27.5%</text:p>
          </table:table-cell>
          <table:table-cell table:style-name="ce380" table:formula="of:=(MAX([.B33:.F33])-MIN([.B33:.F33]))/[.H33]*5" office:value-type="percentage" office:value="0.416666666666667" calcext:value-type="percentage">
            <text:p>41.7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16" office:value-type="string" calcext:value-type="string">
            <text:p>count_2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04" table:formula="of:=AVERAGE([.B34:.F34])/AVERAGE([.B$8:.F$8])" office:value-type="float" office:value="0.861455279898568" calcext:value-type="float">
            <text:p>0.9</text:p>
          </table:table-cell>
          <table:table-cell table:style-name="ce376" table:formula="of:=[.G34]*[.H$8]" office:value-type="float" office:value="22" calcext:value-type="float">
            <text:p>22</text:p>
          </table:table-cell>
          <table:table-cell table:style-name="ce212" table:formula="of:=STDEVP([.B34:.F34])/AVERAGE([.B34:.F34])" office:value-type="percentage" office:value="0.181818181818182" calcext:value-type="percentage">
            <text:p>18.2%</text:p>
          </table:table-cell>
          <table:table-cell table:style-name="ce212" table:formula="of:=IF([.H34]&gt;[.$A$43]; [.$C$43]; IF([.H34]&gt;[.$A$44]; [.$C$44]; IF([.H34]&gt;[.$A$45];[.$C$45];IF([.H34]&gt;[.$A$46];[.$C$46]; IF([.H34]&gt;[.$A$47];[.$C$47];IF([.H34]&gt;[.$A$48];[.$C$48];[.$C$49]))))))/100" office:value-type="percentage" office:value="0.275" calcext:value-type="percentage">
            <text:p>27.5%</text:p>
          </table:table-cell>
          <table:table-cell table:style-name="ce380" table:formula="of:=(MAX([.B34:.F34])-MIN([.B34:.F34]))/[.H34]*5" office:value-type="percentage" office:value="0.454545454545455" calcext:value-type="percentage">
            <text:p>45.5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16" office:value-type="string" calcext:value-type="string">
            <text:p>count_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04" table:formula="of:=AVERAGE([.B35:.F35])/AVERAGE([.B$8:.F$8])" office:value-type="float" office:value="0.82229822172136" calcext:value-type="float">
            <text:p>0.8</text:p>
          </table:table-cell>
          <table:table-cell table:style-name="ce376" table:formula="of:=[.G35]*[.H$8]" office:value-type="float" office:value="21" calcext:value-type="float">
            <text:p>21</text:p>
          </table:table-cell>
          <table:table-cell table:style-name="ce212" table:formula="of:=STDEVP([.B35:.F35])/AVERAGE([.B35:.F35])" office:value-type="percentage" office:value="0.17817416127495" calcext:value-type="percentage">
            <text:p>17.8%</text:p>
          </table:table-cell>
          <table:table-cell table:style-name="ce212" table:formula="of:=IF([.H35]&gt;[.$A$43]; [.$C$43]; IF([.H35]&gt;[.$A$44]; [.$C$44]; IF([.H35]&gt;[.$A$45];[.$C$45];IF([.H35]&gt;[.$A$46];[.$C$46]; IF([.H35]&gt;[.$A$47];[.$C$47];IF([.H35]&gt;[.$A$48];[.$C$48];[.$C$49]))))))/100" office:value-type="percentage" office:value="0.275" calcext:value-type="percentage">
            <text:p>27.5%</text:p>
          </table:table-cell>
          <table:table-cell table:style-name="ce380" table:formula="of:=(MAX([.B35:.F35])-MIN([.B35:.F35]))/[.H35]*5" office:value-type="percentage" office:value="0.476190476190476" calcext:value-type="percentage">
            <text:p>47.6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16" office:value-type="string" calcext:value-type="string">
            <text:p>count_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4" table:formula="of:=AVERAGE([.B36:.F36])/AVERAGE([.B$8:.F$8])" office:value-type="float" office:value="0.15662823270883" calcext:value-type="float">
            <text:p>0.2</text:p>
          </table:table-cell>
          <table:table-cell table:style-name="ce376" table:formula="of:=[.G36]*[.H$8]" office:value-type="float" office:value="4" calcext:value-type="float">
            <text:p>4</text:p>
          </table:table-cell>
          <table:table-cell table:style-name="ce212" table:formula="of:=STDEVP([.B36:.F36])/AVERAGE([.B36:.F36])" office:value-type="percentage" office:value="0.935414346693485" calcext:value-type="percentage">
            <text:p>93.5%</text:p>
          </table:table-cell>
          <table:table-cell table:style-name="ce212" table:formula="of:=IF([.H36]&gt;[.$A$43]; [.$C$43]; IF([.H36]&gt;[.$A$44]; [.$C$44]; IF([.H36]&gt;[.$A$45];[.$C$45];IF([.H36]&gt;[.$A$46];[.$C$46]; IF([.H36]&gt;[.$A$47];[.$C$47];IF([.H36]&gt;[.$A$48];[.$C$48];[.$C$49]))))))/100" office:value-type="percentage" office:value="0.275" calcext:value-type="percentage">
            <text:p>27.5%</text:p>
          </table:table-cell>
          <table:table-cell table:style-name="ce380" table:formula="of:=(MAX([.B36:.F36])-MIN([.B36:.F36]))/[.H36]*5" office:value-type="percentage" office:value="2.5" calcext:value-type="percentage">
            <text:p>250.0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16" office:value-type="string" calcext:value-type="string">
            <text:p>count_5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4" table:formula="of:=AVERAGE([.B37:.F37])/AVERAGE([.B$8:.F$8])" office:value-type="float" office:value="0" calcext:value-type="float">
            <text:p>0.0</text:p>
          </table:table-cell>
          <table:table-cell table:style-name="ce376" table:formula="of:=[.G37]*[.H$8]" office:value-type="float" office:value="0" calcext:value-type="float">
            <text:p>0</text:p>
          </table:table-cell>
          <table:table-cell table:style-name="ce212" table:formula="of:=STDEVP([.B37:.F37])/AVERAGE([.B37:.F37])" office:value-type="string" office:string-value="" calcext:value-type="error">
            <text:p>#DIV/0!</text:p>
          </table:table-cell>
          <table:table-cell table:style-name="ce212" table:formula="of:=IF([.H37]&gt;[.$A$43]; [.$C$43]; IF([.H37]&gt;[.$A$44]; [.$C$44]; IF([.H37]&gt;[.$A$45];[.$C$45];IF([.H37]&gt;[.$A$46];[.$C$46]; IF([.H37]&gt;[.$A$47];[.$C$47];IF([.H37]&gt;[.$A$48];[.$C$48];[.$C$49]))))))/100" office:value-type="percentage" office:value="0.275" calcext:value-type="percentage">
            <text:p>27.5%</text:p>
          </table:table-cell>
          <table:table-cell table:style-name="ce380" table:formula="of:=(MAX([.B37:.F37])-MIN([.B37:.F37]))/[.H37]*5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6">
          <table:table-cell table:style-name="ce16" office:value-type="string" calcext:value-type="string">
            <text:p>count_7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4" table:formula="of:=AVERAGE([.B38:.F38])/AVERAGE([.B$8:.F$8])" office:value-type="float" office:value="0" calcext:value-type="float">
            <text:p>0.0</text:p>
          </table:table-cell>
          <table:table-cell table:style-name="ce376" table:formula="of:=[.G38]*[.H$8]" office:value-type="float" office:value="0" calcext:value-type="float">
            <text:p>0</text:p>
          </table:table-cell>
          <table:table-cell table:style-name="ce212" table:formula="of:=STDEVP([.B38:.F38])/AVERAGE([.B38:.F38])" office:value-type="string" office:string-value="" calcext:value-type="error">
            <text:p>#DIV/0!</text:p>
          </table:table-cell>
          <table:table-cell table:style-name="ce212" table:formula="of:=IF([.H38]&gt;[.$A$43]; [.$C$43]; IF([.H38]&gt;[.$A$44]; [.$C$44]; IF([.H38]&gt;[.$A$45];[.$C$45];IF([.H38]&gt;[.$A$46];[.$C$46]; IF([.H38]&gt;[.$A$47];[.$C$47];IF([.H38]&gt;[.$A$48];[.$C$48];[.$C$49]))))))/100" office:value-type="percentage" office:value="0.275" calcext:value-type="percentage">
            <text:p>27.5%</text:p>
          </table:table-cell>
          <table:table-cell table:style-name="ce380" table:formula="of:=(MAX([.B38:.F38])-MIN([.B38:.F38]))/[.H38]*5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6">
          <table:table-cell table:number-columns-repeated="7"/>
          <table:table-cell table:style-name="ce378"/>
          <table:table-cell table:number-columns-repeated="41"/>
        </table:table-row>
        <table:table-row table:style-name="ro16">
          <table:table-cell office:value-type="string" calcext:value-type="string">
            <text:p>Table C.2</text:p>
          </table:table-cell>
          <table:table-cell table:number-columns-repeated="6"/>
          <table:table-cell table:style-name="ce378"/>
          <table:table-cell table:number-columns-repeated="41"/>
        </table:table-row>
        <table:table-row table:style-name="ro16">
          <table:table-cell table:style-name="ce115"/>
          <table:table-cell table:style-name="ce199" office:value-type="string" calcext:value-type="string">
            <text:p>Mean counted X</text:p>
          </table:table-cell>
          <table:table-cell table:style-name="ce115"/>
          <table:table-cell table:style-name="ce201" office:value-type="string" calcext:value-type="string">
            <text:p>C<text:span text:style-name="T6">V_MAX</text:span></text:p>
          </table:table-cell>
          <table:table-cell table:style-name="ce117" table:number-columns-repeated="3"/>
          <table:table-cell table:style-name="ce118"/>
          <table:table-cell table:number-columns-repeated="41"/>
        </table:table-row>
        <table:table-row table:style-name="ro16">
          <table:table-cell table:style-name="ce193" office:value-type="string" calcext:value-type="string">
            <text:p>X &gt;=</text:p>
          </table:table-cell>
          <table:table-cell table:style-name="ce200" office:value-type="string" calcext:value-type="string">
            <text:p>X &lt;</text:p>
          </table:table-cell>
          <table:table-cell table:style-name="ce193" office:value-type="string" calcext:value-type="string">
            <text:p>D<text:span text:style-name="T6">QMAX / SAMPLE</text:span></text:p>
          </table:table-cell>
          <table:table-cell table:style-name="ce193" office:value-type="string" calcext:value-type="string">
            <text:p>N=3</text:p>
          </table:table-cell>
          <table:table-cell table:style-name="ce200" office:value-type="string" calcext:value-type="string">
            <text:p>N=6</text:p>
          </table:table-cell>
          <table:table-cell table:style-name="ce200" office:value-type="string" calcext:value-type="string">
            <text:p>N=10</text:p>
          </table:table-cell>
          <table:table-cell table:style-name="ce200" office:value-type="string" calcext:value-type="string">
            <text:p>N=20</text:p>
          </table:table-cell>
          <table:table-cell table:style-name="ce210" office:value-type="string" calcext:value-type="string">
            <text:p>N=40</text:p>
          </table:table-cell>
          <table:table-cell table:number-columns-repeated="41"/>
        </table:table-row>
        <table:table-row table:style-name="ro16">
          <table:table-cell table:style-name="ce164" office:value-type="float" office:value="10000" calcext:value-type="float">
            <text:p>10000</text:p>
          </table:table-cell>
          <table:table-cell/>
          <table:table-cell table:style-name="ce164" office:value-type="float" office:value="11" calcext:value-type="float">
            <text:p>11</text:p>
          </table:table-cell>
          <table:table-cell table:style-name="ce164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173" office:value-type="float" office:value="1.8" calcext:value-type="float">
            <text:p>1.8</text:p>
          </table:table-cell>
          <table:table-cell table:number-columns-repeated="41"/>
        </table:table-row>
        <table:table-row table:style-name="ro16">
          <table:table-cell table:style-name="ce164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164" office:value-type="float" office:value="11.3" calcext:value-type="float">
            <text:p>11.3</text:p>
          </table:table-cell>
          <table:table-cell table:style-name="ce164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173" office:value-type="float" office:value="1.9" calcext:value-type="float">
            <text:p>1.9</text:p>
          </table:table-cell>
          <table:table-cell table:number-columns-repeated="41"/>
        </table:table-row>
        <table:table-row table:style-name="ro16">
          <table:table-cell table:style-name="ce164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164" office:value-type="float" office:value="11.9" calcext:value-type="float">
            <text:p>11.9</text:p>
          </table:table-cell>
          <table:table-cell table:style-name="ce164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173" office:value-type="float" office:value="2.1" calcext:value-type="float">
            <text:p>2.1</text:p>
          </table:table-cell>
          <table:table-cell table:number-columns-repeated="41"/>
        </table:table-row>
        <table:table-row table:style-name="ro16">
          <table:table-cell table:style-name="ce164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164" office:value-type="float" office:value="13.4" calcext:value-type="float">
            <text:p>13.4</text:p>
          </table:table-cell>
          <table:table-cell table:style-name="ce164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173" office:value-type="float" office:value="2.4" calcext:value-type="float">
            <text:p>2.4</text:p>
          </table:table-cell>
          <table:table-cell table:number-columns-repeated="41"/>
        </table:table-row>
        <table:table-row table:style-name="ro16">
          <table:table-cell table:style-name="ce164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164" office:value-type="float" office:value="15.6" calcext:value-type="float">
            <text:p>15.6</text:p>
          </table:table-cell>
          <table:table-cell table:style-name="ce164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173" office:value-type="float" office:value="2.9" calcext:value-type="float">
            <text:p>2.9</text:p>
          </table:table-cell>
          <table:table-cell table:number-columns-repeated="41"/>
        </table:table-row>
        <table:table-row table:style-name="ro16">
          <table:table-cell table:style-name="ce164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164" office:value-type="float" office:value="19.3" calcext:value-type="float">
            <text:p>19.3</text:p>
          </table:table-cell>
          <table:table-cell table:style-name="ce164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173" office:value-type="float" office:value="4.1" calcext:value-type="float">
            <text:p>4.1</text:p>
          </table:table-cell>
          <table:table-cell table:number-columns-repeated="41"/>
        </table:table-row>
        <table:table-row table:style-name="ro16">
          <table:table-cell table:style-name="ce165" office:value-type="float" office:value="100" calcext:value-type="float">
            <text:p>100</text:p>
          </table:table-cell>
          <table:table-cell table:style-name="ce91" office:value-type="float" office:value="200" calcext:value-type="float">
            <text:p>200</text:p>
          </table:table-cell>
          <table:table-cell table:style-name="ce165" office:value-type="float" office:value="27.5" calcext:value-type="float">
            <text:p>27.5</text:p>
          </table:table-cell>
          <table:table-cell table:style-name="ce165" office:value-type="float" office:value="10" calcext:value-type="float">
            <text:p>10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7" calcext:value-type="float">
            <text:p>7</text:p>
          </table:table-cell>
          <table:table-cell table:style-name="ce91" office:value-type="float" office:value="6.1" calcext:value-type="float">
            <text:p>6.1</text:p>
          </table:table-cell>
          <table:table-cell table:style-name="ce211" office:value-type="float" office:value="5.5" calcext:value-type="float">
            <text:p>5.5</text:p>
          </table:table-cell>
          <table:table-cell table:number-columns-repeated="41"/>
        </table:table-row>
        <table:table-row table:style-name="ro16" table:number-rows-repeated="2">
          <table:table-cell table:number-columns-repeated="49"/>
        </table:table-row>
        <table:table-row table:style-name="ro16">
          <table:table-cell office:value-type="float" office:value="4.877143" calcext:value-type="float">
            <text:p>4.877143</text:p>
          </table:table-cell>
          <table:table-cell office:value-type="float" office:value="28618" calcext:value-type="float">
            <text:p>28618</text:p>
          </table:table-cell>
          <table:table-cell office:value-type="float" office:value="17169" calcext:value-type="float">
            <text:p>17169</text:p>
          </table:table-cell>
          <table:table-cell office:value-type="float" office:value="9054" calcext:value-type="float">
            <text:p>9054</text:p>
          </table:table-cell>
          <table:table-cell office:value-type="float" office:value="4444" calcext:value-type="float">
            <text:p>4444</text:p>
          </table:table-cell>
          <table:table-cell office:value-type="float" office:value="2276" calcext:value-type="float">
            <text:p>2276</text:p>
          </table:table-cell>
          <table:table-cell office:value-type="float" office:value="1067" calcext:value-type="float">
            <text:p>1067</text:p>
          </table:table-cell>
          <table:table-cell office:value-type="float" office:value="487" calcext:value-type="float">
            <text:p>487</text:p>
          </table:table-cell>
          <table:table-cell office:value-type="float" office:value="234" calcext:value-type="float">
            <text:p>234</text:p>
          </table:table-cell>
          <table:table-cell office:value-type="float" office:value="130" calcext:value-type="float">
            <text:p>130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6">
          <table:table-cell office:value-type="float" office:value="5.196125" calcext:value-type="float">
            <text:p>5.196125</text:p>
          </table:table-cell>
          <table:table-cell office:value-type="float" office:value="30775" calcext:value-type="float">
            <text:p>30775</text:p>
          </table:table-cell>
          <table:table-cell office:value-type="float" office:value="18382" calcext:value-type="float">
            <text:p>18382</text:p>
          </table:table-cell>
          <table:table-cell office:value-type="float" office:value="9822" calcext:value-type="float">
            <text:p>9822</text:p>
          </table:table-cell>
          <table:table-cell office:value-type="float" office:value="4919" calcext:value-type="float">
            <text:p>4919</text:p>
          </table:table-cell>
          <table:table-cell office:value-type="float" office:value="2609" calcext:value-type="float">
            <text:p>2609</text:p>
          </table:table-cell>
          <table:table-cell office:value-type="float" office:value="1234" calcext:value-type="float">
            <text:p>1234</text:p>
          </table:table-cell>
          <table:table-cell office:value-type="float" office:value="606" calcext:value-type="float">
            <text:p>606</text:p>
          </table:table-cell>
          <table:table-cell office:value-type="float" office:value="304" calcext:value-type="float">
            <text:p>304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6">
          <table:table-cell office:value-type="float" office:value="5.131249" calcext:value-type="float">
            <text:p>5.131249</text:p>
          </table:table-cell>
          <table:table-cell office:value-type="float" office:value="30220" calcext:value-type="float">
            <text:p>30220</text:p>
          </table:table-cell>
          <table:table-cell office:value-type="float" office:value="18044" calcext:value-type="float">
            <text:p>18044</text:p>
          </table:table-cell>
          <table:table-cell office:value-type="float" office:value="9679" calcext:value-type="float">
            <text:p>9679</text:p>
          </table:table-cell>
          <table:table-cell office:value-type="float" office:value="4826" calcext:value-type="float">
            <text:p>4826</text:p>
          </table:table-cell>
          <table:table-cell office:value-type="float" office:value="2452" calcext:value-type="float">
            <text:p>2452</text:p>
          </table:table-cell>
          <table:table-cell office:value-type="float" office:value="1174" calcext:value-type="float">
            <text:p>1174</text:p>
          </table:table-cell>
          <table:table-cell office:value-type="float" office:value="530" calcext:value-type="float">
            <text:p>530</text:p>
          </table:table-cell>
          <table:table-cell office:value-type="float" office:value="255" calcext:value-type="float">
            <text:p>255</text:p>
          </table:table-cell>
          <table:table-cell office:value-type="float" office:value="137" calcext:value-type="float">
            <text:p>137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6">
          <table:table-cell office:value-type="float" office:value="5.19361" calcext:value-type="float">
            <text:p>5.19361</text:p>
          </table:table-cell>
          <table:table-cell office:value-type="float" office:value="30933" calcext:value-type="float">
            <text:p>30933</text:p>
          </table:table-cell>
          <table:table-cell office:value-type="float" office:value="18516" calcext:value-type="float">
            <text:p>18516</text:p>
          </table:table-cell>
          <table:table-cell office:value-type="float" office:value="9907" calcext:value-type="float">
            <text:p>9907</text:p>
          </table:table-cell>
          <table:table-cell office:value-type="float" office:value="4934" calcext:value-type="float">
            <text:p>4934</text:p>
          </table:table-cell>
          <table:table-cell office:value-type="float" office:value="2527" calcext:value-type="float">
            <text:p>2527</text:p>
          </table:table-cell>
          <table:table-cell office:value-type="float" office:value="1206" calcext:value-type="float">
            <text:p>1206</text:p>
          </table:table-cell>
          <table:table-cell office:value-type="float" office:value="579" calcext:value-type="float">
            <text:p>579</text:p>
          </table:table-cell>
          <table:table-cell office:value-type="float" office:value="297" calcext:value-type="float">
            <text:p>297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6">
          <table:table-cell office:value-type="float" office:value="5.140053" calcext:value-type="float">
            <text:p>5.140053</text:p>
          </table:table-cell>
          <table:table-cell office:value-type="float" office:value="31112" calcext:value-type="float">
            <text:p>31112</text:p>
          </table:table-cell>
          <table:table-cell office:value-type="float" office:value="18750" calcext:value-type="float">
            <text:p>18750</text:p>
          </table:table-cell>
          <table:table-cell office:value-type="float" office:value="9896" calcext:value-type="float">
            <text:p>9896</text:p>
          </table:table-cell>
          <table:table-cell office:value-type="float" office:value="4972" calcext:value-type="float">
            <text:p>4972</text:p>
          </table:table-cell>
          <table:table-cell office:value-type="float" office:value="2693" calcext:value-type="float">
            <text:p>2693</text:p>
          </table:table-cell>
          <table:table-cell office:value-type="float" office:value="1268" calcext:value-type="float">
            <text:p>1268</text:p>
          </table:table-cell>
          <table:table-cell office:value-type="float" office:value="596" calcext:value-type="float">
            <text:p>596</text:p>
          </table:table-cell>
          <table:table-cell office:value-type="float" office:value="289" calcext:value-type="float">
            <text:p>289</text:p>
          </table:table-cell>
          <table:table-cell office:value-type="float" office:value="169" calcext:value-type="float">
            <text:p>169</text:p>
          </table:table-cell>
          <table:table-cell office:value-type="float" office:value="114" calcext:value-type="float">
            <text:p>114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6" table:number-rows-repeated="14">
          <table:table-cell table:number-columns-repeated="49"/>
        </table:table-row>
        <table:table-row table:style-name="ro16">
          <table:table-cell table:number-columns-repeated="7"/>
          <table:table-cell table:style-name="ce20"/>
          <table:table-cell/>
          <table:table-cell table:style-name="ce20"/>
          <table:table-cell table:number-columns-repeated="39"/>
        </table:table-row>
        <table:table-row table:style-name="ro16">
          <table:table-cell table:number-columns-repeated="6"/>
          <table:table-cell table:style-name="ce20" table:number-columns-repeated="4"/>
          <table:table-cell table:number-columns-repeated="39"/>
        </table:table-row>
        <table:table-row table:style-name="ro16">
          <table:table-cell table:style-name="ce89"/>
          <table:table-cell table:number-columns-repeated="48"/>
        </table:table-row>
        <table:table-row table:style-name="ro16" table:number-rows-repeated="3">
          <table:table-cell table:number-columns-repeated="49"/>
        </table:table-row>
        <table:table-row table:style-name="ro16">
          <table:table-cell table:number-columns-repeated="7"/>
          <table:table-cell table:style-name="ce21"/>
          <table:table-cell/>
          <table:table-cell table:style-name="ce21"/>
          <table:table-cell table:number-columns-repeated="39"/>
        </table:table-row>
        <table:table-row table:style-name="ro16">
          <table:table-cell table:style-name="ce89"/>
          <table:table-cell table:number-columns-repeated="6"/>
          <table:table-cell table:style-name="ce123"/>
          <table:table-cell/>
          <table:table-cell table:style-name="ce123"/>
          <table:table-cell table:number-columns-repeated="39"/>
        </table:table-row>
        <table:table-row table:style-name="ro16">
          <table:table-cell table:number-columns-repeated="10"/>
          <table:table-cell table:style-name="ce31"/>
          <table:table-cell table:number-columns-repeated="38"/>
        </table:table-row>
        <table:table-row table:style-name="ro16" table:number-rows-repeated="1048496">
          <table:table-cell table:number-columns-repeated="49"/>
        </table:table-row>
        <table:table-row table:style-name="ro16">
          <table:table-cell table:number-columns-repeated="49"/>
        </table:table-row>
        <calcext:conditional-formats>
          <calcext:conditional-format calcext:target-range-address="'ANNEX E - B2'.H9:'ANNEX E - B2'.H40">
            <calcext:condition calcext:apply-style-name="Good" calcext:value="&gt;1000" calcext:base-cell-address="'ANNEX E - B2'.H9"/>
          </calcext:conditional-format>
          <calcext:conditional-format calcext:target-range-address="'ANNEX E - B2'.K9:'ANNEX E - B2'.K38">
            <calcext:condition calcext:apply-style-name="Good" calcext:value="&lt;[.J11]" calcext:base-cell-address="'ANNEX E - B2'.K9"/>
          </calcext:conditional-format>
        </calcext:conditional-formats>
      </table:table>
      <table:table table:name="ANNEX E - B3" table:style-name="ta1">
        <table:table-column table:style-name="co4" table:number-columns-repeated="49" table:default-cell-style-name="Default"/>
        <table:table-row table:style-name="ro16">
          <table:table-cell office:value-type="string" calcext:value-type="string">
            <text:p>Data Preprocessing and Quality Assessment</text:p>
          </table:table-cell>
          <table:table-cell table:number-columns-repeated="48"/>
        </table:table-row>
        <table:table-row table:style-name="ro22">
          <table:table-cell table:number-columns-repeated="14"/>
          <table:table-cell table:style-name="ce215"/>
          <table:table-cell table:number-columns-repeated="34"/>
        </table:table-row>
        <table:table-row table:style-name="ro16">
          <table:table-cell table:number-columns-repeated="49"/>
        </table:table-row>
        <table:table-row table:style-name="ro22">
          <table:table-cell table:style-name="ce89" office:value-type="string" calcext:value-type="string">
            <text:p>Date</text:p>
          </table:table-cell>
          <table:table-cell table:number-columns-repeated="13"/>
          <table:table-cell table:style-name="ce215" office:value-type="string" calcext:value-type="string">
            <text:p>RM8632a</text:p>
          </table:table-cell>
          <table:table-cell table:number-columns-repeated="34"/>
        </table:table-row>
        <table:table-row table:style-name="ro16">
          <table:table-cell table:number-columns-repeated="14"/>
          <table:table-cell table:style-name="ce55" office:value-type="date" office:date-value="2025-05-21" calcext:value-type="date">
            <text:p>2025-05-21</text:p>
          </table:table-cell>
          <table:table-cell table:number-columns-repeated="34"/>
        </table:table-row>
        <table:table-row table:style-name="ro16">
          <table:table-cell office:value-type="string" calcext:value-type="string">
            <text:p>Partistan 34D</text:p>
          </table:table-cell>
          <table:table-cell table:style-name="ce89" table:number-columns-repeated="5"/>
          <table:table-cell table:number-columns-repeated="8"/>
          <table:table-cell office:value-type="string" calcext:value-type="string">
            <text:p>#00009</text:p>
          </table:table-cell>
          <table:table-cell table:number-columns-repeated="34"/>
        </table:table-row>
        <table:table-row table:style-name="ro16">
          <table:table-cell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202" office:value-type="string" calcext:value-type="string">
            <text:p>X<text:span text:style-name="T8"> / ml</text:span></text:p>
          </table:table-cell>
          <table:table-cell table:style-name="ce31" office:value-type="string" calcext:value-type="string">
            <text:p>N<text:span text:style-name="T6">TOTAL</text:span></text:p>
          </table:table-cell>
          <table:table-cell table:style-name="ce31" office:value-type="string" calcext:value-type="string">
            <text:p>CV</text:p>
          </table:table-cell>
          <table:table-cell table:style-name="ce31" office:value-type="string" calcext:value-type="string">
            <text:p>D<text:span text:style-name="T6">QMAX</text:span></text:p>
          </table:table-cell>
          <table:table-cell table:style-name="ce31" office:value-type="string" calcext:value-type="string">
            <text:p>D<text:span text:style-name="T6">Q</text:span></text:p>
          </table:table-cell>
          <table:table-cell/>
          <table:table-cell table:style-name="ce31"/>
          <table:table-cell table:number-columns-repeated="36"/>
        </table:table-row>
        <table:table-row table:style-name="ro16">
          <table:table-cell table:style-name="ce16" office:value-type="string" calcext:value-type="string">
            <text:p>Scanned ml</text:p>
          </table:table-cell>
          <table:table-cell office:value-type="float" office:value="4.923135" calcext:value-type="float">
            <text:p>4.923135</text:p>
          </table:table-cell>
          <table:table-cell office:value-type="float" office:value="5.228722" calcext:value-type="float">
            <text:p>5.228722</text:p>
          </table:table-cell>
          <table:table-cell office:value-type="float" office:value="5.174204" calcext:value-type="float">
            <text:p>5.174204</text:p>
          </table:table-cell>
          <table:table-cell office:value-type="float" office:value="5.179934" calcext:value-type="float">
            <text:p>5.179934</text:p>
          </table:table-cell>
          <table:table-cell office:value-type="float" office:value="5.227057" calcext:value-type="float">
            <text:p>5.227057</text:p>
          </table:table-cell>
          <table:table-cell table:style-name="ce203" office:value-type="float" office:value="25.517626" calcext:value-type="float">
            <text:p>25.5</text:p>
          </table:table-cell>
          <table:table-cell table:style-name="ce203" table:formula="of:=AVERAGE([.B$8:.F$8])*5" office:value-type="float" office:value="25.733052" calcext:value-type="float">
            <text:p>25.7</text:p>
          </table:table-cell>
          <table:table-cell table:style-name="ce212"/>
          <table:table-cell/>
          <table:table-cell table:style-name="ce212"/>
          <table:table-cell table:number-columns-repeated="38"/>
        </table:table-row>
        <table:table-row table:style-name="ro16">
          <table:table-cell table:style-name="ce199" office:value-type="string" calcext:value-type="string">
            <text:p>count_4</text:p>
          </table:table-cell>
          <table:table-cell table:style-name="ce117" office:value-type="float" office:value="29157" calcext:value-type="float">
            <text:p>29157</text:p>
          </table:table-cell>
          <table:table-cell table:style-name="ce117" office:value-type="float" office:value="30687" calcext:value-type="float">
            <text:p>30687</text:p>
          </table:table-cell>
          <table:table-cell table:style-name="ce117" office:value-type="float" office:value="30764" calcext:value-type="float">
            <text:p>30764</text:p>
          </table:table-cell>
          <table:table-cell table:style-name="ce117" office:value-type="float" office:value="30363" calcext:value-type="float">
            <text:p>30363</text:p>
          </table:table-cell>
          <table:table-cell table:style-name="ce117" office:value-type="float" office:value="30954" calcext:value-type="float">
            <text:p>30954</text:p>
          </table:table-cell>
          <table:table-cell table:style-name="ce363" table:formula="of:=AVERAGE([.B9:.F9])/AVERAGE([.B$8:.F$8])" office:value-type="float" office:value="5903.88578859593" calcext:value-type="float">
            <text:p>5903.9</text:p>
          </table:table-cell>
          <table:table-cell table:style-name="ce382" table:formula="of:=[.G9]*[.H$8]" office:value-type="float" office:value="151925" calcext:value-type="float">
            <text:p>151925</text:p>
          </table:table-cell>
          <table:table-cell table:style-name="ce370" table:formula="of:=STDEVP([.B9:.F9])/AVERAGE([.B9:.F9])" office:value-type="percentage" office:value="0.0211608821905485" calcext:value-type="percentage">
            <text:p>2.1%</text:p>
          </table:table-cell>
          <table:table-cell table:style-name="ce370" table:formula="of:=IF([.H9]&gt;[.$A$43]; [.$C$43]; IF([.H9]&gt;[.$A$44]; [.$C$44]; IF([.H9]&gt;[.$A$45];[.$C$45];IF([.H9]&gt;[.$A$46];[.$C$46]; IF([.H9]&gt;[.$A$47];[.$C$47];IF([.H9]&gt;[.$A$48];[.$C$48];[.$C$49]))))))/100" office:value-type="percentage" office:value="0.11" calcext:value-type="percentage">
            <text:p>11.0%</text:p>
          </table:table-cell>
          <table:table-cell table:style-name="ce386" table:formula="of:=(MAX([.B9:.F9])-MIN([.B9:.F9]))/[.H9]*5" office:value-type="percentage" office:value="0.0591410235313477" calcext:value-type="percentage">
            <text:p>5.9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16" office:value-type="string" calcext:value-type="string">
            <text:p>count_5</text:p>
          </table:table-cell>
          <table:table-cell office:value-type="float" office:value="17360" calcext:value-type="float">
            <text:p>17360</text:p>
          </table:table-cell>
          <table:table-cell office:value-type="float" office:value="18503" calcext:value-type="float">
            <text:p>18503</text:p>
          </table:table-cell>
          <table:table-cell office:value-type="float" office:value="18397" calcext:value-type="float">
            <text:p>18397</text:p>
          </table:table-cell>
          <table:table-cell office:value-type="float" office:value="18440" calcext:value-type="float">
            <text:p>18440</text:p>
          </table:table-cell>
          <table:table-cell office:value-type="float" office:value="18549" calcext:value-type="float">
            <text:p>18549</text:p>
          </table:table-cell>
          <table:table-cell table:style-name="ce204" table:formula="of:=AVERAGE([.B10:.F10])/AVERAGE([.B$8:.F$8])" office:value-type="float" office:value="3545.98436283423" calcext:value-type="float">
            <text:p>3546.0</text:p>
          </table:table-cell>
          <table:table-cell table:style-name="ce383" table:formula="of:=[.G10]*[.H$8]" office:value-type="float" office:value="91249" calcext:value-type="float">
            <text:p>91249</text:p>
          </table:table-cell>
          <table:table-cell table:style-name="ce212" table:formula="of:=STDEVP([.B10:.F10])/AVERAGE([.B10:.F10])" office:value-type="percentage" office:value="0.0245445299571263" calcext:value-type="percentage">
            <text:p>2.5%</text:p>
          </table:table-cell>
          <table:table-cell table:style-name="ce212" table:formula="of:=IF([.H10]&gt;[.$A$43]; [.$C$43]; IF([.H10]&gt;[.$A$44]; [.$C$44]; IF([.H10]&gt;[.$A$45];[.$C$45];IF([.H10]&gt;[.$A$46];[.$C$46]; IF([.H10]&gt;[.$A$47];[.$C$47];IF([.H10]&gt;[.$A$48];[.$C$48];[.$C$49]))))))/100" office:value-type="percentage" office:value="0.11" calcext:value-type="percentage">
            <text:p>11.0%</text:p>
          </table:table-cell>
          <table:table-cell table:style-name="ce387" table:formula="of:=(MAX([.B10:.F10])-MIN([.B10:.F10]))/[.H10]*5" office:value-type="percentage" office:value="0.0651513989194402" calcext:value-type="percentage">
            <text:p>6.5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16" office:value-type="string" calcext:value-type="string">
            <text:p>count_6</text:p>
          </table:table-cell>
          <table:table-cell office:value-type="float" office:value="9287" calcext:value-type="float">
            <text:p>9287</text:p>
          </table:table-cell>
          <table:table-cell office:value-type="float" office:value="9843" calcext:value-type="float">
            <text:p>9843</text:p>
          </table:table-cell>
          <table:table-cell office:value-type="float" office:value="9784" calcext:value-type="float">
            <text:p>9784</text:p>
          </table:table-cell>
          <table:table-cell office:value-type="float" office:value="9952" calcext:value-type="float">
            <text:p>9952</text:p>
          </table:table-cell>
          <table:table-cell office:value-type="float" office:value="9906" calcext:value-type="float">
            <text:p>9906</text:p>
          </table:table-cell>
          <table:table-cell table:style-name="ce204" table:formula="of:=AVERAGE([.B11:.F11])/AVERAGE([.B$8:.F$8])" office:value-type="float" office:value="1895.30569479283" calcext:value-type="float">
            <text:p>1895.3</text:p>
          </table:table-cell>
          <table:table-cell table:style-name="ce383" table:formula="of:=[.G11]*[.H$8]" office:value-type="float" office:value="48772" calcext:value-type="float">
            <text:p>48772</text:p>
          </table:table-cell>
          <table:table-cell table:style-name="ce212" table:formula="of:=STDEVP([.B11:.F11])/AVERAGE([.B11:.F11])" office:value-type="percentage" office:value="0.0246562199546043" calcext:value-type="percentage">
            <text:p>2.5%</text:p>
          </table:table-cell>
          <table:table-cell table:style-name="ce212" table:formula="of:=IF([.H11]&gt;[.$A$43]; [.$C$43]; IF([.H11]&gt;[.$A$44]; [.$C$44]; IF([.H11]&gt;[.$A$45];[.$C$45];IF([.H11]&gt;[.$A$46];[.$C$46]; IF([.H11]&gt;[.$A$47];[.$C$47];IF([.H11]&gt;[.$A$48];[.$C$48];[.$C$49]))))))/100" office:value-type="percentage" office:value="0.11" calcext:value-type="percentage">
            <text:p>11.0%</text:p>
          </table:table-cell>
          <table:table-cell table:style-name="ce387" table:formula="of:=(MAX([.B11:.F11])-MIN([.B11:.F11]))/[.H11]*5" office:value-type="percentage" office:value="0.068174362339047" calcext:value-type="percentage">
            <text:p>6.8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16" office:value-type="string" calcext:value-type="string">
            <text:p>count_7</text:p>
          </table:table-cell>
          <table:table-cell office:value-type="float" office:value="4587" calcext:value-type="float">
            <text:p>4587</text:p>
          </table:table-cell>
          <table:table-cell office:value-type="float" office:value="4921" calcext:value-type="float">
            <text:p>4921</text:p>
          </table:table-cell>
          <table:table-cell office:value-type="float" office:value="4957" calcext:value-type="float">
            <text:p>4957</text:p>
          </table:table-cell>
          <table:table-cell office:value-type="float" office:value="5035" calcext:value-type="float">
            <text:p>5035</text:p>
          </table:table-cell>
          <table:table-cell office:value-type="float" office:value="4939" calcext:value-type="float">
            <text:p>4939</text:p>
          </table:table-cell>
          <table:table-cell table:style-name="ce204" table:formula="of:=AVERAGE([.B12:.F12])/AVERAGE([.B$8:.F$8])" office:value-type="float" office:value="949.712455405601" calcext:value-type="float">
            <text:p>949.7</text:p>
          </table:table-cell>
          <table:table-cell table:style-name="ce383" table:formula="of:=[.G12]*[.H$8]" office:value-type="float" office:value="24439" calcext:value-type="float">
            <text:p>24439</text:p>
          </table:table-cell>
          <table:table-cell table:style-name="ce212" table:formula="of:=STDEVP([.B12:.F12])/AVERAGE([.B12:.F12])" office:value-type="percentage" office:value="0.031782252304864" calcext:value-type="percentage">
            <text:p>3.2%</text:p>
          </table:table-cell>
          <table:table-cell table:style-name="ce212" table:formula="of:=IF([.H12]&gt;[.$A$43]; [.$C$43]; IF([.H12]&gt;[.$A$44]; [.$C$44]; IF([.H12]&gt;[.$A$45];[.$C$45];IF([.H12]&gt;[.$A$46];[.$C$46]; IF([.H12]&gt;[.$A$47];[.$C$47];IF([.H12]&gt;[.$A$48];[.$C$48];[.$C$49]))))))/100" office:value-type="percentage" office:value="0.11" calcext:value-type="percentage">
            <text:p>11.0%</text:p>
          </table:table-cell>
          <table:table-cell table:style-name="ce387" table:formula="of:=(MAX([.B12:.F12])-MIN([.B12:.F12]))/[.H12]*5" office:value-type="percentage" office:value="0.091656778100577" calcext:value-type="percentage">
            <text:p>9.2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16" office:value-type="string" calcext:value-type="string">
            <text:p>count_8</text:p>
          </table:table-cell>
          <table:table-cell/>
          <table:table-cell office:value-type="float" office:value="2546" calcext:value-type="float">
            <text:p>2546</text:p>
          </table:table-cell>
          <table:table-cell office:value-type="float" office:value="2570" calcext:value-type="float">
            <text:p>2570</text:p>
          </table:table-cell>
          <table:table-cell office:value-type="float" office:value="2656" calcext:value-type="float">
            <text:p>2656</text:p>
          </table:table-cell>
          <table:table-cell office:value-type="float" office:value="2616" calcext:value-type="float">
            <text:p>2616</text:p>
          </table:table-cell>
          <table:table-cell table:style-name="ce204" table:formula="of:=AVERAGE([.B13:.F13])/AVERAGE([.B$8:.F$8])" office:value-type="float" office:value="504.603962250572" calcext:value-type="float">
            <text:p>504.6</text:p>
          </table:table-cell>
          <table:table-cell table:style-name="ce383" table:formula="of:=[.G13]*[.H$8]" office:value-type="float" office:value="12985" calcext:value-type="float">
            <text:p>12985</text:p>
          </table:table-cell>
          <table:table-cell table:style-name="ce212" table:formula="of:=STDEVP([.B13:.F13])/AVERAGE([.B13:.F13])" office:value-type="percentage" office:value="0.0163049020868234" calcext:value-type="percentage">
            <text:p>1.6%</text:p>
          </table:table-cell>
          <table:table-cell table:style-name="ce212" table:formula="of:=IF([.H13]&gt;[.$A$43]; [.$C$43]; IF([.H13]&gt;[.$A$44]; [.$C$44]; IF([.H13]&gt;[.$A$45];[.$C$45];IF([.H13]&gt;[.$A$46];[.$C$46]; IF([.H13]&gt;[.$A$47];[.$C$47];IF([.H13]&gt;[.$A$48];[.$C$48];[.$C$49]))))))/100" office:value-type="percentage" office:value="0.11" calcext:value-type="percentage">
            <text:p>11.0%</text:p>
          </table:table-cell>
          <table:table-cell table:style-name="ce387" table:formula="of:=(MAX([.B13:.F13])-MIN([.B13:.F13]))/[.H13]*5" office:value-type="percentage" office:value="0.0423565652676165" calcext:value-type="percentage">
            <text:p>4.2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200" office:value-type="string" calcext:value-type="string">
            <text:p>count_9</text:p>
          </table:table-cell>
          <table:table-cell table:style-name="ce91"/>
          <table:table-cell table:style-name="ce91" office:value-type="float" office:value="1198" calcext:value-type="float">
            <text:p>1198</text:p>
          </table:table-cell>
          <table:table-cell table:style-name="ce91" office:value-type="float" office:value="1203" calcext:value-type="float">
            <text:p>1203</text:p>
          </table:table-cell>
          <table:table-cell table:style-name="ce91" office:value-type="float" office:value="1267" calcext:value-type="float">
            <text:p>1267</text:p>
          </table:table-cell>
          <table:table-cell table:style-name="ce91" office:value-type="float" office:value="1255" calcext:value-type="float">
            <text:p>1255</text:p>
          </table:table-cell>
          <table:table-cell table:style-name="ce364" table:formula="of:=AVERAGE([.B14:.F14])/AVERAGE([.B$8:.F$8])" office:value-type="float" office:value="239.137977104309" calcext:value-type="float">
            <text:p>239.1</text:p>
          </table:table-cell>
          <table:table-cell table:style-name="ce384" table:formula="of:=[.G14]*[.H$8]" office:value-type="float" office:value="6153.75" calcext:value-type="float">
            <text:p>6154</text:p>
          </table:table-cell>
          <table:table-cell table:style-name="ce371" table:formula="of:=STDEVP([.B14:.F14])/AVERAGE([.B14:.F14])" office:value-type="percentage" office:value="0.0248605982065589" calcext:value-type="percentage">
            <text:p>2.5%</text:p>
          </table:table-cell>
          <table:table-cell table:style-name="ce371" table:formula="of:=IF([.H14]&gt;[.$A$43]; [.$C$43]; IF([.H14]&gt;[.$A$44]; [.$C$44]; IF([.H14]&gt;[.$A$45];[.$C$45];IF([.H14]&gt;[.$A$46];[.$C$46]; IF([.H14]&gt;[.$A$47];[.$C$47];IF([.H14]&gt;[.$A$48];[.$C$48];[.$C$49]))))))/100" office:value-type="percentage" office:value="0.113" calcext:value-type="percentage">
            <text:p>11.3%</text:p>
          </table:table-cell>
          <table:table-cell table:style-name="ce388" table:formula="of:=(MAX([.B14:.F14])-MIN([.B14:.F14]))/[.H14]*5" office:value-type="percentage" office:value="0.0560633759902498" calcext:value-type="percentage">
            <text:p>5.6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16" office:value-type="string" calcext:value-type="string">
            <text:p>count_10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float" office:value="572" calcext:value-type="float">
            <text:p>572</text:p>
          </table:table-cell>
          <table:table-cell office:value-type="float" office:value="588" calcext:value-type="float">
            <text:p>588</text:p>
          </table:table-cell>
          <table:table-cell table:style-name="ce204" table:formula="of:=AVERAGE([.B15:.F15])/AVERAGE([.B$8:.F$8])" office:value-type="float" office:value="110.801081814936" calcext:value-type="float">
            <text:p>110.8</text:p>
          </table:table-cell>
          <table:table-cell table:style-name="ce383" table:formula="of:=[.G15]*[.H$8]" office:value-type="float" office:value="2851.25" calcext:value-type="float">
            <text:p>2851</text:p>
          </table:table-cell>
          <table:table-cell table:style-name="ce212" table:formula="of:=STDEVP([.B15:.F15])/AVERAGE([.B15:.F15])" office:value-type="percentage" office:value="0.0197768409796404" calcext:value-type="percentage">
            <text:p>2.0%</text:p>
          </table:table-cell>
          <table:table-cell table:style-name="ce212" table:formula="of:=IF([.H15]&gt;[.$A$43]; [.$C$43]; IF([.H15]&gt;[.$A$44]; [.$C$44]; IF([.H15]&gt;[.$A$45];[.$C$45];IF([.H15]&gt;[.$A$46];[.$C$46]; IF([.H15]&gt;[.$A$47];[.$C$47];IF([.H15]&gt;[.$A$48];[.$C$48];[.$C$49]))))))/100" office:value-type="percentage" office:value="0.119" calcext:value-type="percentage">
            <text:p>11.9%</text:p>
          </table:table-cell>
          <table:table-cell table:style-name="ce387" table:formula="of:=(MAX([.B15:.F15])-MIN([.B15:.F15]))/[.H15]*5" office:value-type="percentage" office:value="0.0491012713722052" calcext:value-type="percentage">
            <text:p>4.9%</text:p>
          </table:table-cell>
          <table:table-cell/>
          <table:table-cell table:style-name="ce20"/>
          <table:table-cell table:number-columns-repeated="4"/>
          <table:table-cell table:style-name="ce16" table:number-columns-repeated="32"/>
        </table:table-row>
        <table:table-row table:style-name="ro16">
          <table:table-cell table:style-name="ce16" office:value-type="string" calcext:value-type="string">
            <text:p>count_11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86" calcext:value-type="float">
            <text:p>286</text:p>
          </table:table-cell>
          <table:table-cell office:value-type="float" office:value="277" calcext:value-type="float">
            <text:p>277</text:p>
          </table:table-cell>
          <table:table-cell office:value-type="float" office:value="317" calcext:value-type="float">
            <text:p>317</text:p>
          </table:table-cell>
          <table:table-cell table:style-name="ce204" table:formula="of:=AVERAGE([.B16:.F16])/AVERAGE([.B$8:.F$8])" office:value-type="float" office:value="56.1534636466751" calcext:value-type="float">
            <text:p>56.2</text:p>
          </table:table-cell>
          <table:table-cell table:style-name="ce383" table:formula="of:=[.G16]*[.H$8]" office:value-type="float" office:value="1445" calcext:value-type="float">
            <text:p>1445</text:p>
          </table:table-cell>
          <table:table-cell table:style-name="ce212" table:formula="of:=STDEVP([.B16:.F16])/AVERAGE([.B16:.F16])" office:value-type="percentage" office:value="0.0575373326931346" calcext:value-type="percentage">
            <text:p>5.8%</text:p>
          </table:table-cell>
          <table:table-cell table:style-name="ce212" table:formula="of:=IF([.H16]&gt;[.$A$43]; [.$C$43]; IF([.H16]&gt;[.$A$44]; [.$C$44]; IF([.H16]&gt;[.$A$45];[.$C$45];IF([.H16]&gt;[.$A$46];[.$C$46]; IF([.H16]&gt;[.$A$47];[.$C$47];IF([.H16]&gt;[.$A$48];[.$C$48];[.$C$49]))))))/100" office:value-type="percentage" office:value="0.134" calcext:value-type="percentage">
            <text:p>13.4%</text:p>
          </table:table-cell>
          <table:table-cell table:style-name="ce387" table:formula="of:=(MAX([.B16:.F16])-MIN([.B16:.F16]))/[.H16]*5" office:value-type="percentage" office:value="0.141868512110727" calcext:value-type="percentage">
            <text:p>14.2%</text:p>
          </table:table-cell>
          <table:table-cell/>
          <table:table-cell table:style-name="ce20"/>
          <table:table-cell table:number-columns-repeated="2"/>
          <table:table-cell table:style-name="ce89" table:number-columns-repeated="2"/>
          <table:table-cell table:style-name="ce16" table:number-columns-repeated="32"/>
        </table:table-row>
        <table:table-row table:style-name="ro16">
          <table:table-cell table:style-name="ce16" office:value-type="string" calcext:value-type="string">
            <text:p>count_12</text:p>
          </table:table-cell>
          <table:table-cell office:value-type="float" office:value="164" calcext:value-type="float">
            <text:p>164</text:p>
          </table:table-cell>
          <table:table-cell office:value-type="float" office:value="149" calcext:value-type="float">
            <text:p>149</text:p>
          </table:table-cell>
          <table:table-cell office:value-type="float" office:value="163" calcext:value-type="float">
            <text:p>163</text:p>
          </table:table-cell>
          <table:table-cell office:value-type="float" office:value="149" calcext:value-type="float">
            <text:p>149</text:p>
          </table:table-cell>
          <table:table-cell office:value-type="float" office:value="180" calcext:value-type="float">
            <text:p>180</text:p>
          </table:table-cell>
          <table:table-cell table:style-name="ce204" table:formula="of:=AVERAGE([.B17:.F17])/AVERAGE([.B$8:.F$8])" office:value-type="float" office:value="31.2827254225422" calcext:value-type="float">
            <text:p>31.3</text:p>
          </table:table-cell>
          <table:table-cell table:style-name="ce383" table:formula="of:=[.G17]*[.H$8]" office:value-type="float" office:value="805" calcext:value-type="float">
            <text:p>805</text:p>
          </table:table-cell>
          <table:table-cell table:style-name="ce212" table:formula="of:=STDEVP([.B17:.F17])/AVERAGE([.B17:.F17])" office:value-type="percentage" office:value="0.0714690676454287" calcext:value-type="percentage">
            <text:p>7.1%</text:p>
          </table:table-cell>
          <table:table-cell table:style-name="ce212" table:formula="of:=IF([.H17]&gt;[.$A$43]; [.$C$43]; IF([.H17]&gt;[.$A$44]; [.$C$44]; IF([.H17]&gt;[.$A$45];[.$C$45];IF([.H17]&gt;[.$A$46];[.$C$46]; IF([.H17]&gt;[.$A$47];[.$C$47];IF([.H17]&gt;[.$A$48];[.$C$48];[.$C$49]))))))/100" office:value-type="percentage" office:value="0.156" calcext:value-type="percentage">
            <text:p>15.6%</text:p>
          </table:table-cell>
          <table:table-cell table:style-name="ce387" table:formula="of:=(MAX([.B17:.F17])-MIN([.B17:.F17]))/[.H17]*5" office:value-type="percentage" office:value="0.192546583850932" calcext:value-type="percentage">
            <text:p>19.3%</text:p>
          </table:table-cell>
          <table:table-cell/>
          <table:table-cell table:style-name="ce20"/>
          <table:table-cell table:number-columns-repeated="2"/>
          <table:table-cell table:style-name="ce89" table:number-columns-repeated="2"/>
          <table:table-cell table:style-name="ce16" table:number-columns-repeated="32"/>
        </table:table-row>
        <table:table-row table:style-name="ro16">
          <table:table-cell table:style-name="ce16" office:value-type="string" calcext:value-type="string">
            <text:p>count_13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table:style-name="ce204" table:formula="of:=AVERAGE([.B18:.F18])/AVERAGE([.B$8:.F$8])" office:value-type="float" office:value="20.4406379779592" calcext:value-type="float">
            <text:p>20.4</text:p>
          </table:table-cell>
          <table:table-cell table:style-name="ce383" table:formula="of:=[.G18]*[.H$8]" office:value-type="float" office:value="526" calcext:value-type="float">
            <text:p>526</text:p>
          </table:table-cell>
          <table:table-cell table:style-name="ce212" table:formula="of:=STDEVP([.B18:.F18])/AVERAGE([.B18:.F18])" office:value-type="percentage" office:value="0.0805240250363018" calcext:value-type="percentage">
            <text:p>8.1%</text:p>
          </table:table-cell>
          <table:table-cell table:style-name="ce212" table:formula="of:=IF([.H18]&gt;[.$A$43]; [.$C$43]; IF([.H18]&gt;[.$A$44]; [.$C$44]; IF([.H18]&gt;[.$A$45];[.$C$45];IF([.H18]&gt;[.$A$46];[.$C$46]; IF([.H18]&gt;[.$A$47];[.$C$47];IF([.H18]&gt;[.$A$48];[.$C$48];[.$C$49]))))))/100" office:value-type="percentage" office:value="0.156" calcext:value-type="percentage">
            <text:p>15.6%</text:p>
          </table:table-cell>
          <table:table-cell table:style-name="ce387" table:formula="of:=(MAX([.B18:.F18])-MIN([.B18:.F18]))/[.H18]*5" office:value-type="percentage" office:value="0.180608365019011" calcext:value-type="percentage">
            <text:p>18.1%</text:p>
          </table:table-cell>
          <table:table-cell/>
          <table:table-cell table:style-name="ce20"/>
          <table:table-cell table:number-columns-repeated="2"/>
          <table:table-cell table:style-name="ce89" table:number-columns-repeated="2"/>
          <table:table-cell table:style-name="ce16" table:number-columns-repeated="32"/>
        </table:table-row>
        <table:table-row table:style-name="ro16">
          <table:table-cell table:style-name="ce16" office:value-type="string" calcext:value-type="string">
            <text:p>count_14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table:style-name="ce204" table:formula="of:=AVERAGE([.B19:.F19])/AVERAGE([.B$8:.F$8])" office:value-type="float" office:value="13.5234639093723" calcext:value-type="float">
            <text:p>13.5</text:p>
          </table:table-cell>
          <table:table-cell table:style-name="ce383" table:formula="of:=[.G19]*[.H$8]" office:value-type="float" office:value="348" calcext:value-type="float">
            <text:p>348</text:p>
          </table:table-cell>
          <table:table-cell table:style-name="ce212" table:formula="of:=STDEVP([.B19:.F19])/AVERAGE([.B19:.F19])" office:value-type="percentage" office:value="0.0864937755361633" calcext:value-type="percentage">
            <text:p>8.6%</text:p>
          </table:table-cell>
          <table:table-cell table:style-name="ce212" table:formula="of:=IF([.H19]&gt;[.$A$43]; [.$C$43]; IF([.H19]&gt;[.$A$44]; [.$C$44]; IF([.H19]&gt;[.$A$45];[.$C$45];IF([.H19]&gt;[.$A$46];[.$C$46]; IF([.H19]&gt;[.$A$47];[.$C$47];IF([.H19]&gt;[.$A$48];[.$C$48];[.$C$49]))))))/100" office:value-type="percentage" office:value="0.193" calcext:value-type="percentage">
            <text:p>19.3%</text:p>
          </table:table-cell>
          <table:table-cell table:style-name="ce387" table:formula="of:=(MAX([.B19:.F19])-MIN([.B19:.F19]))/[.H19]*5" office:value-type="percentage" office:value="0.244252873563218" calcext:value-type="percentage">
            <text:p>24.4%</text:p>
          </table:table-cell>
          <table:table-cell/>
          <table:table-cell table:style-name="ce20"/>
          <table:table-cell table:number-columns-repeated="2"/>
          <table:table-cell table:style-name="ce89" table:number-columns-repeated="2"/>
          <table:table-cell table:style-name="ce16" table:number-columns-repeated="32"/>
        </table:table-row>
        <table:table-row table:style-name="ro16">
          <table:table-cell table:style-name="ce16" office:value-type="string" calcext:value-type="string">
            <text:p>count_1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table:style-name="ce204" table:formula="of:=AVERAGE([.B20:.F20])/AVERAGE([.B$8:.F$8])" office:value-type="float" office:value="9.90943476117796" calcext:value-type="float">
            <text:p>9.9</text:p>
          </table:table-cell>
          <table:table-cell table:style-name="ce383" table:formula="of:=[.G20]*[.H$8]" office:value-type="float" office:value="255" calcext:value-type="float">
            <text:p>255</text:p>
          </table:table-cell>
          <table:table-cell table:style-name="ce212" table:formula="of:=STDEVP([.B20:.F20])/AVERAGE([.B20:.F20])" office:value-type="percentage" office:value="0.0831890330807703" calcext:value-type="percentage">
            <text:p>8.3%</text:p>
          </table:table-cell>
          <table:table-cell table:style-name="ce212" table:formula="of:=IF([.H20]&gt;[.$A$43]; [.$C$43]; IF([.H20]&gt;[.$A$44]; [.$C$44]; IF([.H20]&gt;[.$A$45];[.$C$45];IF([.H20]&gt;[.$A$46];[.$C$46]; IF([.H20]&gt;[.$A$47];[.$C$47];IF([.H20]&gt;[.$A$48];[.$C$48];[.$C$49]))))))/100" office:value-type="percentage" office:value="0.193" calcext:value-type="percentage">
            <text:p>19.3%</text:p>
          </table:table-cell>
          <table:table-cell table:style-name="ce387" table:formula="of:=(MAX([.B20:.F20])-MIN([.B20:.F20]))/[.H20]*5" office:value-type="percentage" office:value="0.235294117647059" calcext:value-type="percentage">
            <text:p>23.5%</text:p>
          </table:table-cell>
          <table:table-cell/>
          <table:table-cell table:style-name="ce20"/>
          <table:table-cell table:number-columns-repeated="2"/>
          <table:table-cell table:style-name="ce89" table:number-columns-repeated="2"/>
          <table:table-cell table:style-name="ce16" table:number-columns-repeated="32"/>
        </table:table-row>
        <table:table-row table:style-name="ro16">
          <table:table-cell table:style-name="ce16" office:value-type="string" calcext:value-type="string">
            <text:p>count_1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table:style-name="ce204" table:formula="of:=AVERAGE([.B21:.F21])/AVERAGE([.B$8:.F$8])" office:value-type="float" office:value="7.34463988181425" calcext:value-type="float">
            <text:p>7.3</text:p>
          </table:table-cell>
          <table:table-cell table:style-name="ce383" table:formula="of:=[.G21]*[.H$8]" office:value-type="float" office:value="189" calcext:value-type="float">
            <text:p>189</text:p>
          </table:table-cell>
          <table:table-cell table:style-name="ce212" table:formula="of:=STDEVP([.B21:.F21])/AVERAGE([.B21:.F21])" office:value-type="percentage" office:value="0.082648144718589" calcext:value-type="percentage">
            <text:p>8.3%</text:p>
          </table:table-cell>
          <table:table-cell table:style-name="ce212" table:formula="of:=IF([.H21]&gt;[.$A$43]; [.$C$43]; IF([.H21]&gt;[.$A$44]; [.$C$44]; IF([.H21]&gt;[.$A$45];[.$C$45];IF([.H21]&gt;[.$A$46];[.$C$46]; IF([.H21]&gt;[.$A$47];[.$C$47];IF([.H21]&gt;[.$A$48];[.$C$48];[.$C$49]))))))/100" office:value-type="percentage" office:value="0.275" calcext:value-type="percentage">
            <text:p>27.5%</text:p>
          </table:table-cell>
          <table:table-cell table:style-name="ce387" table:formula="of:=(MAX([.B21:.F21])-MIN([.B21:.F21]))/[.H21]*5" office:value-type="percentage" office:value="0.238095238095238" calcext:value-type="percentage">
            <text:p>23.8%</text:p>
          </table:table-cell>
          <table:table-cell/>
          <table:table-cell table:style-name="ce20"/>
          <table:table-cell/>
          <table:table-cell table:style-name="ce89"/>
          <table:table-cell table:number-columns-repeated="2"/>
          <table:table-cell table:style-name="ce31" table:number-columns-repeated="2"/>
          <table:table-cell table:style-name="ce16" table:number-columns-repeated="30"/>
        </table:table-row>
        <table:table-row table:style-name="ro16">
          <table:table-cell table:style-name="ce16" office:value-type="string" calcext:value-type="string">
            <text:p>count_17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04" table:formula="of:=AVERAGE([.B22:.F22])/AVERAGE([.B$8:.F$8])" office:value-type="float" office:value="6.29540561298364" calcext:value-type="float">
            <text:p>6.3</text:p>
          </table:table-cell>
          <table:table-cell table:style-name="ce383" table:formula="of:=[.G22]*[.H$8]" office:value-type="float" office:value="162" calcext:value-type="float">
            <text:p>162</text:p>
          </table:table-cell>
          <table:table-cell table:style-name="ce212" table:formula="of:=STDEVP([.B22:.F22])/AVERAGE([.B22:.F22])" office:value-type="percentage" office:value="0.0927981257924254" calcext:value-type="percentage">
            <text:p>9.3%</text:p>
          </table:table-cell>
          <table:table-cell table:style-name="ce212" table:formula="of:=IF([.H22]&gt;[.$A$43]; [.$C$43]; IF([.H22]&gt;[.$A$44]; [.$C$44]; IF([.H22]&gt;[.$A$45];[.$C$45];IF([.H22]&gt;[.$A$46];[.$C$46]; IF([.H22]&gt;[.$A$47];[.$C$47];IF([.H22]&gt;[.$A$48];[.$C$48];[.$C$49]))))))/100" office:value-type="percentage" office:value="0.275" calcext:value-type="percentage">
            <text:p>27.5%</text:p>
          </table:table-cell>
          <table:table-cell table:style-name="ce387" table:formula="of:=(MAX([.B22:.F22])-MIN([.B22:.F22]))/[.H22]*5" office:value-type="percentage" office:value="0.277777777777778" calcext:value-type="percentage">
            <text:p>27.8%</text:p>
          </table:table-cell>
          <table:table-cell/>
          <table:table-cell table:style-name="ce20"/>
          <table:table-cell/>
          <table:table-cell table:style-name="ce202"/>
          <table:table-cell table:style-name="ce16"/>
          <table:table-cell table:number-columns-repeated="3"/>
          <table:table-cell table:style-name="ce76" table:number-columns-repeated="30"/>
        </table:table-row>
        <table:table-row table:style-name="ro16">
          <table:table-cell table:style-name="ce16" office:value-type="string" calcext:value-type="string">
            <text:p>count_1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204" table:formula="of:=AVERAGE([.B23:.F23])/AVERAGE([.B$8:.F$8])" office:value-type="float" office:value="5.32389240110345" calcext:value-type="float">
            <text:p>5.3</text:p>
          </table:table-cell>
          <table:table-cell table:style-name="ce383" table:formula="of:=[.G23]*[.H$8]" office:value-type="float" office:value="137" calcext:value-type="float">
            <text:p>137</text:p>
          </table:table-cell>
          <table:table-cell table:style-name="ce212" table:formula="of:=STDEVP([.B23:.F23])/AVERAGE([.B23:.F23])" office:value-type="percentage" office:value="0.152413233706723" calcext:value-type="percentage">
            <text:p>15.2%</text:p>
          </table:table-cell>
          <table:table-cell table:style-name="ce212" table:formula="of:=IF([.H23]&gt;[.$A$43]; [.$C$43]; IF([.H23]&gt;[.$A$44]; [.$C$44]; IF([.H23]&gt;[.$A$45];[.$C$45];IF([.H23]&gt;[.$A$46];[.$C$46]; IF([.H23]&gt;[.$A$47];[.$C$47];IF([.H23]&gt;[.$A$48];[.$C$48];[.$C$49]))))))/100" office:value-type="percentage" office:value="0.275" calcext:value-type="percentage">
            <text:p>27.5%</text:p>
          </table:table-cell>
          <table:table-cell table:style-name="ce387" table:formula="of:=(MAX([.B23:.F23])-MIN([.B23:.F23]))/[.H23]*5" office:value-type="percentage" office:value="0.474452554744526" calcext:value-type="percentage">
            <text:p>47.4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16">
          <table:table-cell table:style-name="ce16" office:value-type="string" calcext:value-type="string">
            <text:p>count_19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style-name="ce204" table:formula="of:=AVERAGE([.B24:.F24])/AVERAGE([.B$8:.F$8])" office:value-type="float" office:value="4.66326341702492" calcext:value-type="float">
            <text:p>4.7</text:p>
          </table:table-cell>
          <table:table-cell table:style-name="ce383" table:formula="of:=[.G24]*[.H$8]" office:value-type="float" office:value="120" calcext:value-type="float">
            <text:p>120</text:p>
          </table:table-cell>
          <table:table-cell table:style-name="ce212" table:formula="of:=STDEVP([.B24:.F24])/AVERAGE([.B24:.F24])" office:value-type="percentage" office:value="0.190029237516523" calcext:value-type="percentage">
            <text:p>19.0%</text:p>
          </table:table-cell>
          <table:table-cell table:style-name="ce212" table:formula="of:=IF([.H24]&gt;[.$A$43]; [.$C$43]; IF([.H24]&gt;[.$A$44]; [.$C$44]; IF([.H24]&gt;[.$A$45];[.$C$45];IF([.H24]&gt;[.$A$46];[.$C$46]; IF([.H24]&gt;[.$A$47];[.$C$47];IF([.H24]&gt;[.$A$48];[.$C$48];[.$C$49]))))))/100" office:value-type="percentage" office:value="0.275" calcext:value-type="percentage">
            <text:p>27.5%</text:p>
          </table:table-cell>
          <table:table-cell table:style-name="ce387" table:formula="of:=(MAX([.B24:.F24])-MIN([.B24:.F24]))/[.H24]*5" office:value-type="percentage" office:value="0.583333333333333" calcext:value-type="percentage">
            <text:p>58.3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12" table:number-columns-repeated="30"/>
        </table:table-row>
        <table:table-row table:style-name="ro16">
          <table:table-cell table:style-name="ce16" office:value-type="string" calcext:value-type="string">
            <text:p>count_2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204" table:formula="of:=AVERAGE([.B25:.F25])/AVERAGE([.B$8:.F$8])" office:value-type="float" office:value="3.96377390447118" calcext:value-type="float">
            <text:p>4.0</text:p>
          </table:table-cell>
          <table:table-cell table:style-name="ce383" table:formula="of:=[.G25]*[.H$8]" office:value-type="float" office:value="102" calcext:value-type="float">
            <text:p>102</text:p>
          </table:table-cell>
          <table:table-cell table:style-name="ce212" table:formula="of:=STDEVP([.B25:.F25])/AVERAGE([.B25:.F25])" office:value-type="percentage" office:value="0.13370766369594" calcext:value-type="percentage">
            <text:p>13.4%</text:p>
          </table:table-cell>
          <table:table-cell table:style-name="ce212" table:formula="of:=IF([.H25]&gt;[.$A$43]; [.$C$43]; IF([.H25]&gt;[.$A$44]; [.$C$44]; IF([.H25]&gt;[.$A$45];[.$C$45];IF([.H25]&gt;[.$A$46];[.$C$46]; IF([.H25]&gt;[.$A$47];[.$C$47];IF([.H25]&gt;[.$A$48];[.$C$48];[.$C$49]))))))/100" office:value-type="percentage" office:value="0.275" calcext:value-type="percentage">
            <text:p>27.5%</text:p>
          </table:table-cell>
          <table:table-cell table:style-name="ce387" table:formula="of:=(MAX([.B25:.F25])-MIN([.B25:.F25]))/[.H25]*5" office:value-type="percentage" office:value="0.343137254901961" calcext:value-type="percentage">
            <text:p>34.3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16">
          <table:table-cell table:style-name="ce16" office:value-type="string" calcext:value-type="string">
            <text:p>count_2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style-name="ce204" table:formula="of:=AVERAGE([.B26:.F26])/AVERAGE([.B$8:.F$8])" office:value-type="float" office:value="3.30314492039265" calcext:value-type="float">
            <text:p>3.3</text:p>
          </table:table-cell>
          <table:table-cell table:style-name="ce383" table:formula="of:=[.G26]*[.H$8]" office:value-type="float" office:value="85" calcext:value-type="float">
            <text:p>85</text:p>
          </table:table-cell>
          <table:table-cell table:style-name="ce212" table:formula="of:=STDEVP([.B26:.F26])/AVERAGE([.B26:.F26])" office:value-type="percentage" office:value="0.153392997769474" calcext:value-type="percentage">
            <text:p>15.3%</text:p>
          </table:table-cell>
          <table:table-cell table:style-name="ce212" table:formula="of:=IF([.H26]&gt;[.$A$43]; [.$C$43]; IF([.H26]&gt;[.$A$44]; [.$C$44]; IF([.H26]&gt;[.$A$45];[.$C$45];IF([.H26]&gt;[.$A$46];[.$C$46]; IF([.H26]&gt;[.$A$47];[.$C$47];IF([.H26]&gt;[.$A$48];[.$C$48];[.$C$49]))))))/100" office:value-type="percentage" office:value="0.275" calcext:value-type="percentage">
            <text:p>27.5%</text:p>
          </table:table-cell>
          <table:table-cell table:style-name="ce387" table:formula="of:=(MAX([.B26:.F26])-MIN([.B26:.F26]))/[.H26]*5" office:value-type="percentage" office:value="0.411764705882353" calcext:value-type="percentage">
            <text:p>41.2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16" office:value-type="string" calcext:value-type="string">
            <text:p>count_2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204" table:formula="of:=AVERAGE([.B27:.F27])/AVERAGE([.B$8:.F$8])" office:value-type="float" office:value="2.87567910716537" calcext:value-type="float">
            <text:p>2.9</text:p>
          </table:table-cell>
          <table:table-cell table:style-name="ce383" table:formula="of:=[.G27]*[.H$8]" office:value-type="float" office:value="74" calcext:value-type="float">
            <text:p>74</text:p>
          </table:table-cell>
          <table:table-cell table:style-name="ce212" table:formula="of:=STDEVP([.B27:.F27])/AVERAGE([.B27:.F27])" office:value-type="percentage" office:value="0.156430228416084" calcext:value-type="percentage">
            <text:p>15.6%</text:p>
          </table:table-cell>
          <table:table-cell table:style-name="ce212" table:formula="of:=IF([.H27]&gt;[.$A$43]; [.$C$43]; IF([.H27]&gt;[.$A$44]; [.$C$44]; IF([.H27]&gt;[.$A$45];[.$C$45];IF([.H27]&gt;[.$A$46];[.$C$46]; IF([.H27]&gt;[.$A$47];[.$C$47];IF([.H27]&gt;[.$A$48];[.$C$48];[.$C$49]))))))/100" office:value-type="percentage" office:value="0.275" calcext:value-type="percentage">
            <text:p>27.5%</text:p>
          </table:table-cell>
          <table:table-cell table:style-name="ce387" table:formula="of:=(MAX([.B27:.F27])-MIN([.B27:.F27]))/[.H27]*5" office:value-type="percentage" office:value="0.337837837837838" calcext:value-type="percentage">
            <text:p>33.8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16" office:value-type="string" calcext:value-type="string">
            <text:p>count_2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204" table:formula="of:=AVERAGE([.B28:.F28])/AVERAGE([.B$8:.F$8])" office:value-type="float" office:value="2.5259343508885" calcext:value-type="float">
            <text:p>2.5</text:p>
          </table:table-cell>
          <table:table-cell table:style-name="ce383" table:formula="of:=[.G28]*[.H$8]" office:value-type="float" office:value="65" calcext:value-type="float">
            <text:p>65</text:p>
          </table:table-cell>
          <table:table-cell table:style-name="ce212" table:formula="of:=STDEVP([.B28:.F28])/AVERAGE([.B28:.F28])" office:value-type="percentage" office:value="0.175411603861406" calcext:value-type="percentage">
            <text:p>17.5%</text:p>
          </table:table-cell>
          <table:table-cell table:style-name="ce212" table:formula="of:=IF([.H28]&gt;[.$A$43]; [.$C$43]; IF([.H28]&gt;[.$A$44]; [.$C$44]; IF([.H28]&gt;[.$A$45];[.$C$45];IF([.H28]&gt;[.$A$46];[.$C$46]; IF([.H28]&gt;[.$A$47];[.$C$47];IF([.H28]&gt;[.$A$48];[.$C$48];[.$C$49]))))))/100" office:value-type="percentage" office:value="0.275" calcext:value-type="percentage">
            <text:p>27.5%</text:p>
          </table:table-cell>
          <table:table-cell table:style-name="ce387" table:formula="of:=(MAX([.B28:.F28])-MIN([.B28:.F28]))/[.H28]*5" office:value-type="percentage" office:value="0.461538461538462" calcext:value-type="percentage">
            <text:p>46.2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16" office:value-type="string" calcext:value-type="string">
            <text:p>count_2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204" table:formula="of:=AVERAGE([.B29:.F29])/AVERAGE([.B$8:.F$8])" office:value-type="float" office:value="2.29277118003725" calcext:value-type="float">
            <text:p>2.3</text:p>
          </table:table-cell>
          <table:table-cell table:style-name="ce383" table:formula="of:=[.G29]*[.H$8]" office:value-type="float" office:value="59" calcext:value-type="float">
            <text:p>59</text:p>
          </table:table-cell>
          <table:table-cell table:style-name="ce212" table:formula="of:=STDEVP([.B29:.F29])/AVERAGE([.B29:.F29])" office:value-type="percentage" office:value="0.210333451626964" calcext:value-type="percentage">
            <text:p>21.0%</text:p>
          </table:table-cell>
          <table:table-cell table:style-name="ce212" table:formula="of:=IF([.H29]&gt;[.$A$43]; [.$C$43]; IF([.H29]&gt;[.$A$44]; [.$C$44]; IF([.H29]&gt;[.$A$45];[.$C$45];IF([.H29]&gt;[.$A$46];[.$C$46]; IF([.H29]&gt;[.$A$47];[.$C$47];IF([.H29]&gt;[.$A$48];[.$C$48];[.$C$49]))))))/100" office:value-type="percentage" office:value="0.275" calcext:value-type="percentage">
            <text:p>27.5%</text:p>
          </table:table-cell>
          <table:table-cell table:style-name="ce387" table:formula="of:=(MAX([.B29:.F29])-MIN([.B29:.F29]))/[.H29]*5" office:value-type="percentage" office:value="0.593220338983051" calcext:value-type="percentage">
            <text:p>59.3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16" office:value-type="string" calcext:value-type="string">
            <text:p>count_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204" table:formula="of:=AVERAGE([.B30:.F30])/AVERAGE([.B$8:.F$8])" office:value-type="float" office:value="1.86530536680997" calcext:value-type="float">
            <text:p>1.9</text:p>
          </table:table-cell>
          <table:table-cell table:style-name="ce383" table:formula="of:=[.G30]*[.H$8]" office:value-type="float" office:value="48" calcext:value-type="float">
            <text:p>48</text:p>
          </table:table-cell>
          <table:table-cell table:style-name="ce212" table:formula="of:=STDEVP([.B30:.F30])/AVERAGE([.B30:.F30])" office:value-type="percentage" office:value="0.242956328951888" calcext:value-type="percentage">
            <text:p>24.3%</text:p>
          </table:table-cell>
          <table:table-cell table:style-name="ce212" table:formula="of:=IF([.H30]&gt;[.$A$43]; [.$C$43]; IF([.H30]&gt;[.$A$44]; [.$C$44]; IF([.H30]&gt;[.$A$45];[.$C$45];IF([.H30]&gt;[.$A$46];[.$C$46]; IF([.H30]&gt;[.$A$47];[.$C$47];IF([.H30]&gt;[.$A$48];[.$C$48];[.$C$49]))))))/100" office:value-type="percentage" office:value="0.275" calcext:value-type="percentage">
            <text:p>27.5%</text:p>
          </table:table-cell>
          <table:table-cell table:style-name="ce387" table:formula="of:=(MAX([.B30:.F30])-MIN([.B30:.F30]))/[.H30]*5" office:value-type="percentage" office:value="0.729166666666667" calcext:value-type="percentage">
            <text:p>72.9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16" office:value-type="string" calcext:value-type="string">
            <text:p>count_2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204" table:formula="of:=AVERAGE([.B31:.F31])/AVERAGE([.B$8:.F$8])" office:value-type="float" office:value="1.63214219595872" calcext:value-type="float">
            <text:p>1.6</text:p>
          </table:table-cell>
          <table:table-cell table:style-name="ce383" table:formula="of:=[.G31]*[.H$8]" office:value-type="float" office:value="42" calcext:value-type="float">
            <text:p>42</text:p>
          </table:table-cell>
          <table:table-cell table:style-name="ce212" table:formula="of:=STDEVP([.B31:.F31])/AVERAGE([.B31:.F31])" office:value-type="percentage" office:value="0.277664375945014" calcext:value-type="percentage">
            <text:p>27.8%</text:p>
          </table:table-cell>
          <table:table-cell table:style-name="ce212" table:formula="of:=IF([.H31]&gt;[.$A$43]; [.$C$43]; IF([.H31]&gt;[.$A$44]; [.$C$44]; IF([.H31]&gt;[.$A$45];[.$C$45];IF([.H31]&gt;[.$A$46];[.$C$46]; IF([.H31]&gt;[.$A$47];[.$C$47];IF([.H31]&gt;[.$A$48];[.$C$48];[.$C$49]))))))/100" office:value-type="percentage" office:value="0.275" calcext:value-type="percentage">
            <text:p>27.5%</text:p>
          </table:table-cell>
          <table:table-cell table:style-name="ce387" table:formula="of:=(MAX([.B31:.F31])-MIN([.B31:.F31]))/[.H31]*5" office:value-type="percentage" office:value="0.714285714285714" calcext:value-type="percentage">
            <text:p>71.4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16" office:value-type="string" calcext:value-type="string">
            <text:p>count_2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04" table:formula="of:=AVERAGE([.B32:.F32])/AVERAGE([.B$8:.F$8])" office:value-type="float" office:value="1.24353691120665" calcext:value-type="float">
            <text:p>1.2</text:p>
          </table:table-cell>
          <table:table-cell table:style-name="ce383" table:formula="of:=[.G32]*[.H$8]" office:value-type="float" office:value="32" calcext:value-type="float">
            <text:p>32</text:p>
          </table:table-cell>
          <table:table-cell table:style-name="ce212" table:formula="of:=STDEVP([.B32:.F32])/AVERAGE([.B32:.F32])" office:value-type="percentage" office:value="0.306186217847897" calcext:value-type="percentage">
            <text:p>30.6%</text:p>
          </table:table-cell>
          <table:table-cell table:style-name="ce212" table:formula="of:=IF([.H32]&gt;[.$A$43]; [.$C$43]; IF([.H32]&gt;[.$A$44]; [.$C$44]; IF([.H32]&gt;[.$A$45];[.$C$45];IF([.H32]&gt;[.$A$46];[.$C$46]; IF([.H32]&gt;[.$A$47];[.$C$47];IF([.H32]&gt;[.$A$48];[.$C$48];[.$C$49]))))))/100" office:value-type="percentage" office:value="0.275" calcext:value-type="percentage">
            <text:p>27.5%</text:p>
          </table:table-cell>
          <table:table-cell table:style-name="ce387" table:formula="of:=(MAX([.B32:.F32])-MIN([.B32:.F32]))/[.H32]*5" office:value-type="percentage" office:value="0.78125" calcext:value-type="percentage">
            <text:p>78.1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16" office:value-type="string" calcext:value-type="string">
            <text:p>count_2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04" table:formula="of:=AVERAGE([.B33:.F33])/AVERAGE([.B$8:.F$8])" office:value-type="float" office:value="1.20467638273144" calcext:value-type="float">
            <text:p>1.2</text:p>
          </table:table-cell>
          <table:table-cell table:style-name="ce383" table:formula="of:=[.G33]*[.H$8]" office:value-type="float" office:value="31" calcext:value-type="float">
            <text:p>31</text:p>
          </table:table-cell>
          <table:table-cell table:style-name="ce212" table:formula="of:=STDEVP([.B33:.F33])/AVERAGE([.B33:.F33])" office:value-type="percentage" office:value="0.31275353918815" calcext:value-type="percentage">
            <text:p>31.3%</text:p>
          </table:table-cell>
          <table:table-cell table:style-name="ce212" table:formula="of:=IF([.H33]&gt;[.$A$43]; [.$C$43]; IF([.H33]&gt;[.$A$44]; [.$C$44]; IF([.H33]&gt;[.$A$45];[.$C$45];IF([.H33]&gt;[.$A$46];[.$C$46]; IF([.H33]&gt;[.$A$47];[.$C$47];IF([.H33]&gt;[.$A$48];[.$C$48];[.$C$49]))))))/100" office:value-type="percentage" office:value="0.275" calcext:value-type="percentage">
            <text:p>27.5%</text:p>
          </table:table-cell>
          <table:table-cell table:style-name="ce387" table:formula="of:=(MAX([.B33:.F33])-MIN([.B33:.F33]))/[.H33]*5" office:value-type="percentage" office:value="0.806451612903226" calcext:value-type="percentage">
            <text:p>80.6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16" office:value-type="string" calcext:value-type="string">
            <text:p>count_2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04" table:formula="of:=AVERAGE([.B34:.F34])/AVERAGE([.B$8:.F$8])" office:value-type="float" office:value="1.12695532578102" calcext:value-type="float">
            <text:p>1.1</text:p>
          </table:table-cell>
          <table:table-cell table:style-name="ce383" table:formula="of:=[.G34]*[.H$8]" office:value-type="float" office:value="29" calcext:value-type="float">
            <text:p>29</text:p>
          </table:table-cell>
          <table:table-cell table:style-name="ce212" table:formula="of:=STDEVP([.B34:.F34])/AVERAGE([.B34:.F34])" office:value-type="percentage" office:value="0.368175112139011" calcext:value-type="percentage">
            <text:p>36.8%</text:p>
          </table:table-cell>
          <table:table-cell table:style-name="ce212" table:formula="of:=IF([.H34]&gt;[.$A$43]; [.$C$43]; IF([.H34]&gt;[.$A$44]; [.$C$44]; IF([.H34]&gt;[.$A$45];[.$C$45];IF([.H34]&gt;[.$A$46];[.$C$46]; IF([.H34]&gt;[.$A$47];[.$C$47];IF([.H34]&gt;[.$A$48];[.$C$48];[.$C$49]))))))/100" office:value-type="percentage" office:value="0.275" calcext:value-type="percentage">
            <text:p>27.5%</text:p>
          </table:table-cell>
          <table:table-cell table:style-name="ce387" table:formula="of:=(MAX([.B34:.F34])-MIN([.B34:.F34]))/[.H34]*5" office:value-type="percentage" office:value="1.03448275862069" calcext:value-type="percentage">
            <text:p>103.4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16" office:value-type="string" calcext:value-type="string">
            <text:p>count_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04" table:formula="of:=AVERAGE([.B35:.F35])/AVERAGE([.B$8:.F$8])" office:value-type="float" office:value="0.932652683404984" calcext:value-type="float">
            <text:p>0.9</text:p>
          </table:table-cell>
          <table:table-cell table:style-name="ce383" table:formula="of:=[.G35]*[.H$8]" office:value-type="float" office:value="24" calcext:value-type="float">
            <text:p>24</text:p>
          </table:table-cell>
          <table:table-cell table:style-name="ce212" table:formula="of:=STDEVP([.B35:.F35])/AVERAGE([.B35:.F35])" office:value-type="percentage" office:value="0.276385399196283" calcext:value-type="percentage">
            <text:p>27.6%</text:p>
          </table:table-cell>
          <table:table-cell table:style-name="ce212" table:formula="of:=IF([.H35]&gt;[.$A$43]; [.$C$43]; IF([.H35]&gt;[.$A$44]; [.$C$44]; IF([.H35]&gt;[.$A$45];[.$C$45];IF([.H35]&gt;[.$A$46];[.$C$46]; IF([.H35]&gt;[.$A$47];[.$C$47];IF([.H35]&gt;[.$A$48];[.$C$48];[.$C$49]))))))/100" office:value-type="percentage" office:value="0.275" calcext:value-type="percentage">
            <text:p>27.5%</text:p>
          </table:table-cell>
          <table:table-cell table:style-name="ce387" table:formula="of:=(MAX([.B35:.F35])-MIN([.B35:.F35]))/[.H35]*5" office:value-type="percentage" office:value="0.833333333333333" calcext:value-type="percentage">
            <text:p>83.3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16" office:value-type="string" calcext:value-type="string">
            <text:p>count_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04" table:formula="of:=AVERAGE([.B36:.F36])/AVERAGE([.B$8:.F$8])" office:value-type="float" office:value="0.466326341702492" calcext:value-type="float">
            <text:p>0.5</text:p>
          </table:table-cell>
          <table:table-cell table:style-name="ce383" table:formula="of:=[.G36]*[.H$8]" office:value-type="float" office:value="12" calcext:value-type="float">
            <text:p>12</text:p>
          </table:table-cell>
          <table:table-cell table:style-name="ce212" table:formula="of:=STDEVP([.B36:.F36])/AVERAGE([.B36:.F36])" office:value-type="percentage" office:value="0.565194165260439" calcext:value-type="percentage">
            <text:p>56.5%</text:p>
          </table:table-cell>
          <table:table-cell table:style-name="ce212" table:formula="of:=IF([.H36]&gt;[.$A$43]; [.$C$43]; IF([.H36]&gt;[.$A$44]; [.$C$44]; IF([.H36]&gt;[.$A$45];[.$C$45];IF([.H36]&gt;[.$A$46];[.$C$46]; IF([.H36]&gt;[.$A$47];[.$C$47];IF([.H36]&gt;[.$A$48];[.$C$48];[.$C$49]))))))/100" office:value-type="percentage" office:value="0.275" calcext:value-type="percentage">
            <text:p>27.5%</text:p>
          </table:table-cell>
          <table:table-cell table:style-name="ce387" table:formula="of:=(MAX([.B36:.F36])-MIN([.B36:.F36]))/[.H36]*5" office:value-type="percentage" office:value="1.66666666666667" calcext:value-type="percentage">
            <text:p>166.7%</text:p>
          </table:table-cell>
          <table:table-cell/>
          <table:table-cell table:style-name="ce20"/>
          <table:table-cell table:number-columns-repeated="36"/>
        </table:table-row>
        <table:table-row table:style-name="ro16">
          <table:table-cell table:style-name="ce16" office:value-type="string" calcext:value-type="string">
            <text:p>count_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4" table:formula="of:=AVERAGE([.B37:.F37])/AVERAGE([.B$8:.F$8])" office:value-type="float" office:value="0.116581585425623" calcext:value-type="float">
            <text:p>0.1</text:p>
          </table:table-cell>
          <table:table-cell table:style-name="ce383" table:formula="of:=[.G37]*[.H$8]" office:value-type="float" office:value="3" calcext:value-type="float">
            <text:p>3</text:p>
          </table:table-cell>
          <table:table-cell table:style-name="ce212" table:formula="of:=STDEVP([.B37:.F37])/AVERAGE([.B37:.F37])" office:value-type="percentage" office:value="0.816496580927726" calcext:value-type="percentage">
            <text:p>81.6%</text:p>
          </table:table-cell>
          <table:table-cell table:style-name="ce212" table:formula="of:=IF([.H37]&gt;[.$A$43]; [.$C$43]; IF([.H37]&gt;[.$A$44]; [.$C$44]; IF([.H37]&gt;[.$A$45];[.$C$45];IF([.H37]&gt;[.$A$46];[.$C$46]; IF([.H37]&gt;[.$A$47];[.$C$47];IF([.H37]&gt;[.$A$48];[.$C$48];[.$C$49]))))))/100" office:value-type="percentage" office:value="0.275" calcext:value-type="percentage">
            <text:p>27.5%</text:p>
          </table:table-cell>
          <table:table-cell table:style-name="ce387" table:formula="of:=(MAX([.B37:.F37])-MIN([.B37:.F37]))/[.H37]*5" office:value-type="percentage" office:value="1.66666666666667" calcext:value-type="percentage">
            <text:p>166.7%</text:p>
          </table:table-cell>
          <table:table-cell table:number-columns-repeated="38"/>
        </table:table-row>
        <table:table-row table:style-name="ro16">
          <table:table-cell table:style-name="ce16" office:value-type="string" calcext:value-type="string">
            <text:p>count_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4" table:formula="of:=AVERAGE([.B38:.F38])/AVERAGE([.B$8:.F$8])" office:value-type="float" office:value="0.116581585425623" calcext:value-type="float">
            <text:p>0.1</text:p>
          </table:table-cell>
          <table:table-cell table:style-name="ce383" table:formula="of:=[.G38]*[.H$8]" office:value-type="float" office:value="3" calcext:value-type="float">
            <text:p>3</text:p>
          </table:table-cell>
          <table:table-cell table:style-name="ce212" table:formula="of:=STDEVP([.B38:.F38])/AVERAGE([.B38:.F38])" office:value-type="percentage" office:value="0.816496580927726" calcext:value-type="percentage">
            <text:p>81.6%</text:p>
          </table:table-cell>
          <table:table-cell table:style-name="ce212" table:formula="of:=IF([.H38]&gt;[.$A$43]; [.$C$43]; IF([.H38]&gt;[.$A$44]; [.$C$44]; IF([.H38]&gt;[.$A$45];[.$C$45];IF([.H38]&gt;[.$A$46];[.$C$46]; IF([.H38]&gt;[.$A$47];[.$C$47];IF([.H38]&gt;[.$A$48];[.$C$48];[.$C$49]))))))/100" office:value-type="percentage" office:value="0.275" calcext:value-type="percentage">
            <text:p>27.5%</text:p>
          </table:table-cell>
          <table:table-cell table:style-name="ce387" table:formula="of:=(MAX([.B38:.F38])-MIN([.B38:.F38]))/[.H38]*5" office:value-type="percentage" office:value="1.66666666666667" calcext:value-type="percentage">
            <text:p>166.7%</text:p>
          </table:table-cell>
          <table:table-cell table:number-columns-repeated="38"/>
        </table:table-row>
        <table:table-row table:style-name="ro16">
          <table:table-cell table:number-columns-repeated="7"/>
          <table:table-cell table:style-name="ce385"/>
          <table:table-cell table:number-columns-repeated="41"/>
        </table:table-row>
        <table:table-row table:style-name="ro16">
          <table:table-cell office:value-type="string" calcext:value-type="string">
            <text:p>Table C.2</text:p>
          </table:table-cell>
          <table:table-cell table:number-columns-repeated="6"/>
          <table:table-cell table:style-name="ce385"/>
          <table:table-cell table:number-columns-repeated="41"/>
        </table:table-row>
        <table:table-row table:style-name="ro16">
          <table:table-cell table:style-name="ce115"/>
          <table:table-cell table:style-name="ce199" office:value-type="string" calcext:value-type="string">
            <text:p>Mean counted X</text:p>
          </table:table-cell>
          <table:table-cell table:style-name="ce115"/>
          <table:table-cell table:style-name="ce201" office:value-type="string" calcext:value-type="string">
            <text:p>C<text:span text:style-name="T6">V_MAX</text:span></text:p>
          </table:table-cell>
          <table:table-cell table:style-name="ce117" table:number-columns-repeated="3"/>
          <table:table-cell table:style-name="ce118"/>
          <table:table-cell table:number-columns-repeated="41"/>
        </table:table-row>
        <table:table-row table:style-name="ro16">
          <table:table-cell table:style-name="ce193" office:value-type="string" calcext:value-type="string">
            <text:p>X &gt;=</text:p>
          </table:table-cell>
          <table:table-cell table:style-name="ce200" office:value-type="string" calcext:value-type="string">
            <text:p>X &lt;</text:p>
          </table:table-cell>
          <table:table-cell table:style-name="ce193" office:value-type="string" calcext:value-type="string">
            <text:p>D<text:span text:style-name="T6">QMAX / SAMPLE</text:span></text:p>
          </table:table-cell>
          <table:table-cell table:style-name="ce193" office:value-type="string" calcext:value-type="string">
            <text:p>N=3</text:p>
          </table:table-cell>
          <table:table-cell table:style-name="ce200" office:value-type="string" calcext:value-type="string">
            <text:p>N=6</text:p>
          </table:table-cell>
          <table:table-cell table:style-name="ce200" office:value-type="string" calcext:value-type="string">
            <text:p>N=10</text:p>
          </table:table-cell>
          <table:table-cell table:style-name="ce200" office:value-type="string" calcext:value-type="string">
            <text:p>N=20</text:p>
          </table:table-cell>
          <table:table-cell table:style-name="ce210" office:value-type="string" calcext:value-type="string">
            <text:p>N=40</text:p>
          </table:table-cell>
          <table:table-cell table:number-columns-repeated="41"/>
        </table:table-row>
        <table:table-row table:style-name="ro16">
          <table:table-cell table:style-name="ce164" office:value-type="float" office:value="10000" calcext:value-type="float">
            <text:p>10000</text:p>
          </table:table-cell>
          <table:table-cell/>
          <table:table-cell table:style-name="ce164" office:value-type="float" office:value="11" calcext:value-type="float">
            <text:p>11</text:p>
          </table:table-cell>
          <table:table-cell table:style-name="ce164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173" office:value-type="float" office:value="1.8" calcext:value-type="float">
            <text:p>1.8</text:p>
          </table:table-cell>
          <table:table-cell table:number-columns-repeated="41"/>
        </table:table-row>
        <table:table-row table:style-name="ro16">
          <table:table-cell table:style-name="ce164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164" office:value-type="float" office:value="11.3" calcext:value-type="float">
            <text:p>11.3</text:p>
          </table:table-cell>
          <table:table-cell table:style-name="ce164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173" office:value-type="float" office:value="1.9" calcext:value-type="float">
            <text:p>1.9</text:p>
          </table:table-cell>
          <table:table-cell table:number-columns-repeated="41"/>
        </table:table-row>
        <table:table-row table:style-name="ro16">
          <table:table-cell table:style-name="ce164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164" office:value-type="float" office:value="11.9" calcext:value-type="float">
            <text:p>11.9</text:p>
          </table:table-cell>
          <table:table-cell table:style-name="ce164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173" office:value-type="float" office:value="2.1" calcext:value-type="float">
            <text:p>2.1</text:p>
          </table:table-cell>
          <table:table-cell table:number-columns-repeated="41"/>
        </table:table-row>
        <table:table-row table:style-name="ro16">
          <table:table-cell table:style-name="ce164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164" office:value-type="float" office:value="13.4" calcext:value-type="float">
            <text:p>13.4</text:p>
          </table:table-cell>
          <table:table-cell table:style-name="ce164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173" office:value-type="float" office:value="2.4" calcext:value-type="float">
            <text:p>2.4</text:p>
          </table:table-cell>
          <table:table-cell table:number-columns-repeated="41"/>
        </table:table-row>
        <table:table-row table:style-name="ro16">
          <table:table-cell table:style-name="ce164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164" office:value-type="float" office:value="15.6" calcext:value-type="float">
            <text:p>15.6</text:p>
          </table:table-cell>
          <table:table-cell table:style-name="ce164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173" office:value-type="float" office:value="2.9" calcext:value-type="float">
            <text:p>2.9</text:p>
          </table:table-cell>
          <table:table-cell table:number-columns-repeated="41"/>
        </table:table-row>
        <table:table-row table:style-name="ro16">
          <table:table-cell table:style-name="ce164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164" office:value-type="float" office:value="19.3" calcext:value-type="float">
            <text:p>19.3</text:p>
          </table:table-cell>
          <table:table-cell table:style-name="ce164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173" office:value-type="float" office:value="4.1" calcext:value-type="float">
            <text:p>4.1</text:p>
          </table:table-cell>
          <table:table-cell table:number-columns-repeated="41"/>
        </table:table-row>
        <table:table-row table:style-name="ro16">
          <table:table-cell table:style-name="ce165" office:value-type="float" office:value="100" calcext:value-type="float">
            <text:p>100</text:p>
          </table:table-cell>
          <table:table-cell table:style-name="ce91" office:value-type="float" office:value="200" calcext:value-type="float">
            <text:p>200</text:p>
          </table:table-cell>
          <table:table-cell table:style-name="ce165" office:value-type="float" office:value="27.5" calcext:value-type="float">
            <text:p>27.5</text:p>
          </table:table-cell>
          <table:table-cell table:style-name="ce165" office:value-type="float" office:value="10" calcext:value-type="float">
            <text:p>10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7" calcext:value-type="float">
            <text:p>7</text:p>
          </table:table-cell>
          <table:table-cell table:style-name="ce91" office:value-type="float" office:value="6.1" calcext:value-type="float">
            <text:p>6.1</text:p>
          </table:table-cell>
          <table:table-cell table:style-name="ce211" office:value-type="float" office:value="5.5" calcext:value-type="float">
            <text:p>5.5</text:p>
          </table:table-cell>
          <table:table-cell table:number-columns-repeated="41"/>
        </table:table-row>
        <table:table-row table:style-name="ro16">
          <table:table-cell table:number-columns-repeated="49"/>
        </table:table-row>
        <table:table-row table:style-name="ro16">
          <table:table-cell office:value-type="float" office:value="4.923135" calcext:value-type="float">
            <text:p>4.923135</text:p>
          </table:table-cell>
          <table:table-cell office:value-type="float" office:value="29157" calcext:value-type="float">
            <text:p>29157</text:p>
          </table:table-cell>
          <table:table-cell office:value-type="float" office:value="17360" calcext:value-type="float">
            <text:p>17360</text:p>
          </table:table-cell>
          <table:table-cell office:value-type="float" office:value="9287" calcext:value-type="float">
            <text:p>9287</text:p>
          </table:table-cell>
          <table:table-cell office:value-type="float" office:value="4587" calcext:value-type="float">
            <text:p>4587</text:p>
          </table:table-cell>
          <table:table-cell office:value-type="float" office:value="2348" calcext:value-type="float">
            <text:p>2348</text:p>
          </table:table-cell>
          <table:table-cell office:value-type="float" office:value="1088" calcext:value-type="float">
            <text:p>1088</text:p>
          </table:table-cell>
          <table:table-cell office:value-type="float" office:value="532" calcext:value-type="float">
            <text:p>532</text:p>
          </table:table-cell>
          <table:table-cell office:value-type="float" office:value="270" calcext:value-type="float">
            <text:p>270</text:p>
          </table:table-cell>
          <table:table-cell office:value-type="float" office:value="164" calcext:value-type="float">
            <text:p>164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6">
          <table:table-cell office:value-type="float" office:value="5.228722" calcext:value-type="float">
            <text:p>5.228722</text:p>
          </table:table-cell>
          <table:table-cell office:value-type="float" office:value="30687" calcext:value-type="float">
            <text:p>30687</text:p>
          </table:table-cell>
          <table:table-cell office:value-type="float" office:value="18503" calcext:value-type="float">
            <text:p>18503</text:p>
          </table:table-cell>
          <table:table-cell office:value-type="float" office:value="9843" calcext:value-type="float">
            <text:p>9843</text:p>
          </table:table-cell>
          <table:table-cell office:value-type="float" office:value="4921" calcext:value-type="float">
            <text:p>4921</text:p>
          </table:table-cell>
          <table:table-cell office:value-type="float" office:value="2546" calcext:value-type="float">
            <text:p>2546</text:p>
          </table:table-cell>
          <table:table-cell office:value-type="float" office:value="1198" calcext:value-type="float">
            <text:p>1198</text:p>
          </table:table-cell>
          <table:table-cell office:value-type="float" office:value="560" calcext:value-type="float">
            <text:p>560</text:p>
          </table:table-cell>
          <table:table-cell office:value-type="float" office:value="276" calcext:value-type="float">
            <text:p>276</text:p>
          </table:table-cell>
          <table:table-cell office:value-type="float" office:value="149" calcext:value-type="float">
            <text:p>149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6">
          <table:table-cell office:value-type="float" office:value="5.174204" calcext:value-type="float">
            <text:p>5.174204</text:p>
          </table:table-cell>
          <table:table-cell office:value-type="float" office:value="30764" calcext:value-type="float">
            <text:p>30764</text:p>
          </table:table-cell>
          <table:table-cell office:value-type="float" office:value="18397" calcext:value-type="float">
            <text:p>18397</text:p>
          </table:table-cell>
          <table:table-cell office:value-type="float" office:value="9784" calcext:value-type="float">
            <text:p>9784</text:p>
          </table:table-cell>
          <table:table-cell office:value-type="float" office:value="4957" calcext:value-type="float">
            <text:p>4957</text:p>
          </table:table-cell>
          <table:table-cell office:value-type="float" office:value="2570" calcext:value-type="float">
            <text:p>2570</text:p>
          </table:table-cell>
          <table:table-cell office:value-type="float" office:value="1203" calcext:value-type="float">
            <text:p>1203</text:p>
          </table:table-cell>
          <table:table-cell office:value-type="float" office:value="561" calcext:value-type="float">
            <text:p>561</text:p>
          </table:table-cell>
          <table:table-cell office:value-type="float" office:value="286" calcext:value-type="float">
            <text:p>286</text:p>
          </table:table-cell>
          <table:table-cell office:value-type="float" office:value="163" calcext:value-type="float">
            <text:p>163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6">
          <table:table-cell office:value-type="float" office:value="5.179934" calcext:value-type="float">
            <text:p>5.179934</text:p>
          </table:table-cell>
          <table:table-cell office:value-type="float" office:value="30363" calcext:value-type="float">
            <text:p>30363</text:p>
          </table:table-cell>
          <table:table-cell office:value-type="float" office:value="18440" calcext:value-type="float">
            <text:p>18440</text:p>
          </table:table-cell>
          <table:table-cell office:value-type="float" office:value="9952" calcext:value-type="float">
            <text:p>9952</text:p>
          </table:table-cell>
          <table:table-cell office:value-type="float" office:value="5035" calcext:value-type="float">
            <text:p>5035</text:p>
          </table:table-cell>
          <table:table-cell office:value-type="float" office:value="2656" calcext:value-type="float">
            <text:p>2656</text:p>
          </table:table-cell>
          <table:table-cell office:value-type="float" office:value="1267" calcext:value-type="float">
            <text:p>1267</text:p>
          </table:table-cell>
          <table:table-cell office:value-type="float" office:value="572" calcext:value-type="float">
            <text:p>572</text:p>
          </table:table-cell>
          <table:table-cell office:value-type="float" office:value="277" calcext:value-type="float">
            <text:p>277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6">
          <table:table-cell office:value-type="float" office:value="5.227057" calcext:value-type="float">
            <text:p>5.227057</text:p>
          </table:table-cell>
          <table:table-cell office:value-type="float" office:value="30954" calcext:value-type="float">
            <text:p>30954</text:p>
          </table:table-cell>
          <table:table-cell office:value-type="float" office:value="18549" calcext:value-type="float">
            <text:p>18549</text:p>
          </table:table-cell>
          <table:table-cell office:value-type="float" office:value="9906" calcext:value-type="float">
            <text:p>9906</text:p>
          </table:table-cell>
          <table:table-cell office:value-type="float" office:value="4939" calcext:value-type="float">
            <text:p>4939</text:p>
          </table:table-cell>
          <table:table-cell office:value-type="float" office:value="2616" calcext:value-type="float">
            <text:p>2616</text:p>
          </table:table-cell>
          <table:table-cell office:value-type="float" office:value="1255" calcext:value-type="float">
            <text:p>1255</text:p>
          </table:table-cell>
          <table:table-cell office:value-type="float" office:value="588" calcext:value-type="float">
            <text:p>588</text:p>
          </table:table-cell>
          <table:table-cell office:value-type="float" office:value="317" calcext:value-type="float">
            <text:p>317</text:p>
          </table:table-cell>
          <table:table-cell office:value-type="float" office:value="180" calcext:value-type="float">
            <text:p>180</text:p>
          </table:table-cell>
          <table:table-cell office:value-type="float" office:value="116" calcext:value-type="float">
            <text:p>116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6" table:number-rows-repeated="15">
          <table:table-cell table:number-columns-repeated="49"/>
        </table:table-row>
        <table:table-row table:style-name="ro16">
          <table:table-cell table:number-columns-repeated="7"/>
          <table:table-cell table:style-name="ce20"/>
          <table:table-cell/>
          <table:table-cell table:style-name="ce20"/>
          <table:table-cell table:number-columns-repeated="39"/>
        </table:table-row>
        <table:table-row table:style-name="ro16">
          <table:table-cell table:number-columns-repeated="6"/>
          <table:table-cell table:style-name="ce20" table:number-columns-repeated="4"/>
          <table:table-cell table:number-columns-repeated="39"/>
        </table:table-row>
        <table:table-row table:style-name="ro16">
          <table:table-cell table:style-name="ce89"/>
          <table:table-cell table:number-columns-repeated="48"/>
        </table:table-row>
        <table:table-row table:style-name="ro16" table:number-rows-repeated="3">
          <table:table-cell table:number-columns-repeated="49"/>
        </table:table-row>
        <table:table-row table:style-name="ro16">
          <table:table-cell table:number-columns-repeated="7"/>
          <table:table-cell table:style-name="ce21"/>
          <table:table-cell/>
          <table:table-cell table:style-name="ce21"/>
          <table:table-cell table:number-columns-repeated="39"/>
        </table:table-row>
        <table:table-row table:style-name="ro16">
          <table:table-cell table:style-name="ce89"/>
          <table:table-cell table:number-columns-repeated="6"/>
          <table:table-cell table:style-name="ce123"/>
          <table:table-cell/>
          <table:table-cell table:style-name="ce123"/>
          <table:table-cell table:number-columns-repeated="39"/>
        </table:table-row>
        <table:table-row table:style-name="ro16">
          <table:table-cell table:number-columns-repeated="10"/>
          <table:table-cell table:style-name="ce31"/>
          <table:table-cell table:number-columns-repeated="38"/>
        </table:table-row>
        <table:table-row table:style-name="ro16" table:number-rows-repeated="1048496">
          <table:table-cell table:number-columns-repeated="49"/>
        </table:table-row>
        <table:table-row table:style-name="ro16">
          <table:table-cell table:number-columns-repeated="49"/>
        </table:table-row>
        <calcext:conditional-formats>
          <calcext:conditional-format calcext:target-range-address="'ANNEX E - B3'.H9:'ANNEX E - B3'.H40">
            <calcext:condition calcext:apply-style-name="Good" calcext:value="&gt;1000" calcext:base-cell-address="'ANNEX E - B3'.H9"/>
          </calcext:conditional-format>
          <calcext:conditional-format calcext:target-range-address="'ANNEX E - B3'.K9:'ANNEX E - B3'.K38">
            <calcext:condition calcext:apply-style-name="Good" calcext:value="&lt;[.J11]" calcext:base-cell-address="'ANNEX E - B3'.K9"/>
          </calcext:conditional-format>
        </calcext:conditional-formats>
      </table:table>
      <table:table table:name="Annex E Verify Counting Accuracy" table:style-name="ta1">
        <table:table-column table:style-name="co18" table:default-cell-style-name="Default"/>
        <table:table-column table:style-name="co19" table:default-cell-style-name="Default"/>
        <table:table-column table:style-name="co4" table:number-columns-repeated="1022" table:default-cell-style-name="Default"/>
        <table:table-row table:style-name="ro23">
          <table:table-cell table:style-name="ce85" office:value-type="string" calcext:value-type="string">
            <text:p>Counts per Table A.1</text:p>
            <text:p>Cv &lt; Table C.2</text:p>
            <text:p>6 sizes 5-15um</text:p>
          </table:table-cell>
          <table:table-cell table:style-name="ce88" office:value-type="string" calcext:value-type="string">
            <text:p>RM8632x</text:p>
            <text:p>1mg/l</text:p>
          </table:table-cell>
          <table:table-cell table:style-name="ce85" office:value-type="string" calcext:value-type="string" table:number-columns-spanned="7" table:number-rows-spanned="1">
            <text:p>Annex E – particle counting accuracy. Ensure RM8632x counts in permitted range.</text:p>
          </table:table-cell>
          <table:covered-table-cell table:number-columns-repeated="6" table:style-name="ce88"/>
          <table:table-cell table:number-columns-repeated="4"/>
          <table:table-cell table:style-name="ce88" table:number-columns-repeated="1011"/>
        </table:table-row>
        <table:table-row table:style-name="ro16">
          <table:table-cell table:number-columns-repeated="1024"/>
        </table:table-row>
        <table:table-row table:style-name="ro16">
          <table:table-cell table:style-name="ce89" office:value-type="string" calcext:value-type="string">
            <text:p>Bottle Sampler</text:p>
          </table:table-cell>
          <table:table-cell table:number-columns-repeated="2"/>
          <table:table-cell table:style-name="ce16" office:value-type="string" calcext:value-type="string">
            <text:p>BS110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APC Model</text:p>
          </table:table-cell>
          <table:table-cell table:number-columns-repeated="2"/>
          <table:table-cell table:style-name="ce16" office:value-type="string" calcext:value-type="string">
            <text:p>NAVAIR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APC S/N</text:p>
          </table:table-cell>
          <table:table-cell table:number-columns-repeated="2"/>
          <table:table-cell table:style-name="ce16" office:value-type="string" calcext:value-type="string">
            <text:p>11171-00009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Sensor Model</text:p>
          </table:table-cell>
          <table:table-cell table:number-columns-repeated="2"/>
          <table:table-cell table:style-name="ce16" office:value-type="string" calcext:value-type="string">
            <text:p>NAVAIR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Sensor S/N</text:p>
          </table:table-cell>
          <table:table-cell table:number-columns-repeated="2"/>
          <table:table-cell table:style-name="ce16"/>
          <table:table-cell table:number-columns-repeated="1020"/>
        </table:table-row>
        <table:table-row table:style-name="ro16">
          <table:table-cell office:value-type="string" calcext:value-type="string">
            <text:p>Date</text:p>
          </table:table-cell>
          <table:table-cell table:number-columns-repeated="2"/>
          <table:table-cell table:style-name="ce402" office:value-type="date" office:date-value="2025-05-20" calcext:value-type="date">
            <text:p>2025-05-20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Operator</text:p>
          </table:table-cell>
          <table:table-cell table:number-columns-repeated="2"/>
          <table:table-cell table:style-name="ce30" office:value-type="string" calcext:value-type="string">
            <text:p>JMD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Threshold Noise</text:p>
          </table:table-cell>
          <table:table-cell table:number-columns-repeated="2"/>
          <table:table-cell table:style-name="ce31" office:value-type="float" office:value="36" calcext:value-type="float">
            <text:p>36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RM8632a mg/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6">
          <table:table-cell table:number-columns-repeated="1024"/>
        </table:table-row>
        <table:table-row table:style-name="ro16">
          <table:table-cell office:value-type="string" calcext:value-type="string">
            <text:p>Sample Volume Tot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16">
          <table:table-cell office:value-type="string" calcext:value-type="string">
            <text:p>Portions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Portion Volume V</text:p>
          </table:table-cell>
          <table:table-cell table:formula="of:=[.B13]/[.B14]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16">
          <table:table-cell office:value-type="string" calcext:value-type="string">
            <text:p>Capture Fraction</text:p>
          </table:table-cell>
          <table:table-cell office:value-type="float" office:value="0.7" calcext:value-type="float">
            <text:p>0.7</text:p>
          </table:table-cell>
          <table:table-cell table:number-columns-repeated="1022"/>
        </table:table-row>
        <table:table-row table:style-name="ro16">
          <table:table-cell table:number-columns-repeated="3"/>
          <table:table-cell table:style-name="ce16"/>
          <table:table-cell table:number-columns-repeated="1020"/>
        </table:table-row>
        <table:table-row table:style-name="ro16">
          <table:table-cell office:value-type="string" calcext:value-type="string">
            <text:p>/100ml scanned</text:p>
          </table:table-cell>
          <table:table-cell table:formula="of:=[.$B$16]*[.$B$15]/100" office:value-type="float" office:value="0.07" calcext:value-type="float">
            <text:p>0.07</text:p>
          </table:table-cell>
          <table:table-cell table:number-columns-repeated="1022"/>
        </table:table-row>
        <table:table-row table:style-name="ro16">
          <table:table-cell table:style-name="ce114" office:value-type="string" calcext:value-type="string">
            <text:p>Total scanned</text:p>
          </table:table-cell>
          <table:table-cell table:formula="of:=[.B16]*[.$B$13]" office:value-type="float" office:value="35" calcext:value-type="float">
            <text:p>35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16">
          <table:table-cell office:value-type="string" calcext:value-type="string">
            <text:p>Portion scanned</text:p>
          </table:table-cell>
          <table:table-cell table:formula="of:=[.B15]*[.B16]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16">
          <table:table-cell table:number-columns-repeated="1024"/>
        </table:table-row>
        <table:table-row table:style-name="ro2">
          <table:table-cell table:style-name="ce122" office:value-type="string" calcext:value-type="string">
            <text:p>μm(c)</text:p>
          </table:table-cell>
          <table:table-cell table:style-name="ce122" office:value-type="string" calcext:value-type="string">
            <text:p>B1 / ml</text:p>
          </table:table-cell>
          <table:table-cell table:style-name="ce122" office:value-type="string" calcext:value-type="string">
            <text:p>B2 / ml</text:p>
          </table:table-cell>
          <table:table-cell table:style-name="ce122" office:value-type="string" calcext:value-type="string">
            <text:p>B3 / ml</text:p>
          </table:table-cell>
          <table:table-cell table:style-name="ce122" office:value-type="string" calcext:value-type="string">
            <text:p>AVERAGE</text:p>
          </table:table-cell>
          <table:table-cell table:style-name="ce122" office:value-type="string" calcext:value-type="string">
            <text:p>Table A.1</text:p>
          </table:table-cell>
          <table:table-cell table:style-name="ce122" office:value-type="string" calcext:value-type="string">
            <text:p>A.1 Lower</text:p>
          </table:table-cell>
          <table:table-cell table:style-name="ce122" office:value-type="string" calcext:value-type="string">
            <text:p>A.1 Upper</text:p>
          </table:table-cell>
          <table:table-cell table:style-name="ce122" office:value-type="string" calcext:value-type="string">
            <text:p>Deviation</text:p>
          </table:table-cell>
          <table:table-cell table:number-columns-repeated="1015"/>
        </table:table-row>
        <table:table-row table:style-name="ro2">
          <table:table-cell table:style-name="ce390" office:value-type="float" office:value="4" calcext:value-type="float">
            <text:p>4</text:p>
          </table:table-cell>
          <table:table-cell table:style-name="ce397" table:formula="of:=[$'ANNEX E - B1'.$G9]" office:value-type="float" office:value="5982.06185069115" calcext:value-type="float">
            <text:p>5982</text:p>
          </table:table-cell>
          <table:table-cell table:style-name="ce397" table:formula="of:=[$'ANNEX E - B2'.$G9]" office:value-type="float" office:value="5938.48112903895" calcext:value-type="float">
            <text:p>5938</text:p>
          </table:table-cell>
          <table:table-cell table:style-name="ce397" table:formula="of:=[$'ANNEX E - B3'.$G9]" office:value-type="float" office:value="5903.88578859593" calcext:value-type="float">
            <text:p>5904</text:p>
          </table:table-cell>
          <table:table-cell table:style-name="ce404" table:formula="of:=AVERAGE([.B23:.D23])" office:value-type="float" office:value="5941.47625610868" calcext:value-type="float">
            <text:p>5941</text:p>
          </table:table-cell>
          <table:table-cell table:style-name="ce252" office:value-type="float" office:value="6300" calcext:value-type="float">
            <text:p>6300</text:p>
          </table:table-cell>
          <table:table-cell office:value-type="float" office:value="4553" calcext:value-type="float">
            <text:p>4553</text:p>
          </table:table-cell>
          <table:table-cell office:value-type="float" office:value="8713" calcext:value-type="float">
            <text:p>8713</text:p>
          </table:table-cell>
          <table:table-cell table:style-name="ce212" table:formula="of:=([.E23]-[.F23])/[.F23]" office:value-type="percentage" office:value="-0.0569085307764007" calcext:value-type="percentage">
            <text:p>-5.7%</text:p>
          </table:table-cell>
          <table:table-cell table:number-columns-repeated="1015"/>
        </table:table-row>
        <table:table-row table:style-name="ro2">
          <table:table-cell table:style-name="ce391" office:value-type="float" office:value="5" calcext:value-type="float">
            <text:p>5</text:p>
          </table:table-cell>
          <table:table-cell table:style-name="ce397" table:formula="of:=[$'ANNEX E - B1'.$G10]" office:value-type="float" office:value="3600.39376807763" calcext:value-type="float">
            <text:p>3600</text:p>
          </table:table-cell>
          <table:table-cell table:style-name="ce397" table:formula="of:=[$'ANNEX E - B2'.$G10]" office:value-type="float" office:value="3557.84946303926" calcext:value-type="float">
            <text:p>3558</text:p>
          </table:table-cell>
          <table:table-cell table:style-name="ce397" table:formula="of:=[$'ANNEX E - B3'.$G10]" office:value-type="float" office:value="3545.98436283423" calcext:value-type="float">
            <text:p>3546</text:p>
          </table:table-cell>
          <table:table-cell table:style-name="ce404" table:formula="of:=AVERAGE([.B24:.D24])" office:value-type="float" office:value="3568.07586465037" calcext:value-type="float">
            <text:p>3568</text:p>
          </table:table-cell>
          <table:table-cell table:style-name="ce406" office:value-type="float" office:value="3475" calcext:value-type="float">
            <text:p>3475</text:p>
          </table:table-cell>
          <table:table-cell office:value-type="float" office:value="2330" calcext:value-type="float">
            <text:p>2330</text:p>
          </table:table-cell>
          <table:table-cell office:value-type="float" office:value="5183" calcext:value-type="float">
            <text:p>5183</text:p>
          </table:table-cell>
          <table:table-cell table:style-name="ce212" table:formula="of:=([.E24]-[.F24])/[.F24]" office:value-type="percentage" office:value="0.0267844214821211" calcext:value-type="percentage">
            <text:p>2.7%</text:p>
          </table:table-cell>
          <table:table-cell table:number-columns-repeated="1015"/>
        </table:table-row>
        <table:table-row table:style-name="ro2">
          <table:table-cell table:style-name="ce392" office:value-type="float" office:value="6" calcext:value-type="float">
            <text:p>6</text:p>
          </table:table-cell>
          <table:table-cell table:style-name="ce397" table:formula="of:=[$'ANNEX E - B1'.$G11]" office:value-type="float" office:value="1929.32559219664" calcext:value-type="float">
            <text:p>1929</text:p>
          </table:table-cell>
          <table:table-cell table:style-name="ce397" table:formula="of:=[$'ANNEX E - B2'.$G11]" office:value-type="float" office:value="1893.55701933341" calcext:value-type="float">
            <text:p>1894</text:p>
          </table:table-cell>
          <table:table-cell table:style-name="ce397" table:formula="of:=[$'ANNEX E - B3'.$G11]" office:value-type="float" office:value="1895.30569479283" calcext:value-type="float">
            <text:p>1895</text:p>
          </table:table-cell>
          <table:table-cell table:style-name="ce404" table:formula="of:=AVERAGE([.B25:.D25])" office:value-type="float" office:value="1906.06276877429" calcext:value-type="float">
            <text:p>1906</text:p>
          </table:table-cell>
          <table:table-cell table:style-name="ce406" office:value-type="float" office:value="1631" calcext:value-type="float">
            <text:p>1631</text:p>
          </table:table-cell>
          <table:table-cell office:value-type="float" office:value="938.2" calcext:value-type="float">
            <text:p>938.2</text:p>
          </table:table-cell>
          <table:table-cell office:value-type="float" office:value="2834" calcext:value-type="float">
            <text:p>2834</text:p>
          </table:table-cell>
          <table:table-cell table:style-name="ce212" table:formula="of:=([.E25]-[.F25])/[.F25]" office:value-type="percentage" office:value="0.168646700658671" calcext:value-type="percentage">
            <text:p>16.9%</text:p>
          </table:table-cell>
          <table:table-cell table:number-columns-repeated="1015"/>
        </table:table-row>
        <table:table-row table:style-name="ro2">
          <table:table-cell table:style-name="ce392" office:value-type="float" office:value="7" calcext:value-type="float">
            <text:p>7</text:p>
          </table:table-cell>
          <table:table-cell table:style-name="ce397" table:formula="of:=[$'ANNEX E - B1'.$G12]" office:value-type="float" office:value="967.720488641221" calcext:value-type="float">
            <text:p>968</text:p>
          </table:table-cell>
          <table:table-cell table:style-name="ce397" table:formula="of:=[$'ANNEX E - B2'.$G12]" office:value-type="float" office:value="943.489316779818" calcext:value-type="float">
            <text:p>943</text:p>
          </table:table-cell>
          <table:table-cell table:style-name="ce397" table:formula="of:=[$'ANNEX E - B3'.$G12]" office:value-type="float" office:value="949.712455405601" calcext:value-type="float">
            <text:p>950</text:p>
          </table:table-cell>
          <table:table-cell table:style-name="ce404" table:formula="of:=AVERAGE([.B26:.D26])" office:value-type="float" office:value="953.64075360888" calcext:value-type="float">
            <text:p>954</text:p>
          </table:table-cell>
          <table:table-cell table:style-name="ce406" office:value-type="float" office:value="769.8" calcext:value-type="float">
            <text:p>769.8</text:p>
          </table:table-cell>
          <table:table-cell office:value-type="float" office:value="413.6" calcext:value-type="float">
            <text:p>413.6</text:p>
          </table:table-cell>
          <table:table-cell office:value-type="float" office:value="1433" calcext:value-type="float">
            <text:p>1433</text:p>
          </table:table-cell>
          <table:table-cell table:style-name="ce212" table:formula="of:=([.E26]-[.F26])/[.F26]" office:value-type="percentage" office:value="0.238816255662353" calcext:value-type="percentage">
            <text:p>23.9%</text:p>
          </table:table-cell>
          <table:table-cell table:number-columns-repeated="1015"/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table:style-name="ce397" table:formula="of:=[$'ANNEX E - B1'.$G13]" office:value-type="float" office:value="502.951222120508" calcext:value-type="float">
            <text:p>503</text:p>
          </table:table-cell>
          <table:table-cell table:style-name="ce397" table:formula="of:=[$'ANNEX E - B2'.$G13]" office:value-type="float" office:value="503.217143899839" calcext:value-type="float">
            <text:p>503</text:p>
          </table:table-cell>
          <table:table-cell table:style-name="ce397" table:formula="of:=[$'ANNEX E - B3'.$G13]" office:value-type="float" office:value="504.603962250572" calcext:value-type="float">
            <text:p>505</text:p>
          </table:table-cell>
          <table:table-cell table:style-name="ce404" table:formula="of:=AVERAGE([.B27:.D27])" office:value-type="float" office:value="503.590776090306" calcext:value-type="float">
            <text:p>504</text:p>
          </table:table-cell>
          <table:table-cell table:style-name="ce406" office:value-type="float" office:value="379.1" calcext:value-type="float">
            <text:p>379.1</text:p>
          </table:table-cell>
          <table:table-cell office:value-type="float" office:value="179.7" calcext:value-type="float">
            <text:p>179.7</text:p>
          </table:table-cell>
          <table:table-cell office:value-type="float" office:value="799.5" calcext:value-type="float">
            <text:p>799.5</text:p>
          </table:table-cell>
          <table:table-cell table:style-name="ce212" table:formula="of:=([.E27]-[.F27])/[.F27]" office:value-type="percentage" office:value="0.328385059589307" calcext:value-type="percentage">
            <text:p>32.8%</text:p>
          </table:table-cell>
          <table:table-cell table:number-columns-repeated="1015"/>
        </table:table-row>
        <table:table-row table:style-name="ro2">
          <table:table-cell table:style-name="ce200" office:value-type="float" office:value="9" calcext:value-type="float">
            <text:p>9</text:p>
          </table:table-cell>
          <table:table-cell table:style-name="ce398" table:formula="of:=[$'ANNEX E - B1'.$G14]" office:value-type="float" office:value="236.971172074706" calcext:value-type="float">
            <text:p>237</text:p>
          </table:table-cell>
          <table:table-cell table:style-name="ce398" table:formula="of:=[$'ANNEX E - B2'.$G14]" office:value-type="float" office:value="238.955947526409" calcext:value-type="float">
            <text:p>239</text:p>
          </table:table-cell>
          <table:table-cell table:style-name="ce398" table:formula="of:=[$'ANNEX E - B3'.$G14]" office:value-type="float" office:value="239.137977104309" calcext:value-type="float">
            <text:p>239</text:p>
          </table:table-cell>
          <table:table-cell table:style-name="ce405" table:formula="of:=AVERAGE([.B28:.D28])" office:value-type="float" office:value="238.355032235141" calcext:value-type="float">
            <text:p>238</text:p>
          </table:table-cell>
          <table:table-cell table:style-name="ce407" office:value-type="float" office:value="196.2" calcext:value-type="float">
            <text:p>196.2</text:p>
          </table:table-cell>
          <table:table-cell table:style-name="ce91" office:value-type="float" office:value="76.57" calcext:value-type="float">
            <text:p>76.57</text:p>
          </table:table-cell>
          <table:table-cell table:style-name="ce91" office:value-type="float" office:value="502.6" calcext:value-type="float">
            <text:p>502.6</text:p>
          </table:table-cell>
          <table:table-cell table:style-name="ce371" table:formula="of:=([.E28]-[.F28])/[.F28]" office:value-type="percentage" office:value="0.214857452778499" calcext:value-type="percentage">
            <text:p>21.5%</text:p>
          </table:table-cell>
          <table:table-cell table:number-columns-repeated="1015"/>
        </table:table-row>
        <table:table-row table:style-name="ro16">
          <table:table-cell table:style-name="ce393"/>
          <table:table-cell table:style-name="ce399"/>
          <table:table-cell table:style-name="ce401"/>
          <table:table-cell table:style-name="ce403" table:number-columns-repeated="2"/>
          <table:table-cell table:number-columns-repeated="4"/>
          <table:table-cell table:style-name="ce16"/>
          <table:table-cell table:number-columns-repeated="1014"/>
        </table:table-row>
        <table:table-row table:style-name="ro16">
          <table:table-cell office:value-type="string" calcext:value-type="string">
            <text:p>Table A.1</text:p>
          </table:table-cell>
          <table:table-cell/>
          <table:table-cell table:style-name="ce76"/>
          <table:table-cell table:number-columns-repeated="1021"/>
        </table:table-row>
        <table:table-row table:style-name="ro16">
          <table:table-cell table:style-name="ce90" office:value-type="string" calcext:value-type="string">
            <text:p>μm(c)</text:p>
          </table:table-cell>
          <table:table-cell table:style-name="ce90" office:value-type="string" calcext:value-type="string">
            <text:p>Median</text:p>
          </table:table-cell>
          <table:table-cell table:style-name="ce90" office:value-type="string" calcext:value-type="string">
            <text:p>Minimum</text:p>
          </table:table-cell>
          <table:table-cell table:style-name="ce90" office:value-type="string" calcext:value-type="string">
            <text:p>Maximum</text:p>
          </table:table-cell>
          <table:table-cell table:number-columns-repeated="1020"/>
        </table:table-row>
        <table:table-row table:style-name="ro16">
          <table:table-cell office:value-type="float" office:value="2" calcext:value-type="float">
            <text:p>2</text:p>
          </table:table-cell>
          <table:table-cell office:value-type="float" office:value="20210" calcext:value-type="float">
            <text:p>20210</text:p>
          </table:table-cell>
          <table:table-cell office:value-type="float" office:value="14180" calcext:value-type="float">
            <text:p>14180</text:p>
          </table:table-cell>
          <table:table-cell office:value-type="float" office:value="28820" calcext:value-type="float">
            <text:p>28820</text:p>
          </table:table-cell>
          <table:table-cell table:number-columns-repeated="1020"/>
        </table:table-row>
        <table:table-row table:style-name="ro16">
          <table:table-cell office:value-type="float" office:value="3" calcext:value-type="float">
            <text:p>3</text:p>
          </table:table-cell>
          <table:table-cell office:value-type="float" office:value="10700" calcext:value-type="float">
            <text:p>10700</text:p>
          </table:table-cell>
          <table:table-cell office:value-type="float" office:value="7928" calcext:value-type="float">
            <text:p>7928</text:p>
          </table:table-cell>
          <table:table-cell office:value-type="float" office:value="14440" calcext:value-type="float">
            <text:p>14440</text:p>
          </table:table-cell>
          <table:table-cell table:number-columns-repeated="16"/>
          <table:table-cell table:style-name="ce55"/>
          <table:table-cell table:number-columns-repeated="1003"/>
        </table:table-row>
        <table:table-row table:style-name="ro16">
          <table:table-cell table:style-name="ce395" office:value-type="float" office:value="4" calcext:value-type="float">
            <text:p>4</text:p>
          </table:table-cell>
          <table:table-cell table:style-name="ce395" office:value-type="float" office:value="6300" calcext:value-type="float">
            <text:p>6300</text:p>
          </table:table-cell>
          <table:table-cell table:style-name="ce395" office:value-type="float" office:value="4553" calcext:value-type="float">
            <text:p>4553</text:p>
          </table:table-cell>
          <table:table-cell table:style-name="ce395" office:value-type="float" office:value="8713" calcext:value-type="float">
            <text:p>8713</text:p>
          </table:table-cell>
          <table:table-cell table:number-columns-repeated="1020"/>
        </table:table-row>
        <table:table-row table:style-name="ro16">
          <table:table-cell office:value-type="float" office:value="5" calcext:value-type="float">
            <text:p>5</text:p>
          </table:table-cell>
          <table:table-cell office:value-type="float" office:value="3475" calcext:value-type="float">
            <text:p>3475</text:p>
          </table:table-cell>
          <table:table-cell office:value-type="float" office:value="2330" calcext:value-type="float">
            <text:p>2330</text:p>
          </table:table-cell>
          <table:table-cell office:value-type="float" office:value="5183" calcext:value-type="float">
            <text:p>5183</text:p>
          </table:table-cell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number-columns-repeated="1013"/>
        </table:table-row>
        <table:table-row table:style-name="ro16">
          <table:table-cell table:style-name="ce395" office:value-type="float" office:value="6" calcext:value-type="float">
            <text:p>6</text:p>
          </table:table-cell>
          <table:table-cell table:style-name="ce395" office:value-type="float" office:value="1631" calcext:value-type="float">
            <text:p>1631</text:p>
          </table:table-cell>
          <table:table-cell table:style-name="ce395" office:value-type="float" office:value="938.2" calcext:value-type="float">
            <text:p>938.2</text:p>
          </table:table-cell>
          <table:table-cell table:style-name="ce395" office:value-type="float" office:value="2834" calcext:value-type="float">
            <text:p>2834</text:p>
          </table:table-cell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number-columns-repeated="1013"/>
        </table:table-row>
        <table:table-row table:style-name="ro16">
          <table:table-cell office:value-type="float" office:value="7" calcext:value-type="float">
            <text:p>7</text:p>
          </table:table-cell>
          <table:table-cell office:value-type="float" office:value="769.8" calcext:value-type="float">
            <text:p>769.8</text:p>
          </table:table-cell>
          <table:table-cell office:value-type="float" office:value="413.6" calcext:value-type="float">
            <text:p>413.6</text:p>
          </table:table-cell>
          <table:table-cell office:value-type="float" office:value="1433" calcext:value-type="float">
            <text:p>1433</text:p>
          </table:table-cell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number-columns-repeated="1013"/>
        </table:table-row>
        <table:table-row table:style-name="ro16">
          <table:table-cell office:value-type="float" office:value="8" calcext:value-type="float">
            <text:p>8</text:p>
          </table:table-cell>
          <table:table-cell office:value-type="float" office:value="379.1" calcext:value-type="float">
            <text:p>379.1</text:p>
          </table:table-cell>
          <table:table-cell office:value-type="float" office:value="179.7" calcext:value-type="float">
            <text:p>179.7</text:p>
          </table:table-cell>
          <table:table-cell office:value-type="float" office:value="799.5" calcext:value-type="float">
            <text:p>799.5</text:p>
          </table:table-cell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number-columns-repeated="1013"/>
        </table:table-row>
        <table:table-row table:style-name="ro16">
          <table:table-cell office:value-type="float" office:value="9" calcext:value-type="float">
            <text:p>9</text:p>
          </table:table-cell>
          <table:table-cell office:value-type="float" office:value="196.2" calcext:value-type="float">
            <text:p>196.2</text:p>
          </table:table-cell>
          <table:table-cell office:value-type="float" office:value="76.57" calcext:value-type="float">
            <text:p>76.57</text:p>
          </table:table-cell>
          <table:table-cell office:value-type="float" office:value="502.6" calcext:value-type="float">
            <text:p>502.6</text:p>
          </table:table-cell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number-columns-repeated="1013"/>
        </table:table-row>
        <table:table-row table:style-name="ro16"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88.9" calcext:value-type="float">
            <text:p>88.9</text:p>
          </table:table-cell>
          <table:table-cell table:style-name="ce91" office:value-type="float" office:value="27.89" calcext:value-type="float">
            <text:p>27.89</text:p>
          </table:table-cell>
          <table:table-cell table:style-name="ce91" office:value-type="float" office:value="283.4" calcext:value-type="float">
            <text:p>283.4</text:p>
          </table:table-cell>
          <table:table-cell table:number-columns-repeated="1020"/>
        </table:table-row>
        <table:table-row table:style-name="ro16">
          <table:table-cell table:number-columns-repeated="1024"/>
        </table:table-row>
        <table:table-row table:style-name="ro16">
          <table:table-cell office:value-type="string" calcext:value-type="string">
            <text:p>Table C.2</text:p>
          </table:table-cell>
          <table:table-cell table:number-columns-repeated="1023"/>
        </table:table-row>
        <table:table-row table:style-name="ro16">
          <table:table-cell table:style-name="ce115"/>
          <table:table-cell table:style-name="ce199" office:value-type="string" calcext:value-type="string">
            <text:p>Mean counted X</text:p>
          </table:table-cell>
          <table:table-cell table:style-name="ce115"/>
          <table:table-cell table:style-name="ce201" office:value-type="string" calcext:value-type="string">
            <text:p>C<text:span text:style-name="T6">V_MAX</text:span></text:p>
          </table:table-cell>
          <table:table-cell table:style-name="ce117" table:number-columns-repeated="3"/>
          <table:table-cell table:style-name="ce118"/>
          <table:table-cell table:number-columns-repeated="12"/>
          <table:table-cell table:style-name="ce55"/>
          <table:table-cell table:number-columns-repeated="1003"/>
        </table:table-row>
        <table:table-row table:style-name="ro16">
          <table:table-cell table:style-name="ce193" office:value-type="string" calcext:value-type="string">
            <text:p>X &gt;=</text:p>
          </table:table-cell>
          <table:table-cell table:style-name="ce200" office:value-type="string" calcext:value-type="string">
            <text:p>X &lt;</text:p>
          </table:table-cell>
          <table:table-cell table:style-name="ce193" office:value-type="string" calcext:value-type="string">
            <text:p>D<text:span text:style-name="T6">QMAX / SAMPLE</text:span></text:p>
          </table:table-cell>
          <table:table-cell table:style-name="ce193" office:value-type="string" calcext:value-type="string">
            <text:p>N=3</text:p>
          </table:table-cell>
          <table:table-cell table:style-name="ce200" office:value-type="string" calcext:value-type="string">
            <text:p>N=6</text:p>
          </table:table-cell>
          <table:table-cell table:style-name="ce200" office:value-type="string" calcext:value-type="string">
            <text:p>N=10</text:p>
          </table:table-cell>
          <table:table-cell table:style-name="ce200" office:value-type="string" calcext:value-type="string">
            <text:p>N=20</text:p>
          </table:table-cell>
          <table:table-cell table:style-name="ce210" office:value-type="string" calcext:value-type="string">
            <text:p>N=40</text:p>
          </table:table-cell>
          <table:table-cell table:style-name="ce20" table:number-columns-repeated="2"/>
          <table:table-cell table:number-columns-repeated="1014"/>
        </table:table-row>
        <table:table-row table:style-name="ro16">
          <table:table-cell table:style-name="ce164" office:value-type="float" office:value="10000" calcext:value-type="float">
            <text:p>10000</text:p>
          </table:table-cell>
          <table:table-cell/>
          <table:table-cell table:style-name="ce164" office:value-type="float" office:value="11" calcext:value-type="float">
            <text:p>11</text:p>
          </table:table-cell>
          <table:table-cell table:style-name="ce164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173" office:value-type="float" office:value="1.8" calcext:value-type="float">
            <text:p>1.8</text:p>
          </table:table-cell>
          <table:table-cell table:style-name="ce20" table:number-columns-repeated="2"/>
          <table:table-cell table:number-columns-repeated="1014"/>
        </table:table-row>
        <table:table-row table:style-name="ro16">
          <table:table-cell table:style-name="ce164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164" office:value-type="float" office:value="11.3" calcext:value-type="float">
            <text:p>11.3</text:p>
          </table:table-cell>
          <table:table-cell table:style-name="ce164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173" office:value-type="float" office:value="1.9" calcext:value-type="float">
            <text:p>1.9</text:p>
          </table:table-cell>
          <table:table-cell table:number-columns-repeated="1016"/>
        </table:table-row>
        <table:table-row table:style-name="ro16">
          <table:table-cell table:style-name="ce164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164" office:value-type="float" office:value="11.9" calcext:value-type="float">
            <text:p>11.9</text:p>
          </table:table-cell>
          <table:table-cell table:style-name="ce164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173" office:value-type="float" office:value="2.1" calcext:value-type="float">
            <text:p>2.1</text:p>
          </table:table-cell>
          <table:table-cell/>
          <table:table-cell table:style-name="ce20"/>
          <table:table-cell table:number-columns-repeated="1014"/>
        </table:table-row>
        <table:table-row table:style-name="ro16">
          <table:table-cell table:style-name="ce164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164" office:value-type="float" office:value="13.4" calcext:value-type="float">
            <text:p>13.4</text:p>
          </table:table-cell>
          <table:table-cell table:style-name="ce164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173" office:value-type="float" office:value="2.4" calcext:value-type="float">
            <text:p>2.4</text:p>
          </table:table-cell>
          <table:table-cell/>
          <table:table-cell table:style-name="ce20"/>
          <table:table-cell table:number-columns-repeated="1014"/>
        </table:table-row>
        <table:table-row table:style-name="ro16">
          <table:table-cell table:style-name="ce164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164" office:value-type="float" office:value="15.6" calcext:value-type="float">
            <text:p>15.6</text:p>
          </table:table-cell>
          <table:table-cell table:style-name="ce164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173" office:value-type="float" office:value="2.9" calcext:value-type="float">
            <text:p>2.9</text:p>
          </table:table-cell>
          <table:table-cell table:style-name="ce20" table:number-columns-repeated="2"/>
          <table:table-cell table:number-columns-repeated="1014"/>
        </table:table-row>
        <table:table-row table:style-name="ro16">
          <table:table-cell table:style-name="ce164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164" office:value-type="float" office:value="19.3" calcext:value-type="float">
            <text:p>19.3</text:p>
          </table:table-cell>
          <table:table-cell table:style-name="ce164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173" office:value-type="float" office:value="4.1" calcext:value-type="float">
            <text:p>4.1</text:p>
          </table:table-cell>
          <table:table-cell table:number-columns-repeated="1016"/>
        </table:table-row>
        <table:table-row table:style-name="ro16">
          <table:table-cell table:style-name="ce165" office:value-type="float" office:value="100" calcext:value-type="float">
            <text:p>100</text:p>
          </table:table-cell>
          <table:table-cell table:style-name="ce91" office:value-type="float" office:value="200" calcext:value-type="float">
            <text:p>200</text:p>
          </table:table-cell>
          <table:table-cell table:style-name="ce165" office:value-type="float" office:value="27.5" calcext:value-type="float">
            <text:p>27.5</text:p>
          </table:table-cell>
          <table:table-cell table:style-name="ce165" office:value-type="float" office:value="10" calcext:value-type="float">
            <text:p>10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7" calcext:value-type="float">
            <text:p>7</text:p>
          </table:table-cell>
          <table:table-cell table:style-name="ce91" office:value-type="float" office:value="6.1" calcext:value-type="float">
            <text:p>6.1</text:p>
          </table:table-cell>
          <table:table-cell table:style-name="ce211" office:value-type="float" office:value="5.5" calcext:value-type="float">
            <text:p>5.5</text:p>
          </table:table-cell>
          <table:table-cell table:number-columns-repeated="1016"/>
        </table:table-row>
        <table:table-row table:style-name="ro16">
          <table:table-cell table:number-columns-repeated="1024"/>
        </table:table-row>
        <table:table-row table:style-name="ro24">
          <table:table-cell table:style-name="ce396" office:value-type="string" calcext:value-type="string">
            <text:p>ANNEX E – VERIFICATION OF PARTICLE COUNTING ACCURACY</text:p>
          </table:table-cell>
          <table:table-cell table:number-columns-repeated="1023"/>
        </table:table-row>
        <table:table-row table:style-name="ro16"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number-columns-repeated="1014"/>
        </table:table-row>
        <table:table-row table:style-name="ro16">
          <table:table-cell table:style-name="ce89"/>
          <table:table-cell table:style-name="ce400"/>
          <table:table-cell/>
          <table:table-cell table:style-name="ce400"/>
          <table:table-cell/>
          <table:table-cell table:style-name="ce123"/>
          <table:table-cell/>
          <table:table-cell table:style-name="ce123"/>
          <table:table-cell/>
          <table:table-cell table:style-name="ce123"/>
          <table:table-cell table:number-columns-repeated="1014"/>
        </table:table-row>
        <table:table-row table:style-name="ro16">
          <table:table-cell/>
          <table:table-cell table:style-name="ce21"/>
          <table:table-cell/>
          <table:table-cell table:style-name="ce21"/>
          <table:table-cell table:number-columns-repeated="6"/>
          <table:table-cell table:style-name="ce31" table:number-columns-repeated="2"/>
          <table:table-cell table:number-columns-repeated="1012"/>
        </table:table-row>
        <table:table-row table:style-name="ro16" table:number-rows-repeated="20">
          <table:table-cell table:number-columns-repeated="1024"/>
        </table:table-row>
        <table:table-row table:style-name="ro16">
          <table:table-cell table:number-columns-repeated="1024"/>
        </table:table-row>
        <calcext:conditional-formats>
          <calcext:conditional-format calcext:target-range-address="'Annex E Verify Counting Accuracy'.A29:'Annex E Verify Counting Accuracy'.A29">
            <calcext:condition calcext:apply-style-name="Good" calcext:value="between([.$C$34],[.$D$34])" calcext:base-cell-address="'Annex E Verify Counting Accuracy'.A29"/>
          </calcext:conditional-format>
          <calcext:conditional-format calcext:target-range-address="'Annex E Verify Counting Accuracy'.B29:'Annex E Verify Counting Accuracy'.B29">
            <calcext:condition calcext:apply-style-name="Good" calcext:value="between([.$C$36],[.$D$36])" calcext:base-cell-address="'Annex E Verify Counting Accuracy'.B29"/>
          </calcext:conditional-format>
          <calcext:conditional-format calcext:target-range-address="'Annex E Verify Counting Accuracy'.B55:'Annex E Verify Counting Accuracy'.B55 'Annex E Verify Counting Accuracy'.D55:'Annex E Verify Counting Accuracy'.D55">
            <calcext:condition calcext:apply-style-name="Good" calcext:value="&lt;[.B56]" calcext:base-cell-address="'Annex E Verify Counting Accuracy'.B55"/>
          </calcext:conditional-format>
          <calcext:conditional-format calcext:target-range-address="'Annex E Verify Counting Accuracy'.E23:'Annex E Verify Counting Accuracy'.E28">
            <calcext:condition calcext:apply-style-name="Good" calcext:value="between([.G23],[.H23])" calcext:base-cell-address="'Annex E Verify Counting Accuracy'.E23"/>
          </calcext:conditional-format>
        </calcext:conditional-formats>
      </table:table>
      <table:table table:name="'file:///D:/mp/projects/PR0118%20-%20ISO%2011171%20Calibrations/results/2025-05-19-LPA3-NAVAIR-11171-00009/11171-00009-LIVE.ods'#Clause 6 Sizing Calibration" table:print="false" table:style-name="ta_extref">
        <table:table-source xlink:type="simple" xlink:href="../results/2025-05-19-LPA3-NAVAIR-11171-00009/11171-00009-LIVE.ods" table:table-name="Clause 6 Sizing Calibration" table:mode="copy-results-only"/>
        <table:table-column table:number-columns-repeated="5"/>
        <table:table-row table:number-rows-repeated="18">
          <table:table-cell table:number-columns-repeated="5"/>
        </table:table-row>
        <table:table-row>
          <table:table-cell table:number-columns-repeated="4"/>
          <table:table-cell table:style-name="ce1" office:value-type="float" office:value="54">
            <text:p>54</text:p>
          </table:table-cell>
        </table:table-row>
        <table:table-row>
          <table:table-cell table:number-columns-repeated="4"/>
          <table:table-cell table:style-name="ce1" office:value-type="float" office:value="64.2928319386125">
            <text:p>64.2928319386125</text:p>
          </table:table-cell>
        </table:table-row>
        <table:table-row>
          <table:table-cell table:number-columns-repeated="4"/>
          <table:table-cell table:style-name="ce1" office:value-type="float" office:value="76.5475599756791">
            <text:p>76.5475599756791</text:p>
          </table:table-cell>
        </table:table-row>
        <table:table-row>
          <table:table-cell table:number-columns-repeated="4"/>
          <table:table-cell table:style-name="ce1" office:value-type="float" office:value="91.1381372005036">
            <text:p>91.1381372005036</text:p>
          </table:table-cell>
        </table:table-row>
        <table:table-row>
          <table:table-cell table:number-columns-repeated="4"/>
          <table:table-cell table:style-name="ce1" office:value-type="float" office:value="108.509795152411">
            <text:p>108.509795152411</text:p>
          </table:table-cell>
        </table:table-row>
        <table:table-row>
          <table:table-cell table:number-columns-repeated="4"/>
          <table:table-cell table:style-name="ce1" office:value-type="float" office:value="129.192630063467">
            <text:p>129.192630063467</text:p>
          </table:table-cell>
        </table:table-row>
        <table:table-row>
          <table:table-cell table:number-columns-repeated="4"/>
          <table:table-cell table:style-name="ce1" office:value-type="float" office:value="153.817778747738">
            <text:p>153.817778747738</text:p>
          </table:table-cell>
        </table:table-row>
        <table:table-row>
          <table:table-cell table:number-columns-repeated="4"/>
          <table:table-cell table:style-name="ce1" office:value-type="float" office:value="183.136677744425">
            <text:p>183.136677744425</text:p>
          </table:table-cell>
        </table:table-row>
        <table:table-row>
          <table:table-cell table:number-columns-repeated="4"/>
          <table:table-cell table:style-name="ce1" office:value-type="float" office:value="218.043993407744">
            <text:p>218.043993407744</text:p>
          </table:table-cell>
        </table:table-row>
        <table:table-row>
          <table:table-cell table:number-columns-repeated="4"/>
          <table:table-cell table:style-name="ce1" office:value-type="float" office:value="259.604922655334">
            <text:p>259.604922655334</text:p>
          </table:table-cell>
        </table:table-row>
        <table:table-row>
          <table:table-cell table:number-columns-repeated="4"/>
          <table:table-cell table:style-name="ce1" office:value-type="float" office:value="309.087697457701">
            <text:p>309.087697457701</text:p>
          </table:table-cell>
        </table:table-row>
        <table:table-row>
          <table:table-cell table:number-columns-repeated="4"/>
          <table:table-cell table:style-name="ce1" office:value-type="float" office:value="368.002284943346">
            <text:p>368.002284943346</text:p>
          </table:table-cell>
        </table:table-row>
        <table:table-row>
          <table:table-cell table:number-columns-repeated="4"/>
          <table:table-cell table:style-name="ce1" office:value-type="float" office:value="438.14646405348">
            <text:p>438.14646405348</text:p>
          </table:table-cell>
        </table:table-row>
        <table:table-row>
          <table:table-cell table:number-columns-repeated="4"/>
          <table:table-cell table:style-name="ce1" office:value-type="float" office:value="521.660684775698">
            <text:p>521.660684775698</text:p>
          </table:table-cell>
        </table:table-row>
        <table:table-row>
          <table:table-cell table:number-columns-repeated="4"/>
          <table:table-cell table:style-name="ce1" office:value-type="float" office:value="621.093383986398">
            <text:p>621.093383986398</text:p>
          </table:table-cell>
        </table:table-row>
        <table:table-row>
          <table:table-cell table:number-columns-repeated="4"/>
          <table:table-cell table:style-name="ce1" office:value-type="float" office:value="739.478751015215">
            <text:p>739.478751015215</text:p>
          </table:table-cell>
        </table:table-row>
        <table:table-row>
          <table:table-cell table:number-columns-repeated="4"/>
          <table:table-cell table:style-name="ce1" office:value-type="float" office:value="880.429315948079">
            <text:p>880.429315948079</text:p>
          </table:table-cell>
        </table:table-row>
        <table:table-row>
          <table:table-cell table:number-columns-repeated="4"/>
          <table:table-cell table:style-name="ce1" office:value-type="float" office:value="1048.24618600143">
            <text:p>1048.24618600143</text:p>
          </table:table-cell>
        </table:table-row>
        <table:table-row>
          <table:table-cell table:number-columns-repeated="4"/>
          <table:table-cell table:style-name="ce1" office:value-type="float" office:value="1248.05029383114">
            <text:p>1248.05029383114</text:p>
          </table:table-cell>
        </table:table-row>
        <table:table-row>
          <table:table-cell table:number-columns-repeated="4"/>
          <table:table-cell table:style-name="ce1" office:value-type="float" office:value="1485.93866281892">
            <text:p>1485.93866281892</text:p>
          </table:table-cell>
        </table:table-row>
        <table:table-row>
          <table:table-cell table:number-columns-repeated="4"/>
          <table:table-cell table:style-name="ce1" office:value-type="float" office:value="1769.17045777228">
            <text:p>1769.17045777228</text:p>
          </table:table-cell>
        </table:table-row>
        <table:table-row>
          <table:table-cell table:number-columns-repeated="4"/>
          <table:table-cell table:style-name="ce1" office:value-type="float" office:value="2106.38849837614">
            <text:p>2106.38849837614</text:p>
          </table:table-cell>
        </table:table-row>
        <table:table-row>
          <table:table-cell table:number-columns-repeated="4"/>
          <table:table-cell table:style-name="ce1" office:value-type="float" office:value="2507.88299488007">
            <text:p>2507.88299488007</text:p>
          </table:table-cell>
        </table:table-row>
        <table:table-row>
          <table:table-cell table:number-columns-repeated="4"/>
          <table:table-cell table:style-name="ce1" office:value-type="float" office:value="2985.90555391719">
            <text:p>2985.90555391719</text:p>
          </table:table-cell>
        </table:table-row>
        <table:table-row>
          <table:table-cell table:number-columns-repeated="4"/>
          <table:table-cell table:style-name="ce1" office:value-type="float" office:value="3555.04303634384">
            <text:p>3555.04303634384</text:p>
          </table:table-cell>
        </table:table-row>
        <table:table-row>
          <table:table-cell table:number-columns-repeated="4"/>
          <table:table-cell table:style-name="ce1" office:value-type="float" office:value="4232.66267537388">
            <text:p>4232.66267537388</text:p>
          </table:table-cell>
        </table:table-row>
        <table:table-row>
          <table:table-cell table:number-columns-repeated="4"/>
          <table:table-cell table:style-name="ce1" office:value-type="float" office:value="5039.44203778983">
            <text:p>5039.44203778983</text:p>
          </table:table-cell>
        </table:table-row>
        <table:table-row>
          <table:table-cell table:number-columns-repeated="4"/>
          <table:table-cell table:style-name="ce1" office:value-type="float" office:value="6000.00000000001">
            <text:p>6000.00000000001</text:p>
          </table:table-cell>
        </table:table-row>
      </table:table>
      <table:table table:name="'file:///D:/mp/projects/PR0118%20-%20ISO%2011171%20Calibrations/results/2025-05-19-LPA3-NAVAIR-11171-00009/11171-00009-LIVE.ods'#6 - B1" table:print="false" table:style-name="ta_extref">
        <table:table-source xlink:type="simple" xlink:href="../results/2025-05-19-LPA3-NAVAIR-11171-00009/11171-00009-LIVE.ods" table:table-name="6 - B1" table:mode="copy-results-only"/>
        <table:table-column table:number-columns-repeated="16"/>
        <table:table-row>
          <table:table-cell table:style-name="ce1" office:value-type="string">
            <text:p>Data Preprocessing and Quality Assessment per ISO 11171 Clause 6.6</text:p>
          </table:table-cell>
        </table:table-row>
        <table:table-row>
          <table:table-cell table:number-columns-repeated="16"/>
        </table:table-row>
        <table:table-row>
          <table:table-cell table:style-name="ce1" office:value-type="string">
            <text:p>Serial #</text:p>
          </table:table-cell>
          <table:table-cell table:style-name="ce1" office:value-type="string">
            <text:p>11171-00009</text:p>
          </table:table-cell>
        </table:table-row>
        <table:table-row>
          <table:table-cell table:style-name="ce1" office:value-type="string">
            <text:p>Date</text:p>
          </table:table-cell>
          <table:table-cell table:style-name="ce1" office:value-type="float" office:value="45820">
            <text:p>45820</text:p>
          </table:table-cell>
        </table:table-row>
        <table:table-row>
          <table:table-cell table:style-name="ce1" office:value-type="string">
            <text:p>RM</text:p>
          </table:table-cell>
          <table:table-cell table:style-name="ce1" office:value-type="string">
            <text:p>34D</text:p>
          </table:table-cell>
        </table:table-row>
        <table:table-row table:number-rows-repeated="3">
          <table:table-cell table:number-columns-repeated="16"/>
        </table:table-row>
        <table:table-row>
          <table:table-cell/>
          <table:table-cell table:style-name="ce1" office:value-type="float" office:value="14502.093450785">
            <text:p>14502.093450785</text:p>
          </table:table-cell>
          <table:table-cell table:style-name="ce1" office:value-type="float" office:value="14559.3855163645">
            <text:p>14559.3855163645</text:p>
          </table:table-cell>
          <table:table-cell table:style-name="ce1" office:value-type="float" office:value="14539.8866060012">
            <text:p>14539.8866060012</text:p>
          </table:table-cell>
          <table:table-cell table:style-name="ce1" office:value-type="float" office:value="14410.0251115801">
            <text:p>14410.0251115801</text:p>
          </table:table-cell>
          <table:table-cell table:style-name="ce1" office:value-type="float" office:value="14278.0839691955">
            <text:p>14278.0839691955</text:p>
          </table:table-cell>
          <table:table-cell table:style-name="ce1" office:value-type="float" office:value="14457.8949307853">
            <text:p>14457.8949307853</text:p>
          </table:table-cell>
          <table:table-cell table:number-columns-repeated="4"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float" office:value="12570.9837017644">
            <text:p>12570.9837017644</text:p>
          </table:table-cell>
          <table:table-cell table:style-name="ce1" office:value-type="float" office:value="12651.2703551823">
            <text:p>12651.2703551823</text:p>
          </table:table-cell>
          <table:table-cell table:style-name="ce1" office:value-type="float" office:value="12567.651273204">
            <text:p>12567.651273204</text:p>
          </table:table-cell>
          <table:table-cell table:style-name="ce1" office:value-type="float" office:value="12472.7018318538">
            <text:p>12472.7018318538</text:p>
          </table:table-cell>
          <table:table-cell table:style-name="ce1" office:value-type="float" office:value="12367.0949763833">
            <text:p>12367.0949763833</text:p>
          </table:table-cell>
          <table:table-cell table:style-name="ce1" office:value-type="float" office:value="12525.9404276776">
            <text:p>12525.9404276776</text:p>
          </table:table-cell>
          <table:table-cell table:number-columns-repeated="4"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float" office:value="10856.1796964435">
            <text:p>10856.1796964435</text:p>
          </table:table-cell>
          <table:table-cell table:style-name="ce1" office:value-type="float" office:value="10911.3008453121">
            <text:p>10911.3008453121</text:p>
          </table:table-cell>
          <table:table-cell table:style-name="ce1" office:value-type="float" office:value="10867.4191807195">
            <text:p>10867.4191807195</text:p>
          </table:table-cell>
          <table:table-cell table:style-name="ce1" office:value-type="float" office:value="10744.6767783303">
            <text:p>10744.6767783303</text:p>
          </table:table-cell>
          <table:table-cell table:style-name="ce1" office:value-type="float" office:value="10661.5053702204">
            <text:p>10661.5053702204</text:p>
          </table:table-cell>
          <table:table-cell table:style-name="ce1" office:value-type="float" office:value="10808.2163742051">
            <text:p>10808.2163742051</text:p>
          </table:table-cell>
          <table:table-cell table:number-columns-repeated="4"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float" office:value="9464.94048128475">
            <text:p>9464.94048128475</text:p>
          </table:table-cell>
          <table:table-cell table:style-name="ce1" office:value-type="float" office:value="9504.4540642346">
            <text:p>9504.4540642346</text:p>
          </table:table-cell>
          <table:table-cell table:style-name="ce1" office:value-type="float" office:value="9477.95714550818">
            <text:p>9477.95714550818</text:p>
          </table:table-cell>
          <table:table-cell table:style-name="ce1" office:value-type="float" office:value="9379.29508357415">
            <text:p>9379.29508357415</text:p>
          </table:table-cell>
          <table:table-cell table:style-name="ce1" office:value-type="float" office:value="9285.89479908234">
            <text:p>9285.89479908234</text:p>
          </table:table-cell>
          <table:table-cell table:style-name="ce1" office:value-type="float" office:value="9422.5083147368">
            <text:p>9422.5083147368</text:p>
          </table:table-cell>
          <table:table-cell table:number-columns-repeated="4"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float" office:value="8066.3272066817">
            <text:p>8066.3272066817</text:p>
          </table:table-cell>
          <table:table-cell table:style-name="ce1" office:value-type="float" office:value="8095.70613885831">
            <text:p>8095.70613885831</text:p>
          </table:table-cell>
          <table:table-cell table:style-name="ce1" office:value-type="float" office:value="8100.35817996785">
            <text:p>8100.35817996785</text:p>
          </table:table-cell>
          <table:table-cell table:style-name="ce1" office:value-type="float" office:value="8025.27228752654">
            <text:p>8025.27228752654</text:p>
          </table:table-cell>
          <table:table-cell table:style-name="ce1" office:value-type="float" office:value="7902.956013334">
            <text:p>7902.956013334</text:p>
          </table:table-cell>
          <table:table-cell table:style-name="ce1" office:value-type="float" office:value="8038.12396527368">
            <text:p>8038.12396527368</text:p>
          </table:table-cell>
          <table:table-cell table:number-columns-repeated="4"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float" office:value="6870.83575131722">
            <text:p>6870.83575131722</text:p>
          </table:table-cell>
          <table:table-cell table:style-name="ce1" office:value-type="float" office:value="6927.98106291288">
            <text:p>6927.98106291288</text:p>
          </table:table-cell>
          <table:table-cell table:style-name="ce1" office:value-type="float" office:value="6964.89294003303">
            <text:p>6964.89294003303</text:p>
          </table:table-cell>
          <table:table-cell table:style-name="ce1" office:value-type="float" office:value="6884.96506717947">
            <text:p>6884.96506717947</text:p>
          </table:table-cell>
          <table:table-cell table:style-name="ce1" office:value-type="float" office:value="6773.15469798229">
            <text:p>6773.15469798229</text:p>
          </table:table-cell>
          <table:table-cell table:style-name="ce1" office:value-type="float" office:value="6884.36590388498">
            <text:p>6884.36590388498</text:p>
          </table:table-cell>
          <table:table-cell table:number-columns-repeated="4"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float" office:value="5810.75884211178">
            <text:p>5810.75884211178</text:p>
          </table:table-cell>
          <table:table-cell table:style-name="ce1" office:value-type="float" office:value="5872.84597710473">
            <text:p>5872.84597710473</text:p>
          </table:table-cell>
          <table:table-cell table:style-name="ce1" office:value-type="float" office:value="5891.92065640059">
            <text:p>5891.92065640059</text:p>
          </table:table-cell>
          <table:table-cell table:style-name="ce1" office:value-type="float" office:value="5813.02158905945">
            <text:p>5813.02158905945</text:p>
          </table:table-cell>
          <table:table-cell table:style-name="ce1" office:value-type="float" office:value="5742.5983462104">
            <text:p>5742.5983462104</text:p>
          </table:table-cell>
          <table:table-cell table:style-name="ce1" office:value-type="float" office:value="5826.22908217739">
            <text:p>5826.22908217739</text:p>
          </table:table-cell>
          <table:table-cell table:number-columns-repeated="4"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float" office:value="4868.44342766841">
            <text:p>4868.44342766841</text:p>
          </table:table-cell>
          <table:table-cell table:style-name="ce1" office:value-type="float" office:value="4937.27174386263">
            <text:p>4937.27174386263</text:p>
          </table:table-cell>
          <table:table-cell table:style-name="ce1" office:value-type="float" office:value="4950.92502285759">
            <text:p>4950.92502285759</text:p>
          </table:table-cell>
          <table:table-cell table:style-name="ce1" office:value-type="float" office:value="4874.22964580009">
            <text:p>4874.22964580009</text:p>
          </table:table-cell>
          <table:table-cell table:style-name="ce1" office:value-type="float" office:value="4801.02745756388">
            <text:p>4801.02745756388</text:p>
          </table:table-cell>
          <table:table-cell table:style-name="ce1" office:value-type="float" office:value="4886.37945955052">
            <text:p>4886.37945955052</text:p>
          </table:table-cell>
          <table:table-cell table:number-columns-repeated="4"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float" office:value="3994.28219899816">
            <text:p>3994.28219899816</text:p>
          </table:table-cell>
          <table:table-cell table:style-name="ce1" office:value-type="float" office:value="4088.0939570861">
            <text:p>4088.0939570861</text:p>
          </table:table-cell>
          <table:table-cell table:style-name="ce1" office:value-type="float" office:value="4083.01437210891">
            <text:p>4083.01437210891</text:p>
          </table:table-cell>
          <table:table-cell table:style-name="ce1" office:value-type="float" office:value="4026.51924218476">
            <text:p>4026.51924218476</text:p>
          </table:table-cell>
          <table:table-cell table:style-name="ce1" office:value-type="float" office:value="3979.42991096638">
            <text:p>3979.42991096638</text:p>
          </table:table-cell>
          <table:table-cell table:style-name="ce1" office:value-type="float" office:value="4034.26793626886">
            <text:p>4034.26793626886</text:p>
          </table:table-cell>
          <table:table-cell table:number-columns-repeated="4"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float" office:value="3249.50219512342">
            <text:p>3249.50219512342</text:p>
          </table:table-cell>
          <table:table-cell table:style-name="ce1" office:value-type="float" office:value="3331.86100269308">
            <text:p>3331.86100269308</text:p>
          </table:table-cell>
          <table:table-cell table:style-name="ce1" office:value-type="float" office:value="3341.57251767386">
            <text:p>3341.57251767386</text:p>
          </table:table-cell>
          <table:table-cell table:style-name="ce1" office:value-type="float" office:value="3273.46632780688">
            <text:p>3273.46632780688</text:p>
          </table:table-cell>
          <table:table-cell table:style-name="ce1" office:value-type="float" office:value="3259.17110355165">
            <text:p>3259.17110355165</text:p>
          </table:table-cell>
          <table:table-cell table:style-name="ce1" office:value-type="float" office:value="3291.11462936978">
            <text:p>3291.11462936978</text:p>
          </table:table-cell>
          <table:table-cell table:number-columns-repeated="4"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float" office:value="2605.50100365418">
            <text:p>2605.50100365418</text:p>
          </table:table-cell>
          <table:table-cell table:style-name="ce1" office:value-type="float" office:value="2669.84031021605">
            <text:p>2669.84031021605</text:p>
          </table:table-cell>
          <table:table-cell table:style-name="ce1" office:value-type="float" office:value="2662.19993848151">
            <text:p>2662.19993848151</text:p>
          </table:table-cell>
          <table:table-cell table:style-name="ce1" office:value-type="float" office:value="2619.2779021881">
            <text:p>2619.2779021881</text:p>
          </table:table-cell>
          <table:table-cell table:style-name="ce1" office:value-type="float" office:value="2596.90988033863">
            <text:p>2596.90988033863</text:p>
          </table:table-cell>
          <table:table-cell table:style-name="ce1" office:value-type="float" office:value="2630.7458069757">
            <text:p>2630.7458069757</text:p>
          </table:table-cell>
          <table:table-cell table:number-columns-repeated="4"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float" office:value="2036.58114470877">
            <text:p>2036.58114470877</text:p>
          </table:table-cell>
          <table:table-cell table:style-name="ce1" office:value-type="float" office:value="2099.91949710086">
            <text:p>2099.91949710086</text:p>
          </table:table-cell>
          <table:table-cell table:style-name="ce1" office:value-type="float" office:value="2093.40811586491">
            <text:p>2093.40811586491</text:p>
          </table:table-cell>
          <table:table-cell table:style-name="ce1" office:value-type="float" office:value="2042.28791779186">
            <text:p>2042.28791779186</text:p>
          </table:table-cell>
          <table:table-cell table:style-name="ce1" office:value-type="float" office:value="2031.1717124216">
            <text:p>2031.1717124216</text:p>
          </table:table-cell>
          <table:table-cell table:style-name="ce1" office:value-type="float" office:value="2060.6736775776">
            <text:p>2060.6736775776</text:p>
          </table:table-cell>
          <table:table-cell table:number-columns-repeated="4"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float" office:value="1578.04872108112">
            <text:p>1578.04872108112</text:p>
          </table:table-cell>
          <table:table-cell table:style-name="ce1" office:value-type="float" office:value="1625.26713717876">
            <text:p>1625.26713717876</text:p>
          </table:table-cell>
          <table:table-cell table:style-name="ce1" office:value-type="float" office:value="1627.35895022002">
            <text:p>1627.35895022002</text:p>
          </table:table-cell>
          <table:table-cell table:style-name="ce1" office:value-type="float" office:value="1562.0589223939">
            <text:p>1562.0589223939</text:p>
          </table:table-cell>
          <table:table-cell table:style-name="ce1" office:value-type="float" office:value="1567.19103880792">
            <text:p>1567.19103880792</text:p>
          </table:table-cell>
          <table:table-cell table:style-name="ce1" office:value-type="float" office:value="1591.98495393634">
            <text:p>1591.98495393634</text:p>
          </table:table-cell>
          <table:table-cell table:number-columns-repeated="4"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float" office:value="1203.53588384918">
            <text:p>1203.53588384918</text:p>
          </table:table-cell>
          <table:table-cell table:style-name="ce1" office:value-type="float" office:value="1248.41808951475">
            <text:p>1248.41808951475</text:p>
          </table:table-cell>
          <table:table-cell table:style-name="ce1" office:value-type="float" office:value="1251.7656908162">
            <text:p>1251.7656908162</text:p>
          </table:table-cell>
          <table:table-cell table:style-name="ce1" office:value-type="float" office:value="1186.37386510929">
            <text:p>1186.37386510929</text:p>
          </table:table-cell>
          <table:table-cell table:style-name="ce1" office:value-type="float" office:value="1193.03333856079">
            <text:p>1193.03333856079</text:p>
          </table:table-cell>
          <table:table-cell table:style-name="ce1" office:value-type="float" office:value="1216.62537357004">
            <text:p>1216.62537357004</text:p>
          </table:table-cell>
          <table:table-cell table:number-columns-repeated="4"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float" office:value="925.556188433587">
            <text:p>925.556188433587</text:p>
          </table:table-cell>
          <table:table-cell table:style-name="ce1" office:value-type="float" office:value="938.742807073355">
            <text:p>938.742807073355</text:p>
          </table:table-cell>
          <table:table-cell table:style-name="ce1" office:value-type="float" office:value="961.332324407503">
            <text:p>961.332324407503</text:p>
          </table:table-cell>
          <table:table-cell table:style-name="ce1" office:value-type="float" office:value="898.615097827463">
            <text:p>898.615097827463</text:p>
          </table:table-cell>
          <table:table-cell table:style-name="ce1" office:value-type="float" office:value="886.504590288943">
            <text:p>886.504590288943</text:p>
          </table:table-cell>
          <table:table-cell table:style-name="ce1" office:value-type="float" office:value="922.15020160617">
            <text:p>922.15020160617</text:p>
          </table:table-cell>
          <table:table-cell table:number-columns-repeated="4"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float" office:value="711.261551855168">
            <text:p>711.261551855168</text:p>
          </table:table-cell>
          <table:table-cell table:style-name="ce1" office:value-type="float" office:value="713.140350287949">
            <text:p>713.140350287949</text:p>
          </table:table-cell>
          <table:table-cell table:style-name="ce1" office:value-type="float" office:value="727.672219995543">
            <text:p>727.672219995543</text:p>
          </table:table-cell>
          <table:table-cell table:style-name="ce1" office:value-type="float" office:value="693.944571098502">
            <text:p>693.944571098502</text:p>
          </table:table-cell>
          <table:table-cell table:style-name="ce1" office:value-type="float" office:value="669.798815383639">
            <text:p>669.798815383639</text:p>
          </table:table-cell>
          <table:table-cell table:style-name="ce1" office:value-type="float" office:value="703.16350172416">
            <text:p>703.16350172416</text:p>
          </table:table-cell>
          <table:table-cell table:number-columns-repeated="4"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float" office:value="553.724827363213">
            <text:p>553.724827363213</text:p>
          </table:table-cell>
          <table:table-cell table:style-name="ce1" office:value-type="float" office:value="542.88231642181">
            <text:p>542.88231642181</text:p>
          </table:table-cell>
          <table:table-cell table:style-name="ce1" office:value-type="float" office:value="558.199796124674">
            <text:p>558.199796124674</text:p>
          </table:table-cell>
          <table:table-cell table:style-name="ce1" office:value-type="float" office:value="522.298990614605">
            <text:p>522.298990614605</text:p>
          </table:table-cell>
          <table:table-cell table:style-name="ce1" office:value-type="float" office:value="508.7874715168">
            <text:p>508.7874715168</text:p>
          </table:table-cell>
          <table:table-cell table:style-name="ce1" office:value-type="float" office:value="537.17868040822">
            <text:p>537.17868040822</text:p>
          </table:table-cell>
          <table:table-cell table:number-columns-repeated="4"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float" office:value="428.36581681004">
            <text:p>428.36581681004</text:p>
          </table:table-cell>
          <table:table-cell table:style-name="ce1" office:value-type="float" office:value="410.647168530739">
            <text:p>410.647168530739</text:p>
          </table:table-cell>
          <table:table-cell table:style-name="ce1" office:value-type="float" office:value="430.248116102168">
            <text:p>430.248116102168</text:p>
          </table:table-cell>
          <table:table-cell table:style-name="ce1" office:value-type="float" office:value="403.030554175426">
            <text:p>403.030554175426</text:p>
          </table:table-cell>
          <table:table-cell table:style-name="ce1" office:value-type="float" office:value="382.742180219222">
            <text:p>382.742180219222</text:p>
          </table:table-cell>
          <table:table-cell table:style-name="ce1" office:value-type="float" office:value="411.006767167519">
            <text:p>411.006767167519</text:p>
          </table:table-cell>
          <table:table-cell table:number-columns-repeated="4"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float" office:value="328.033917098142">
            <text:p>328.033917098142</text:p>
          </table:table-cell>
          <table:table-cell table:style-name="ce1" office:value-type="float" office:value="314.322524060565">
            <text:p>314.322524060565</text:p>
          </table:table-cell>
          <table:table-cell table:style-name="ce1" office:value-type="float" office:value="332.801472376419">
            <text:p>332.801472376419</text:p>
          </table:table-cell>
          <table:table-cell table:style-name="ce1" office:value-type="float" office:value="313.842164316146">
            <text:p>313.842164316146</text:p>
          </table:table-cell>
          <table:table-cell table:style-name="ce1" office:value-type="float" office:value="295.012982455626">
            <text:p>295.012982455626</text:p>
          </table:table-cell>
          <table:table-cell table:style-name="ce1" office:value-type="float" office:value="316.80261206138">
            <text:p>316.80261206138</text:p>
          </table:table-cell>
          <table:table-cell table:number-columns-repeated="4"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float" office:value="253.176040921114">
            <text:p>253.176040921114</text:p>
          </table:table-cell>
          <table:table-cell table:style-name="ce1" office:value-type="float" office:value="239.755419898348">
            <text:p>239.755419898348</text:p>
          </table:table-cell>
          <table:table-cell table:style-name="ce1" office:value-type="float" office:value="251.66654944824">
            <text:p>251.66654944824</text:p>
          </table:table-cell>
          <table:table-cell table:style-name="ce1" office:value-type="float" office:value="242.323172447855">
            <text:p>242.323172447855</text:p>
          </table:table-cell>
          <table:table-cell table:style-name="ce1" office:value-type="float" office:value="222.568346593563">
            <text:p>222.568346593563</text:p>
          </table:table-cell>
          <table:table-cell table:style-name="ce1" office:value-type="float" office:value="241.897905861824">
            <text:p>241.897905861824</text:p>
          </table:table-cell>
          <table:table-cell table:number-columns-repeated="4"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float" office:value="195.300847100665">
            <text:p>195.300847100665</text:p>
          </table:table-cell>
          <table:table-cell table:style-name="ce1" office:value-type="float" office:value="183.354805701997">
            <text:p>183.354805701997</text:p>
          </table:table-cell>
          <table:table-cell table:style-name="ce1" office:value-type="float" office:value="188.961752616019">
            <text:p>188.961752616019</text:p>
          </table:table-cell>
          <table:table-cell table:style-name="ce1" office:value-type="float" office:value="189.735678427053">
            <text:p>189.735678427053</text:p>
          </table:table-cell>
          <table:table-cell table:style-name="ce1" office:value-type="float" office:value="161.848854108019">
            <text:p>161.848854108019</text:p>
          </table:table-cell>
          <table:table-cell table:style-name="ce1" office:value-type="float" office:value="183.840387590751">
            <text:p>183.840387590751</text:p>
          </table:table-cell>
          <table:table-cell table:number-columns-repeated="4"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float" office:value="148.375014273274">
            <text:p>148.375014273274</text:p>
          </table:table-cell>
          <table:table-cell table:style-name="ce1" office:value-type="float" office:value="138.994772064417">
            <text:p>138.994772064417</text:p>
          </table:table-cell>
          <table:table-cell table:style-name="ce1" office:value-type="float" office:value="143.416038700723">
            <text:p>143.416038700723</text:p>
          </table:table-cell>
          <table:table-cell table:style-name="ce1" office:value-type="float" office:value="140.934483975749">
            <text:p>140.934483975749</text:p>
          </table:table-cell>
          <table:table-cell table:style-name="ce1" office:value-type="float" office:value="122.695250332858">
            <text:p>122.695250332858</text:p>
          </table:table-cell>
          <table:table-cell table:style-name="ce1" office:value-type="float" office:value="138.883111869404">
            <text:p>138.883111869404</text:p>
          </table:table-cell>
          <table:table-cell table:number-columns-repeated="4"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float" office:value="110.834348011361">
            <text:p>110.834348011361</text:p>
          </table:table-cell>
          <table:table-cell table:style-name="ce1" office:value-type="float" office:value="107.097795496443">
            <text:p>107.097795496443</text:p>
          </table:table-cell>
          <table:table-cell table:style-name="ce1" office:value-type="float" office:value="108.886032337033">
            <text:p>108.886032337033</text:p>
          </table:table-cell>
          <table:table-cell table:style-name="ce1" office:value-type="float" office:value="102.861138304689">
            <text:p>102.861138304689</text:p>
          </table:table-cell>
          <table:table-cell table:style-name="ce1" office:value-type="float" office:value="90.6604836077261">
            <text:p>90.6604836077261</text:p>
          </table:table-cell>
          <table:table-cell table:style-name="ce1" office:value-type="float" office:value="104.06795955145">
            <text:p>104.06795955145</text:p>
          </table:table-cell>
          <table:table-cell table:number-columns-repeated="4"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float" office:value="84.2430427425066">
            <text:p>84.2430427425066</text:p>
          </table:table-cell>
          <table:table-cell table:style-name="ce1" office:value-type="float" office:value="77.7356779934732">
            <text:p>77.7356779934732</text:p>
          </table:table-cell>
          <table:table-cell table:style-name="ce1" office:value-type="float" office:value="78.5928365701154">
            <text:p>78.5928365701154</text:p>
          </table:table-cell>
          <table:table-cell table:style-name="ce1" office:value-type="float" office:value="77.1984412225372">
            <text:p>77.1984412225372</text:p>
          </table:table-cell>
          <table:table-cell table:style-name="ce1" office:value-type="float" office:value="65.7445539326236">
            <text:p>65.7445539326236</text:p>
          </table:table-cell>
          <table:table-cell table:style-name="ce1" office:value-type="float" office:value="76.7029104922512">
            <text:p>76.7029104922512</text:p>
          </table:table-cell>
          <table:table-cell table:number-columns-repeated="4"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float" office:value="60.556669982014">
            <text:p>60.556669982014</text:p>
          </table:table-cell>
          <table:table-cell table:style-name="ce1" office:value-type="float" office:value="56.1893759409344">
            <text:p>56.1893759409344</text:p>
          </table:table-cell>
          <table:table-cell table:style-name="ce1" office:value-type="float" office:value="58.4679862354497">
            <text:p>58.4679862354497</text:p>
          </table:table-cell>
          <table:table-cell table:style-name="ce1" office:value-type="float" office:value="54.690993781634">
            <text:p>54.690993781634</text:p>
          </table:table-cell>
          <table:table-cell table:style-name="ce1" office:value-type="float" office:value="42.7130223001758">
            <text:p>42.7130223001758</text:p>
          </table:table-cell>
          <table:table-cell table:style-name="ce1" office:value-type="float" office:value="54.5236096480416">
            <text:p>54.5236096480416</text:p>
          </table:table-cell>
          <table:table-cell table:number-columns-repeated="4"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float" office:value="45.8085510934054">
            <text:p>45.8085510934054</text:p>
          </table:table-cell>
          <table:table-cell table:style-name="ce1" office:value-type="float" office:value="40.1352685292389">
            <text:p>40.1352685292389</text:p>
          </table:table-cell>
          <table:table-cell table:style-name="ce1" office:value-type="float" office:value="43.2154680870715">
            <text:p>43.2154680870715</text:p>
          </table:table-cell>
          <table:table-cell table:style-name="ce1" office:value-type="float" office:value="39.3354455275599">
            <text:p>39.3354455275599</text:p>
          </table:table-cell>
          <table:table-cell table:style-name="ce1" office:value-type="float" office:value="29.9409911221821">
            <text:p>29.9409911221821</text:p>
          </table:table-cell>
          <table:table-cell table:style-name="ce1" office:value-type="float" office:value="39.6871448718916">
            <text:p>39.6871448718916</text:p>
          </table:table-cell>
          <table:table-cell table:number-columns-repeated="4"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float" office:value="34.1888210599563">
            <text:p>34.1888210599563</text:p>
          </table:table-cell>
          <table:table-cell table:style-name="ce1" office:value-type="float" office:value="27.4609732042161">
            <text:p>27.4609732042161</text:p>
          </table:table-cell>
          <table:table-cell table:style-name="ce1" office:value-type="float" office:value="28.8103120580477">
            <text:p>28.8103120580477</text:p>
          </table:table-cell>
          <table:table-cell table:style-name="ce1" office:value-type="float" office:value="25.2419971299849">
            <text:p>25.2419971299849</text:p>
          </table:table-cell>
          <table:table-cell table:style-name="ce1" office:value-type="float" office:value="19.0533579868431">
            <text:p>19.0533579868431</text:p>
          </table:table-cell>
          <table:table-cell table:style-name="ce1" office:value-type="float" office:value="26.9510922878096">
            <text:p>26.9510922878096</text:p>
          </table:table-cell>
          <table:table-cell table:number-columns-repeated="4"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float" office:value="22.1221783329129">
            <text:p>22.1221783329129</text:p>
          </table:table-cell>
          <table:table-cell table:style-name="ce1" office:value-type="float" office:value="19.6451577537853">
            <text:p>19.6451577537853</text:p>
          </table:table-cell>
          <table:table-cell table:style-name="ce1" office:value-type="float" office:value="20.1248503346657">
            <text:p>20.1248503346657</text:p>
          </table:table-cell>
          <table:table-cell table:style-name="ce1" office:value-type="float" office:value="16.4072981344902">
            <text:p>16.4072981344902</text:p>
          </table:table-cell>
          <table:table-cell table:style-name="ce1" office:value-type="float" office:value="12.5626536176988">
            <text:p>12.5626536176988</text:p>
          </table:table-cell>
          <table:table-cell table:style-name="ce1" office:value-type="float" office:value="18.1724276347106">
            <text:p>18.1724276347106</text:p>
          </table:table-cell>
          <table:table-cell table:number-columns-repeated="4"/>
          <table:table-cell table:style-name="ce1" office:value-type="float" office:value="5">
            <text:p>5</text:p>
          </table:table-cell>
        </table:table-row>
        <table:table-row table:number-rows-repeated="15">
          <table:table-cell table:number-columns-repeated="16"/>
        </table:table-row>
        <table:table-row>
          <table:table-cell/>
          <table:table-cell table:style-name="ce1" office:value-type="float" office:value="4.475147">
            <text:p>4.475147</text:p>
          </table:table-cell>
          <table:table-cell table:style-name="ce1" office:value-type="float" office:value="4.733991">
            <text:p>4.733991</text:p>
          </table:table-cell>
          <table:table-cell table:style-name="ce1" office:value-type="float" office:value="4.720532">
            <text:p>4.720532</text:p>
          </table:table-cell>
          <table:table-cell table:style-name="ce1" office:value-type="float" office:value="4.753982">
            <text:p>4.753982</text:p>
          </table:table-cell>
          <table:table-cell table:style-name="ce1" office:value-type="float" office:value="4.776061">
            <text:p>4.776061</text:p>
          </table:table-cell>
          <table:table-cell table:style-name="ce1" office:value-type="float" office:value="4.756581">
            <text:p>4.756581</text:p>
          </table:table-cell>
          <table:table-cell table:style-name="ce1" office:value-type="float" office:value="5.071365">
            <text:p>5.071365</text:p>
          </table:table-cell>
          <table:table-cell table:style-name="ce1" office:value-type="float" office:value="5.012042">
            <text:p>5.012042</text:p>
          </table:table-cell>
          <table:table-cell table:style-name="ce1" office:value-type="float" office:value="5.064873">
            <text:p>5.064873</text:p>
          </table:table-cell>
          <table:table-cell table:style-name="ce1" office:value-type="float" office:value="5.038718">
            <text:p>5.038718</text:p>
          </table:table-cell>
          <table:table-cell table:style-name="ce1" office:value-type="float" office:value="4.489153">
            <text:p>4.489153</text:p>
          </table:table-cell>
          <table:table-cell table:style-name="ce1" office:value-type="float" office:value="4.796755">
            <text:p>4.796755</text:p>
          </table:table-cell>
          <table:table-cell table:style-name="ce1" office:value-type="float" office:value="4.784308">
            <text:p>4.784308</text:p>
          </table:table-cell>
          <table:table-cell table:style-name="ce1" office:value-type="float" office:value="4.787062">
            <text:p>4.787062</text:p>
          </table:table-cell>
          <table:table-cell table:style-name="ce1" office:value-type="float" office:value="4.805943">
            <text:p>4.805943</text:p>
          </table:table-cell>
        </table:table-row>
        <table:table-row>
          <table:table-cell table:style-name="ce1" office:value-type="float" office:value="4">
            <text:p>4</text:p>
          </table:table-cell>
          <table:table-cell table:style-name="ce1" office:value-type="float" office:value="64899">
            <text:p>64899</text:p>
          </table:table-cell>
          <table:table-cell table:style-name="ce1" office:value-type="float" office:value="68924">
            <text:p>68924</text:p>
          </table:table-cell>
          <table:table-cell table:style-name="ce1" office:value-type="float" office:value="68636">
            <text:p>68636</text:p>
          </table:table-cell>
          <table:table-cell table:style-name="ce1" office:value-type="float" office:value="68505">
            <text:p>68505</text:p>
          </table:table-cell>
          <table:table-cell table:style-name="ce1" office:value-type="float" office:value="68193">
            <text:p>68193</text:p>
          </table:table-cell>
          <table:table-cell table:style-name="ce1" office:value-type="float" office:value="51992">
            <text:p>51992</text:p>
          </table:table-cell>
          <table:table-cell table:style-name="ce1" office:value-type="float" office:value="53940">
            <text:p>53940</text:p>
          </table:table-cell>
          <table:table-cell table:style-name="ce1" office:value-type="float" office:value="53282">
            <text:p>53282</text:p>
          </table:table-cell>
          <table:table-cell table:style-name="ce1" office:value-type="float" office:value="53242">
            <text:p>53242</text:p>
          </table:table-cell>
          <table:table-cell table:style-name="ce1" office:value-type="float" office:value="53515">
            <text:p>53515</text:p>
          </table:table-cell>
          <table:table-cell table:style-name="ce1" office:value-type="float" office:value="48799">
            <text:p>48799</text:p>
          </table:table-cell>
          <table:table-cell table:style-name="ce1" office:value-type="float" office:value="51430">
            <text:p>51430</text:p>
          </table:table-cell>
          <table:table-cell table:style-name="ce1" office:value-type="float" office:value="51700">
            <text:p>51700</text:p>
          </table:table-cell>
          <table:table-cell table:style-name="ce1" office:value-type="float" office:value="51740">
            <text:p>51740</text:p>
          </table:table-cell>
          <table:table-cell table:style-name="ce1" office:value-type="float" office:value="51082">
            <text:p>51082</text:p>
          </table:table-cell>
        </table:table-row>
        <table:table-row>
          <table:table-cell table:style-name="ce1" office:value-type="float" office:value="5">
            <text:p>5</text:p>
          </table:table-cell>
          <table:table-cell table:style-name="ce1" office:value-type="float" office:value="56257">
            <text:p>56257</text:p>
          </table:table-cell>
          <table:table-cell table:style-name="ce1" office:value-type="float" office:value="59891">
            <text:p>59891</text:p>
          </table:table-cell>
          <table:table-cell table:style-name="ce1" office:value-type="float" office:value="59326">
            <text:p>59326</text:p>
          </table:table-cell>
          <table:table-cell table:style-name="ce1" office:value-type="float" office:value="59295">
            <text:p>59295</text:p>
          </table:table-cell>
          <table:table-cell table:style-name="ce1" office:value-type="float" office:value="59066">
            <text:p>59066</text:p>
          </table:table-cell>
          <table:table-cell table:style-name="ce1" office:value-type="float" office:value="44162">
            <text:p>44162</text:p>
          </table:table-cell>
          <table:table-cell table:style-name="ce1" office:value-type="float" office:value="45794">
            <text:p>45794</text:p>
          </table:table-cell>
          <table:table-cell table:style-name="ce1" office:value-type="float" office:value="45123">
            <text:p>45123</text:p>
          </table:table-cell>
          <table:table-cell table:style-name="ce1" office:value-type="float" office:value="45104">
            <text:p>45104</text:p>
          </table:table-cell>
          <table:table-cell table:style-name="ce1" office:value-type="float" office:value="45370">
            <text:p>45370</text:p>
          </table:table-cell>
          <table:table-cell table:style-name="ce1" office:value-type="float" office:value="41290">
            <text:p>41290</text:p>
          </table:table-cell>
          <table:table-cell table:style-name="ce1" office:value-type="float" office:value="43593">
            <text:p>43593</text:p>
          </table:table-cell>
          <table:table-cell table:style-name="ce1" office:value-type="float" office:value="43713">
            <text:p>43713</text:p>
          </table:table-cell>
          <table:table-cell table:style-name="ce1" office:value-type="float" office:value="43834">
            <text:p>43834</text:p>
          </table:table-cell>
          <table:table-cell table:style-name="ce1" office:value-type="float" office:value="43237">
            <text:p>43237</text:p>
          </table:table-cell>
        </table:table-row>
        <table:table-row>
          <table:table-cell table:style-name="ce1" office:value-type="float" office:value="6">
            <text:p>6</text:p>
          </table:table-cell>
          <table:table-cell table:style-name="ce1" office:value-type="float" office:value="48583">
            <text:p>48583</text:p>
          </table:table-cell>
          <table:table-cell table:style-name="ce1" office:value-type="float" office:value="51654">
            <text:p>51654</text:p>
          </table:table-cell>
          <table:table-cell table:style-name="ce1" office:value-type="float" office:value="51300">
            <text:p>51300</text:p>
          </table:table-cell>
          <table:table-cell table:style-name="ce1" office:value-type="float" office:value="51080">
            <text:p>51080</text:p>
          </table:table-cell>
          <table:table-cell table:style-name="ce1" office:value-type="float" office:value="50920">
            <text:p>50920</text:p>
          </table:table-cell>
          <table:table-cell table:style-name="ce1" office:value-type="float" office:value="37475">
            <text:p>37475</text:p>
          </table:table-cell>
          <table:table-cell table:style-name="ce1" office:value-type="float" office:value="38947">
            <text:p>38947</text:p>
          </table:table-cell>
          <table:table-cell table:style-name="ce1" office:value-type="float" office:value="38027">
            <text:p>38027</text:p>
          </table:table-cell>
          <table:table-cell table:style-name="ce1" office:value-type="float" office:value="38178">
            <text:p>38178</text:p>
          </table:table-cell>
          <table:table-cell table:style-name="ce1" office:value-type="float" office:value="38360">
            <text:p>38360</text:p>
          </table:table-cell>
          <table:table-cell table:style-name="ce1" office:value-type="float" office:value="34958">
            <text:p>34958</text:p>
          </table:table-cell>
          <table:table-cell table:style-name="ce1" office:value-type="float" office:value="36844">
            <text:p>36844</text:p>
          </table:table-cell>
          <table:table-cell table:style-name="ce1" office:value-type="float" office:value="36893">
            <text:p>36893</text:p>
          </table:table-cell>
          <table:table-cell table:style-name="ce1" office:value-type="float" office:value="36888">
            <text:p>36888</text:p>
          </table:table-cell>
          <table:table-cell table:style-name="ce1" office:value-type="float" office:value="36437">
            <text:p>36437</text:p>
          </table:table-cell>
        </table:table-row>
        <table:table-row>
          <table:table-cell table:style-name="ce1" office:value-type="float" office:value="7">
            <text:p>7</text:p>
          </table:table-cell>
          <table:table-cell table:style-name="ce1" office:value-type="float" office:value="42357">
            <text:p>42357</text:p>
          </table:table-cell>
          <table:table-cell table:style-name="ce1" office:value-type="float" office:value="44994">
            <text:p>44994</text:p>
          </table:table-cell>
          <table:table-cell table:style-name="ce1" office:value-type="float" office:value="44741">
            <text:p>44741</text:p>
          </table:table-cell>
          <table:table-cell table:style-name="ce1" office:value-type="float" office:value="44589">
            <text:p>44589</text:p>
          </table:table-cell>
          <table:table-cell table:style-name="ce1" office:value-type="float" office:value="44350">
            <text:p>44350</text:p>
          </table:table-cell>
          <table:table-cell table:style-name="ce1" office:value-type="float" office:value="31043">
            <text:p>31043</text:p>
          </table:table-cell>
          <table:table-cell table:style-name="ce1" office:value-type="float" office:value="32225">
            <text:p>32225</text:p>
          </table:table-cell>
          <table:table-cell table:style-name="ce1" office:value-type="float" office:value="31585">
            <text:p>31585</text:p>
          </table:table-cell>
          <table:table-cell table:style-name="ce1" office:value-type="float" office:value="31520">
            <text:p>31520</text:p>
          </table:table-cell>
          <table:table-cell table:style-name="ce1" office:value-type="float" office:value="31829">
            <text:p>31829</text:p>
          </table:table-cell>
          <table:table-cell table:style-name="ce1" office:value-type="float" office:value="28935">
            <text:p>28935</text:p>
          </table:table-cell>
          <table:table-cell table:style-name="ce1" office:value-type="float" office:value="30427">
            <text:p>30427</text:p>
          </table:table-cell>
          <table:table-cell table:style-name="ce1" office:value-type="float" office:value="30431">
            <text:p>30431</text:p>
          </table:table-cell>
          <table:table-cell table:style-name="ce1" office:value-type="float" office:value="30572">
            <text:p>30572</text:p>
          </table:table-cell>
          <table:table-cell table:style-name="ce1" office:value-type="float" office:value="30152">
            <text:p>30152</text:p>
          </table:table-cell>
        </table:table-row>
        <table:table-row>
          <table:table-cell table:style-name="ce1" office:value-type="float" office:value="8">
            <text:p>8</text:p>
          </table:table-cell>
          <table:table-cell table:style-name="ce1" office:value-type="float" office:value="36098">
            <text:p>36098</text:p>
          </table:table-cell>
          <table:table-cell table:style-name="ce1" office:value-type="float" office:value="38325">
            <text:p>38325</text:p>
          </table:table-cell>
          <table:table-cell table:style-name="ce1" office:value-type="float" office:value="38238">
            <text:p>38238</text:p>
          </table:table-cell>
          <table:table-cell table:style-name="ce1" office:value-type="float" office:value="38152">
            <text:p>38152</text:p>
          </table:table-cell>
          <table:table-cell table:style-name="ce1" office:value-type="float" office:value="37745">
            <text:p>37745</text:p>
          </table:table-cell>
          <table:table-cell table:style-name="ce1" office:value-type="float" office:value="25259">
            <text:p>25259</text:p>
          </table:table-cell>
          <table:table-cell table:style-name="ce1" office:value-type="float" office:value="26108">
            <text:p>26108</text:p>
          </table:table-cell>
          <table:table-cell table:style-name="ce1" office:value-type="float" office:value="25521">
            <text:p>25521</text:p>
          </table:table-cell>
          <table:table-cell table:style-name="ce1" office:value-type="float" office:value="25513">
            <text:p>25513</text:p>
          </table:table-cell>
          <table:table-cell table:style-name="ce1" office:value-type="float" office:value="25681">
            <text:p>25681</text:p>
          </table:table-cell>
          <table:table-cell table:style-name="ce1" office:value-type="float" office:value="23457">
            <text:p>23457</text:p>
          </table:table-cell>
          <table:table-cell table:style-name="ce1" office:value-type="float" office:value="24711">
            <text:p>24711</text:p>
          </table:table-cell>
          <table:table-cell table:style-name="ce1" office:value-type="float" office:value="24555">
            <text:p>24555</text:p>
          </table:table-cell>
          <table:table-cell table:style-name="ce1" office:value-type="float" office:value="24775">
            <text:p>24775</text:p>
          </table:table-cell>
          <table:table-cell table:style-name="ce1" office:value-type="float" office:value="24275">
            <text:p>24275</text:p>
          </table:table-cell>
        </table:table-row>
        <table:table-row>
          <table:table-cell table:style-name="ce1" office:value-type="float" office:value="9">
            <text:p>9</text:p>
          </table:table-cell>
          <table:table-cell table:style-name="ce1" office:value-type="float" office:value="30748">
            <text:p>30748</text:p>
          </table:table-cell>
          <table:table-cell table:style-name="ce1" office:value-type="float" office:value="32797">
            <text:p>32797</text:p>
          </table:table-cell>
          <table:table-cell table:style-name="ce1" office:value-type="float" office:value="32878">
            <text:p>32878</text:p>
          </table:table-cell>
          <table:table-cell table:style-name="ce1" office:value-type="float" office:value="32731">
            <text:p>32731</text:p>
          </table:table-cell>
          <table:table-cell table:style-name="ce1" office:value-type="float" office:value="32349">
            <text:p>32349</text:p>
          </table:table-cell>
          <table:table-cell table:style-name="ce1" office:value-type="float" office:value="20297">
            <text:p>20297</text:p>
          </table:table-cell>
          <table:table-cell table:style-name="ce1" office:value-type="float" office:value="20964">
            <text:p>20964</text:p>
          </table:table-cell>
          <table:table-cell table:style-name="ce1" office:value-type="float" office:value="20399">
            <text:p>20399</text:p>
          </table:table-cell>
          <table:table-cell table:style-name="ce1" office:value-type="float" office:value="20516">
            <text:p>20516</text:p>
          </table:table-cell>
          <table:table-cell table:style-name="ce1" office:value-type="float" office:value="20586">
            <text:p>20586</text:p>
          </table:table-cell>
          <table:table-cell table:style-name="ce1" office:value-type="float" office:value="18805">
            <text:p>18805</text:p>
          </table:table-cell>
          <table:table-cell table:style-name="ce1" office:value-type="float" office:value="19755">
            <text:p>19755</text:p>
          </table:table-cell>
          <table:table-cell table:style-name="ce1" office:value-type="float" office:value="19605">
            <text:p>19605</text:p>
          </table:table-cell>
          <table:table-cell table:style-name="ce1" office:value-type="float" office:value="19787">
            <text:p>19787</text:p>
          </table:table-cell>
          <table:table-cell table:style-name="ce1" office:value-type="float" office:value="19480">
            <text:p>19480</text:p>
          </table:table-cell>
        </table:table-row>
        <table:table-row>
          <table:table-cell table:style-name="ce1" office:value-type="float" office:value="10">
            <text:p>10</text:p>
          </table:table-cell>
          <table:table-cell table:style-name="ce1" office:value-type="float" office:value="26004">
            <text:p>26004</text:p>
          </table:table-cell>
          <table:table-cell table:style-name="ce1" office:value-type="float" office:value="27802">
            <text:p>27802</text:p>
          </table:table-cell>
          <table:table-cell table:style-name="ce1" office:value-type="float" office:value="27813">
            <text:p>27813</text:p>
          </table:table-cell>
          <table:table-cell table:style-name="ce1" office:value-type="float" office:value="27635">
            <text:p>27635</text:p>
          </table:table-cell>
          <table:table-cell table:style-name="ce1" office:value-type="float" office:value="27427">
            <text:p>27427</text:p>
          </table:table-cell>
          <table:table-cell table:style-name="ce1" office:value-type="float" office:value="16224">
            <text:p>16224</text:p>
          </table:table-cell>
          <table:table-cell table:style-name="ce1" office:value-type="float" office:value="16855">
            <text:p>16855</text:p>
          </table:table-cell>
          <table:table-cell table:style-name="ce1" office:value-type="float" office:value="16422">
            <text:p>16422</text:p>
          </table:table-cell>
          <table:table-cell table:style-name="ce1" office:value-type="float" office:value="16577">
            <text:p>16577</text:p>
          </table:table-cell>
          <table:table-cell table:style-name="ce1" office:value-type="float" office:value="16497">
            <text:p>16497</text:p>
          </table:table-cell>
          <table:table-cell table:style-name="ce1" office:value-type="float" office:value="15210">
            <text:p>15210</text:p>
          </table:table-cell>
          <table:table-cell table:style-name="ce1" office:value-type="float" office:value="15912">
            <text:p>15912</text:p>
          </table:table-cell>
          <table:table-cell table:style-name="ce1" office:value-type="float" office:value="15753">
            <text:p>15753</text:p>
          </table:table-cell>
          <table:table-cell table:style-name="ce1" office:value-type="float" office:value="15881">
            <text:p>15881</text:p>
          </table:table-cell>
          <table:table-cell table:style-name="ce1" office:value-type="float" office:value="15548">
            <text:p>15548</text:p>
          </table:table-cell>
        </table:table-row>
        <table:table-row>
          <table:table-cell table:style-name="ce1" office:value-type="float" office:value="11">
            <text:p>11</text:p>
          </table:table-cell>
          <table:table-cell table:style-name="ce1" office:value-type="float" office:value="21787">
            <text:p>21787</text:p>
          </table:table-cell>
          <table:table-cell table:style-name="ce1" office:value-type="float" office:value="23373">
            <text:p>23373</text:p>
          </table:table-cell>
          <table:table-cell table:style-name="ce1" office:value-type="float" office:value="23371">
            <text:p>23371</text:p>
          </table:table-cell>
          <table:table-cell table:style-name="ce1" office:value-type="float" office:value="23172">
            <text:p>23172</text:p>
          </table:table-cell>
          <table:table-cell table:style-name="ce1" office:value-type="float" office:value="22930">
            <text:p>22930</text:p>
          </table:table-cell>
          <table:table-cell table:style-name="ce1" office:value-type="float" office:value="12946">
            <text:p>12946</text:p>
          </table:table-cell>
          <table:table-cell table:style-name="ce1" office:value-type="float" office:value="13488">
            <text:p>13488</text:p>
          </table:table-cell>
          <table:table-cell table:style-name="ce1" office:value-type="float" office:value="13079">
            <text:p>13079</text:p>
          </table:table-cell>
          <table:table-cell table:style-name="ce1" office:value-type="float" office:value="13247">
            <text:p>13247</text:p>
          </table:table-cell>
          <table:table-cell table:style-name="ce1" office:value-type="float" office:value="13212">
            <text:p>13212</text:p>
          </table:table-cell>
          <table:table-cell table:style-name="ce1" office:value-type="float" office:value="12182">
            <text:p>12182</text:p>
          </table:table-cell>
          <table:table-cell table:style-name="ce1" office:value-type="float" office:value="12725">
            <text:p>12725</text:p>
          </table:table-cell>
          <table:table-cell table:style-name="ce1" office:value-type="float" office:value="12592">
            <text:p>12592</text:p>
          </table:table-cell>
          <table:table-cell table:style-name="ce1" office:value-type="float" office:value="12734">
            <text:p>12734</text:p>
          </table:table-cell>
          <table:table-cell table:style-name="ce1" office:value-type="float" office:value="12308">
            <text:p>12308</text:p>
          </table:table-cell>
        </table:table-row>
        <table:table-row>
          <table:table-cell table:style-name="ce1" office:value-type="float" office:value="12">
            <text:p>12</text:p>
          </table:table-cell>
          <table:table-cell table:style-name="ce1" office:value-type="float" office:value="17875">
            <text:p>17875</text:p>
          </table:table-cell>
          <table:table-cell table:style-name="ce1" office:value-type="float" office:value="19353">
            <text:p>19353</text:p>
          </table:table-cell>
          <table:table-cell table:style-name="ce1" office:value-type="float" office:value="19274">
            <text:p>19274</text:p>
          </table:table-cell>
          <table:table-cell table:style-name="ce1" office:value-type="float" office:value="19142">
            <text:p>19142</text:p>
          </table:table-cell>
          <table:table-cell table:style-name="ce1" office:value-type="float" office:value="19006">
            <text:p>19006</text:p>
          </table:table-cell>
          <table:table-cell table:style-name="ce1" office:value-type="float" office:value="10520">
            <text:p>10520</text:p>
          </table:table-cell>
          <table:table-cell table:style-name="ce1" office:value-type="float" office:value="10955">
            <text:p>10955</text:p>
          </table:table-cell>
          <table:table-cell table:style-name="ce1" office:value-type="float" office:value="10513">
            <text:p>10513</text:p>
          </table:table-cell>
          <table:table-cell table:style-name="ce1" office:value-type="float" office:value="10759">
            <text:p>10759</text:p>
          </table:table-cell>
          <table:table-cell table:style-name="ce1" office:value-type="float" office:value="10718">
            <text:p>10718</text:p>
          </table:table-cell>
          <table:table-cell table:style-name="ce1" office:value-type="float" office:value="9996">
            <text:p>9996</text:p>
          </table:table-cell>
          <table:table-cell table:style-name="ce1" office:value-type="float" office:value="10304">
            <text:p>10304</text:p>
          </table:table-cell>
          <table:table-cell table:style-name="ce1" office:value-type="float" office:value="10245">
            <text:p>10245</text:p>
          </table:table-cell>
          <table:table-cell table:style-name="ce1" office:value-type="float" office:value="10331">
            <text:p>10331</text:p>
          </table:table-cell>
          <table:table-cell table:style-name="ce1" office:value-type="float" office:value="10024">
            <text:p>10024</text:p>
          </table:table-cell>
        </table:table-row>
        <table:table-row>
          <table:table-cell table:style-name="ce1" office:value-type="float" office:value="13">
            <text:p>13</text:p>
          </table:table-cell>
          <table:table-cell table:style-name="ce1" office:value-type="float" office:value="14542">
            <text:p>14542</text:p>
          </table:table-cell>
          <table:table-cell table:style-name="ce1" office:value-type="float" office:value="15773">
            <text:p>15773</text:p>
          </table:table-cell>
          <table:table-cell table:style-name="ce1" office:value-type="float" office:value="15774">
            <text:p>15774</text:p>
          </table:table-cell>
          <table:table-cell table:style-name="ce1" office:value-type="float" office:value="15562">
            <text:p>15562</text:p>
          </table:table-cell>
          <table:table-cell table:style-name="ce1" office:value-type="float" office:value="15566">
            <text:p>15566</text:p>
          </table:table-cell>
          <table:table-cell table:style-name="ce1" office:value-type="float" office:value="8652">
            <text:p>8652</text:p>
          </table:table-cell>
          <table:table-cell table:style-name="ce1" office:value-type="float" office:value="8885">
            <text:p>8885</text:p>
          </table:table-cell>
          <table:table-cell table:style-name="ce1" office:value-type="float" office:value="8628">
            <text:p>8628</text:p>
          </table:table-cell>
          <table:table-cell table:style-name="ce1" office:value-type="float" office:value="8836">
            <text:p>8836</text:p>
          </table:table-cell>
          <table:table-cell table:style-name="ce1" office:value-type="float" office:value="8798">
            <text:p>8798</text:p>
          </table:table-cell>
          <table:table-cell table:style-name="ce1" office:value-type="float" office:value="8154">
            <text:p>8154</text:p>
          </table:table-cell>
          <table:table-cell table:style-name="ce1" office:value-type="float" office:value="8488">
            <text:p>8488</text:p>
          </table:table-cell>
          <table:table-cell table:style-name="ce1" office:value-type="float" office:value="8383">
            <text:p>8383</text:p>
          </table:table-cell>
          <table:table-cell table:style-name="ce1" office:value-type="float" office:value="8478">
            <text:p>8478</text:p>
          </table:table-cell>
          <table:table-cell table:style-name="ce1" office:value-type="float" office:value="8259">
            <text:p>8259</text:p>
          </table:table-cell>
        </table:table-row>
        <table:table-row>
          <table:table-cell table:style-name="ce1" office:value-type="float" office:value="14">
            <text:p>14</text:p>
          </table:table-cell>
          <table:table-cell table:style-name="ce1" office:value-type="float" office:value="11660">
            <text:p>11660</text:p>
          </table:table-cell>
          <table:table-cell table:style-name="ce1" office:value-type="float" office:value="12639">
            <text:p>12639</text:p>
          </table:table-cell>
          <table:table-cell table:style-name="ce1" office:value-type="float" office:value="12567">
            <text:p>12567</text:p>
          </table:table-cell>
          <table:table-cell table:style-name="ce1" office:value-type="float" office:value="12452">
            <text:p>12452</text:p>
          </table:table-cell>
          <table:table-cell table:style-name="ce1" office:value-type="float" office:value="12403">
            <text:p>12403</text:p>
          </table:table-cell>
          <table:table-cell table:style-name="ce1" office:value-type="float" office:value="7252">
            <text:p>7252</text:p>
          </table:table-cell>
          <table:table-cell table:style-name="ce1" office:value-type="float" office:value="7357">
            <text:p>7357</text:p>
          </table:table-cell>
          <table:table-cell table:style-name="ce1" office:value-type="float" office:value="7090">
            <text:p>7090</text:p>
          </table:table-cell>
          <table:table-cell table:style-name="ce1" office:value-type="float" office:value="7375">
            <text:p>7375</text:p>
          </table:table-cell>
          <table:table-cell table:style-name="ce1" office:value-type="float" office:value="7357">
            <text:p>7357</text:p>
          </table:table-cell>
          <table:table-cell table:style-name="ce1" office:value-type="float" office:value="6800">
            <text:p>6800</text:p>
          </table:table-cell>
          <table:table-cell table:style-name="ce1" office:value-type="float" office:value="7093">
            <text:p>7093</text:p>
          </table:table-cell>
          <table:table-cell table:style-name="ce1" office:value-type="float" office:value="7006">
            <text:p>7006</text:p>
          </table:table-cell>
          <table:table-cell table:style-name="ce1" office:value-type="float" office:value="7050">
            <text:p>7050</text:p>
          </table:table-cell>
          <table:table-cell table:style-name="ce1" office:value-type="float" office:value="6873">
            <text:p>6873</text:p>
          </table:table-cell>
        </table:table-row>
        <table:table-row>
          <table:table-cell table:style-name="ce1" office:value-type="float" office:value="15">
            <text:p>15</text:p>
          </table:table-cell>
          <table:table-cell table:style-name="ce1" office:value-type="float" office:value="9114">
            <text:p>9114</text:p>
          </table:table-cell>
          <table:table-cell table:style-name="ce1" office:value-type="float" office:value="9941">
            <text:p>9941</text:p>
          </table:table-cell>
          <table:table-cell table:style-name="ce1" office:value-type="float" office:value="9882">
            <text:p>9882</text:p>
          </table:table-cell>
          <table:table-cell table:style-name="ce1" office:value-type="float" office:value="9709">
            <text:p>9709</text:p>
          </table:table-cell>
          <table:table-cell table:style-name="ce1" office:value-type="float" office:value="9701">
            <text:p>9701</text:p>
          </table:table-cell>
          <table:table-cell table:style-name="ce1" office:value-type="float" office:value="6112">
            <text:p>6112</text:p>
          </table:table-cell>
          <table:table-cell table:style-name="ce1" office:value-type="float" office:value="6162">
            <text:p>6162</text:p>
          </table:table-cell>
          <table:table-cell table:style-name="ce1" office:value-type="float" office:value="6017">
            <text:p>6017</text:p>
          </table:table-cell>
          <table:table-cell table:style-name="ce1" office:value-type="float" office:value="6229">
            <text:p>6229</text:p>
          </table:table-cell>
          <table:table-cell table:style-name="ce1" office:value-type="float" office:value="6203">
            <text:p>6203</text:p>
          </table:table-cell>
          <table:table-cell table:style-name="ce1" office:value-type="float" office:value="5768">
            <text:p>5768</text:p>
          </table:table-cell>
          <table:table-cell table:style-name="ce1" office:value-type="float" office:value="5971">
            <text:p>5971</text:p>
          </table:table-cell>
          <table:table-cell table:style-name="ce1" office:value-type="float" office:value="5927">
            <text:p>5927</text:p>
          </table:table-cell>
          <table:table-cell table:style-name="ce1" office:value-type="float" office:value="5962">
            <text:p>5962</text:p>
          </table:table-cell>
          <table:table-cell table:style-name="ce1" office:value-type="float" office:value="5781">
            <text:p>5781</text:p>
          </table:table-cell>
        </table:table-row>
        <table:table-row>
          <table:table-cell table:style-name="ce1" office:value-type="float" office:value="16">
            <text:p>16</text:p>
          </table:table-cell>
          <table:table-cell table:style-name="ce1" office:value-type="float" office:value="7062">
            <text:p>7062</text:p>
          </table:table-cell>
          <table:table-cell table:style-name="ce1" office:value-type="float" office:value="7694">
            <text:p>7694</text:p>
          </table:table-cell>
          <table:table-cell table:style-name="ce1" office:value-type="float" office:value="7682">
            <text:p>7682</text:p>
          </table:table-cell>
          <table:table-cell table:style-name="ce1" office:value-type="float" office:value="7426">
            <text:p>7426</text:p>
          </table:table-cell>
          <table:table-cell table:style-name="ce1" office:value-type="float" office:value="7485">
            <text:p>7485</text:p>
          </table:table-cell>
          <table:table-cell table:style-name="ce1" office:value-type="float" office:value="5255">
            <text:p>5255</text:p>
          </table:table-cell>
          <table:table-cell table:style-name="ce1" office:value-type="float" office:value="5297">
            <text:p>5297</text:p>
          </table:table-cell>
          <table:table-cell table:style-name="ce1" office:value-type="float" office:value="5110">
            <text:p>5110</text:p>
          </table:table-cell>
          <table:table-cell table:style-name="ce1" office:value-type="float" office:value="5302">
            <text:p>5302</text:p>
          </table:table-cell>
          <table:table-cell table:style-name="ce1" office:value-type="float" office:value="5289">
            <text:p>5289</text:p>
          </table:table-cell>
          <table:table-cell table:style-name="ce1" office:value-type="float" office:value="4988">
            <text:p>4988</text:p>
          </table:table-cell>
          <table:table-cell table:style-name="ce1" office:value-type="float" office:value="5145">
            <text:p>5145</text:p>
          </table:table-cell>
          <table:table-cell table:style-name="ce1" office:value-type="float" office:value="5042">
            <text:p>5042</text:p>
          </table:table-cell>
          <table:table-cell table:style-name="ce1" office:value-type="float" office:value="5076">
            <text:p>5076</text:p>
          </table:table-cell>
          <table:table-cell table:style-name="ce1" office:value-type="float" office:value="4928">
            <text:p>4928</text:p>
          </table:table-cell>
        </table:table-row>
        <table:table-row>
          <table:table-cell table:style-name="ce1" office:value-type="float" office:value="17">
            <text:p>17</text:p>
          </table:table-cell>
          <table:table-cell table:style-name="ce1" office:value-type="float" office:value="5386">
            <text:p>5386</text:p>
          </table:table-cell>
          <table:table-cell table:style-name="ce1" office:value-type="float" office:value="5910">
            <text:p>5910</text:p>
          </table:table-cell>
          <table:table-cell table:style-name="ce1" office:value-type="float" office:value="5909">
            <text:p>5909</text:p>
          </table:table-cell>
          <table:table-cell table:style-name="ce1" office:value-type="float" office:value="5640">
            <text:p>5640</text:p>
          </table:table-cell>
          <table:table-cell table:style-name="ce1" office:value-type="float" office:value="5698">
            <text:p>5698</text:p>
          </table:table-cell>
          <table:table-cell table:style-name="ce1" office:value-type="float" office:value="4528">
            <text:p>4528</text:p>
          </table:table-cell>
          <table:table-cell table:style-name="ce1" office:value-type="float" office:value="4590">
            <text:p>4590</text:p>
          </table:table-cell>
          <table:table-cell table:style-name="ce1" office:value-type="float" office:value="4442">
            <text:p>4442</text:p>
          </table:table-cell>
          <table:table-cell table:style-name="ce1" office:value-type="float" office:value="4576">
            <text:p>4576</text:p>
          </table:table-cell>
          <table:table-cell table:style-name="ce1" office:value-type="float" office:value="4562">
            <text:p>4562</text:p>
          </table:table-cell>
          <table:table-cell table:style-name="ce1" office:value-type="float" office:value="4285">
            <text:p>4285</text:p>
          </table:table-cell>
          <table:table-cell table:style-name="ce1" office:value-type="float" office:value="4466">
            <text:p>4466</text:p>
          </table:table-cell>
          <table:table-cell table:style-name="ce1" office:value-type="float" office:value="4373">
            <text:p>4373</text:p>
          </table:table-cell>
          <table:table-cell table:style-name="ce1" office:value-type="float" office:value="4357">
            <text:p>4357</text:p>
          </table:table-cell>
          <table:table-cell table:style-name="ce1" office:value-type="float" office:value="4289">
            <text:p>4289</text:p>
          </table:table-cell>
        </table:table-row>
        <table:table-row>
          <table:table-cell table:style-name="ce1" office:value-type="float" office:value="18">
            <text:p>18</text:p>
          </table:table-cell>
          <table:table-cell table:style-name="ce1" office:value-type="float" office:value="4142">
            <text:p>4142</text:p>
          </table:table-cell>
          <table:table-cell table:style-name="ce1" office:value-type="float" office:value="4444">
            <text:p>4444</text:p>
          </table:table-cell>
          <table:table-cell table:style-name="ce1" office:value-type="float" office:value="4538">
            <text:p>4538</text:p>
          </table:table-cell>
          <table:table-cell table:style-name="ce1" office:value-type="float" office:value="4272">
            <text:p>4272</text:p>
          </table:table-cell>
          <table:table-cell table:style-name="ce1" office:value-type="float" office:value="4234">
            <text:p>4234</text:p>
          </table:table-cell>
          <table:table-cell table:style-name="ce1" office:value-type="float" office:value="3986">
            <text:p>3986</text:p>
          </table:table-cell>
          <table:table-cell table:style-name="ce1" office:value-type="float" office:value="4022">
            <text:p>4022</text:p>
          </table:table-cell>
          <table:table-cell table:style-name="ce1" office:value-type="float" office:value="3948">
            <text:p>3948</text:p>
          </table:table-cell>
          <table:table-cell table:style-name="ce1" office:value-type="float" office:value="4047">
            <text:p>4047</text:p>
          </table:table-cell>
          <table:table-cell table:style-name="ce1" office:value-type="float" office:value="3972">
            <text:p>3972</text:p>
          </table:table-cell>
          <table:table-cell table:style-name="ce1" office:value-type="float" office:value="3770">
            <text:p>3770</text:p>
          </table:table-cell>
          <table:table-cell table:style-name="ce1" office:value-type="float" office:value="3941">
            <text:p>3941</text:p>
          </table:table-cell>
          <table:table-cell table:style-name="ce1" office:value-type="float" office:value="3897">
            <text:p>3897</text:p>
          </table:table-cell>
          <table:table-cell table:style-name="ce1" office:value-type="float" office:value="3806">
            <text:p>3806</text:p>
          </table:table-cell>
          <table:table-cell table:style-name="ce1" office:value-type="float" office:value="3752">
            <text:p>3752</text:p>
          </table:table-cell>
        </table:table-row>
        <table:table-row>
          <table:table-cell table:style-name="ce1" office:value-type="float" office:value="19">
            <text:p>19</text:p>
          </table:table-cell>
          <table:table-cell table:style-name="ce1" office:value-type="float" office:value="3183">
            <text:p>3183</text:p>
          </table:table-cell>
          <table:table-cell table:style-name="ce1" office:value-type="float" office:value="3376">
            <text:p>3376</text:p>
          </table:table-cell>
          <table:table-cell table:style-name="ce1" office:value-type="float" office:value="3435">
            <text:p>3435</text:p>
          </table:table-cell>
          <table:table-cell table:style-name="ce1" office:value-type="float" office:value="3299">
            <text:p>3299</text:p>
          </table:table-cell>
          <table:table-cell table:style-name="ce1" office:value-type="float" office:value="3199">
            <text:p>3199</text:p>
          </table:table-cell>
          <table:table-cell table:style-name="ce1" office:value-type="float" office:value="3507">
            <text:p>3507</text:p>
          </table:table-cell>
          <table:table-cell table:style-name="ce1" office:value-type="float" office:value="3560">
            <text:p>3560</text:p>
          </table:table-cell>
          <table:table-cell table:style-name="ce1" office:value-type="float" office:value="3513">
            <text:p>3513</text:p>
          </table:table-cell>
          <table:table-cell table:style-name="ce1" office:value-type="float" office:value="3608">
            <text:p>3608</text:p>
          </table:table-cell>
          <table:table-cell table:style-name="ce1" office:value-type="float" office:value="3481">
            <text:p>3481</text:p>
          </table:table-cell>
          <table:table-cell table:style-name="ce1" office:value-type="float" office:value="3320">
            <text:p>3320</text:p>
          </table:table-cell>
          <table:table-cell table:style-name="ce1" office:value-type="float" office:value="3511">
            <text:p>3511</text:p>
          </table:table-cell>
          <table:table-cell table:style-name="ce1" office:value-type="float" office:value="3460">
            <text:p>3460</text:p>
          </table:table-cell>
          <table:table-cell table:style-name="ce1" office:value-type="float" office:value="3351">
            <text:p>3351</text:p>
          </table:table-cell>
          <table:table-cell table:style-name="ce1" office:value-type="float" office:value="3335">
            <text:p>3335</text:p>
          </table:table-cell>
        </table:table-row>
        <table:table-row>
          <table:table-cell table:style-name="ce1" office:value-type="float" office:value="20">
            <text:p>20</text:p>
          </table:table-cell>
          <table:table-cell table:style-name="ce1" office:value-type="float" office:value="2478">
            <text:p>2478</text:p>
          </table:table-cell>
          <table:table-cell table:style-name="ce1" office:value-type="float" office:value="2570">
            <text:p>2570</text:p>
          </table:table-cell>
          <table:table-cell table:style-name="ce1" office:value-type="float" office:value="2635">
            <text:p>2635</text:p>
          </table:table-cell>
          <table:table-cell table:style-name="ce1" office:value-type="float" office:value="2483">
            <text:p>2483</text:p>
          </table:table-cell>
          <table:table-cell table:style-name="ce1" office:value-type="float" office:value="2430">
            <text:p>2430</text:p>
          </table:table-cell>
          <table:table-cell table:style-name="ce1" office:value-type="float" office:value="3160">
            <text:p>3160</text:p>
          </table:table-cell>
          <table:table-cell table:style-name="ce1" office:value-type="float" office:value="3179">
            <text:p>3179</text:p>
          </table:table-cell>
          <table:table-cell table:style-name="ce1" office:value-type="float" office:value="3159">
            <text:p>3159</text:p>
          </table:table-cell>
          <table:table-cell table:style-name="ce1" office:value-type="float" office:value="3222">
            <text:p>3222</text:p>
          </table:table-cell>
          <table:table-cell table:style-name="ce1" office:value-type="float" office:value="3112">
            <text:p>3112</text:p>
          </table:table-cell>
          <table:table-cell table:style-name="ce1" office:value-type="float" office:value="2954">
            <text:p>2954</text:p>
          </table:table-cell>
          <table:table-cell table:style-name="ce1" office:value-type="float" office:value="3133">
            <text:p>3133</text:p>
          </table:table-cell>
          <table:table-cell table:style-name="ce1" office:value-type="float" office:value="3113">
            <text:p>3113</text:p>
          </table:table-cell>
          <table:table-cell table:style-name="ce1" office:value-type="float" office:value="3003">
            <text:p>3003</text:p>
          </table:table-cell>
          <table:table-cell table:style-name="ce1" office:value-type="float" office:value="2977">
            <text:p>2977</text:p>
          </table:table-cell>
        </table:table-row>
        <table:table-row>
          <table:table-cell table:style-name="ce1" office:value-type="float" office:value="21">
            <text:p>21</text:p>
          </table:table-cell>
          <table:table-cell table:style-name="ce1" office:value-type="float" office:value="1917">
            <text:p>1917</text:p>
          </table:table-cell>
          <table:table-cell table:style-name="ce1" office:value-type="float" office:value="1944">
            <text:p>1944</text:p>
          </table:table-cell>
          <table:table-cell table:style-name="ce1" office:value-type="float" office:value="2031">
            <text:p>2031</text:p>
          </table:table-cell>
          <table:table-cell table:style-name="ce1" office:value-type="float" office:value="1916">
            <text:p>1916</text:p>
          </table:table-cell>
          <table:table-cell table:style-name="ce1" office:value-type="float" office:value="1828">
            <text:p>1828</text:p>
          </table:table-cell>
          <table:table-cell table:style-name="ce1" office:value-type="float" office:value="2868">
            <text:p>2868</text:p>
          </table:table-cell>
          <table:table-cell table:style-name="ce1" office:value-type="float" office:value="2904">
            <text:p>2904</text:p>
          </table:table-cell>
          <table:table-cell table:style-name="ce1" office:value-type="float" office:value="2876">
            <text:p>2876</text:p>
          </table:table-cell>
          <table:table-cell table:style-name="ce1" office:value-type="float" office:value="2918">
            <text:p>2918</text:p>
          </table:table-cell>
          <table:table-cell table:style-name="ce1" office:value-type="float" office:value="2825">
            <text:p>2825</text:p>
          </table:table-cell>
          <table:table-cell table:style-name="ce1" office:value-type="float" office:value="2697">
            <text:p>2697</text:p>
          </table:table-cell>
          <table:table-cell table:style-name="ce1" office:value-type="float" office:value="2852">
            <text:p>2852</text:p>
          </table:table-cell>
          <table:table-cell table:style-name="ce1" office:value-type="float" office:value="2841">
            <text:p>2841</text:p>
          </table:table-cell>
          <table:table-cell table:style-name="ce1" office:value-type="float" office:value="2723">
            <text:p>2723</text:p>
          </table:table-cell>
          <table:table-cell table:style-name="ce1" office:value-type="float" office:value="2692">
            <text:p>2692</text:p>
          </table:table-cell>
        </table:table-row>
        <table:table-row>
          <table:table-cell table:style-name="ce1" office:value-type="float" office:value="22">
            <text:p>22</text:p>
          </table:table-cell>
          <table:table-cell table:style-name="ce1" office:value-type="float" office:value="1468">
            <text:p>1468</text:p>
          </table:table-cell>
          <table:table-cell table:style-name="ce1" office:value-type="float" office:value="1488">
            <text:p>1488</text:p>
          </table:table-cell>
          <table:table-cell table:style-name="ce1" office:value-type="float" office:value="1571">
            <text:p>1571</text:p>
          </table:table-cell>
          <table:table-cell table:style-name="ce1" office:value-type="float" office:value="1492">
            <text:p>1492</text:p>
          </table:table-cell>
          <table:table-cell table:style-name="ce1" office:value-type="float" office:value="1409">
            <text:p>1409</text:p>
          </table:table-cell>
          <table:table-cell table:style-name="ce1" office:value-type="float" office:value="2625">
            <text:p>2625</text:p>
          </table:table-cell>
          <table:table-cell table:style-name="ce1" office:value-type="float" office:value="2641">
            <text:p>2641</text:p>
          </table:table-cell>
          <table:table-cell table:style-name="ce1" office:value-type="float" office:value="2610">
            <text:p>2610</text:p>
          </table:table-cell>
          <table:table-cell table:style-name="ce1" office:value-type="float" office:value="2669">
            <text:p>2669</text:p>
          </table:table-cell>
          <table:table-cell table:style-name="ce1" office:value-type="float" office:value="2549">
            <text:p>2549</text:p>
          </table:table-cell>
          <table:table-cell table:style-name="ce1" office:value-type="float" office:value="2476">
            <text:p>2476</text:p>
          </table:table-cell>
          <table:table-cell table:style-name="ce1" office:value-type="float" office:value="2578">
            <text:p>2578</text:p>
          </table:table-cell>
          <table:table-cell table:style-name="ce1" office:value-type="float" office:value="2610">
            <text:p>2610</text:p>
          </table:table-cell>
          <table:table-cell table:style-name="ce1" office:value-type="float" office:value="2479">
            <text:p>2479</text:p>
          </table:table-cell>
          <table:table-cell table:style-name="ce1" office:value-type="float" office:value="2441">
            <text:p>2441</text:p>
          </table:table-cell>
        </table:table-row>
        <table:table-row>
          <table:table-cell table:style-name="ce1" office:value-type="float" office:value="23">
            <text:p>23</text:p>
          </table:table-cell>
          <table:table-cell table:style-name="ce1" office:value-type="float" office:value="1133">
            <text:p>1133</text:p>
          </table:table-cell>
          <table:table-cell table:style-name="ce1" office:value-type="float" office:value="1135">
            <text:p>1135</text:p>
          </table:table-cell>
          <table:table-cell table:style-name="ce1" office:value-type="float" office:value="1188">
            <text:p>1188</text:p>
          </table:table-cell>
          <table:table-cell table:style-name="ce1" office:value-type="float" office:value="1152">
            <text:p>1152</text:p>
          </table:table-cell>
          <table:table-cell table:style-name="ce1" office:value-type="float" office:value="1063">
            <text:p>1063</text:p>
          </table:table-cell>
          <table:table-cell table:style-name="ce1" office:value-type="float" office:value="2319">
            <text:p>2319</text:p>
          </table:table-cell>
          <table:table-cell table:style-name="ce1" office:value-type="float" office:value="2356">
            <text:p>2356</text:p>
          </table:table-cell>
          <table:table-cell table:style-name="ce1" office:value-type="float" office:value="2337">
            <text:p>2337</text:p>
          </table:table-cell>
          <table:table-cell table:style-name="ce1" office:value-type="float" office:value="2372">
            <text:p>2372</text:p>
          </table:table-cell>
          <table:table-cell table:style-name="ce1" office:value-type="float" office:value="2277">
            <text:p>2277</text:p>
          </table:table-cell>
          <table:table-cell table:style-name="ce1" office:value-type="float" office:value="2216">
            <text:p>2216</text:p>
          </table:table-cell>
          <table:table-cell table:style-name="ce1" office:value-type="float" office:value="2302">
            <text:p>2302</text:p>
          </table:table-cell>
          <table:table-cell table:style-name="ce1" office:value-type="float" office:value="2326">
            <text:p>2326</text:p>
          </table:table-cell>
          <table:table-cell table:style-name="ce1" office:value-type="float" office:value="2173">
            <text:p>2173</text:p>
          </table:table-cell>
          <table:table-cell table:style-name="ce1" office:value-type="float" office:value="2152">
            <text:p>2152</text:p>
          </table:table-cell>
        </table:table-row>
        <table:table-row>
          <table:table-cell table:style-name="ce1" office:value-type="float" office:value="24">
            <text:p>24</text:p>
          </table:table-cell>
          <table:table-cell table:style-name="ce1" office:value-type="float" office:value="874">
            <text:p>874</text:p>
          </table:table-cell>
          <table:table-cell table:style-name="ce1" office:value-type="float" office:value="868">
            <text:p>868</text:p>
          </table:table-cell>
          <table:table-cell table:style-name="ce1" office:value-type="float" office:value="892">
            <text:p>892</text:p>
          </table:table-cell>
          <table:table-cell table:style-name="ce1" office:value-type="float" office:value="902">
            <text:p>902</text:p>
          </table:table-cell>
          <table:table-cell table:style-name="ce1" office:value-type="float" office:value="773">
            <text:p>773</text:p>
          </table:table-cell>
          <table:table-cell table:style-name="ce1" office:value-type="float" office:value="1976">
            <text:p>1976</text:p>
          </table:table-cell>
          <table:table-cell table:style-name="ce1" office:value-type="float" office:value="2002">
            <text:p>2002</text:p>
          </table:table-cell>
          <table:table-cell table:style-name="ce1" office:value-type="float" office:value="1977">
            <text:p>1977</text:p>
          </table:table-cell>
          <table:table-cell table:style-name="ce1" office:value-type="float" office:value="2040">
            <text:p>2040</text:p>
          </table:table-cell>
          <table:table-cell table:style-name="ce1" office:value-type="float" office:value="1938">
            <text:p>1938</text:p>
          </table:table-cell>
          <table:table-cell table:style-name="ce1" office:value-type="float" office:value="1894">
            <text:p>1894</text:p>
          </table:table-cell>
          <table:table-cell table:style-name="ce1" office:value-type="float" office:value="1908">
            <text:p>1908</text:p>
          </table:table-cell>
          <table:table-cell table:style-name="ce1" office:value-type="float" office:value="1970">
            <text:p>1970</text:p>
          </table:table-cell>
          <table:table-cell table:style-name="ce1" office:value-type="float" office:value="1854">
            <text:p>1854</text:p>
          </table:table-cell>
          <table:table-cell table:style-name="ce1" office:value-type="float" office:value="1818">
            <text:p>1818</text:p>
          </table:table-cell>
        </table:table-row>
        <table:table-row>
          <table:table-cell table:style-name="ce1" office:value-type="float" office:value="25">
            <text:p>25</text:p>
          </table:table-cell>
          <table:table-cell table:style-name="ce1" office:value-type="float" office:value="664">
            <text:p>664</text:p>
          </table:table-cell>
          <table:table-cell table:style-name="ce1" office:value-type="float" office:value="658">
            <text:p>658</text:p>
          </table:table-cell>
          <table:table-cell table:style-name="ce1" office:value-type="float" office:value="677">
            <text:p>677</text:p>
          </table:table-cell>
          <table:table-cell table:style-name="ce1" office:value-type="float" office:value="670">
            <text:p>670</text:p>
          </table:table-cell>
          <table:table-cell table:style-name="ce1" office:value-type="float" office:value="586">
            <text:p>586</text:p>
          </table:table-cell>
          <table:table-cell table:style-name="ce1" office:value-type="float" office:value="1553">
            <text:p>1553</text:p>
          </table:table-cell>
          <table:table-cell table:style-name="ce1" office:value-type="float" office:value="1563">
            <text:p>1563</text:p>
          </table:table-cell>
          <table:table-cell table:style-name="ce1" office:value-type="float" office:value="1540">
            <text:p>1540</text:p>
          </table:table-cell>
          <table:table-cell table:style-name="ce1" office:value-type="float" office:value="1620">
            <text:p>1620</text:p>
          </table:table-cell>
          <table:table-cell table:style-name="ce1" office:value-type="float" office:value="1480">
            <text:p>1480</text:p>
          </table:table-cell>
          <table:table-cell table:style-name="ce1" office:value-type="float" office:value="1474">
            <text:p>1474</text:p>
          </table:table-cell>
          <table:table-cell table:style-name="ce1" office:value-type="float" office:value="1477">
            <text:p>1477</text:p>
          </table:table-cell>
          <table:table-cell table:style-name="ce1" office:value-type="float" office:value="1550">
            <text:p>1550</text:p>
          </table:table-cell>
          <table:table-cell table:style-name="ce1" office:value-type="float" office:value="1434">
            <text:p>1434</text:p>
          </table:table-cell>
          <table:table-cell table:style-name="ce1" office:value-type="float" office:value="1431">
            <text:p>1431</text:p>
          </table:table-cell>
        </table:table-row>
        <table:table-row>
          <table:table-cell table:style-name="ce1" office:value-type="float" office:value="26">
            <text:p>26</text:p>
          </table:table-cell>
          <table:table-cell table:style-name="ce1" office:value-type="float" office:value="496">
            <text:p>496</text:p>
          </table:table-cell>
          <table:table-cell table:style-name="ce1" office:value-type="float" office:value="507">
            <text:p>507</text:p>
          </table:table-cell>
          <table:table-cell table:style-name="ce1" office:value-type="float" office:value="514">
            <text:p>514</text:p>
          </table:table-cell>
          <table:table-cell table:style-name="ce1" office:value-type="float" office:value="489">
            <text:p>489</text:p>
          </table:table-cell>
          <table:table-cell table:style-name="ce1" office:value-type="float" office:value="433">
            <text:p>433</text:p>
          </table:table-cell>
          <table:table-cell table:style-name="ce1" office:value-type="float" office:value="1105">
            <text:p>1105</text:p>
          </table:table-cell>
          <table:table-cell table:style-name="ce1" office:value-type="float" office:value="1165">
            <text:p>1165</text:p>
          </table:table-cell>
          <table:table-cell table:style-name="ce1" office:value-type="float" office:value="1134">
            <text:p>1134</text:p>
          </table:table-cell>
          <table:table-cell table:style-name="ce1" office:value-type="float" office:value="1177">
            <text:p>1177</text:p>
          </table:table-cell>
          <table:table-cell table:style-name="ce1" office:value-type="float" office:value="1034">
            <text:p>1034</text:p>
          </table:table-cell>
          <table:table-cell table:style-name="ce1" office:value-type="float" office:value="1079">
            <text:p>1079</text:p>
          </table:table-cell>
          <table:table-cell table:style-name="ce1" office:value-type="float" office:value="1076">
            <text:p>1076</text:p>
          </table:table-cell>
          <table:table-cell table:style-name="ce1" office:value-type="float" office:value="1130">
            <text:p>1130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004">
            <text:p>1004</text:p>
          </table:table-cell>
        </table:table-row>
        <table:table-row>
          <table:table-cell table:style-name="ce1" office:value-type="float" office:value="27">
            <text:p>27</text:p>
          </table:table-cell>
          <table:table-cell table:style-name="ce1" office:value-type="float" office:value="377">
            <text:p>377</text:p>
          </table:table-cell>
          <table:table-cell table:style-name="ce1" office:value-type="float" office:value="368">
            <text:p>368</text:p>
          </table:table-cell>
          <table:table-cell table:style-name="ce1" office:value-type="float" office:value="371">
            <text:p>371</text:p>
          </table:table-cell>
          <table:table-cell table:style-name="ce1" office:value-type="float" office:value="367">
            <text:p>367</text:p>
          </table:table-cell>
          <table:table-cell table:style-name="ce1" office:value-type="float" office:value="314">
            <text:p>314</text:p>
          </table:table-cell>
          <table:table-cell table:style-name="ce1" office:value-type="float" office:value="758">
            <text:p>758</text:p>
          </table:table-cell>
          <table:table-cell table:style-name="ce1" office:value-type="float" office:value="805">
            <text:p>805</text:p>
          </table:table-cell>
          <table:table-cell table:style-name="ce1" office:value-type="float" office:value="804">
            <text:p>804</text:p>
          </table:table-cell>
          <table:table-cell table:style-name="ce1" office:value-type="float" office:value="826">
            <text:p>826</text:p>
          </table:table-cell>
          <table:table-cell table:style-name="ce1" office:value-type="float" office:value="700">
            <text:p>700</text:p>
          </table:table-cell>
          <table:table-cell table:style-name="ce1" office:value-type="float" office:value="730">
            <text:p>730</text:p>
          </table:table-cell>
          <table:table-cell table:style-name="ce1" office:value-type="float" office:value="736">
            <text:p>736</text:p>
          </table:table-cell>
          <table:table-cell table:style-name="ce1" office:value-type="float" office:value="809">
            <text:p>809</text:p>
          </table:table-cell>
          <table:table-cell table:style-name="ce1" office:value-type="float" office:value="695">
            <text:p>695</text:p>
          </table:table-cell>
          <table:table-cell table:style-name="ce1" office:value-type="float" office:value="702">
            <text:p>702</text:p>
          </table:table-cell>
        </table:table-row>
        <table:table-row>
          <table:table-cell table:style-name="ce1" office:value-type="float" office:value="28">
            <text:p>28</text:p>
          </table:table-cell>
          <table:table-cell table:style-name="ce1" office:value-type="float" office:value="271">
            <text:p>271</text:p>
          </table:table-cell>
          <table:table-cell table:style-name="ce1" office:value-type="float" office:value="266">
            <text:p>266</text:p>
          </table:table-cell>
          <table:table-cell table:style-name="ce1" office:value-type="float" office:value="276">
            <text:p>276</text:p>
          </table:table-cell>
          <table:table-cell table:style-name="ce1" office:value-type="float" office:value="260">
            <text:p>260</text:p>
          </table:table-cell>
          <table:table-cell table:style-name="ce1" office:value-type="float" office:value="204">
            <text:p>204</text:p>
          </table:table-cell>
          <table:table-cell table:style-name="ce1" office:value-type="float" office:value="528">
            <text:p>528</text:p>
          </table:table-cell>
          <table:table-cell table:style-name="ce1" office:value-type="float" office:value="574">
            <text:p>574</text:p>
          </table:table-cell>
          <table:table-cell table:style-name="ce1" office:value-type="float" office:value="561">
            <text:p>561</text:p>
          </table:table-cell>
          <table:table-cell table:style-name="ce1" office:value-type="float" office:value="575">
            <text:p>575</text:p>
          </table:table-cell>
          <table:table-cell table:style-name="ce1" office:value-type="float" office:value="494">
            <text:p>494</text:p>
          </table:table-cell>
          <table:table-cell table:style-name="ce1" office:value-type="float" office:value="530">
            <text:p>530</text:p>
          </table:table-cell>
          <table:table-cell table:style-name="ce1" office:value-type="float" office:value="501">
            <text:p>501</text:p>
          </table:table-cell>
          <table:table-cell table:style-name="ce1" office:value-type="float" office:value="553">
            <text:p>553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483">
            <text:p>483</text:p>
          </table:table-cell>
        </table:table-row>
        <table:table-row>
          <table:table-cell table:style-name="ce1" office:value-type="float" office:value="29">
            <text:p>29</text:p>
          </table:table-cell>
          <table:table-cell table:style-name="ce1" office:value-type="float" office:value="205">
            <text:p>205</text:p>
          </table:table-cell>
          <table:table-cell table:style-name="ce1" office:value-type="float" office:value="190">
            <text:p>190</text:p>
          </table:table-cell>
          <table:table-cell table:style-name="ce1" office:value-type="float" office:value="204">
            <text:p>204</text:p>
          </table:table-cell>
          <table:table-cell table:style-name="ce1" office:value-type="float" office:value="187">
            <text:p>187</text:p>
          </table:table-cell>
          <table:table-cell table:style-name="ce1" office:value-type="float" office:value="143">
            <text:p>143</text:p>
          </table:table-cell>
          <table:table-cell table:style-name="ce1" office:value-type="float" office:value="379">
            <text:p>379</text:p>
          </table:table-cell>
          <table:table-cell table:style-name="ce1" office:value-type="float" office:value="404">
            <text:p>404</text:p>
          </table:table-cell>
          <table:table-cell table:style-name="ce1" office:value-type="float" office:value="381">
            <text:p>381</text:p>
          </table:table-cell>
          <table:table-cell table:style-name="ce1" office:value-type="float" office:value="411">
            <text:p>411</text:p>
          </table:table-cell>
          <table:table-cell table:style-name="ce1" office:value-type="float" office:value="347">
            <text:p>347</text:p>
          </table:table-cell>
          <table:table-cell table:style-name="ce1" office:value-type="float" office:value="376">
            <text:p>376</text:p>
          </table:table-cell>
          <table:table-cell table:style-name="ce1" office:value-type="float" office:value="348">
            <text:p>348</text:p>
          </table:table-cell>
          <table:table-cell table:style-name="ce1" office:value-type="float" office:value="395">
            <text:p>395</text:p>
          </table:table-cell>
          <table:table-cell table:style-name="ce1" office:value-type="float" office:value="372">
            <text:p>372</text:p>
          </table:table-cell>
          <table:table-cell table:style-name="ce1" office:value-type="float" office:value="327">
            <text:p>327</text:p>
          </table:table-cell>
        </table:table-row>
        <table:table-row>
          <table:table-cell table:style-name="ce1" office:value-type="float" office:value="30">
            <text:p>30</text:p>
          </table:table-cell>
          <table:table-cell table:style-name="ce1" office:value-type="float" office:value="153">
            <text:p>153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257">
            <text:p>257</text:p>
          </table:table-cell>
          <table:table-cell table:style-name="ce1" office:value-type="float" office:value="304">
            <text:p>304</text:p>
          </table:table-cell>
          <table:table-cell table:style-name="ce1" office:value-type="float" office:value="276">
            <text:p>276</text:p>
          </table:table-cell>
          <table:table-cell table:style-name="ce1" office:value-type="float" office:value="307">
            <text:p>307</text:p>
          </table:table-cell>
          <table:table-cell table:style-name="ce1" office:value-type="float" office:value="236">
            <text:p>236</text:p>
          </table:table-cell>
          <table:table-cell table:style-name="ce1" office:value-type="float" office:value="275">
            <text:p>275</text:p>
          </table:table-cell>
          <table:table-cell table:style-name="ce1" office:value-type="float" office:value="260">
            <text:p>260</text:p>
          </table:table-cell>
          <table:table-cell table:style-name="ce1" office:value-type="float" office:value="295">
            <text:p>295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236">
            <text:p>236</text:p>
          </table:table-cell>
        </table:table-row>
        <table:table-row>
          <table:table-cell table:style-name="ce1" office:value-type="float" office:value="38">
            <text:p>38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37">
            <text:p>37</text:p>
          </table:table-cell>
        </table:table-row>
        <table:table-row>
          <table:table-cell table:style-name="ce1" office:value-type="float" office:value="50">
            <text:p>50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0">
            <text:p>20</text:p>
          </table:table-cell>
        </table:table-row>
        <table:table-row>
          <table:table-cell table:style-name="ce1" office:value-type="float" office:value="70">
            <text:p>70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</table:table-row>
      </table:table>
      <table:named-expressions/>
      <table:database-ranges>
        <table:database-range table:name="__Anonymous_Sheet_DB__2" table:target-range-address="'Annex B Coincidence Limit'.R1:'Annex B Coincidence Limit'.R1"/>
        <table:database-range table:name="__Anonymous_Sheet_DB__7" table:target-range-address="'6 - Interpolated Thresholds'.A4:'6 - Interpolated Thresholds'.F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0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1" number:min-decimal-places="1" number:min-integer-digits="1" number:grouping="true"/>
    </number:number-style>
    <number:number-style style:name="N125">
      <number:scientific-number number:decimal-places="2" number:min-decimal-places="0" number:min-integer-digits="0" number:min-exponent-digits="2" number:exponent-interval="3" number:forced-exponent-sign="true"/>
    </number:number-style>
    <number:number-style style:name="N126">
      <number:scientific-number number:decimal-places="1" number:min-decimal-places="1" number:min-integer-digits="0" number:min-exponent-digits="2" number:exponent-interval="3" number:forced-exponent-sign="true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">
      <number:scientific-number number:decimal-places="2" number:min-decimal-places="2" number:min-integer-digits="0" number:min-exponent-digits="2" number:exponent-interval="3" number:forced-exponent-sign="true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6">
      <number:number number:decimal-places="6" number:min-decimal-places="6" number:min-integer-digits="1"/>
    </number:number-style>
    <number:number-style style:name="N157">
      <number:number number:decimal-places="1" number:min-decimal-places="1" number:min-integer-digits="1"/>
    </number:number-style>
    <number:number-style style:name="N158">
      <number:number number:decimal-places="3" number:min-decimal-places="3" number:min-integer-digits="1"/>
    </number:number-style>
    <number:number-style style:name="N159">
      <number:number number:decimal-places="9" number:min-decimal-places="9" number:min-integer-digits="1"/>
    </number:number-style>
    <number:number-style style:name="N160">
      <number:number number:decimal-places="12" number:min-decimal-places="12" number:min-integer-digits="1"/>
    </number:number-style>
    <number:number-style style:name="N161">
      <number:number number:decimal-places="7" number:min-decimal-places="7" number:min-integer-digits="1"/>
    </number:number-style>
    <number:number-style style:name="N162">
      <number:number number:decimal-places="8" number:min-decimal-places="8" number:min-integer-digits="1"/>
    </number:number-style>
    <number:number-style style:name="N163">
      <number:number number:decimal-places="14" number:min-decimal-places="14" number:min-integer-digits="1"/>
    </number:number-style>
    <number:number-style style:name="N164">
      <number:number number:decimal-places="13" number:min-decimal-places="13" number:min-integer-digits="1"/>
    </number:number-style>
    <number:number-style style:name="N165">
      <number:number number:decimal-places="11" number:min-decimal-places="11" number:min-integer-digits="1"/>
    </number:number-style>
    <number:number-style style:name="N166">
      <number:number number:decimal-places="10" number:min-decimal-places="10" number:min-integer-digits="1"/>
    </number:number-style>
    <number:number-style style:name="N167">
      <number:number number:decimal-places="5" number:min-decimal-places="5" number:min-integer-digits="1"/>
    </number:number-style>
    <number:number-style style:name="N168">
      <number:number number:decimal-places="4" number:min-decimal-places="4" number:min-integer-digits="1"/>
    </number:number-style>
    <number:number-style style:name="N169">
      <number:number number:decimal-places="3" number:min-decimal-places="3" number:min-integer-digits="1" number:grouping="true"/>
    </number:number-style>
    <number:number-style style:name="N170">
      <number:number number:decimal-places="4" number:min-decimal-places="4" number:min-integer-digits="1" number:grouping="true"/>
    </number:number-style>
    <number:number-style style:name="N171">
      <number:number number:decimal-places="5" number:min-decimal-places="5" number:min-integer-digits="1" number:grouping="true"/>
    </number:number-style>
    <number:number-style style:name="N172">
      <number:number number:decimal-places="6" number:min-decimal-places="6" number:min-integer-digits="1" number:grouping="true"/>
    </number:number-style>
    <number:number-style style:name="N173">
      <number:number number:decimal-places="7" number:min-decimal-places="7" number:min-integer-digits="1" number:grouping="true"/>
    </number:number-style>
    <number:number-style style:name="N174">
      <number:number number:decimal-places="8" number:min-decimal-places="8" number:min-integer-digits="1" number:grouping="true"/>
    </number:number-style>
    <number:number-style style:name="N175">
      <number:number number:decimal-places="17" number:min-decimal-places="17" number:min-integer-digits="1"/>
    </number:number-style>
    <number:number-style style:name="N176">
      <number:number number:decimal-places="16" number:min-decimal-places="16" number:min-integer-digits="1"/>
    </number:number-style>
    <number:number-style style:name="N177">
      <number:number number:decimal-places="15" number:min-decimal-places="15" number:min-integer-digits="1"/>
    </number:number-style>
    <number:number-style style:name="N178">
      <number:number number:decimal-places="18" number:min-decimal-places="18" number:min-integer-digits="1"/>
    </number:number-style>
    <number:number-style style:name="N179">
      <number:number number:decimal-places="19" number:min-decimal-places="19" number:min-integer-digits="1"/>
    </number:number-style>
    <number:number-style style:name="N180">
      <number:number number:decimal-places="20" number:min-decimal-places="20" number:min-integer-digits="1"/>
    </number:number-style>
    <number:number-style style:name="N181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82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83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8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8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8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8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88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89">
      <number:scientific-number number:decimal-places="0" number:min-decimal-places="0" number:min-integer-digits="0" number:min-exponent-digits="2" number:exponent-interval="3" number:forced-exponent-sign="true"/>
    </number:number-style>
    <number:date-style style:name="N190">
      <number:day number:style="long"/>
      <number:text>-</number:text>
      <number:month number:textual="true"/>
      <number:text>-</number:text>
      <number:year/>
    </number:date-style>
    <number:date-style style:name="N191">
      <number:day number:style="long"/>
      <number:text>-</number:text>
      <number:month number:textual="true"/>
    </number:date-style>
    <number:date-style style:name="N192">
      <number:month number:textual="true"/>
      <number:text>-</number:text>
      <number:year/>
    </number:date-style>
    <number:time-style style:name="N193">
      <number:hours/>
      <number:text>:</number:text>
      <number:minutes number:style="long"/>
      <number:text> </number:text>
      <number:am-pm/>
    </number:time-style>
    <number:time-style style:name="N19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9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8P2" style:volatile="true">
      <number:text> </number:text>
      <number:fill-character> </number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2" style:volatile="true">
      <number:text> £</number:text>
      <number:fill-character> </number:fill-character>
      <number:text>-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212">
      <number:number number:decimal-places="1" number:min-decimal-places="1" number:min-integer-digits="1"/>
      <number:text>%</number:text>
    </number:percentage-style>
    <number:number-style style:name="N214P0" style:volatile="true">
      <number:text>£</number:text>
      <number:number number:decimal-places="0" number:min-decimal-places="0" number:min-integer-digits="1" number:grouping="true"/>
    </number:number-style>
    <number:number-style style:name="N214">
      <number:text>-£</number:text>
      <number:number number:decimal-places="0" number:min-decimal-places="0" number:min-integer-digits="1" number:grouping="true"/>
      <style:map style:condition="value()&gt;=0" style:apply-style-name="N214P0"/>
    </number:number-style>
    <number:number-style style:name="N215P0" style:volatile="true">
      <number:text>£</number:text>
      <number:number number:decimal-places="0" number:min-decimal-places="0" number:min-integer-digits="1" number:grouping="true"/>
    </number:number-style>
    <number:number-style style:name="N215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215P0"/>
    </number:number-style>
    <number:number-style style:name="N217P0" style:volatile="true">
      <number:text>£</number:text>
      <number:number number:decimal-places="2" number:min-decimal-places="2" number:min-integer-digits="1" number:grouping="true"/>
    </number:number-style>
    <number:number-style style:name="N217">
      <number:text>-£</number:text>
      <number:number number:decimal-places="2" number:min-decimal-places="2" number:min-integer-digits="1" number:grouping="true"/>
      <style:map style:condition="value()&gt;=0" style:apply-style-name="N217P0"/>
    </number:number-style>
    <number:number-style style:name="N218P0" style:volatile="true">
      <number:text>£</number:text>
      <number:number number:decimal-places="2" number:min-decimal-places="2" number:min-integer-digits="1" number:grouping="true"/>
    </number:number-style>
    <number:number-style style:name="N218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218P0"/>
    </number:number-style>
    <number:number-style style:name="N2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220">
      <number:text> </number:text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2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2P2" style:volatile="true">
      <number:text> £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222">
      <number:text> </number:text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scientific-number number:decimal-places="1" number:min-decimal-places="1" number:min-integer-digits="1" number:min-exponent-digits="3" number:exponent-interval="1" number:forced-exponent-sign="true"/>
    </number:number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1493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background-color="#dcdcdc" style:scale-to="11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ISO11171:2020 Summary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0">00/00/0000</text:date>, <text:time style:data-style-name="N2" text:time-value="09:44:38.6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24T13:24:09.574000000</meta:creation-date>
    <dc:date>2025-06-20T11:26:23.135000000</dc:date>
    <meta:editing-duration>P3DT22H23M1S</meta:editing-duration>
    <meta:editing-cycles>205</meta:editing-cycles>
    <meta:generator>LibreOffice/7.6.4.1$Windows_X86_64 LibreOffice_project/e19e193f88cd6c0525a17fb7a176ed8e6a3e2aa1</meta:generator>
    <dc:title>ISO111171:2020</dc:title>
    <meta:document-statistic meta:table-count="16" meta:cell-count="11712" meta:object-count="9"/>
  </office:meta>
</office:document-meta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4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93cm" svg:height="11.415cm" xlink:href=".." xlink:type="simple" chart:class="chart:scatter" chart:style-name="ch1">
        <chart:subtitle svg:x="0cm" svg:y="0cm" chart:style-name="ch2">
          <text:p/>
        </chart:subtitle>
        <chart:plot-area chart:style-name="ch3" table:cell-range-address="'Clause 6 - Spheres'.C5:'6 - Calibration Curve'.D34" chart:data-source-has-labels="both" svg:x="1.403cm" svg:y="0.228cm" svg:width="18.485cm" svg:height="9.991cm">
          <chart:coordinate-region svg:x="2.845cm" svg:y="0.427cm" svg:width="16.843cm" svg:height="9.145cm"/>
          <chart:axis chart:dimension="x" chart:name="primary-x" chart:style-name="ch4" chartooo:axis-type="auto">
            <chart:title svg:x="10.184cm" svg:y="10.448cm" chart:style-name="ch5">
              <text:p>um(c)</text:p>
            </chart:title>
            <chart:categories table:cell-range-address="'Clause 6 - Spheres'.D5:'6 - Calibration Curve'.D34"/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975cm" chart:style-name="ch9">
              <text:p>Threshold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'Clause 6 - Spheres'.D5:'6 - Calibration Curve'.D34" chart:class="chart:scatter">
            <chart:domain table:cell-range-address="'Clause 6 - Spheres'.C5:'6 - Calibration Curve'.C34"/>
            <chart:data-point chart:repeated="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LPA3-NAVAIR 458.034113890536</text:p>
                <text:list>
                  <text:list-item>
                    <text:p>LPA3-NAVAIR</text:p>
                  </text:list-item>
                  <text:list-item>
                    <text:p>458.034113890536</text:p>
                  </text:list-item>
                </text:list>
                <draw:g>
                  <svg:desc>'Clause 6 - Spheres'.D5:'6 - Calibration Curve'.D34</svg:desc>
                </draw:g>
              </table:table-cell>
              <table:table-cell office:value-type="float" office:value="NaN">
                <text:p>NaN</text:p>
                <draw:g>
                  <svg:desc>'Clause 6 - Spheres'.C5:'6 - Calibration Curve'.C34</svg:desc>
                </draw:g>
              </table:table-cell>
              <table:table-cell office:value-type="float" office:value="NaN">
                <text:p>NaN</text:p>
                <draw:g>
                  <svg:desc>'Clause 6 - Spheres'.D5:'6 - Calibration Curve'.D34</svg:desc>
                </draw:g>
              </table:table-cell>
            </table:table-row>
            <table:table-row>
              <table:table-cell office:value-type="string">
                <text:p>BS110 BS2042 666.520651103108</text:p>
                <text:list>
                  <text:list-item>
                    <text:p>BS110 BS2042</text:p>
                  </text:list-item>
                  <text:list-item>
                    <text:p>666.520651103108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MD 1071.68008303119</text:p>
                <text:list>
                  <text:list-item>
                    <text:p>JMD</text:p>
                  </text:list-item>
                  <text:list-item>
                    <text:p>1071.68008303119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MD 1580.51380008794</text:p>
                <text:list>
                  <text:list-item>
                    <text:p/>
                  </text:list-item>
                  <text:list-item>
                    <text:p>1580.51380008794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MD 1957.70840588067</text:p>
                <text:list>
                  <text:list-item>
                    <text:p/>
                  </text:list-item>
                  <text:list-item>
                    <text:p>1957.70840588067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MD 2332.97540113041</text:p>
                <text:list>
                  <text:list-item>
                    <text:p/>
                  </text:list-item>
                  <text:list-item>
                    <text:p>2332.97540113041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MD 2766.67362901266</text:p>
                <text:list>
                  <text:list-item>
                    <text:p/>
                  </text:list-item>
                  <text:list-item>
                    <text:p>2766.67362901266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MD 3238.88296656141</text:p>
                <text:list>
                  <text:list-item>
                    <text:p/>
                  </text:list-item>
                  <text:list-item>
                    <text:p>3238.88296656141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MD 3698.16383545853</text:p>
                <text:list>
                  <text:list-item>
                    <text:p/>
                  </text:list-item>
                  <text:list-item>
                    <text:p>3698.16383545853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MD 4176.60110025045</text:p>
                <text:list>
                  <text:list-item>
                    <text:p/>
                  </text:list-item>
                  <text:list-item>
                    <text:p>4176.60110025045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MD 4415.28694733033</text:p>
                <text:list>
                  <text:list-item>
                    <text:p/>
                  </text:list-item>
                  <text:list-item>
                    <text:p>4415.28694733033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MD 4574.39998422423</text:p>
                <text:list>
                  <text:list-item>
                    <text:p/>
                  </text:list-item>
                  <text:list-item>
                    <text:p>4574.39998422423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MD 4694.24546707727</text:p>
                <text:list>
                  <text:list-item>
                    <text:p/>
                  </text:list-item>
                  <text:list-item>
                    <text:p>4694.24546707727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MD 4786.39938002866</text:p>
                <text:list>
                  <text:list-item>
                    <text:p/>
                  </text:list-item>
                  <text:list-item>
                    <text:p>4786.39938002866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MD 4860.167906406</text:p>
                <text:list>
                  <text:list-item>
                    <text:p/>
                  </text:list-item>
                  <text:list-item>
                    <text:p>4860.167906406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MD 4923.04138888761</text:p>
                <text:list>
                  <text:list-item>
                    <text:p/>
                  </text:list-item>
                  <text:list-item>
                    <text:p>4923.04138888761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MD 4978.87848885323</text:p>
                <text:list>
                  <text:list-item>
                    <text:p/>
                  </text:list-item>
                  <text:list-item>
                    <text:p>4978.87848885323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MD 5028.81410670866</text:p>
                <text:list>
                  <text:list-item>
                    <text:p/>
                  </text:list-item>
                  <text:list-item>
                    <text:p>5028.81410670866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MD 5072.16730221042</text:p>
                <text:list>
                  <text:list-item>
                    <text:p/>
                  </text:list-item>
                  <text:list-item>
                    <text:p>5072.16730221042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MD 5109.16505543968</text:p>
                <text:list>
                  <text:list-item>
                    <text:p/>
                  </text:list-item>
                  <text:list-item>
                    <text:p>5109.16505543968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MD 5140.26132655874</text:p>
                <text:list>
                  <text:list-item>
                    <text:p/>
                  </text:list-item>
                  <text:list-item>
                    <text:p>5140.26132655874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MD 5166.36403589226</text:p>
                <text:list>
                  <text:list-item>
                    <text:p/>
                  </text:list-item>
                  <text:list-item>
                    <text:p>5166.36403589226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MD 5187.24620335908</text:p>
                <text:list>
                  <text:list-item>
                    <text:p/>
                  </text:list-item>
                  <text:list-item>
                    <text:p>5187.24620335908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MD 5204.49668952732</text:p>
                <text:list>
                  <text:list-item>
                    <text:p/>
                  </text:list-item>
                  <text:list-item>
                    <text:p>5204.49668952732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MD 5218.79643464047</text:p>
                <text:list>
                  <text:list-item>
                    <text:p/>
                  </text:list-item>
                  <text:list-item>
                    <text:p>5218.79643464047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MD 5231.28033910432</text:p>
                <text:list>
                  <text:list-item>
                    <text:p/>
                  </text:list-item>
                  <text:list-item>
                    <text:p>5231.28033910432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MD 5242.85632324354</text:p>
                <text:list>
                  <text:list-item>
                    <text:p/>
                  </text:list-item>
                  <text:list-item>
                    <text:p>5242.85632324354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MD 9521.20625813817</text:p>
                <text:list>
                  <text:list-item>
                    <text:p/>
                  </text:list-item>
                  <text:list-item>
                    <text:p>9521.20625813817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MD 15586.6995073892</text:p>
                <text:list>
                  <text:list-item>
                    <text:p/>
                  </text:list-item>
                  <text:list-item>
                    <text:p>15586.6995073892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MD 25143.3497536946</text:p>
                <text:list>
                  <text:list-item>
                    <text:p/>
                  </text:list-item>
                  <text:list-item>
                    <text:p>25143.3497536946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458.034113890536">
                <text:p>458.034113890536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666.520651103108">
                <text:p>666.520651103108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1071.68008303119">
                <text:p>1071.68008303119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1580.51380008794">
                <text:p>1580.51380008794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1957.70840588067">
                <text:p>1957.70840588067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2332.97540113041">
                <text:p>2332.97540113041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2766.67362901266">
                <text:p>2766.67362901266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3238.88296656141">
                <text:p>3238.88296656141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3698.16383545853">
                <text:p>3698.16383545853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4176.60110025045">
                <text:p>4176.60110025045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4415.28694733033">
                <text:p>4415.28694733033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4574.39998422423">
                <text:p>4574.39998422423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4694.24546707727">
                <text:p>4694.24546707727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4786.39938002866">
                <text:p>4786.39938002866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4860.167906406">
                <text:p>4860.167906406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4923.04138888761">
                <text:p>4923.04138888761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4978.87848885323">
                <text:p>4978.87848885323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5028.81410670866">
                <text:p>5028.81410670866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5072.16730221042">
                <text:p>5072.16730221042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5109.16505543968">
                <text:p>5109.16505543968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5140.26132655874">
                <text:p>5140.26132655874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5166.36403589226">
                <text:p>5166.36403589226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5187.24620335908">
                <text:p>5187.24620335908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5204.49668952732">
                <text:p>5204.49668952732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5218.79643464047">
                <text:p>5218.79643464047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5231.28033910432">
                <text:p>5231.28033910432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5242.85632324354">
                <text:p>5242.85632324354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9521.20625813817">
                <text:p>9521.20625813817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15586.6995073892">
                <text:p>15586.6995073892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25143.3497536946">
                <text:p>25143.34975369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0" chart:interval-major="10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sterisk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163cm" svg:height="10.779cm" xlink:href=".." xlink:type="simple" chart:class="chart:scatter" chart:style-name="ch1">
        <chart:subtitle svg:x="0cm" svg:y="0cm" chart:style-name="ch2">
          <text:p/>
        </chart:subtitle>
        <chart:legend chart:legend-position="end" svg:x="16.794cm" svg:y="4.841cm" style:legend-expansion="high" chart:style-name="ch3"/>
        <chart:plot-area chart:style-name="ch4" table:cell-range-address="'6 - Calibration Curve'.L2:'6 - Calibration Curve'.N1002 '6 - Calibration Curve'.M1:'6 - Calibration Curve'.N1" chart:data-source-has-labels="row" svg:x="0.383cm" svg:y="0.215cm" svg:width="16.028cm" svg:height="10.349cm">
          <chart:coordinate-region svg:x="1.031cm" svg:y="0.414cm" svg:width="14.981cm" svg:height="9.50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6 - Calibration Curve'.M2:'6 - Calibration Curve'.M1002" chart:label-cell-address="'6 - Calibration Curve'.M1:'6 - Calibration Curve'.M1" chart:class="chart:scatter">
            <chart:domain table:cell-range-address="'6 - Calibration Curve'.L2:'6 - Calibration Curve'.L1002"/>
            <chart:data-point chart:repeated="1001"/>
          </chart:series>
          <chart:series chart:style-name="ch9" chart:values-cell-range-address="'6 - Calibration Curve'.N2:'6 - Calibration Curve'.N1002" chart:label-cell-address="'6 - Calibration Curve'.N1:'6 - Calibration Curve'.N1" chart:class="chart:scatter">
            <chart:data-point chart:repeated="10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/>
                <draw:g>
                  <svg:desc>'6 - Calibration Curve'.M1:'6 - Calibration Curve'.M1</svg:desc>
                </draw:g>
              </table:table-cell>
              <table:table-cell office:value-type="string">
                <text:p/>
                <draw:g>
                  <svg:desc>'6 - Calibration Curve'.N1:'6 - Calibration Curve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6 - Calibration Curve'.L2:'6 - Calibration Curve'.L1002</svg:desc>
                </draw:g>
              </table:table-cell>
              <table:table-cell office:value-type="float" office:value="NaN">
                <text:p>NaN</text:p>
                <draw:g>
                  <svg:desc>'6 - Calibration Curve'.M2:'6 - Calibration Curve'.M1002</svg:desc>
                </draw:g>
              </table:table-cell>
              <table:table-cell office:value-type="float" office:value="NaN">
                <text:p>NaN</text:p>
                <draw:g>
                  <svg:desc>'6 - Calibration Curve'.N2:'6 - Calibration Curve'.N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32.97540113041">
                <text:p>2332.97540113041</text:p>
              </table:table-cell>
              <table:table-cell office:value-type="float" office:value="2766.67362901266">
                <text:p>2766.67362901266</text:p>
              </table:table-cell>
              <table:table-cell office:value-type="float" office:value="3238.88296656141">
                <text:p>3238.882966561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33">
                <text:p>2333</text:p>
              </table:table-cell>
              <table:table-cell office:value-type="float" office:value="2767">
                <text:p>2767</text:p>
              </table:table-cell>
              <table:table-cell office:value-type="float" office:value="3239">
                <text:p>32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 draw:opacity="50%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dash" draw:stroke-dash="Dot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05cm" chart:symbol-height="0.05cm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05cm" chart:symbol-height="0.05cm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952cm" svg:height="15.24cm" xlink:href=".." xlink:type="simple" chart:class="chart:scatter" chart:style-name="ch1">
        <chart:subtitle svg:x="0cm" svg:y="0cm" chart:style-name="ch2">
          <text:p/>
        </chart:subtitle>
        <chart:legend chart:legend-position="end" loext:overlay="true" svg:x="16.584cm" svg:y="7.4cm" style:legend-expansion="custom" svg:width="5.396cm" svg:height="2.08cm" style:legend-expansion-aspect-ratio="2.59423076923077" chart:style-name="ch3"/>
        <chart:plot-area chart:style-name="ch4" table:cell-range-address="'Annex A Preliminary Check'.E22:'Annex B Coincidence Limit'.E37 'Annex A Preliminary Check'.G22:'Annex B Coincidence Limit'.G37 'Annex A Preliminary Check'.K21:'Annex B Coincidence Limit'.L37 'Annex A Preliminary Check'.I21:'Annex B Coincidence Limit'.I37" chart:data-source-has-labels="row" svg:x="1.477cm" svg:y="0.304cm" svg:width="21.996cm" svg:height="13.664cm">
          <chart:coordinate-region svg:x="3.117cm" svg:y="0.503cm" svg:width="20.255cm" svg:height="12.818cm"/>
          <chart:axis chart:dimension="x" chart:name="primary-x" chart:style-name="ch5">
            <chart:title svg:x="11.399cm" svg:y="14.273cm" chart:style-name="ch6">
              <text:p>RM8632a mg/l</text:p>
            </chart:title>
          </chart:axis>
          <chart:axis chart:dimension="y" chart:name="primary-y" chart:style-name="ch5">
            <chart:title svg:x="0.451cm" svg:y="8.139cm" chart:style-name="ch7">
              <text:p>count / 100ml</text:p>
            </chart:title>
            <chart:grid chart:style-name="ch8" chart:class="major"/>
          </chart:axis>
          <chart:series chart:style-name="ch9" chart:values-cell-range-address="'Annex A Preliminary Check'.G22:'Annex B Coincidence Limit'.G37" chart:class="chart:scatter">
            <chart:domain table:cell-range-address="'Annex A Preliminary Check'.E22:'Annex B Coincidence Limit'.E37"/>
            <chart:data-point chart:repeated="32"/>
          </chart:series>
          <chart:series chart:style-name="ch10" chart:values-cell-range-address="'Annex A Preliminary Check'.L22:'Annex B Coincidence Limit'.L37" chart:label-cell-address="'Annex A Preliminary Check'.L21:'Annex B Coincidence Limit'.L21" chart:class="chart:scatter">
            <chart:data-point chart:repeated="32"/>
          </chart:series>
          <chart:series chart:style-name="ch11" chart:values-cell-range-address="'Annex A Preliminary Check'.K22:'Annex B Coincidence Limit'.K37" chart:label-cell-address="'Annex A Preliminary Check'.K21:'Annex B Coincidence Limit'.K21" chart:class="chart:scatter">
            <chart:data-point chart:repeated="32"/>
          </chart:series>
          <chart:series chart:style-name="ch12" chart:values-cell-range-address="'Annex A Preliminary Check'.I22:'Annex B Coincidence Limit'.I37" chart:label-cell-address="'Annex A Preliminary Check'.I21:'Annex B Coincidence Limit'.I21" chart:class="chart:scatter"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corrected</text:p>
                <text:list>
                  <text:list-item>
                    <text:p/>
                  </text:list-item>
                  <text:list-item>
                    <text:p>corrected</text:p>
                  </text:list-item>
                </text:list>
                <draw:g>
                  <svg:desc>'Annex A Preliminary Check'.L21:'Annex B Coincidence Limit'.L21</svg:desc>
                </draw:g>
              </table:table-cell>
              <table:table-cell office:value-type="string">
                <text:p>95%</text:p>
                <text:list>
                  <text:list-item>
                    <text:p/>
                  </text:list-item>
                  <text:list-item>
                    <text:p>95%</text:p>
                  </text:list-item>
                </text:list>
                <draw:g>
                  <svg:desc>'Annex A Preliminary Check'.K21:'Annex B Coincidence Limit'.K21</svg:desc>
                </draw:g>
              </table:table-cell>
              <table:table-cell office:value-type="string">
                <text:p>Line 0-40%</text:p>
                <text:list>
                  <text:list-item>
                    <text:p/>
                  </text:list-item>
                  <text:list-item>
                    <text:p>Line 0-40%</text:p>
                  </text:list-item>
                </text:list>
                <draw:g>
                  <svg:desc>'Annex A Preliminary Check'.I21:'Annex B Coincidence Limit'.I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Annex A Preliminary Check'.E22:'Annex B Coincidence Limit'.E37</svg:desc>
                </draw:g>
              </table:table-cell>
              <table:table-cell office:value-type="float" office:value="NaN">
                <text:p>NaN</text:p>
                <draw:g>
                  <svg:desc>'Annex A Preliminary Check'.G22:'Annex B Coincidence Limit'.G37</svg:desc>
                </draw:g>
              </table:table-cell>
              <table:table-cell office:value-type="float" office:value="NaN">
                <text:p>NaN</text:p>
                <draw:g>
                  <svg:desc>'Annex A Preliminary Check'.L22:'Annex B Coincidence Limit'.L37</svg:desc>
                </draw:g>
              </table:table-cell>
              <table:table-cell office:value-type="float" office:value="NaN">
                <text:p>NaN</text:p>
                <draw:g>
                  <svg:desc>'Annex A Preliminary Check'.K22:'Annex B Coincidence Limit'.K37</svg:desc>
                </draw:g>
              </table:table-cell>
              <table:table-cell office:value-type="float" office:value="NaN">
                <text:p>NaN</text:p>
                <draw:g>
                  <svg:desc>'Annex A Preliminary Check'.I22:'Annex B Coincidence Limit'.I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316142139795892">
                <text:p>0.316142139795892</text:p>
              </table:table-cell>
              <table:table-cell office:value-type="float" office:value="158573">
                <text:p>158573</text:p>
              </table:table-cell>
              <table:table-cell office:value-type="float" office:value="158573">
                <text:p>158573</text:p>
              </table:table-cell>
              <table:table-cell office:value-type="float" office:value="148655.463751551">
                <text:p>148655.463751551</text:p>
              </table:table-cell>
              <table:table-cell office:value-type="float" office:value="156479.435527948">
                <text:p>156479.435527948</text:p>
              </table:table-cell>
            </table:table-row>
            <table:table-row>
              <table:table-cell office:value-type="string"/>
              <table:table-cell office:value-type="float" office:value="0.631749260671123">
                <text:p>0.631749260671123</text:p>
              </table:table-cell>
              <table:table-cell office:value-type="float" office:value="315866">
                <text:p>315866</text:p>
              </table:table-cell>
              <table:table-cell office:value-type="float" office:value="315866">
                <text:p>315866</text:p>
              </table:table-cell>
              <table:table-cell office:value-type="float" office:value="297059.352417862">
                <text:p>297059.352417862</text:p>
              </table:table-cell>
              <table:table-cell office:value-type="float" office:value="312694.055176697">
                <text:p>312694.055176697</text:p>
              </table:table-cell>
            </table:table-row>
            <table:table-row>
              <table:table-cell office:value-type="string"/>
              <table:table-cell office:value-type="float" office:value="0.94682271962561">
                <text:p>0.94682271962561</text:p>
              </table:table-cell>
              <table:table-cell office:value-type="float" office:value="471092">
                <text:p>471092</text:p>
              </table:table-cell>
              <table:table-cell office:value-type="float" office:value="471092">
                <text:p>471092</text:p>
              </table:table-cell>
              <table:table-cell office:value-type="float" office:value="445212.304083602">
                <text:p>445212.304083602</text:p>
              </table:table-cell>
              <table:table-cell office:value-type="float" office:value="468644.530614318">
                <text:p>468644.530614318</text:p>
              </table:table-cell>
            </table:table-row>
            <table:table-row>
              <table:table-cell office:value-type="string"/>
              <table:table-cell office:value-type="float" office:value="1.26136386907403">
                <text:p>1.26136386907403</text:p>
              </table:table-cell>
              <table:table-cell office:value-type="float" office:value="620381">
                <text:p>620381</text:p>
              </table:table-cell>
              <table:table-cell office:value-type="float" office:value="620381">
                <text:p>620381</text:p>
              </table:table-cell>
              <table:table-cell office:value-type="float" office:value="593114.954677378">
                <text:p>593114.954677378</text:p>
              </table:table-cell>
              <table:table-cell office:value-type="float" office:value="624331.531239346">
                <text:p>624331.531239346</text:p>
              </table:table-cell>
            </table:table-row>
            <table:table-row>
              <table:table-cell office:value-type="string"/>
              <table:table-cell office:value-type="float" office:value="1.57537405686517">
                <text:p>1.57537405686517</text:p>
              </table:table-cell>
              <table:table-cell office:value-type="float" office:value="760309">
                <text:p>760309</text:p>
              </table:table-cell>
              <table:table-cell office:value-type="float" office:value="760309">
                <text:p>760309</text:p>
              </table:table-cell>
              <table:table-cell office:value-type="float" office:value="740767.937980839">
                <text:p>740767.937980839</text:p>
              </table:table-cell>
              <table:table-cell office:value-type="float" office:value="779755.724190357">
                <text:p>779755.724190357</text:p>
              </table:table-cell>
            </table:table-row>
            <table:table-row>
              <table:table-cell office:value-type="string"/>
              <table:table-cell office:value-type="float" office:value="1.88885462630117">
                <text:p>1.88885462630117</text:p>
              </table:table-cell>
              <table:table-cell office:value-type="float" office:value="922391">
                <text:p>922391</text:p>
              </table:table-cell>
              <table:table-cell office:value-type="float" office:value="922391">
                <text:p>922391</text:p>
              </table:table-cell>
              <table:table-cell office:value-type="float" office:value="888171.885637724">
                <text:p>888171.885637724</text:p>
              </table:table-cell>
              <table:table-cell office:value-type="float" office:value="934917.774355499">
                <text:p>934917.774355499</text:p>
              </table:table-cell>
            </table:table-row>
            <table:table-row>
              <table:table-cell office:value-type="string"/>
              <table:table-cell office:value-type="float" office:value="2.20180691615671">
                <text:p>2.20180691615671</text:p>
              </table:table-cell>
              <table:table-cell office:value-type="float" office:value="1083045">
                <text:p>1083045</text:p>
              </table:table-cell>
              <table:table-cell office:value-type="float" office:value="1083045">
                <text:p>1083045</text:p>
              </table:table-cell>
              <table:table-cell office:value-type="float" office:value="1035327.42716287">
                <text:p>1035327.42716287</text:p>
              </table:table-cell>
              <table:table-cell office:value-type="float" office:value="1089818.34438197">
                <text:p>1089818.34438197</text:p>
              </table:table-cell>
            </table:table-row>
            <table:table-row>
              <table:table-cell office:value-type="string"/>
              <table:table-cell office:value-type="float" office:value="2.51423226069801">
                <text:p>2.51423226069801</text:p>
              </table:table-cell>
              <table:table-cell office:value-type="float" office:value="1244140">
                <text:p>1244140</text:p>
              </table:table-cell>
              <table:table-cell office:value-type="float" office:value="1244140">
                <text:p>1244140</text:p>
              </table:table-cell>
              <table:table-cell office:value-type="float" office:value="1182235.18995119">
                <text:p>1182235.18995119</text:p>
              </table:table-cell>
              <table:table-cell office:value-type="float" office:value="1244458.09468546">
                <text:p>1244458.09468546</text:p>
              </table:table-cell>
            </table:table-row>
            <table:table-row>
              <table:table-cell office:value-type="string"/>
              <table:table-cell office:value-type="float" office:value="2.82613198970185">
                <text:p>2.82613198970185</text:p>
              </table:table-cell>
              <table:table-cell office:value-type="float" office:value="1407530">
                <text:p>1407530</text:p>
              </table:table-cell>
              <table:table-cell office:value-type="float" office:value="1407530">
                <text:p>1407530</text:p>
              </table:table-cell>
              <table:table-cell office:value-type="float" office:value="1328895.79928654">
                <text:p>1328895.79928654</text:p>
              </table:table-cell>
              <table:table-cell office:value-type="float" office:value="1398837.68345952">
                <text:p>1398837.68345952</text:p>
              </table:table-cell>
            </table:table-row>
            <table:table-row>
              <table:table-cell office:value-type="string"/>
              <table:table-cell office:value-type="float" office:value="3.1375074284744">
                <text:p>3.1375074284744</text:p>
              </table:table-cell>
              <table:table-cell office:value-type="float" office:value="1562624">
                <text:p>1562624</text:p>
              </table:table-cell>
              <table:table-cell office:value-type="float" office:value="1562624">
                <text:p>1562624</text:p>
              </table:table-cell>
              <table:table-cell office:value-type="float" office:value="1475309.87835067">
                <text:p>1475309.87835067</text:p>
              </table:table-cell>
              <table:table-cell office:value-type="float" office:value="1552957.76668491">
                <text:p>1552957.76668491</text:p>
              </table:table-cell>
            </table:table-row>
            <table:table-row>
              <table:table-cell office:value-type="string"/>
              <table:table-cell office:value-type="float" office:value="3.44835989787003">
                <text:p>3.44835989787003</text:p>
              </table:table-cell>
              <table:table-cell office:value-type="float" office:value="1713393">
                <text:p>1713393</text:p>
              </table:table-cell>
              <table:table-cell office:value-type="float" office:value="1713393">
                <text:p>1713393</text:p>
              </table:table-cell>
              <table:table-cell office:value-type="float" office:value="1621478.04823196">
                <text:p>1621478.04823196</text:p>
              </table:table-cell>
              <table:table-cell office:value-type="float" office:value="1706818.99813891">
                <text:p>1706818.99813891</text:p>
              </table:table-cell>
            </table:table-row>
            <table:table-row>
              <table:table-cell office:value-type="string"/>
              <table:table-cell office:value-type="float" office:value="3.75869071430993">
                <text:p>3.75869071430993</text:p>
              </table:table-cell>
              <table:table-cell office:value-type="float" office:value="1873206">
                <text:p>1873206</text:p>
              </table:table-cell>
              <table:table-cell office:value-type="float" office:value="1873206">
                <text:p>1873206</text:p>
              </table:table-cell>
              <table:table-cell office:value-type="float" office:value="1767400.92793428">
                <text:p>1767400.92793428</text:p>
              </table:table-cell>
              <table:table-cell office:value-type="float" office:value="1860422.02940451">
                <text:p>1860422.02940451</text:p>
              </table:table-cell>
            </table:table-row>
            <table:table-row>
              <table:table-cell office:value-type="string"/>
              <table:table-cell office:value-type="float" office:value="4.06850118980074">
                <text:p>4.06850118980074</text:p>
              </table:table-cell>
              <table:table-cell office:value-type="float" office:value="2029887">
                <text:p>2029887</text:p>
              </table:table-cell>
              <table:table-cell office:value-type="float" office:value="2029887">
                <text:p>2029887</text:p>
              </table:table-cell>
              <table:table-cell office:value-type="float" office:value="1913079.13438569">
                <text:p>1913079.13438569</text:p>
              </table:table-cell>
              <table:table-cell office:value-type="float" office:value="2013767.50987967">
                <text:p>2013767.50987967</text:p>
              </table:table-cell>
            </table:table-row>
            <table:table-row>
              <table:table-cell office:value-type="string"/>
              <table:table-cell office:value-type="float" office:value="4.37779263195302">
                <text:p>4.37779263195302</text:p>
              </table:table-cell>
              <table:table-cell office:value-type="float" office:value="2197397">
                <text:p>2197397</text:p>
              </table:table-cell>
              <table:table-cell office:value-type="float" office:value="2197397">
                <text:p>2197397</text:p>
              </table:table-cell>
              <table:table-cell office:value-type="float" office:value="2058513.28244712">
                <text:p>2058513.28244712</text:p>
              </table:table-cell>
              <table:table-cell office:value-type="float" office:value="2166856.08678644">
                <text:p>2166856.08678644</text:p>
              </table:table-cell>
            </table:table-row>
            <table:table-row>
              <table:table-cell office:value-type="string"/>
              <table:table-cell office:value-type="float" office:value="4.68656634399966">
                <text:p>4.68656634399966</text:p>
              </table:table-cell>
              <table:table-cell office:value-type="float" office:value="2326943">
                <text:p>2326943</text:p>
              </table:table-cell>
              <table:table-cell office:value-type="float" office:value="2326943">
                <text:p>2326943</text:p>
              </table:table-cell>
              <table:table-cell office:value-type="float" office:value="2203703.98492106">
                <text:p>2203703.98492106</text:p>
              </table:table-cell>
              <table:table-cell office:value-type="float" office:value="2319688.40518006">
                <text:p>2319688.405180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</office:styles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 draw:opacity="50%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1" chart:axis-label-position="outside-start"/>
      <style:graphic-properties draw:stroke="dash" draw:stroke-dash="Dot" svg:stroke-width="0.05cm" svg:stroke-color="#2e8b57"/>
      <style:text-properties fo:font-size="10pt" style:font-size-asian="10pt" style:font-size-complex="10pt"/>
    </style:style>
    <style:style style:name="ch10" style:family="chart" style:data-style-name="N0">
      <style:chart-properties chart:display-label="true" chart:logarithmic="false" chart:minimum="0.8" chart:maximum="1.2" chart:interval-major="0.0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diamond" chart:symbol-width="0.05cm" chart:symbol-height="0.0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349cm" svg:height="15.239cm" xlink:href=".." xlink:type="simple" chart:class="chart:scatter" chart:style-name="ch1">
        <chart:title svg:x="7.18cm" svg:y="0.439cm" chart:style-name="ch2">
          <text:p>Fraction of Expected Counts</text:p>
        </chart:title>
        <chart:subtitle svg:x="5.877cm" svg:y="1.537cm" chart:style-name="ch3">
          <text:p>Based on extrapolating 0-40% linear regression fit</text:p>
        </chart:subtitle>
        <chart:legend chart:legend-position="end" loext:overlay="true" svg:x="14.002cm" svg:y="8.787cm" style:legend-expansion="custom" svg:width="4.596cm" svg:height="1.09cm" style:legend-expansion-aspect-ratio="4.21651376146789" chart:style-name="ch4"/>
        <chart:plot-area chart:style-name="ch5" table:cell-range-address="'Annex A Preliminary Check'.L22:'Annex B Coincidence Limit'.M37" chart:data-source-has-labels="row" svg:x="1.404cm" svg:y="2.496cm" svg:width="18.539cm" svg:height="11.471cm">
          <chart:coordinate-region svg:x="2.356cm" svg:y="2.696cm" svg:width="16.891cm" svg:height="10.624cm"/>
          <chart:axis chart:dimension="x" chart:name="primary-x" chart:style-name="ch6">
            <chart:title svg:x="10.199cm" svg:y="14.272cm" chart:style-name="ch7">
              <text:p>Count</text:p>
            </chart:title>
            <chart:grid chart:style-name="ch8" chart:class="major"/>
          </chart:axis>
          <chart:axis chart:dimension="x" chart:name="secondary-x" chart:style-name="ch9"/>
          <chart:axis chart:dimension="y" chart:name="primary-y" chart:style-name="ch10">
            <chart:title svg:x="0.451cm" svg:y="8.857cm" chart:style-name="ch11">
              <text:p>Fraction</text:p>
            </chart:title>
            <chart:grid chart:style-name="ch8" chart:class="major"/>
          </chart:axis>
          <chart:series chart:style-name="ch12" chart:values-cell-range-address="'Annex A Preliminary Check'.M22:'Annex B Coincidence Limit'.M22" loext:label-string="&quot;1.00&quot;" chart:class="chart:scatter">
            <chart:domain table:cell-range-address="'Annex A Preliminary Check'.L22:'Annex B Coincidence Limit'.L37"/>
            <chart:data-point chart:repeated="32"/>
          </chart:series>
          <chart:series chart:style-name="ch13" chart:values-cell-range-address="'Annex A Preliminary Check'.M22:'Annex B Coincidence Limit'.M37" loext:label-string="&quot;Count Fraction&quot;" chart:class="chart:scatter">
            <chart:data-point chart:repeated="10"/>
            <chart:data-point chart:style-name="ch14"/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1.00</text:p>
              </table:table-cell>
              <table:table-cell office:value-type="string">
                <text:p>Count Frac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Annex A Preliminary Check'.L22:'Annex B Coincidence Limit'.L37</svg:desc>
                </draw:g>
              </table:table-cell>
              <table:table-cell office:value-type="float" office:value="NaN">
                <text:p>NaN</text:p>
                <draw:g>
                  <svg:desc>'Annex A Preliminary Check'.M22:'Annex B Coincidence Limit'.M22</svg:desc>
                </draw:g>
              </table:table-cell>
              <table:table-cell office:value-type="float" office:value="NaN">
                <text:p>NaN</text:p>
                <draw:g>
                  <svg:desc>'Annex A Preliminary Check'.M22:'Annex B Coincidence Limit'.M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158573">
                <text:p>158573</text:p>
              </table:table-cell>
              <table:table-cell office:value-type="float" office:value="NaN">
                <text:p>NaN</text:p>
              </table:table-cell>
              <table:table-cell office:value-type="float" office:value="1.01337916682143">
                <text:p>1.01337916682143</text:p>
              </table:table-cell>
            </table:table-row>
            <table:table-row>
              <table:table-cell office:value-type="string"/>
              <table:table-cell office:value-type="float" office:value="315866">
                <text:p>315866</text:p>
              </table:table-cell>
              <table:table-cell office:value-type="float" office:value="NaN">
                <text:p>NaN</text:p>
              </table:table-cell>
              <table:table-cell office:value-type="float" office:value="1.0101439242953">
                <text:p>1.0101439242953</text:p>
              </table:table-cell>
            </table:table-row>
            <table:table-row>
              <table:table-cell office:value-type="string"/>
              <table:table-cell office:value-type="float" office:value="471092">
                <text:p>471092</text:p>
              </table:table-cell>
              <table:table-cell office:value-type="float" office:value="NaN">
                <text:p>NaN</text:p>
              </table:table-cell>
              <table:table-cell office:value-type="float" office:value="1.00522244307956">
                <text:p>1.00522244307956</text:p>
              </table:table-cell>
            </table:table-row>
            <table:table-row>
              <table:table-cell office:value-type="string"/>
              <table:table-cell office:value-type="float" office:value="620381">
                <text:p>620381</text:p>
              </table:table-cell>
              <table:table-cell office:value-type="float" office:value="NaN">
                <text:p>NaN</text:p>
              </table:table-cell>
              <table:table-cell office:value-type="float" office:value="0.993672382313443">
                <text:p>0.993672382313443</text:p>
              </table:table-cell>
            </table:table-row>
            <table:table-row>
              <table:table-cell office:value-type="string"/>
              <table:table-cell office:value-type="float" office:value="760309">
                <text:p>760309</text:p>
              </table:table-cell>
              <table:table-cell office:value-type="float" office:value="NaN">
                <text:p>NaN</text:p>
              </table:table-cell>
              <table:table-cell office:value-type="float" office:value="0.975060491911683">
                <text:p>0.975060491911683</text:p>
              </table:table-cell>
            </table:table-row>
            <table:table-row>
              <table:table-cell office:value-type="string"/>
              <table:table-cell office:value-type="float" office:value="922391">
                <text:p>922391</text:p>
              </table:table-cell>
              <table:table-cell office:value-type="float" office:value="NaN">
                <text:p>NaN</text:p>
              </table:table-cell>
              <table:table-cell office:value-type="float" office:value="0.986601202053159">
                <text:p>0.986601202053159</text:p>
              </table:table-cell>
            </table:table-row>
            <table:table-row>
              <table:table-cell office:value-type="string"/>
              <table:table-cell office:value-type="float" office:value="1083045">
                <text:p>1083045</text:p>
              </table:table-cell>
              <table:table-cell office:value-type="float" office:value="NaN">
                <text:p>NaN</text:p>
              </table:table-cell>
              <table:table-cell office:value-type="float" office:value="0.993784886796145">
                <text:p>0.993784886796145</text:p>
              </table:table-cell>
            </table:table-row>
            <table:table-row>
              <table:table-cell office:value-type="string"/>
              <table:table-cell office:value-type="float" office:value="1244140">
                <text:p>1244140</text:p>
              </table:table-cell>
              <table:table-cell office:value-type="float" office:value="NaN">
                <text:p>NaN</text:p>
              </table:table-cell>
              <table:table-cell office:value-type="float" office:value="0.999744391002944">
                <text:p>0.999744391002944</text:p>
              </table:table-cell>
            </table:table-row>
            <table:table-row>
              <table:table-cell office:value-type="string"/>
              <table:table-cell office:value-type="float" office:value="1407530">
                <text:p>1407530</text:p>
              </table:table-cell>
              <table:table-cell office:value-type="float" office:value="NaN">
                <text:p>NaN</text:p>
              </table:table-cell>
              <table:table-cell office:value-type="float" office:value="1.0062139565178">
                <text:p>1.0062139565178</text:p>
              </table:table-cell>
            </table:table-row>
            <table:table-row>
              <table:table-cell office:value-type="string"/>
              <table:table-cell office:value-type="float" office:value="1562624">
                <text:p>1562624</text:p>
              </table:table-cell>
              <table:table-cell office:value-type="float" office:value="NaN">
                <text:p>NaN</text:p>
              </table:table-cell>
              <table:table-cell office:value-type="float" office:value="1.00622440192673">
                <text:p>1.00622440192673</text:p>
              </table:table-cell>
            </table:table-row>
            <table:table-row>
              <table:table-cell office:value-type="string"/>
              <table:table-cell office:value-type="float" office:value="1713393">
                <text:p>1713393</text:p>
              </table:table-cell>
              <table:table-cell office:value-type="float" office:value="NaN">
                <text:p>NaN</text:p>
              </table:table-cell>
              <table:table-cell office:value-type="float" office:value="1.00385161043336">
                <text:p>1.00385161043336</text:p>
              </table:table-cell>
            </table:table-row>
            <table:table-row>
              <table:table-cell office:value-type="string"/>
              <table:table-cell office:value-type="float" office:value="1873206">
                <text:p>1873206</text:p>
              </table:table-cell>
              <table:table-cell office:value-type="float" office:value="NaN">
                <text:p>NaN</text:p>
              </table:table-cell>
              <table:table-cell office:value-type="float" office:value="1.00687154333449">
                <text:p>1.00687154333449</text:p>
              </table:table-cell>
            </table:table-row>
            <table:table-row>
              <table:table-cell office:value-type="string"/>
              <table:table-cell office:value-type="float" office:value="2029887">
                <text:p>2029887</text:p>
              </table:table-cell>
              <table:table-cell office:value-type="float" office:value="NaN">
                <text:p>NaN</text:p>
              </table:table-cell>
              <table:table-cell office:value-type="float" office:value="1.00800464305897">
                <text:p>1.00800464305897</text:p>
              </table:table-cell>
            </table:table-row>
            <table:table-row>
              <table:table-cell office:value-type="string"/>
              <table:table-cell office:value-type="float" office:value="2197397">
                <text:p>2197397</text:p>
              </table:table-cell>
              <table:table-cell office:value-type="float" office:value="NaN">
                <text:p>NaN</text:p>
              </table:table-cell>
              <table:table-cell office:value-type="float" office:value="1.01409457388509">
                <text:p>1.01409457388509</text:p>
              </table:table-cell>
            </table:table-row>
            <table:table-row>
              <table:table-cell office:value-type="string"/>
              <table:table-cell office:value-type="float" office:value="2326943">
                <text:p>2326943</text:p>
              </table:table-cell>
              <table:table-cell office:value-type="float" office:value="NaN">
                <text:p>NaN</text:p>
              </table:table-cell>
              <table:table-cell office:value-type="float" office:value="1.0031274005611">
                <text:p>1.003127400561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</office:styles>
</office:document-styles>
</file>