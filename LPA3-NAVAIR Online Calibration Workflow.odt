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700000217D8EE1F50.png" manifest:media-type="image/png"/>
  <manifest:file-entry manifest:full-path="Pictures/1000000100000451000004724ABA1999.png" manifest:media-type="image/png"/>
  <manifest:file-entry manifest:full-path="Pictures/1000000100000352000002A1DBAA1B3E.png" manifest:media-type="image/png"/>
  <manifest:file-entry manifest:full-path="Pictures/1000000100000358000000A4F35B4272.png" manifest:media-type="image/png"/>
  <manifest:file-entry manifest:full-path="Pictures/10000001000000CA000000A04E3954F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b64be" officeooo:paragraph-rsid="000b64be"/>
    </style:style>
    <style:style style:name="P2" style:family="paragraph" style:parent-style-name="Text_20_body" style:list-style-name="L1">
      <style:text-properties officeooo:rsid="000fdaa7" officeooo:paragraph-rsid="000fdaa7"/>
    </style:style>
    <style:style style:name="P3" style:family="paragraph" style:parent-style-name="Text_20_body" style:list-style-name="L1">
      <style:text-properties officeooo:rsid="000f0f86" officeooo:paragraph-rsid="000f0f86"/>
    </style:style>
    <style:style style:name="P4" style:family="paragraph" style:parent-style-name="Text_20_body">
      <style:text-properties officeooo:rsid="000fdaa7" officeooo:paragraph-rsid="000fdaa7"/>
    </style:style>
    <style:style style:name="P5" style:family="paragraph" style:parent-style-name="Text_20_body" style:list-style-name="L2">
      <style:text-properties officeooo:rsid="000fdaa7" officeooo:paragraph-rsid="000fdaa7"/>
    </style:style>
    <style:style style:name="P6" style:family="paragraph" style:parent-style-name="Text_20_body">
      <style:text-properties officeooo:rsid="001033fe" officeooo:paragraph-rsid="001033fe"/>
    </style:style>
    <style:style style:name="P7" style:family="paragraph" style:parent-style-name="Text_20_body">
      <loext:graphic-properties draw:fill="solid" draw:fill-color="#ffff00" draw:opacity="100%"/>
      <style:paragraph-properties fo:background-color="#ffff00"/>
      <style:text-properties officeooo:rsid="001033fe" officeooo:paragraph-rsid="00143ce5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15f5fa" officeooo:paragraph-rsid="0015f5fa"/>
    </style:style>
    <style:style style:name="P10" style:family="paragraph" style:parent-style-name="Text_20_body">
      <style:text-properties officeooo:rsid="001033fe" officeooo:paragraph-rsid="00131315"/>
    </style:style>
    <style:style style:name="P11" style:family="paragraph" style:parent-style-name="Heading_20_1" style:list-style-name=""/>
    <style:style style:name="P12" style:family="paragraph" style:parent-style-name="Text_20_body">
      <style:text-properties officeooo:rsid="0017b231" officeooo:paragraph-rsid="0017b231"/>
    </style:style>
    <style:style style:name="P13" style:family="paragraph" style:parent-style-name="Text_20_body">
      <style:text-properties officeooo:rsid="0018640b" officeooo:paragraph-rsid="0018640b"/>
    </style:style>
    <style:style style:name="P14" style:family="paragraph" style:parent-style-name="Text_20_body">
      <style:text-properties officeooo:rsid="001a45b8" officeooo:paragraph-rsid="001a45b8"/>
    </style:style>
    <style:style style:name="P15" style:family="paragraph" style:parent-style-name="Text_20_body">
      <style:text-properties officeooo:rsid="001c3310" officeooo:paragraph-rsid="001c3310"/>
    </style:style>
    <style:style style:name="P16" style:family="paragraph" style:parent-style-name="Text_20_body">
      <style:text-properties officeooo:rsid="001cd640" officeooo:paragraph-rsid="001cd640"/>
    </style:style>
    <style:style style:name="P17" style:family="paragraph" style:parent-style-name="Text_20_body">
      <style:text-properties officeooo:rsid="001ed3ee" officeooo:paragraph-rsid="001ed3ee"/>
    </style:style>
    <style:style style:name="P18" style:family="paragraph" style:parent-style-name="Table_20_Contents">
      <style:text-properties officeooo:rsid="001ed3ee" officeooo:paragraph-rsid="001ed3ee"/>
    </style:style>
    <style:style style:name="P19" style:family="paragraph" style:parent-style-name="Text_20_body">
      <style:text-properties officeooo:rsid="00228acc" officeooo:paragraph-rsid="00228acc"/>
    </style:style>
    <style:style style:name="P20" style:family="paragraph" style:parent-style-name="Text_20_body">
      <style:text-properties officeooo:rsid="00236b6a" officeooo:paragraph-rsid="00236b6a"/>
    </style:style>
    <style:style style:name="T1" style:family="text">
      <style:text-properties officeooo:rsid="002029d2"/>
    </style:style>
    <style:style style:name="T2" style:family="text">
      <style:text-properties officeooo:rsid="001033fe"/>
    </style:style>
    <style:style style:name="T3" style:family="text">
      <style:text-properties officeooo:rsid="001f2591"/>
    </style:style>
    <style:style style:name="T4" style:family="text">
      <style:text-properties officeooo:rsid="001fed36"/>
    </style:style>
    <style:style style:name="T5" style:family="text">
      <style:text-properties officeooo:rsid="0015f5fa"/>
    </style:style>
    <style:style style:name="T6" style:family="text">
      <style:text-properties officeooo:rsid="00143ce5"/>
    </style:style>
    <style:style style:name="T7" style:family="text">
      <style:text-properties officeooo:rsid="0011cccb"/>
    </style:style>
    <style:style style:name="T8" style:family="text">
      <style:text-properties officeooo:rsid="001cd640"/>
    </style:style>
    <style:style style:name="T9" style:family="text">
      <style:text-properties officeooo:rsid="001e90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PA3-NAVAIR Online Calibration Workflow</text:h>
      <text:p text:style-name="P1">2025-05-13</text:p>
      <text:p text:style-name="P1"/>
      <text:h text:style-name="Heading_20_2" text:outline-level="2">FOR EACH UNIT</text:h>
      <text:list text:style-name="L1">
        <text:list-item>
          <text:p text:style-name="P2">Update firmware to <text:span text:style-name="T1">current release</text:span></text:p>
        </text:list-item>
        <text:list-item>
          <text:p text:style-name="P3">Check appears as "LPA3" on connect dialog</text:p>
        </text:list-item>
      </text:list>
      <text:p text:style-name="P4"/>
      <text:p text:style-name="Caption"><draw:frame draw:style-name="fr1" draw:name="Image1" text:anchor-type="char" svg:x="-0.014cm" svg:y="-0.081cm" svg:width="7.281cm" svg:height="7.498cm" draw:z-index="0"><draw:image xlink:href="Pictures/1000000100000451000004724ABA1999.png" xlink:type="simple" xlink:show="embed" xlink:actuate="onLoad" draw:mime-type="image/png"/></draw:frame>System Settings</text:p>
      <text:list text:style-name="L2">
        <text:list-item>
          <text:p text:style-name="P5">Change "Product" to LPA3-NAVAIR. <text:span text:style-name="T2">Unit will reset.</text:span></text:p>
        </text:list-item>
        <text:list-item>
          <text:p text:style-name="P5">Initialise Product Settings</text:p>
        </text:list-item>
        <text:list-item>
          <text:p text:style-name="P5">Set serial number according to the one on the Block</text:p>
        </text:list-item>
      </text:list>
      <text:p text:style-name="P6"/>
      <text:p text:style-name="P7"><text:span text:style-name="T3">Leave flushing </text:span>with clean fluid <text:span text:style-name="T3">for at least 20 minutes. </text:span><text:span text:style-name="T4">Leave with fluid in unit for subsequent calibration.</text:span></text:p>
      <text:p text:style-name="Text_20_body"/>
      <text:h text:style-name="P8" text:outline-level="1">Calibration</text:h>
      <text:p text:style-name="P9">Setup</text:p>
      <text:p text:style-name="Caption"><text:span text:style-name="T5">Use dialog to d</text:span><text:span text:style-name="T6">ose</text:span><draw:frame draw:style-name="fr2" draw:name="Image2" text:anchor-type="char" svg:width="17cm" svg:height="13.46cm" draw:z-index="2"><draw:image xlink:href="Pictures/1000000100000352000002A1DBAA1B3E.png" xlink:type="simple" xlink:show="embed" xlink:actuate="onLoad" draw:mime-type="image/png"/></draw:frame><text:span text:style-name="T6"> rig to 5mg/l MTD, "corrected" distribution tickbox on.</text:span></text:p>
      <text:p text:style-name="P9">Distribution grid will populate and a line written to log indicating current target</text:p>
      <text:p text:style-name="P9"/>
      <text:p text:style-name="P9"><draw:frame draw:style-name="fr3" draw:name="Image3" text:anchor-type="char" svg:width="8.036cm" svg:height="1.54cm" draw:z-index="1"><draw:image xlink:href="Pictures/1000000100000358000000A4F35B4272.png" xlink:type="simple" xlink:show="embed" xlink:actuate="onLoad" draw:mime-type="image/png"/></draw:frame></text:p>
      <text:p text:style-name="P10"/>
      <text:h text:style-name="P11" text:outline-level="1"/>
      <text:h text:style-name="P8" text:outline-level="1">For Each Unit</text:h>
      <text:p text:style-name="P10">Perform no-noise check a few times with clean fluid in block but test rig isolated <text:span text:style-name="T6">(do this before calibration fluid through the unit</text:span>.</text:p>
      <text:p text:style-name="P10">Record Photocurrent and lowest noise value <text:span text:style-name="T7">against serial number</text:span>.</text:p>
      <text:p text:style-name="P12">Connect to dosed test rig</text:p>
      <text:p text:style-name="P12">Flush 100ml into waste</text:p>
      <text:p text:style-name="P13">Flush for 1 minute</text:p>
      <text:p text:style-name="P13">CAL START</text:p>
      <text:p text:style-name="P14"><draw:frame draw:style-name="fr4" draw:name="Image4" text:anchor-type="char" svg:width="17cm" svg:height="9.895cm" draw:z-index="3"><draw:image xlink:href="Pictures/100000010000039700000217D8EE1F50.png" xlink:type="simple" xlink:show="embed" xlink:actuate="onLoad" draw:mime-type="image/png"/></draw:frame></text:p>
      <text:p text:style-name="P15">38+μm <text:span text:style-name="T8">thresholds </text:span>will not be reliabl<text:span text:style-name="T8">e</text:span> especially at 5mg/l</text:p>
      <text:p text:style-name="P16">These need to be manually loaded from <text:span text:style-name="T9">reference values.</text:span></text:p>
      <text:p text:style-name="P17">As of 2025-05-13, thresholds for LPA3-NAVAIR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38μm</text:p>
          </table:table-cell>
          <table:table-cell table:style-name="Table1.B1" office:value-type="string">
            <text:p text:style-name="P18">9938</text:p>
          </table:table-cell>
        </table:table-row>
        <table:table-row>
          <table:table-cell table:style-name="Table1.A2" office:value-type="string">
            <text:p text:style-name="P18">50μm(c)</text:p>
          </table:table-cell>
          <table:table-cell table:style-name="Table1.B2" office:value-type="string">
            <text:p text:style-name="P18">15300</text:p>
          </table:table-cell>
        </table:table-row>
        <table:table-row>
          <table:table-cell table:style-name="Table1.A2" office:value-type="string">
            <text:p text:style-name="P18">70μm(c)</text:p>
          </table:table-cell>
          <table:table-cell table:style-name="Table1.B2" office:value-type="string">
            <text:p text:style-name="P18">25000</text:p>
          </table:table-cell>
        </table:table-row>
      </table:table>
      <text:p text:style-name="P16"/>
      <text:p text:style-name="P17">(CF automatically calibrated values<draw:frame draw:style-name="fr5" draw:name="Image5" text:anchor-type="char" svg:x="9.44cm" svg:y="-0.235cm" svg:width="1.884cm" svg:height="1.492cm" draw:z-index="4"><draw:image xlink:href="Pictures/10000001000000CA000000A04E3954FF.png" xlink:type="simple" xlink:show="embed" xlink:actuate="onLoad" draw:mime-type="image/png"/></draw:frame>)</text:p>
      <text:p text:style-name="P17"/>
      <text:p text:style-name="P17"/>
      <text:h text:style-name="P8" text:outline-level="1">2025-12-08 Snagging List </text:h>
      <text:p text:style-name="Text_20_body"/>
      <text:p text:style-name="P19">NAVAIR interface pins short circuit</text:p>
      <text:p text:style-name="P19">1x didn't enumerate properly USB</text:p>
      <text:p text:style-name="P20">PCB grounding check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3T15:28:20.612000000</meta:creation-date>
    <dc:date>2025-12-08T13:50:24.692967600</dc:date>
    <meta:editing-duration>PT1H51M51S</meta:editing-duration>
    <meta:editing-cycles>22</meta:editing-cycles>
    <meta:generator>LibreOffice/25.8.3.2$Windows_X86_64 LibreOffice_project/8ca8d55c161d602844f5428fa4b58097424e324e</meta:generator>
    <meta:document-statistic meta:table-count="1" meta:image-count="5" meta:object-count="0" meta:page-count="4" meta:paragraph-count="35" meta:word-count="193" meta:character-count="1191" meta:non-whitespace-character-count="1037"/>
  </office:meta>
</office:document-meta>
</file>