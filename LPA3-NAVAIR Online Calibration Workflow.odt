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970000021765246363.png" manifest:media-type="image/png"/>
  <manifest:file-entry manifest:full-path="Pictures/100000010000045100000472ADB1FAC7.png" manifest:media-type="image/png"/>
  <manifest:file-entry manifest:full-path="Pictures/1000000100000352000002A16B30D0FA.png" manifest:media-type="image/png"/>
  <manifest:file-entry manifest:full-path="Pictures/1000000100000358000000A4B27A28A8.png" manifest:media-type="image/png"/>
  <manifest:file-entry manifest:full-path="Pictures/10000001000000CA000000A01808A87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9.5cm" style:rel-column-width="32767*"/>
    </style:style>
    <style:style style:name="Table1.B" style:family="table-column">
      <style:table-column-properties style:column-width="9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fo:language="en" fo:country="US" officeooo:rsid="002cb9aa" officeooo:paragraph-rsid="002cb9aa"/>
    </style:style>
    <style:style style:name="P2" style:family="paragraph" style:parent-style-name="Text_20_body">
      <style:text-properties fo:language="en" fo:country="US" officeooo:rsid="002feaf1" officeooo:paragraph-rsid="002feaf1"/>
    </style:style>
    <style:style style:name="P3" style:family="paragraph" style:parent-style-name="Text_20_body">
      <style:text-properties fo:language="en" fo:country="US" officeooo:rsid="003249f9" officeooo:paragraph-rsid="003249f9"/>
    </style:style>
    <style:style style:name="P4" style:family="paragraph" style:parent-style-name="Text_20_body" style:list-style-name="L1">
      <style:text-properties fo:language="en" fo:country="US" officeooo:rsid="002feaf1" officeooo:paragraph-rsid="002feaf1"/>
    </style:style>
    <style:style style:name="P5" style:family="paragraph" style:parent-style-name="Text_20_body" style:list-style-name="L1">
      <style:text-properties fo:language="en" fo:country="US" officeooo:rsid="0031bcd0" officeooo:paragraph-rsid="0031bcd0"/>
    </style:style>
    <style:style style:name="P6" style:family="paragraph" style:parent-style-name="Text_20_body" style:list-style-name="L1">
      <style:text-properties fo:language="en" fo:country="US" officeooo:rsid="003249f9" officeooo:paragraph-rsid="003249f9"/>
    </style:style>
    <style:style style:name="P7" style:family="paragraph" style:parent-style-name="Text_20_body" style:list-style-name="L2">
      <style:text-properties fo:language="en" fo:country="US" officeooo:rsid="003249f9" officeooo:paragraph-rsid="003249f9"/>
    </style:style>
    <style:style style:name="P8" style:family="paragraph" style:parent-style-name="Text_20_body">
      <style:text-properties fo:language="en" fo:country="US" officeooo:rsid="0031bcd0" officeooo:paragraph-rsid="0031bcd0"/>
    </style:style>
    <style:style style:name="P9" style:family="paragraph" style:parent-style-name="Text_20_body">
      <style:text-properties officeooo:rsid="0027308a" officeooo:paragraph-rsid="0027308a"/>
    </style:style>
    <style:style style:name="P10" style:family="paragraph" style:parent-style-name="Text_20_body">
      <style:text-properties officeooo:rsid="002752b2" officeooo:paragraph-rsid="002752b2"/>
    </style:style>
    <style:style style:name="P11" style:family="paragraph" style:parent-style-name="Text_20_body">
      <style:text-properties officeooo:rsid="0026d149" officeooo:paragraph-rsid="0026d149"/>
    </style:style>
    <style:style style:name="P12" style:family="paragraph" style:parent-style-name="Text_20_body" style:list-style-name="L3">
      <style:text-properties officeooo:rsid="0026d149" officeooo:paragraph-rsid="0026d149"/>
    </style:style>
    <style:style style:name="P13" style:family="paragraph" style:parent-style-name="Text_20_body">
      <style:text-properties officeooo:paragraph-rsid="0026d149"/>
    </style:style>
    <style:style style:name="P14" style:family="paragraph" style:parent-style-name="Text_20_body" style:list-style-name="L4">
      <style:text-properties officeooo:rsid="00257926" officeooo:paragraph-rsid="00257926"/>
    </style:style>
    <style:style style:name="P15" style:family="paragraph" style:parent-style-name="Text_20_body" style:list-style-name="L5">
      <style:text-properties officeooo:rsid="00257926" officeooo:paragraph-rsid="00257926"/>
    </style:style>
    <style:style style:name="P16" style:family="paragraph" style:parent-style-name="Text_20_body">
      <style:text-properties officeooo:rsid="00257926" officeooo:paragraph-rsid="00257926"/>
    </style:style>
    <style:style style:name="P17" style:family="paragraph" style:parent-style-name="Text_20_body">
      <style:text-properties officeooo:rsid="000b64be" officeooo:paragraph-rsid="000b64be"/>
    </style:style>
    <style:style style:name="P18" style:family="paragraph" style:parent-style-name="Text_20_body" style:list-style-name="L6">
      <style:text-properties officeooo:rsid="000fdaa7" officeooo:paragraph-rsid="000fdaa7"/>
    </style:style>
    <style:style style:name="P19" style:family="paragraph" style:parent-style-name="Text_20_body" style:list-style-name="L6">
      <style:text-properties officeooo:rsid="000f0f86" officeooo:paragraph-rsid="000f0f86"/>
    </style:style>
    <style:style style:name="P20" style:family="paragraph" style:parent-style-name="Text_20_body">
      <style:text-properties officeooo:rsid="000fdaa7" officeooo:paragraph-rsid="000fdaa7"/>
    </style:style>
    <style:style style:name="P21" style:family="paragraph" style:parent-style-name="Text_20_body" style:list-style-name="L7">
      <style:text-properties officeooo:rsid="000fdaa7" officeooo:paragraph-rsid="000fdaa7"/>
    </style:style>
    <style:style style:name="P22" style:family="paragraph" style:parent-style-name="Text_20_body">
      <style:text-properties officeooo:rsid="001033fe" officeooo:paragraph-rsid="001033fe"/>
    </style:style>
    <style:style style:name="P23" style:family="paragraph" style:parent-style-name="Text_20_body">
      <loext:graphic-properties draw:fill="solid" draw:fill-color="#ffff00" draw:opacity="100%"/>
      <style:paragraph-properties fo:background-color="#ffff00"/>
      <style:text-properties officeooo:rsid="001033fe" officeooo:paragraph-rsid="00143ce5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Text_20_body">
      <style:text-properties officeooo:rsid="0015f5fa" officeooo:paragraph-rsid="0015f5fa"/>
    </style:style>
    <style:style style:name="P26" style:family="paragraph" style:parent-style-name="Text_20_body">
      <style:text-properties officeooo:rsid="001033fe" officeooo:paragraph-rsid="00131315"/>
    </style:style>
    <style:style style:name="P27" style:family="paragraph" style:parent-style-name="Heading_20_1" style:list-style-name=""/>
    <style:style style:name="P28" style:family="paragraph" style:parent-style-name="Text_20_body">
      <style:text-properties officeooo:rsid="0017b231" officeooo:paragraph-rsid="0017b231"/>
    </style:style>
    <style:style style:name="P29" style:family="paragraph" style:parent-style-name="Text_20_body">
      <style:text-properties officeooo:rsid="0018640b" officeooo:paragraph-rsid="0018640b"/>
    </style:style>
    <style:style style:name="P30" style:family="paragraph" style:parent-style-name="Text_20_body">
      <style:text-properties officeooo:rsid="001a45b8" officeooo:paragraph-rsid="001a45b8"/>
    </style:style>
    <style:style style:name="P31" style:family="paragraph" style:parent-style-name="Text_20_body">
      <style:text-properties officeooo:rsid="001c3310" officeooo:paragraph-rsid="001c3310"/>
    </style:style>
    <style:style style:name="P32" style:family="paragraph" style:parent-style-name="Text_20_body">
      <style:text-properties officeooo:rsid="001cd640" officeooo:paragraph-rsid="001cd640"/>
    </style:style>
    <style:style style:name="P33" style:family="paragraph" style:parent-style-name="Text_20_body">
      <style:text-properties officeooo:rsid="001ed3ee" officeooo:paragraph-rsid="001ed3ee"/>
    </style:style>
    <style:style style:name="P34" style:family="paragraph" style:parent-style-name="Table_20_Contents">
      <style:text-properties officeooo:rsid="001ed3ee" officeooo:paragraph-rsid="001ed3ee"/>
    </style:style>
    <style:style style:name="P35" style:family="paragraph" style:parent-style-name="Text_20_body">
      <style:text-properties officeooo:rsid="00228acc" officeooo:paragraph-rsid="00228acc"/>
    </style:style>
    <style:style style:name="P36" style:family="paragraph" style:parent-style-name="Text_20_body">
      <style:text-properties officeooo:rsid="00236b6a" officeooo:paragraph-rsid="00236b6a"/>
    </style:style>
    <style:style style:name="T1" style:family="text">
      <style:text-properties officeooo:rsid="002e8023"/>
    </style:style>
    <style:style style:name="T2" style:family="text">
      <style:text-properties style:text-position="super 58%"/>
    </style:style>
    <style:style style:name="T3" style:family="text">
      <style:text-properties officeooo:rsid="0031bcd0"/>
    </style:style>
    <style:style style:name="T4" style:family="text">
      <style:text-properties officeooo:rsid="0028da70"/>
    </style:style>
    <style:style style:name="T5" style:family="text">
      <style:text-properties officeooo:rsid="0026d149"/>
    </style:style>
    <style:style style:name="T6" style:family="text">
      <style:text-properties officeooo:rsid="002a7833"/>
    </style:style>
    <style:style style:name="T7" style:family="text">
      <style:text-properties officeooo:rsid="002029d2"/>
    </style:style>
    <style:style style:name="T8" style:family="text">
      <style:text-properties officeooo:rsid="001033fe"/>
    </style:style>
    <style:style style:name="T9" style:family="text">
      <style:text-properties officeooo:rsid="001f2591"/>
    </style:style>
    <style:style style:name="T10" style:family="text">
      <style:text-properties officeooo:rsid="001fed36"/>
    </style:style>
    <style:style style:name="T11" style:family="text">
      <style:text-properties officeooo:rsid="0015f5fa"/>
    </style:style>
    <style:style style:name="T12" style:family="text">
      <style:text-properties officeooo:rsid="00143ce5"/>
    </style:style>
    <style:style style:name="T13" style:family="text">
      <style:text-properties officeooo:rsid="0011cccb"/>
    </style:style>
    <style:style style:name="T14" style:family="text">
      <style:text-properties officeooo:rsid="001cd640"/>
    </style:style>
    <style:style style:name="T15" style:family="text">
      <style:text-properties officeooo:rsid="001e908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PA3-NAVAIR Online Calibration Workflow</text:h>
      <text:h text:style-name="Heading_20_1" text:outline-level="1">2026-05-18 Calibration Attempt Notes</text:h>
      <text:p text:style-name="P1">AS additive appears to cause background counts should probably avoid</text:p>
      <text:p text:style-name="P1"><text:span text:style-name="T1">Full a</text:span>utocal 3x sample, 3x ver<text:span text:style-name="T1">i</text:span>fication takes about 15 minutes per unit</text:p>
      <text:p text:style-name="P2">Need to update distribution just before end of 3<text:span text:style-name="T2">rd</text:span> cal run ideally</text:p>
      <text:p text:style-name="P3">For each unit perform electrical tests, these could be done offline:</text:p>
      <text:list text:style-name="L1">
        <text:list-item>
          <text:p text:style-name="P4">netwarrior, power</text:p>
        </text:list-item>
        <text:list-item>
          <text:p text:style-name="P4">Firmware update 5.16, <text:span text:style-name="T3">check</text:span></text:p>
        </text:list-item>
        <text:list-item>
          <text:p text:style-name="P5">Check takes power, charges</text:p>
        </text:list-item>
        <text:list-item>
          <text:p text:style-name="P5">Try to Connect LPA-View</text:p>
        </text:list-item>
        <text:list-item>
          <text:p text:style-name="P5">If won't connect use MPROG to set lpa3 USB ID</text:p>
        </text:list-item>
        <text:list-item>
          <text:p text:style-name="P6">change model to LPA3-Navair, allow to reset</text:p>
        </text:list-item>
        <text:list-item>
          <text:p text:style-name="P6">INIT PRODUCT SETTINGS</text:p>
        </text:list-item>
        <text:list-item>
          <text:p text:style-name="P6">set S/N e.g. 63010046</text:p>
        </text:list-item>
        <text:list-item>
          <text:p text:style-name="P6"/>
        </text:list-item>
      </text:list>
      <text:p text:style-name="P3">Online</text:p>
      <text:list text:style-name="L2">
        <text:list-item>
          <text:p text:style-name="P7">Connect hoses.</text:p>
        </text:list-item>
        <text:list-item>
          <text:p text:style-name="P7">Noise check – generally around 30. Sets LED level at calibration, noise threshold in cal certificate</text:p>
        </text:list-item>
        <text:list-item>
          <text:p text:style-name="P7"/>
        </text:list-item>
      </text:list>
      <text:p text:style-name="P8"/>
      <text:p text:style-name="P8"/>
      <text:p text:style-name="P8"/>
      <text:p text:style-name="P8"/>
      <text:p text:style-name="P2"/>
      <text:h text:style-name="Heading_20_1" text:outline-level="1">2026-05-17 Calibration Plane – First 20 Units</text:h>
      <text:p text:style-name="P9">Dose rig to 5.6mg/l + ~<text:span text:style-name="T4">5</text:span>0mg absolute of 38, 50, 70μm spheres.</text:p>
      <text:p text:style-name="P9">AS additive to 2500+/-1000pS/m</text:p>
      <text:p text:style-name="P10">Reference unit continuous test mode.</text:p>
      <text:p text:style-name="P10">Wait for rig to come up to temperature and stabilise while flushing first unit.</text:p>
      <text:p text:style-name="P10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h text:style-name="Heading_20_1" text:outline-level="1">2026-05-12 <text:span text:style-name="T5">Alignment with D2 Counter</text:span></text:h>
      <text:p text:style-name="P11">If needed <text:span text:style-name="T6">can instead use bottle samples.</text:span></text:p>
      <text:list text:style-name="L3">
        <text:list-item>
          <text:p text:style-name="P12">Use bottles of 5.6mg/l RM8632b certified by D2 counter using interpolated distribution 4-30μm</text:p>
        </text:list-item>
        <text:list-item>
          <text:p text:style-name="P12">Each counter 3x bottles cumulative mode discarding first (if sufficiently stable)</text:p>
        </text:list-item>
        <text:list-item>
          <text:p text:style-name="P12">Use auto-calibration with manual test starts</text:p>
        </text:list-item>
        <text:list-item>
          <text:p text:style-name="P12">This will auto-calibrate the 4-30μm channels</text:p>
        </text:list-item>
        <text:list-item>
          <text:p text:style-name="P12">Use rig to prepare 20+ bottles of each size 38, 50, 70</text:p>
        </text:list-item>
        <text:list-item>
          <text:p text:style-name="P12">Manually calibrate the 38,50,70 sizes</text:p>
        </text:list-item>
      </text:list>
      <text:p text:style-name="P11">For first run verify to Annex E and against D2 reference counter</text:p>
      <text:p text:style-name="P13"/>
      <text:h text:style-name="Heading_20_2" text:outline-level="2">Checks</text:h>
      <text:list text:style-name="L4">
        <text:list-item>
          <text:p text:style-name="P14">Block</text:p>
        </text:list-item>
      </text:list>
      <text:list text:style-name="L5">
        <text:list-item>
          <text:list>
            <text:list-item>
              <text:p text:style-name="P15">Photocurrent &lt; 11,000</text:p>
            </text:list-item>
            <text:list-item>
              <text:p text:style-name="P15">Noise measurement</text:p>
            </text:list-item>
            <text:list-item>
              <text:p text:style-name="P15"/>
            </text:list-item>
          </text:list>
        </text:list-item>
      </text:list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>2025-05-13</text:p>
      <text:p text:style-name="P17"/>
      <text:h text:style-name="Heading_20_2" text:outline-level="2">FOR EACH UNIT</text:h>
      <text:list text:style-name="L6">
        <text:list-item>
          <text:p text:style-name="P18">Update firmware to <text:span text:style-name="T7">current release</text:span></text:p>
        </text:list-item>
        <text:list-item>
          <text:p text:style-name="P19">Check appears as "LPA3" on connect dialog</text:p>
        </text:list-item>
      </text:list>
      <text:p text:style-name="P20"/>
      <text:p text:style-name="Caption"><draw:frame draw:style-name="fr1" draw:name="Image1" text:anchor-type="char" svg:x="-0.014cm" svg:y="-0.081cm" svg:width="7.281cm" svg:height="7.498cm" draw:z-index="0"><draw:image xlink:href="Pictures/100000010000045100000472ADB1FAC7.png" xlink:type="simple" xlink:show="embed" xlink:actuate="onLoad" draw:mime-type="image/png"/></draw:frame><text:soft-page-break/>System Settings</text:p>
      <text:list text:style-name="L7">
        <text:list-item>
          <text:p text:style-name="P21">Change "Product" to LPA3-NAVAIR. <text:span text:style-name="T8">Unit will reset.</text:span></text:p>
        </text:list-item>
        <text:list-item>
          <text:p text:style-name="P21">Initialise Product Settings</text:p>
        </text:list-item>
        <text:list-item>
          <text:p text:style-name="P21">Set serial number according to the one on the Block</text:p>
        </text:list-item>
      </text:list>
      <text:p text:style-name="P22"/>
      <text:p text:style-name="P23"><text:span text:style-name="T9">Leave flushing </text:span>with clean fluid <text:span text:style-name="T9">for at least 20 minutes. </text:span><text:span text:style-name="T10">Leave with fluid in unit for subsequent calibration.</text:span></text:p>
      <text:p text:style-name="Text_20_body"/>
      <text:h text:style-name="P24" text:outline-level="1">Calibration</text:h>
      <text:p text:style-name="P25">Setup</text:p>
      <text:p text:style-name="Caption"><text:span text:style-name="T11">Use dialog to d</text:span><text:span text:style-name="T12">ose</text:span><draw:frame draw:style-name="fr2" draw:name="Image2" text:anchor-type="char" svg:width="17cm" svg:height="13.46cm" draw:z-index="2"><draw:image xlink:href="Pictures/1000000100000352000002A16B30D0FA.png" xlink:type="simple" xlink:show="embed" xlink:actuate="onLoad" draw:mime-type="image/png"/></draw:frame><text:span text:style-name="T12"> rig to 5mg/l MTD, "corrected" distribution tickbox on.</text:span></text:p>
      <text:p text:style-name="P25">Distribution grid will populate and a line written to log indicating current target</text:p>
      <text:p text:style-name="P25"/>
      <text:p text:style-name="P25"><draw:frame draw:style-name="fr2" draw:name="Image3" text:anchor-type="char" svg:width="8.036cm" svg:height="1.54cm" draw:z-index="1"><draw:image xlink:href="Pictures/1000000100000358000000A4B27A28A8.png" xlink:type="simple" xlink:show="embed" xlink:actuate="onLoad" draw:mime-type="image/png"/></draw:frame></text:p>
      <text:p text:style-name="P26"/>
      <text:h text:style-name="P27" text:outline-level="1"/>
      <text:h text:style-name="P24" text:outline-level="1">For Each Unit</text:h>
      <text:p text:style-name="P26">Perform no-noise check a few times with clean fluid in block but test rig isolated <text:span text:style-name="T12">(do this before calibration fluid through the unit</text:span>.</text:p>
      <text:p text:style-name="P26">Record Photocurrent and lowest noise value <text:span text:style-name="T13">against serial number</text:span>.</text:p>
      <text:p text:style-name="P28">Connect to dosed test rig</text:p>
      <text:p text:style-name="P28">Flush 100ml into waste</text:p>
      <text:p text:style-name="P29">Flush for 1 minute</text:p>
      <text:p text:style-name="P29">CAL START</text:p>
      <text:p text:style-name="P30"><draw:frame draw:style-name="fr3" draw:name="Image4" text:anchor-type="char" svg:width="17cm" svg:height="9.895cm" draw:z-index="3"><draw:image xlink:href="Pictures/10000001000003970000021765246363.png" xlink:type="simple" xlink:show="embed" xlink:actuate="onLoad" draw:mime-type="image/png"/></draw:frame></text:p>
      <text:p text:style-name="P31">38+μm <text:span text:style-name="T14">thresholds </text:span>will not be reliabl<text:span text:style-name="T14">e</text:span> especially at 5mg/l</text:p>
      <text:p text:style-name="P32">These need to be manually loaded from <text:span text:style-name="T15">reference values.</text:span></text:p>
      <text:p text:style-name="P33">As of 2025-05-13, thresholds for LPA3-NAVAIR are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4">38μm</text:p>
          </table:table-cell>
          <table:table-cell table:style-name="Table1.B1" office:value-type="string">
            <text:p text:style-name="P34">9938</text:p>
          </table:table-cell>
        </table:table-row>
        <table:table-row>
          <table:table-cell table:style-name="Table1.A2" office:value-type="string">
            <text:p text:style-name="P34">50μm(c)</text:p>
          </table:table-cell>
          <table:table-cell table:style-name="Table1.B2" office:value-type="string">
            <text:p text:style-name="P34">15300</text:p>
          </table:table-cell>
        </table:table-row>
        <table:table-row>
          <table:table-cell table:style-name="Table1.A2" office:value-type="string">
            <text:p text:style-name="P34">70μm(c)</text:p>
          </table:table-cell>
          <table:table-cell table:style-name="Table1.B2" office:value-type="string">
            <text:p text:style-name="P34">25000</text:p>
          </table:table-cell>
        </table:table-row>
      </table:table>
      <text:p text:style-name="P32"/>
      <text:p text:style-name="P33">(CF automatically calibrated values<draw:frame draw:style-name="fr4" draw:name="Image5" text:anchor-type="char" svg:x="9.44cm" svg:y="-0.235cm" svg:width="1.884cm" svg:height="1.492cm" draw:z-index="4"><draw:image xlink:href="Pictures/10000001000000CA000000A01808A87A.png" xlink:type="simple" xlink:show="embed" xlink:actuate="onLoad" draw:mime-type="image/png"/></draw:frame>)</text:p>
      <text:p text:style-name="P33"/>
      <text:p text:style-name="P33"/>
      <text:h text:style-name="P24" text:outline-level="1">2025-12-08 Snagging List </text:h>
      <text:p text:style-name="Text_20_body"/>
      <text:p text:style-name="P35">NAVAIR interface pins short circuit</text:p>
      <text:p text:style-name="P35">1x didn't enumerate properly USB</text:p>
      <text:p text:style-name="P36">PCB grounding check</text:p>
      <text:p text:style-name="P3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10.5pt" fo:language="en" fo:country="GB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DejaVu Serif" fo:font-size="10.5pt" fo:language="en" fo:country="GB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  <style:text-properties style:font-name="Calibri" fo:font-family="Calibri" style:font-family-generic="swiss" style:font-pitch="variable" officeooo:rsid="0182ab4d"/>
    </style:style>
    <style:style style:name="List" style:family="paragraph" style:parent-style-name="Text_20_body" style:class="list">
      <style:text-properties fo:font-size="10.5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 Condensed" fo:font-family="'DejaVu Sans Condensed'" style:font-family-generic="swiss" style:font-pitch="variable" fo:font-size="8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8pt"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loext:graphic-properties draw:fill="solid" draw:fill-color="#c0c0c0" draw:opacity="100%"/>
      <style:paragraph-properties fo:background-color="#c0c0c0"/>
      <style:text-properties style:font-name="Arial Black" fo:font-family="'Arial Black'" style:font-family-generic="swiss" style:font-pitch="variable" fo:font-size="115%" fo:font-weight="normal" style:font-size-asian="115%" style:font-weight-asian="normal" style:font-size-complex="115%" style:font-weight-complex="normal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margin-left="0.076cm" fo:margin-right="0.076cm" fo:margin-top="0cm" fo:margin-bottom="0cm" style:contextual-spacing="false" fo:text-indent="0cm" style:auto-text-indent="false" text:number-lines="false" text:line-number="0"/>
      <style:text-properties style:font-name="Calibri" fo:font-family="Calibri" style:font-family-generic="swiss" style:font-pitch="variable" officeooo:rsid="01d9d3e8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margin-top="0cm" fo:margin-bottom="0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margin-top="0cm" fo:margin-bottom="0cm" style:contextual-spacing="false" fo:text-align="lef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Default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Report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" style:family="paragraph" style:parent-style-name="Text"/>
    <style:style style:name="Text" style:family="paragraph" style:parent-style-name="Caption" style:class="extra"/>
    <style:style style:name="Footnote_20__28_WW_29_" style:display-name="Footnote (WW)" style:family="paragraph" style:parent-style-name="Text"/>
    <style:style style:name="Internet_20_link" style:display-name="Internet link" style:family="paragraph" style:parent-style-name="Text"/>
    <style:style style:name="Status" style:family="paragraph" style:parent-style-name="Default"/>
    <style:style style:name="Good" style:family="paragraph" style:parent-style-name="Status"/>
    <style:style style:name="Neutral" style:family="paragraph" style:parent-style-name="Status"/>
    <style:style style:name="Bad" style:family="paragraph" style:parent-style-name="Status"/>
    <style:style style:name="Warning" style:family="paragraph" style:parent-style-name="Status"/>
    <style:style style:name="Error" style:family="paragraph" style:parent-style-name="Status"/>
    <style:style style:name="Accent" style:family="paragraph" style:parent-style-name="Default"/>
    <style:style style:name="Accent_20_1" style:display-name="Accent 1" style:family="paragraph" style:parent-style-name="Accent"/>
    <style:style style:name="Accent_20_2" style:display-name="Accent 2" style:family="paragraph" style:parent-style-name="Accent"/>
    <style:style style:name="Accent_20_3" style:display-name="Accent 3" style:family="paragraph" style:parent-style-name="Accent"/>
    <style:style style:name="Result" style:family="paragraph" style:parent-style-name="Default"/>
    <style:style style:name="Equation" style:family="paragraph" style:parent-style-name="Text_20_body">
      <style:paragraph-properties fo:margin-left="1.251cm" fo:text-align="left" style:justify-single-word="false" fo:text-indent="0cm" style:auto-text-indent="false"/>
      <style:text-properties fo:font-style="italic" style:font-style-asian="italic" style:font-style-complex="italic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Important" style:family="paragraph" style:parent-style-name="Text_20_body">
      <style:paragraph-properties fo:padding="0.049cm" fo:border-left="2.24pt solid #ff0000" fo:border-right="2.24pt solid #ff0000" fo:border-top="none" fo:border-bottom="none"/>
      <style:text-properties officeooo:rsid="054d0322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9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2cm" fo:margin-left="0cm" fo:margin-right="0cm" fo:margin-top="0.51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  <style:footer-left>
        <text:p text:style-name="MP1"><text:page-number text:select-page="current">2</text:page-number><text:s/></text:p>
      </style:footer-left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3T15:28:20.612000000</meta:creation-date>
    <dc:date>2026-05-18T16:31:54.364966700</dc:date>
    <meta:editing-duration>PT4H13M3S</meta:editing-duration>
    <meta:editing-cycles>31</meta:editing-cycles>
    <meta:generator>LibreOffice/26.2.1.2$Windows_X86_64 LibreOffice_project/620$Build-2</meta:generator>
    <meta:document-statistic meta:table-count="1" meta:image-count="5" meta:object-count="0" meta:page-count="6" meta:paragraph-count="73" meta:word-count="446" meta:character-count="2661" meta:non-whitespace-character-count="2308"/>
  </office:meta>
</office:document-meta>
</file>